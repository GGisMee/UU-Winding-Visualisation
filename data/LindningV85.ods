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580000025C410B0982.jpg" manifest:media-type="image/jpeg"/>
  <manifest:file-entry manifest:full-path="Pictures/10000001000005220000034B5B0FE8F7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3634in"/>
    </style:style>
    <style:style style:name="co3" style:family="table-column">
      <style:table-column-properties fo:break-before="auto" style:column-width="0.7264in"/>
    </style:style>
    <style:style style:name="co4" style:family="table-column">
      <style:table-column-properties fo:break-before="auto" style:column-width="0.352in"/>
    </style:style>
    <style:style style:name="co5" style:family="table-column">
      <style:table-column-properties fo:break-before="auto" style:column-width="0.7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PageStyle_5f_Lind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F=2)" style:apply-style-name="ConditionalStyle_5f_26" style:base-cell-address="Lind.A12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F=3)" style:apply-style-name="ConditionalStyle_5f_25" style:base-cell-address="Lind.A13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F=4)" style:apply-style-name="ConditionalStyle_5f_24" style:base-cell-address="Lind.A14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F=5)" style:apply-style-name="ConditionalStyle_5f_23" style:base-cell-address="Lind.A15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F=6)" style:apply-style-name="ConditionalStyle_5f_22" style:base-cell-address="Lind.A16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F=7)" style:apply-style-name="ConditionalStyle_5f_21" style:base-cell-address="Lind.A17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is-true-formula(F=2)" style:apply-style-name="ConditionalStyle_5f_26" style:base-cell-address="Lind.A12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is-true-formula(F=3)" style:apply-style-name="ConditionalStyle_5f_25" style:base-cell-address="Lind.A13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is-true-formula(F=4)" style:apply-style-name="ConditionalStyle_5f_24" style:base-cell-address="Lind.A14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is-true-formula(F=5)" style:apply-style-name="ConditionalStyle_5f_23" style:base-cell-address="Lind.A15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is-true-formula(F=6)" style:apply-style-name="ConditionalStyle_5f_22" style:base-cell-address="Lind.A16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is-true-formula(F=7)" style:apply-style-name="ConditionalStyle_5f_21" style:base-cell-address="Lind.A17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Q&gt;37)" style:apply-style-name="ConditionalStyle_5f_19" style:base-cell-address="Lind.C14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Q&gt;37)" style:apply-style-name="ConditionalStyle_5f_19" style:base-cell-address="Lind.C14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Q&gt;29)" style:apply-style-name="ConditionalStyle_5f_20" style:base-cell-address="Lind.C16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deebf7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map style:condition="is-true-formula(F=2)" style:apply-style-name="ConditionalStyle_5f_26" style:base-cell-address="Lind.A12"/>
    </style:style>
    <style:style style:name="ce24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map style:condition="is-true-formula(F=3)" style:apply-style-name="ConditionalStyle_5f_25" style:base-cell-address="Lind.A13"/>
    </style:style>
    <style:style style:name="ce2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map style:condition="is-true-formula(F=4)" style:apply-style-name="ConditionalStyle_5f_24" style:base-cell-address="Lind.A14"/>
    </style:style>
    <style:style style:name="ce26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map style:condition="is-true-formula(F=5)" style:apply-style-name="ConditionalStyle_5f_23" style:base-cell-address="Lind.A15"/>
    </style:style>
    <style:style style:name="ce27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map style:condition="is-true-formula(F=6)" style:apply-style-name="ConditionalStyle_5f_22" style:base-cell-address="Lind.A16"/>
    </style:style>
    <style:style style:name="ce28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map style:condition="is-true-formula(F=7)" style:apply-style-name="ConditionalStyle_5f_21" style:base-cell-address="Lind.A17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00" style:cell-protect="none" style:print-content="true" style:rotation-align="none"/>
    </style:style>
    <style:style style:name="ce31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is-true-formula(P=13)" style:apply-style-name="ConditionalStyle_5f_18" style:base-cell-address="Lind.D8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33" style:family="table-cell" style:parent-style-name="Default">
      <style:table-cell-properties fo:border-bottom="none" fo:background-color="#deebf7" style:cell-protect="none" style:print-content="true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34" style:family="table-cell" style:parent-style-name="Default">
      <style:table-cell-properties fo:border-bottom="none" style:cell-protect="none" style:print-content="true" style:diagonal-bl-tr="none" style:diagonal-tl-br="none" fo:border-left="1.76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35" style:family="table-cell" style:parent-style-name="Default">
      <style:table-cell-properties fo:border-bottom="none" fo:background-color="#deebf7" style:cell-protect="none" style:print-content="true" style:diagonal-bl-tr="none" style:diagonal-tl-br="none" fo:border-left="1.76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36" style:family="table-cell" style:parent-style-name="Default">
      <style:table-cell-properties fo:border-bottom="none" fo:background-color="#deebf7" style:cell-protect="none" style:print-content="true" style:diagonal-bl-tr="none" style:diagonal-tl-br="none" fo:border-left="1.76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37" style:family="table-cell" style:parent-style-name="Default">
      <style:table-cell-properties fo:border-bottom="none" style:cell-protect="none" style:print-content="true" style:diagonal-bl-tr="none" style:diagonal-tl-br="none" fo:border-left="1.76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38" style:family="table-cell" style:parent-style-name="Default">
      <style:table-cell-properties fo:border-bottom="none" fo:background-color="#deebf7" style:cell-protect="none" style:print-content="true" style:diagonal-bl-tr="none" style:diagonal-tl-br="none" fo:border-left="1.76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39" style:family="table-cell" style:parent-style-name="Default">
      <style:table-cell-properties fo:border-bottom="1.76pt solid #000000" style:cell-protect="none" style:print-content="true" style:diagonal-bl-tr="none" style:diagonal-tl-br="none" fo:border-left="1.76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40" style:family="table-cell" style:parent-style-name="Default">
      <style:table-cell-properties fo:background-color="#fbe5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41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42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F=2)" style:apply-style-name="ConditionalStyle_5f_26" style:base-cell-address="Lind.A12"/>
    </style:style>
    <style:style style:name="ce43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F=3)" style:apply-style-name="ConditionalStyle_5f_25" style:base-cell-address="Lind.A13"/>
    </style:style>
    <style:style style:name="ce44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F=4)" style:apply-style-name="ConditionalStyle_5f_24" style:base-cell-address="Lind.A14"/>
    </style:style>
    <style:style style:name="ce45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F=5)" style:apply-style-name="ConditionalStyle_5f_23" style:base-cell-address="Lind.A15"/>
    </style:style>
    <style:style style:name="ce46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F=6)" style:apply-style-name="ConditionalStyle_5f_22" style:base-cell-address="Lind.A16"/>
    </style:style>
    <style:style style:name="ce47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F=7)" style:apply-style-name="ConditionalStyle_5f_21" style:base-cell-address="Lind.A17"/>
    </style:style>
    <style:style style:name="ce48" style:family="table-cell" style:parent-style-name="Default">
      <style:map style:condition="is-true-formula(P=13)" style:apply-style-name="ConditionalStyle_5f_18" style:base-cell-address="Lind.D8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50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51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52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53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55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56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map style:condition="is-true-formula(P=13)" style:apply-style-name="ConditionalStyle_5f_18" style:base-cell-address="Lind.D8"/>
    </style:style>
    <style:style style:name="ce58" style:family="table-cell" style:parent-style-name="Default" style:data-style-name="N2">
      <style:table-cell-properties fo:background-color="#ffffcc" style:rotation-align="none"/>
    </style:style>
    <style:style style:name="ce59" style:family="table-cell" style:parent-style-name="Default" style:data-style-name="N10">
      <style:table-cell-properties fo:background-color="#ffffcc" style:rotation-align="none"/>
    </style:style>
    <style:style style:name="ce60" style:family="table-cell" style:parent-style-name="Default">
      <style:table-cell-properties fo:background-color="#ffffcc" style:rotation-align="none"/>
    </style:style>
    <style:style style:name="ce61" style:family="table-cell" style:parent-style-name="Default" style:data-style-name="N10">
      <style:table-cell-properties style:rotation-align="none"/>
    </style:style>
    <style:style style:name="ce62" style:family="table-cell" style:parent-style-name="Default">
      <style:table-cell-properties fo:border-bottom="none" fo:background-color="#deebf7" style:cell-protect="none" style:print-content="true" style:diagonal-bl-tr="none" style:diagonal-tl-br="none" fo:border-left="none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63" style:family="table-cell" style:parent-style-name="Default">
      <style:table-cell-properties fo:border-bottom="none" style:cell-protect="none" style:print-content="true" style:diagonal-bl-tr="none" style:diagonal-tl-br="none" fo:border-left="none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64" style:family="table-cell" style:parent-style-name="Default">
      <style:table-cell-properties fo:border-bottom="none" fo:background-color="#deebf7" style:cell-protect="none" style:print-content="true" style:diagonal-bl-tr="none" style:diagonal-tl-br="none" fo:border-left="none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65" style:family="table-cell" style:parent-style-name="Default">
      <style:table-cell-properties fo:border-bottom="none" fo:background-color="#deebf7" style:cell-protect="none" style:print-content="true" style:diagonal-bl-tr="none" style:diagonal-tl-br="none" fo:border-left="none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66" style:family="table-cell" style:parent-style-name="Default">
      <style:table-cell-properties fo:border-bottom="none" style:cell-protect="none" style:print-content="true" style:diagonal-bl-tr="none" style:diagonal-tl-br="none" fo:border-left="none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67" style:family="table-cell" style:parent-style-name="Default">
      <style:table-cell-properties fo:border-bottom="none" fo:background-color="#deebf7" style:cell-protect="none" style:print-content="true" style:diagonal-bl-tr="none" style:diagonal-tl-br="none" fo:border-left="none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68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6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70" style:family="table-cell" style:parent-style-name="Default">
      <style:table-cell-properties fo:background-color="#ffff00" style:rotation-align="none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72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73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74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75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76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77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78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7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80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82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83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84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85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86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8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88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89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90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91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92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93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94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9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96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97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98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99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00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01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02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0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04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05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06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07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08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09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10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13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14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15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16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17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18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19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2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21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22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23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24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25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26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27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2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2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30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31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32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33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34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35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36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3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38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39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40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41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none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42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none" style:rotation-align="none" fo:border-top="none"/>
      <style:map style:condition="is-true-formula(P=13)" style:apply-style-name="ConditionalStyle_5f_17" style:base-cell-address="Lind.D9"/>
    </style:style>
    <style:style style:name="ce143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none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44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none"/>
      <style:map style:condition="is-true-formula(P=13)" style:apply-style-name="ConditionalStyle_5f_17" style:base-cell-address="Lind.D9"/>
    </style:style>
    <style:style style:name="ce14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46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47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48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49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5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51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52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53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54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55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56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57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5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60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61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62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63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64" style:family="table-cell" style:parent-style-name="Default">
      <style:table-cell-properties fo:border-bottom="none" fo:background-color="#deebf7" style:cell-protect="none" style:print-content="true" style:diagonal-bl-tr="none" style:diagonal-tl-br="none" fo:border-left="none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65" style:family="table-cell" style:parent-style-name="Default">
      <style:table-cell-properties fo:border-bottom="none" style:cell-protect="none" style:print-content="true" style:diagonal-bl-tr="none" style:diagonal-tl-br="none" fo:border-left="none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66" style:family="table-cell" style:parent-style-name="Default">
      <style:table-cell-properties fo:border-bottom="none" fo:background-color="#deebf7" style:cell-protect="none" style:print-content="true" style:diagonal-bl-tr="none" style:diagonal-tl-br="none" fo:border-left="none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67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6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69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70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71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72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7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75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76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77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78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7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80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81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map style:condition="is-true-formula(P=13)" style:apply-style-name="ConditionalStyle_5f_17" style:base-cell-address="Lind.D9"/>
    </style:style>
    <style:style style:name="ce182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83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8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P=13)" style:apply-style-name="ConditionalStyle_5f_17" style:base-cell-address="Lind.D9"/>
    </style:style>
    <style:style style:name="ce185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86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1.76pt solid #000000" style:rotation-align="none" fo:border-top="none"/>
      <style:map style:condition="is-true-formula(P=13)" style:apply-style-name="ConditionalStyle_5f_17" style:base-cell-address="Lind.D9"/>
    </style:style>
    <style:style style:name="ce187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1.76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88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1.76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89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1.76pt solid #000000" style:rotation-align="none" fo:border-top="none"/>
      <style:map style:condition="is-true-formula(P=13)" style:apply-style-name="ConditionalStyle_5f_17" style:base-cell-address="Lind.D9"/>
    </style:style>
    <style:style style:name="ce190" style:family="table-cell" style:parent-style-name="Default">
      <style:table-cell-properties fo:border-bottom="none" fo:background-color="#deebf7" style:cell-protect="none" style:print-content="true" style:diagonal-bl-tr="none" style:diagonal-tl-br="none" fo:border-left="0.74pt solid #000000" fo:border-right="1.76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P=13)" style:apply-style-name="ConditionalStyle_5f_17" style:base-cell-address="Lind.D9"/>
    </style:style>
    <style:style style:name="ce191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1.76pt solid #000000" style:rotation-align="none" fo:border-top="none"/>
      <style:map style:condition="is-true-formula(P=13)" style:apply-style-name="ConditionalStyle_5f_17" style:base-cell-address="Lind.D9"/>
    </style:style>
    <style:style style:name="ce192" style:family="table-cell" style:parent-style-name="Default">
      <style:map style:condition="is-true-formula(Q&gt;37)" style:apply-style-name="ConditionalStyle_5f_19" style:base-cell-address="Lind.C14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2&quot;;&quot;4&quot;;&quot;6&quot;;&quot;8&quot;;&quot;10&quot;;&quot;13&quot;)" table:allow-empty-cell="true" table:display-list="unsorted" table:base-cell-address="Lind.D4">
          <table:help-message table:display="true"/>
          <table:error-message table:message-type="stop" table:display="true"/>
        </table:content-validation>
        <table:content-validation table:name="val2" table:condition="of:cell-content-is-in-list(&quot;2&quot;;&quot;3&quot;;&quot;4&quot;;&quot;5&quot;;&quot;6&quot;;&quot;7&quot;;&quot;8&quot;)" table:allow-empty-cell="true" table:display-list="unsorted" table:base-cell-address="Lind.D5">
          <table:help-message table:display="true"/>
          <table:error-message table:message-type="stop" table:display="true"/>
        </table:content-validation>
        <table:content-validation table:name="val3" table:condition="of:cell-content-is-in-list(&quot;20&quot;;&quot;22&quot;;&quot;24&quot;;&quot;26&quot;;&quot;28&quot;;&quot;30&quot;;&quot;32&quot;;&quot;34&quot;;&quot;36&quot;;&quot;38&quot;;&quot;40&quot;;&quot;42&quot;;&quot;44&quot;;&quot;46&quot;;&quot;48&quot;)" table:allow-empty-cell="true" table:display-list="unsorted" table:base-cell-address="Lind.D7">
          <table:help-message table:display="true"/>
          <table:error-message table:message-type="stop" table:display="true"/>
        </table:content-validation>
      </table:content-validations>
      <table:table table:name="Li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1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5" table:default-cell-style-name="Default"/>
        <table:table-column table:style-name="co5" table:visibility="collapse" table:number-columns-repeated="16332"/>
        <table:table-row table:style-name="ro1">
          <table:table-cell table:number-columns-repeated="52"/>
          <table:table-cell table:style-name="Default" table:number-columns-repeated="16332"/>
        </table:table-row>
        <table:table-row table:style-name="ro2">
          <table:table-cell table:number-columns-repeated="3"/>
          <table:table-cell table:style-name="ce29" office:value-type="string" calcext:value-type="string">
            <text:p>Lindnings utläggning stator med 20-48 spår och med 4-8 positioner i varje spår</text:p>
          </table:table-cell>
          <table:table-cell table:number-columns-repeated="22"/>
          <table:table-cell table:style-name="ce29" office:value-type="string" calcext:value-type="string">
            <text:p>REM 2025</text:p>
          </table:table-cell>
          <table:table-cell table:number-columns-repeated="25"/>
          <table:table-cell table:style-name="Default" table:number-columns-repeated="16332"/>
        </table:table-row>
        <table:table-row table:style-name="ro1">
          <table:table-cell table:number-columns-repeated="22"/>
          <table:table-cell office:value-type="string" calcext:value-type="string">
            <text:p>Legend:</text:p>
          </table:table-cell>
          <table:table-cell table:number-columns-repeated="29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16" office:value-type="string" calcext:value-type="string">
            <text:p>Poler</text:p>
          </table:table-cell>
          <table:table-cell table:style-name="ce30" table:content-validation-name="val1" office:value-type="float" office:value="6" calcext:value-type="float">
            <office:annotation draw:style-name="gr3" draw:text-style-name="P2" svg:width="1.3689in" svg:height="0.3957in" svg:x="1.9425in" svg:y="0.5976in" draw:caption-point-x="-0.1083in" draw:caption-point-y="0.1291in">
              <dc:creator>Hans Bernhoff</dc:creator>
              <meta:date-string/>
              <text:p>Fyll i dessa 4 från projektblad (personliga)</text:p>
            </office:annotation>
            <text:p>6</text:p>
          </table:table-cell>
          <table:table-cell office:value-type="string" calcext:value-type="string">
            <text:p>nb.</text:p>
          </table:table-cell>
          <table:table-cell table:number-columns-repeated="2"/>
          <table:table-cell table:style-name="ce16" office:value-type="string" calcext:value-type="string">
            <text:p>In Diam:</text:p>
          </table:table-cell>
          <table:table-cell table:style-name="ce58" office:value-type="float" office:value="0.3" calcext:value-type="float">
            <text:p>0.30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16" office:value-type="string" calcext:value-type="string">
            <text:p>Airgap:</text:p>
          </table:table-cell>
          <table:table-cell table:style-name="ce60"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6" office:value-type="string" calcext:value-type="string">
            <text:p>frekv.</text:p>
          </table:table-cell>
          <table:table-cell table:style-name="ce41" table:formula="of:=[.D4]/2*[.D6]/60" office:value-type="float" office:value="8" calcext:value-type="float">
            <text:p>8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70" office:value-type="string" calcext:value-type="string">
            <text:p>Input</text:p>
          </table:table-cell>
          <table:table-cell table:style-name="ce70"/>
          <table:table-cell table:number-columns-repeated="3"/>
          <table:table-cell table:style-name="ce16"/>
          <table:table-cell table:number-columns-repeated="24"/>
          <table:table-cell table:style-name="Default" table:number-columns-repeated="16332"/>
        </table:table-row>
        <table:table-row table:style-name="ro3">
          <table:table-cell table:number-columns-repeated="2"/>
          <table:table-cell table:style-name="ce16" office:value-type="string" calcext:value-type="string">
            <text:p>Faser: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office:value-type="string" calcext:value-type="string">
            <text:p>st</text:p>
          </table:table-cell>
          <table:table-cell table:number-columns-repeated="2"/>
          <table:table-cell table:style-name="ce16" office:value-type="string" calcext:value-type="string">
            <text:p>Höjd:</text:p>
          </table:table-cell>
          <table:table-cell table:style-name="ce58" office:value-type="float" office:value="0.5" calcext:value-type="float">
            <text:p>0.50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16" office:value-type="string" calcext:value-type="string">
            <text:p>PM h: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mm</text:p>
          </table:table-cell>
          <table:table-cell/>
          <table:table-cell table:style-name="ce16" office:value-type="string" calcext:value-type="string">
            <text:p>N45SH</text:p>
          </table:table-cell>
          <table:table-cell table:style-name="ce16" office:value-type="string" calcext:value-type="string">
            <text:p>Rmn</text:p>
          </table:table-cell>
          <table:table-cell table:style-name="ce60" office:value-type="float" office:value="1.32" calcext:value-type="float">
            <text:p>1.32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style-name="ce60" office:value-type="string" calcext:value-type="string">
            <text:p>Parameter</text:p>
          </table:table-cell>
          <table:table-cell table:style-name="ce60"/>
          <table:table-cell table:number-columns-repeated="28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16" office:value-type="string" calcext:value-type="string">
            <text:p>RPM</text:p>
          </table:table-cell>
          <table:table-cell table:style-name="ce30" office:value-type="float" office:value="160" calcext:value-type="float">
            <text:p>160</text:p>
          </table:table-cell>
          <table:table-cell office:value-type="string" calcext:value-type="string">
            <text:p>rpm</text:p>
          </table:table-cell>
          <table:table-cell table:number-columns-repeated="2"/>
          <table:table-cell table:style-name="ce16" office:value-type="string" calcext:value-type="string">
            <text:p>Stat. fill:</text:p>
          </table:table-cell>
          <table:table-cell table:style-name="ce59" office:value-type="percentage" office:value="0.5" calcext:value-type="percentage">
            <text:p>50%</text:p>
          </table:table-cell>
          <table:table-cell office:value-type="string" calcext:value-type="string">
            <text:p>.</text:p>
          </table:table-cell>
          <table:table-cell table:number-columns-repeated="2"/>
          <table:table-cell table:style-name="ce16" office:value-type="string" calcext:value-type="string">
            <text:p>Rot. fill</text:p>
          </table:table-cell>
          <table:table-cell table:style-name="ce59" office:value-type="percentage" office:value="0.5" calcext:value-type="percentage">
            <text:p>50%</text:p>
          </table:table-cell>
          <table:table-cell office:value-type="string" calcext:value-type="string">
            <text:p>.</text:p>
          </table:table-cell>
          <table:table-cell/>
          <table:table-cell table:style-name="ce16" office:value-type="string" calcext:value-type="string">
            <text:p>N45SH</text:p>
          </table:table-cell>
          <table:table-cell table:style-name="ce16" office:value-type="string" calcext:value-type="string">
            <text:p>H_c</text:p>
          </table:table-cell>
          <table:table-cell table:style-name="ce60" office:value-type="float" office:value="1.035" calcext:value-type="float">
            <text:p>1.035</text:p>
          </table:table-cell>
          <table:table-cell office:value-type="string" calcext:value-type="string">
            <text:p>MA/m</text:p>
          </table:table-cell>
          <table:table-cell table:number-columns-repeated="2"/>
          <table:table-cell table:style-name="ce41" office:value-type="string" calcext:value-type="string">
            <text:p>Resultat</text:p>
          </table:table-cell>
          <table:table-cell table:style-name="ce41"/>
          <table:table-cell table:number-columns-repeated="28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16" office:value-type="string" calcext:value-type="string">
            <text:p>Q Spår:</text:p>
          </table:table-cell>
          <table:table-cell table:style-name="ce30" table:content-validation-name="val3" office:value-type="float" office:value="32" calcext:value-type="float">
            <text:p>32</text:p>
          </table:table-cell>
          <table:table-cell office:value-type="string" calcext:value-type="string">
            <text:p>st</text:p>
          </table:table-cell>
          <table:table-cell table:number-columns-repeated="13"/>
          <table:table-cell table:style-name="ce61"/>
          <table:table-cell table:number-columns-repeated="33"/>
          <table:table-cell table:style-name="Default" table:number-columns-repeated="16332"/>
        </table:table-row>
        <table:table-row table:style-name="ro1">
          <table:table-cell table:number-columns-repeated="3"/>
          <table:table-cell table:style-name="ce31" office:value-type="string" calcext:value-type="string">
            <text:p>SKÄRP DIG: UDDA ANTAL POLER FUNKAR INTE!!!!</text:p>
          </table:table-cell>
          <table:table-cell table:style-name="ce48" table:number-columns-repeated="3"/>
          <table:table-cell table:style-name="ce57"/>
          <table:table-cell table:style-name="ce48" table:number-columns-repeated="17"/>
          <table:table-cell table:number-columns-repeated="27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16" office:value-type="string" calcext:value-type="string">
            <office:annotation draw:style-name="gr3" draw:text-style-name="P2" svg:width="1.4421in" svg:height="0.7287in" svg:x="1.5795in" svg:y="1.7961in" draw:caption-point-x="-0.1083in" draw:caption-point-y="-0.0169in">
              <dc:creator>Hans Bernhoff</dc:creator>
              <meta:date-string/>
              <text:p>Se förtydligande bild nedan till höger om du är osäker på vad Spår och Position i spår innebär.</text:p>
            </office:annotation>
            <text:p>Pos:\Slot:</text:p>
          </table:table-cell>
          <table:table-cell table:style-name="ce3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103" office:value-type="float" office:value="29" calcext:value-type="float">
            <text:p>29</text:p>
          </table:table-cell>
          <table:table-cell table:style-name="ce111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20" office:value-type="float" office:value="33" calcext:value-type="float">
            <text:p>33</text:p>
          </table:table-cell>
          <table:table-cell table:style-name="ce128" office:value-type="float" office:value="34" calcext:value-type="float">
            <text:p>34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36" calcext:value-type="float">
            <text:p>36</text:p>
          </table:table-cell>
          <table:table-cell table:style-name="ce137" office:value-type="float" office:value="37" calcext:value-type="float">
            <text:p>37</text:p>
          </table:table-cell>
          <table:table-cell table:style-name="ce145" office:value-type="float" office:value="38" calcext:value-type="float">
            <text:p>38</text:p>
          </table:table-cell>
          <table:table-cell table:style-name="ce150" office:value-type="float" office:value="39" calcext:value-type="float">
            <text:p>39</text:p>
          </table:table-cell>
          <table:table-cell table:style-name="ce158" office:value-type="float" office:value="40" calcext:value-type="float">
            <text:p>40</text:p>
          </table:table-cell>
          <table:table-cell table:style-name="ce159" office:value-type="float" office:value="41" calcext:value-type="float">
            <text:p>41</text:p>
          </table:table-cell>
          <table:table-cell table:style-name="ce159" office:value-type="float" office:value="42" calcext:value-type="float">
            <text:p>42</text:p>
          </table:table-cell>
          <table:table-cell table:style-name="ce168" office:value-type="float" office:value="43" calcext:value-type="float">
            <text:p>43</text:p>
          </table:table-cell>
          <table:table-cell table:style-name="ce173" office:value-type="float" office:value="44" calcext:value-type="float">
            <text:p>44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46" calcext:value-type="float">
            <text:p>46</text:p>
          </table:table-cell>
          <table:table-cell table:style-name="ce179" office:value-type="float" office:value="47" calcext:value-type="float">
            <text:p>47</text:p>
          </table:table-cell>
          <table:table-cell table:style-name="ce184" office:value-type="float" office:value="48" calcext:value-type="float">
            <text:p>48</text:p>
          </table:table-cell>
          <table:table-cell/>
          <table:table-cell table:style-name="Default" table:number-columns-repeated="1633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33"/>
          <table:table-cell table:style-name="ce50" table:number-columns-repeated="14"/>
          <table:table-cell table:style-name="ce62"/>
          <table:table-cell table:style-name="ce50" table:number-columns-repeated="4"/>
          <table:table-cell table:style-name="ce72" table:number-columns-repeated="2"/>
          <table:table-cell table:style-name="ce80" table:number-columns-repeated="2"/>
          <table:table-cell table:style-name="ce88" table:number-columns-repeated="2"/>
          <table:table-cell table:style-name="ce96" table:number-columns-repeated="2"/>
          <table:table-cell table:style-name="ce104" table:number-columns-repeated="2"/>
          <table:table-cell table:style-name="ce113" table:number-columns-repeated="2"/>
          <table:table-cell table:style-name="ce121" table:number-columns-repeated="2"/>
          <table:table-cell table:style-name="ce130" table:number-columns-repeated="2"/>
          <table:table-cell table:style-name="ce138" table:number-columns-repeated="2"/>
          <table:table-cell table:style-name="ce151" table:number-columns-repeated="2"/>
          <table:table-cell table:style-name="ce160" table:number-columns-repeated="2"/>
          <table:table-cell table:style-name="ce169" table:number-columns-repeated="2"/>
          <table:table-cell table:style-name="ce175" table:number-columns-repeated="2"/>
          <table:table-cell table:style-name="ce180"/>
          <table:table-cell table:style-name="ce185"/>
          <table:table-cell/>
          <table:table-cell table:style-name="Default" table:number-columns-repeated="16332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34"/>
          <table:table-cell table:style-name="ce51" table:number-columns-repeated="14"/>
          <table:table-cell table:style-name="ce63"/>
          <table:table-cell table:style-name="ce51" table:number-columns-repeated="4"/>
          <table:table-cell table:style-name="ce73" table:number-columns-repeated="2"/>
          <table:table-cell table:style-name="ce81" table:number-columns-repeated="2"/>
          <table:table-cell table:style-name="ce89" table:number-columns-repeated="2"/>
          <table:table-cell table:style-name="ce97" table:number-columns-repeated="2"/>
          <table:table-cell table:style-name="ce105" table:number-columns-repeated="2"/>
          <table:table-cell table:style-name="ce114" table:number-columns-repeated="2"/>
          <table:table-cell table:style-name="ce122" table:number-columns-repeated="2"/>
          <table:table-cell table:style-name="ce131" table:number-columns-repeated="2"/>
          <table:table-cell table:style-name="ce139" table:number-columns-repeated="2"/>
          <table:table-cell table:style-name="ce152" table:number-columns-repeated="2"/>
          <table:table-cell table:style-name="ce161" table:number-columns-repeated="2"/>
          <table:table-cell table:style-name="ce170" table:number-columns-repeated="2"/>
          <table:table-cell table:style-name="ce176" table:number-columns-repeated="2"/>
          <table:table-cell table:style-name="ce181"/>
          <table:table-cell table:style-name="ce186"/>
          <table:table-cell/>
          <table:table-cell table:style-name="Default" table:number-columns-repeated="16332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35"/>
          <table:table-cell table:style-name="ce52" table:number-columns-repeated="14"/>
          <table:table-cell table:style-name="ce64"/>
          <table:table-cell table:style-name="ce52" table:number-columns-repeated="4"/>
          <table:table-cell table:style-name="ce74" table:number-columns-repeated="2"/>
          <table:table-cell table:style-name="ce82" table:number-columns-repeated="2"/>
          <table:table-cell table:style-name="ce90" table:number-columns-repeated="2"/>
          <table:table-cell table:style-name="ce98" table:number-columns-repeated="2"/>
          <table:table-cell table:style-name="ce106" table:number-columns-repeated="2"/>
          <table:table-cell table:style-name="ce115" table:number-columns-repeated="2"/>
          <table:table-cell table:style-name="ce123" table:number-columns-repeated="2"/>
          <table:table-cell table:style-name="ce132" table:number-columns-repeated="2"/>
          <table:table-cell table:style-name="ce140" table:number-columns-repeated="2"/>
          <table:table-cell table:style-name="ce153" table:number-columns-repeated="2"/>
          <table:table-cell table:style-name="ce162" table:number-columns-repeated="2"/>
          <table:table-cell table:style-name="ce171" table:number-columns-repeated="2"/>
          <table:table-cell table:style-name="ce177" table:number-columns-repeated="2"/>
          <table:table-cell table:style-name="ce182"/>
          <table:table-cell table:style-name="ce187"/>
          <table:table-cell/>
          <table:table-cell table:style-name="Default" table:number-columns-repeated="16332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34"/>
          <table:table-cell table:style-name="ce51" table:number-columns-repeated="14"/>
          <table:table-cell table:style-name="ce63"/>
          <table:table-cell table:style-name="ce51" table:number-columns-repeated="4"/>
          <table:table-cell table:style-name="ce73" table:number-columns-repeated="2"/>
          <table:table-cell table:style-name="ce81" table:number-columns-repeated="2"/>
          <table:table-cell table:style-name="ce89" table:number-columns-repeated="2"/>
          <table:table-cell table:style-name="ce97" table:number-columns-repeated="2"/>
          <table:table-cell table:style-name="ce105" table:number-columns-repeated="2"/>
          <table:table-cell table:style-name="ce114" table:number-columns-repeated="2"/>
          <table:table-cell table:style-name="ce122" table:number-columns-repeated="2"/>
          <table:table-cell table:style-name="ce131" table:number-columns-repeated="2"/>
          <table:table-cell table:style-name="ce139" table:number-columns-repeated="2"/>
          <table:table-cell table:style-name="ce152" table:number-columns-repeated="2"/>
          <table:table-cell table:style-name="ce161" table:number-columns-repeated="2"/>
          <table:table-cell table:style-name="ce170" table:number-columns-repeated="2"/>
          <table:table-cell table:style-name="ce176" table:number-columns-repeated="2"/>
          <table:table-cell table:style-name="ce181"/>
          <table:table-cell table:style-name="ce186"/>
          <table:table-cell/>
          <table:table-cell table:style-name="Default" table:number-columns-repeated="1633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36"/>
          <table:table-cell table:style-name="ce53" table:number-columns-repeated="14"/>
          <table:table-cell table:style-name="ce65"/>
          <table:table-cell table:style-name="ce53" table:number-columns-repeated="4"/>
          <table:table-cell table:style-name="ce75" table:number-columns-repeated="2"/>
          <table:table-cell table:style-name="ce83" table:number-columns-repeated="2"/>
          <table:table-cell table:style-name="ce91" table:number-columns-repeated="2"/>
          <table:table-cell table:style-name="ce99" table:number-columns-repeated="2"/>
          <table:table-cell table:style-name="ce107" table:number-columns-repeated="2"/>
          <table:table-cell table:style-name="ce116" table:number-columns-repeated="2"/>
          <table:table-cell table:style-name="ce124" table:number-columns-repeated="2"/>
          <table:table-cell table:style-name="ce133" table:number-columns-repeated="2"/>
          <table:table-cell table:style-name="ce141"/>
          <table:table-cell table:style-name="ce146"/>
          <table:table-cell table:style-name="ce154" table:number-columns-repeated="2"/>
          <table:table-cell table:style-name="ce163"/>
          <table:table-cell table:style-name="ce164"/>
          <table:table-cell table:style-name="ce172" table:number-columns-repeated="2"/>
          <table:table-cell table:style-name="ce178" table:number-columns-repeated="2"/>
          <table:table-cell table:style-name="ce183"/>
          <table:table-cell table:style-name="ce188"/>
          <table:table-cell table:style-name="ce192"/>
          <table:table-cell table:style-name="Default" table:number-columns-repeated="1633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float" office:value="6" calcext:value-type="float">
            <text:p>6</text:p>
          </table:table-cell>
          <table:table-cell table:style-name="ce37"/>
          <table:table-cell table:style-name="ce54" table:number-columns-repeated="14"/>
          <table:table-cell table:style-name="ce66"/>
          <table:table-cell table:style-name="ce54" table:number-columns-repeated="4"/>
          <table:table-cell table:style-name="ce76" table:number-columns-repeated="2"/>
          <table:table-cell table:style-name="ce84" table:number-columns-repeated="2"/>
          <table:table-cell table:style-name="ce92" table:number-columns-repeated="2"/>
          <table:table-cell table:style-name="ce100" table:number-columns-repeated="2"/>
          <table:table-cell table:style-name="ce108" table:number-columns-repeated="2"/>
          <table:table-cell table:style-name="ce117" table:number-columns-repeated="2"/>
          <table:table-cell table:style-name="ce125" table:number-columns-repeated="2"/>
          <table:table-cell table:style-name="ce134" table:number-columns-repeated="2"/>
          <table:table-cell table:style-name="ce142"/>
          <table:table-cell table:style-name="ce147"/>
          <table:table-cell table:style-name="ce155" table:number-columns-repeated="3"/>
          <table:table-cell table:style-name="ce165"/>
          <table:table-cell table:style-name="ce155" table:number-columns-repeated="5"/>
          <table:table-cell table:style-name="ce189"/>
          <table:table-cell table:style-name="ce192"/>
          <table:table-cell table:style-name="Default" table:number-columns-repeated="16332"/>
        </table:table-row>
        <table:table-row table:style-name="ro1">
          <table:table-cell table:style-name="ce6" office:value-type="string" calcext:value-type="string">
            <text:p>y</text:p>
          </table:table-cell>
          <table:table-cell table:style-name="ce14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38"/>
          <table:table-cell table:style-name="ce55" table:number-columns-repeated="14"/>
          <table:table-cell table:style-name="ce67"/>
          <table:table-cell table:style-name="ce55" table:number-columns-repeated="4"/>
          <table:table-cell table:style-name="ce77" table:number-columns-repeated="2"/>
          <table:table-cell table:style-name="ce85" table:number-columns-repeated="2"/>
          <table:table-cell table:style-name="ce93" table:number-columns-repeated="2"/>
          <table:table-cell table:style-name="ce101" table:number-columns-repeated="2"/>
          <table:table-cell table:style-name="ce109" table:number-columns-repeated="2"/>
          <table:table-cell table:style-name="ce118" table:number-columns-repeated="2"/>
          <table:table-cell table:style-name="ce126" table:number-columns-repeated="2"/>
          <table:table-cell table:style-name="ce135" table:number-columns-repeated="2"/>
          <table:table-cell table:style-name="ce143"/>
          <table:table-cell table:style-name="ce148"/>
          <table:table-cell table:style-name="ce156" table:number-columns-repeated="3"/>
          <table:table-cell table:style-name="ce166"/>
          <table:table-cell table:style-name="ce156" table:number-columns-repeated="5"/>
          <table:table-cell table:style-name="ce190"/>
          <table:table-cell table:style-name="ce192"/>
          <table:table-cell table:style-name="Default" table:number-columns-repeated="16332"/>
        </table:table-row>
        <table:table-row table:style-name="ro1">
          <table:table-cell table:style-name="ce7" office:value-type="string" calcext:value-type="string">
            <text:p>z</text:p>
          </table:table-cell>
          <table:table-cell table:style-name="ce15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39"/>
          <table:table-cell table:style-name="ce56" table:number-columns-repeated="14"/>
          <table:table-cell table:style-name="ce68"/>
          <table:table-cell table:style-name="ce56" table:number-columns-repeated="4"/>
          <table:table-cell table:style-name="ce78" table:number-columns-repeated="2"/>
          <table:table-cell table:style-name="ce86" table:number-columns-repeated="2"/>
          <table:table-cell table:style-name="ce94" table:number-columns-repeated="2"/>
          <table:table-cell table:style-name="ce102" table:number-columns-repeated="2"/>
          <table:table-cell table:style-name="ce110" table:number-columns-repeated="2"/>
          <table:table-cell table:style-name="ce119" table:number-columns-repeated="2"/>
          <table:table-cell table:style-name="ce127" table:number-columns-repeated="2"/>
          <table:table-cell table:style-name="ce136" table:number-columns-repeated="2"/>
          <table:table-cell table:style-name="ce144"/>
          <table:table-cell table:style-name="ce149"/>
          <table:table-cell table:style-name="ce157" table:number-columns-repeated="3"/>
          <table:table-cell table:style-name="ce167"/>
          <table:table-cell table:style-name="ce157" table:number-columns-repeated="5"/>
          <table:table-cell table:style-name="ce191"/>
          <table:table-cell/>
          <table:table-cell table:style-name="Default" table:number-columns-repeated="16332"/>
        </table:table-row>
        <table:table-row table:style-name="ro1">
          <table:table-cell table:style-name="ce8"/>
          <table:table-cell table:number-columns-repeated="5"/>
          <table:table-cell office:value-type="string" calcext:value-type="string">
            <text:p>För att klara denna övning börjar du med att rita upp en <text:span text:style-name="T1">spårstjärna</text:span><text:span text:style-name="T2"> (se i kompendiet/föreläsningar)...</text:span>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style-name="ce8"/>
          <table:table-cell table:number-columns-repeated="5"/>
          <table:table-cell office:value-type="string" calcext:value-type="string">
            <text:p>Du får tre "inlämningsförsök" (varav labb-tillfället är den första) sedan får du en ny lindning</text:p>
          </table:table-cell>
          <table:table-cell table:number-columns-repeated="45"/>
          <table:table-cell table:style-name="Default" table:number-columns-repeated="16332"/>
        </table:table-row>
        <table:table-row table:style-name="ro4">
          <table:table-cell table:number-columns-repeated="2"/>
          <table:table-cell table:style-name="ce20" office:value-type="string" calcext:value-type="string">
            <text:p>Koll:</text:p>
          </table:table-cell>
          <table:table-cell table:number-columns-repeated="3"/>
          <table:table-cell table:style-name="ce20" office:value-type="string" calcext:value-type="string">
            <text:p>Ifyllnings-Instruktion: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21" office:value-type="string" calcext:value-type="string">
            <text:p>Sum ledare/spår:</text:p>
          </table:table-cell>
          <table:table-cell table:style-name="ce21" table:number-columns-repeated="2"/>
          <table:table-cell/>
          <table:table-cell office:value-type="string" calcext:value-type="string">
            <text:p><text:span text:style-name="T1">Först: fyll i ingångsdata </text:span><text:span text:style-name="T2">i gula rutorna upp till vänster (D4-D7) fyll sedan i lindningsmatrisen (del av D10:AY17)</text:span>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22" office:value-type="string" calcext:value-type="string">
            <text:p>Fas</text:p>
          </table:table-cell>
          <table:table-cell table:style-name="ce40" office:value-type="string" calcext:value-type="string">
            <text:p>Up +</text:p>
          </table:table-cell>
          <table:table-cell table:style-name="ce40" office:value-type="string" calcext:value-type="string">
            <text:p>Ned -</text:p>
          </table:table-cell>
          <table:table-cell/>
          <table:table-cell office:value-type="string" calcext:value-type="string">
            <text:p>OBS1: för varje ruta i ramen ovan (alla positioner i statorn i alla spår):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41" table:formula="of:=COUNTIF([.$D$10:.$AY$17];[.C23])" office:value-type="float" office:value="0" calcext:value-type="float">
            <text:p>0</text:p>
          </table:table-cell>
          <table:table-cell table:style-name="ce41" table:formula="of:=COUNTIF([.$D$10:.$AY$17];-1*[.C23])" office:value-type="float" office:value="0" calcext:value-type="float">
            <text:p>0</text:p>
          </table:table-cell>
          <table:table-cell/>
          <table:table-cell office:value-type="string" calcext:value-type="string">
            <text:p>fyll i en "fas-siffra" <text:s/>positiv för linding <text:s/>uppåt och negativ för neråt i spår <text:s/>(se tabell A10:B17)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41" table:formula="of:=COUNTIF([.$D$10:.$AY$17];[.C24])" office:value-type="float" office:value="0" calcext:value-type="float">
            <text:p>0</text:p>
          </table:table-cell>
          <table:table-cell table:style-name="ce41" table:formula="of:=COUNTIF([.$D$10:.$AY$17];-1*[.C24])" office:value-type="float" office:value="0" calcext:value-type="float">
            <text:p>0</text:p>
          </table:table-cell>
          <table:table-cell/>
          <table:table-cell office:value-type="string" calcext:value-type="string">
            <text:p>t.ex "+3" i ruta H12 om fas tre lindas uppåt med en kable i spår 5 posistion 3.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style-name="ce42" table:formula="of:=COUNTIF([.$D$10:.$AY$17];[.C25])" office:value-type="float" office:value="0" calcext:value-type="float">
            <text:p>0</text:p>
          </table:table-cell>
          <table:table-cell table:style-name="ce42" table:formula="of:=COUNTIF([.$D$10:.$AY$17];-1*[.C25])" office:value-type="float" office:value="0" calcext:value-type="float">
            <text:p>0</text:p>
          </table:table-cell>
          <table:table-cell/>
          <table:table-cell office:value-type="string" calcext:value-type="string">
            <text:p>Kolla sedan i "Koll"-rutan att rätt antal (lika många) har använts för upp och ned för vardera fas.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24" office:value-type="float" office:value="4" calcext:value-type="float">
            <text:p>4</text:p>
          </table:table-cell>
          <table:table-cell table:style-name="ce43" table:formula="of:=COUNTIF([.$D$10:.$AY$17];[.C26])" office:value-type="float" office:value="0" calcext:value-type="float">
            <text:p>0</text:p>
          </table:table-cell>
          <table:table-cell table:style-name="ce43" table:formula="of:=COUNTIF([.$D$10:.$AY$17];-1*[.C26])" office:value-type="float" office:value="0" calcext:value-type="float">
            <text:p>0</text:p>
          </table:table-cell>
          <table:table-cell/>
          <table:table-cell office:value-type="string" calcext:value-type="string">
            <text:p>Ändra inte något annat...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25" office:value-type="float" office:value="5" calcext:value-type="float">
            <text:p>5</text:p>
          </table:table-cell>
          <table:table-cell table:style-name="ce44" table:formula="of:=COUNTIF([.$D$10:.$AY$17];[.C27])" office:value-type="float" office:value="0" calcext:value-type="float">
            <text:p>0</text:p>
          </table:table-cell>
          <table:table-cell table:style-name="ce44" table:formula="of:=COUNTIF([.$D$10:.$AY$17];-1*[.C27])" office:value-type="float" office:value="0" calcext:value-type="float">
            <text:p>0</text:p>
          </table:table-cell>
          <table:table-cell/>
          <table:table-cell office:value-type="string" calcext:value-type="string">
            <text:p>OBS1: försök använda alla positioner i alla spår (men om svårt så åtminstone &gt;80%).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26" office:value-type="float" office:value="6" calcext:value-type="float">
            <text:p>6</text:p>
          </table:table-cell>
          <table:table-cell table:style-name="ce45" table:formula="of:=COUNTIF([.$D$10:.$AY$17];[.C28])" office:value-type="float" office:value="0" calcext:value-type="float">
            <text:p>0</text:p>
          </table:table-cell>
          <table:table-cell table:style-name="ce45" table:formula="of:=COUNTIF([.$D$10:.$AY$17];-1*[.C28])" office:value-type="float" office:value="0" calcext:value-type="float">
            <text:p>0</text:p>
          </table:table-cell>
          <table:table-cell/>
          <table:table-cell office:value-type="string" calcext:value-type="string">
            <text:p>OBS2: du ska ha lika många lindningar <text:s/>upp som ned för varje fas (eller inte diffa med 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27" office:value-type="float" office:value="7" calcext:value-type="float">
            <text:p>7</text:p>
          </table:table-cell>
          <table:table-cell table:style-name="ce46" table:formula="of:=COUNTIF([.$D$10:.$AY$17];[.C29])" office:value-type="float" office:value="0" calcext:value-type="float">
            <text:p>0</text:p>
          </table:table-cell>
          <table:table-cell table:style-name="ce46" table:formula="of:=COUNTIF([.$D$10:.$AY$17];-1*[.C29])" office:value-type="float" office:value="0" calcext:value-type="float">
            <text:p>0</text:p>
          </table:table-cell>
          <table:table-cell/>
          <table:table-cell office:value-type="string" calcext:value-type="string">
            <text:p>mer än 1) annnars är det (i praktiken) omöjligt att linda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2"/>
          <table:table-cell table:style-name="ce28" office:value-type="float" office:value="8" calcext:value-type="float">
            <text:p>8</text:p>
          </table:table-cell>
          <table:table-cell table:style-name="ce47" table:formula="of:=COUNTIF([.$D$10:.$AY$17];[.C30])" office:value-type="float" office:value="0" calcext:value-type="float">
            <text:p>0</text:p>
          </table:table-cell>
          <table:table-cell table:style-name="ce47" table:formula="of:=COUNTIF([.$D$10:.$AY$17];-1*[.C30])" office:value-type="float" office:value="0" calcext:value-type="float">
            <text:p>0</text:p>
          </table:table-cell>
          <table:table-cell/>
          <table:table-cell office:value-type="string" calcext:value-type="string">
            <text:p>Innan labb måste du ladda upp ifylld excelfil i Studium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6"/>
          <table:table-cell office:value-type="string" calcext:value-type="string">
            <text:p>OBS3.Stämmer inte <text:s/>"Koll"-tabell så markera celler utaför området och "deleta" osynligt innehåll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52"/>
          <table:table-cell table:style-name="Default" table:number-columns-repeated="16332"/>
        </table:table-row>
        <table:table-row table:style-name="ro1">
          <table:table-cell table:number-columns-repeated="6"/>
          <table:table-cell office:value-type="string" calcext:value-type="string">
            <text:p>Vill du <text:span text:style-name="T1">kolla korrekthet</text:span><text:span text:style-name="T2"> på din lösning så tag pilarna från varje fas i spårstjärnan och </text:span>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6"/>
          <table:table-cell office:value-type="string" calcext:value-type="string">
            <text:p>koppla ihop dem (grafiskt) så ska det bli dina faser mer rätt vinkel emellan</text:p>
          </table:table-cell>
          <table:table-cell table:number-columns-repeated="45"/>
          <table:table-cell table:style-name="Default" table:number-columns-repeated="16332"/>
        </table:table-row>
        <table:table-row table:style-name="ro1">
          <table:table-cell table:number-columns-repeated="52"/>
          <table:table-cell table:style-name="Default" table:number-columns-repeated="16332"/>
        </table:table-row>
        <table:table-row table:style-name="ro1">
          <table:table-cell table:number-columns-repeated="2"/>
          <table:table-cell>
            <draw:frame table:end-cell-address="Lind.Q50" table:end-x="0.2744in" table:end-y="0.1382in" draw:z-index="1" draw:name="Chart 3" draw:style-name="gr1" draw:text-style-name="P1" svg:width="5.6756in" svg:height="3.0181in" svg:x="0.0469in" svg:y="0.0366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 table:style-name="ce69">
            <draw:frame draw:z-index="2" draw:name="Picture 5" draw:style-name="gr2" draw:text-style-name="P1" svg:width="3.915in" svg:height="2.6252in" svg:x="0.2169in" svg:y="0.0177in">
              <draw:image xlink:href="Pictures/10000001000005220000034B5B0FE8F7.png" xlink:type="simple" xlink:show="embed" xlink:actuate="onLoad" draw:mime-type="image/png">
                <text:p/>
              </draw:image>
            </draw:frame>
          </table:table-cell>
          <table:table-cell table:style-name="ce69" table:number-columns-repeated="11"/>
          <table:table-cell table:number-columns-repeated="22"/>
          <table:table-cell table:style-name="Default" table:number-columns-repeated="16332"/>
        </table:table-row>
        <table:table-row table:style-name="ro1" table:number-rows-repeated="12">
          <table:table-cell table:number-columns-repeated="18"/>
          <table:table-cell table:style-name="ce69" table:number-columns-repeated="12"/>
          <table:table-cell table:number-columns-repeated="22"/>
          <table:table-cell table:style-name="Default" table:number-columns-repeated="16332"/>
        </table:table-row>
        <table:table-row table:style-name="ro1" table:number-rows-repeated="4">
          <table:table-cell table:number-columns-repeated="52"/>
          <table:table-cell table:style-name="Default" table:number-columns-repeated="16332"/>
        </table:table-row>
        <table:table-row table:style-name="ro1">
          <table:table-cell table:number-columns-repeated="3"/>
          <table:table-cell>
            <draw:frame draw:z-index="0" draw:name="Picture 2" draw:style-name="gr2" draw:text-style-name="P1" svg:width="4.8016in" svg:height="4.5831in" svg:x="0.0555in" svg:y="0.1634in">
              <draw:image xlink:href="Pictures/10000000000002580000025C410B0982.jpg" xlink:type="simple" xlink:show="embed" xlink:actuate="onLoad" draw:mime-type="image/jpeg">
                <text:p/>
              </draw:image>
            </draw:frame>
          </table:table-cell>
          <table:table-cell table:number-columns-repeated="48"/>
          <table:table-cell table:style-name="Default" table:number-columns-repeated="16332"/>
        </table:table-row>
        <table:table-row table:style-name="ro1" table:number-rows-repeated="46">
          <table:table-cell table:number-columns-repeated="52"/>
          <table:table-cell table:style-name="Default" table:number-columns-repeated="16332"/>
        </table:table-row>
        <table:table-row table:style-name="ro1" table:visibility="collapse" table:number-rows-repeated="1048476">
          <table:table-cell table:number-columns-repeated="52"/>
          <table:table-cell table:style-name="Default" table:number-columns-repeated="16332"/>
        </table:table-row>
        <table:table-row table:style-name="ro1" table:visibility="collapse">
          <table:table-cell table:number-columns-repeated="52"/>
          <table:table-cell table:style-name="Default" table:number-columns-repeated="16332"/>
        </table:table-row>
        <calcext:conditional-formats>
          <calcext:conditional-format calcext:target-range-address="Lind.A17:Lind.B17 Lind.C30:Lind.E30">
            <calcext:condition calcext:apply-style-name="ConditionalStyle_21" calcext:value="formula-is(F=7)" calcext:base-cell-address="Lind.A17"/>
          </calcext:conditional-format>
          <calcext:conditional-format calcext:target-range-address="Lind.A16:Lind.B17 Lind.C29:Lind.E30">
            <calcext:condition calcext:apply-style-name="ConditionalStyle_22" calcext:value="formula-is(F=6)" calcext:base-cell-address="Lind.A16"/>
          </calcext:conditional-format>
          <calcext:conditional-format calcext:target-range-address="Lind.A15:Lind.B17 Lind.C28:Lind.E30">
            <calcext:condition calcext:apply-style-name="ConditionalStyle_23" calcext:value="formula-is(F=5)" calcext:base-cell-address="Lind.A15"/>
          </calcext:conditional-format>
          <calcext:conditional-format calcext:target-range-address="Lind.A14:Lind.B17 Lind.C27:Lind.E30">
            <calcext:condition calcext:apply-style-name="ConditionalStyle_24" calcext:value="formula-is(F=4)" calcext:base-cell-address="Lind.A14"/>
          </calcext:conditional-format>
          <calcext:conditional-format calcext:target-range-address="Lind.A13:Lind.B17 Lind.C26:Lind.E30">
            <calcext:condition calcext:apply-style-name="ConditionalStyle_25" calcext:value="formula-is(F=3)" calcext:base-cell-address="Lind.A13"/>
          </calcext:conditional-format>
          <calcext:conditional-format calcext:target-range-address="Lind.A12:Lind.B17 Lind.C25:Lind.E30">
            <calcext:condition calcext:apply-style-name="ConditionalStyle_26" calcext:value="formula-is(F=2)" calcext:base-cell-address="Lind.A12"/>
          </calcext:conditional-format>
          <calcext:conditional-format calcext:target-range-address="Lind.AP9:Lind.AY17 Lind.D9:Lind.AO9 Lind.D14:Lind.AO17">
            <calcext:condition calcext:apply-style-name="ConditionalStyle_17" calcext:value="formula-is(P=13)" calcext:base-cell-address="Lind.D9"/>
          </calcext:conditional-format>
          <calcext:conditional-format calcext:target-range-address="Lind.D8:Lind.Y8">
            <calcext:condition calcext:apply-style-name="ConditionalStyle_18" calcext:value="formula-is(P=13)" calcext:base-cell-address="Lind.D8"/>
          </calcext:conditional-format>
          <calcext:conditional-format calcext:target-range-address="Lind.AX9:Lind.AY14">
            <calcext:condition calcext:apply-style-name="ConditionalStyle_1" calcext:value="formula-is(Q=46)" calcext:base-cell-address="Lind.AX9"/>
          </calcext:conditional-format>
          <calcext:conditional-format calcext:target-range-address="Lind.AV9:Lind.AY14">
            <calcext:condition calcext:apply-style-name="ConditionalStyle_2" calcext:value="formula-is(Q=44)" calcext:base-cell-address="Lind.AV9"/>
          </calcext:conditional-format>
          <calcext:conditional-format calcext:target-range-address="Lind.AT9:Lind.AY14">
            <calcext:condition calcext:apply-style-name="ConditionalStyle_3" calcext:value="formula-is(Q=42)" calcext:base-cell-address="Lind.AT9"/>
          </calcext:conditional-format>
          <calcext:conditional-format calcext:target-range-address="Lind.AR9:Lind.AY14">
            <calcext:condition calcext:apply-style-name="ConditionalStyle_4" calcext:value="formula-is(Q=40)" calcext:base-cell-address="Lind.AR9"/>
          </calcext:conditional-format>
          <calcext:conditional-format calcext:target-range-address="Lind.AP9:Lind.AY17">
            <calcext:condition calcext:apply-style-name="ConditionalStyle_5" calcext:value="formula-is(Q=38)" calcext:base-cell-address="Lind.AP9"/>
          </calcext:conditional-format>
          <calcext:conditional-format calcext:target-range-address="Lind.AP9:Lind.AY17 Lind.AN9:Lind.AO9 Lind.AN14:Lind.AO17">
            <calcext:condition calcext:apply-style-name="ConditionalStyle_6" calcext:value="formula-is(Q=36)" calcext:base-cell-address="Lind.AN9"/>
          </calcext:conditional-format>
          <calcext:conditional-format calcext:target-range-address="Lind.AP9:Lind.AY17 Lind.AL9:Lind.AO9 Lind.AL14:Lind.AO17">
            <calcext:condition calcext:apply-style-name="ConditionalStyle_7" calcext:value="formula-is(Q=34)" calcext:base-cell-address="Lind.AL9"/>
          </calcext:conditional-format>
          <calcext:conditional-format calcext:target-range-address="Lind.AP9:Lind.AY17 Lind.AJ9:Lind.AO9 Lind.AJ14:Lind.AO17">
            <calcext:condition calcext:apply-style-name="ConditionalStyle_8" calcext:value="formula-is(Q=32)" calcext:base-cell-address="Lind.AJ9"/>
          </calcext:conditional-format>
          <calcext:conditional-format calcext:target-range-address="Lind.AP9:Lind.AY17 Lind.AH9:Lind.AO9 Lind.AH14:Lind.AO17">
            <calcext:condition calcext:apply-style-name="ConditionalStyle_9" calcext:value="formula-is(Q=30)" calcext:base-cell-address="Lind.AH9"/>
          </calcext:conditional-format>
          <calcext:conditional-format calcext:target-range-address="Lind.AP9:Lind.AY17 Lind.AF9:Lind.AO9 Lind.AF14:Lind.AO17">
            <calcext:condition calcext:apply-style-name="ConditionalStyle_10" calcext:value="formula-is(Q=28)" calcext:base-cell-address="Lind.AF9"/>
          </calcext:conditional-format>
          <calcext:conditional-format calcext:target-range-address="Lind.AP9:Lind.AY17 Lind.AD9:Lind.AO9 Lind.AD14:Lind.AO17">
            <calcext:condition calcext:apply-style-name="ConditionalStyle_11" calcext:value="formula-is(Q=26)" calcext:base-cell-address="Lind.AD9"/>
          </calcext:conditional-format>
          <calcext:conditional-format calcext:target-range-address="Lind.AP9:Lind.AY17 Lind.AB9:Lind.AO9 Lind.AB14:Lind.AO17">
            <calcext:condition calcext:apply-style-name="ConditionalStyle_12" calcext:value="formula-is(Q=24)" calcext:base-cell-address="Lind.AB9"/>
          </calcext:conditional-format>
          <calcext:conditional-format calcext:target-range-address="Lind.AP9:Lind.AY17 Lind.Z9:Lind.AO9 Lind.Z14:Lind.AO17">
            <calcext:condition calcext:apply-style-name="ConditionalStyle_13" calcext:value="formula-is(Q=22)" calcext:base-cell-address="Lind.Z9"/>
          </calcext:conditional-format>
          <calcext:conditional-format calcext:target-range-address="Lind.AP9:Lind.AY17 Lind.X9:Lind.AO9 Lind.X14:Lind.AO17">
            <calcext:condition calcext:apply-style-name="ConditionalStyle_14" calcext:value="formula-is(Q=20)" calcext:base-cell-address="Lind.X9"/>
          </calcext:conditional-format>
          <calcext:conditional-format calcext:target-range-address="Lind.D14:Lind.AY14">
            <calcext:condition calcext:apply-style-name="ConditionalStyle_16" calcext:value="formula-is(Q&gt;37)" calcext:base-cell-address="Lind.D14"/>
          </calcext:conditional-format>
          <calcext:conditional-format calcext:target-range-address="Lind.C14:Lind.AZ16">
            <calcext:condition calcext:apply-style-name="ConditionalStyle_19" calcext:value="formula-is(Q&gt;37)" calcext:base-cell-address="Lind.C14"/>
          </calcext:conditional-format>
          <calcext:conditional-format calcext:target-range-address="Lind.D16:Lind.AY16">
            <calcext:condition calcext:apply-style-name="ConditionalStyle_15" calcext:value="formula-is(Q&gt;29)" calcext:base-cell-address="Lind.D16"/>
          </calcext:conditional-format>
          <calcext:conditional-format calcext:target-range-address="Lind.C16:Lind.AY17">
            <calcext:condition calcext:apply-style-name="ConditionalStyle_20" calcext:value="formula-is(Q&gt;29)" calcext:base-cell-address="Lind.C16"/>
          </calcext:conditional-format>
          <calcext:conditional-format calcext:target-range-address="Lind.D10:Lind.AO13">
            <calcext:condition calcext:apply-style-name="ConditionalStyle_17" calcext:value="formula-is(P=13)" calcext:base-cell-address="Lind.D10"/>
          </calcext:conditional-format>
          <calcext:conditional-format calcext:target-range-address="Lind.AN10:Lind.AO13">
            <calcext:condition calcext:apply-style-name="ConditionalStyle_6" calcext:value="formula-is(Q=36)" calcext:base-cell-address="Lind.AN10"/>
          </calcext:conditional-format>
          <calcext:conditional-format calcext:target-range-address="Lind.AL10:Lind.AO13">
            <calcext:condition calcext:apply-style-name="ConditionalStyle_7" calcext:value="formula-is(Q=34)" calcext:base-cell-address="Lind.AL10"/>
          </calcext:conditional-format>
          <calcext:conditional-format calcext:target-range-address="Lind.AJ10:Lind.AO13">
            <calcext:condition calcext:apply-style-name="ConditionalStyle_8" calcext:value="formula-is(Q=32)" calcext:base-cell-address="Lind.AJ10"/>
          </calcext:conditional-format>
          <calcext:conditional-format calcext:target-range-address="Lind.AH10:Lind.AO13">
            <calcext:condition calcext:apply-style-name="ConditionalStyle_9" calcext:value="formula-is(Q=30)" calcext:base-cell-address="Lind.AH10"/>
          </calcext:conditional-format>
          <calcext:conditional-format calcext:target-range-address="Lind.AF10:Lind.AO13">
            <calcext:condition calcext:apply-style-name="ConditionalStyle_10" calcext:value="formula-is(Q=28)" calcext:base-cell-address="Lind.AF10"/>
          </calcext:conditional-format>
          <calcext:conditional-format calcext:target-range-address="Lind.AD10:Lind.AO13">
            <calcext:condition calcext:apply-style-name="ConditionalStyle_11" calcext:value="formula-is(Q=26)" calcext:base-cell-address="Lind.AD10"/>
          </calcext:conditional-format>
          <calcext:conditional-format calcext:target-range-address="Lind.AB10:Lind.AO13">
            <calcext:condition calcext:apply-style-name="ConditionalStyle_12" calcext:value="formula-is(Q=24)" calcext:base-cell-address="Lind.AB10"/>
          </calcext:conditional-format>
          <calcext:conditional-format calcext:target-range-address="Lind.Z10:Lind.AO13">
            <calcext:condition calcext:apply-style-name="ConditionalStyle_13" calcext:value="formula-is(Q=22)" calcext:base-cell-address="Lind.Z10"/>
          </calcext:conditional-format>
          <calcext:conditional-format calcext:target-range-address="Lind.X10:Lind.AO13">
            <calcext:condition calcext:apply-style-name="ConditionalStyle_14" calcext:value="formula-is(Q=20)" calcext:base-cell-address="Lind.X10"/>
          </calcext:conditional-format>
        </calcext:conditional-formats>
      </table:table>
      <table:named-expressions>
        <table:named-range table:name="F" table:base-cell-address="$Lind.$A$1" table:cell-range-address="$Lind.$D$5"/>
        <table:named-range table:name="P" table:base-cell-address="$Lind.$A$1" table:cell-range-address="$Lind.$D$4"/>
        <table:named-range table:name="Q" table:base-cell-address="$Lind.$A$1" table:cell-range-address="$Lind.$D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1" style:display-name="ConditionalStyle_21" style:family="table-cell" style:parent-style-name="Default">
      <style:table-cell-properties fo:background-color="transparent"/>
      <style:text-properties fo:color="#ffffff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transparent"/>
      <style:text-properties fo:color="#ffffff">
        <loext:char-complex-color loext:theme-type="light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transparent"/>
      <style:text-properties fo:color="#ffffff">
        <loext:char-complex-color loext:theme-type="light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transparent"/>
      <style:text-properties fo:color="#ffffff">
        <loext:char-complex-color loext:theme-type="light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transparent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transparent"/>
      <style:text-properties fo:color="#ffffff">
        <loext:char-complex-color loext:theme-type="light1" loext:color-type="theme"/>
      </style:text-properties>
    </style:style>
    <style:style style:name="ConditionalStyle_5f_17" style:display-name="ConditionalStyle_17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000000">
        <loext:char-complex-color loext:theme-type="dark1" loext:color-type="theme"/>
      </style:text-properties>
    </style:style>
    <style:style style:name="ConditionalStyle_5f_18" style:display-name="ConditionalStyle_18" style:family="table-cell" style:parent-style-name="Default">
      <style:table-cell-properties fo:background-color="#ff0000"/>
      <style:text-properties fo:color="#00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9" style:display-name="ConditionalStyle_9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10" style:display-name="ConditionalStyle_10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11" style:display-name="ConditionalStyle_11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12" style:display-name="ConditionalStyle_12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13" style:display-name="ConditionalStyle_13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14" style:display-name="ConditionalStyle_14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16" style:display-name="ConditionalStyle_16" style:family="table-cell" style:parent-style-name="Default">
      <style:table-cell-properties fo:border-bottom="none" fo:border-left="none" fo:border-right="none" fo:border-top="0.74pt solid #000000"/>
    </style:style>
    <style:style style:name="ConditionalStyle_5f_19" style:display-name="ConditionalStyle_19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style:style style:name="ConditionalStyle_5f_15" style:display-name="ConditionalStyle_15" style:family="table-cell" style:parent-style-name="Default">
      <style:table-cell-properties fo:border-bottom="none" fo:border-left="none" fo:border-right="none" fo:border-top="0.74pt solid #000000"/>
    </style:style>
    <style:style style:name="ConditionalStyle_5f_20" style:display-name="ConditionalStyle_20" style:family="table-cell" style:parent-style-name="Default">
      <style:table-cell-properties fo:background-color="transparent" fo:border="none"/>
      <style:text-properties fo:color="#ffffff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nd" style:display-name="PageStyle_Li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ans Bernhoff</meta:initial-creator>
    <meta:creation-date>2021-02-10T13:12:37</meta:creation-date>
    <dc:date>2026-06-18T18:33:49.046801470</dc:date>
    <meta:generator>LibreOffice/25.8.7.3$Linux_X86_64 LibreOffice_project/580$Build-3</meta:generator>
    <meta:editing-duration>PT5H12M46S</meta:editing-duration>
    <meta:editing-cycles>1</meta:editing-cycles>
    <meta:document-statistic meta:table-count="1" meta:cell-count="166" meta:object-count="3"/>
    <meta:user-defined meta:name="AppVersion">16.0300</meta:user-defined>
    <meta:user-defined meta:name="Company">Avd. för elektricitetslära UU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minimum="-1.2" chart:maximum="1.2" chart:interval-major="0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4.417cm" svg:height="7.667cm" xlink:href="." xlink:type="simple" chart:class="chart:scatter" chart:style-name="ch1">
        <chart:title svg:x="3.932cm" svg:y="0.221cm" chart:style-name="ch2">
          <text:p><text:span text:style-name="T1">Funktionform för magnet vs</text:span><text:span text:style-name="T1"> sinus</text:span></text:p>
        </chart:title>
        <chart:legend chart:legend-position="bottom" svg:x="1.732cm" svg:y="6.828cm" style:legend-expansion="custom" svg:width="4.149cm" svg:height="0.619cm" style:legend-expansion-aspect-ratio="6.70274636510501" chart:style-name="ch3"/>
        <chart:plot-area chart:style-name="ch4" svg:x="-0.952cm" svg:y="0.931cm" svg:width="14.825cm" svg:height="5.898cm">
          <chart:coordinate-region svg:x="2.217cm" svg:y="1.118cm" svg:width="11.574cm" svg:height="5.526cm"/>
          <chart:axis chart:dimension="x" chart:name="primary-x" chart:style-name="ch5">
            <chart:title svg:x="5.588cm" svg:y="6.983cm" chart:style-name="ch6">
              <text:p><text:span text:style-name="T2">Vinkel [rad]</text:span></text:p>
            </chart:title>
            <chart:grid chart:style-name="ch7" chart:class="major"/>
          </chart:axis>
          <chart:axis chart:dimension="y" chart:name="primary-y" chart:style-name="ch8">
            <chart:title svg:x="0.001cm" svg:y="5.035cm" chart:style-name="ch9">
              <text:p><text:span text:style-name="T2">funktions värde</text:span></text:p>
            </chart:title>
            <chart:grid chart:style-name="ch7" chart:class="major"/>
          </chart:axis>
          <chart:series chart:style-name="ch10" chart:values-cell-range-address="local-table.$B$2:.$B$65" chart:label-cell-address="local-table.$B$1" chart:class="chart:scatter">
            <chart:domain table:cell-range-address="local-table.$C$2:.$C$65"/>
            <chart:data-point chart:repeated="64"/>
          </chart:series>
          <chart:series chart:style-name="ch11" chart:values-cell-range-address="local-table.$D$2:.$D$65" chart:label-cell-address="local-table.$D$1" chart:class="chart:scatter">
            <chart:domain table:cell-range-address="local-table.$E$2:.$E$65"/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</text:p>
              </table:table-cell>
              <table:table-cell office:value-type="string">
                <text:p>Series2</text:p>
              </table:table-cell>
              <table:table-cell office:value-type="string">
                <text:p>Magnet</text:p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98334166468282">
                <text:p>0.0998334166468282</text:p>
              </table:table-cell>
              <table:table-cell office:value-type="float" office:value="0.1">
                <text:p>0.1</text:p>
              </table:table-cell>
              <table:table-cell office:value-type="float" office:value="0.100136351887836">
                <text:p>0.1001363518878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0.198669330795061">
                <text:p>0.198669330795061</text:p>
              </table:table-cell>
              <table:table-cell office:value-type="float" office:value="0.2">
                <text:p>0.2</text:p>
              </table:table-cell>
              <table:table-cell office:value-type="float" office:value="0.217773157603089">
                <text:p>0.2177731576030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0.29552020666134">
                <text:p>0.29552020666134</text:p>
              </table:table-cell>
              <table:table-cell office:value-type="float" office:value="0.3">
                <text:p>0.3</text:p>
              </table:table-cell>
              <table:table-cell office:value-type="float" office:value="0.344291465484499">
                <text:p>0.34429146548449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0.389418342308651">
                <text:p>0.389418342308651</text:p>
              </table:table-cell>
              <table:table-cell office:value-type="float" office:value="0.4">
                <text:p>0.4</text:p>
              </table:table-cell>
              <table:table-cell office:value-type="float" office:value="0.471454630925615">
                <text:p>0.471454630925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479425538604203">
                <text:p>0.479425538604203</text:p>
              </table:table-cell>
              <table:table-cell office:value-type="float" office:value="0.5">
                <text:p>0.5</text:p>
              </table:table-cell>
              <table:table-cell office:value-type="float" office:value="0.59202188504875">
                <text:p>0.59202188504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0.564642473395035">
                <text:p>0.564642473395035</text:p>
              </table:table-cell>
              <table:table-cell office:value-type="float" office:value="0.6">
                <text:p>0.6</text:p>
              </table:table-cell>
              <table:table-cell office:value-type="float" office:value="0.700230945885412">
                <text:p>0.7002309458854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44217687237691">
                <text:p>0.644217687237691</text:p>
              </table:table-cell>
              <table:table-cell office:value-type="float" office:value="0.7">
                <text:p>0.7</text:p>
              </table:table-cell>
              <table:table-cell office:value-type="float" office:value="0.792113107387135">
                <text:p>0.7921131073871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0.717356090899523">
                <text:p>0.717356090899523</text:p>
              </table:table-cell>
              <table:table-cell office:value-type="float" office:value="0.8">
                <text:p>0.8</text:p>
              </table:table-cell>
              <table:table-cell office:value-type="float" office:value="0.865620619259848">
                <text:p>0.8656206192598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0.783326909627483">
                <text:p>0.783326909627483</text:p>
              </table:table-cell>
              <table:table-cell office:value-type="float" office:value="0.9">
                <text:p>0.9</text:p>
              </table:table-cell>
              <table:table-cell office:value-type="float" office:value="0.920564034230783">
                <text:p>0.9205640342307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0.841470984807896">
                <text:p>0.841470984807896</text:p>
              </table:table-cell>
              <table:table-cell office:value-type="float" office:value="1">
                <text:p>1</text:p>
              </table:table-cell>
              <table:table-cell office:value-type="float" office:value="0.958374909517376">
                <text:p>0.958374909517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891207360061435">
                <text:p>0.891207360061435</text:p>
              </table:table-cell>
              <table:table-cell office:value-type="float" office:value="1.1">
                <text:p>1.1</text:p>
              </table:table-cell>
              <table:table-cell office:value-type="float" office:value="0.981725194669876">
                <text:p>0.98172519466987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0.932039085967226">
                <text:p>0.932039085967226</text:p>
              </table:table-cell>
              <table:table-cell office:value-type="float" office:value="1.2">
                <text:p>1.2</text:p>
              </table:table-cell>
              <table:table-cell office:value-type="float" office:value="0.994047380501549">
                <text:p>0.99404738050154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0.963558185417193">
                <text:p>0.963558185417193</text:p>
              </table:table-cell>
              <table:table-cell office:value-type="float" office:value="1.3">
                <text:p>1.3</text:p>
              </table:table-cell>
              <table:table-cell office:value-type="float" office:value="0.99900788761073">
                <text:p>0.9990078876107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0.98544972998846">
                <text:p>0.98544972998846</text:p>
              </table:table-cell>
              <table:table-cell office:value-type="float" office:value="1.4">
                <text:p>1.4</text:p>
              </table:table-cell>
              <table:table-cell office:value-type="float" office:value="0.999989505727643">
                <text:p>0.99998950572764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0.997494986604054">
                <text:p>0.997494986604054</text:p>
              </table:table-cell>
              <table:table-cell office:value-type="float" office:value="1.5">
                <text:p>1.5</text:p>
              </table:table-cell>
              <table:table-cell office:value-type="float" office:value="0.999636692740265">
                <text:p>0.99963669274026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0.999573603041505">
                <text:p>0.999573603041505</text:p>
              </table:table-cell>
              <table:table-cell office:value-type="float" office:value="1.6">
                <text:p>1.6</text:p>
              </table:table-cell>
              <table:table-cell office:value-type="float" office:value="0.999510431230975">
                <text:p>0.99951043123097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0.991664810452469">
                <text:p>0.991664810452469</text:p>
              </table:table-cell>
              <table:table-cell office:value-type="float" office:value="1.7">
                <text:p>1.7</text:p>
              </table:table-cell>
              <table:table-cell office:value-type="float" office:value="0.999887815534707">
                <text:p>0.99988781553470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/>
              <table:table-cell office:value-type="float" office:value="0.973847630878195">
                <text:p>0.973847630878195</text:p>
              </table:table-cell>
              <table:table-cell office:value-type="float" office:value="1.8">
                <text:p>1.8</text:p>
              </table:table-cell>
              <table:table-cell office:value-type="float" office:value="0.999726702491336">
                <text:p>0.99972670249133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0.946300087687414">
                <text:p>0.946300087687414</text:p>
              </table:table-cell>
              <table:table-cell office:value-type="float" office:value="1.9">
                <text:p>1.9</text:p>
              </table:table-cell>
              <table:table-cell office:value-type="float" office:value="0.996799006013655">
                <text:p>0.99679900601365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/>
              <table:table-cell office:value-type="float" office:value="0.909297426825682">
                <text:p>0.909297426825682</text:p>
              </table:table-cell>
              <table:table-cell office:value-type="float" office:value="2">
                <text:p>2</text:p>
              </table:table-cell>
              <table:table-cell office:value-type="float" office:value="0.987979125896493">
                <text:p>0.987979125896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863209366648874">
                <text:p>0.863209366648874</text:p>
              </table:table-cell>
              <table:table-cell office:value-type="float" office:value="2.1">
                <text:p>2.1</text:p>
              </table:table-cell>
              <table:table-cell office:value-type="float" office:value="0.969658182264088">
                <text:p>0.96965818226408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/>
              <table:table-cell office:value-type="float" office:value="0.80849640381959">
                <text:p>0.80849640381959</text:p>
              </table:table-cell>
              <table:table-cell office:value-type="float" office:value="2.2">
                <text:p>2.2</text:p>
              </table:table-cell>
              <table:table-cell office:value-type="float" office:value="0.938241669951139">
                <text:p>0.93824166995113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/>
              <table:table-cell office:value-type="float" office:value="0.74570521217672">
                <text:p>0.74570521217672</text:p>
              </table:table-cell>
              <table:table-cell office:value-type="float" office:value="2.3">
                <text:p>2.3</text:p>
              </table:table-cell>
              <table:table-cell office:value-type="float" office:value="0.890679090818276">
                <text:p>0.89067909081827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/>
              <table:table-cell office:value-type="float" office:value="0.67546318055115">
                <text:p>0.67546318055115</text:p>
              </table:table-cell>
              <table:table-cell office:value-type="float" office:value="2.4">
                <text:p>2.4</text:p>
              </table:table-cell>
              <table:table-cell office:value-type="float" office:value="0.824969939458678">
                <text:p>0.82496993945867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0.598472144103956">
                <text:p>0.598472144103956</text:p>
              </table:table-cell>
              <table:table-cell office:value-type="float" office:value="2.5">
                <text:p>2.5</text:p>
              </table:table-cell>
              <table:table-cell office:value-type="float" office:value="0.740591535438926">
                <text:p>0.7405915354389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0.515501371821463">
                <text:p>0.515501371821463</text:p>
              </table:table-cell>
              <table:table-cell office:value-type="float" office:value="2.6">
                <text:p>2.6</text:p>
              </table:table-cell>
              <table:table-cell office:value-type="float" office:value="0.638800552945651">
                <text:p>0.63880055294565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/>
              <table:table-cell office:value-type="float" office:value="0.427379880233829">
                <text:p>0.427379880233829</text:p>
              </table:table-cell>
              <table:table-cell office:value-type="float" office:value="2.7">
                <text:p>2.7</text:p>
              </table:table-cell>
              <table:table-cell office:value-type="float" office:value="0.522771153419681">
                <text:p>0.52277115341968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/>
              <table:table-cell office:value-type="float" office:value="0.334988150155904">
                <text:p>0.334988150155904</text:p>
              </table:table-cell>
              <table:table-cell office:value-type="float" office:value="2.8">
                <text:p>2.8</text:p>
              </table:table-cell>
              <table:table-cell office:value-type="float" office:value="0.397547400037548">
                <text:p>0.3975474000375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/>
              <table:table-cell office:value-type="float" office:value="0.239249329213981">
                <text:p>0.239249329213981</text:p>
              </table:table-cell>
              <table:table-cell office:value-type="float" office:value="2.9">
                <text:p>2.9</text:p>
              </table:table-cell>
              <table:table-cell office:value-type="float" office:value="0.269804798016672">
                <text:p>0.26980479801667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/>
              <table:table-cell office:value-type="float" office:value="0.141120008059866">
                <text:p>0.141120008059866</text:p>
              </table:table-cell>
              <table:table-cell office:value-type="float" office:value="3">
                <text:p>3</text:p>
              </table:table-cell>
              <table:table-cell office:value-type="float" office:value="0.147433805424568">
                <text:p>0.147433805424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0.0415806624332892">
                <text:p>0.0415806624332892</text:p>
              </table:table-cell>
              <table:table-cell office:value-type="float" office:value="3.1">
                <text:p>3.1</text:p>
              </table:table-cell>
              <table:table-cell office:value-type="float" office:value="0.0389753496219581">
                <text:p>0.038975349621958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/>
              <table:table-cell office:value-type="float" office:value="-0.0583741434275814">
                <text:p>-0.0583741434275814</text:p>
              </table:table-cell>
              <table:table-cell office:value-type="float" office:value="3.2">
                <text:p>3.2</text:p>
              </table:table-cell>
              <table:table-cell office:value-type="float" office:value="-0.0558700760483485">
                <text:p>-0.055870076048348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/>
              <table:table-cell office:value-type="float" office:value="-0.15774569414325">
                <text:p>-0.15774569414325</text:p>
              </table:table-cell>
              <table:table-cell office:value-type="float" office:value="3.3">
                <text:p>3.3</text:p>
              </table:table-cell>
              <table:table-cell office:value-type="float" office:value="-0.167273288194601">
                <text:p>-0.16727328819460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/>
              <table:table-cell office:value-type="float" office:value="-0.255541102026833">
                <text:p>-0.255541102026833</text:p>
              </table:table-cell>
              <table:table-cell office:value-type="float" office:value="3.4">
                <text:p>3.4</text:p>
              </table:table-cell>
              <table:table-cell office:value-type="float" office:value="-0.291135012424154">
                <text:p>-0.29113501242415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/>
              <table:table-cell office:value-type="float" office:value="-0.350783227689622">
                <text:p>-0.350783227689622</text:p>
              </table:table-cell>
              <table:table-cell office:value-type="float" office:value="3.5">
                <text:p>3.5</text:p>
              </table:table-cell>
              <table:table-cell office:value-type="float" office:value="-0.418979163777693">
                <text:p>-0.41897916377769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-0.442520443294854">
                <text:p>-0.442520443294854</text:p>
              </table:table-cell>
              <table:table-cell office:value-type="float" office:value="3.6">
                <text:p>3.6</text:p>
              </table:table-cell>
              <table:table-cell office:value-type="float" office:value="-0.543083639550796">
                <text:p>-0.54308363955079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/>
              <table:table-cell office:value-type="float" office:value="-0.529836140908495">
                <text:p>-0.529836140908495</text:p>
              </table:table-cell>
              <table:table-cell office:value-type="float" office:value="3.7">
                <text:p>3.7</text:p>
              </table:table-cell>
              <table:table-cell office:value-type="float" office:value="-0.657022690734485">
                <text:p>-0.65702269073448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/>
              <table:table-cell office:value-type="float" office:value="-0.611857890942721">
                <text:p>-0.611857890942721</text:p>
              </table:table-cell>
              <table:table-cell office:value-type="float" office:value="3.8">
                <text:p>3.8</text:p>
              </table:table-cell>
              <table:table-cell office:value-type="float" office:value="-0.756055130192154">
                <text:p>-0.75605513019215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-0.687766159183975">
                <text:p>-0.687766159183975</text:p>
              </table:table-cell>
              <table:table-cell office:value-type="float" office:value="3.9">
                <text:p>3.9</text:p>
              </table:table-cell>
              <table:table-cell office:value-type="float" office:value="-0.837331106748079">
                <text:p>-0.83733110674807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/>
              <table:table-cell office:value-type="float" office:value="-0.756802495307929">
                <text:p>-0.756802495307929</text:p>
              </table:table-cell>
              <table:table-cell office:value-type="float" office:value="4">
                <text:p>4</text:p>
              </table:table-cell>
              <table:table-cell office:value-type="float" office:value="-0.899907615495089">
                <text:p>-0.8999076154950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-0.818277111064411">
                <text:p>-0.818277111064411</text:p>
              </table:table-cell>
              <table:table-cell office:value-type="float" office:value="4.1">
                <text:p>4.1</text:p>
              </table:table-cell>
              <table:table-cell office:value-type="float" office:value="-0.944580889336252">
                <text:p>-0.94458088933625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/>
              <table:table-cell office:value-type="float" office:value="-0.871575772413589">
                <text:p>-0.871575772413589</text:p>
              </table:table-cell>
              <table:table-cell office:value-type="float" office:value="4.2">
                <text:p>4.2</text:p>
              </table:table-cell>
              <table:table-cell office:value-type="float" office:value="-0.973560683961579">
                <text:p>-0.97356068396157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/>
              <table:table-cell office:value-type="float" office:value="-0.916165936749455">
                <text:p>-0.916165936749455</text:p>
              </table:table-cell>
              <table:table-cell office:value-type="float" office:value="4.3">
                <text:p>4.3</text:p>
              </table:table-cell>
              <table:table-cell office:value-type="float" office:value="-0.990025701109027">
                <text:p>-0.99002570110902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/>
              <table:table-cell office:value-type="float" office:value="-0.951602073889516">
                <text:p>-0.951602073889516</text:p>
              </table:table-cell>
              <table:table-cell office:value-type="float" office:value="4.4">
                <text:p>4.4</text:p>
              </table:table-cell>
              <table:table-cell office:value-type="float" office:value="-0.997609717345392">
                <text:p>-0.99760971734539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-0.977530117665097">
                <text:p>-0.977530117665097</text:p>
              </table:table-cell>
              <table:table-cell office:value-type="float" office:value="4.5">
                <text:p>4.5</text:p>
              </table:table-cell>
              <table:table-cell office:value-type="float" office:value="-0.999873487426941">
                <text:p>-0.99987348742694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-0.993691003633464">
                <text:p>-0.993691003633464</text:p>
              </table:table-cell>
              <table:table-cell office:value-type="float" office:value="4.6">
                <text:p>4.6</text:p>
              </table:table-cell>
              <table:table-cell office:value-type="float" office:value="-0.999817708530329">
                <text:p>-0.99981770853032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/>
              <table:table-cell office:value-type="float" office:value="-0.999923257564101">
                <text:p>-0.999923257564101</text:p>
              </table:table-cell>
              <table:table-cell office:value-type="float" office:value="4.7">
                <text:p>4.7</text:p>
              </table:table-cell>
              <table:table-cell office:value-type="float" office:value="-0.999487286876072">
                <text:p>-0.99948728687607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/>
              <table:table-cell office:value-type="float" office:value="-0.996164608835841">
                <text:p>-0.996164608835841</text:p>
              </table:table-cell>
              <table:table-cell office:value-type="float" office:value="4.8">
                <text:p>4.8</text:p>
              </table:table-cell>
              <table:table-cell office:value-type="float" office:value="-0.999707347027225">
                <text:p>-0.99970734702722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-0.982452612624333">
                <text:p>-0.982452612624333</text:p>
              </table:table-cell>
              <table:table-cell office:value-type="float" office:value="4.9">
                <text:p>4.9</text:p>
              </table:table-cell>
              <table:table-cell office:value-type="float" office:value="-0.999977807550217">
                <text:p>-0.99997780755021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/>
              <table:table-cell office:value-type="float" office:value="-0.958924274663139">
                <text:p>-0.958924274663139</text:p>
              </table:table-cell>
              <table:table-cell office:value-type="float" office:value="5">
                <text:p>5</text:p>
              </table:table-cell>
              <table:table-cell office:value-type="float" office:value="-0.998537204793376">
                <text:p>-0.998537204793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-0.925814682327733">
                <text:p>-0.925814682327733</text:p>
              </table:table-cell>
              <table:table-cell office:value-type="float" office:value="5.1">
                <text:p>5.1</text:p>
              </table:table-cell>
              <table:table-cell office:value-type="float" office:value="-0.992589300025661">
                <text:p>-0.99258930002566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/>
              <table:table-cell office:value-type="float" office:value="-0.883454655720155">
                <text:p>-0.883454655720155</text:p>
              </table:table-cell>
              <table:table-cell office:value-type="float" office:value="5.2">
                <text:p>5.2</text:p>
              </table:table-cell>
              <table:table-cell office:value-type="float" office:value="-0.978669466583819">
                <text:p>-0.97866946658381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-0.832267442223903">
                <text:p>-0.832267442223903</text:p>
              </table:table-cell>
              <table:table-cell office:value-type="float" office:value="5.3">
                <text:p>5.3</text:p>
              </table:table-cell>
              <table:table-cell office:value-type="float" office:value="-0.953113479983468">
                <text:p>-0.95311347998346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/>
              <table:table-cell office:value-type="float" office:value="-0.772764487555989">
                <text:p>-0.772764487555989</text:p>
              </table:table-cell>
              <table:table-cell office:value-type="float" office:value="5.4">
                <text:p>5.4</text:p>
              </table:table-cell>
              <table:table-cell office:value-type="float" office:value="-0.912580484368875">
                <text:p>-0.91258048436887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/>
              <table:table-cell office:value-type="float" office:value="-0.705540325570395">
                <text:p>-0.705540325570395</text:p>
              </table:table-cell>
              <table:table-cell office:value-type="float" office:value="5.5">
                <text:p>5.5</text:p>
              </table:table-cell>
              <table:table-cell office:value-type="float" office:value="-0.854575620230628">
                <text:p>-0.85457562023062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/>
              <table:table-cell office:value-type="float" office:value="-0.631266637872324">
                <text:p>-0.631266637872324</text:p>
              </table:table-cell>
              <table:table-cell office:value-type="float" office:value="5.6">
                <text:p>5.6</text:p>
              </table:table-cell>
              <table:table-cell office:value-type="float" office:value="-0.777916690506487">
                <text:p>-0.77791669050648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/>
              <table:table-cell office:value-type="float" office:value="-0.550685542597641">
                <text:p>-0.550685542597641</text:p>
              </table:table-cell>
              <table:table-cell office:value-type="float" office:value="5.7">
                <text:p>5.7</text:p>
              </table:table-cell>
              <table:table-cell office:value-type="float" office:value="-0.683093459327645">
                <text:p>-0.68309345932764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/>
              <table:table-cell office:value-type="float" office:value="-0.464602179413761">
                <text:p>-0.464602179413761</text:p>
              </table:table-cell>
              <table:table-cell office:value-type="float" office:value="5.8">
                <text:p>5.8</text:p>
              </table:table-cell>
              <table:table-cell office:value-type="float" office:value="-0.572477374240447">
                <text:p>-0.57247737424044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/>
              <table:table-cell office:value-type="float" office:value="-0.373876664830241">
                <text:p>-0.373876664830241</text:p>
              </table:table-cell>
              <table:table-cell office:value-type="float" office:value="5.9">
                <text:p>5.9</text:p>
              </table:table-cell>
              <table:table-cell office:value-type="float" office:value="-0.450352872937566">
                <text:p>-0.45035287293756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/>
              <table:table-cell office:value-type="float" office:value="-0.279415498198931">
                <text:p>-0.279415498198931</text:p>
              </table:table-cell>
              <table:table-cell office:value-type="float" office:value="6">
                <text:p>6</text:p>
              </table:table-cell>
              <table:table-cell office:value-type="float" office:value="-0.322757784694072">
                <text:p>-0.3227577846940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-0.182162504272101">
                <text:p>-0.182162504272101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0.197138187982369">
                <text:p>-0.197138187982369</text:p>
              </table:table-cell>
              <table:table-cell office:value-type="float" office:value="6.09999999999999">
                <text:p>6.09999999999999</text:p>
              </table:table-cell>
            </table:table-row>
            <table:table-row>
              <table:table-cell office:value-type="string"/>
              <table:table-cell office:value-type="float" office:value="-0.0830894028175026">
                <text:p>-0.0830894028175026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0.081840812709119">
                <text:p>-0.081840812709119</text:p>
              </table:table-cell>
              <table:table-cell office:value-type="float" office:value="6.19999999999999">
                <text:p>6.19999999999999</text:p>
              </table:table-cell>
            </table:table-row>
            <table:table-row>
              <table:table-cell office:value-type="string"/>
              <table:table-cell office:value-type="float" office:value="0.0168139004843435">
                <text:p>0.0168139004843435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152499741965903">
                <text:p>0.0152499741965903</text:p>
              </table:table-cell>
              <table:table-cell office:value-type="float" office:value="6.29999999999999">
                <text:p>6.2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
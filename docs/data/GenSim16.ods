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Pictures/10000000000002580000025C410B0982.jpg" manifest:media-type="image/jpe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cript-l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352in"/>
    </style:style>
    <style:style style:name="co4" style:family="table-column">
      <style:table-column-properties fo:break-before="auto" style:column-width="1.7071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209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063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0.639in"/>
    </style:style>
    <style:style style:name="co13" style:family="table-column">
      <style:table-column-properties fo:break-before="auto" style:column-width="0.6827in"/>
    </style:style>
    <style:style style:name="co14" style:family="table-column">
      <style:table-column-properties fo:break-before="auto" style:column-width="0.517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Lind">
      <style:table-properties table:display="true" style:writing-mode="lr-tb"/>
    </style:style>
    <style:style style:name="ta2" style:family="table" style:master-page-name="PageStyle_5f_Räkn">
      <style:table-properties table:display="true" style:writing-mode="lr-tb"/>
    </style:style>
    <style:style style:name="ta3" style:family="table" style:master-page-name="PageStyle_5f_plot">
      <style:table-properties table:display="true" style:writing-mode="lr-tb"/>
    </style:style>
    <style:style style:name="ta4" style:family="table" style:master-page-name="PageStyle_5f_Ro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c000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eebf7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deebf7" style:diagonal-bl-tr="none" style:diagonal-tl-br="none" fo:border-left="1.76pt solid #000000" fo:border-right="none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2" style:family="table-cell" style:parent-style-name="Default">
      <style:table-cell-properties fo:border-bottom="none" fo:background-color="#deebf7" style:diagonal-bl-tr="none" style:diagonal-tl-br="none" fo:border-left="1.76pt solid #000000" fo:border-right="none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4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5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deebf7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2">
      <style:table-cell-properties fo:background-color="#ffffcc" style:rotation-align="none"/>
    </style:style>
    <style:style style:name="ce20" style:family="table-cell" style:parent-style-name="Default" style:data-style-name="N10">
      <style:table-cell-properties fo:background-color="#ffffcc" style:rotation-align="none"/>
    </style:style>
    <style:style style:name="ce21" style:family="table-cell" style:parent-style-name="Default">
      <style:table-cell-properties fo:background-color="#ffffcc" style:rotation-align="none"/>
    </style:style>
    <style:style style:name="ce22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0">
      <style:table-cell-properties style:rotation-align="non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6dce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2000"/>
          <loext:transformation loext:type="lumoff" loext:value="7999"/>
        </loext:char-complex-color>
      </style:text-properties>
    </style:style>
    <style:style style:name="ce25" style:family="table-cell" style:parent-style-name="Default" style:data-style-name="N2">
      <style:table-cell-properties fo:background-color="#c5e0b4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d6dce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2000"/>
          <loext:transformation loext:type="lumoff" loext:value="7999"/>
        </loext:char-complex-color>
      </style:text-properties>
    </style:style>
    <style:style style:name="ce26" style:family="table-cell" style:parent-style-name="Default">
      <style:table-cell-properties style:rotation-align="none"/>
      <style:text-properties fo:color="#d6dce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>
          <loext:transformation loext:type="lummod" loext:value="2000"/>
          <loext:transformation loext:type="lumoff" loext:value="7999"/>
        </loext:char-complex-color>
      </style:text-properties>
    </style:style>
    <style:style style:name="ce27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fo:background-color="#deebf7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</style:style>
    <style:style style:name="ce35" style:family="table-cell" style:parent-style-name="Default">
      <style:table-cell-properties fo:border-bottom="none" fo:background-color="#deebf7" style:diagonal-bl-tr="none" style:diagonal-tl-br="none" fo:border-left="1.76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0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2.49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3" style:family="table-cell" style:parent-style-name="Default">
      <style:table-cell-properties fo:border-bottom="none" fo:background-color="#deebf7" style:diagonal-bl-tr="none" style:diagonal-tl-br="none" fo:border-left="none" fo:border-right="0.74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5" style:family="table-cell" style:parent-style-name="Default">
      <style:table-cell-properties fo:border-bottom="none" fo:background-color="#deebf7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none" fo:background-color="#deebf7" style:diagonal-bl-tr="none" style:diagonal-tl-br="none" fo:border-left="0.74pt solid #000000" fo:border-right="2.49pt solid #000000" style:rotation-align="none" fo:border-top="1.76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9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none"/>
    </style:style>
    <style:style style:name="ce50" style:family="table-cell" style:parent-style-name="Default">
      <style:table-cell-properties fo:border-bottom="none" fo:background-color="#deebf7" style:diagonal-bl-tr="none" style:diagonal-tl-br="none" fo:border-left="0.74pt solid #000000" fo:border-right="2.49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1" style:family="table-cell" style:parent-style-name="Default">
      <style:table-cell-properties fo:border-bottom="none" fo:background-color="#deebf7" style:diagonal-bl-tr="none" style:diagonal-tl-br="none" fo:border-left="0.74pt solid #000000" fo:border-right="1.76pt solid #000000" style:rotation-align="none" fo:border-top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bdd7ee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6" style:family="table-cell" style:parent-style-name="Default" style:data-style-name="N10">
      <style:table-cell-properties fo:background-color="#bdd7ee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7" style:family="table-cell" style:parent-style-name="Default">
      <style:map style:condition="cell-content-is-between(-0.1,0.1)" style:apply-style-name="ConditionalStyle_5f_8" style:base-cell-address="Räkn.D13"/>
      <style:map style:condition="cell-content-is-between(6.27,6.29)" style:apply-style-name="ConditionalStyle_5f_7" style:base-cell-address="Räkn.D13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2">
      <style:table-cell-properties fo:background-color="#bdd7ee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1" style:family="table-cell" style:parent-style-name="Default" style:data-style-name="N1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2" style:family="table-cell" style:parent-style-name="Default" style:data-style-name="N10">
      <style:table-cell-properties fo:background-color="#dae3f3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3" style:family="table-cell" style:parent-style-name="Default" style:data-style-name="N2">
      <style:table-cell-properties fo:background-color="#dae3f3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4" style:family="table-cell" style:parent-style-name="Default">
      <style:table-cell-properties fo:background-color="#dae3f3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style:rotation-align="non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154">
      <style:table-cell-properties style:rotation-align="none"/>
    </style:style>
    <style:style style:name="ce70" style:family="table-cell" style:parent-style-name="Default" style:data-style-name="N2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1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2" style:family="table-cell" style:parent-style-name="Default" style:data-style-name="N1">
      <style:table-cell-properties style:rotation-align="none"/>
    </style:style>
    <style:style style:name="ce73" style:family="table-cell" style:parent-style-name="Default" style:data-style-name="N152">
      <style:table-cell-properties style:rotation-align="none"/>
    </style:style>
    <style:style style:name="ce74" style:family="table-cell" style:parent-style-name="Default" style:data-style-name="N153">
      <style:table-cell-properties style:rotation-align="none"/>
    </style:style>
    <style:style style:name="ce75" style:family="table-cell" style:parent-style-name="Default" style:data-style-name="N2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d6dce5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2" table:number-columns-repeated="38" table:default-cell-style-name="Default"/>
        <table:table-column table:style-name="co2"/>
        <table:table-column table:style-name="co7" table:number-columns-repeated="16287"/>
        <table:table-row table:style-name="ro1">
          <table:table-cell table:number-columns-repeated="2"/>
          <table:table-cell office:value-type="string" calcext:value-type="string">
            <text:p>GenSim14 - räknar all spåspänningar för en mer rektangulär flödestäthet, enl funktion "magnet" </text:p>
          </table:table-cell>
          <table:table-cell table:number-columns-repeated="54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2">
          <table:table-cell table:number-columns-repeated="3"/>
          <table:table-cell table:style-name="ce7" office:value-type="string" calcext:value-type="string">
            <text:p>Lindnings utläggning stator med max 48 spår och max 8 positioner i varje spår</text:p>
          </table:table-cell>
          <table:table-cell table:number-columns-repeated="24"/>
          <table:table-cell table:style-name="ce7" office:value-type="string" calcext:value-type="string">
            <text:p>REM 2024</text:p>
          </table:table-cell>
          <table:table-cell table:number-columns-repeated="28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30"/>
          <table:table-cell office:value-type="string" calcext:value-type="string">
            <text:p>Legend:</text:p>
          </table:table-cell>
          <table:table-cell table:number-columns-repeated="26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2" office:value-type="string" calcext:value-type="string">
            <text:p>Poler</text:p>
          </table:table-cell>
          <table:table-cell table:style-name="ce8" office:value-type="float" office:value="4" calcext:value-type="float">
            <office:annotation draw:style-name="gr3" draw:text-style-name="P2" svg:width="1.5772in" svg:height="0.8126in" svg:x="1.4894in" svg:y="0.5976in" draw:caption-point-x="-0.1287in" draw:caption-point-y="0.1291in">
              <dc:creator>Hans Bernhoff</dc:creator>
              <meta:date-string/>
              <text:p>Hans Bernhoff:</text:p>
              <text:p><text:span text:style-name="T1">Fyll i dessa 3 från projektblad (personliga)</text:span></text:p>
            </office:annotation>
            <text:p>4</text:p>
          </table:table-cell>
          <table:table-cell office:value-type="string" calcext:value-type="string">
            <text:p>nb.</text:p>
          </table:table-cell>
          <table:table-cell table:number-columns-repeated="2"/>
          <table:table-cell table:style-name="ce2" office:value-type="string" calcext:value-type="string">
            <text:p>In Diam:</text:p>
          </table:table-cell>
          <table:table-cell table:style-name="ce19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Airgap: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" office:value-type="string" calcext:value-type="string">
            <text:p>Frekv.</text:p>
          </table:table-cell>
          <table:table-cell table:style-name="ce15" table:formula="of:=[.D4]/2*[.D6]/60"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4" office:value-type="string" calcext:value-type="string">
            <text:p>B<text:span text:style-name="T2">agAvg</text:span></text:p>
          </table:table-cell>
          <table:table-cell table:style-name="ce25" table:formula="of:=[$Lind.S5]/0.8*[$Lind.N6]" office:value-type="float" office:value="0.825" calcext:value-type="float">
            <text:p>0.83</text:p>
          </table:table-cell>
          <table:table-cell table:style-name="ce26" office:value-type="string" calcext:value-type="string">
            <text:p>T</text:p>
          </table:table-cell>
          <table:table-cell table:number-columns-repeated="5"/>
          <table:table-cell table:style-name="ce8" office:value-type="string" calcext:value-type="string">
            <text:p>Input</text:p>
          </table:table-cell>
          <table:table-cell table:style-name="ce8"/>
          <table:table-cell table:number-columns-repeated="25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2" office:value-type="string" calcext:value-type="string">
            <text:p>Faser: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st</text:p>
          </table:table-cell>
          <table:table-cell table:number-columns-repeated="2"/>
          <table:table-cell table:style-name="ce2" office:value-type="string" calcext:value-type="string">
            <text:p>Höjd:</text:p>
          </table:table-cell>
          <table:table-cell table:style-name="ce19" office:value-type="float" office:value="0.5" calcext:value-type="float">
            <text:p>0.5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PM h: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45SH</text:p>
          </table:table-cell>
          <table:table-cell table:style-name="ce2" office:value-type="string" calcext:value-type="string">
            <text:p>Rmn</text:p>
          </table:table-cell>
          <table:table-cell table:style-name="ce21" office:value-type="float" office:value="1.32" calcext:value-type="float">
            <text:p>1.32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B<text:span text:style-name="T3">agAvg</text:span></text:p>
          </table:table-cell>
          <table:table-cell table:style-name="ce15" office:value-type="float" office:value="0.825" calcext:value-type="float">
            <text:p>0.825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21" office:value-type="string" calcext:value-type="string">
            <text:p>Parameter</text:p>
          </table:table-cell>
          <table:table-cell table:style-name="ce21"/>
          <table:table-cell table:number-columns-repeated="25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2" office:value-type="string" calcext:value-type="string">
            <text:p>RPM</text:p>
          </table:table-cell>
          <table:table-cell table:style-name="ce8" office:value-type="float" office:value="240" calcext:value-type="float">
            <text:p>24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table:style-name="ce2" office:value-type="string" calcext:value-type="string">
            <text:p>Stat Fill:</text:p>
          </table:table-cell>
          <table:table-cell table:style-name="ce20" office:value-type="percentage" office:value="0.5" calcext:value-type="percentage">
            <text:p>50%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Rot Fill</text:p>
          </table:table-cell>
          <table:table-cell table:style-name="ce20" office:value-type="percentage" office:value="0.5" calcext:value-type="percentage">
            <text:p>50%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45SH</text:p>
          </table:table-cell>
          <table:table-cell table:style-name="ce2" office:value-type="string" calcext:value-type="string">
            <text:p>Hc</text:p>
          </table:table-cell>
          <table:table-cell table:style-name="ce21" office:value-type="float" office:value="1.035" calcext:value-type="float">
            <text:p>1.035</text:p>
          </table:table-cell>
          <table:table-cell office:value-type="string" calcext:value-type="string">
            <text:p>MA/m</text:p>
          </table:table-cell>
          <table:table-cell table:number-columns-repeated="10"/>
          <table:table-cell table:style-name="ce15" office:value-type="string" calcext:value-type="string">
            <text:p>Resultat</text:p>
          </table:table-cell>
          <table:table-cell table:style-name="ce15"/>
          <table:table-cell table:number-columns-repeated="25"/>
          <table:table-cell table:style-name="ce29" office:value-type="string" calcext:value-type="string" table:number-columns-spanned="6" table:number-rows-spanned="3">
            <text:p>HANS:</text:p>
          </table:table-cell>
          <table:covered-table-cell table:number-columns-repeated="5" table:style-name="ce30"/>
          <table:table-cell table:number-columns-repeated="33"/>
          <table:table-cell table:style-name="Default" table:number-columns-repeated="16288"/>
        </table:table-row>
        <table:table-row table:style-name="ro1">
          <table:table-cell table:number-columns-repeated="2"/>
          <table:table-cell office:value-type="string" calcext:value-type="string">
            <text:p>Spår: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st</text:p>
          </table:table-cell>
          <table:table-cell table:number-columns-repeated="12"/>
          <table:table-cell office:value-type="string" calcext:value-type="string">
            <text:p>Brus ampl</text:p>
          </table:table-cell>
          <table:table-cell table:style-name="ce23" office:value-type="percentage" office:value="0.03" calcext:value-type="percentage">
            <text:p>3%</text:p>
          </table:table-cell>
          <table:table-cell table:number-columns-repeated="38"/>
          <table:covered-table-cell table:number-columns-repeated="6" table:style-name="ce30"/>
          <table:table-cell table:number-columns-repeated="33"/>
          <table:table-cell table:style-name="Default" table:number-columns-repeated="16288"/>
        </table:table-row>
        <table:table-row table:style-name="ro1">
          <table:table-cell table:number-columns-repeated="7"/>
          <table:table-cell table:style-name="ce2"/>
          <table:table-cell table:number-columns-repeated="49"/>
          <table:covered-table-cell table:number-columns-repeated="6" table:style-name="ce30"/>
          <table:table-cell table:number-columns-repeated="33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Pos:\Slot: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8"/>
          <table:table-cell table:number-columns-repeated="5"/>
          <table:table-cell table:style-name="ce31" office:value-type="string" calcext:value-type="string" table:number-columns-spanned="2" table:number-rows-spanned="1">
            <text:p>Pos:\Slot: <text:span text:style-name="T4">1</text:span></text:p>
          </table:table-cell>
          <table:covered-table-cell table:style-name="ce3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-3" calcext:value-type="float">
            <text:p>-3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-2" calcext:value-type="float">
            <text:p>-2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-3" calcext:value-type="float">
            <text:p>-3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float" office:value="-2" calcext:value-type="float">
            <text:p>-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4" calcext:value-type="float">
            <text:p>-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"/>
          <table:table-cell table:number-columns-repeated="4"/>
          <table:table-cell table:style-name="ce8" office:value-type="float" office:value="4" calcext:value-type="float">
            <office:annotation draw:style-name="gr3" draw:text-style-name="P2" svg:width="1.5866in" svg:height="0.8539in" svg:x="23.1665in" svg:y="1.8165in" draw:caption-point-x="-1.1469in" draw:caption-point-y="0.1602in">
              <dc:creator>Hans Bernhoff</dc:creator>
              <meta:date-string/>
              <text:p>Hans Bernhoff:</text:p>
              <text:p><text:span text:style-name="T1">Fyll i dessa 3 från projektblad (personliga)</text:span></text:p>
            </office:annotation>
            <text:p>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-3" calcext:value-type="float">
            <text:p>-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-2" calcext:value-type="float">
            <text:p>-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-3" calcext:value-type="float">
            <text:p>-3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style-name="ce38" office:value-type="float" office:value="-2" calcext:value-type="float">
            <text:p>-2</text:p>
          </table:table-cell>
          <table:table-cell table:style-name="ce48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"/>
          <table:table-cell table:number-columns-repeated="4"/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3" calcext:value-type="float">
            <text:p>-3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-2" calcext:value-type="float">
            <text:p>-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3" calcext:value-type="float">
            <text:p>-3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style-name="ce39" office:value-type="float" office:value="-2" calcext:value-type="float">
            <text:p>-2</text:p>
          </table:table-cell>
          <table:table-cell table:style-name="ce49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-3" calcext:value-type="float">
            <text:p>-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-2" calcext:value-type="float">
            <text:p>-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-3" calcext:value-type="float">
            <text:p>-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2" table:style-name="ce6" office:value-type="float" office:value="-5" calcext:value-type="float">
            <text:p>-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3" calcext:value-type="float">
            <text:p>-3</text:p>
          </table:table-cell>
          <table:table-cell table:style-name="ce6" table:number-columns-repeated="10"/>
          <table:table-cell table:style-name="ce1"/>
          <table:table-cell table:number-columns-repeated="4"/>
          <table:table-cell table:style-name="ce8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-3" calcext:value-type="float">
            <text:p>-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-2" calcext:value-type="float">
            <text:p>-2</text:p>
          </table:table-cell>
          <table:table-cell table:style-name="ce45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-3" calcext:value-type="float">
            <text:p>-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-2" calcext:value-type="float">
            <text:p>-2</text:p>
          </table:table-cell>
          <table:table-cell table:style-name="ce50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10"/>
          <table:table-cell table:style-name="ce1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3" calcext:value-type="float">
            <text:p>-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-2" calcext:value-type="float">
            <text:p>-2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3" calcext:value-type="float">
            <text:p>-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-2" calcext:value-type="float">
            <text:p>-2</text:p>
          </table:table-cell>
          <table:table-cell table:style-name="ce49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12"/>
          <table:table-cell table:style-name="ce6" table:number-columns-repeated="47"/>
          <table:table-cell table:style-name="ce1"/>
          <table:table-cell table:number-columns-repeated="5"/>
          <table:table-cell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-3" calcext:value-type="float">
            <text:p>-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-2" calcext:value-type="float">
            <text:p>-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-3" calcext:value-type="float">
            <text:p>-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3" calcext:value-type="float">
            <text:p>3</text:p>
          </table:table-cell>
          <table:table-cell table:style-name="ce40" office:value-type="float" office:value="-2" calcext:value-type="float">
            <text:p>-2</text:p>
          </table:table-cell>
          <table:table-cell table:style-name="ce51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47"/>
          <table:table-cell table:style-name="ce1"/>
          <table:table-cell table:number-columns-repeated="5"/>
          <table:table-cell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3" calcext:value-type="float">
            <text:p>-3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-2" calcext:value-type="float">
            <text:p>-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3" calcext:value-type="float">
            <text:p>-3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style-name="ce39" office:value-type="float" office:value="-2" calcext:value-type="float">
            <text:p>-2</text:p>
          </table:table-cell>
          <table:table-cell table:style-name="ce52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12"/>
          <table:table-cell table:style-name="ce6" table:number-columns-repeated="47"/>
          <table:table-cell table:style-name="ce1"/>
          <table:table-cell table:number-columns-repeated="5"/>
          <table:table-cell office:value-type="float" office:value="7" calcext:value-type="float">
            <text:p>7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-3" calcext:value-type="float">
            <text:p>-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-2" calcext:value-type="float">
            <text:p>-2</text:p>
          </table:table-cell>
          <table:table-cell table:style-name="ce45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-3" calcext:value-type="float">
            <text:p>-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-2" calcext:value-type="float">
            <text:p>-2</text:p>
          </table:table-cell>
          <table:table-cell table:style-name="ce51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13"/>
          <table:table-cell table:style-name="ce18" table:number-columns-repeated="47"/>
          <table:table-cell table:style-name="ce1"/>
          <table:table-cell table:number-columns-repeated="5"/>
          <table:table-cell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-3" calcext:value-type="float">
            <text:p>-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-2" calcext:value-type="float">
            <text:p>-2</text:p>
          </table:table-cell>
          <table:table-cell table:style-name="ce46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-3" calcext:value-type="float">
            <text:p>-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-2" calcext:value-type="float">
            <text:p>-2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/>
          <table:table-cell table:style-name="ce1" table:number-columns-repeated="51"/>
          <table:table-cell table:number-columns-repeated="5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11"/>
          <table:table-cell table:style-name="ce4"/>
          <table:table-cell table:number-columns-repeated="45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57"/>
          <table:table-cell office:value-type="string" calcext:value-type="string">
            <text:p>Students:</text:p>
          </table:table-cell>
          <table:table-cell/>
          <table:table-cell office:value-type="string" calcext:value-type="string">
            <text:p>ADAM</text:p>
          </table:table-cell>
          <table:table-cell table:number-columns-repeated="36"/>
          <table:table-cell table:style-name="Default" table:number-columns-repeated="16288"/>
        </table:table-row>
        <table:table-row table:style-name="ro1">
          <table:table-cell table:number-columns-repeated="11"/>
          <table:table-cell>
            <draw:frame table:end-cell-address="Lind.AA35" table:end-x="0.3035in" table:end-y="0.1705in" draw:z-index="1" draw:name="Chart 3" draw:style-name="gr1" draw:text-style-name="P1" svg:width="5.6575in" svg:height="2.9988in" svg:x="0.0937in" svg:y="0.1209in">
              <draw:object draw:notify-on-update-of-ranges="Rot.D10:Rot.D10 Rot.D11:Rot.D74 Rot.C11:Rot.C74 Rot.E10:Rot.E10 Rot.E11:Rot.E74 Rot.C11:Rot.C7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  <table:table-cell>
            <draw:frame draw:z-index="0" draw:name="Picture 2" draw:style-name="gr2" draw:text-style-name="P1" svg:width="3.4646in" svg:height="3.2291in" svg:x="0in" svg:y="0.1874in">
              <draw:image xlink:href="Pictures/10000000000002580000025C410B0982.jpg" xlink:type="simple" xlink:show="embed" xlink:actuate="onLoad" draw:mime-type="image/jpeg">
                <text:p/>
              </draw:image>
            </draw:frame>
          </table:table-cell>
          <table:table-cell table:number-columns-repeated="24"/>
          <table:table-cell table:style-name="ce31" office:value-type="string" calcext:value-type="string" table:number-columns-spanned="2" table:number-rows-spanned="1">
            <text:p>Pos:\Slot: <text:span text:style-name="T4">1</text:span></text:p>
          </table:table-cell>
          <table:covered-table-cell table:style-name="ce3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8"/>
          <table:table-cell table:style-name="Default" table:number-columns-repeated="16288"/>
        </table:table-row>
        <table:table-row table:style-name="ro3">
          <table:table-cell table:number-columns-repeated="2"/>
          <table:table-cell table:style-name="ce5" office:value-type="string" calcext:value-type="string">
            <text:p>Koll:</text:p>
          </table:table-cell>
          <table:table-cell table:number-columns-repeated="53"/>
          <table:table-cell table:style-name="ce8" office:value-type="float" office:value="10" calcext:value-type="float">
            <office:annotation draw:style-name="gr3" draw:text-style-name="P2" svg:width="1.5772in" svg:height="0.8224in" svg:x="23.0209in" svg:y="4.3165in" draw:caption-point-x="-1.0012in" draw:caption-point-y="0.1602in">
              <dc:creator>Hans Bernhoff</dc:creator>
              <meta:date-string/>
              <text:p>Hans Bernhoff:</text:p>
              <text:p><text:span text:style-name="T1">Fyll i dessa 3 från projektblad (personliga)</text:span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-2" calcext:value-type="float">
            <text:p>-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" calcext:value-type="float">
            <text:p>2</text:p>
          </table:table-cell>
          <table:table-cell table:style-name="ce48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string" calcext:value-type="string">
            <text:p>Summa ledare i spår:</text:p>
          </table:table-cell>
          <table:table-cell table:style-name="ce6" table:number-columns-repeated="3"/>
          <table:table-cell table:number-columns-repeated="50"/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49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string" calcext:value-type="string">
            <text:p>Fas</text:p>
          </table:table-cell>
          <table:table-cell table:style-name="ce14" office:value-type="string" calcext:value-type="string">
            <text:p>Up +</text:p>
          </table:table-cell>
          <table:table-cell table:style-name="ce14" office:value-type="string" calcext:value-type="string">
            <text:p>Ned -</text:p>
          </table:table-cell>
          <table:table-cell office:value-type="string" calcext:value-type="string">
            <text:p>Summa</text:p>
          </table:table-cell>
          <table:table-cell table:number-columns-repeated="50"/>
          <table:table-cell table:style-name="ce8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5" table:formula="of:=COUNTIF([.$D$10:.$AO$17];[.C25])" office:value-type="float" office:value="26" calcext:value-type="float">
            <text:p>26</text:p>
          </table:table-cell>
          <table:table-cell table:style-name="ce15" table:formula="of:=COUNTIF([.$D$10:.$AY$17];-1*[.C25])" office:value-type="float" office:value="20" calcext:value-type="float">
            <text:p>20</text:p>
          </table:table-cell>
          <table:table-cell table:number-columns-repeated="51"/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49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15" table:formula="of:=COUNTIF([.$D$10:.$AO$17];[.C26])" office:value-type="float" office:value="12" calcext:value-type="float">
            <text:p>12</text:p>
          </table:table-cell>
          <table:table-cell table:style-name="ce15" table:formula="of:=COUNTIF([.$D$10:.$AY$17];-1*[.C26])" office:value-type="float" office:value="21" calcext:value-type="float">
            <text:p>2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51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15" table:formula="of:=COUNTIF([.$D$10:.$AO$17];[.C27])" office:value-type="float" office:value="28" calcext:value-type="float">
            <text:p>28</text:p>
          </table:table-cell>
          <table:table-cell table:style-name="ce15" table:formula="of:=COUNTIF([.$D$10:.$AY$17];-1*[.C27])" office:value-type="float" office:value="22" calcext:value-type="float">
            <text:p>2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2" calcext:value-type="float">
            <text:p>-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52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15" table:formula="of:=COUNTIF([.$D$10:.$AO$17];[.C28])" office:value-type="float" office:value="4" calcext:value-type="float">
            <text:p>4</text:p>
          </table:table-cell>
          <table:table-cell table:style-name="ce15" table:formula="of:=COUNTIF([.$D$10:.$AO$17];-1*[.C28])" office:value-type="float" office:value="4" calcext:value-type="float">
            <text:p>4</text:p>
          </table:table-cell>
          <table:table-cell table:number-columns-repeated="52"/>
          <table:table-cell office:value-type="float" office:value="7" calcext:value-type="float">
            <text:p>7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2" calcext:value-type="float">
            <text:p>-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51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15" table:formula="of:=COUNTIF([.$D$10:.$AO$17];[.C29])" office:value-type="float" office:value="8" calcext:value-type="float">
            <text:p>8</text:p>
          </table:table-cell>
          <table:table-cell table:style-name="ce15" table:formula="of:=COUNTIF([.$D$10:.$AY$17];-1*[.C29])" office:value-type="float" office:value="7" calcext:value-type="float">
            <text:p>7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-2" calcext:value-type="float">
            <text:p>-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3" calcext:value-type="float">
            <text:p>-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2" calcext:value-type="float">
            <text:p>-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3" calcext:value-type="float">
            <text:p>-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2" calcext:value-type="float">
            <text:p>-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3" calcext:value-type="float">
            <text:p>-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2" calcext:value-type="float">
            <text:p>-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3" calcext:value-type="float">
            <text:p>-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2" calcext:value-type="float">
            <text:p>-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5" table:formula="of:=COUNTIF([.$D$10:.$AO$17];[.C30])" office:value-type="float" office:value="0" calcext:value-type="float">
            <text:p>0</text:p>
          </table:table-cell>
          <table:table-cell table:style-name="ce15" table:formula="of:=COUNTIF([.$D$10:.$AY$17];-1*[.C30])" office:value-type="float" office:value="0" calcext:value-type="float">
            <text:p>0</text:p>
          </table:table-cell>
          <table:table-cell table:number-columns-repeated="52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15" table:formula="of:=COUNTIF([.$D$10:.$AO$17];[.C31])" office:value-type="float" office:value="0" calcext:value-type="float">
            <text:p>0</text:p>
          </table:table-cell>
          <table:table-cell table:style-name="ce15" table:formula="of:=COUNTIF([.$D$10:.$AY$17];-1*[.C31])" office:value-type="float" office:value="0" calcext:value-type="float">
            <text:p>0</text:p>
          </table:table-cell>
          <table:table-cell table:number-columns-repeated="52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15" table:formula="of:=COUNTIF([.$D$10:.$AO$17];[.C32])" office:value-type="float" office:value="0" calcext:value-type="float">
            <text:p>0</text:p>
          </table:table-cell>
          <table:table-cell table:style-name="ce15" table:formula="of:=COUNTIF([.$D$10:.$AY$17];-1*[.C32])" office:value-type="float" office:value="0" calcext:value-type="float">
            <text:p>0</text:p>
          </table:table-cell>
          <table:table-cell table:number-columns-repeated="52"/>
          <table:table-cell table:style-name="Default"/>
          <table:table-cell table:number-columns-repeated="38"/>
          <table:table-cell table:style-name="Default" table:number-columns-repeated="16288"/>
        </table:table-row>
        <table:table-row table:style-name="ro1">
          <table:table-cell table:number-columns-repeated="57"/>
          <table:table-cell table:style-name="Default" office:value-type="string" calcext:value-type="string">
            <text:p>Test38: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Default" table:number-columns-repeated="16288"/>
        </table:table-row>
        <table:table-row table:style-name="ro1">
          <table:table-cell table:number-columns-repeated="56"/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-3" calcext:value-type="float">
            <text:p>-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-2" calcext:value-type="float">
            <text:p>-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-3" calcext:value-type="float">
            <text:p>-3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2" calcext:value-type="float">
            <text:p>-2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-2" calcext:value-type="float">
            <text:p>-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1" calcext:value-type="float">
            <text:p>1</text:p>
          </table:table-cell>
          <table:table-cell table:style-name="Default" table:number-columns-repeated="16288"/>
        </table:table-row>
        <table:table-row table:style-name="ro1">
          <table:table-cell table:number-columns-repeated="56"/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3" calcext:value-type="float">
            <text:p>-3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-2" calcext:value-type="float">
            <text:p>-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3" calcext:value-type="float">
            <text:p>-3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-5" calcext:value-type="float">
            <text:p>-5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-2" calcext:value-type="float">
            <text:p>-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4" calcext:value-type="float">
            <text:p>-4</text:p>
          </table:table-cell>
          <table:table-cell table:style-name="ce39" office:value-type="float" office:value="1" calcext:value-type="float">
            <text:p>1</text:p>
          </table:table-cell>
          <table:table-cell table:style-name="Default" table:number-columns-repeated="16288"/>
        </table:table-row>
        <table:table-row table:style-name="ro1">
          <table:table-cell table:number-columns-repeated="56"/>
          <table:table-cell table:style-name="ce8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-3" calcext:value-type="float">
            <text:p>-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-2" calcext:value-type="float">
            <text:p>-2</text:p>
          </table:table-cell>
          <table:table-cell table:style-name="ce45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-3" calcext:value-type="float">
            <text:p>-3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-2" calcext:value-type="float">
            <text:p>-2</text:p>
          </table:table-cell>
          <table:table-cell table:number-columns-repeated="2" table:style-name="ce40" office:value-type="float" office:value="-5" calcext:value-type="float">
            <text:p>-5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-2" calcext:value-type="float">
            <text:p>-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4" calcext:value-type="float">
            <text:p>-4</text:p>
          </table:table-cell>
          <table:table-cell table:style-name="ce40" office:value-type="float" office:value="-3" calcext:value-type="float">
            <text:p>-3</text:p>
          </table:table-cell>
          <table:table-cell table:style-name="Default" table:number-columns-repeated="16288"/>
        </table:table-row>
        <table:table-row table:style-name="ro1">
          <table:table-cell table:number-columns-repeated="56"/>
          <table:table-cell table:style-name="ce8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3" calcext:value-type="float">
            <text:p>-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-2" calcext:value-type="float">
            <text:p>-2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3" calcext:value-type="float">
            <text:p>-3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-2" calcext:value-type="float">
            <text:p>-2</text:p>
          </table:table-cell>
          <table:table-cell table:number-columns-repeated="2" table:style-name="ce39" office:value-type="float" office:value="-5" calcext:value-type="float">
            <text:p>-5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-2" calcext:value-type="float">
            <text:p>-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4" calcext:value-type="float">
            <text:p>-4</text:p>
          </table:table-cell>
          <table:table-cell table:style-name="ce39" office:value-type="float" office:value="-3" calcext:value-type="float">
            <text:p>-3</text:p>
          </table:table-cell>
          <table:table-cell table:style-name="Default" table:number-columns-repeated="16288"/>
        </table:table-row>
        <table:table-row table:style-name="ro1">
          <table:table-cell/>
          <table:table-cell>
            <draw:frame table:end-cell-address="Lind.AF64" table:end-x="0.1142in" table:end-y="0.0079in" draw:z-index="2" draw:name="Chart 4" draw:style-name="gr1" draw:text-style-name="P1" svg:width="10.8287in" svg:height="5.2579in" svg:x="0.1811in" svg:y="0.1665in">
              <draw:object draw:notify-on-update-of-ranges="Räkn.BC14:Räkn.BC14 Räkn.BC15:Räkn.BC115 Räkn.BA15:Räkn.BA115 Räkn.BD14:Räkn.BD14 Räkn.BD15:Räkn.BD115 Räkn.BA15:Räkn.BA115 Räkn.BE14:Räkn.BE14 Räkn.BE15:Räkn.BE115 Räkn.BA15:Räkn.BA115 Räkn.BF14:Räkn.BF14 Räkn.BF15:Räkn.BF115 Räkn.BA15:Räkn.BA115 Räkn.BG14:Räkn.BG14 Räkn.BG15:Räkn.BG115 Räkn.BA15:Räkn.BA115 Räkn.BH14:Räkn.BH14 Räkn.BH15:Räkn.BH115 Räkn.BA15:Räkn.BA115 Räkn.BI14:Räkn.BI14 Räkn.BI15:Räkn.BI115 Räkn.BA15:Räkn.BA115 Räkn.BJ14:Räkn.BJ14 Räkn.BJ15:Räkn.BJ115 Räkn.BA15:Räkn.BA1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5"/>
          <table:table-cell table:style-name="Default"/>
          <table:table-cell table:number-columns-repeated="38"/>
          <table:table-cell table:style-name="Default" table:number-columns-repeated="16288"/>
        </table:table-row>
      </table:table>
      <table:table table:name="Räkn" table:style-name="ta2">
        <office:forms form:automatic-focus="false" form:apply-design-mode="false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8" table:default-cell-style-name="Default"/>
        <table:table-column table:style-name="co9" table:number-columns-repeated="2" table:default-cell-style-name="Default"/>
        <table:table-column table:style-name="co9" table:default-cell-style-name="ce69"/>
        <table:table-column table:style-name="co9" table:default-cell-style-name="ce70"/>
        <table:table-column table:style-name="co9" table:number-columns-repeated="2" table:default-cell-style-name="Default"/>
        <table:table-column table:style-name="co7" table:number-columns-repeated="9" table:default-cell-style-name="Default"/>
        <table:table-column table:style-name="co7" table:number-columns-repeated="16318"/>
        <table:table-row table:style-name="ro4">
          <table:table-cell table:number-columns-repeated="53"/>
          <table:table-cell table:style-name="Default" table:number-columns-repeated="2"/>
          <table:table-cell table:number-columns-repeated="11"/>
          <table:table-cell table:style-name="Default" table:number-columns-repeated="16318"/>
        </table:table-row>
        <table:table-row table:style-name="ro5">
          <table:table-cell table:number-columns-repeated="2"/>
          <table:table-cell table:style-name="ce2" office:value-type="string" calcext:value-type="string">
            <text:p>Poler</text:p>
          </table:table-cell>
          <table:table-cell table:style-name="ce55" table:formula="of:=[$Lind.D4]" office:value-type="float" office:value="4" calcext:value-type="float">
            <text:p>4</text:p>
          </table:table-cell>
          <table:table-cell office:value-type="string" calcext:value-type="string">
            <text:p>nb.</text:p>
          </table:table-cell>
          <table:table-cell table:number-columns-repeated="2"/>
          <table:table-cell table:style-name="ce2" office:value-type="string" calcext:value-type="string">
            <text:p>In Diam:</text:p>
          </table:table-cell>
          <table:table-cell table:style-name="ce59" table:formula="of:=[$Lind.I4]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Airgap:</text:p>
          </table:table-cell>
          <table:table-cell table:style-name="ce55" table:formula="of:=[$Lind.N4]"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60" office:value-type="string" calcext:value-type="string">
            <text:p>PP <text:s text:c="7"/>polpar</text:p>
          </table:table-cell>
          <table:table-cell table:style-name="ce15" table:formula="of:=[.D2]/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oise</text:p>
          </table:table-cell>
          <table:table-cell table:style-name="ce62" table:formula="of:=[$Lind.S7]" office:value-type="percentage" office:value="0.03" calcext:value-type="percentage">
            <text:p>3%</text:p>
          </table:table-cell>
          <table:table-cell/>
          <table:table-cell table:style-name="ce2" office:value-type="string" calcext:value-type="string">
            <text:p>B<text:span text:style-name="T3">agAvg</text:span></text:p>
          </table:table-cell>
          <table:table-cell table:style-name="ce63" table:formula="of:=[$Lind.X4]" office:value-type="float" office:value="0.825" calcext:value-type="float">
            <text:p>0.83</text:p>
          </table:table-cell>
          <table:table-cell office:value-type="string" calcext:value-type="string">
            <text:p>T</text:p>
          </table:table-cell>
          <table:table-cell table:number-columns-repeated="25"/>
          <table:table-cell table:style-name="ce67" office:value-type="string" calcext:value-type="string">
            <text:p>fas</text:p>
          </table:table-cell>
          <table:table-cell table:style-name="ce68" office:value-type="string" calcext:value-type="string">
            <text:p><text:s/>+</text:p>
          </table:table-cell>
          <table:table-cell table:style-name="ce68" office:value-type="string" calcext:value-type="string">
            <text:p><text:s/>-</text:p>
          </table:table-cell>
          <table:table-cell table:style-name="ce67"/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 office:value-type="string" calcext:value-type="string">
            <text:p>Rot Fill</text:p>
          </table:table-cell>
          <table:table-cell table:style-name="ce56" table:formula="of:=[$Lind.N6]" office:value-type="percentage" office:value="0.5" calcext:value-type="percentage">
            <text:p>50%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Höjd:</text:p>
          </table:table-cell>
          <table:table-cell table:style-name="ce59" table:formula="of:=[$Lind.I5]" office:value-type="float" office:value="0.5" calcext:value-type="float">
            <text:p>0.5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PM h:</text:p>
          </table:table-cell>
          <table:table-cell table:style-name="ce55" table:formula="of:=[$Lind.N5]"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" office:value-type="string" calcext:value-type="string">
            <text:p>q</text:p>
          </table:table-cell>
          <table:table-cell table:style-name="ce15" table:formula="of:=[.N4]/[.D2]/[.I5]"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v<text:span text:style-name="T3">ag</text:span></text:p>
          </table:table-cell>
          <table:table-cell table:style-name="ce64" table:formula="of:=2*PI()*[$Lind.I4]*[$Lind.D6]/60" office:value-type="float" office:value="7.5398223686155" calcext:value-type="float">
            <text:p>7.5398223686155</text:p>
          </table:table-cell>
          <table:table-cell office:value-type="string" calcext:value-type="string">
            <text:p>m/s</text:p>
          </table:table-cell>
          <table:table-cell table:number-columns-repeated="3"/>
          <table:table-cell table:style-name="ce65" table:formula="of:=RAND()*[.$Z$11]*[.$N$5]" office:value-type="float" office:value="2.60526387161099" calcext:value-type="float">
            <text:p>2.6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style-name="Default" table:formula="of:=COUNTIF([.$D$15:.$AO$22];[.BA3])" office:value-type="float" office:value="26" calcext:value-type="float">
            <text:p>26</text:p>
          </table:table-cell>
          <table:table-cell table:style-name="Default" table:formula="of:=COUNTIF([.$D$15:.$AO$22];-1*[.BA3])" office:value-type="float" office:value="20" calcext:value-type="float">
            <text:p>20</text:p>
          </table:table-cell>
          <table:table-cell table:formula="of:=[.BB3]+[.BC3]" office:value-type="float" office:value="46" calcext:value-type="float">
            <text:p>46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 office:value-type="string" calcext:value-type="string">
            <text:p>Remn</text:p>
          </table:table-cell>
          <table:table-cell table:style-name="ce55" table:formula="of:=[$Lind.S5]" office:value-type="float" office:value="1.32" calcext:value-type="float">
            <text:p>1.32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Stat Fill:</text:p>
          </table:table-cell>
          <table:table-cell table:style-name="ce56" table:formula="of:=[$Lind.I6]" office:value-type="percentage" office:value="0.5" calcext:value-type="percentage">
            <text:p>50%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Spår:</text:p>
          </table:table-cell>
          <table:table-cell table:style-name="ce55" table:formula="of:=[$Lind.D7]" office:value-type="float" office:value="38" calcext:value-type="float">
            <text:p>38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Alfa</text:p>
          </table:table-cell>
          <table:table-cell table:style-name="ce61" table:formula="of:=[.D13]*180/PI()" office:value-type="float" office:value="18.9473684210526" calcext:value-type="float">
            <text:p>19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style-name="ce64" table:formula="of:=[.Z2]*[.Z3]" office:value-type="float" office:value="6.22035345410779" calcext:value-type="float">
            <text:p>6.22035345410779</text:p>
          </table:table-cell>
          <table:table-cell office:value-type="string" calcext:value-type="string">
            <text:p>V/m</text:p>
          </table:table-cell>
          <table:table-cell table:number-columns-repeated="3"/>
          <table:table-cell table:style-name="ce65" table:formula="of:=RAND()*[.$Z$11]*[.$N$5]" office:value-type="float" office:value="0.363438864160136" calcext:value-type="float">
            <text:p>0.36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style-name="Default" table:formula="of:=COUNTIF([.$D$15:.$AO$22];[.BA4])" office:value-type="float" office:value="12" calcext:value-type="float">
            <text:p>12</text:p>
          </table:table-cell>
          <table:table-cell table:style-name="Default" table:formula="of:=COUNTIF([.$D$15:.$AO$22];-1*[.BA4])" office:value-type="float" office:value="21" calcext:value-type="float">
            <text:p>21</text:p>
          </table:table-cell>
          <table:table-cell table:formula="of:=[.BB4]+[.BC4]" office:value-type="float" office:value="33" calcext:value-type="float">
            <text:p>33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 office:value-type="string" calcext:value-type="string">
            <text:p>rpm</text:p>
          </table:table-cell>
          <table:table-cell table:formula="of:=[$Lind.$D$6]" office:value-type="float" office:value="240" calcext:value-type="float">
            <text:p>24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table:style-name="ce2" office:value-type="string" calcext:value-type="string">
            <text:p>Faser:</text:p>
          </table:table-cell>
          <table:table-cell table:style-name="ce55" table:formula="of:=[$Lind.D5]" office:value-type="float" office:value="5" calcext:value-type="float">
            <text:p>5</text:p>
          </table:table-cell>
          <table:table-cell office:value-type="string" calcext:value-type="string">
            <text:p>st</text:p>
          </table:table-cell>
          <table:table-cell table:number-columns-repeated="2"/>
          <table:table-cell table:style-name="ce2" office:value-type="string" calcext:value-type="string">
            <text:p>Brus:</text:p>
          </table:table-cell>
          <table:table-cell table:style-name="ce23" office:value-type="percentage" office:value="0.05" calcext:value-type="percentage">
            <text:p>5%</text:p>
          </table:table-cell>
          <table:table-cell table:number-columns-repeated="10"/>
          <table:table-cell office:value-type="string" calcext:value-type="string">
            <text:p>U<text:span text:style-name="T3">pos</text:span></text:p>
          </table:table-cell>
          <table:table-cell table:style-name="ce64" table:formula="of:=[.Z4]*[$Lind.I5]" office:value-type="float" office:value="3.1101767270539" calcext:value-type="float">
            <text:p>3.1101767270539</text:p>
          </table:table-cell>
          <table:table-cell office:value-type="string" calcext:value-type="string">
            <text:p>V </text:p>
          </table:table-cell>
          <table:table-cell table:number-columns-repeated="3"/>
          <table:table-cell table:style-name="ce65" table:formula="of:=RAND()*[.$Z$11]*[.$N$5]" office:value-type="float" office:value="2.46516762809883" calcext:value-type="float">
            <text:p>2.4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style-name="Default" table:formula="of:=COUNTIF([.$D$15:.$AO$22];[.BA5])" office:value-type="float" office:value="28" calcext:value-type="float">
            <text:p>28</text:p>
          </table:table-cell>
          <table:table-cell table:style-name="Default" table:formula="of:=COUNTIF([.$D$15:.$AO$22];-1*[.BA5])" office:value-type="float" office:value="22" calcext:value-type="float">
            <text:p>22</text:p>
          </table:table-cell>
          <table:table-cell table:formula="of:=[.BB5]+[.BC5]" office:value-type="float" office:value="50" calcext:value-type="float">
            <text:p>50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 office:value-type="string" calcext:value-type="string">
            <text:p>Omega</text:p>
          </table:table-cell>
          <table:table-cell table:formula="of:=[.D5]/60*2*PI()*[.D2]/2" office:value-type="float" office:value="50.2654824574367" calcext:value-type="float">
            <text:p>50.2654824574367</text:p>
          </table:table-cell>
          <table:table-cell office:value-type="string" calcext:value-type="string">
            <text:p>rad/s</text:p>
          </table:table-cell>
          <table:table-cell table:number-columns-repeated="2"/>
          <table:table-cell table:style-name="ce2"/>
          <table:table-cell table:number-columns-repeated="44"/>
          <table:table-cell office:value-type="float" office:value="4" calcext:value-type="float">
            <text:p>4</text:p>
          </table:table-cell>
          <table:table-cell table:style-name="Default" table:formula="of:=COUNTIF([.$D$15:.$AO$22];[.BA6])" office:value-type="float" office:value="4" calcext:value-type="float">
            <text:p>4</text:p>
          </table:table-cell>
          <table:table-cell table:style-name="Default" table:formula="of:=COUNTIF([.$D$15:.$AO$22];-1*[.BA6])" office:value-type="float" office:value="4" calcext:value-type="float">
            <text:p>4</text:p>
          </table:table-cell>
          <table:table-cell table:formula="of:=[.BB6]+[.BC6]"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4"/>
          <table:table-cell office:value-type="float" office:value="5" calcext:value-type="float">
            <text:p>5</text:p>
          </table:table-cell>
          <table:table-cell table:style-name="Default" table:formula="of:=COUNTIF([.$D$15:.$AO$22];[.BA7])" office:value-type="float" office:value="8" calcext:value-type="float">
            <text:p>8</text:p>
          </table:table-cell>
          <table:table-cell table:style-name="Default" table:formula="of:=COUNTIF([.$D$15:.$AO$22];-1*[.BA7])" office:value-type="float" office:value="7" calcext:value-type="float">
            <text:p>7</text:p>
          </table:table-cell>
          <table:table-cell table:formula="of:=[.BB7]+[.BC7]" office:value-type="float" office:value="15" calcext:value-type="float">
            <text:p>15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4"/>
          <table:table-cell office:value-type="float" office:value="6" calcext:value-type="float">
            <text:p>6</text:p>
          </table:table-cell>
          <table:table-cell table:style-name="Default" table:formula="of:=COUNTIF([.$D$15:.$AO$22];[.BA8])" office:value-type="float" office:value="0" calcext:value-type="float">
            <text:p>0</text:p>
          </table:table-cell>
          <table:table-cell table:style-name="Default" table:formula="of:=COUNTIF([.$D$15:.$AO$22];-1*[.BA8])" office:value-type="float" office:value="0" calcext:value-type="float">
            <text:p>0</text:p>
          </table:table-cell>
          <table:table-cell table:formula="of:=[.BB8]+[.BC8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4"/>
          <table:table-cell office:value-type="float" office:value="7" calcext:value-type="float">
            <text:p>7</text:p>
          </table:table-cell>
          <table:table-cell table:style-name="Default" table:formula="of:=COUNTIF([.$D$15:.$AO$22];[.BA9])" office:value-type="float" office:value="0" calcext:value-type="float">
            <text:p>0</text:p>
          </table:table-cell>
          <table:table-cell table:style-name="Default" table:formula="of:=COUNTIF([.$D$15:.$AO$22];-1*[.BA9])" office:value-type="float" office:value="0" calcext:value-type="float">
            <text:p>0</text:p>
          </table:table-cell>
          <table:table-cell table:formula="of:=[.BB9]+[.BC9]" office:value-type="float" office:value="0" calcext:value-type="float">
            <text:p>0</text:p>
          </table:table-cell>
          <table:table-cell table:number-columns-repeated="7"/>
          <table:table-cell>
            <draw:frame table:end-cell-address="Räkn.CA36" table:end-x="0.6559in" table:end-y="0.1768in" draw:z-index="0" draw:name="Chart 3" draw:style-name="gr1" draw:text-style-name="P1" svg:width="10.4996in" svg:height="5.6713in" svg:x="0.1874in" svg:y="0.1303in">
              <draw:object draw:notify-on-update-of-ranges="Räkn.BC14:Räkn.BC14 Räkn.BC15:Räkn.BC115 Räkn.BA15:Räkn.BA115 Räkn.BD14:Räkn.BD14 Räkn.BD15:Räkn.BD115 Räkn.BA15:Räkn.BA115 Räkn.BE14:Räkn.BE14 Räkn.BE15:Räkn.BE115 Räkn.BA15:Räkn.BA115 Räkn.BF14:Räkn.BF14 Räkn.BF15:Räkn.BF115 Räkn.BA15:Räkn.BA115 Räkn.BG14:Räkn.BG14 Räkn.BG15:Räkn.BG115 Räkn.BA15:Räkn.BA115 Räkn.BH14:Räkn.BH14 Räkn.BH15:Räkn.BH115 Räkn.BA15:Räkn.BA115 Räkn.BI14:Räkn.BI14 Räkn.BI15:Räkn.BI115 Räkn.BA15:Räkn.BA115 Räkn.BJ14:Räkn.BJ14 Räkn.BJ15:Räkn.BJ115 Räkn.BA15:Räkn.BA1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4"/>
          <table:table-cell office:value-type="float" office:value="8" calcext:value-type="float">
            <text:p>8</text:p>
          </table:table-cell>
          <table:table-cell table:style-name="Default" table:formula="of:=COUNTIF([.$D$15:.$AO$22];[.BA10])" office:value-type="float" office:value="0" calcext:value-type="float">
            <text:p>0</text:p>
          </table:table-cell>
          <table:table-cell table:style-name="Default" table:formula="of:=COUNTIF([.$D$15:.$AO$22];-1*[.BA10])" office:value-type="float" office:value="0" calcext:value-type="float">
            <text:p>0</text:p>
          </table:table-cell>
          <table:table-cell table:formula="of:=[.BB10]+[.BC10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6"/>
          <table:table-cell table:style-name="ce2" office:value-type="string" calcext:value-type="string">
            <text:p>Nom max volt</text:p>
          </table:table-cell>
          <table:table-cell table:formula="of:=[.BC11]*[.Z5]/[.I5]" office:value-type="float" office:value="94.5493725024384" calcext:value-type="float">
            <text:p>94.5493725024384</text:p>
          </table:table-cell>
          <table:table-cell table:number-columns-repeated="27"/>
          <table:table-cell table:style-name="ce2" office:value-type="string" calcext:value-type="string">
            <text:p>Sum:</text:p>
          </table:table-cell>
          <table:table-cell table:style-name="Default" table:formula="of:=SUM([.BB3:.BC10])" office:value-type="float" office:value="152" calcext:value-type="float">
            <text:p>152</text:p>
          </table:table-cell>
          <table:table-cell table:number-columns-repeated="11"/>
          <table:table-cell table:style-name="Default" table:number-columns-repeated="16318"/>
        </table:table-row>
        <table:table-row table:style-name="ro1">
          <table:table-cell table:number-columns-repeated="7"/>
          <table:table-cell table:style-name="ce2"/>
          <table:table-cell table:number-columns-repeated="45"/>
          <table:table-cell table:style-name="Default" table:number-columns-repeated="2"/>
          <table:table-cell table:number-columns-repeated="11"/>
          <table:table-cell table:style-name="Default" table:number-columns-repeated="16318"/>
        </table:table-row>
        <table:table-row table:style-name="ro1">
          <table:table-cell/>
          <table:table-cell office:value-type="string" calcext:value-type="string">
            <text:p>[rad]</text:p>
          </table:table-cell>
          <table:table-cell table:style-name="ce2" office:value-type="string" calcext:value-type="string">
            <text:p>El.Vinkel</text:p>
          </table:table-cell>
          <table:table-cell table:style-name="ce57" table:formula="of:=[.D14]/Q*[.$S$2]*2*PI()-6.283*INT([.D14]/Q*[.$S$2])" office:value-type="float" office:value="0.330693963535768" calcext:value-type="float">
            <text:p>0.330693963535768</text:p>
          </table:table-cell>
          <table:table-cell table:style-name="ce57" table:formula="of:=[.E14]/Q*[.$S$2]*2*PI()-6.283*INT([.E14]/Q*[.$S$2])" office:value-type="float" office:value="0.661387927071535" calcext:value-type="float">
            <text:p>0.661387927071535</text:p>
          </table:table-cell>
          <table:table-cell table:style-name="ce57" table:formula="of:=[.F14]/Q*[.$S$2]*2*PI()-6.283*INT([.F14]/Q*[.$S$2])" office:value-type="float" office:value="0.992081890607303" calcext:value-type="float">
            <text:p>0.992081890607303</text:p>
          </table:table-cell>
          <table:table-cell table:style-name="ce57" table:formula="of:=[.G14]/Q*[.$S$2]*2*PI()-6.283*INT([.G14]/Q*[.$S$2])" office:value-type="float" office:value="1.32277585414307" calcext:value-type="float">
            <text:p>1.32277585414307</text:p>
          </table:table-cell>
          <table:table-cell table:style-name="ce57" table:formula="of:=[.H14]/Q*[.$S$2]*2*PI()-6.283*INT([.H14]/Q*[.$S$2])" office:value-type="float" office:value="1.65346981767884" calcext:value-type="float">
            <text:p>1.65346981767884</text:p>
          </table:table-cell>
          <table:table-cell table:style-name="ce57" table:formula="of:=[.I14]/Q*[.$S$2]*2*PI()-6.283*INT([.I14]/Q*[.$S$2])" office:value-type="float" office:value="1.98416378121461" calcext:value-type="float">
            <text:p>1.98416378121461</text:p>
          </table:table-cell>
          <table:table-cell table:style-name="ce57" table:formula="of:=[.J14]/Q*[.$S$2]*2*PI()-6.283*INT([.J14]/Q*[.$S$2])" office:value-type="float" office:value="2.31485774475037" calcext:value-type="float">
            <text:p>2.31485774475037</text:p>
          </table:table-cell>
          <table:table-cell table:style-name="ce57" table:formula="of:=[.K14]/Q*[.$S$2]*2*PI()-6.283*INT([.K14]/Q*[.$S$2])" office:value-type="float" office:value="2.64555170828614" calcext:value-type="float">
            <text:p>2.64555170828614</text:p>
          </table:table-cell>
          <table:table-cell table:style-name="ce57" table:formula="of:=[.L14]/Q*[.$S$2]*2*PI()-6.283*INT([.L14]/Q*[.$S$2])" office:value-type="float" office:value="2.97624567182191" calcext:value-type="float">
            <text:p>2.97624567182191</text:p>
          </table:table-cell>
          <table:table-cell table:style-name="ce57" table:formula="of:=[.M14]/Q*[.$S$2]*2*PI()-6.283*INT([.M14]/Q*[.$S$2])" office:value-type="float" office:value="3.30693963535768" calcext:value-type="float">
            <text:p>3.30693963535768</text:p>
          </table:table-cell>
          <table:table-cell table:style-name="ce57" table:formula="of:=[.N14]/Q*[.$S$2]*2*PI()-6.283*INT([.N14]/Q*[.$S$2])" office:value-type="float" office:value="3.63763359889344" calcext:value-type="float">
            <text:p>3.63763359889344</text:p>
          </table:table-cell>
          <table:table-cell table:style-name="ce57" table:formula="of:=[.O14]/Q*[.$S$2]*2*PI()-6.283*INT([.O14]/Q*[.$S$2])" office:value-type="float" office:value="3.96832756242921" calcext:value-type="float">
            <text:p>3.96832756242921</text:p>
          </table:table-cell>
          <table:table-cell table:style-name="ce57" table:formula="of:=[.P14]/Q*[.$S$2]*2*PI()-6.283*INT([.P14]/Q*[.$S$2])" office:value-type="float" office:value="4.29902152596498" calcext:value-type="float">
            <text:p>4.29902152596498</text:p>
          </table:table-cell>
          <table:table-cell table:style-name="ce57" table:formula="of:=[.Q14]/Q*[.$S$2]*2*PI()-6.283*INT([.Q14]/Q*[.$S$2])" office:value-type="float" office:value="4.62971548950075" calcext:value-type="float">
            <text:p>4.62971548950075</text:p>
          </table:table-cell>
          <table:table-cell table:style-name="ce57" table:formula="of:=[.R14]/Q*[.$S$2]*2*PI()-6.283*INT([.R14]/Q*[.$S$2])" office:value-type="float" office:value="4.96040945303652" calcext:value-type="float">
            <text:p>4.96040945303652</text:p>
          </table:table-cell>
          <table:table-cell table:style-name="ce57" table:formula="of:=[.S14]/Q*[.$S$2]*2*PI()-6.283*INT([.S14]/Q*[.$S$2])" office:value-type="float" office:value="5.29110341657228" calcext:value-type="float">
            <text:p>5.29110341657228</text:p>
          </table:table-cell>
          <table:table-cell table:style-name="ce57" table:formula="of:=[.T14]/Q*[.$S$2]*2*PI()-6.283*INT([.T14]/Q*[.$S$2])" office:value-type="float" office:value="5.62179738010805" calcext:value-type="float">
            <text:p>5.62179738010805</text:p>
          </table:table-cell>
          <table:table-cell table:style-name="ce57" table:formula="of:=[.U14]/Q*[.$S$2]*2*PI()-6.283*INT([.U14]/Q*[.$S$2])" office:value-type="float" office:value="5.95249134364382" calcext:value-type="float">
            <text:p>5.95249134364382</text:p>
          </table:table-cell>
          <table:table-cell table:style-name="ce57" table:formula="of:=[.V14]/Q*[.$S$2]*2*PI()-6.283*INT([.V14]/Q*[.$S$2])" office:value-type="float" office:value="0.00018530717958587" calcext:value-type="float">
            <text:p>0.00018530717958587</text:p>
          </table:table-cell>
          <table:table-cell table:style-name="ce57" table:formula="of:=[.W14]/Q*[.$S$2]*2*PI()-6.283*INT([.W14]/Q*[.$S$2])" office:value-type="float" office:value="0.330879270715354" calcext:value-type="float">
            <text:p>0.330879270715354</text:p>
          </table:table-cell>
          <table:table-cell table:style-name="ce57" table:formula="of:=[.X14]/Q*[.$S$2]*2*PI()-6.283*INT([.X14]/Q*[.$S$2])" office:value-type="float" office:value="0.661573234251122" calcext:value-type="float">
            <text:p>0.661573234251122</text:p>
          </table:table-cell>
          <table:table-cell table:style-name="ce57" table:formula="of:=[.Y14]/Q*[.$S$2]*2*PI()-6.283*INT([.Y14]/Q*[.$S$2])" office:value-type="float" office:value="0.992267197786889" calcext:value-type="float">
            <text:p>0.992267197786889</text:p>
          </table:table-cell>
          <table:table-cell table:style-name="ce57" table:formula="of:=[.Z14]/Q*[.$S$2]*2*PI()-6.283*INT([.Z14]/Q*[.$S$2])" office:value-type="float" office:value="1.32296116132266" calcext:value-type="float">
            <text:p>1.32296116132266</text:p>
          </table:table-cell>
          <table:table-cell table:style-name="ce57" table:formula="of:=[.AA14]/Q*[.$S$2]*2*PI()-6.283*INT([.AA14]/Q*[.$S$2])" office:value-type="float" office:value="1.65365512485842" calcext:value-type="float">
            <text:p>1.65365512485842</text:p>
          </table:table-cell>
          <table:table-cell table:style-name="ce57" table:formula="of:=[.AB14]/Q*[.$S$2]*2*PI()-6.283*INT([.AB14]/Q*[.$S$2])" office:value-type="float" office:value="1.98434908839419" calcext:value-type="float">
            <text:p>1.98434908839419</text:p>
          </table:table-cell>
          <table:table-cell table:style-name="ce57" table:formula="of:=[.AC14]/Q*[.$S$2]*2*PI()-6.283*INT([.AC14]/Q*[.$S$2])" office:value-type="float" office:value="2.31504305192996" calcext:value-type="float">
            <text:p>2.31504305192996</text:p>
          </table:table-cell>
          <table:table-cell table:style-name="ce57" table:formula="of:=[.AD14]/Q*[.$S$2]*2*PI()-6.283*INT([.AD14]/Q*[.$S$2])" office:value-type="float" office:value="2.64573701546573" calcext:value-type="float">
            <text:p>2.64573701546573</text:p>
          </table:table-cell>
          <table:table-cell table:style-name="ce57" table:formula="of:=[.AE14]/Q*[.$S$2]*2*PI()-6.283*INT([.AE14]/Q*[.$S$2])" office:value-type="float" office:value="2.97643097900149" calcext:value-type="float">
            <text:p>2.97643097900149</text:p>
          </table:table-cell>
          <table:table-cell table:style-name="ce57" table:formula="of:=[.AF14]/Q*[.$S$2]*2*PI()-6.283*INT([.AF14]/Q*[.$S$2])" office:value-type="float" office:value="3.30712494253726" calcext:value-type="float">
            <text:p>3.30712494253726</text:p>
          </table:table-cell>
          <table:table-cell table:style-name="ce57" table:formula="of:=[.AG14]/Q*[.$S$2]*2*PI()-6.283*INT([.AG14]/Q*[.$S$2])" office:value-type="float" office:value="3.63781890607303" calcext:value-type="float">
            <text:p>3.63781890607303</text:p>
          </table:table-cell>
          <table:table-cell table:style-name="ce57" table:formula="of:=[.AH14]/Q*[.$S$2]*2*PI()-6.283*INT([.AH14]/Q*[.$S$2])" office:value-type="float" office:value="3.9685128696088" calcext:value-type="float">
            <text:p>3.9685128696088</text:p>
          </table:table-cell>
          <table:table-cell table:style-name="ce57" table:formula="of:=[.AI14]/Q*[.$S$2]*2*PI()-6.283*INT([.AI14]/Q*[.$S$2])" office:value-type="float" office:value="4.29920683314457" calcext:value-type="float">
            <text:p>4.29920683314457</text:p>
          </table:table-cell>
          <table:table-cell table:style-name="ce57" table:formula="of:=[.AJ14]/Q*[.$S$2]*2*PI()-6.283*INT([.AJ14]/Q*[.$S$2])" office:value-type="float" office:value="4.62990079668033" calcext:value-type="float">
            <text:p>4.62990079668033</text:p>
          </table:table-cell>
          <table:table-cell table:style-name="ce57" table:formula="of:=[.AK14]/Q*[.$S$2]*2*PI()-6.283*INT([.AK14]/Q*[.$S$2])" office:value-type="float" office:value="4.9605947602161" calcext:value-type="float">
            <text:p>4.9605947602161</text:p>
          </table:table-cell>
          <table:table-cell table:style-name="ce57" table:formula="of:=[.AL14]/Q*[.$S$2]*2*PI()-6.283*INT([.AL14]/Q*[.$S$2])" office:value-type="float" office:value="5.29128872375187" calcext:value-type="float">
            <text:p>5.29128872375187</text:p>
          </table:table-cell>
          <table:table-cell table:style-name="ce57" table:formula="of:=[.AM14]/Q*[.$S$2]*2*PI()-6.283*INT([.AM14]/Q*[.$S$2])" office:value-type="float" office:value="5.62198268728764" calcext:value-type="float">
            <text:p>5.62198268728764</text:p>
          </table:table-cell>
          <table:table-cell table:style-name="ce57" table:formula="of:=[.AN14]/Q*[.$S$2]*2*PI()-6.283*INT([.AN14]/Q*[.$S$2])" office:value-type="float" office:value="5.95267665082341" calcext:value-type="float">
            <text:p>5.95267665082341</text:p>
          </table:table-cell>
          <table:table-cell table:style-name="ce57" table:formula="of:=[.AO14]/Q*[.$S$2]*2*PI()-6.283*INT([.AO14]/Q*[.$S$2])" office:value-type="float" office:value="0.000370614359171739" calcext:value-type="float">
            <text:p>0.000370614359171739</text:p>
          </table:table-cell>
          <table:table-cell table:style-name="ce57" table:formula="of:=[.AP14]/Q*[.$S$2]*2*PI()-6.283*INT([.AP14]/Q*[.$S$2])" office:value-type="float" office:value="0.33106457789494" calcext:value-type="float">
            <text:p>0.33106457789494</text:p>
          </table:table-cell>
          <table:table-cell table:style-name="ce57" table:formula="of:=[.AQ14]/Q*[.$S$2]*2*PI()-6.283*INT([.AQ14]/Q*[.$S$2])" office:value-type="float" office:value="0.661758541430707" calcext:value-type="float">
            <text:p>0.661758541430707</text:p>
          </table:table-cell>
          <table:table-cell table:style-name="ce57" table:formula="of:=[.AR14]/Q*[.$S$2]*2*PI()-6.283*INT([.AR14]/Q*[.$S$2])" office:value-type="float" office:value="0.992452504966476" calcext:value-type="float">
            <text:p>0.992452504966476</text:p>
          </table:table-cell>
          <table:table-cell table:style-name="ce57" table:formula="of:=[.AS14]/Q*[.$S$2]*2*PI()-6.283*INT([.AS14]/Q*[.$S$2])" office:value-type="float" office:value="1.32314646850224" calcext:value-type="float">
            <text:p>1.32314646850224</text:p>
          </table:table-cell>
          <table:table-cell table:style-name="ce57" table:formula="of:=[.AT14]/Q*[.$S$2]*2*PI()-6.283*INT([.AT14]/Q*[.$S$2])" office:value-type="float" office:value="1.65384043203801" calcext:value-type="float">
            <text:p>1.65384043203801</text:p>
          </table:table-cell>
          <table:table-cell table:style-name="ce57" table:formula="of:=[.AU14]/Q*[.$S$2]*2*PI()-6.283*INT([.AU14]/Q*[.$S$2])" office:value-type="float" office:value="1.98453439557378" calcext:value-type="float">
            <text:p>1.98453439557378</text:p>
          </table:table-cell>
          <table:table-cell table:style-name="ce57" table:formula="of:=[.AV14]/Q*[.$S$2]*2*PI()-6.283*INT([.AV14]/Q*[.$S$2])" office:value-type="float" office:value="2.31522835910955" calcext:value-type="float">
            <text:p>2.31522835910955</text:p>
          </table:table-cell>
          <table:table-cell table:style-name="ce57" table:formula="of:=[.AW14]/Q*[.$S$2]*2*PI()-6.283*INT([.AW14]/Q*[.$S$2])" office:value-type="float" office:value="2.64592232264531" calcext:value-type="float">
            <text:p>2.64592232264531</text:p>
          </table:table-cell>
          <table:table-cell table:style-name="ce57" table:formula="of:=[.AX14]/Q*[.$S$2]*2*PI()-6.283*INT([.AX14]/Q*[.$S$2])" office:value-type="float" office:value="2.97661628618108" calcext:value-type="float">
            <text:p>2.97661628618108</text:p>
          </table:table-cell>
          <table:table-cell table:style-name="ce57" table:formula="of:=[.AY14]/Q*[.$S$2]*2*PI()-6.283*INT([.AY14]/Q*[.$S$2])" office:value-type="float" office:value="3.30731024971685" calcext:value-type="float">
            <text:p>3.30731024971685</text:p>
          </table:table-cell>
          <table:table-cell table:number-columns-repeated="2"/>
          <table:table-cell table:style-name="Default" office:value-type="string" calcext:value-type="string">
            <text:p>Brus</text:p>
          </table:table-cell>
          <table:table-cell table:style-name="ce66" table:formula="of:=[.$Z$5]*[.$N$5]*[.BD3]" office:value-type="float" office:value="7.15340647222396" calcext:value-type="float">
            <text:p>7.15</text:p>
          </table:table-cell>
          <table:table-cell table:style-name="ce66" table:formula="of:=[.$Z$5]*[.$N$5]*[.BD4]" office:value-type="float" office:value="5.13179159963893" calcext:value-type="float">
            <text:p>5.13</text:p>
          </table:table-cell>
          <table:table-cell table:style-name="ce66" table:formula="of:=[.$Z$5]*[.$N$5]*[.BD5]" office:value-type="float" office:value="7.77544181763474" calcext:value-type="float">
            <text:p>7.78</text:p>
          </table:table-cell>
          <table:table-cell table:style-name="ce66" table:formula="of:=[.$Z$5]*[.$N$5]*[.BD6]" office:value-type="float" office:value="1.24407069082156" calcext:value-type="float">
            <text:p>1.24</text:p>
          </table:table-cell>
          <table:table-cell table:style-name="ce66" table:formula="of:=[.$Z$5]*[.$N$5]*[.BD7]" office:value-type="float" office:value="2.33263254529042" calcext:value-type="float">
            <text:p>2.33</text:p>
          </table:table-cell>
          <table:table-cell table:style-name="ce66" table:formula="of:=[.$Z$5]*[.$N$5]*[.BD8]" office:value-type="float" office:value="0" calcext:value-type="float">
            <text:p>0.00</text:p>
          </table:table-cell>
          <table:table-cell table:style-name="ce66" table:formula="of:=[.$Z$5]*[.$N$5]*[.BD9]" office:value-type="float" office:value="0" calcext:value-type="float">
            <text:p>0.00</text:p>
          </table:table-cell>
          <table:table-cell table:style-name="ce66" table:formula="of:=[.$Z$5]*[.$N$5]*[.BD10]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 office:value-type="string" calcext:value-type="string">
            <text:p>Pos:\Slot:</text:p>
          </table:table-cell>
          <table:table-cell table:style-name="ce5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/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Vinkel</text:p>
          </table:table-cell>
          <table:table-cell table:style-name="Default" office:value-type="string" calcext:value-type="string">
            <text:p>Fas1</text:p>
          </table:table-cell>
          <table:table-cell office:value-type="string" calcext:value-type="string">
            <text:p>Fas2</text:p>
          </table:table-cell>
          <table:table-cell office:value-type="string" calcext:value-type="string">
            <text:p>Fas3</text:p>
          </table:table-cell>
          <table:table-cell office:value-type="string" calcext:value-type="string">
            <text:p>Fas4</text:p>
          </table:table-cell>
          <table:table-cell office:value-type="string" calcext:value-type="string">
            <text:p>Fas5</text:p>
          </table:table-cell>
          <table:table-cell office:value-type="string" calcext:value-type="string">
            <text:p>Fas6</text:p>
          </table:table-cell>
          <table:table-cell office:value-type="string" calcext:value-type="string">
            <text:p>Fas7</text:p>
          </table:table-cell>
          <table:table-cell office:value-type="string" calcext:value-type="string">
            <text:p>Fas8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3" table:formula="of:=[$Lind.D10]" office:value-type="float" office:value="1" calcext:value-type="float">
            <text:p>1</text:p>
          </table:table-cell>
          <table:table-cell table:style-name="ce38" table:formula="of:=[$Lind.E10]" office:value-type="float" office:value="1" calcext:value-type="float">
            <text:p>1</text:p>
          </table:table-cell>
          <table:table-cell table:style-name="ce38" table:formula="of:=[$Lind.F10]" office:value-type="float" office:value="1" calcext:value-type="float">
            <text:p>1</text:p>
          </table:table-cell>
          <table:table-cell table:style-name="ce38" table:formula="of:=[$Lind.G10]" office:value-type="float" office:value="-3" calcext:value-type="float">
            <text:p>-3</text:p>
          </table:table-cell>
          <table:table-cell table:style-name="ce38" table:formula="of:=[$Lind.H10]" office:value-type="float" office:value="-3" calcext:value-type="float">
            <text:p>-3</text:p>
          </table:table-cell>
          <table:table-cell table:style-name="ce38" table:formula="of:=[$Lind.I10]" office:value-type="float" office:value="2" calcext:value-type="float">
            <text:p>2</text:p>
          </table:table-cell>
          <table:table-cell table:style-name="ce38" table:formula="of:=[$Lind.J10]" office:value-type="float" office:value="2" calcext:value-type="float">
            <text:p>2</text:p>
          </table:table-cell>
          <table:table-cell table:style-name="ce42" table:formula="of:=[$Lind.K10]" office:value-type="float" office:value="2" calcext:value-type="float">
            <text:p>2</text:p>
          </table:table-cell>
          <table:table-cell table:style-name="ce38" table:formula="of:=[$Lind.L10]" office:value-type="float" office:value="-1" calcext:value-type="float">
            <text:p>-1</text:p>
          </table:table-cell>
          <table:table-cell table:style-name="ce38" table:formula="of:=[$Lind.M10]" office:value-type="float" office:value="-1" calcext:value-type="float">
            <text:p>-1</text:p>
          </table:table-cell>
          <table:table-cell table:style-name="ce38" table:formula="of:=[$Lind.N10]" office:value-type="float" office:value="3" calcext:value-type="float">
            <text:p>3</text:p>
          </table:table-cell>
          <table:table-cell table:style-name="ce38" table:formula="of:=[$Lind.O10]" office:value-type="float" office:value="3" calcext:value-type="float">
            <text:p>3</text:p>
          </table:table-cell>
          <table:table-cell table:style-name="ce38" table:formula="of:=[$Lind.P10]" office:value-type="float" office:value="3" calcext:value-type="float">
            <text:p>3</text:p>
          </table:table-cell>
          <table:table-cell table:style-name="ce38" table:formula="of:=[$Lind.Q10]" office:value-type="float" office:value="-2" calcext:value-type="float">
            <text:p>-2</text:p>
          </table:table-cell>
          <table:table-cell table:style-name="ce38" table:formula="of:=[$Lind.R10]" office:value-type="float" office:value="-2" calcext:value-type="float">
            <text:p>-2</text:p>
          </table:table-cell>
          <table:table-cell table:style-name="ce33" table:formula="of:=[$Lind.S10]" office:value-type="float" office:value="1" calcext:value-type="float">
            <text:p>1</text:p>
          </table:table-cell>
          <table:table-cell table:style-name="ce38" table:formula="of:=[$Lind.T10]" office:value-type="float" office:value="1" calcext:value-type="float">
            <text:p>1</text:p>
          </table:table-cell>
          <table:table-cell table:style-name="ce38" table:formula="of:=[$Lind.U10]" office:value-type="float" office:value="1" calcext:value-type="float">
            <text:p>1</text:p>
          </table:table-cell>
          <table:table-cell table:style-name="ce38" table:formula="of:=[$Lind.V10]" office:value-type="float" office:value="-3" calcext:value-type="float">
            <text:p>-3</text:p>
          </table:table-cell>
          <table:table-cell table:style-name="ce38" table:formula="of:=[$Lind.W10]" office:value-type="float" office:value="-3" calcext:value-type="float">
            <text:p>-3</text:p>
          </table:table-cell>
          <table:table-cell table:style-name="ce38" table:formula="of:=[$Lind.X10]" office:value-type="float" office:value="5" calcext:value-type="float">
            <text:p>5</text:p>
          </table:table-cell>
          <table:table-cell table:style-name="ce38" table:formula="of:=[$Lind.Y10]" office:value-type="float" office:value="5" calcext:value-type="float">
            <text:p>5</text:p>
          </table:table-cell>
          <table:table-cell table:style-name="ce38" table:formula="of:=[$Lind.Z10]" office:value-type="float" office:value="2" calcext:value-type="float">
            <text:p>2</text:p>
          </table:table-cell>
          <table:table-cell table:style-name="ce38" table:formula="of:=[$Lind.AA10]" office:value-type="float" office:value="-1" calcext:value-type="float">
            <text:p>-1</text:p>
          </table:table-cell>
          <table:table-cell table:style-name="ce38" table:formula="of:=[$Lind.AB10]" office:value-type="float" office:value="-1" calcext:value-type="float">
            <text:p>-1</text:p>
          </table:table-cell>
          <table:table-cell table:style-name="ce38" table:formula="of:=[$Lind.AC10]" office:value-type="float" office:value="3" calcext:value-type="float">
            <text:p>3</text:p>
          </table:table-cell>
          <table:table-cell table:style-name="ce38" table:formula="of:=[$Lind.AD10]" office:value-type="float" office:value="3" calcext:value-type="float">
            <text:p>3</text:p>
          </table:table-cell>
          <table:table-cell table:style-name="ce38" table:formula="of:=[$Lind.AE10]" office:value-type="float" office:value="3" calcext:value-type="float">
            <text:p>3</text:p>
          </table:table-cell>
          <table:table-cell table:style-name="ce38" table:formula="of:=[$Lind.AF10]" office:value-type="float" office:value="-5" calcext:value-type="float">
            <text:p>-5</text:p>
          </table:table-cell>
          <table:table-cell table:style-name="ce48" table:formula="of:=[$Lind.AG10]" office:value-type="float" office:value="-2" calcext:value-type="float">
            <text:p>-2</text:p>
          </table:table-cell>
          <table:table-cell table:style-name="ce38" table:formula="of:=[$Lind.AH10]" office:value-type="float" office:value="3" calcext:value-type="float">
            <text:p>3</text:p>
          </table:table-cell>
          <table:table-cell table:style-name="ce38" table:formula="of:=[$Lind.AI10]" office:value-type="float" office:value="3" calcext:value-type="float">
            <text:p>3</text:p>
          </table:table-cell>
          <table:table-cell table:style-name="ce38" table:formula="of:=[$Lind.AJ10]" office:value-type="float" office:value="4" calcext:value-type="float">
            <text:p>4</text:p>
          </table:table-cell>
          <table:table-cell table:style-name="ce38" table:formula="of:=[$Lind.AK10]" office:value-type="float" office:value="-2" calcext:value-type="float">
            <text:p>-2</text:p>
          </table:table-cell>
          <table:table-cell table:style-name="ce38" table:formula="of:=[$Lind.AL10]" office:value-type="float" office:value="-2" calcext:value-type="float">
            <text:p>-2</text:p>
          </table:table-cell>
          <table:table-cell table:style-name="ce38" table:formula="of:=[$Lind.AM10]" office:value-type="float" office:value="1" calcext:value-type="float">
            <text:p>1</text:p>
          </table:table-cell>
          <table:table-cell table:style-name="ce38" table:formula="of:=[$Lind.AN10]" office:value-type="float" office:value="-4" calcext:value-type="float">
            <text:p>-4</text:p>
          </table:table-cell>
          <table:table-cell table:style-name="ce38" table:formula="of:=[$Lind.AO10]" office:value-type="float" office:value="1" calcext:value-type="float">
            <text:p>1</text:p>
          </table:table-cell>
          <table:table-cell table:style-name="ce38" table:formula="of:=[$Lind.AP10]" office:value-type="float" office:value="0" calcext:value-type="float">
            <text:p>0</text:p>
          </table:table-cell>
          <table:table-cell table:style-name="ce48" table:formula="of:=[$Lind.AQ10]" office:value-type="float" office:value="0" calcext:value-type="float">
            <text:p>0</text:p>
          </table:table-cell>
          <table:table-cell table:style-name="ce38" table:formula="of:=[$Lind.AR10]" office:value-type="float" office:value="0" calcext:value-type="float">
            <text:p>0</text:p>
          </table:table-cell>
          <table:table-cell table:style-name="ce38" table:formula="of:=[$Lind.AS10]" office:value-type="float" office:value="0" calcext:value-type="float">
            <text:p>0</text:p>
          </table:table-cell>
          <table:table-cell table:style-name="ce38" table:formula="of:=[$Lind.AT10]" office:value-type="float" office:value="0" calcext:value-type="float">
            <text:p>0</text:p>
          </table:table-cell>
          <table:table-cell table:style-name="ce38" table:formula="of:=[$Lind.AU10]" office:value-type="float" office:value="0" calcext:value-type="float">
            <text:p>0</text:p>
          </table:table-cell>
          <table:table-cell table:style-name="ce38" table:formula="of:=[$Lind.AV10]" office:value-type="float" office:value="0" calcext:value-type="float">
            <text:p>0</text:p>
          </table:table-cell>
          <table:table-cell table:style-name="ce38" table:formula="of:=[$Lind.AW10]" office:value-type="float" office:value="0" calcext:value-type="float">
            <text:p>0</text:p>
          </table:table-cell>
          <table:table-cell table:style-name="ce38" table:formula="of:=[$Lind.AX10]" office:value-type="float" office:value="0" calcext:value-type="float">
            <text:p>0</text:p>
          </table:table-cell>
          <table:table-cell table:style-name="ce38" table:formula="of:=[$Lind.AY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A15]*[.$D$6]" office:value-type="float" office:value="0" calcext:value-type="float">
            <text:p>0.000</text:p>
          </table:table-cell>
          <table:table-cell table:formula="of:=[.D$25]*[.$Z$5]*MAGNET([.D$24]+[.BB15])+[.E$25]*[.$Z$5]*MAGNET([.E$24]+[.BB15])+[.F$25]*[.$Z$5]*MAGNET([.F$24]+[.BB15])+[.G$25]*[.$Z$5]*MAGNET([.G$24]+[.BB15])+[.H$25]*[.$Z$5]*MAGNET([.H$24]+[.BB15])+[.I$25]*[.$Z$5]*MAGNET([.I$24]+[.BB15])+[.J$25]*[.$Z$5]*MAGNET([.J$24]+[.BB15])+[.K$25]*[.$Z$5]*MAGNET([.K$24]+[.BB15])+[.L$25]*[.$Z$5]*MAGNET([.L$24]+[.BB15])+[.M$25]*[.$Z$5]*MAGNET([.M$24]+[.BB15])+[.N$25]*[.$Z$5]*MAGNET([.N$24]+[.BB15])+[.O$25]*[.$Z$5]*MAGNET([.O$24]+[.BB15])+[.P$25]*[.$Z$5]*MAGNET([.P$24]+[.BB15])+[.Q$25]*[.$Z$5]*MAGNET([.Q$24]+[.BB15])+[.R$25]*[.$Z$5]*MAGNET([.R$24]+[.BB15])+[.S$25]*[.$Z$5]*MAGNET([.S$24]+[.BB15])+[.T$25]*[.$Z$5]*MAGNET([.T$24]+[.BB15])+[.U$25]*[.$Z$5]*MAGNET([.U$24]+[.BB15])+[.V$25]*[.$Z$5]*MAGNET([.V$24]+[.BB15])+[.W$25]*[.$Z$5]*MAGNET([.W$24]+[.BB15])+[.X$25]*[.$Z$5]*MAGNET([.X$24]+[.BB15])+[.Y$25]*[.$Z$5]*MAGNET([.Y$24]+[.BB15])+[.Z$25]*[.$Z$5]*MAGNET([.Z$24]+[.BB15])+[.AA$25]*[.$Z$5]*MAGNET([.AA$24]+[.BB15])+[.AB$25]*[.$Z$5]*MAGNET([.AB$24]+[.BB15])+[.AC$25]*[.$Z$5]*MAGNET([.AC$24]+[.BB15])+[.AD$25]*[.$Z$5]*MAGNET([.AD$24]+[.BB15])+[.AE$25]*[.$Z$5]*MAGNET([.AE$24]+[.BB15])+[.AF$25]*[.$Z$5]*MAGNET([.AF$24]+[.BB15])+[.AG$25]*[.$Z$5]*MAGNET([.AG$24]+[.BB15])+[.AH$25]*[.$Z$5]*MAGNET([.AH$24]+[.BB15]) +[.AI$25]*[.$Z$5]*MAGNET([.AI$24]+[.BB15]) +[.AJ$25]*[.$Z$5]*MAGNET([.AJ$24]+[.BB15]) +[.AK$25]*[.$Z$5]*MAGNET([.AK$24]+[.BB15]) +[.AL$25]*[.$Z$5]*MAGNET([.AL$24]+[.BB15]) +[.AM$25]*[.$Z$5]*MAGNET([.AM$24]+[.BB15]) +[.AN$25]*[.$Z$5]*MAGNET([.AN$24]+[.BB15]) +[.AO$25]*[.$Z$5]*MAGNET([.AO$24]+[.BB15])+RAND()*[.$BC$13]+[.AP$25]*[.$Z$5]*MAGNET([.AP$24]+[.BB15])&#10;+[.AQ$25]*[.$Z$5]*MAGNET([.AQ$24]+[.BB15])&#10;+[.AR$25]*[.$Z$5]*MAGNET([.AR$24]+[.BB15])&#10;+[.AS$25]*[.$Z$5]*MAGNET([.AS$24]+[.BB15])&#10;+[.AT$25]*[.$Z$5]*MAGNET([.AT$24]+[.BB15])&#10;+[.AU$25]*[.$Z$5]*MAGNET([.AU$24]+[.BB15])&#10;+[.AV$25]*[.$Z$5]*MAGNET([.AV$24]+[.BB15])&#10;+[.AW$25]*[.$Z$5]*MAGNET([.AW$24]+[.BB15])&#10;+[.AX$25]*[.$Z$5]*MAGNET([.AX$24]+[.BB15])&#10;+[.AY$25]*[.$Z$5]*MAGNET([.AY$24]+[.BB15])" office:value-type="float" office:value="-41.4928986897632" calcext:value-type="float">
            <text:p>-41.49</text:p>
          </table:table-cell>
          <table:table-cell table:style-name="ce70" table:formula="of:=[.E$26]*[.$Z$5]*MAGNET([.E$24]+[.$BB15])+[.F$26]*[.$Z$5]*MAGNET([.F$24]+[.$BB15])+[.G$26]*[.$Z$5]*MAGNET([.G$24]+[.$BB15])+[.H$26]*[.$Z$5]*MAGNET([.H$24]+[.$BB15])+[.I$26]*[.$Z$5]*MAGNET([.I$24]+[.$BB15])+[.J$26]*[.$Z$5]*MAGNET([.J$24]+[.$BB15])+[.K$26]*[.$Z$5]*MAGNET([.K$24]+[.$BB15])+[.L$26]*[.$Z$5]*MAGNET([.L$24]+[.$BB15])+[.M$26]*[.$Z$5]*MAGNET([.M$24]+[.$BB15])+[.N$26]*[.$Z$5]*MAGNET([.N$24]+[.$BB15])+[.O$26]*[.$Z$5]*MAGNET([.O$24]+[.$BB15])+[.P$26]*[.$Z$5]*MAGNET([.P$24]+[.$BB15])+[.Q$26]*[.$Z$5]*MAGNET([.Q$24]+[.$BB15])+[.R$26]*[.$Z$5]*MAGNET([.R$24]+[.$BB15])+[.S$26]*[.$Z$5]*MAGNET([.S$24]+[.$BB15])+[.T$26]*[.$Z$5]*MAGNET([.T$24]+[.$BB15])+[.U$26]*[.$Z$5]*MAGNET([.U$24]+[.$BB15])+[.V$26]*[.$Z$5]*MAGNET([.V$24]+[.$BB15])+[.W$26]*[.$Z$5]*MAGNET([.W$24]+[.$BB15])+[.X$26]*[.$Z$5]*MAGNET([.X$24]+[.$BB15])+[.Y$26]*[.$Z$5]*MAGNET([.Y$24]+[.$BB15])+[.Z$26]*[.$Z$5]*MAGNET([.Z$24]+[.$BB15])+[.AA$26]*[.$Z$5]*MAGNET([.AA$24]+[.$BB15])+[.AB$26]*[.$Z$5]*MAGNET([.AB$24]+[.$BB15])+[.AC$26]*[.$Z$5]*MAGNET([.AC$24]+[.$BB15])+[.AD$26]*[.$Z$5]*MAGNET([.AD$24]+[.$BB15])+[.AE$26]*[.$Z$5]*MAGNET([.AE$24]+[.$BB15])+[.AF$26]*[.$Z$5]*MAGNET([.AF$24]+[.$BB15])+[.AG$26]*[.$Z$5]*MAGNET([.AG$24]+[.$BB15])+[.D$26]*[.$Z$5]*MAGNET([.D$24]+[.$BB15])+[.AH$26]*[.$Z$5]*MAGNET([.AH$24]+[.BB15]) +[.AI$26]*[.$Z$5]*MAGNET([.AI$24]+[.BB15]) +[.AJ$26]*[.$Z$5]*MAGNET([.AJ$24]+[.BB15]) +[.AK$26]*[.$Z$5]*MAGNET([.AK$24]+[.BB15]) +[.AL$26]*[.$Z$5]*MAGNET([.AL$24]+[.BB15]) +[.AM$26]*[.$Z$5]*MAGNET([.AM$24]+[.BB15]) +[.AN$26]*[.$Z$5]*MAGNET([.AN$24]+[.BB15]) +[.AO$26]*[.$Z$5]*MAGNET([.AO$24]+[.BB15]) +[.AP$26]*[.$Z$5]*MAGNET([.AP$24]+[.$BB15])&#10;+[.AQ$26]*[.$Z$5]*MAGNET([.AQ$24]+[.$BB15])&#10;+[.AR$26]*[.$Z$5]*MAGNET([.AR$24]+[.$BB15])&#10;+[.AS$26]*[.$Z$5]*MAGNET([.AS$24]+[.$BB15])&#10;+[.AT$26]*[.$Z$5]*MAGNET([.AT$24]+[.$BB15])&#10;+[.AU$26]*[.$Z$5]*MAGNET([.AU$24]+[.$BB15])&#10;+[.AV$26]*[.$Z$5]*MAGNET([.AV$24]+[.$BB15])&#10;+[.AW$26]*[.$Z$5]*MAGNET([.AW$24]+[.$BB15])&#10;+[.AX$26]*[.$Z$5]*MAGNET([.AX$24]+[.$BB15])&#10;+[.AY$26]*[.$Z$5]*MAGNET([.AY$24]+[.$BB15]) +RAND()*[.$BD$13]" office:value-type="float" office:value="91.120865027906" calcext:value-type="float">
            <text:p>91.12</text:p>
          </table:table-cell>
          <table:table-cell table:style-name="ce71" table:formula="of:=[.E$27]*[.$Z$5]*MAGNET([.E$24]+[.$BB15])+[.F$27]*[.$Z$5]*MAGNET([.F$24]+[.$BB15])+[.G$27]*[.$Z$5]*MAGNET([.G$24]+[.$BB15])+[.H$27]*[.$Z$5]*MAGNET([.H$24]+[.$BB15])+[.I$27]*[.$Z$5]*MAGNET([.I$24]+[.$BB15])+[.J$27]*[.$Z$5]*MAGNET([.J$24]+[.$BB15])+[.K$27]*[.$Z$5]*MAGNET([.K$24]+[.$BB15])+[.L$27]*[.$Z$5]*MAGNET([.L$24]+[.$BB15])+[.M$27]*[.$Z$5]*MAGNET([.M$24]+[.$BB15])+[.N$27]*[.$Z$5]*MAGNET([.N$24]+[.$BB15])+[.O$27]*[.$Z$5]*MAGNET([.O$24]+[.$BB15])+[.P$27]*[.$Z$5]*MAGNET([.P$24]+[.$BB15])+[.Q$27]*[.$Z$5]*MAGNET([.Q$24]+[.$BB15])+[.R$27]*[.$Z$5]*MAGNET([.R$24]+[.$BB15])+[.S$27]*[.$Z$5]*MAGNET([.S$24]+[.$BB15])+[.T$27]*[.$Z$5]*MAGNET([.T$24]+[.$BB15])+[.U$27]*[.$Z$5]*MAGNET([.U$24]+[.$BB15])+[.V$27]*[.$Z$5]*MAGNET([.V$24]+[.$BB15])+[.W$27]*[.$Z$5]*MAGNET([.W$24]+[.$BB15])+[.X$27]*[.$Z$5]*MAGNET([.X$24]+[.$BB15])+[.Y$27]*[.$Z$5]*MAGNET([.Y$24]+[.$BB15])+[.Z$27]*[.$Z$5]*MAGNET([.Z$24]+[.$BB15])+[.AA$27]*[.$Z$5]*MAGNET([.AA$24]+[.$BB15])+[.AB$27]*[.$Z$5]*MAGNET([.AB$24]+[.$BB15])+[.AC$27]*[.$Z$5]*MAGNET([.AC$24]+[.$BB15])+[.AD$27]*[.$Z$5]*MAGNET([.AD$24]+[.$BB15])+[.AE$27]*[.$Z$5]*MAGNET([.AE$24]+[.$BB15])+[.AF$27]*[.$Z$5]*MAGNET([.AF$24]+[.$BB15])+[.AG$27]*[.$Z$5]*MAGNET([.AG$24]+[.$BB15])+[.D$27]*[.$Z$5]*MAGNET([.D$24]+[.$BB15])+[.AH$27]*[.$Z$5]*MAGNET([.AH$24]+[.BB15]) +[.AI$27]*[.$Z$5]*MAGNET([.AI$24]+[.BB15]) +[.AJ$27]*[.$Z$5]*MAGNET([.AJ$24]+[.BB15]) +[.AK$27]*[.$Z$5]*MAGNET([.AK$24]+[.BB15]) +[.AL$27]*[.$Z$5]*MAGNET([.AL$24]+[.BB15]) +[.AM$27]*[.$Z$5]*MAGNET([.AM$24]+[.BB15]) +[.AN$27]*[.$Z$5]*MAGNET([.AN$24]+[.BB15]) +[.AO$27]*[.$Z$5]*MAGNET([.AO$24]+[.BB15]) +[.AP$27]*[.$Z$5]*MAGNET([.AP$24]+[.$BB15])&#10;+[.AQ$27]*[.$Z$5]*MAGNET([.AQ$24]+[.$BB15])&#10;+[.AR$27]*[.$Z$5]*MAGNET([.AR$24]+[.$BB15])&#10;+[.AS$27]*[.$Z$5]*MAGNET([.AS$24]+[.$BB15])&#10;+[.AT$27]*[.$Z$5]*MAGNET([.AT$24]+[.$BB15])&#10;+[.AU$27]*[.$Z$5]*MAGNET([.AU$24]+[.$BB15])&#10;+[.AV$27]*[.$Z$5]*MAGNET([.AV$24]+[.$BB15])&#10;+[.AW$27]*[.$Z$5]*MAGNET([.AW$24]+[.$BB15])&#10;+[.AX$27]*[.$Z$5]*MAGNET([.AX$24]+[.$BB15])&#10;+[.AY$27]*[.$Z$5]*MAGNET([.AY$24]+[.$BB15]) +RAND()*[.$BE$13]" office:value-type="float" office:value="-59.6695333751859" calcext:value-type="float">
            <text:p>-59.6695333751859</text:p>
          </table:table-cell>
          <table:table-cell table:style-name="ce71" table:formula="of:=[.E$28]*[.$Z$5]*MAGNET([.E$24]+[.$BB15])+[.F$28]*[.$Z$5]*MAGNET([.F$24]+[.$BB15])+[.G$28]*[.$Z$5]*MAGNET([.G$24]+[.$BB15])+[.H$28]*[.$Z$5]*MAGNET([.H$24]+[.$BB15])+[.I$28]*[.$Z$5]*MAGNET([.I$24]+[.$BB15])+[.J$28]*[.$Z$5]*MAGNET([.J$24]+[.$BB15])+[.K$28]*[.$Z$5]*MAGNET([.K$24]+[.$BB15])+[.L$28]*[.$Z$5]*MAGNET([.L$24]+[.$BB15])+[.M$28]*[.$Z$5]*MAGNET([.M$24]+[.$BB15])+[.N$28]*[.$Z$5]*MAGNET([.N$24]+[.$BB15])+[.O$28]*[.$Z$5]*MAGNET([.O$24]+[.$BB15])+[.P$28]*[.$Z$5]*MAGNET([.P$24]+[.$BB15])+[.Q$28]*[.$Z$5]*MAGNET([.Q$24]+[.$BB15])+[.R$28]*[.$Z$5]*MAGNET([.R$24]+[.$BB15])+[.S$28]*[.$Z$5]*MAGNET([.S$24]+[.$BB15])+[.T$28]*[.$Z$5]*MAGNET([.T$24]+[.$BB15])+[.U$28]*[.$Z$5]*MAGNET([.U$24]+[.$BB15])+[.V$28]*[.$Z$5]*MAGNET([.V$24]+[.$BB15])+[.W$28]*[.$Z$5]*MAGNET([.W$24]+[.$BB15])+[.X$28]*[.$Z$5]*MAGNET([.X$24]+[.$BB15])+[.Y$28]*[.$Z$5]*MAGNET([.Y$24]+[.$BB15])+[.Z$28]*[.$Z$5]*MAGNET([.Z$24]+[.$BB15])+[.AA$28]*[.$Z$5]*MAGNET([.AA$24]+[.$BB15])+[.AB$28]*[.$Z$5]*MAGNET([.AB$24]+[.$BB15])+[.AC$28]*[.$Z$5]*MAGNET([.AC$24]+[.$BB15])+[.AD$28]*[.$Z$5]*MAGNET([.AD$24]+[.$BB15])+[.AE$28]*[.$Z$5]*MAGNET([.AE$24]+[.$BB15])+[.AF$28]*[.$Z$5]*MAGNET([.AF$24]+[.$BB15])+[.AG$28]*[.$Z$5]*MAGNET([.AG$24]+[.$BB15])+[.D$28]*[.$Z$5]*MAGNET([.D$24]+[.$BB15])+[.AH$28]*[.$Z$5]*MAGNET([.AH$24]+[.BB15]) +[.AI$28]*[.$Z$5]*MAGNET([.AI$24]+[.BB15]) +[.AJ$28]*[.$Z$5]*MAGNET([.AJ$24]+[.BB15]) +[.AK$28]*[.$Z$5]*MAGNET([.AK$24]+[.BB15]) +[.AL$28]*[.$Z$5]*MAGNET([.AL$24]+[.BB15]) +[.AM$28]*[.$Z$5]*MAGNET([.AM$24]+[.BB15]) +[.AN$28]*[.$Z$5]*MAGNET([.AN$24]+[.BB15]) +[.AO$28]*[.$Z$5]*MAGNET([.AO$24]+[.BB15]) +[.AP$28]*[.$Z$5]*MAGNET([.AP$24]+[.$BB15])&#10;+[.AQ$28]*[.$Z$5]*MAGNET([.AQ$24]+[.$BB15])&#10;+[.AR$28]*[.$Z$5]*MAGNET([.AR$24]+[.$BB15])&#10;+[.AS$28]*[.$Z$5]*MAGNET([.AS$24]+[.$BB15])&#10;+[.AT$28]*[.$Z$5]*MAGNET([.AT$24]+[.$BB15])&#10;+[.AU$28]*[.$Z$5]*MAGNET([.AU$24]+[.$BB15])&#10;+[.AV$28]*[.$Z$5]*MAGNET([.AV$24]+[.$BB15])&#10;+[.AW$28]*[.$Z$5]*MAGNET([.AW$24]+[.$BB15])&#10;+[.AX$28]*[.$Z$5]*MAGNET([.AX$24]+[.$BB15])&#10;+[.AY$28]*[.$Z$5]*MAGNET([.AY$24]+[.$BB15]) +RAND()*[.$BF$13]" office:value-type="float" office:value="-6.84910080804758" calcext:value-type="float">
            <text:p>-6.84910080804758</text:p>
          </table:table-cell>
          <table:table-cell table:style-name="ce71" table:formula="of:=[.E$29]*[.$Z$5]*MAGNET([.E$24]+[.$BB15])+[.F$29]*[.$Z$5]*MAGNET([.F$24]+[.$BB15])+[.G$29]*[.$Z$5]*MAGNET([.G$24]+[.$BB15])+[.H$29]*[.$Z$5]*MAGNET([.H$24]+[.$BB15])+[.I$29]*[.$Z$5]*MAGNET([.I$24]+[.$BB15])+[.J$29]*[.$Z$5]*MAGNET([.J$24]+[.$BB15])+[.K$29]*[.$Z$5]*MAGNET([.K$24]+[.$BB15])+[.L$29]*[.$Z$5]*MAGNET([.L$24]+[.$BB15])+[.M$29]*[.$Z$5]*MAGNET([.M$24]+[.$BB15])+[.N$29]*[.$Z$5]*MAGNET([.N$24]+[.$BB15])+[.O$29]*[.$Z$5]*MAGNET([.O$24]+[.$BB15])+[.P$29]*[.$Z$5]*MAGNET([.P$24]+[.$BB15])+[.Q$29]*[.$Z$5]*MAGNET([.Q$24]+[.$BB15])+[.R$29]*[.$Z$5]*MAGNET([.R$24]+[.$BB15])+[.S$29]*[.$Z$5]*MAGNET([.S$24]+[.$BB15])+[.T$29]*[.$Z$5]*MAGNET([.T$24]+[.$BB15])+[.U$29]*[.$Z$5]*MAGNET([.U$24]+[.$BB15])+[.V$29]*[.$Z$5]*MAGNET([.V$24]+[.$BB15])+[.W$29]*[.$Z$5]*MAGNET([.W$24]+[.$BB15])+[.X$29]*[.$Z$5]*MAGNET([.X$24]+[.$BB15])+[.Y$29]*[.$Z$5]*MAGNET([.Y$24]+[.$BB15])+[.Z$29]*[.$Z$5]*MAGNET([.Z$24]+[.$BB15])+[.AA$29]*[.$Z$5]*MAGNET([.AA$24]+[.$BB15])+[.AB$29]*[.$Z$5]*MAGNET([.AB$24]+[.$BB15])+[.AC$29]*[.$Z$5]*MAGNET([.AC$24]+[.$BB15])+[.AD$29]*[.$Z$5]*MAGNET([.AD$24]+[.$BB15])+[.AE$29]*[.$Z$5]*MAGNET([.AE$24]+[.$BB15])+[.AF$29]*[.$Z$5]*MAGNET([.AF$24]+[.$BB15])+[.AG$29]*[.$Z$5]*MAGNET([.AG$24]+[.$BB15])+[.D$29]*[.$Z$5]*MAGNET([.D$24]+[.$BB15])+[.AH$29]*[.$Z$5]*MAGNET([.AH$24]+[.BB15]) +[.AI$29]*[.$Z$5]*MAGNET([.AI$24]+[.BB15]) +[.AJ$29]*[.$Z$5]*MAGNET([.AJ$24]+[.BB15]) +[.AK$29]*[.$Z$5]*MAGNET([.AK$24]+[.BB15]) +[.AL$29]*[.$Z$5]*MAGNET([.AL$24]+[.BB15]) +[.AM$29]*[.$Z$5]*MAGNET([.AM$24]+[.BB15]) +[.AN$29]*[.$Z$5]*MAGNET([.AN$24]+[.BB15]) +[.AO$29]*[.$Z$5]*MAGNET([.AO$24]+[.BB15]) +[.AP$29]*[.$Z$5]*MAGNET([.AP$24]+[.$BB15])&#10;+[.AQ$29]*[.$Z$5]*MAGNET([.AQ$24]+[.$BB15])&#10;+[.AR$29]*[.$Z$5]*MAGNET([.AR$24]+[.$BB15])&#10;+[.AS$29]*[.$Z$5]*MAGNET([.AS$24]+[.$BB15])&#10;+[.AT$29]*[.$Z$5]*MAGNET([.AT$24]+[.$BB15])&#10;+[.AU$29]*[.$Z$5]*MAGNET([.AU$24]+[.$BB15])&#10;+[.AV$29]*[.$Z$5]*MAGNET([.AV$24]+[.$BB15])&#10;+[.AW$29]*[.$Z$5]*MAGNET([.AW$24]+[.$BB15])&#10;+[.AX$29]*[.$Z$5]*MAGNET([.AX$24]+[.$BB15])&#10;+[.AY$29]*[.$Z$5]*MAGNET([.AY$24]+[.$BB15]) +RAND()*[.$BG$13]" office:value-type="float" office:value="29.7256726327204" calcext:value-type="float">
            <text:p>29.7256726327204</text:p>
          </table:table-cell>
          <table:table-cell table:style-name="ce71" table:formula="of:=[.E$30]*[.$Z$5]*MAGNET([.E$24]+[.$BB15])+[.F$30]*[.$Z$5]*MAGNET([.F$24]+[.$BB15])+[.G$30]*[.$Z$5]*MAGNET([.G$24]+[.$BB15])+[.H$30]*[.$Z$5]*MAGNET([.H$24]+[.$BB15])+[.I$30]*[.$Z$5]*MAGNET([.I$24]+[.$BB15])+[.J$30]*[.$Z$5]*MAGNET([.J$24]+[.$BB15])+[.K$30]*[.$Z$5]*MAGNET([.K$24]+[.$BB15])+[.L$30]*[.$Z$5]*MAGNET([.L$24]+[.$BB15])+[.M$30]*[.$Z$5]*MAGNET([.M$24]+[.$BB15])+[.N$30]*[.$Z$5]*MAGNET([.N$24]+[.$BB15])+[.O$30]*[.$Z$5]*MAGNET([.O$24]+[.$BB15])+[.P$30]*[.$Z$5]*MAGNET([.P$24]+[.$BB15])+[.Q$30]*[.$Z$5]*MAGNET([.Q$24]+[.$BB15])+[.R$30]*[.$Z$5]*MAGNET([.R$24]+[.$BB15])+[.S$30]*[.$Z$5]*MAGNET([.S$24]+[.$BB15])+[.T$30]*[.$Z$5]*MAGNET([.T$24]+[.$BB15])+[.U$30]*[.$Z$5]*MAGNET([.U$24]+[.$BB15])+[.V$30]*[.$Z$5]*MAGNET([.V$24]+[.$BB15])+[.W$30]*[.$Z$5]*MAGNET([.W$24]+[.$BB15])+[.X$30]*[.$Z$5]*MAGNET([.X$24]+[.$BB15])+[.Y$30]*[.$Z$5]*MAGNET([.Y$24]+[.$BB15])+[.Z$30]*[.$Z$5]*MAGNET([.Z$24]+[.$BB15])+[.AA$30]*[.$Z$5]*MAGNET([.AA$24]+[.$BB15])+[.AB$30]*[.$Z$5]*MAGNET([.AB$24]+[.$BB15])+[.AC$30]*[.$Z$5]*MAGNET([.AC$24]+[.$BB15])+[.AD$30]*[.$Z$5]*MAGNET([.AD$24]+[.$BB15])+[.AE$30]*[.$Z$5]*MAGNET([.AE$24]+[.$BB15])+[.AF$30]*[.$Z$5]*MAGNET([.AF$24]+[.$BB15])+[.AG$30]*[.$Z$5]*MAGNET([.AG$24]+[.$BB15])+[.D$30]*[.$Z$5]*MAGNET([.D$24]+[.$BB15])+[.AH$30]*[.$Z$5]*MAGNET([.AH$24]+[.BB15]) +[.AI$30]*[.$Z$5]*MAGNET([.AI$24]+[.BB15]) +[.AJ$30]*[.$Z$5]*MAGNET([.AJ$24]+[.BB15]) +[.AK$30]*[.$Z$5]*MAGNET([.AK$24]+[.BB15]) +[.AL$30]*[.$Z$5]*MAGNET([.AL$24]+[.BB15]) +[.AM$30]*[.$Z$5]*MAGNET([.AM$24]+[.BB15]) +[.AN$30]*[.$Z$5]*MAGNET([.AN$24]+[.BB15]) +[.AO$30]*[.$Z$5]*MAGNET([.AO$24]+[.BB15]) +[.AP$30]*[.$Z$5]*MAGNET([.AP$24]+[.$BB15])&#10;+[.AQ$30]*[.$Z$5]*MAGNET([.AQ$24]+[.$BB15])&#10;+[.AR$30]*[.$Z$5]*MAGNET([.AR$24]+[.$BB15])&#10;+[.AS$30]*[.$Z$5]*MAGNET([.AS$24]+[.$BB15])&#10;+[.AT$30]*[.$Z$5]*MAGNET([.AT$24]+[.$BB15])&#10;+[.AU$30]*[.$Z$5]*MAGNET([.AU$24]+[.$BB15])&#10;+[.AV$30]*[.$Z$5]*MAGNET([.AV$24]+[.$BB15])&#10;+[.AW$30]*[.$Z$5]*MAGNET([.AW$24]+[.$BB15])&#10;+[.AX$30]*[.$Z$5]*MAGNET([.AX$24]+[.$BB15])&#10;+[.AY$30]*[.$Z$5]*MAGNET([.AY$24]+[.$BB15]) +RAND()*[.$BH$13]" office:value-type="float" office:value="0" calcext:value-type="float">
            <text:p>0</text:p>
          </table:table-cell>
          <table:table-cell table:style-name="ce71" table:formula="of:=[.E$31]*[.$Z$5]*MAGNET([.E$24]+[.$BB15])+[.F$31]*[.$Z$5]*MAGNET([.F$24]+[.$BB15])+[.G$31]*[.$Z$5]*MAGNET([.G$24]+[.$BB15])+[.H$31]*[.$Z$5]*MAGNET([.H$24]+[.$BB15])+[.I$31]*[.$Z$5]*MAGNET([.I$24]+[.$BB15])+[.J$31]*[.$Z$5]*MAGNET([.J$24]+[.$BB15])+[.K$31]*[.$Z$5]*MAGNET([.K$24]+[.$BB15])+[.L$31]*[.$Z$5]*MAGNET([.L$24]+[.$BB15])+[.M$31]*[.$Z$5]*MAGNET([.M$24]+[.$BB15])+[.N$31]*[.$Z$5]*MAGNET([.N$24]+[.$BB15])+[.O$31]*[.$Z$5]*MAGNET([.O$24]+[.$BB15])+[.P$31]*[.$Z$5]*MAGNET([.P$24]+[.$BB15])+[.Q$31]*[.$Z$5]*MAGNET([.Q$24]+[.$BB15])+[.R$31]*[.$Z$5]*MAGNET([.R$24]+[.$BB15])+[.S$31]*[.$Z$5]*MAGNET([.S$24]+[.$BB15])+[.T$31]*[.$Z$5]*MAGNET([.T$24]+[.$BB15])+[.U$31]*[.$Z$5]*MAGNET([.U$24]+[.$BB15])+[.V$31]*[.$Z$5]*MAGNET([.V$24]+[.$BB15])+[.W$31]*[.$Z$5]*MAGNET([.W$24]+[.$BB15])+[.X$31]*[.$Z$5]*MAGNET([.X$24]+[.$BB15])+[.Y$31]*[.$Z$5]*MAGNET([.Y$24]+[.$BB15])+[.Z$31]*[.$Z$5]*MAGNET([.Z$24]+[.$BB15])+[.AA$31]*[.$Z$5]*MAGNET([.AA$24]+[.$BB15])+[.AB$31]*[.$Z$5]*MAGNET([.AB$24]+[.$BB15])+[.AC$31]*[.$Z$5]*MAGNET([.AC$24]+[.$BB15])+[.AD$31]*[.$Z$5]*MAGNET([.AD$24]+[.$BB15])+[.AE$31]*[.$Z$5]*MAGNET([.AE$24]+[.$BB15])+[.AF$31]*[.$Z$5]*MAGNET([.AF$24]+[.$BB15])+[.AG$31]*[.$Z$5]*MAGNET([.AG$24]+[.$BB15])+[.D$31]*[.$Z$5]*MAGNET([.D$24]+[.$BB15])+[.AH$31]*[.$Z$5]*MAGNET([.AH$24]+[.BB15]) +[.AI$31]*[.$Z$5]*MAGNET([.AI$24]+[.BB15]) +[.AJ$31]*[.$Z$5]*MAGNET([.AJ$24]+[.BB15]) +[.AK$31]*[.$Z$5]*MAGNET([.AK$24]+[.BB15]) +[.AL$31]*[.$Z$5]*MAGNET([.AL$24]+[.BB15]) +[.AM$31]*[.$Z$5]*MAGNET([.AM$24]+[.BB15]) +[.AN$31]*[.$Z$5]*MAGNET([.AN$24]+[.BB15]) +[.AO$31]*[.$Z$5]*MAGNET([.AO$24]+[.BB15]) +[.AP$31]*[.$Z$5]*MAGNET([.AP$24]+[.$BB15])&#10;+[.AQ$31]*[.$Z$5]*MAGNET([.AQ$24]+[.$BB15])&#10;+[.AR$31]*[.$Z$5]*MAGNET([.AR$24]+[.$BB15])&#10;+[.AS$31]*[.$Z$5]*MAGNET([.AS$24]+[.$BB15])&#10;+[.AT$31]*[.$Z$5]*MAGNET([.AT$24]+[.$BB15])&#10;+[.AU$31]*[.$Z$5]*MAGNET([.AU$24]+[.$BB15])&#10;+[.AV$31]*[.$Z$5]*MAGNET([.AV$24]+[.$BB15])&#10;+[.AW$31]*[.$Z$5]*MAGNET([.AW$24]+[.$BB15])&#10;+[.AX$31]*[.$Z$5]*MAGNET([.AX$24]+[.$BB15])&#10;+[.AY$31]*[.$Z$5]*MAGNET([.AY$24]+[.$BB15]) +RAND()*[.$BI$13]" office:value-type="float" office:value="0" calcext:value-type="float">
            <text:p>0</text:p>
          </table:table-cell>
          <table:table-cell table:style-name="ce71" table:formula="of:=[.E$32]*[.$Z$5]*MAGNET([.E$24]+[.$BB15])+[.F$32]*[.$Z$5]*MAGNET([.F$24]+[.$BB15])+[.G$32]*[.$Z$5]*MAGNET([.G$24]+[.$BB15])+[.H$32]*[.$Z$5]*MAGNET([.H$24]+[.$BB15])+[.I$32]*[.$Z$5]*MAGNET([.I$24]+[.$BB15])+[.J$32]*[.$Z$5]*MAGNET([.J$24]+[.$BB15])+[.K$32]*[.$Z$5]*MAGNET([.K$24]+[.$BB15])+[.L$32]*[.$Z$5]*MAGNET([.L$24]+[.$BB15])+[.M$32]*[.$Z$5]*MAGNET([.M$24]+[.$BB15])+[.N$32]*[.$Z$5]*MAGNET([.N$24]+[.$BB15])+[.O$32]*[.$Z$5]*MAGNET([.O$24]+[.$BB15])+[.P$32]*[.$Z$5]*MAGNET([.P$24]+[.$BB15])+[.Q$32]*[.$Z$5]*MAGNET([.Q$24]+[.$BB15])+[.R$32]*[.$Z$5]*MAGNET([.R$24]+[.$BB15])+[.S$32]*[.$Z$5]*MAGNET([.S$24]+[.$BB15])+[.T$32]*[.$Z$5]*MAGNET([.T$24]+[.$BB15])+[.U$32]*[.$Z$5]*MAGNET([.U$24]+[.$BB15])+[.V$32]*[.$Z$5]*MAGNET([.V$24]+[.$BB15])+[.W$32]*[.$Z$5]*MAGNET([.W$24]+[.$BB15])+[.X$32]*[.$Z$5]*MAGNET([.X$24]+[.$BB15])+[.Y$32]*[.$Z$5]*MAGNET([.Y$24]+[.$BB15])+[.Z$32]*[.$Z$5]*MAGNET([.Z$24]+[.$BB15])+[.AA$32]*[.$Z$5]*MAGNET([.AA$24]+[.$BB15])+[.AB$32]*[.$Z$5]*MAGNET([.AB$24]+[.$BB15])+[.AC$32]*[.$Z$5]*MAGNET([.AC$24]+[.$BB15])+[.AD$32]*[.$Z$5]*MAGNET([.AD$24]+[.$BB15])+[.AE$32]*[.$Z$5]*MAGNET([.AE$24]+[.$BB15])+[.AF$32]*[.$Z$5]*MAGNET([.AF$24]+[.$BB15])+[.AG$32]*[.$Z$5]*MAGNET([.AG$24]+[.$BB15])+[.D$32]*[.$Z$5]*MAGNET([.D$24]+[.$BB15])+[.AH$32]*[.$Z$5]*MAGNET([.AH$24]+[.BB15]) +[.AI$32]*[.$Z$5]*MAGNET([.AI$24]+[.BB15]) +[.AJ$32]*[.$Z$5]*MAGNET([.AJ$24]+[.BB15]) +[.AK$32]*[.$Z$5]*MAGNET([.AK$24]+[.BB15]) +[.AL$32]*[.$Z$5]*MAGNET([.AL$24]+[.BB15]) +[.AM$32]*[.$Z$5]*MAGNET([.AM$24]+[.BB15]) +[.AN$32]*[.$Z$5]*MAGNET([.AN$24]+[.BB15]) +[.AO$32]*[.$Z$5]*MAGNET([.AO$24]+[.BB15]) +[.AP$32]*[.$Z$5]*MAGNET([.AP$24]+[.$BB15])&#10;+[.AQ$32]*[.$Z$5]*MAGNET([.AQ$24]+[.$BB15])&#10;+[.AR$32]*[.$Z$5]*MAGNET([.AR$24]+[.$BB15])&#10;+[.AS$32]*[.$Z$5]*MAGNET([.AS$24]+[.$BB15])&#10;+[.AT$32]*[.$Z$5]*MAGNET([.AT$24]+[.$BB15])&#10;+[.AU$32]*[.$Z$5]*MAGNET([.AU$24]+[.$BB15])&#10;+[.AV$32]*[.$Z$5]*MAGNET([.AV$24]+[.$BB15])&#10;+[.AW$32]*[.$Z$5]*MAGNET([.AW$24]+[.$BB15])&#10;+[.AX$32]*[.$Z$5]*MAGNET([.AX$24]+[.$BB15])&#10;+[.AY$32]*[.$Z$5]*MAGNET([.AY$24]+[.$BB1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34" table:formula="of:=[$Lind.D11]" office:value-type="float" office:value="1" calcext:value-type="float">
            <text:p>1</text:p>
          </table:table-cell>
          <table:table-cell table:style-name="ce39" table:formula="of:=[$Lind.E11]" office:value-type="float" office:value="1" calcext:value-type="float">
            <text:p>1</text:p>
          </table:table-cell>
          <table:table-cell table:style-name="ce39" table:formula="of:=[$Lind.F11]" office:value-type="float" office:value="1" calcext:value-type="float">
            <text:p>1</text:p>
          </table:table-cell>
          <table:table-cell table:style-name="ce39" table:formula="of:=[$Lind.G11]" office:value-type="float" office:value="-3" calcext:value-type="float">
            <text:p>-3</text:p>
          </table:table-cell>
          <table:table-cell table:style-name="ce39" table:formula="of:=[$Lind.H11]" office:value-type="float" office:value="-3" calcext:value-type="float">
            <text:p>-3</text:p>
          </table:table-cell>
          <table:table-cell table:style-name="ce39" table:formula="of:=[$Lind.I11]" office:value-type="float" office:value="2" calcext:value-type="float">
            <text:p>2</text:p>
          </table:table-cell>
          <table:table-cell table:style-name="ce39" table:formula="of:=[$Lind.J11]" office:value-type="float" office:value="2" calcext:value-type="float">
            <text:p>2</text:p>
          </table:table-cell>
          <table:table-cell table:style-name="ce39" table:formula="of:=[$Lind.K11]" office:value-type="float" office:value="2" calcext:value-type="float">
            <text:p>2</text:p>
          </table:table-cell>
          <table:table-cell table:style-name="ce39" table:formula="of:=[$Lind.L11]" office:value-type="float" office:value="-1" calcext:value-type="float">
            <text:p>-1</text:p>
          </table:table-cell>
          <table:table-cell table:style-name="ce39" table:formula="of:=[$Lind.M11]" office:value-type="float" office:value="-1" calcext:value-type="float">
            <text:p>-1</text:p>
          </table:table-cell>
          <table:table-cell table:style-name="ce39" table:formula="of:=[$Lind.N11]" office:value-type="float" office:value="3" calcext:value-type="float">
            <text:p>3</text:p>
          </table:table-cell>
          <table:table-cell table:style-name="ce39" table:formula="of:=[$Lind.O11]" office:value-type="float" office:value="3" calcext:value-type="float">
            <text:p>3</text:p>
          </table:table-cell>
          <table:table-cell table:style-name="ce39" table:formula="of:=[$Lind.P11]" office:value-type="float" office:value="3" calcext:value-type="float">
            <text:p>3</text:p>
          </table:table-cell>
          <table:table-cell table:style-name="ce39" table:formula="of:=[$Lind.Q11]" office:value-type="float" office:value="-2" calcext:value-type="float">
            <text:p>-2</text:p>
          </table:table-cell>
          <table:table-cell table:style-name="ce39" table:formula="of:=[$Lind.R11]" office:value-type="float" office:value="-2" calcext:value-type="float">
            <text:p>-2</text:p>
          </table:table-cell>
          <table:table-cell table:style-name="ce34" table:formula="of:=[$Lind.S11]" office:value-type="float" office:value="1" calcext:value-type="float">
            <text:p>1</text:p>
          </table:table-cell>
          <table:table-cell table:style-name="ce39" table:formula="of:=[$Lind.T11]" office:value-type="float" office:value="1" calcext:value-type="float">
            <text:p>1</text:p>
          </table:table-cell>
          <table:table-cell table:style-name="ce39" table:formula="of:=[$Lind.U11]" office:value-type="float" office:value="1" calcext:value-type="float">
            <text:p>1</text:p>
          </table:table-cell>
          <table:table-cell table:style-name="ce39" table:formula="of:=[$Lind.V11]" office:value-type="float" office:value="-3" calcext:value-type="float">
            <text:p>-3</text:p>
          </table:table-cell>
          <table:table-cell table:style-name="ce39" table:formula="of:=[$Lind.W11]" office:value-type="float" office:value="-3" calcext:value-type="float">
            <text:p>-3</text:p>
          </table:table-cell>
          <table:table-cell table:style-name="ce39" table:formula="of:=[$Lind.X11]" office:value-type="float" office:value="5" calcext:value-type="float">
            <text:p>5</text:p>
          </table:table-cell>
          <table:table-cell table:style-name="ce39" table:formula="of:=[$Lind.Y11]" office:value-type="float" office:value="5" calcext:value-type="float">
            <text:p>5</text:p>
          </table:table-cell>
          <table:table-cell table:style-name="ce39" table:formula="of:=[$Lind.Z11]" office:value-type="float" office:value="2" calcext:value-type="float">
            <text:p>2</text:p>
          </table:table-cell>
          <table:table-cell table:style-name="ce39" table:formula="of:=[$Lind.AA11]" office:value-type="float" office:value="-1" calcext:value-type="float">
            <text:p>-1</text:p>
          </table:table-cell>
          <table:table-cell table:style-name="ce39" table:formula="of:=[$Lind.AB11]" office:value-type="float" office:value="-1" calcext:value-type="float">
            <text:p>-1</text:p>
          </table:table-cell>
          <table:table-cell table:style-name="ce39" table:formula="of:=[$Lind.AC11]" office:value-type="float" office:value="3" calcext:value-type="float">
            <text:p>3</text:p>
          </table:table-cell>
          <table:table-cell table:style-name="ce39" table:formula="of:=[$Lind.AD11]" office:value-type="float" office:value="3" calcext:value-type="float">
            <text:p>3</text:p>
          </table:table-cell>
          <table:table-cell table:style-name="ce39" table:formula="of:=[$Lind.AE11]" office:value-type="float" office:value="3" calcext:value-type="float">
            <text:p>3</text:p>
          </table:table-cell>
          <table:table-cell table:style-name="ce39" table:formula="of:=[$Lind.AF11]" office:value-type="float" office:value="-5" calcext:value-type="float">
            <text:p>-5</text:p>
          </table:table-cell>
          <table:table-cell table:style-name="ce49" table:formula="of:=[$Lind.AG11]" office:value-type="float" office:value="-5" calcext:value-type="float">
            <text:p>-5</text:p>
          </table:table-cell>
          <table:table-cell table:style-name="ce39" table:formula="of:=[$Lind.AH11]" office:value-type="float" office:value="3" calcext:value-type="float">
            <text:p>3</text:p>
          </table:table-cell>
          <table:table-cell table:style-name="ce39" table:formula="of:=[$Lind.AI11]" office:value-type="float" office:value="3" calcext:value-type="float">
            <text:p>3</text:p>
          </table:table-cell>
          <table:table-cell table:style-name="ce39" table:formula="of:=[$Lind.AJ11]" office:value-type="float" office:value="4" calcext:value-type="float">
            <text:p>4</text:p>
          </table:table-cell>
          <table:table-cell table:style-name="ce39" table:formula="of:=[$Lind.AK11]" office:value-type="float" office:value="-2" calcext:value-type="float">
            <text:p>-2</text:p>
          </table:table-cell>
          <table:table-cell table:style-name="ce39" table:formula="of:=[$Lind.AL11]" office:value-type="float" office:value="-2" calcext:value-type="float">
            <text:p>-2</text:p>
          </table:table-cell>
          <table:table-cell table:style-name="ce39" table:formula="of:=[$Lind.AM11]" office:value-type="float" office:value="1" calcext:value-type="float">
            <text:p>1</text:p>
          </table:table-cell>
          <table:table-cell table:style-name="ce39" table:formula="of:=[$Lind.AN11]" office:value-type="float" office:value="-4" calcext:value-type="float">
            <text:p>-4</text:p>
          </table:table-cell>
          <table:table-cell table:style-name="ce39" table:formula="of:=[$Lind.AO11]" office:value-type="float" office:value="1" calcext:value-type="float">
            <text:p>1</text:p>
          </table:table-cell>
          <table:table-cell table:style-name="ce39" table:formula="of:=[$Lind.AP11]" office:value-type="float" office:value="0" calcext:value-type="float">
            <text:p>0</text:p>
          </table:table-cell>
          <table:table-cell table:style-name="ce49" table:formula="of:=[$Lind.AQ11]" office:value-type="float" office:value="0" calcext:value-type="float">
            <text:p>0</text:p>
          </table:table-cell>
          <table:table-cell table:style-name="ce39" table:formula="of:=[$Lind.AR11]" office:value-type="float" office:value="0" calcext:value-type="float">
            <text:p>0</text:p>
          </table:table-cell>
          <table:table-cell table:style-name="ce39" table:formula="of:=[$Lind.AS11]" office:value-type="float" office:value="0" calcext:value-type="float">
            <text:p>0</text:p>
          </table:table-cell>
          <table:table-cell table:style-name="ce39" table:formula="of:=[$Lind.AT11]" office:value-type="float" office:value="0" calcext:value-type="float">
            <text:p>0</text:p>
          </table:table-cell>
          <table:table-cell table:style-name="ce39" table:formula="of:=[$Lind.AU11]" office:value-type="float" office:value="0" calcext:value-type="float">
            <text:p>0</text:p>
          </table:table-cell>
          <table:table-cell table:style-name="ce39" table:formula="of:=[$Lind.AV11]" office:value-type="float" office:value="0" calcext:value-type="float">
            <text:p>0</text:p>
          </table:table-cell>
          <table:table-cell table:style-name="ce39" table:formula="of:=[$Lind.AW11]" office:value-type="float" office:value="0" calcext:value-type="float">
            <text:p>0</text:p>
          </table:table-cell>
          <table:table-cell table:style-name="ce39" table:formula="of:=[$Lind.AX11]" office:value-type="float" office:value="0" calcext:value-type="float">
            <text:p>0</text:p>
          </table:table-cell>
          <table:table-cell table:style-name="ce39" table:formula="of:=[$Lind.AY11]" office:value-type="float" office:value="0" calcext:value-type="float">
            <text:p>0</text:p>
          </table:table-cell>
          <table:table-cell/>
          <table:table-cell table:formula="of:=[.BA15]+0.002" office:value-type="float" office:value="0.002" calcext:value-type="float">
            <text:p>0.002</text:p>
          </table:table-cell>
          <table:table-cell table:formula="of:=[.BA16]*[.$D$6]" office:value-type="float" office:value="0.100530964914873" calcext:value-type="float">
            <text:p>0.101</text:p>
          </table:table-cell>
          <table:table-cell table:formula="of:=[.D$25]*[.$Z$5]*MAGNET([.D$24]+[.BB16])+[.E$25]*[.$Z$5]*MAGNET([.E$24]+[.BB16])+[.F$25]*[.$Z$5]*MAGNET([.F$24]+[.BB16])+[.G$25]*[.$Z$5]*MAGNET([.G$24]+[.BB16])+[.H$25]*[.$Z$5]*MAGNET([.H$24]+[.BB16])+[.I$25]*[.$Z$5]*MAGNET([.I$24]+[.BB16])+[.J$25]*[.$Z$5]*MAGNET([.J$24]+[.BB16])+[.K$25]*[.$Z$5]*MAGNET([.K$24]+[.BB16])+[.L$25]*[.$Z$5]*MAGNET([.L$24]+[.BB16])+[.M$25]*[.$Z$5]*MAGNET([.M$24]+[.BB16])+[.N$25]*[.$Z$5]*MAGNET([.N$24]+[.BB16])+[.O$25]*[.$Z$5]*MAGNET([.O$24]+[.BB16])+[.P$25]*[.$Z$5]*MAGNET([.P$24]+[.BB16])+[.Q$25]*[.$Z$5]*MAGNET([.Q$24]+[.BB16])+[.R$25]*[.$Z$5]*MAGNET([.R$24]+[.BB16])+[.S$25]*[.$Z$5]*MAGNET([.S$24]+[.BB16])+[.T$25]*[.$Z$5]*MAGNET([.T$24]+[.BB16])+[.U$25]*[.$Z$5]*MAGNET([.U$24]+[.BB16])+[.V$25]*[.$Z$5]*MAGNET([.V$24]+[.BB16])+[.W$25]*[.$Z$5]*MAGNET([.W$24]+[.BB16])+[.X$25]*[.$Z$5]*MAGNET([.X$24]+[.BB16])+[.Y$25]*[.$Z$5]*MAGNET([.Y$24]+[.BB16])+[.Z$25]*[.$Z$5]*MAGNET([.Z$24]+[.BB16])+[.AA$25]*[.$Z$5]*MAGNET([.AA$24]+[.BB16])+[.AB$25]*[.$Z$5]*MAGNET([.AB$24]+[.BB16])+[.AC$25]*[.$Z$5]*MAGNET([.AC$24]+[.BB16])+[.AD$25]*[.$Z$5]*MAGNET([.AD$24]+[.BB16])+[.AE$25]*[.$Z$5]*MAGNET([.AE$24]+[.BB16])+[.AF$25]*[.$Z$5]*MAGNET([.AF$24]+[.BB16])+[.AG$25]*[.$Z$5]*MAGNET([.AG$24]+[.BB16])+[.AH$25]*[.$Z$5]*MAGNET([.AH$24]+[.BB16]) +[.AI$25]*[.$Z$5]*MAGNET([.AI$24]+[.BB16]) +[.AJ$25]*[.$Z$5]*MAGNET([.AJ$24]+[.BB16]) +[.AK$25]*[.$Z$5]*MAGNET([.AK$24]+[.BB16]) +[.AL$25]*[.$Z$5]*MAGNET([.AL$24]+[.BB16]) +[.AM$25]*[.$Z$5]*MAGNET([.AM$24]+[.BB16]) +[.AN$25]*[.$Z$5]*MAGNET([.AN$24]+[.BB16]) +[.AO$25]*[.$Z$5]*MAGNET([.AO$24]+[.BB16])+RAND()*[.$BC$13]+[.AP$25]*[.$Z$5]*MAGNET([.AP$24]+[.BB16])&#10;+[.AQ$25]*[.$Z$5]*MAGNET([.AQ$24]+[.BB16])&#10;+[.AR$25]*[.$Z$5]*MAGNET([.AR$24]+[.BB16])&#10;+[.AS$25]*[.$Z$5]*MAGNET([.AS$24]+[.BB16])&#10;+[.AT$25]*[.$Z$5]*MAGNET([.AT$24]+[.BB16])&#10;+[.AU$25]*[.$Z$5]*MAGNET([.AU$24]+[.BB16])&#10;+[.AV$25]*[.$Z$5]*MAGNET([.AV$24]+[.BB16])&#10;+[.AW$25]*[.$Z$5]*MAGNET([.AW$24]+[.BB16])&#10;+[.AX$25]*[.$Z$5]*MAGNET([.AX$24]+[.BB16])&#10;+[.AY$25]*[.$Z$5]*MAGNET([.AY$24]+[.BB16])" office:value-type="float" office:value="-30.7923083610625" calcext:value-type="float">
            <text:p>-30.79</text:p>
          </table:table-cell>
          <table:table-cell table:style-name="ce70" table:formula="of:=[.E$26]*[.$Z$5]*MAGNET([.E$24]+[.$BB16])+[.F$26]*[.$Z$5]*MAGNET([.F$24]+[.$BB16])+[.G$26]*[.$Z$5]*MAGNET([.G$24]+[.$BB16])+[.H$26]*[.$Z$5]*MAGNET([.H$24]+[.$BB16])+[.I$26]*[.$Z$5]*MAGNET([.I$24]+[.$BB16])+[.J$26]*[.$Z$5]*MAGNET([.J$24]+[.$BB16])+[.K$26]*[.$Z$5]*MAGNET([.K$24]+[.$BB16])+[.L$26]*[.$Z$5]*MAGNET([.L$24]+[.$BB16])+[.M$26]*[.$Z$5]*MAGNET([.M$24]+[.$BB16])+[.N$26]*[.$Z$5]*MAGNET([.N$24]+[.$BB16])+[.O$26]*[.$Z$5]*MAGNET([.O$24]+[.$BB16])+[.P$26]*[.$Z$5]*MAGNET([.P$24]+[.$BB16])+[.Q$26]*[.$Z$5]*MAGNET([.Q$24]+[.$BB16])+[.R$26]*[.$Z$5]*MAGNET([.R$24]+[.$BB16])+[.S$26]*[.$Z$5]*MAGNET([.S$24]+[.$BB16])+[.T$26]*[.$Z$5]*MAGNET([.T$24]+[.$BB16])+[.U$26]*[.$Z$5]*MAGNET([.U$24]+[.$BB16])+[.V$26]*[.$Z$5]*MAGNET([.V$24]+[.$BB16])+[.W$26]*[.$Z$5]*MAGNET([.W$24]+[.$BB16])+[.X$26]*[.$Z$5]*MAGNET([.X$24]+[.$BB16])+[.Y$26]*[.$Z$5]*MAGNET([.Y$24]+[.$BB16])+[.Z$26]*[.$Z$5]*MAGNET([.Z$24]+[.$BB16])+[.AA$26]*[.$Z$5]*MAGNET([.AA$24]+[.$BB16])+[.AB$26]*[.$Z$5]*MAGNET([.AB$24]+[.$BB16])+[.AC$26]*[.$Z$5]*MAGNET([.AC$24]+[.$BB16])+[.AD$26]*[.$Z$5]*MAGNET([.AD$24]+[.$BB16])+[.AE$26]*[.$Z$5]*MAGNET([.AE$24]+[.$BB16])+[.AF$26]*[.$Z$5]*MAGNET([.AF$24]+[.$BB16])+[.AG$26]*[.$Z$5]*MAGNET([.AG$24]+[.$BB16])+[.D$26]*[.$Z$5]*MAGNET([.D$24]+[.$BB16])+[.AH$26]*[.$Z$5]*MAGNET([.AH$24]+[.BB16]) +[.AI$26]*[.$Z$5]*MAGNET([.AI$24]+[.BB16]) +[.AJ$26]*[.$Z$5]*MAGNET([.AJ$24]+[.BB16]) +[.AK$26]*[.$Z$5]*MAGNET([.AK$24]+[.BB16]) +[.AL$26]*[.$Z$5]*MAGNET([.AL$24]+[.BB16]) +[.AM$26]*[.$Z$5]*MAGNET([.AM$24]+[.BB16]) +[.AN$26]*[.$Z$5]*MAGNET([.AN$24]+[.BB16]) +[.AO$26]*[.$Z$5]*MAGNET([.AO$24]+[.BB16]) +[.AP$26]*[.$Z$5]*MAGNET([.AP$24]+[.$BB16])&#10;+[.AQ$26]*[.$Z$5]*MAGNET([.AQ$24]+[.$BB16])&#10;+[.AR$26]*[.$Z$5]*MAGNET([.AR$24]+[.$BB16])&#10;+[.AS$26]*[.$Z$5]*MAGNET([.AS$24]+[.$BB16])&#10;+[.AT$26]*[.$Z$5]*MAGNET([.AT$24]+[.$BB16])&#10;+[.AU$26]*[.$Z$5]*MAGNET([.AU$24]+[.$BB16])&#10;+[.AV$26]*[.$Z$5]*MAGNET([.AV$24]+[.$BB16])&#10;+[.AW$26]*[.$Z$5]*MAGNET([.AW$24]+[.$BB16])&#10;+[.AX$26]*[.$Z$5]*MAGNET([.AX$24]+[.$BB16])&#10;+[.AY$26]*[.$Z$5]*MAGNET([.AY$24]+[.$BB16]) +RAND()*[.$BD$13]" office:value-type="float" office:value="91.7894662063859" calcext:value-type="float">
            <text:p>91.79</text:p>
          </table:table-cell>
          <table:table-cell table:style-name="ce71" table:formula="of:=[.E$27]*[.$Z$5]*MAGNET([.E$24]+[.$BB16])+[.F$27]*[.$Z$5]*MAGNET([.F$24]+[.$BB16])+[.G$27]*[.$Z$5]*MAGNET([.G$24]+[.$BB16])+[.H$27]*[.$Z$5]*MAGNET([.H$24]+[.$BB16])+[.I$27]*[.$Z$5]*MAGNET([.I$24]+[.$BB16])+[.J$27]*[.$Z$5]*MAGNET([.J$24]+[.$BB16])+[.K$27]*[.$Z$5]*MAGNET([.K$24]+[.$BB16])+[.L$27]*[.$Z$5]*MAGNET([.L$24]+[.$BB16])+[.M$27]*[.$Z$5]*MAGNET([.M$24]+[.$BB16])+[.N$27]*[.$Z$5]*MAGNET([.N$24]+[.$BB16])+[.O$27]*[.$Z$5]*MAGNET([.O$24]+[.$BB16])+[.P$27]*[.$Z$5]*MAGNET([.P$24]+[.$BB16])+[.Q$27]*[.$Z$5]*MAGNET([.Q$24]+[.$BB16])+[.R$27]*[.$Z$5]*MAGNET([.R$24]+[.$BB16])+[.S$27]*[.$Z$5]*MAGNET([.S$24]+[.$BB16])+[.T$27]*[.$Z$5]*MAGNET([.T$24]+[.$BB16])+[.U$27]*[.$Z$5]*MAGNET([.U$24]+[.$BB16])+[.V$27]*[.$Z$5]*MAGNET([.V$24]+[.$BB16])+[.W$27]*[.$Z$5]*MAGNET([.W$24]+[.$BB16])+[.X$27]*[.$Z$5]*MAGNET([.X$24]+[.$BB16])+[.Y$27]*[.$Z$5]*MAGNET([.Y$24]+[.$BB16])+[.Z$27]*[.$Z$5]*MAGNET([.Z$24]+[.$BB16])+[.AA$27]*[.$Z$5]*MAGNET([.AA$24]+[.$BB16])+[.AB$27]*[.$Z$5]*MAGNET([.AB$24]+[.$BB16])+[.AC$27]*[.$Z$5]*MAGNET([.AC$24]+[.$BB16])+[.AD$27]*[.$Z$5]*MAGNET([.AD$24]+[.$BB16])+[.AE$27]*[.$Z$5]*MAGNET([.AE$24]+[.$BB16])+[.AF$27]*[.$Z$5]*MAGNET([.AF$24]+[.$BB16])+[.AG$27]*[.$Z$5]*MAGNET([.AG$24]+[.$BB16])+[.D$27]*[.$Z$5]*MAGNET([.D$24]+[.$BB16])+[.AH$27]*[.$Z$5]*MAGNET([.AH$24]+[.BB16]) +[.AI$27]*[.$Z$5]*MAGNET([.AI$24]+[.BB16]) +[.AJ$27]*[.$Z$5]*MAGNET([.AJ$24]+[.BB16]) +[.AK$27]*[.$Z$5]*MAGNET([.AK$24]+[.BB16]) +[.AL$27]*[.$Z$5]*MAGNET([.AL$24]+[.BB16]) +[.AM$27]*[.$Z$5]*MAGNET([.AM$24]+[.BB16]) +[.AN$27]*[.$Z$5]*MAGNET([.AN$24]+[.BB16]) +[.AO$27]*[.$Z$5]*MAGNET([.AO$24]+[.BB16]) +[.AP$27]*[.$Z$5]*MAGNET([.AP$24]+[.$BB16])&#10;+[.AQ$27]*[.$Z$5]*MAGNET([.AQ$24]+[.$BB16])&#10;+[.AR$27]*[.$Z$5]*MAGNET([.AR$24]+[.$BB16])&#10;+[.AS$27]*[.$Z$5]*MAGNET([.AS$24]+[.$BB16])&#10;+[.AT$27]*[.$Z$5]*MAGNET([.AT$24]+[.$BB16])&#10;+[.AU$27]*[.$Z$5]*MAGNET([.AU$24]+[.$BB16])&#10;+[.AV$27]*[.$Z$5]*MAGNET([.AV$24]+[.$BB16])&#10;+[.AW$27]*[.$Z$5]*MAGNET([.AW$24]+[.$BB16])&#10;+[.AX$27]*[.$Z$5]*MAGNET([.AX$24]+[.$BB16])&#10;+[.AY$27]*[.$Z$5]*MAGNET([.AY$24]+[.$BB16]) +RAND()*[.$BE$13]" office:value-type="float" office:value="-68.2408650062598" calcext:value-type="float">
            <text:p>-68.2408650062598</text:p>
          </table:table-cell>
          <table:table-cell table:style-name="ce71" table:formula="of:=[.E$28]*[.$Z$5]*MAGNET([.E$24]+[.$BB16])+[.F$28]*[.$Z$5]*MAGNET([.F$24]+[.$BB16])+[.G$28]*[.$Z$5]*MAGNET([.G$24]+[.$BB16])+[.H$28]*[.$Z$5]*MAGNET([.H$24]+[.$BB16])+[.I$28]*[.$Z$5]*MAGNET([.I$24]+[.$BB16])+[.J$28]*[.$Z$5]*MAGNET([.J$24]+[.$BB16])+[.K$28]*[.$Z$5]*MAGNET([.K$24]+[.$BB16])+[.L$28]*[.$Z$5]*MAGNET([.L$24]+[.$BB16])+[.M$28]*[.$Z$5]*MAGNET([.M$24]+[.$BB16])+[.N$28]*[.$Z$5]*MAGNET([.N$24]+[.$BB16])+[.O$28]*[.$Z$5]*MAGNET([.O$24]+[.$BB16])+[.P$28]*[.$Z$5]*MAGNET([.P$24]+[.$BB16])+[.Q$28]*[.$Z$5]*MAGNET([.Q$24]+[.$BB16])+[.R$28]*[.$Z$5]*MAGNET([.R$24]+[.$BB16])+[.S$28]*[.$Z$5]*MAGNET([.S$24]+[.$BB16])+[.T$28]*[.$Z$5]*MAGNET([.T$24]+[.$BB16])+[.U$28]*[.$Z$5]*MAGNET([.U$24]+[.$BB16])+[.V$28]*[.$Z$5]*MAGNET([.V$24]+[.$BB16])+[.W$28]*[.$Z$5]*MAGNET([.W$24]+[.$BB16])+[.X$28]*[.$Z$5]*MAGNET([.X$24]+[.$BB16])+[.Y$28]*[.$Z$5]*MAGNET([.Y$24]+[.$BB16])+[.Z$28]*[.$Z$5]*MAGNET([.Z$24]+[.$BB16])+[.AA$28]*[.$Z$5]*MAGNET([.AA$24]+[.$BB16])+[.AB$28]*[.$Z$5]*MAGNET([.AB$24]+[.$BB16])+[.AC$28]*[.$Z$5]*MAGNET([.AC$24]+[.$BB16])+[.AD$28]*[.$Z$5]*MAGNET([.AD$24]+[.$BB16])+[.AE$28]*[.$Z$5]*MAGNET([.AE$24]+[.$BB16])+[.AF$28]*[.$Z$5]*MAGNET([.AF$24]+[.$BB16])+[.AG$28]*[.$Z$5]*MAGNET([.AG$24]+[.$BB16])+[.D$28]*[.$Z$5]*MAGNET([.D$24]+[.$BB16])+[.AH$28]*[.$Z$5]*MAGNET([.AH$24]+[.BB16]) +[.AI$28]*[.$Z$5]*MAGNET([.AI$24]+[.BB16]) +[.AJ$28]*[.$Z$5]*MAGNET([.AJ$24]+[.BB16]) +[.AK$28]*[.$Z$5]*MAGNET([.AK$24]+[.BB16]) +[.AL$28]*[.$Z$5]*MAGNET([.AL$24]+[.BB16]) +[.AM$28]*[.$Z$5]*MAGNET([.AM$24]+[.BB16]) +[.AN$28]*[.$Z$5]*MAGNET([.AN$24]+[.BB16]) +[.AO$28]*[.$Z$5]*MAGNET([.AO$24]+[.BB16]) +[.AP$28]*[.$Z$5]*MAGNET([.AP$24]+[.$BB16])&#10;+[.AQ$28]*[.$Z$5]*MAGNET([.AQ$24]+[.$BB16])&#10;+[.AR$28]*[.$Z$5]*MAGNET([.AR$24]+[.$BB16])&#10;+[.AS$28]*[.$Z$5]*MAGNET([.AS$24]+[.$BB16])&#10;+[.AT$28]*[.$Z$5]*MAGNET([.AT$24]+[.$BB16])&#10;+[.AU$28]*[.$Z$5]*MAGNET([.AU$24]+[.$BB16])&#10;+[.AV$28]*[.$Z$5]*MAGNET([.AV$24]+[.$BB16])&#10;+[.AW$28]*[.$Z$5]*MAGNET([.AW$24]+[.$BB16])&#10;+[.AX$28]*[.$Z$5]*MAGNET([.AX$24]+[.$BB16])&#10;+[.AY$28]*[.$Z$5]*MAGNET([.AY$24]+[.$BB16]) +RAND()*[.$BF$13]" office:value-type="float" office:value="-8.56021928573393" calcext:value-type="float">
            <text:p>-8.56021928573393</text:p>
          </table:table-cell>
          <table:table-cell table:style-name="ce71" table:formula="of:=[.E$29]*[.$Z$5]*MAGNET([.E$24]+[.$BB16])+[.F$29]*[.$Z$5]*MAGNET([.F$24]+[.$BB16])+[.G$29]*[.$Z$5]*MAGNET([.G$24]+[.$BB16])+[.H$29]*[.$Z$5]*MAGNET([.H$24]+[.$BB16])+[.I$29]*[.$Z$5]*MAGNET([.I$24]+[.$BB16])+[.J$29]*[.$Z$5]*MAGNET([.J$24]+[.$BB16])+[.K$29]*[.$Z$5]*MAGNET([.K$24]+[.$BB16])+[.L$29]*[.$Z$5]*MAGNET([.L$24]+[.$BB16])+[.M$29]*[.$Z$5]*MAGNET([.M$24]+[.$BB16])+[.N$29]*[.$Z$5]*MAGNET([.N$24]+[.$BB16])+[.O$29]*[.$Z$5]*MAGNET([.O$24]+[.$BB16])+[.P$29]*[.$Z$5]*MAGNET([.P$24]+[.$BB16])+[.Q$29]*[.$Z$5]*MAGNET([.Q$24]+[.$BB16])+[.R$29]*[.$Z$5]*MAGNET([.R$24]+[.$BB16])+[.S$29]*[.$Z$5]*MAGNET([.S$24]+[.$BB16])+[.T$29]*[.$Z$5]*MAGNET([.T$24]+[.$BB16])+[.U$29]*[.$Z$5]*MAGNET([.U$24]+[.$BB16])+[.V$29]*[.$Z$5]*MAGNET([.V$24]+[.$BB16])+[.W$29]*[.$Z$5]*MAGNET([.W$24]+[.$BB16])+[.X$29]*[.$Z$5]*MAGNET([.X$24]+[.$BB16])+[.Y$29]*[.$Z$5]*MAGNET([.Y$24]+[.$BB16])+[.Z$29]*[.$Z$5]*MAGNET([.Z$24]+[.$BB16])+[.AA$29]*[.$Z$5]*MAGNET([.AA$24]+[.$BB16])+[.AB$29]*[.$Z$5]*MAGNET([.AB$24]+[.$BB16])+[.AC$29]*[.$Z$5]*MAGNET([.AC$24]+[.$BB16])+[.AD$29]*[.$Z$5]*MAGNET([.AD$24]+[.$BB16])+[.AE$29]*[.$Z$5]*MAGNET([.AE$24]+[.$BB16])+[.AF$29]*[.$Z$5]*MAGNET([.AF$24]+[.$BB16])+[.AG$29]*[.$Z$5]*MAGNET([.AG$24]+[.$BB16])+[.D$29]*[.$Z$5]*MAGNET([.D$24]+[.$BB16])+[.AH$29]*[.$Z$5]*MAGNET([.AH$24]+[.BB16]) +[.AI$29]*[.$Z$5]*MAGNET([.AI$24]+[.BB16]) +[.AJ$29]*[.$Z$5]*MAGNET([.AJ$24]+[.BB16]) +[.AK$29]*[.$Z$5]*MAGNET([.AK$24]+[.BB16]) +[.AL$29]*[.$Z$5]*MAGNET([.AL$24]+[.BB16]) +[.AM$29]*[.$Z$5]*MAGNET([.AM$24]+[.BB16]) +[.AN$29]*[.$Z$5]*MAGNET([.AN$24]+[.BB16]) +[.AO$29]*[.$Z$5]*MAGNET([.AO$24]+[.BB16]) +[.AP$29]*[.$Z$5]*MAGNET([.AP$24]+[.$BB16])&#10;+[.AQ$29]*[.$Z$5]*MAGNET([.AQ$24]+[.$BB16])&#10;+[.AR$29]*[.$Z$5]*MAGNET([.AR$24]+[.$BB16])&#10;+[.AS$29]*[.$Z$5]*MAGNET([.AS$24]+[.$BB16])&#10;+[.AT$29]*[.$Z$5]*MAGNET([.AT$24]+[.$BB16])&#10;+[.AU$29]*[.$Z$5]*MAGNET([.AU$24]+[.$BB16])&#10;+[.AV$29]*[.$Z$5]*MAGNET([.AV$24]+[.$BB16])&#10;+[.AW$29]*[.$Z$5]*MAGNET([.AW$24]+[.$BB16])&#10;+[.AX$29]*[.$Z$5]*MAGNET([.AX$24]+[.$BB16])&#10;+[.AY$29]*[.$Z$5]*MAGNET([.AY$24]+[.$BB16]) +RAND()*[.$BG$13]" office:value-type="float" office:value="32.9604933494345" calcext:value-type="float">
            <text:p>32.9604933494345</text:p>
          </table:table-cell>
          <table:table-cell table:style-name="ce71" table:formula="of:=[.E$30]*[.$Z$5]*MAGNET([.E$24]+[.$BB16])+[.F$30]*[.$Z$5]*MAGNET([.F$24]+[.$BB16])+[.G$30]*[.$Z$5]*MAGNET([.G$24]+[.$BB16])+[.H$30]*[.$Z$5]*MAGNET([.H$24]+[.$BB16])+[.I$30]*[.$Z$5]*MAGNET([.I$24]+[.$BB16])+[.J$30]*[.$Z$5]*MAGNET([.J$24]+[.$BB16])+[.K$30]*[.$Z$5]*MAGNET([.K$24]+[.$BB16])+[.L$30]*[.$Z$5]*MAGNET([.L$24]+[.$BB16])+[.M$30]*[.$Z$5]*MAGNET([.M$24]+[.$BB16])+[.N$30]*[.$Z$5]*MAGNET([.N$24]+[.$BB16])+[.O$30]*[.$Z$5]*MAGNET([.O$24]+[.$BB16])+[.P$30]*[.$Z$5]*MAGNET([.P$24]+[.$BB16])+[.Q$30]*[.$Z$5]*MAGNET([.Q$24]+[.$BB16])+[.R$30]*[.$Z$5]*MAGNET([.R$24]+[.$BB16])+[.S$30]*[.$Z$5]*MAGNET([.S$24]+[.$BB16])+[.T$30]*[.$Z$5]*MAGNET([.T$24]+[.$BB16])+[.U$30]*[.$Z$5]*MAGNET([.U$24]+[.$BB16])+[.V$30]*[.$Z$5]*MAGNET([.V$24]+[.$BB16])+[.W$30]*[.$Z$5]*MAGNET([.W$24]+[.$BB16])+[.X$30]*[.$Z$5]*MAGNET([.X$24]+[.$BB16])+[.Y$30]*[.$Z$5]*MAGNET([.Y$24]+[.$BB16])+[.Z$30]*[.$Z$5]*MAGNET([.Z$24]+[.$BB16])+[.AA$30]*[.$Z$5]*MAGNET([.AA$24]+[.$BB16])+[.AB$30]*[.$Z$5]*MAGNET([.AB$24]+[.$BB16])+[.AC$30]*[.$Z$5]*MAGNET([.AC$24]+[.$BB16])+[.AD$30]*[.$Z$5]*MAGNET([.AD$24]+[.$BB16])+[.AE$30]*[.$Z$5]*MAGNET([.AE$24]+[.$BB16])+[.AF$30]*[.$Z$5]*MAGNET([.AF$24]+[.$BB16])+[.AG$30]*[.$Z$5]*MAGNET([.AG$24]+[.$BB16])+[.D$30]*[.$Z$5]*MAGNET([.D$24]+[.$BB16])+[.AH$30]*[.$Z$5]*MAGNET([.AH$24]+[.BB16]) +[.AI$30]*[.$Z$5]*MAGNET([.AI$24]+[.BB16]) +[.AJ$30]*[.$Z$5]*MAGNET([.AJ$24]+[.BB16]) +[.AK$30]*[.$Z$5]*MAGNET([.AK$24]+[.BB16]) +[.AL$30]*[.$Z$5]*MAGNET([.AL$24]+[.BB16]) +[.AM$30]*[.$Z$5]*MAGNET([.AM$24]+[.BB16]) +[.AN$30]*[.$Z$5]*MAGNET([.AN$24]+[.BB16]) +[.AO$30]*[.$Z$5]*MAGNET([.AO$24]+[.BB16]) +[.AP$30]*[.$Z$5]*MAGNET([.AP$24]+[.$BB16])&#10;+[.AQ$30]*[.$Z$5]*MAGNET([.AQ$24]+[.$BB16])&#10;+[.AR$30]*[.$Z$5]*MAGNET([.AR$24]+[.$BB16])&#10;+[.AS$30]*[.$Z$5]*MAGNET([.AS$24]+[.$BB16])&#10;+[.AT$30]*[.$Z$5]*MAGNET([.AT$24]+[.$BB16])&#10;+[.AU$30]*[.$Z$5]*MAGNET([.AU$24]+[.$BB16])&#10;+[.AV$30]*[.$Z$5]*MAGNET([.AV$24]+[.$BB16])&#10;+[.AW$30]*[.$Z$5]*MAGNET([.AW$24]+[.$BB16])&#10;+[.AX$30]*[.$Z$5]*MAGNET([.AX$24]+[.$BB16])&#10;+[.AY$30]*[.$Z$5]*MAGNET([.AY$24]+[.$BB16]) +RAND()*[.$BH$13]" office:value-type="float" office:value="0" calcext:value-type="float">
            <text:p>0</text:p>
          </table:table-cell>
          <table:table-cell table:style-name="ce71" table:formula="of:=[.E$31]*[.$Z$5]*MAGNET([.E$24]+[.$BB16])+[.F$31]*[.$Z$5]*MAGNET([.F$24]+[.$BB16])+[.G$31]*[.$Z$5]*MAGNET([.G$24]+[.$BB16])+[.H$31]*[.$Z$5]*MAGNET([.H$24]+[.$BB16])+[.I$31]*[.$Z$5]*MAGNET([.I$24]+[.$BB16])+[.J$31]*[.$Z$5]*MAGNET([.J$24]+[.$BB16])+[.K$31]*[.$Z$5]*MAGNET([.K$24]+[.$BB16])+[.L$31]*[.$Z$5]*MAGNET([.L$24]+[.$BB16])+[.M$31]*[.$Z$5]*MAGNET([.M$24]+[.$BB16])+[.N$31]*[.$Z$5]*MAGNET([.N$24]+[.$BB16])+[.O$31]*[.$Z$5]*MAGNET([.O$24]+[.$BB16])+[.P$31]*[.$Z$5]*MAGNET([.P$24]+[.$BB16])+[.Q$31]*[.$Z$5]*MAGNET([.Q$24]+[.$BB16])+[.R$31]*[.$Z$5]*MAGNET([.R$24]+[.$BB16])+[.S$31]*[.$Z$5]*MAGNET([.S$24]+[.$BB16])+[.T$31]*[.$Z$5]*MAGNET([.T$24]+[.$BB16])+[.U$31]*[.$Z$5]*MAGNET([.U$24]+[.$BB16])+[.V$31]*[.$Z$5]*MAGNET([.V$24]+[.$BB16])+[.W$31]*[.$Z$5]*MAGNET([.W$24]+[.$BB16])+[.X$31]*[.$Z$5]*MAGNET([.X$24]+[.$BB16])+[.Y$31]*[.$Z$5]*MAGNET([.Y$24]+[.$BB16])+[.Z$31]*[.$Z$5]*MAGNET([.Z$24]+[.$BB16])+[.AA$31]*[.$Z$5]*MAGNET([.AA$24]+[.$BB16])+[.AB$31]*[.$Z$5]*MAGNET([.AB$24]+[.$BB16])+[.AC$31]*[.$Z$5]*MAGNET([.AC$24]+[.$BB16])+[.AD$31]*[.$Z$5]*MAGNET([.AD$24]+[.$BB16])+[.AE$31]*[.$Z$5]*MAGNET([.AE$24]+[.$BB16])+[.AF$31]*[.$Z$5]*MAGNET([.AF$24]+[.$BB16])+[.AG$31]*[.$Z$5]*MAGNET([.AG$24]+[.$BB16])+[.D$31]*[.$Z$5]*MAGNET([.D$24]+[.$BB16])+[.AH$31]*[.$Z$5]*MAGNET([.AH$24]+[.BB16]) +[.AI$31]*[.$Z$5]*MAGNET([.AI$24]+[.BB16]) +[.AJ$31]*[.$Z$5]*MAGNET([.AJ$24]+[.BB16]) +[.AK$31]*[.$Z$5]*MAGNET([.AK$24]+[.BB16]) +[.AL$31]*[.$Z$5]*MAGNET([.AL$24]+[.BB16]) +[.AM$31]*[.$Z$5]*MAGNET([.AM$24]+[.BB16]) +[.AN$31]*[.$Z$5]*MAGNET([.AN$24]+[.BB16]) +[.AO$31]*[.$Z$5]*MAGNET([.AO$24]+[.BB16]) +[.AP$31]*[.$Z$5]*MAGNET([.AP$24]+[.$BB16])&#10;+[.AQ$31]*[.$Z$5]*MAGNET([.AQ$24]+[.$BB16])&#10;+[.AR$31]*[.$Z$5]*MAGNET([.AR$24]+[.$BB16])&#10;+[.AS$31]*[.$Z$5]*MAGNET([.AS$24]+[.$BB16])&#10;+[.AT$31]*[.$Z$5]*MAGNET([.AT$24]+[.$BB16])&#10;+[.AU$31]*[.$Z$5]*MAGNET([.AU$24]+[.$BB16])&#10;+[.AV$31]*[.$Z$5]*MAGNET([.AV$24]+[.$BB16])&#10;+[.AW$31]*[.$Z$5]*MAGNET([.AW$24]+[.$BB16])&#10;+[.AX$31]*[.$Z$5]*MAGNET([.AX$24]+[.$BB16])&#10;+[.AY$31]*[.$Z$5]*MAGNET([.AY$24]+[.$BB16]) +RAND()*[.$BI$13]" office:value-type="float" office:value="0" calcext:value-type="float">
            <text:p>0</text:p>
          </table:table-cell>
          <table:table-cell table:style-name="ce71" table:formula="of:=[.E$32]*[.$Z$5]*MAGNET([.E$24]+[.$BB16])+[.F$32]*[.$Z$5]*MAGNET([.F$24]+[.$BB16])+[.G$32]*[.$Z$5]*MAGNET([.G$24]+[.$BB16])+[.H$32]*[.$Z$5]*MAGNET([.H$24]+[.$BB16])+[.I$32]*[.$Z$5]*MAGNET([.I$24]+[.$BB16])+[.J$32]*[.$Z$5]*MAGNET([.J$24]+[.$BB16])+[.K$32]*[.$Z$5]*MAGNET([.K$24]+[.$BB16])+[.L$32]*[.$Z$5]*MAGNET([.L$24]+[.$BB16])+[.M$32]*[.$Z$5]*MAGNET([.M$24]+[.$BB16])+[.N$32]*[.$Z$5]*MAGNET([.N$24]+[.$BB16])+[.O$32]*[.$Z$5]*MAGNET([.O$24]+[.$BB16])+[.P$32]*[.$Z$5]*MAGNET([.P$24]+[.$BB16])+[.Q$32]*[.$Z$5]*MAGNET([.Q$24]+[.$BB16])+[.R$32]*[.$Z$5]*MAGNET([.R$24]+[.$BB16])+[.S$32]*[.$Z$5]*MAGNET([.S$24]+[.$BB16])+[.T$32]*[.$Z$5]*MAGNET([.T$24]+[.$BB16])+[.U$32]*[.$Z$5]*MAGNET([.U$24]+[.$BB16])+[.V$32]*[.$Z$5]*MAGNET([.V$24]+[.$BB16])+[.W$32]*[.$Z$5]*MAGNET([.W$24]+[.$BB16])+[.X$32]*[.$Z$5]*MAGNET([.X$24]+[.$BB16])+[.Y$32]*[.$Z$5]*MAGNET([.Y$24]+[.$BB16])+[.Z$32]*[.$Z$5]*MAGNET([.Z$24]+[.$BB16])+[.AA$32]*[.$Z$5]*MAGNET([.AA$24]+[.$BB16])+[.AB$32]*[.$Z$5]*MAGNET([.AB$24]+[.$BB16])+[.AC$32]*[.$Z$5]*MAGNET([.AC$24]+[.$BB16])+[.AD$32]*[.$Z$5]*MAGNET([.AD$24]+[.$BB16])+[.AE$32]*[.$Z$5]*MAGNET([.AE$24]+[.$BB16])+[.AF$32]*[.$Z$5]*MAGNET([.AF$24]+[.$BB16])+[.AG$32]*[.$Z$5]*MAGNET([.AG$24]+[.$BB16])+[.D$32]*[.$Z$5]*MAGNET([.D$24]+[.$BB16])+[.AH$32]*[.$Z$5]*MAGNET([.AH$24]+[.BB16]) +[.AI$32]*[.$Z$5]*MAGNET([.AI$24]+[.BB16]) +[.AJ$32]*[.$Z$5]*MAGNET([.AJ$24]+[.BB16]) +[.AK$32]*[.$Z$5]*MAGNET([.AK$24]+[.BB16]) +[.AL$32]*[.$Z$5]*MAGNET([.AL$24]+[.BB16]) +[.AM$32]*[.$Z$5]*MAGNET([.AM$24]+[.BB16]) +[.AN$32]*[.$Z$5]*MAGNET([.AN$24]+[.BB16]) +[.AO$32]*[.$Z$5]*MAGNET([.AO$24]+[.BB16]) +[.AP$32]*[.$Z$5]*MAGNET([.AP$24]+[.$BB16])&#10;+[.AQ$32]*[.$Z$5]*MAGNET([.AQ$24]+[.$BB16])&#10;+[.AR$32]*[.$Z$5]*MAGNET([.AR$24]+[.$BB16])&#10;+[.AS$32]*[.$Z$5]*MAGNET([.AS$24]+[.$BB16])&#10;+[.AT$32]*[.$Z$5]*MAGNET([.AT$24]+[.$BB16])&#10;+[.AU$32]*[.$Z$5]*MAGNET([.AU$24]+[.$BB16])&#10;+[.AV$32]*[.$Z$5]*MAGNET([.AV$24]+[.$BB16])&#10;+[.AW$32]*[.$Z$5]*MAGNET([.AW$24]+[.$BB16])&#10;+[.AX$32]*[.$Z$5]*MAGNET([.AX$24]+[.$BB16])&#10;+[.AY$32]*[.$Z$5]*MAGNET([.AY$24]+[.$BB1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35" table:formula="of:=[$Lind.D12]" office:value-type="float" office:value="1" calcext:value-type="float">
            <text:p>1</text:p>
          </table:table-cell>
          <table:table-cell table:style-name="ce40" table:formula="of:=[$Lind.E12]" office:value-type="float" office:value="1" calcext:value-type="float">
            <text:p>1</text:p>
          </table:table-cell>
          <table:table-cell table:style-name="ce40" table:formula="of:=[$Lind.F12]" office:value-type="float" office:value="-3" calcext:value-type="float">
            <text:p>-3</text:p>
          </table:table-cell>
          <table:table-cell table:style-name="ce40" table:formula="of:=[$Lind.G12]" office:value-type="float" office:value="-3" calcext:value-type="float">
            <text:p>-3</text:p>
          </table:table-cell>
          <table:table-cell table:style-name="ce40" table:formula="of:=[$Lind.H12]" office:value-type="float" office:value="-3" calcext:value-type="float">
            <text:p>-3</text:p>
          </table:table-cell>
          <table:table-cell table:style-name="ce40" table:formula="of:=[$Lind.I12]" office:value-type="float" office:value="2" calcext:value-type="float">
            <text:p>2</text:p>
          </table:table-cell>
          <table:table-cell table:style-name="ce40" table:formula="of:=[$Lind.J12]" office:value-type="float" office:value="2" calcext:value-type="float">
            <text:p>2</text:p>
          </table:table-cell>
          <table:table-cell table:style-name="ce40" table:formula="of:=[$Lind.K12]" office:value-type="float" office:value="-1" calcext:value-type="float">
            <text:p>-1</text:p>
          </table:table-cell>
          <table:table-cell table:style-name="ce40" table:formula="of:=[$Lind.L12]" office:value-type="float" office:value="-1" calcext:value-type="float">
            <text:p>-1</text:p>
          </table:table-cell>
          <table:table-cell table:style-name="ce40" table:formula="of:=[$Lind.M12]" office:value-type="float" office:value="-1" calcext:value-type="float">
            <text:p>-1</text:p>
          </table:table-cell>
          <table:table-cell table:style-name="ce40" table:formula="of:=[$Lind.N12]" office:value-type="float" office:value="3" calcext:value-type="float">
            <text:p>3</text:p>
          </table:table-cell>
          <table:table-cell table:style-name="ce40" table:formula="of:=[$Lind.O12]" office:value-type="float" office:value="3" calcext:value-type="float">
            <text:p>3</text:p>
          </table:table-cell>
          <table:table-cell table:style-name="ce40" table:formula="of:=[$Lind.P12]" office:value-type="float" office:value="-2" calcext:value-type="float">
            <text:p>-2</text:p>
          </table:table-cell>
          <table:table-cell table:style-name="ce40" table:formula="of:=[$Lind.Q12]" office:value-type="float" office:value="-2" calcext:value-type="float">
            <text:p>-2</text:p>
          </table:table-cell>
          <table:table-cell table:style-name="ce40" table:formula="of:=[$Lind.R12]" office:value-type="float" office:value="-2" calcext:value-type="float">
            <text:p>-2</text:p>
          </table:table-cell>
          <table:table-cell table:style-name="ce35" table:formula="of:=[$Lind.S12]" office:value-type="float" office:value="1" calcext:value-type="float">
            <text:p>1</text:p>
          </table:table-cell>
          <table:table-cell table:style-name="ce40" table:formula="of:=[$Lind.T12]" office:value-type="float" office:value="1" calcext:value-type="float">
            <text:p>1</text:p>
          </table:table-cell>
          <table:table-cell table:style-name="ce40" table:formula="of:=[$Lind.U12]" office:value-type="float" office:value="-3" calcext:value-type="float">
            <text:p>-3</text:p>
          </table:table-cell>
          <table:table-cell table:style-name="ce40" table:formula="of:=[$Lind.V12]" office:value-type="float" office:value="-3" calcext:value-type="float">
            <text:p>-3</text:p>
          </table:table-cell>
          <table:table-cell table:style-name="ce40" table:formula="of:=[$Lind.W12]" office:value-type="float" office:value="-3" calcext:value-type="float">
            <text:p>-3</text:p>
          </table:table-cell>
          <table:table-cell table:style-name="ce40" table:formula="of:=[$Lind.X12]" office:value-type="float" office:value="5" calcext:value-type="float">
            <text:p>5</text:p>
          </table:table-cell>
          <table:table-cell table:style-name="ce40" table:formula="of:=[$Lind.Y12]" office:value-type="float" office:value="5" calcext:value-type="float">
            <text:p>5</text:p>
          </table:table-cell>
          <table:table-cell table:style-name="ce40" table:formula="of:=[$Lind.Z12]" office:value-type="float" office:value="-1" calcext:value-type="float">
            <text:p>-1</text:p>
          </table:table-cell>
          <table:table-cell table:style-name="ce40" table:formula="of:=[$Lind.AA12]" office:value-type="float" office:value="-1" calcext:value-type="float">
            <text:p>-1</text:p>
          </table:table-cell>
          <table:table-cell table:style-name="ce40" table:formula="of:=[$Lind.AB12]" office:value-type="float" office:value="-1" calcext:value-type="float">
            <text:p>-1</text:p>
          </table:table-cell>
          <table:table-cell table:style-name="ce40" table:formula="of:=[$Lind.AC12]" office:value-type="float" office:value="3" calcext:value-type="float">
            <text:p>3</text:p>
          </table:table-cell>
          <table:table-cell table:style-name="ce40" table:formula="of:=[$Lind.AD12]" office:value-type="float" office:value="3" calcext:value-type="float">
            <text:p>3</text:p>
          </table:table-cell>
          <table:table-cell table:style-name="ce40" table:formula="of:=[$Lind.AE12]" office:value-type="float" office:value="-2" calcext:value-type="float">
            <text:p>-2</text:p>
          </table:table-cell>
          <table:table-cell table:style-name="ce40" table:formula="of:=[$Lind.AF12]" office:value-type="float" office:value="-5" calcext:value-type="float">
            <text:p>-5</text:p>
          </table:table-cell>
          <table:table-cell table:style-name="ce50" table:formula="of:=[$Lind.AG12]" office:value-type="float" office:value="-5" calcext:value-type="float">
            <text:p>-5</text:p>
          </table:table-cell>
          <table:table-cell table:style-name="ce40" table:formula="of:=[$Lind.AH12]" office:value-type="float" office:value="3" calcext:value-type="float">
            <text:p>3</text:p>
          </table:table-cell>
          <table:table-cell table:style-name="ce40" table:formula="of:=[$Lind.AI12]" office:value-type="float" office:value="3" calcext:value-type="float">
            <text:p>3</text:p>
          </table:table-cell>
          <table:table-cell table:style-name="ce40" table:formula="of:=[$Lind.AJ12]" office:value-type="float" office:value="4" calcext:value-type="float">
            <text:p>4</text:p>
          </table:table-cell>
          <table:table-cell table:style-name="ce40" table:formula="of:=[$Lind.AK12]" office:value-type="float" office:value="-2" calcext:value-type="float">
            <text:p>-2</text:p>
          </table:table-cell>
          <table:table-cell table:style-name="ce40" table:formula="of:=[$Lind.AL12]" office:value-type="float" office:value="-2" calcext:value-type="float">
            <text:p>-2</text:p>
          </table:table-cell>
          <table:table-cell table:style-name="ce40" table:formula="of:=[$Lind.AM12]" office:value-type="float" office:value="1" calcext:value-type="float">
            <text:p>1</text:p>
          </table:table-cell>
          <table:table-cell table:style-name="ce40" table:formula="of:=[$Lind.AN12]" office:value-type="float" office:value="-4" calcext:value-type="float">
            <text:p>-4</text:p>
          </table:table-cell>
          <table:table-cell table:style-name="ce40" table:formula="of:=[$Lind.AO12]" office:value-type="float" office:value="-3" calcext:value-type="float">
            <text:p>-3</text:p>
          </table:table-cell>
          <table:table-cell table:style-name="ce40" table:formula="of:=[$Lind.AP12]" office:value-type="float" office:value="0" calcext:value-type="float">
            <text:p>0</text:p>
          </table:table-cell>
          <table:table-cell table:style-name="ce50" table:formula="of:=[$Lind.AQ12]" office:value-type="float" office:value="0" calcext:value-type="float">
            <text:p>0</text:p>
          </table:table-cell>
          <table:table-cell table:style-name="ce40" table:formula="of:=[$Lind.AR12]" office:value-type="float" office:value="0" calcext:value-type="float">
            <text:p>0</text:p>
          </table:table-cell>
          <table:table-cell table:style-name="ce40" table:formula="of:=[$Lind.AS12]" office:value-type="float" office:value="0" calcext:value-type="float">
            <text:p>0</text:p>
          </table:table-cell>
          <table:table-cell table:style-name="ce40" table:formula="of:=[$Lind.AT12]" office:value-type="float" office:value="0" calcext:value-type="float">
            <text:p>0</text:p>
          </table:table-cell>
          <table:table-cell table:style-name="ce40" table:formula="of:=[$Lind.AU12]" office:value-type="float" office:value="0" calcext:value-type="float">
            <text:p>0</text:p>
          </table:table-cell>
          <table:table-cell table:style-name="ce40" table:formula="of:=[$Lind.AV12]" office:value-type="float" office:value="0" calcext:value-type="float">
            <text:p>0</text:p>
          </table:table-cell>
          <table:table-cell table:style-name="ce40" table:formula="of:=[$Lind.AW12]" office:value-type="float" office:value="0" calcext:value-type="float">
            <text:p>0</text:p>
          </table:table-cell>
          <table:table-cell table:style-name="ce40" table:formula="of:=[$Lind.AX12]" office:value-type="float" office:value="0" calcext:value-type="float">
            <text:p>0</text:p>
          </table:table-cell>
          <table:table-cell table:style-name="ce40" table:formula="of:=[$Lind.AY12]" office:value-type="float" office:value="0" calcext:value-type="float">
            <text:p>0</text:p>
          </table:table-cell>
          <table:table-cell/>
          <table:table-cell table:formula="of:=[.BA16]+0.002" office:value-type="float" office:value="0.004" calcext:value-type="float">
            <text:p>0.004</text:p>
          </table:table-cell>
          <table:table-cell table:formula="of:=[.BA17]*[.$D$6]" office:value-type="float" office:value="0.201061929829747" calcext:value-type="float">
            <text:p>0.201</text:p>
          </table:table-cell>
          <table:table-cell table:formula="of:=[.D$25]*[.$Z$5]*MAGNET([.D$24]+[.BB17])+[.E$25]*[.$Z$5]*MAGNET([.E$24]+[.BB17])+[.F$25]*[.$Z$5]*MAGNET([.F$24]+[.BB17])+[.G$25]*[.$Z$5]*MAGNET([.G$24]+[.BB17])+[.H$25]*[.$Z$5]*MAGNET([.H$24]+[.BB17])+[.I$25]*[.$Z$5]*MAGNET([.I$24]+[.BB17])+[.J$25]*[.$Z$5]*MAGNET([.J$24]+[.BB17])+[.K$25]*[.$Z$5]*MAGNET([.K$24]+[.BB17])+[.L$25]*[.$Z$5]*MAGNET([.L$24]+[.BB17])+[.M$25]*[.$Z$5]*MAGNET([.M$24]+[.BB17])+[.N$25]*[.$Z$5]*MAGNET([.N$24]+[.BB17])+[.O$25]*[.$Z$5]*MAGNET([.O$24]+[.BB17])+[.P$25]*[.$Z$5]*MAGNET([.P$24]+[.BB17])+[.Q$25]*[.$Z$5]*MAGNET([.Q$24]+[.BB17])+[.R$25]*[.$Z$5]*MAGNET([.R$24]+[.BB17])+[.S$25]*[.$Z$5]*MAGNET([.S$24]+[.BB17])+[.T$25]*[.$Z$5]*MAGNET([.T$24]+[.BB17])+[.U$25]*[.$Z$5]*MAGNET([.U$24]+[.BB17])+[.V$25]*[.$Z$5]*MAGNET([.V$24]+[.BB17])+[.W$25]*[.$Z$5]*MAGNET([.W$24]+[.BB17])+[.X$25]*[.$Z$5]*MAGNET([.X$24]+[.BB17])+[.Y$25]*[.$Z$5]*MAGNET([.Y$24]+[.BB17])+[.Z$25]*[.$Z$5]*MAGNET([.Z$24]+[.BB17])+[.AA$25]*[.$Z$5]*MAGNET([.AA$24]+[.BB17])+[.AB$25]*[.$Z$5]*MAGNET([.AB$24]+[.BB17])+[.AC$25]*[.$Z$5]*MAGNET([.AC$24]+[.BB17])+[.AD$25]*[.$Z$5]*MAGNET([.AD$24]+[.BB17])+[.AE$25]*[.$Z$5]*MAGNET([.AE$24]+[.BB17])+[.AF$25]*[.$Z$5]*MAGNET([.AF$24]+[.BB17])+[.AG$25]*[.$Z$5]*MAGNET([.AG$24]+[.BB17])+[.AH$25]*[.$Z$5]*MAGNET([.AH$24]+[.BB17]) +[.AI$25]*[.$Z$5]*MAGNET([.AI$24]+[.BB17]) +[.AJ$25]*[.$Z$5]*MAGNET([.AJ$24]+[.BB17]) +[.AK$25]*[.$Z$5]*MAGNET([.AK$24]+[.BB17]) +[.AL$25]*[.$Z$5]*MAGNET([.AL$24]+[.BB17]) +[.AM$25]*[.$Z$5]*MAGNET([.AM$24]+[.BB17]) +[.AN$25]*[.$Z$5]*MAGNET([.AN$24]+[.BB17]) +[.AO$25]*[.$Z$5]*MAGNET([.AO$24]+[.BB17])+RAND()*[.$BC$13]+[.AP$25]*[.$Z$5]*MAGNET([.AP$24]+[.BB17])&#10;+[.AQ$25]*[.$Z$5]*MAGNET([.AQ$24]+[.BB17])&#10;+[.AR$25]*[.$Z$5]*MAGNET([.AR$24]+[.BB17])&#10;+[.AS$25]*[.$Z$5]*MAGNET([.AS$24]+[.BB17])&#10;+[.AT$25]*[.$Z$5]*MAGNET([.AT$24]+[.BB17])&#10;+[.AU$25]*[.$Z$5]*MAGNET([.AU$24]+[.BB17])&#10;+[.AV$25]*[.$Z$5]*MAGNET([.AV$24]+[.BB17])&#10;+[.AW$25]*[.$Z$5]*MAGNET([.AW$24]+[.BB17])&#10;+[.AX$25]*[.$Z$5]*MAGNET([.AX$24]+[.BB17])&#10;+[.AY$25]*[.$Z$5]*MAGNET([.AY$24]+[.BB17])" office:value-type="float" office:value="-18.4705433600629" calcext:value-type="float">
            <text:p>-18.47</text:p>
          </table:table-cell>
          <table:table-cell table:style-name="ce70" table:formula="of:=[.E$26]*[.$Z$5]*MAGNET([.E$24]+[.$BB17])+[.F$26]*[.$Z$5]*MAGNET([.F$24]+[.$BB17])+[.G$26]*[.$Z$5]*MAGNET([.G$24]+[.$BB17])+[.H$26]*[.$Z$5]*MAGNET([.H$24]+[.$BB17])+[.I$26]*[.$Z$5]*MAGNET([.I$24]+[.$BB17])+[.J$26]*[.$Z$5]*MAGNET([.J$24]+[.$BB17])+[.K$26]*[.$Z$5]*MAGNET([.K$24]+[.$BB17])+[.L$26]*[.$Z$5]*MAGNET([.L$24]+[.$BB17])+[.M$26]*[.$Z$5]*MAGNET([.M$24]+[.$BB17])+[.N$26]*[.$Z$5]*MAGNET([.N$24]+[.$BB17])+[.O$26]*[.$Z$5]*MAGNET([.O$24]+[.$BB17])+[.P$26]*[.$Z$5]*MAGNET([.P$24]+[.$BB17])+[.Q$26]*[.$Z$5]*MAGNET([.Q$24]+[.$BB17])+[.R$26]*[.$Z$5]*MAGNET([.R$24]+[.$BB17])+[.S$26]*[.$Z$5]*MAGNET([.S$24]+[.$BB17])+[.T$26]*[.$Z$5]*MAGNET([.T$24]+[.$BB17])+[.U$26]*[.$Z$5]*MAGNET([.U$24]+[.$BB17])+[.V$26]*[.$Z$5]*MAGNET([.V$24]+[.$BB17])+[.W$26]*[.$Z$5]*MAGNET([.W$24]+[.$BB17])+[.X$26]*[.$Z$5]*MAGNET([.X$24]+[.$BB17])+[.Y$26]*[.$Z$5]*MAGNET([.Y$24]+[.$BB17])+[.Z$26]*[.$Z$5]*MAGNET([.Z$24]+[.$BB17])+[.AA$26]*[.$Z$5]*MAGNET([.AA$24]+[.$BB17])+[.AB$26]*[.$Z$5]*MAGNET([.AB$24]+[.$BB17])+[.AC$26]*[.$Z$5]*MAGNET([.AC$24]+[.$BB17])+[.AD$26]*[.$Z$5]*MAGNET([.AD$24]+[.$BB17])+[.AE$26]*[.$Z$5]*MAGNET([.AE$24]+[.$BB17])+[.AF$26]*[.$Z$5]*MAGNET([.AF$24]+[.$BB17])+[.AG$26]*[.$Z$5]*MAGNET([.AG$24]+[.$BB17])+[.D$26]*[.$Z$5]*MAGNET([.D$24]+[.$BB17])+[.AH$26]*[.$Z$5]*MAGNET([.AH$24]+[.BB17]) +[.AI$26]*[.$Z$5]*MAGNET([.AI$24]+[.BB17]) +[.AJ$26]*[.$Z$5]*MAGNET([.AJ$24]+[.BB17]) +[.AK$26]*[.$Z$5]*MAGNET([.AK$24]+[.BB17]) +[.AL$26]*[.$Z$5]*MAGNET([.AL$24]+[.BB17]) +[.AM$26]*[.$Z$5]*MAGNET([.AM$24]+[.BB17]) +[.AN$26]*[.$Z$5]*MAGNET([.AN$24]+[.BB17]) +[.AO$26]*[.$Z$5]*MAGNET([.AO$24]+[.BB17]) +[.AP$26]*[.$Z$5]*MAGNET([.AP$24]+[.$BB17])&#10;+[.AQ$26]*[.$Z$5]*MAGNET([.AQ$24]+[.$BB17])&#10;+[.AR$26]*[.$Z$5]*MAGNET([.AR$24]+[.$BB17])&#10;+[.AS$26]*[.$Z$5]*MAGNET([.AS$24]+[.$BB17])&#10;+[.AT$26]*[.$Z$5]*MAGNET([.AT$24]+[.$BB17])&#10;+[.AU$26]*[.$Z$5]*MAGNET([.AU$24]+[.$BB17])&#10;+[.AV$26]*[.$Z$5]*MAGNET([.AV$24]+[.$BB17])&#10;+[.AW$26]*[.$Z$5]*MAGNET([.AW$24]+[.$BB17])&#10;+[.AX$26]*[.$Z$5]*MAGNET([.AX$24]+[.$BB17])&#10;+[.AY$26]*[.$Z$5]*MAGNET([.AY$24]+[.$BB17]) +RAND()*[.$BD$13]" office:value-type="float" office:value="85.835176858078" calcext:value-type="float">
            <text:p>85.84</text:p>
          </table:table-cell>
          <table:table-cell table:style-name="ce71" table:formula="of:=[.E$27]*[.$Z$5]*MAGNET([.E$24]+[.$BB17])+[.F$27]*[.$Z$5]*MAGNET([.F$24]+[.$BB17])+[.G$27]*[.$Z$5]*MAGNET([.G$24]+[.$BB17])+[.H$27]*[.$Z$5]*MAGNET([.H$24]+[.$BB17])+[.I$27]*[.$Z$5]*MAGNET([.I$24]+[.$BB17])+[.J$27]*[.$Z$5]*MAGNET([.J$24]+[.$BB17])+[.K$27]*[.$Z$5]*MAGNET([.K$24]+[.$BB17])+[.L$27]*[.$Z$5]*MAGNET([.L$24]+[.$BB17])+[.M$27]*[.$Z$5]*MAGNET([.M$24]+[.$BB17])+[.N$27]*[.$Z$5]*MAGNET([.N$24]+[.$BB17])+[.O$27]*[.$Z$5]*MAGNET([.O$24]+[.$BB17])+[.P$27]*[.$Z$5]*MAGNET([.P$24]+[.$BB17])+[.Q$27]*[.$Z$5]*MAGNET([.Q$24]+[.$BB17])+[.R$27]*[.$Z$5]*MAGNET([.R$24]+[.$BB17])+[.S$27]*[.$Z$5]*MAGNET([.S$24]+[.$BB17])+[.T$27]*[.$Z$5]*MAGNET([.T$24]+[.$BB17])+[.U$27]*[.$Z$5]*MAGNET([.U$24]+[.$BB17])+[.V$27]*[.$Z$5]*MAGNET([.V$24]+[.$BB17])+[.W$27]*[.$Z$5]*MAGNET([.W$24]+[.$BB17])+[.X$27]*[.$Z$5]*MAGNET([.X$24]+[.$BB17])+[.Y$27]*[.$Z$5]*MAGNET([.Y$24]+[.$BB17])+[.Z$27]*[.$Z$5]*MAGNET([.Z$24]+[.$BB17])+[.AA$27]*[.$Z$5]*MAGNET([.AA$24]+[.$BB17])+[.AB$27]*[.$Z$5]*MAGNET([.AB$24]+[.$BB17])+[.AC$27]*[.$Z$5]*MAGNET([.AC$24]+[.$BB17])+[.AD$27]*[.$Z$5]*MAGNET([.AD$24]+[.$BB17])+[.AE$27]*[.$Z$5]*MAGNET([.AE$24]+[.$BB17])+[.AF$27]*[.$Z$5]*MAGNET([.AF$24]+[.$BB17])+[.AG$27]*[.$Z$5]*MAGNET([.AG$24]+[.$BB17])+[.D$27]*[.$Z$5]*MAGNET([.D$24]+[.$BB17])+[.AH$27]*[.$Z$5]*MAGNET([.AH$24]+[.BB17]) +[.AI$27]*[.$Z$5]*MAGNET([.AI$24]+[.BB17]) +[.AJ$27]*[.$Z$5]*MAGNET([.AJ$24]+[.BB17]) +[.AK$27]*[.$Z$5]*MAGNET([.AK$24]+[.BB17]) +[.AL$27]*[.$Z$5]*MAGNET([.AL$24]+[.BB17]) +[.AM$27]*[.$Z$5]*MAGNET([.AM$24]+[.BB17]) +[.AN$27]*[.$Z$5]*MAGNET([.AN$24]+[.BB17]) +[.AO$27]*[.$Z$5]*MAGNET([.AO$24]+[.BB17]) +[.AP$27]*[.$Z$5]*MAGNET([.AP$24]+[.$BB17])&#10;+[.AQ$27]*[.$Z$5]*MAGNET([.AQ$24]+[.$BB17])&#10;+[.AR$27]*[.$Z$5]*MAGNET([.AR$24]+[.$BB17])&#10;+[.AS$27]*[.$Z$5]*MAGNET([.AS$24]+[.$BB17])&#10;+[.AT$27]*[.$Z$5]*MAGNET([.AT$24]+[.$BB17])&#10;+[.AU$27]*[.$Z$5]*MAGNET([.AU$24]+[.$BB17])&#10;+[.AV$27]*[.$Z$5]*MAGNET([.AV$24]+[.$BB17])&#10;+[.AW$27]*[.$Z$5]*MAGNET([.AW$24]+[.$BB17])&#10;+[.AX$27]*[.$Z$5]*MAGNET([.AX$24]+[.$BB17])&#10;+[.AY$27]*[.$Z$5]*MAGNET([.AY$24]+[.$BB17]) +RAND()*[.$BE$13]" office:value-type="float" office:value="-75.7055302276573" calcext:value-type="float">
            <text:p>-75.7055302276573</text:p>
          </table:table-cell>
          <table:table-cell table:style-name="ce71" table:formula="of:=[.E$28]*[.$Z$5]*MAGNET([.E$24]+[.$BB17])+[.F$28]*[.$Z$5]*MAGNET([.F$24]+[.$BB17])+[.G$28]*[.$Z$5]*MAGNET([.G$24]+[.$BB17])+[.H$28]*[.$Z$5]*MAGNET([.H$24]+[.$BB17])+[.I$28]*[.$Z$5]*MAGNET([.I$24]+[.$BB17])+[.J$28]*[.$Z$5]*MAGNET([.J$24]+[.$BB17])+[.K$28]*[.$Z$5]*MAGNET([.K$24]+[.$BB17])+[.L$28]*[.$Z$5]*MAGNET([.L$24]+[.$BB17])+[.M$28]*[.$Z$5]*MAGNET([.M$24]+[.$BB17])+[.N$28]*[.$Z$5]*MAGNET([.N$24]+[.$BB17])+[.O$28]*[.$Z$5]*MAGNET([.O$24]+[.$BB17])+[.P$28]*[.$Z$5]*MAGNET([.P$24]+[.$BB17])+[.Q$28]*[.$Z$5]*MAGNET([.Q$24]+[.$BB17])+[.R$28]*[.$Z$5]*MAGNET([.R$24]+[.$BB17])+[.S$28]*[.$Z$5]*MAGNET([.S$24]+[.$BB17])+[.T$28]*[.$Z$5]*MAGNET([.T$24]+[.$BB17])+[.U$28]*[.$Z$5]*MAGNET([.U$24]+[.$BB17])+[.V$28]*[.$Z$5]*MAGNET([.V$24]+[.$BB17])+[.W$28]*[.$Z$5]*MAGNET([.W$24]+[.$BB17])+[.X$28]*[.$Z$5]*MAGNET([.X$24]+[.$BB17])+[.Y$28]*[.$Z$5]*MAGNET([.Y$24]+[.$BB17])+[.Z$28]*[.$Z$5]*MAGNET([.Z$24]+[.$BB17])+[.AA$28]*[.$Z$5]*MAGNET([.AA$24]+[.$BB17])+[.AB$28]*[.$Z$5]*MAGNET([.AB$24]+[.$BB17])+[.AC$28]*[.$Z$5]*MAGNET([.AC$24]+[.$BB17])+[.AD$28]*[.$Z$5]*MAGNET([.AD$24]+[.$BB17])+[.AE$28]*[.$Z$5]*MAGNET([.AE$24]+[.$BB17])+[.AF$28]*[.$Z$5]*MAGNET([.AF$24]+[.$BB17])+[.AG$28]*[.$Z$5]*MAGNET([.AG$24]+[.$BB17])+[.D$28]*[.$Z$5]*MAGNET([.D$24]+[.$BB17])+[.AH$28]*[.$Z$5]*MAGNET([.AH$24]+[.BB17]) +[.AI$28]*[.$Z$5]*MAGNET([.AI$24]+[.BB17]) +[.AJ$28]*[.$Z$5]*MAGNET([.AJ$24]+[.BB17]) +[.AK$28]*[.$Z$5]*MAGNET([.AK$24]+[.BB17]) +[.AL$28]*[.$Z$5]*MAGNET([.AL$24]+[.BB17]) +[.AM$28]*[.$Z$5]*MAGNET([.AM$24]+[.BB17]) +[.AN$28]*[.$Z$5]*MAGNET([.AN$24]+[.BB17]) +[.AO$28]*[.$Z$5]*MAGNET([.AO$24]+[.BB17]) +[.AP$28]*[.$Z$5]*MAGNET([.AP$24]+[.$BB17])&#10;+[.AQ$28]*[.$Z$5]*MAGNET([.AQ$24]+[.$BB17])&#10;+[.AR$28]*[.$Z$5]*MAGNET([.AR$24]+[.$BB17])&#10;+[.AS$28]*[.$Z$5]*MAGNET([.AS$24]+[.$BB17])&#10;+[.AT$28]*[.$Z$5]*MAGNET([.AT$24]+[.$BB17])&#10;+[.AU$28]*[.$Z$5]*MAGNET([.AU$24]+[.$BB17])&#10;+[.AV$28]*[.$Z$5]*MAGNET([.AV$24]+[.$BB17])&#10;+[.AW$28]*[.$Z$5]*MAGNET([.AW$24]+[.$BB17])&#10;+[.AX$28]*[.$Z$5]*MAGNET([.AX$24]+[.$BB17])&#10;+[.AY$28]*[.$Z$5]*MAGNET([.AY$24]+[.$BB17]) +RAND()*[.$BF$13]" office:value-type="float" office:value="-9.67611219457773" calcext:value-type="float">
            <text:p>-9.67611219457773</text:p>
          </table:table-cell>
          <table:table-cell table:style-name="ce71" table:formula="of:=[.E$29]*[.$Z$5]*MAGNET([.E$24]+[.$BB17])+[.F$29]*[.$Z$5]*MAGNET([.F$24]+[.$BB17])+[.G$29]*[.$Z$5]*MAGNET([.G$24]+[.$BB17])+[.H$29]*[.$Z$5]*MAGNET([.H$24]+[.$BB17])+[.I$29]*[.$Z$5]*MAGNET([.I$24]+[.$BB17])+[.J$29]*[.$Z$5]*MAGNET([.J$24]+[.$BB17])+[.K$29]*[.$Z$5]*MAGNET([.K$24]+[.$BB17])+[.L$29]*[.$Z$5]*MAGNET([.L$24]+[.$BB17])+[.M$29]*[.$Z$5]*MAGNET([.M$24]+[.$BB17])+[.N$29]*[.$Z$5]*MAGNET([.N$24]+[.$BB17])+[.O$29]*[.$Z$5]*MAGNET([.O$24]+[.$BB17])+[.P$29]*[.$Z$5]*MAGNET([.P$24]+[.$BB17])+[.Q$29]*[.$Z$5]*MAGNET([.Q$24]+[.$BB17])+[.R$29]*[.$Z$5]*MAGNET([.R$24]+[.$BB17])+[.S$29]*[.$Z$5]*MAGNET([.S$24]+[.$BB17])+[.T$29]*[.$Z$5]*MAGNET([.T$24]+[.$BB17])+[.U$29]*[.$Z$5]*MAGNET([.U$24]+[.$BB17])+[.V$29]*[.$Z$5]*MAGNET([.V$24]+[.$BB17])+[.W$29]*[.$Z$5]*MAGNET([.W$24]+[.$BB17])+[.X$29]*[.$Z$5]*MAGNET([.X$24]+[.$BB17])+[.Y$29]*[.$Z$5]*MAGNET([.Y$24]+[.$BB17])+[.Z$29]*[.$Z$5]*MAGNET([.Z$24]+[.$BB17])+[.AA$29]*[.$Z$5]*MAGNET([.AA$24]+[.$BB17])+[.AB$29]*[.$Z$5]*MAGNET([.AB$24]+[.$BB17])+[.AC$29]*[.$Z$5]*MAGNET([.AC$24]+[.$BB17])+[.AD$29]*[.$Z$5]*MAGNET([.AD$24]+[.$BB17])+[.AE$29]*[.$Z$5]*MAGNET([.AE$24]+[.$BB17])+[.AF$29]*[.$Z$5]*MAGNET([.AF$24]+[.$BB17])+[.AG$29]*[.$Z$5]*MAGNET([.AG$24]+[.$BB17])+[.D$29]*[.$Z$5]*MAGNET([.D$24]+[.$BB17])+[.AH$29]*[.$Z$5]*MAGNET([.AH$24]+[.BB17]) +[.AI$29]*[.$Z$5]*MAGNET([.AI$24]+[.BB17]) +[.AJ$29]*[.$Z$5]*MAGNET([.AJ$24]+[.BB17]) +[.AK$29]*[.$Z$5]*MAGNET([.AK$24]+[.BB17]) +[.AL$29]*[.$Z$5]*MAGNET([.AL$24]+[.BB17]) +[.AM$29]*[.$Z$5]*MAGNET([.AM$24]+[.BB17]) +[.AN$29]*[.$Z$5]*MAGNET([.AN$24]+[.BB17]) +[.AO$29]*[.$Z$5]*MAGNET([.AO$24]+[.BB17]) +[.AP$29]*[.$Z$5]*MAGNET([.AP$24]+[.$BB17])&#10;+[.AQ$29]*[.$Z$5]*MAGNET([.AQ$24]+[.$BB17])&#10;+[.AR$29]*[.$Z$5]*MAGNET([.AR$24]+[.$BB17])&#10;+[.AS$29]*[.$Z$5]*MAGNET([.AS$24]+[.$BB17])&#10;+[.AT$29]*[.$Z$5]*MAGNET([.AT$24]+[.$BB17])&#10;+[.AU$29]*[.$Z$5]*MAGNET([.AU$24]+[.$BB17])&#10;+[.AV$29]*[.$Z$5]*MAGNET([.AV$24]+[.$BB17])&#10;+[.AW$29]*[.$Z$5]*MAGNET([.AW$24]+[.$BB17])&#10;+[.AX$29]*[.$Z$5]*MAGNET([.AX$24]+[.$BB17])&#10;+[.AY$29]*[.$Z$5]*MAGNET([.AY$24]+[.$BB17]) +RAND()*[.$BG$13]" office:value-type="float" office:value="38.22153236139" calcext:value-type="float">
            <text:p>38.22153236139</text:p>
          </table:table-cell>
          <table:table-cell table:style-name="ce71" table:formula="of:=[.E$30]*[.$Z$5]*MAGNET([.E$24]+[.$BB17])+[.F$30]*[.$Z$5]*MAGNET([.F$24]+[.$BB17])+[.G$30]*[.$Z$5]*MAGNET([.G$24]+[.$BB17])+[.H$30]*[.$Z$5]*MAGNET([.H$24]+[.$BB17])+[.I$30]*[.$Z$5]*MAGNET([.I$24]+[.$BB17])+[.J$30]*[.$Z$5]*MAGNET([.J$24]+[.$BB17])+[.K$30]*[.$Z$5]*MAGNET([.K$24]+[.$BB17])+[.L$30]*[.$Z$5]*MAGNET([.L$24]+[.$BB17])+[.M$30]*[.$Z$5]*MAGNET([.M$24]+[.$BB17])+[.N$30]*[.$Z$5]*MAGNET([.N$24]+[.$BB17])+[.O$30]*[.$Z$5]*MAGNET([.O$24]+[.$BB17])+[.P$30]*[.$Z$5]*MAGNET([.P$24]+[.$BB17])+[.Q$30]*[.$Z$5]*MAGNET([.Q$24]+[.$BB17])+[.R$30]*[.$Z$5]*MAGNET([.R$24]+[.$BB17])+[.S$30]*[.$Z$5]*MAGNET([.S$24]+[.$BB17])+[.T$30]*[.$Z$5]*MAGNET([.T$24]+[.$BB17])+[.U$30]*[.$Z$5]*MAGNET([.U$24]+[.$BB17])+[.V$30]*[.$Z$5]*MAGNET([.V$24]+[.$BB17])+[.W$30]*[.$Z$5]*MAGNET([.W$24]+[.$BB17])+[.X$30]*[.$Z$5]*MAGNET([.X$24]+[.$BB17])+[.Y$30]*[.$Z$5]*MAGNET([.Y$24]+[.$BB17])+[.Z$30]*[.$Z$5]*MAGNET([.Z$24]+[.$BB17])+[.AA$30]*[.$Z$5]*MAGNET([.AA$24]+[.$BB17])+[.AB$30]*[.$Z$5]*MAGNET([.AB$24]+[.$BB17])+[.AC$30]*[.$Z$5]*MAGNET([.AC$24]+[.$BB17])+[.AD$30]*[.$Z$5]*MAGNET([.AD$24]+[.$BB17])+[.AE$30]*[.$Z$5]*MAGNET([.AE$24]+[.$BB17])+[.AF$30]*[.$Z$5]*MAGNET([.AF$24]+[.$BB17])+[.AG$30]*[.$Z$5]*MAGNET([.AG$24]+[.$BB17])+[.D$30]*[.$Z$5]*MAGNET([.D$24]+[.$BB17])+[.AH$30]*[.$Z$5]*MAGNET([.AH$24]+[.BB17]) +[.AI$30]*[.$Z$5]*MAGNET([.AI$24]+[.BB17]) +[.AJ$30]*[.$Z$5]*MAGNET([.AJ$24]+[.BB17]) +[.AK$30]*[.$Z$5]*MAGNET([.AK$24]+[.BB17]) +[.AL$30]*[.$Z$5]*MAGNET([.AL$24]+[.BB17]) +[.AM$30]*[.$Z$5]*MAGNET([.AM$24]+[.BB17]) +[.AN$30]*[.$Z$5]*MAGNET([.AN$24]+[.BB17]) +[.AO$30]*[.$Z$5]*MAGNET([.AO$24]+[.BB17]) +[.AP$30]*[.$Z$5]*MAGNET([.AP$24]+[.$BB17])&#10;+[.AQ$30]*[.$Z$5]*MAGNET([.AQ$24]+[.$BB17])&#10;+[.AR$30]*[.$Z$5]*MAGNET([.AR$24]+[.$BB17])&#10;+[.AS$30]*[.$Z$5]*MAGNET([.AS$24]+[.$BB17])&#10;+[.AT$30]*[.$Z$5]*MAGNET([.AT$24]+[.$BB17])&#10;+[.AU$30]*[.$Z$5]*MAGNET([.AU$24]+[.$BB17])&#10;+[.AV$30]*[.$Z$5]*MAGNET([.AV$24]+[.$BB17])&#10;+[.AW$30]*[.$Z$5]*MAGNET([.AW$24]+[.$BB17])&#10;+[.AX$30]*[.$Z$5]*MAGNET([.AX$24]+[.$BB17])&#10;+[.AY$30]*[.$Z$5]*MAGNET([.AY$24]+[.$BB17]) +RAND()*[.$BH$13]" office:value-type="float" office:value="0" calcext:value-type="float">
            <text:p>0</text:p>
          </table:table-cell>
          <table:table-cell table:style-name="ce71" table:formula="of:=[.E$31]*[.$Z$5]*MAGNET([.E$24]+[.$BB17])+[.F$31]*[.$Z$5]*MAGNET([.F$24]+[.$BB17])+[.G$31]*[.$Z$5]*MAGNET([.G$24]+[.$BB17])+[.H$31]*[.$Z$5]*MAGNET([.H$24]+[.$BB17])+[.I$31]*[.$Z$5]*MAGNET([.I$24]+[.$BB17])+[.J$31]*[.$Z$5]*MAGNET([.J$24]+[.$BB17])+[.K$31]*[.$Z$5]*MAGNET([.K$24]+[.$BB17])+[.L$31]*[.$Z$5]*MAGNET([.L$24]+[.$BB17])+[.M$31]*[.$Z$5]*MAGNET([.M$24]+[.$BB17])+[.N$31]*[.$Z$5]*MAGNET([.N$24]+[.$BB17])+[.O$31]*[.$Z$5]*MAGNET([.O$24]+[.$BB17])+[.P$31]*[.$Z$5]*MAGNET([.P$24]+[.$BB17])+[.Q$31]*[.$Z$5]*MAGNET([.Q$24]+[.$BB17])+[.R$31]*[.$Z$5]*MAGNET([.R$24]+[.$BB17])+[.S$31]*[.$Z$5]*MAGNET([.S$24]+[.$BB17])+[.T$31]*[.$Z$5]*MAGNET([.T$24]+[.$BB17])+[.U$31]*[.$Z$5]*MAGNET([.U$24]+[.$BB17])+[.V$31]*[.$Z$5]*MAGNET([.V$24]+[.$BB17])+[.W$31]*[.$Z$5]*MAGNET([.W$24]+[.$BB17])+[.X$31]*[.$Z$5]*MAGNET([.X$24]+[.$BB17])+[.Y$31]*[.$Z$5]*MAGNET([.Y$24]+[.$BB17])+[.Z$31]*[.$Z$5]*MAGNET([.Z$24]+[.$BB17])+[.AA$31]*[.$Z$5]*MAGNET([.AA$24]+[.$BB17])+[.AB$31]*[.$Z$5]*MAGNET([.AB$24]+[.$BB17])+[.AC$31]*[.$Z$5]*MAGNET([.AC$24]+[.$BB17])+[.AD$31]*[.$Z$5]*MAGNET([.AD$24]+[.$BB17])+[.AE$31]*[.$Z$5]*MAGNET([.AE$24]+[.$BB17])+[.AF$31]*[.$Z$5]*MAGNET([.AF$24]+[.$BB17])+[.AG$31]*[.$Z$5]*MAGNET([.AG$24]+[.$BB17])+[.D$31]*[.$Z$5]*MAGNET([.D$24]+[.$BB17])+[.AH$31]*[.$Z$5]*MAGNET([.AH$24]+[.BB17]) +[.AI$31]*[.$Z$5]*MAGNET([.AI$24]+[.BB17]) +[.AJ$31]*[.$Z$5]*MAGNET([.AJ$24]+[.BB17]) +[.AK$31]*[.$Z$5]*MAGNET([.AK$24]+[.BB17]) +[.AL$31]*[.$Z$5]*MAGNET([.AL$24]+[.BB17]) +[.AM$31]*[.$Z$5]*MAGNET([.AM$24]+[.BB17]) +[.AN$31]*[.$Z$5]*MAGNET([.AN$24]+[.BB17]) +[.AO$31]*[.$Z$5]*MAGNET([.AO$24]+[.BB17]) +[.AP$31]*[.$Z$5]*MAGNET([.AP$24]+[.$BB17])&#10;+[.AQ$31]*[.$Z$5]*MAGNET([.AQ$24]+[.$BB17])&#10;+[.AR$31]*[.$Z$5]*MAGNET([.AR$24]+[.$BB17])&#10;+[.AS$31]*[.$Z$5]*MAGNET([.AS$24]+[.$BB17])&#10;+[.AT$31]*[.$Z$5]*MAGNET([.AT$24]+[.$BB17])&#10;+[.AU$31]*[.$Z$5]*MAGNET([.AU$24]+[.$BB17])&#10;+[.AV$31]*[.$Z$5]*MAGNET([.AV$24]+[.$BB17])&#10;+[.AW$31]*[.$Z$5]*MAGNET([.AW$24]+[.$BB17])&#10;+[.AX$31]*[.$Z$5]*MAGNET([.AX$24]+[.$BB17])&#10;+[.AY$31]*[.$Z$5]*MAGNET([.AY$24]+[.$BB17]) +RAND()*[.$BI$13]" office:value-type="float" office:value="0" calcext:value-type="float">
            <text:p>0</text:p>
          </table:table-cell>
          <table:table-cell table:style-name="ce71" table:formula="of:=[.E$32]*[.$Z$5]*MAGNET([.E$24]+[.$BB17])+[.F$32]*[.$Z$5]*MAGNET([.F$24]+[.$BB17])+[.G$32]*[.$Z$5]*MAGNET([.G$24]+[.$BB17])+[.H$32]*[.$Z$5]*MAGNET([.H$24]+[.$BB17])+[.I$32]*[.$Z$5]*MAGNET([.I$24]+[.$BB17])+[.J$32]*[.$Z$5]*MAGNET([.J$24]+[.$BB17])+[.K$32]*[.$Z$5]*MAGNET([.K$24]+[.$BB17])+[.L$32]*[.$Z$5]*MAGNET([.L$24]+[.$BB17])+[.M$32]*[.$Z$5]*MAGNET([.M$24]+[.$BB17])+[.N$32]*[.$Z$5]*MAGNET([.N$24]+[.$BB17])+[.O$32]*[.$Z$5]*MAGNET([.O$24]+[.$BB17])+[.P$32]*[.$Z$5]*MAGNET([.P$24]+[.$BB17])+[.Q$32]*[.$Z$5]*MAGNET([.Q$24]+[.$BB17])+[.R$32]*[.$Z$5]*MAGNET([.R$24]+[.$BB17])+[.S$32]*[.$Z$5]*MAGNET([.S$24]+[.$BB17])+[.T$32]*[.$Z$5]*MAGNET([.T$24]+[.$BB17])+[.U$32]*[.$Z$5]*MAGNET([.U$24]+[.$BB17])+[.V$32]*[.$Z$5]*MAGNET([.V$24]+[.$BB17])+[.W$32]*[.$Z$5]*MAGNET([.W$24]+[.$BB17])+[.X$32]*[.$Z$5]*MAGNET([.X$24]+[.$BB17])+[.Y$32]*[.$Z$5]*MAGNET([.Y$24]+[.$BB17])+[.Z$32]*[.$Z$5]*MAGNET([.Z$24]+[.$BB17])+[.AA$32]*[.$Z$5]*MAGNET([.AA$24]+[.$BB17])+[.AB$32]*[.$Z$5]*MAGNET([.AB$24]+[.$BB17])+[.AC$32]*[.$Z$5]*MAGNET([.AC$24]+[.$BB17])+[.AD$32]*[.$Z$5]*MAGNET([.AD$24]+[.$BB17])+[.AE$32]*[.$Z$5]*MAGNET([.AE$24]+[.$BB17])+[.AF$32]*[.$Z$5]*MAGNET([.AF$24]+[.$BB17])+[.AG$32]*[.$Z$5]*MAGNET([.AG$24]+[.$BB17])+[.D$32]*[.$Z$5]*MAGNET([.D$24]+[.$BB17])+[.AH$32]*[.$Z$5]*MAGNET([.AH$24]+[.BB17]) +[.AI$32]*[.$Z$5]*MAGNET([.AI$24]+[.BB17]) +[.AJ$32]*[.$Z$5]*MAGNET([.AJ$24]+[.BB17]) +[.AK$32]*[.$Z$5]*MAGNET([.AK$24]+[.BB17]) +[.AL$32]*[.$Z$5]*MAGNET([.AL$24]+[.BB17]) +[.AM$32]*[.$Z$5]*MAGNET([.AM$24]+[.BB17]) +[.AN$32]*[.$Z$5]*MAGNET([.AN$24]+[.BB17]) +[.AO$32]*[.$Z$5]*MAGNET([.AO$24]+[.BB17]) +[.AP$32]*[.$Z$5]*MAGNET([.AP$24]+[.$BB17])&#10;+[.AQ$32]*[.$Z$5]*MAGNET([.AQ$24]+[.$BB17])&#10;+[.AR$32]*[.$Z$5]*MAGNET([.AR$24]+[.$BB17])&#10;+[.AS$32]*[.$Z$5]*MAGNET([.AS$24]+[.$BB17])&#10;+[.AT$32]*[.$Z$5]*MAGNET([.AT$24]+[.$BB17])&#10;+[.AU$32]*[.$Z$5]*MAGNET([.AU$24]+[.$BB17])&#10;+[.AV$32]*[.$Z$5]*MAGNET([.AV$24]+[.$BB17])&#10;+[.AW$32]*[.$Z$5]*MAGNET([.AW$24]+[.$BB17])&#10;+[.AX$32]*[.$Z$5]*MAGNET([.AX$24]+[.$BB17])&#10;+[.AY$32]*[.$Z$5]*MAGNET([.AY$24]+[.$BB1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34" table:formula="of:=[$Lind.D13]" office:value-type="float" office:value="1" calcext:value-type="float">
            <text:p>1</text:p>
          </table:table-cell>
          <table:table-cell table:style-name="ce39" table:formula="of:=[$Lind.E13]" office:value-type="float" office:value="1" calcext:value-type="float">
            <text:p>1</text:p>
          </table:table-cell>
          <table:table-cell table:style-name="ce39" table:formula="of:=[$Lind.F13]" office:value-type="float" office:value="-3" calcext:value-type="float">
            <text:p>-3</text:p>
          </table:table-cell>
          <table:table-cell table:style-name="ce39" table:formula="of:=[$Lind.G13]" office:value-type="float" office:value="-3" calcext:value-type="float">
            <text:p>-3</text:p>
          </table:table-cell>
          <table:table-cell table:style-name="ce39" table:formula="of:=[$Lind.H13]" office:value-type="float" office:value="-3" calcext:value-type="float">
            <text:p>-3</text:p>
          </table:table-cell>
          <table:table-cell table:style-name="ce39" table:formula="of:=[$Lind.I13]" office:value-type="float" office:value="2" calcext:value-type="float">
            <text:p>2</text:p>
          </table:table-cell>
          <table:table-cell table:style-name="ce39" table:formula="of:=[$Lind.J13]" office:value-type="float" office:value="2" calcext:value-type="float">
            <text:p>2</text:p>
          </table:table-cell>
          <table:table-cell table:style-name="ce39" table:formula="of:=[$Lind.K13]" office:value-type="float" office:value="-1" calcext:value-type="float">
            <text:p>-1</text:p>
          </table:table-cell>
          <table:table-cell table:style-name="ce39" table:formula="of:=[$Lind.L13]" office:value-type="float" office:value="-1" calcext:value-type="float">
            <text:p>-1</text:p>
          </table:table-cell>
          <table:table-cell table:style-name="ce39" table:formula="of:=[$Lind.M13]" office:value-type="float" office:value="-1" calcext:value-type="float">
            <text:p>-1</text:p>
          </table:table-cell>
          <table:table-cell table:style-name="ce39" table:formula="of:=[$Lind.N13]" office:value-type="float" office:value="3" calcext:value-type="float">
            <text:p>3</text:p>
          </table:table-cell>
          <table:table-cell table:style-name="ce39" table:formula="of:=[$Lind.O13]" office:value-type="float" office:value="3" calcext:value-type="float">
            <text:p>3</text:p>
          </table:table-cell>
          <table:table-cell table:style-name="ce39" table:formula="of:=[$Lind.P13]" office:value-type="float" office:value="-2" calcext:value-type="float">
            <text:p>-2</text:p>
          </table:table-cell>
          <table:table-cell table:style-name="ce39" table:formula="of:=[$Lind.Q13]" office:value-type="float" office:value="-2" calcext:value-type="float">
            <text:p>-2</text:p>
          </table:table-cell>
          <table:table-cell table:style-name="ce39" table:formula="of:=[$Lind.R13]" office:value-type="float" office:value="-2" calcext:value-type="float">
            <text:p>-2</text:p>
          </table:table-cell>
          <table:table-cell table:style-name="ce34" table:formula="of:=[$Lind.S13]" office:value-type="float" office:value="1" calcext:value-type="float">
            <text:p>1</text:p>
          </table:table-cell>
          <table:table-cell table:style-name="ce39" table:formula="of:=[$Lind.T13]" office:value-type="float" office:value="1" calcext:value-type="float">
            <text:p>1</text:p>
          </table:table-cell>
          <table:table-cell table:style-name="ce39" table:formula="of:=[$Lind.U13]" office:value-type="float" office:value="-3" calcext:value-type="float">
            <text:p>-3</text:p>
          </table:table-cell>
          <table:table-cell table:style-name="ce39" table:formula="of:=[$Lind.V13]" office:value-type="float" office:value="-3" calcext:value-type="float">
            <text:p>-3</text:p>
          </table:table-cell>
          <table:table-cell table:style-name="ce39" table:formula="of:=[$Lind.W13]" office:value-type="float" office:value="-3" calcext:value-type="float">
            <text:p>-3</text:p>
          </table:table-cell>
          <table:table-cell table:style-name="ce39" table:formula="of:=[$Lind.X13]" office:value-type="float" office:value="5" calcext:value-type="float">
            <text:p>5</text:p>
          </table:table-cell>
          <table:table-cell table:style-name="ce39" table:formula="of:=[$Lind.Y13]" office:value-type="float" office:value="5" calcext:value-type="float">
            <text:p>5</text:p>
          </table:table-cell>
          <table:table-cell table:style-name="ce39" table:formula="of:=[$Lind.Z13]" office:value-type="float" office:value="-1" calcext:value-type="float">
            <text:p>-1</text:p>
          </table:table-cell>
          <table:table-cell table:style-name="ce39" table:formula="of:=[$Lind.AA13]" office:value-type="float" office:value="-1" calcext:value-type="float">
            <text:p>-1</text:p>
          </table:table-cell>
          <table:table-cell table:style-name="ce39" table:formula="of:=[$Lind.AB13]" office:value-type="float" office:value="-1" calcext:value-type="float">
            <text:p>-1</text:p>
          </table:table-cell>
          <table:table-cell table:style-name="ce39" table:formula="of:=[$Lind.AC13]" office:value-type="float" office:value="3" calcext:value-type="float">
            <text:p>3</text:p>
          </table:table-cell>
          <table:table-cell table:style-name="ce39" table:formula="of:=[$Lind.AD13]" office:value-type="float" office:value="3" calcext:value-type="float">
            <text:p>3</text:p>
          </table:table-cell>
          <table:table-cell table:style-name="ce39" table:formula="of:=[$Lind.AE13]" office:value-type="float" office:value="-2" calcext:value-type="float">
            <text:p>-2</text:p>
          </table:table-cell>
          <table:table-cell table:style-name="ce39" table:formula="of:=[$Lind.AF13]" office:value-type="float" office:value="-5" calcext:value-type="float">
            <text:p>-5</text:p>
          </table:table-cell>
          <table:table-cell table:style-name="ce49" table:formula="of:=[$Lind.AG13]" office:value-type="float" office:value="-5" calcext:value-type="float">
            <text:p>-5</text:p>
          </table:table-cell>
          <table:table-cell table:style-name="ce39" table:formula="of:=[$Lind.AH13]" office:value-type="float" office:value="3" calcext:value-type="float">
            <text:p>3</text:p>
          </table:table-cell>
          <table:table-cell table:style-name="ce39" table:formula="of:=[$Lind.AI13]" office:value-type="float" office:value="3" calcext:value-type="float">
            <text:p>3</text:p>
          </table:table-cell>
          <table:table-cell table:style-name="ce39" table:formula="of:=[$Lind.AJ13]" office:value-type="float" office:value="4" calcext:value-type="float">
            <text:p>4</text:p>
          </table:table-cell>
          <table:table-cell table:style-name="ce39" table:formula="of:=[$Lind.AK13]" office:value-type="float" office:value="-2" calcext:value-type="float">
            <text:p>-2</text:p>
          </table:table-cell>
          <table:table-cell table:style-name="ce39" table:formula="of:=[$Lind.AL13]" office:value-type="float" office:value="-2" calcext:value-type="float">
            <text:p>-2</text:p>
          </table:table-cell>
          <table:table-cell table:style-name="ce39" table:formula="of:=[$Lind.AM13]" office:value-type="float" office:value="1" calcext:value-type="float">
            <text:p>1</text:p>
          </table:table-cell>
          <table:table-cell table:style-name="ce39" table:formula="of:=[$Lind.AN13]" office:value-type="float" office:value="-4" calcext:value-type="float">
            <text:p>-4</text:p>
          </table:table-cell>
          <table:table-cell table:style-name="ce39" table:formula="of:=[$Lind.AO13]" office:value-type="float" office:value="-3" calcext:value-type="float">
            <text:p>-3</text:p>
          </table:table-cell>
          <table:table-cell table:style-name="ce39" table:formula="of:=[$Lind.AP13]" office:value-type="float" office:value="0" calcext:value-type="float">
            <text:p>0</text:p>
          </table:table-cell>
          <table:table-cell table:style-name="ce49" table:formula="of:=[$Lind.AQ13]" office:value-type="float" office:value="0" calcext:value-type="float">
            <text:p>0</text:p>
          </table:table-cell>
          <table:table-cell table:style-name="ce39" table:formula="of:=[$Lind.AR13]" office:value-type="float" office:value="0" calcext:value-type="float">
            <text:p>0</text:p>
          </table:table-cell>
          <table:table-cell table:style-name="ce39" table:formula="of:=[$Lind.AS13]" office:value-type="float" office:value="0" calcext:value-type="float">
            <text:p>0</text:p>
          </table:table-cell>
          <table:table-cell table:style-name="ce39" table:formula="of:=[$Lind.AT13]" office:value-type="float" office:value="0" calcext:value-type="float">
            <text:p>0</text:p>
          </table:table-cell>
          <table:table-cell table:style-name="ce39" table:formula="of:=[$Lind.AU13]" office:value-type="float" office:value="0" calcext:value-type="float">
            <text:p>0</text:p>
          </table:table-cell>
          <table:table-cell table:style-name="ce39" table:formula="of:=[$Lind.AV13]" office:value-type="float" office:value="0" calcext:value-type="float">
            <text:p>0</text:p>
          </table:table-cell>
          <table:table-cell table:style-name="ce39" table:formula="of:=[$Lind.AW13]" office:value-type="float" office:value="0" calcext:value-type="float">
            <text:p>0</text:p>
          </table:table-cell>
          <table:table-cell table:style-name="ce39" table:formula="of:=[$Lind.AX13]" office:value-type="float" office:value="0" calcext:value-type="float">
            <text:p>0</text:p>
          </table:table-cell>
          <table:table-cell table:style-name="ce39" table:formula="of:=[$Lind.AY13]" office:value-type="float" office:value="0" calcext:value-type="float">
            <text:p>0</text:p>
          </table:table-cell>
          <table:table-cell/>
          <table:table-cell table:formula="of:=[.BA17]+0.002" office:value-type="float" office:value="0.006" calcext:value-type="float">
            <text:p>0.006</text:p>
          </table:table-cell>
          <table:table-cell table:formula="of:=[.BA18]*[.$D$6]" office:value-type="float" office:value="0.30159289474462" calcext:value-type="float">
            <text:p>0.302</text:p>
          </table:table-cell>
          <table:table-cell table:formula="of:=[.D$25]*[.$Z$5]*MAGNET([.D$24]+[.BB18])+[.E$25]*[.$Z$5]*MAGNET([.E$24]+[.BB18])+[.F$25]*[.$Z$5]*MAGNET([.F$24]+[.BB18])+[.G$25]*[.$Z$5]*MAGNET([.G$24]+[.BB18])+[.H$25]*[.$Z$5]*MAGNET([.H$24]+[.BB18])+[.I$25]*[.$Z$5]*MAGNET([.I$24]+[.BB18])+[.J$25]*[.$Z$5]*MAGNET([.J$24]+[.BB18])+[.K$25]*[.$Z$5]*MAGNET([.K$24]+[.BB18])+[.L$25]*[.$Z$5]*MAGNET([.L$24]+[.BB18])+[.M$25]*[.$Z$5]*MAGNET([.M$24]+[.BB18])+[.N$25]*[.$Z$5]*MAGNET([.N$24]+[.BB18])+[.O$25]*[.$Z$5]*MAGNET([.O$24]+[.BB18])+[.P$25]*[.$Z$5]*MAGNET([.P$24]+[.BB18])+[.Q$25]*[.$Z$5]*MAGNET([.Q$24]+[.BB18])+[.R$25]*[.$Z$5]*MAGNET([.R$24]+[.BB18])+[.S$25]*[.$Z$5]*MAGNET([.S$24]+[.BB18])+[.T$25]*[.$Z$5]*MAGNET([.T$24]+[.BB18])+[.U$25]*[.$Z$5]*MAGNET([.U$24]+[.BB18])+[.V$25]*[.$Z$5]*MAGNET([.V$24]+[.BB18])+[.W$25]*[.$Z$5]*MAGNET([.W$24]+[.BB18])+[.X$25]*[.$Z$5]*MAGNET([.X$24]+[.BB18])+[.Y$25]*[.$Z$5]*MAGNET([.Y$24]+[.BB18])+[.Z$25]*[.$Z$5]*MAGNET([.Z$24]+[.BB18])+[.AA$25]*[.$Z$5]*MAGNET([.AA$24]+[.BB18])+[.AB$25]*[.$Z$5]*MAGNET([.AB$24]+[.BB18])+[.AC$25]*[.$Z$5]*MAGNET([.AC$24]+[.BB18])+[.AD$25]*[.$Z$5]*MAGNET([.AD$24]+[.BB18])+[.AE$25]*[.$Z$5]*MAGNET([.AE$24]+[.BB18])+[.AF$25]*[.$Z$5]*MAGNET([.AF$24]+[.BB18])+[.AG$25]*[.$Z$5]*MAGNET([.AG$24]+[.BB18])+[.AH$25]*[.$Z$5]*MAGNET([.AH$24]+[.BB18]) +[.AI$25]*[.$Z$5]*MAGNET([.AI$24]+[.BB18]) +[.AJ$25]*[.$Z$5]*MAGNET([.AJ$24]+[.BB18]) +[.AK$25]*[.$Z$5]*MAGNET([.AK$24]+[.BB18]) +[.AL$25]*[.$Z$5]*MAGNET([.AL$24]+[.BB18]) +[.AM$25]*[.$Z$5]*MAGNET([.AM$24]+[.BB18]) +[.AN$25]*[.$Z$5]*MAGNET([.AN$24]+[.BB18]) +[.AO$25]*[.$Z$5]*MAGNET([.AO$24]+[.BB18])+RAND()*[.$BC$13]+[.AP$25]*[.$Z$5]*MAGNET([.AP$24]+[.BB18])&#10;+[.AQ$25]*[.$Z$5]*MAGNET([.AQ$24]+[.BB18])&#10;+[.AR$25]*[.$Z$5]*MAGNET([.AR$24]+[.BB18])&#10;+[.AS$25]*[.$Z$5]*MAGNET([.AS$24]+[.BB18])&#10;+[.AT$25]*[.$Z$5]*MAGNET([.AT$24]+[.BB18])&#10;+[.AU$25]*[.$Z$5]*MAGNET([.AU$24]+[.BB18])&#10;+[.AV$25]*[.$Z$5]*MAGNET([.AV$24]+[.BB18])&#10;+[.AW$25]*[.$Z$5]*MAGNET([.AW$24]+[.BB18])&#10;+[.AX$25]*[.$Z$5]*MAGNET([.AX$24]+[.BB18])&#10;+[.AY$25]*[.$Z$5]*MAGNET([.AY$24]+[.BB18])" office:value-type="float" office:value="-13.0450476390534" calcext:value-type="float">
            <text:p>-13.05</text:p>
          </table:table-cell>
          <table:table-cell table:style-name="ce70" table:formula="of:=[.E$26]*[.$Z$5]*MAGNET([.E$24]+[.$BB18])+[.F$26]*[.$Z$5]*MAGNET([.F$24]+[.$BB18])+[.G$26]*[.$Z$5]*MAGNET([.G$24]+[.$BB18])+[.H$26]*[.$Z$5]*MAGNET([.H$24]+[.$BB18])+[.I$26]*[.$Z$5]*MAGNET([.I$24]+[.$BB18])+[.J$26]*[.$Z$5]*MAGNET([.J$24]+[.$BB18])+[.K$26]*[.$Z$5]*MAGNET([.K$24]+[.$BB18])+[.L$26]*[.$Z$5]*MAGNET([.L$24]+[.$BB18])+[.M$26]*[.$Z$5]*MAGNET([.M$24]+[.$BB18])+[.N$26]*[.$Z$5]*MAGNET([.N$24]+[.$BB18])+[.O$26]*[.$Z$5]*MAGNET([.O$24]+[.$BB18])+[.P$26]*[.$Z$5]*MAGNET([.P$24]+[.$BB18])+[.Q$26]*[.$Z$5]*MAGNET([.Q$24]+[.$BB18])+[.R$26]*[.$Z$5]*MAGNET([.R$24]+[.$BB18])+[.S$26]*[.$Z$5]*MAGNET([.S$24]+[.$BB18])+[.T$26]*[.$Z$5]*MAGNET([.T$24]+[.$BB18])+[.U$26]*[.$Z$5]*MAGNET([.U$24]+[.$BB18])+[.V$26]*[.$Z$5]*MAGNET([.V$24]+[.$BB18])+[.W$26]*[.$Z$5]*MAGNET([.W$24]+[.$BB18])+[.X$26]*[.$Z$5]*MAGNET([.X$24]+[.$BB18])+[.Y$26]*[.$Z$5]*MAGNET([.Y$24]+[.$BB18])+[.Z$26]*[.$Z$5]*MAGNET([.Z$24]+[.$BB18])+[.AA$26]*[.$Z$5]*MAGNET([.AA$24]+[.$BB18])+[.AB$26]*[.$Z$5]*MAGNET([.AB$24]+[.$BB18])+[.AC$26]*[.$Z$5]*MAGNET([.AC$24]+[.$BB18])+[.AD$26]*[.$Z$5]*MAGNET([.AD$24]+[.$BB18])+[.AE$26]*[.$Z$5]*MAGNET([.AE$24]+[.$BB18])+[.AF$26]*[.$Z$5]*MAGNET([.AF$24]+[.$BB18])+[.AG$26]*[.$Z$5]*MAGNET([.AG$24]+[.$BB18])+[.D$26]*[.$Z$5]*MAGNET([.D$24]+[.$BB18])+[.AH$26]*[.$Z$5]*MAGNET([.AH$24]+[.BB18]) +[.AI$26]*[.$Z$5]*MAGNET([.AI$24]+[.BB18]) +[.AJ$26]*[.$Z$5]*MAGNET([.AJ$24]+[.BB18]) +[.AK$26]*[.$Z$5]*MAGNET([.AK$24]+[.BB18]) +[.AL$26]*[.$Z$5]*MAGNET([.AL$24]+[.BB18]) +[.AM$26]*[.$Z$5]*MAGNET([.AM$24]+[.BB18]) +[.AN$26]*[.$Z$5]*MAGNET([.AN$24]+[.BB18]) +[.AO$26]*[.$Z$5]*MAGNET([.AO$24]+[.BB18]) +[.AP$26]*[.$Z$5]*MAGNET([.AP$24]+[.$BB18])&#10;+[.AQ$26]*[.$Z$5]*MAGNET([.AQ$24]+[.$BB18])&#10;+[.AR$26]*[.$Z$5]*MAGNET([.AR$24]+[.$BB18])&#10;+[.AS$26]*[.$Z$5]*MAGNET([.AS$24]+[.$BB18])&#10;+[.AT$26]*[.$Z$5]*MAGNET([.AT$24]+[.$BB18])&#10;+[.AU$26]*[.$Z$5]*MAGNET([.AU$24]+[.$BB18])&#10;+[.AV$26]*[.$Z$5]*MAGNET([.AV$24]+[.$BB18])&#10;+[.AW$26]*[.$Z$5]*MAGNET([.AW$24]+[.$BB18])&#10;+[.AX$26]*[.$Z$5]*MAGNET([.AX$24]+[.$BB18])&#10;+[.AY$26]*[.$Z$5]*MAGNET([.AY$24]+[.$BB18]) +RAND()*[.$BD$13]" office:value-type="float" office:value="87.5335577483134" calcext:value-type="float">
            <text:p>87.53</text:p>
          </table:table-cell>
          <table:table-cell table:style-name="ce71" table:formula="of:=[.E$27]*[.$Z$5]*MAGNET([.E$24]+[.$BB18])+[.F$27]*[.$Z$5]*MAGNET([.F$24]+[.$BB18])+[.G$27]*[.$Z$5]*MAGNET([.G$24]+[.$BB18])+[.H$27]*[.$Z$5]*MAGNET([.H$24]+[.$BB18])+[.I$27]*[.$Z$5]*MAGNET([.I$24]+[.$BB18])+[.J$27]*[.$Z$5]*MAGNET([.J$24]+[.$BB18])+[.K$27]*[.$Z$5]*MAGNET([.K$24]+[.$BB18])+[.L$27]*[.$Z$5]*MAGNET([.L$24]+[.$BB18])+[.M$27]*[.$Z$5]*MAGNET([.M$24]+[.$BB18])+[.N$27]*[.$Z$5]*MAGNET([.N$24]+[.$BB18])+[.O$27]*[.$Z$5]*MAGNET([.O$24]+[.$BB18])+[.P$27]*[.$Z$5]*MAGNET([.P$24]+[.$BB18])+[.Q$27]*[.$Z$5]*MAGNET([.Q$24]+[.$BB18])+[.R$27]*[.$Z$5]*MAGNET([.R$24]+[.$BB18])+[.S$27]*[.$Z$5]*MAGNET([.S$24]+[.$BB18])+[.T$27]*[.$Z$5]*MAGNET([.T$24]+[.$BB18])+[.U$27]*[.$Z$5]*MAGNET([.U$24]+[.$BB18])+[.V$27]*[.$Z$5]*MAGNET([.V$24]+[.$BB18])+[.W$27]*[.$Z$5]*MAGNET([.W$24]+[.$BB18])+[.X$27]*[.$Z$5]*MAGNET([.X$24]+[.$BB18])+[.Y$27]*[.$Z$5]*MAGNET([.Y$24]+[.$BB18])+[.Z$27]*[.$Z$5]*MAGNET([.Z$24]+[.$BB18])+[.AA$27]*[.$Z$5]*MAGNET([.AA$24]+[.$BB18])+[.AB$27]*[.$Z$5]*MAGNET([.AB$24]+[.$BB18])+[.AC$27]*[.$Z$5]*MAGNET([.AC$24]+[.$BB18])+[.AD$27]*[.$Z$5]*MAGNET([.AD$24]+[.$BB18])+[.AE$27]*[.$Z$5]*MAGNET([.AE$24]+[.$BB18])+[.AF$27]*[.$Z$5]*MAGNET([.AF$24]+[.$BB18])+[.AG$27]*[.$Z$5]*MAGNET([.AG$24]+[.$BB18])+[.D$27]*[.$Z$5]*MAGNET([.D$24]+[.$BB18])+[.AH$27]*[.$Z$5]*MAGNET([.AH$24]+[.BB18]) +[.AI$27]*[.$Z$5]*MAGNET([.AI$24]+[.BB18]) +[.AJ$27]*[.$Z$5]*MAGNET([.AJ$24]+[.BB18]) +[.AK$27]*[.$Z$5]*MAGNET([.AK$24]+[.BB18]) +[.AL$27]*[.$Z$5]*MAGNET([.AL$24]+[.BB18]) +[.AM$27]*[.$Z$5]*MAGNET([.AM$24]+[.BB18]) +[.AN$27]*[.$Z$5]*MAGNET([.AN$24]+[.BB18]) +[.AO$27]*[.$Z$5]*MAGNET([.AO$24]+[.BB18]) +[.AP$27]*[.$Z$5]*MAGNET([.AP$24]+[.$BB18])&#10;+[.AQ$27]*[.$Z$5]*MAGNET([.AQ$24]+[.$BB18])&#10;+[.AR$27]*[.$Z$5]*MAGNET([.AR$24]+[.$BB18])&#10;+[.AS$27]*[.$Z$5]*MAGNET([.AS$24]+[.$BB18])&#10;+[.AT$27]*[.$Z$5]*MAGNET([.AT$24]+[.$BB18])&#10;+[.AU$27]*[.$Z$5]*MAGNET([.AU$24]+[.$BB18])&#10;+[.AV$27]*[.$Z$5]*MAGNET([.AV$24]+[.$BB18])&#10;+[.AW$27]*[.$Z$5]*MAGNET([.AW$24]+[.$BB18])&#10;+[.AX$27]*[.$Z$5]*MAGNET([.AX$24]+[.$BB18])&#10;+[.AY$27]*[.$Z$5]*MAGNET([.AY$24]+[.$BB18]) +RAND()*[.$BE$13]" office:value-type="float" office:value="-83.6659134813822" calcext:value-type="float">
            <text:p>-83.6659134813822</text:p>
          </table:table-cell>
          <table:table-cell table:style-name="ce71" table:formula="of:=[.E$28]*[.$Z$5]*MAGNET([.E$24]+[.$BB18])+[.F$28]*[.$Z$5]*MAGNET([.F$24]+[.$BB18])+[.G$28]*[.$Z$5]*MAGNET([.G$24]+[.$BB18])+[.H$28]*[.$Z$5]*MAGNET([.H$24]+[.$BB18])+[.I$28]*[.$Z$5]*MAGNET([.I$24]+[.$BB18])+[.J$28]*[.$Z$5]*MAGNET([.J$24]+[.$BB18])+[.K$28]*[.$Z$5]*MAGNET([.K$24]+[.$BB18])+[.L$28]*[.$Z$5]*MAGNET([.L$24]+[.$BB18])+[.M$28]*[.$Z$5]*MAGNET([.M$24]+[.$BB18])+[.N$28]*[.$Z$5]*MAGNET([.N$24]+[.$BB18])+[.O$28]*[.$Z$5]*MAGNET([.O$24]+[.$BB18])+[.P$28]*[.$Z$5]*MAGNET([.P$24]+[.$BB18])+[.Q$28]*[.$Z$5]*MAGNET([.Q$24]+[.$BB18])+[.R$28]*[.$Z$5]*MAGNET([.R$24]+[.$BB18])+[.S$28]*[.$Z$5]*MAGNET([.S$24]+[.$BB18])+[.T$28]*[.$Z$5]*MAGNET([.T$24]+[.$BB18])+[.U$28]*[.$Z$5]*MAGNET([.U$24]+[.$BB18])+[.V$28]*[.$Z$5]*MAGNET([.V$24]+[.$BB18])+[.W$28]*[.$Z$5]*MAGNET([.W$24]+[.$BB18])+[.X$28]*[.$Z$5]*MAGNET([.X$24]+[.$BB18])+[.Y$28]*[.$Z$5]*MAGNET([.Y$24]+[.$BB18])+[.Z$28]*[.$Z$5]*MAGNET([.Z$24]+[.$BB18])+[.AA$28]*[.$Z$5]*MAGNET([.AA$24]+[.$BB18])+[.AB$28]*[.$Z$5]*MAGNET([.AB$24]+[.$BB18])+[.AC$28]*[.$Z$5]*MAGNET([.AC$24]+[.$BB18])+[.AD$28]*[.$Z$5]*MAGNET([.AD$24]+[.$BB18])+[.AE$28]*[.$Z$5]*MAGNET([.AE$24]+[.$BB18])+[.AF$28]*[.$Z$5]*MAGNET([.AF$24]+[.$BB18])+[.AG$28]*[.$Z$5]*MAGNET([.AG$24]+[.$BB18])+[.D$28]*[.$Z$5]*MAGNET([.D$24]+[.$BB18])+[.AH$28]*[.$Z$5]*MAGNET([.AH$24]+[.BB18]) +[.AI$28]*[.$Z$5]*MAGNET([.AI$24]+[.BB18]) +[.AJ$28]*[.$Z$5]*MAGNET([.AJ$24]+[.BB18]) +[.AK$28]*[.$Z$5]*MAGNET([.AK$24]+[.BB18]) +[.AL$28]*[.$Z$5]*MAGNET([.AL$24]+[.BB18]) +[.AM$28]*[.$Z$5]*MAGNET([.AM$24]+[.BB18]) +[.AN$28]*[.$Z$5]*MAGNET([.AN$24]+[.BB18]) +[.AO$28]*[.$Z$5]*MAGNET([.AO$24]+[.BB18]) +[.AP$28]*[.$Z$5]*MAGNET([.AP$24]+[.$BB18])&#10;+[.AQ$28]*[.$Z$5]*MAGNET([.AQ$24]+[.$BB18])&#10;+[.AR$28]*[.$Z$5]*MAGNET([.AR$24]+[.$BB18])&#10;+[.AS$28]*[.$Z$5]*MAGNET([.AS$24]+[.$BB18])&#10;+[.AT$28]*[.$Z$5]*MAGNET([.AT$24]+[.$BB18])&#10;+[.AU$28]*[.$Z$5]*MAGNET([.AU$24]+[.$BB18])&#10;+[.AV$28]*[.$Z$5]*MAGNET([.AV$24]+[.$BB18])&#10;+[.AW$28]*[.$Z$5]*MAGNET([.AW$24]+[.$BB18])&#10;+[.AX$28]*[.$Z$5]*MAGNET([.AX$24]+[.$BB18])&#10;+[.AY$28]*[.$Z$5]*MAGNET([.AY$24]+[.$BB18]) +RAND()*[.$BF$13]" office:value-type="float" office:value="-11.933035662888" calcext:value-type="float">
            <text:p>-11.933035662888</text:p>
          </table:table-cell>
          <table:table-cell table:style-name="ce71" table:formula="of:=[.E$29]*[.$Z$5]*MAGNET([.E$24]+[.$BB18])+[.F$29]*[.$Z$5]*MAGNET([.F$24]+[.$BB18])+[.G$29]*[.$Z$5]*MAGNET([.G$24]+[.$BB18])+[.H$29]*[.$Z$5]*MAGNET([.H$24]+[.$BB18])+[.I$29]*[.$Z$5]*MAGNET([.I$24]+[.$BB18])+[.J$29]*[.$Z$5]*MAGNET([.J$24]+[.$BB18])+[.K$29]*[.$Z$5]*MAGNET([.K$24]+[.$BB18])+[.L$29]*[.$Z$5]*MAGNET([.L$24]+[.$BB18])+[.M$29]*[.$Z$5]*MAGNET([.M$24]+[.$BB18])+[.N$29]*[.$Z$5]*MAGNET([.N$24]+[.$BB18])+[.O$29]*[.$Z$5]*MAGNET([.O$24]+[.$BB18])+[.P$29]*[.$Z$5]*MAGNET([.P$24]+[.$BB18])+[.Q$29]*[.$Z$5]*MAGNET([.Q$24]+[.$BB18])+[.R$29]*[.$Z$5]*MAGNET([.R$24]+[.$BB18])+[.S$29]*[.$Z$5]*MAGNET([.S$24]+[.$BB18])+[.T$29]*[.$Z$5]*MAGNET([.T$24]+[.$BB18])+[.U$29]*[.$Z$5]*MAGNET([.U$24]+[.$BB18])+[.V$29]*[.$Z$5]*MAGNET([.V$24]+[.$BB18])+[.W$29]*[.$Z$5]*MAGNET([.W$24]+[.$BB18])+[.X$29]*[.$Z$5]*MAGNET([.X$24]+[.$BB18])+[.Y$29]*[.$Z$5]*MAGNET([.Y$24]+[.$BB18])+[.Z$29]*[.$Z$5]*MAGNET([.Z$24]+[.$BB18])+[.AA$29]*[.$Z$5]*MAGNET([.AA$24]+[.$BB18])+[.AB$29]*[.$Z$5]*MAGNET([.AB$24]+[.$BB18])+[.AC$29]*[.$Z$5]*MAGNET([.AC$24]+[.$BB18])+[.AD$29]*[.$Z$5]*MAGNET([.AD$24]+[.$BB18])+[.AE$29]*[.$Z$5]*MAGNET([.AE$24]+[.$BB18])+[.AF$29]*[.$Z$5]*MAGNET([.AF$24]+[.$BB18])+[.AG$29]*[.$Z$5]*MAGNET([.AG$24]+[.$BB18])+[.D$29]*[.$Z$5]*MAGNET([.D$24]+[.$BB18])+[.AH$29]*[.$Z$5]*MAGNET([.AH$24]+[.BB18]) +[.AI$29]*[.$Z$5]*MAGNET([.AI$24]+[.BB18]) +[.AJ$29]*[.$Z$5]*MAGNET([.AJ$24]+[.BB18]) +[.AK$29]*[.$Z$5]*MAGNET([.AK$24]+[.BB18]) +[.AL$29]*[.$Z$5]*MAGNET([.AL$24]+[.BB18]) +[.AM$29]*[.$Z$5]*MAGNET([.AM$24]+[.BB18]) +[.AN$29]*[.$Z$5]*MAGNET([.AN$24]+[.BB18]) +[.AO$29]*[.$Z$5]*MAGNET([.AO$24]+[.BB18]) +[.AP$29]*[.$Z$5]*MAGNET([.AP$24]+[.$BB18])&#10;+[.AQ$29]*[.$Z$5]*MAGNET([.AQ$24]+[.$BB18])&#10;+[.AR$29]*[.$Z$5]*MAGNET([.AR$24]+[.$BB18])&#10;+[.AS$29]*[.$Z$5]*MAGNET([.AS$24]+[.$BB18])&#10;+[.AT$29]*[.$Z$5]*MAGNET([.AT$24]+[.$BB18])&#10;+[.AU$29]*[.$Z$5]*MAGNET([.AU$24]+[.$BB18])&#10;+[.AV$29]*[.$Z$5]*MAGNET([.AV$24]+[.$BB18])&#10;+[.AW$29]*[.$Z$5]*MAGNET([.AW$24]+[.$BB18])&#10;+[.AX$29]*[.$Z$5]*MAGNET([.AX$24]+[.$BB18])&#10;+[.AY$29]*[.$Z$5]*MAGNET([.AY$24]+[.$BB18]) +RAND()*[.$BG$13]" office:value-type="float" office:value="40.8120287010785" calcext:value-type="float">
            <text:p>40.8120287010785</text:p>
          </table:table-cell>
          <table:table-cell table:style-name="ce71" table:formula="of:=[.E$30]*[.$Z$5]*MAGNET([.E$24]+[.$BB18])+[.F$30]*[.$Z$5]*MAGNET([.F$24]+[.$BB18])+[.G$30]*[.$Z$5]*MAGNET([.G$24]+[.$BB18])+[.H$30]*[.$Z$5]*MAGNET([.H$24]+[.$BB18])+[.I$30]*[.$Z$5]*MAGNET([.I$24]+[.$BB18])+[.J$30]*[.$Z$5]*MAGNET([.J$24]+[.$BB18])+[.K$30]*[.$Z$5]*MAGNET([.K$24]+[.$BB18])+[.L$30]*[.$Z$5]*MAGNET([.L$24]+[.$BB18])+[.M$30]*[.$Z$5]*MAGNET([.M$24]+[.$BB18])+[.N$30]*[.$Z$5]*MAGNET([.N$24]+[.$BB18])+[.O$30]*[.$Z$5]*MAGNET([.O$24]+[.$BB18])+[.P$30]*[.$Z$5]*MAGNET([.P$24]+[.$BB18])+[.Q$30]*[.$Z$5]*MAGNET([.Q$24]+[.$BB18])+[.R$30]*[.$Z$5]*MAGNET([.R$24]+[.$BB18])+[.S$30]*[.$Z$5]*MAGNET([.S$24]+[.$BB18])+[.T$30]*[.$Z$5]*MAGNET([.T$24]+[.$BB18])+[.U$30]*[.$Z$5]*MAGNET([.U$24]+[.$BB18])+[.V$30]*[.$Z$5]*MAGNET([.V$24]+[.$BB18])+[.W$30]*[.$Z$5]*MAGNET([.W$24]+[.$BB18])+[.X$30]*[.$Z$5]*MAGNET([.X$24]+[.$BB18])+[.Y$30]*[.$Z$5]*MAGNET([.Y$24]+[.$BB18])+[.Z$30]*[.$Z$5]*MAGNET([.Z$24]+[.$BB18])+[.AA$30]*[.$Z$5]*MAGNET([.AA$24]+[.$BB18])+[.AB$30]*[.$Z$5]*MAGNET([.AB$24]+[.$BB18])+[.AC$30]*[.$Z$5]*MAGNET([.AC$24]+[.$BB18])+[.AD$30]*[.$Z$5]*MAGNET([.AD$24]+[.$BB18])+[.AE$30]*[.$Z$5]*MAGNET([.AE$24]+[.$BB18])+[.AF$30]*[.$Z$5]*MAGNET([.AF$24]+[.$BB18])+[.AG$30]*[.$Z$5]*MAGNET([.AG$24]+[.$BB18])+[.D$30]*[.$Z$5]*MAGNET([.D$24]+[.$BB18])+[.AH$30]*[.$Z$5]*MAGNET([.AH$24]+[.BB18]) +[.AI$30]*[.$Z$5]*MAGNET([.AI$24]+[.BB18]) +[.AJ$30]*[.$Z$5]*MAGNET([.AJ$24]+[.BB18]) +[.AK$30]*[.$Z$5]*MAGNET([.AK$24]+[.BB18]) +[.AL$30]*[.$Z$5]*MAGNET([.AL$24]+[.BB18]) +[.AM$30]*[.$Z$5]*MAGNET([.AM$24]+[.BB18]) +[.AN$30]*[.$Z$5]*MAGNET([.AN$24]+[.BB18]) +[.AO$30]*[.$Z$5]*MAGNET([.AO$24]+[.BB18]) +[.AP$30]*[.$Z$5]*MAGNET([.AP$24]+[.$BB18])&#10;+[.AQ$30]*[.$Z$5]*MAGNET([.AQ$24]+[.$BB18])&#10;+[.AR$30]*[.$Z$5]*MAGNET([.AR$24]+[.$BB18])&#10;+[.AS$30]*[.$Z$5]*MAGNET([.AS$24]+[.$BB18])&#10;+[.AT$30]*[.$Z$5]*MAGNET([.AT$24]+[.$BB18])&#10;+[.AU$30]*[.$Z$5]*MAGNET([.AU$24]+[.$BB18])&#10;+[.AV$30]*[.$Z$5]*MAGNET([.AV$24]+[.$BB18])&#10;+[.AW$30]*[.$Z$5]*MAGNET([.AW$24]+[.$BB18])&#10;+[.AX$30]*[.$Z$5]*MAGNET([.AX$24]+[.$BB18])&#10;+[.AY$30]*[.$Z$5]*MAGNET([.AY$24]+[.$BB18]) +RAND()*[.$BH$13]" office:value-type="float" office:value="0" calcext:value-type="float">
            <text:p>0</text:p>
          </table:table-cell>
          <table:table-cell table:style-name="ce71" table:formula="of:=[.E$31]*[.$Z$5]*MAGNET([.E$24]+[.$BB18])+[.F$31]*[.$Z$5]*MAGNET([.F$24]+[.$BB18])+[.G$31]*[.$Z$5]*MAGNET([.G$24]+[.$BB18])+[.H$31]*[.$Z$5]*MAGNET([.H$24]+[.$BB18])+[.I$31]*[.$Z$5]*MAGNET([.I$24]+[.$BB18])+[.J$31]*[.$Z$5]*MAGNET([.J$24]+[.$BB18])+[.K$31]*[.$Z$5]*MAGNET([.K$24]+[.$BB18])+[.L$31]*[.$Z$5]*MAGNET([.L$24]+[.$BB18])+[.M$31]*[.$Z$5]*MAGNET([.M$24]+[.$BB18])+[.N$31]*[.$Z$5]*MAGNET([.N$24]+[.$BB18])+[.O$31]*[.$Z$5]*MAGNET([.O$24]+[.$BB18])+[.P$31]*[.$Z$5]*MAGNET([.P$24]+[.$BB18])+[.Q$31]*[.$Z$5]*MAGNET([.Q$24]+[.$BB18])+[.R$31]*[.$Z$5]*MAGNET([.R$24]+[.$BB18])+[.S$31]*[.$Z$5]*MAGNET([.S$24]+[.$BB18])+[.T$31]*[.$Z$5]*MAGNET([.T$24]+[.$BB18])+[.U$31]*[.$Z$5]*MAGNET([.U$24]+[.$BB18])+[.V$31]*[.$Z$5]*MAGNET([.V$24]+[.$BB18])+[.W$31]*[.$Z$5]*MAGNET([.W$24]+[.$BB18])+[.X$31]*[.$Z$5]*MAGNET([.X$24]+[.$BB18])+[.Y$31]*[.$Z$5]*MAGNET([.Y$24]+[.$BB18])+[.Z$31]*[.$Z$5]*MAGNET([.Z$24]+[.$BB18])+[.AA$31]*[.$Z$5]*MAGNET([.AA$24]+[.$BB18])+[.AB$31]*[.$Z$5]*MAGNET([.AB$24]+[.$BB18])+[.AC$31]*[.$Z$5]*MAGNET([.AC$24]+[.$BB18])+[.AD$31]*[.$Z$5]*MAGNET([.AD$24]+[.$BB18])+[.AE$31]*[.$Z$5]*MAGNET([.AE$24]+[.$BB18])+[.AF$31]*[.$Z$5]*MAGNET([.AF$24]+[.$BB18])+[.AG$31]*[.$Z$5]*MAGNET([.AG$24]+[.$BB18])+[.D$31]*[.$Z$5]*MAGNET([.D$24]+[.$BB18])+[.AH$31]*[.$Z$5]*MAGNET([.AH$24]+[.BB18]) +[.AI$31]*[.$Z$5]*MAGNET([.AI$24]+[.BB18]) +[.AJ$31]*[.$Z$5]*MAGNET([.AJ$24]+[.BB18]) +[.AK$31]*[.$Z$5]*MAGNET([.AK$24]+[.BB18]) +[.AL$31]*[.$Z$5]*MAGNET([.AL$24]+[.BB18]) +[.AM$31]*[.$Z$5]*MAGNET([.AM$24]+[.BB18]) +[.AN$31]*[.$Z$5]*MAGNET([.AN$24]+[.BB18]) +[.AO$31]*[.$Z$5]*MAGNET([.AO$24]+[.BB18]) +[.AP$31]*[.$Z$5]*MAGNET([.AP$24]+[.$BB18])&#10;+[.AQ$31]*[.$Z$5]*MAGNET([.AQ$24]+[.$BB18])&#10;+[.AR$31]*[.$Z$5]*MAGNET([.AR$24]+[.$BB18])&#10;+[.AS$31]*[.$Z$5]*MAGNET([.AS$24]+[.$BB18])&#10;+[.AT$31]*[.$Z$5]*MAGNET([.AT$24]+[.$BB18])&#10;+[.AU$31]*[.$Z$5]*MAGNET([.AU$24]+[.$BB18])&#10;+[.AV$31]*[.$Z$5]*MAGNET([.AV$24]+[.$BB18])&#10;+[.AW$31]*[.$Z$5]*MAGNET([.AW$24]+[.$BB18])&#10;+[.AX$31]*[.$Z$5]*MAGNET([.AX$24]+[.$BB18])&#10;+[.AY$31]*[.$Z$5]*MAGNET([.AY$24]+[.$BB18]) +RAND()*[.$BI$13]" office:value-type="float" office:value="0" calcext:value-type="float">
            <text:p>0</text:p>
          </table:table-cell>
          <table:table-cell table:style-name="ce71" table:formula="of:=[.E$32]*[.$Z$5]*MAGNET([.E$24]+[.$BB18])+[.F$32]*[.$Z$5]*MAGNET([.F$24]+[.$BB18])+[.G$32]*[.$Z$5]*MAGNET([.G$24]+[.$BB18])+[.H$32]*[.$Z$5]*MAGNET([.H$24]+[.$BB18])+[.I$32]*[.$Z$5]*MAGNET([.I$24]+[.$BB18])+[.J$32]*[.$Z$5]*MAGNET([.J$24]+[.$BB18])+[.K$32]*[.$Z$5]*MAGNET([.K$24]+[.$BB18])+[.L$32]*[.$Z$5]*MAGNET([.L$24]+[.$BB18])+[.M$32]*[.$Z$5]*MAGNET([.M$24]+[.$BB18])+[.N$32]*[.$Z$5]*MAGNET([.N$24]+[.$BB18])+[.O$32]*[.$Z$5]*MAGNET([.O$24]+[.$BB18])+[.P$32]*[.$Z$5]*MAGNET([.P$24]+[.$BB18])+[.Q$32]*[.$Z$5]*MAGNET([.Q$24]+[.$BB18])+[.R$32]*[.$Z$5]*MAGNET([.R$24]+[.$BB18])+[.S$32]*[.$Z$5]*MAGNET([.S$24]+[.$BB18])+[.T$32]*[.$Z$5]*MAGNET([.T$24]+[.$BB18])+[.U$32]*[.$Z$5]*MAGNET([.U$24]+[.$BB18])+[.V$32]*[.$Z$5]*MAGNET([.V$24]+[.$BB18])+[.W$32]*[.$Z$5]*MAGNET([.W$24]+[.$BB18])+[.X$32]*[.$Z$5]*MAGNET([.X$24]+[.$BB18])+[.Y$32]*[.$Z$5]*MAGNET([.Y$24]+[.$BB18])+[.Z$32]*[.$Z$5]*MAGNET([.Z$24]+[.$BB18])+[.AA$32]*[.$Z$5]*MAGNET([.AA$24]+[.$BB18])+[.AB$32]*[.$Z$5]*MAGNET([.AB$24]+[.$BB18])+[.AC$32]*[.$Z$5]*MAGNET([.AC$24]+[.$BB18])+[.AD$32]*[.$Z$5]*MAGNET([.AD$24]+[.$BB18])+[.AE$32]*[.$Z$5]*MAGNET([.AE$24]+[.$BB18])+[.AF$32]*[.$Z$5]*MAGNET([.AF$24]+[.$BB18])+[.AG$32]*[.$Z$5]*MAGNET([.AG$24]+[.$BB18])+[.D$32]*[.$Z$5]*MAGNET([.D$24]+[.$BB18])+[.AH$32]*[.$Z$5]*MAGNET([.AH$24]+[.BB18]) +[.AI$32]*[.$Z$5]*MAGNET([.AI$24]+[.BB18]) +[.AJ$32]*[.$Z$5]*MAGNET([.AJ$24]+[.BB18]) +[.AK$32]*[.$Z$5]*MAGNET([.AK$24]+[.BB18]) +[.AL$32]*[.$Z$5]*MAGNET([.AL$24]+[.BB18]) +[.AM$32]*[.$Z$5]*MAGNET([.AM$24]+[.BB18]) +[.AN$32]*[.$Z$5]*MAGNET([.AN$24]+[.BB18]) +[.AO$32]*[.$Z$5]*MAGNET([.AO$24]+[.BB18]) +[.AP$32]*[.$Z$5]*MAGNET([.AP$24]+[.$BB18])&#10;+[.AQ$32]*[.$Z$5]*MAGNET([.AQ$24]+[.$BB18])&#10;+[.AR$32]*[.$Z$5]*MAGNET([.AR$24]+[.$BB18])&#10;+[.AS$32]*[.$Z$5]*MAGNET([.AS$24]+[.$BB18])&#10;+[.AT$32]*[.$Z$5]*MAGNET([.AT$24]+[.$BB18])&#10;+[.AU$32]*[.$Z$5]*MAGNET([.AU$24]+[.$BB18])&#10;+[.AV$32]*[.$Z$5]*MAGNET([.AV$24]+[.$BB18])&#10;+[.AW$32]*[.$Z$5]*MAGNET([.AW$24]+[.$BB18])&#10;+[.AX$32]*[.$Z$5]*MAGNET([.AX$24]+[.$BB18])&#10;+[.AY$32]*[.$Z$5]*MAGNET([.AY$24]+[.$BB1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35" table:formula="of:=[$Lind.D14]" office:value-type="float" office:value="0" calcext:value-type="float">
            <text:p>0</text:p>
          </table:table-cell>
          <table:table-cell table:style-name="ce40" table:formula="of:=[$Lind.E14]" office:value-type="float" office:value="0" calcext:value-type="float">
            <text:p>0</text:p>
          </table:table-cell>
          <table:table-cell table:style-name="ce40" table:formula="of:=[$Lind.F14]" office:value-type="float" office:value="0" calcext:value-type="float">
            <text:p>0</text:p>
          </table:table-cell>
          <table:table-cell table:style-name="ce40" table:formula="of:=[$Lind.G14]" office:value-type="float" office:value="0" calcext:value-type="float">
            <text:p>0</text:p>
          </table:table-cell>
          <table:table-cell table:style-name="ce40" table:formula="of:=[$Lind.H14]" office:value-type="float" office:value="0" calcext:value-type="float">
            <text:p>0</text:p>
          </table:table-cell>
          <table:table-cell table:style-name="ce40" table:formula="of:=[$Lind.I14]" office:value-type="float" office:value="0" calcext:value-type="float">
            <text:p>0</text:p>
          </table:table-cell>
          <table:table-cell table:style-name="ce40" table:formula="of:=[$Lind.J14]" office:value-type="float" office:value="0" calcext:value-type="float">
            <text:p>0</text:p>
          </table:table-cell>
          <table:table-cell table:style-name="ce40" table:formula="of:=[$Lind.K14]" office:value-type="float" office:value="0" calcext:value-type="float">
            <text:p>0</text:p>
          </table:table-cell>
          <table:table-cell table:style-name="ce40" table:formula="of:=[$Lind.L14]" office:value-type="float" office:value="0" calcext:value-type="float">
            <text:p>0</text:p>
          </table:table-cell>
          <table:table-cell table:style-name="ce40" table:formula="of:=[$Lind.M14]" office:value-type="float" office:value="0" calcext:value-type="float">
            <text:p>0</text:p>
          </table:table-cell>
          <table:table-cell table:style-name="ce40" table:formula="of:=[$Lind.N14]" office:value-type="float" office:value="0" calcext:value-type="float">
            <text:p>0</text:p>
          </table:table-cell>
          <table:table-cell table:style-name="ce40" table:formula="of:=[$Lind.O14]" office:value-type="float" office:value="0" calcext:value-type="float">
            <text:p>0</text:p>
          </table:table-cell>
          <table:table-cell table:style-name="ce40" table:formula="of:=[$Lind.P14]" office:value-type="float" office:value="0" calcext:value-type="float">
            <text:p>0</text:p>
          </table:table-cell>
          <table:table-cell table:style-name="ce40" table:formula="of:=[$Lind.Q14]" office:value-type="float" office:value="0" calcext:value-type="float">
            <text:p>0</text:p>
          </table:table-cell>
          <table:table-cell table:style-name="ce40" table:formula="of:=[$Lind.R14]" office:value-type="float" office:value="0" calcext:value-type="float">
            <text:p>0</text:p>
          </table:table-cell>
          <table:table-cell table:style-name="ce40" table:formula="of:=[$Lind.S14]" office:value-type="float" office:value="0" calcext:value-type="float">
            <text:p>0</text:p>
          </table:table-cell>
          <table:table-cell table:style-name="ce40" table:formula="of:=[$Lind.T14]" office:value-type="float" office:value="0" calcext:value-type="float">
            <text:p>0</text:p>
          </table:table-cell>
          <table:table-cell table:style-name="ce40" table:formula="of:=[$Lind.U14]" office:value-type="float" office:value="0" calcext:value-type="float">
            <text:p>0</text:p>
          </table:table-cell>
          <table:table-cell table:style-name="ce40" table:formula="of:=[$Lind.V14]" office:value-type="float" office:value="0" calcext:value-type="float">
            <text:p>0</text:p>
          </table:table-cell>
          <table:table-cell table:style-name="ce40" table:formula="of:=[$Lind.W14]" office:value-type="float" office:value="0" calcext:value-type="float">
            <text:p>0</text:p>
          </table:table-cell>
          <table:table-cell table:style-name="ce40" table:formula="of:=[$Lind.X14]" office:value-type="float" office:value="0" calcext:value-type="float">
            <text:p>0</text:p>
          </table:table-cell>
          <table:table-cell table:style-name="ce40" table:formula="of:=[$Lind.Y14]" office:value-type="float" office:value="0" calcext:value-type="float">
            <text:p>0</text:p>
          </table:table-cell>
          <table:table-cell table:style-name="ce40" table:formula="of:=[$Lind.Z14]" office:value-type="float" office:value="0" calcext:value-type="float">
            <text:p>0</text:p>
          </table:table-cell>
          <table:table-cell table:style-name="ce40" table:formula="of:=[$Lind.AA14]" office:value-type="float" office:value="0" calcext:value-type="float">
            <text:p>0</text:p>
          </table:table-cell>
          <table:table-cell table:style-name="ce40" table:formula="of:=[$Lind.AB14]" office:value-type="float" office:value="0" calcext:value-type="float">
            <text:p>0</text:p>
          </table:table-cell>
          <table:table-cell table:style-name="ce40" table:formula="of:=[$Lind.AC14]" office:value-type="float" office:value="0" calcext:value-type="float">
            <text:p>0</text:p>
          </table:table-cell>
          <table:table-cell table:style-name="ce40" table:formula="of:=[$Lind.AD14]" office:value-type="float" office:value="0" calcext:value-type="float">
            <text:p>0</text:p>
          </table:table-cell>
          <table:table-cell table:style-name="ce40" table:formula="of:=[$Lind.AE14]" office:value-type="float" office:value="0" calcext:value-type="float">
            <text:p>0</text:p>
          </table:table-cell>
          <table:table-cell table:style-name="ce40" table:formula="of:=[$Lind.AF14]" office:value-type="float" office:value="0" calcext:value-type="float">
            <text:p>0</text:p>
          </table:table-cell>
          <table:table-cell table:style-name="ce51" table:formula="of:=[$Lind.AG14]" office:value-type="float" office:value="0" calcext:value-type="float">
            <text:p>0</text:p>
          </table:table-cell>
          <table:table-cell table:style-name="ce40" table:formula="of:=[$Lind.AH14]" office:value-type="float" office:value="0" calcext:value-type="float">
            <text:p>0</text:p>
          </table:table-cell>
          <table:table-cell table:style-name="ce40" table:formula="of:=[$Lind.AI14]" office:value-type="float" office:value="0" calcext:value-type="float">
            <text:p>0</text:p>
          </table:table-cell>
          <table:table-cell table:style-name="ce40" table:formula="of:=[$Lind.AJ14]" office:value-type="float" office:value="0" calcext:value-type="float">
            <text:p>0</text:p>
          </table:table-cell>
          <table:table-cell table:style-name="ce40" table:formula="of:=[$Lind.AK14]" office:value-type="float" office:value="0" calcext:value-type="float">
            <text:p>0</text:p>
          </table:table-cell>
          <table:table-cell table:style-name="ce40" table:formula="of:=[$Lind.AL14]" office:value-type="float" office:value="0" calcext:value-type="float">
            <text:p>0</text:p>
          </table:table-cell>
          <table:table-cell table:style-name="ce40" table:formula="of:=[$Lind.AM14]" office:value-type="float" office:value="0" calcext:value-type="float">
            <text:p>0</text:p>
          </table:table-cell>
          <table:table-cell table:style-name="ce40" table:formula="of:=[$Lind.AN14]" office:value-type="float" office:value="0" calcext:value-type="float">
            <text:p>0</text:p>
          </table:table-cell>
          <table:table-cell table:style-name="ce40" table:formula="of:=[$Lind.AO14]" office:value-type="float" office:value="0" calcext:value-type="float">
            <text:p>0</text:p>
          </table:table-cell>
          <table:table-cell table:style-name="ce40" table:formula="of:=[$Lind.AP14]" office:value-type="float" office:value="0" calcext:value-type="float">
            <text:p>0</text:p>
          </table:table-cell>
          <table:table-cell table:style-name="ce51" table:formula="of:=[$Lind.AQ14]" office:value-type="float" office:value="0" calcext:value-type="float">
            <text:p>0</text:p>
          </table:table-cell>
          <table:table-cell table:style-name="ce40" table:formula="of:=[$Lind.AR14]" office:value-type="float" office:value="0" calcext:value-type="float">
            <text:p>0</text:p>
          </table:table-cell>
          <table:table-cell table:style-name="ce40" table:formula="of:=[$Lind.AS14]" office:value-type="float" office:value="0" calcext:value-type="float">
            <text:p>0</text:p>
          </table:table-cell>
          <table:table-cell table:style-name="ce40" table:formula="of:=[$Lind.AT14]" office:value-type="float" office:value="0" calcext:value-type="float">
            <text:p>0</text:p>
          </table:table-cell>
          <table:table-cell table:style-name="ce40" table:formula="of:=[$Lind.AU14]" office:value-type="float" office:value="0" calcext:value-type="float">
            <text:p>0</text:p>
          </table:table-cell>
          <table:table-cell table:style-name="ce40" table:formula="of:=[$Lind.AV14]" office:value-type="float" office:value="0" calcext:value-type="float">
            <text:p>0</text:p>
          </table:table-cell>
          <table:table-cell table:style-name="ce40" table:formula="of:=[$Lind.AW14]" office:value-type="float" office:value="0" calcext:value-type="float">
            <text:p>0</text:p>
          </table:table-cell>
          <table:table-cell table:style-name="ce40" table:formula="of:=[$Lind.AX14]" office:value-type="float" office:value="0" calcext:value-type="float">
            <text:p>0</text:p>
          </table:table-cell>
          <table:table-cell table:style-name="ce40" table:formula="of:=[$Lind.AY14]" office:value-type="float" office:value="0" calcext:value-type="float">
            <text:p>0</text:p>
          </table:table-cell>
          <table:table-cell/>
          <table:table-cell table:formula="of:=[.BA18]+0.002" office:value-type="float" office:value="0.008" calcext:value-type="float">
            <text:p>0.008</text:p>
          </table:table-cell>
          <table:table-cell table:formula="of:=[.BA19]*[.$D$6]" office:value-type="float" office:value="0.402123859659494" calcext:value-type="float">
            <text:p>0.402</text:p>
          </table:table-cell>
          <table:table-cell table:formula="of:=[.D$25]*[.$Z$5]*MAGNET([.D$24]+[.BB19])+[.E$25]*[.$Z$5]*MAGNET([.E$24]+[.BB19])+[.F$25]*[.$Z$5]*MAGNET([.F$24]+[.BB19])+[.G$25]*[.$Z$5]*MAGNET([.G$24]+[.BB19])+[.H$25]*[.$Z$5]*MAGNET([.H$24]+[.BB19])+[.I$25]*[.$Z$5]*MAGNET([.I$24]+[.BB19])+[.J$25]*[.$Z$5]*MAGNET([.J$24]+[.BB19])+[.K$25]*[.$Z$5]*MAGNET([.K$24]+[.BB19])+[.L$25]*[.$Z$5]*MAGNET([.L$24]+[.BB19])+[.M$25]*[.$Z$5]*MAGNET([.M$24]+[.BB19])+[.N$25]*[.$Z$5]*MAGNET([.N$24]+[.BB19])+[.O$25]*[.$Z$5]*MAGNET([.O$24]+[.BB19])+[.P$25]*[.$Z$5]*MAGNET([.P$24]+[.BB19])+[.Q$25]*[.$Z$5]*MAGNET([.Q$24]+[.BB19])+[.R$25]*[.$Z$5]*MAGNET([.R$24]+[.BB19])+[.S$25]*[.$Z$5]*MAGNET([.S$24]+[.BB19])+[.T$25]*[.$Z$5]*MAGNET([.T$24]+[.BB19])+[.U$25]*[.$Z$5]*MAGNET([.U$24]+[.BB19])+[.V$25]*[.$Z$5]*MAGNET([.V$24]+[.BB19])+[.W$25]*[.$Z$5]*MAGNET([.W$24]+[.BB19])+[.X$25]*[.$Z$5]*MAGNET([.X$24]+[.BB19])+[.Y$25]*[.$Z$5]*MAGNET([.Y$24]+[.BB19])+[.Z$25]*[.$Z$5]*MAGNET([.Z$24]+[.BB19])+[.AA$25]*[.$Z$5]*MAGNET([.AA$24]+[.BB19])+[.AB$25]*[.$Z$5]*MAGNET([.AB$24]+[.BB19])+[.AC$25]*[.$Z$5]*MAGNET([.AC$24]+[.BB19])+[.AD$25]*[.$Z$5]*MAGNET([.AD$24]+[.BB19])+[.AE$25]*[.$Z$5]*MAGNET([.AE$24]+[.BB19])+[.AF$25]*[.$Z$5]*MAGNET([.AF$24]+[.BB19])+[.AG$25]*[.$Z$5]*MAGNET([.AG$24]+[.BB19])+[.AH$25]*[.$Z$5]*MAGNET([.AH$24]+[.BB19]) +[.AI$25]*[.$Z$5]*MAGNET([.AI$24]+[.BB19]) +[.AJ$25]*[.$Z$5]*MAGNET([.AJ$24]+[.BB19]) +[.AK$25]*[.$Z$5]*MAGNET([.AK$24]+[.BB19]) +[.AL$25]*[.$Z$5]*MAGNET([.AL$24]+[.BB19]) +[.AM$25]*[.$Z$5]*MAGNET([.AM$24]+[.BB19]) +[.AN$25]*[.$Z$5]*MAGNET([.AN$24]+[.BB19]) +[.AO$25]*[.$Z$5]*MAGNET([.AO$24]+[.BB19])+RAND()*[.$BC$13]+[.AP$25]*[.$Z$5]*MAGNET([.AP$24]+[.BB19])&#10;+[.AQ$25]*[.$Z$5]*MAGNET([.AQ$24]+[.BB19])&#10;+[.AR$25]*[.$Z$5]*MAGNET([.AR$24]+[.BB19])&#10;+[.AS$25]*[.$Z$5]*MAGNET([.AS$24]+[.BB19])&#10;+[.AT$25]*[.$Z$5]*MAGNET([.AT$24]+[.BB19])&#10;+[.AU$25]*[.$Z$5]*MAGNET([.AU$24]+[.BB19])&#10;+[.AV$25]*[.$Z$5]*MAGNET([.AV$24]+[.BB19])&#10;+[.AW$25]*[.$Z$5]*MAGNET([.AW$24]+[.BB19])&#10;+[.AX$25]*[.$Z$5]*MAGNET([.AX$24]+[.BB19])&#10;+[.AY$25]*[.$Z$5]*MAGNET([.AY$24]+[.BB19])" office:value-type="float" office:value="3.42218266619636" calcext:value-type="float">
            <text:p>3.42</text:p>
          </table:table-cell>
          <table:table-cell table:style-name="ce70" table:formula="of:=[.E$26]*[.$Z$5]*MAGNET([.E$24]+[.$BB19])+[.F$26]*[.$Z$5]*MAGNET([.F$24]+[.$BB19])+[.G$26]*[.$Z$5]*MAGNET([.G$24]+[.$BB19])+[.H$26]*[.$Z$5]*MAGNET([.H$24]+[.$BB19])+[.I$26]*[.$Z$5]*MAGNET([.I$24]+[.$BB19])+[.J$26]*[.$Z$5]*MAGNET([.J$24]+[.$BB19])+[.K$26]*[.$Z$5]*MAGNET([.K$24]+[.$BB19])+[.L$26]*[.$Z$5]*MAGNET([.L$24]+[.$BB19])+[.M$26]*[.$Z$5]*MAGNET([.M$24]+[.$BB19])+[.N$26]*[.$Z$5]*MAGNET([.N$24]+[.$BB19])+[.O$26]*[.$Z$5]*MAGNET([.O$24]+[.$BB19])+[.P$26]*[.$Z$5]*MAGNET([.P$24]+[.$BB19])+[.Q$26]*[.$Z$5]*MAGNET([.Q$24]+[.$BB19])+[.R$26]*[.$Z$5]*MAGNET([.R$24]+[.$BB19])+[.S$26]*[.$Z$5]*MAGNET([.S$24]+[.$BB19])+[.T$26]*[.$Z$5]*MAGNET([.T$24]+[.$BB19])+[.U$26]*[.$Z$5]*MAGNET([.U$24]+[.$BB19])+[.V$26]*[.$Z$5]*MAGNET([.V$24]+[.$BB19])+[.W$26]*[.$Z$5]*MAGNET([.W$24]+[.$BB19])+[.X$26]*[.$Z$5]*MAGNET([.X$24]+[.$BB19])+[.Y$26]*[.$Z$5]*MAGNET([.Y$24]+[.$BB19])+[.Z$26]*[.$Z$5]*MAGNET([.Z$24]+[.$BB19])+[.AA$26]*[.$Z$5]*MAGNET([.AA$24]+[.$BB19])+[.AB$26]*[.$Z$5]*MAGNET([.AB$24]+[.$BB19])+[.AC$26]*[.$Z$5]*MAGNET([.AC$24]+[.$BB19])+[.AD$26]*[.$Z$5]*MAGNET([.AD$24]+[.$BB19])+[.AE$26]*[.$Z$5]*MAGNET([.AE$24]+[.$BB19])+[.AF$26]*[.$Z$5]*MAGNET([.AF$24]+[.$BB19])+[.AG$26]*[.$Z$5]*MAGNET([.AG$24]+[.$BB19])+[.D$26]*[.$Z$5]*MAGNET([.D$24]+[.$BB19])+[.AH$26]*[.$Z$5]*MAGNET([.AH$24]+[.BB19]) +[.AI$26]*[.$Z$5]*MAGNET([.AI$24]+[.BB19]) +[.AJ$26]*[.$Z$5]*MAGNET([.AJ$24]+[.BB19]) +[.AK$26]*[.$Z$5]*MAGNET([.AK$24]+[.BB19]) +[.AL$26]*[.$Z$5]*MAGNET([.AL$24]+[.BB19]) +[.AM$26]*[.$Z$5]*MAGNET([.AM$24]+[.BB19]) +[.AN$26]*[.$Z$5]*MAGNET([.AN$24]+[.BB19]) +[.AO$26]*[.$Z$5]*MAGNET([.AO$24]+[.BB19]) +[.AP$26]*[.$Z$5]*MAGNET([.AP$24]+[.$BB19])&#10;+[.AQ$26]*[.$Z$5]*MAGNET([.AQ$24]+[.$BB19])&#10;+[.AR$26]*[.$Z$5]*MAGNET([.AR$24]+[.$BB19])&#10;+[.AS$26]*[.$Z$5]*MAGNET([.AS$24]+[.$BB19])&#10;+[.AT$26]*[.$Z$5]*MAGNET([.AT$24]+[.$BB19])&#10;+[.AU$26]*[.$Z$5]*MAGNET([.AU$24]+[.$BB19])&#10;+[.AV$26]*[.$Z$5]*MAGNET([.AV$24]+[.$BB19])&#10;+[.AW$26]*[.$Z$5]*MAGNET([.AW$24]+[.$BB19])&#10;+[.AX$26]*[.$Z$5]*MAGNET([.AX$24]+[.$BB19])&#10;+[.AY$26]*[.$Z$5]*MAGNET([.AY$24]+[.$BB19]) +RAND()*[.$BD$13]" office:value-type="float" office:value="83.2864380975475" calcext:value-type="float">
            <text:p>83.29</text:p>
          </table:table-cell>
          <table:table-cell table:style-name="ce71" table:formula="of:=[.E$27]*[.$Z$5]*MAGNET([.E$24]+[.$BB19])+[.F$27]*[.$Z$5]*MAGNET([.F$24]+[.$BB19])+[.G$27]*[.$Z$5]*MAGNET([.G$24]+[.$BB19])+[.H$27]*[.$Z$5]*MAGNET([.H$24]+[.$BB19])+[.I$27]*[.$Z$5]*MAGNET([.I$24]+[.$BB19])+[.J$27]*[.$Z$5]*MAGNET([.J$24]+[.$BB19])+[.K$27]*[.$Z$5]*MAGNET([.K$24]+[.$BB19])+[.L$27]*[.$Z$5]*MAGNET([.L$24]+[.$BB19])+[.M$27]*[.$Z$5]*MAGNET([.M$24]+[.$BB19])+[.N$27]*[.$Z$5]*MAGNET([.N$24]+[.$BB19])+[.O$27]*[.$Z$5]*MAGNET([.O$24]+[.$BB19])+[.P$27]*[.$Z$5]*MAGNET([.P$24]+[.$BB19])+[.Q$27]*[.$Z$5]*MAGNET([.Q$24]+[.$BB19])+[.R$27]*[.$Z$5]*MAGNET([.R$24]+[.$BB19])+[.S$27]*[.$Z$5]*MAGNET([.S$24]+[.$BB19])+[.T$27]*[.$Z$5]*MAGNET([.T$24]+[.$BB19])+[.U$27]*[.$Z$5]*MAGNET([.U$24]+[.$BB19])+[.V$27]*[.$Z$5]*MAGNET([.V$24]+[.$BB19])+[.W$27]*[.$Z$5]*MAGNET([.W$24]+[.$BB19])+[.X$27]*[.$Z$5]*MAGNET([.X$24]+[.$BB19])+[.Y$27]*[.$Z$5]*MAGNET([.Y$24]+[.$BB19])+[.Z$27]*[.$Z$5]*MAGNET([.Z$24]+[.$BB19])+[.AA$27]*[.$Z$5]*MAGNET([.AA$24]+[.$BB19])+[.AB$27]*[.$Z$5]*MAGNET([.AB$24]+[.$BB19])+[.AC$27]*[.$Z$5]*MAGNET([.AC$24]+[.$BB19])+[.AD$27]*[.$Z$5]*MAGNET([.AD$24]+[.$BB19])+[.AE$27]*[.$Z$5]*MAGNET([.AE$24]+[.$BB19])+[.AF$27]*[.$Z$5]*MAGNET([.AF$24]+[.$BB19])+[.AG$27]*[.$Z$5]*MAGNET([.AG$24]+[.$BB19])+[.D$27]*[.$Z$5]*MAGNET([.D$24]+[.$BB19])+[.AH$27]*[.$Z$5]*MAGNET([.AH$24]+[.BB19]) +[.AI$27]*[.$Z$5]*MAGNET([.AI$24]+[.BB19]) +[.AJ$27]*[.$Z$5]*MAGNET([.AJ$24]+[.BB19]) +[.AK$27]*[.$Z$5]*MAGNET([.AK$24]+[.BB19]) +[.AL$27]*[.$Z$5]*MAGNET([.AL$24]+[.BB19]) +[.AM$27]*[.$Z$5]*MAGNET([.AM$24]+[.BB19]) +[.AN$27]*[.$Z$5]*MAGNET([.AN$24]+[.BB19]) +[.AO$27]*[.$Z$5]*MAGNET([.AO$24]+[.BB19]) +[.AP$27]*[.$Z$5]*MAGNET([.AP$24]+[.$BB19])&#10;+[.AQ$27]*[.$Z$5]*MAGNET([.AQ$24]+[.$BB19])&#10;+[.AR$27]*[.$Z$5]*MAGNET([.AR$24]+[.$BB19])&#10;+[.AS$27]*[.$Z$5]*MAGNET([.AS$24]+[.$BB19])&#10;+[.AT$27]*[.$Z$5]*MAGNET([.AT$24]+[.$BB19])&#10;+[.AU$27]*[.$Z$5]*MAGNET([.AU$24]+[.$BB19])&#10;+[.AV$27]*[.$Z$5]*MAGNET([.AV$24]+[.$BB19])&#10;+[.AW$27]*[.$Z$5]*MAGNET([.AW$24]+[.$BB19])&#10;+[.AX$27]*[.$Z$5]*MAGNET([.AX$24]+[.$BB19])&#10;+[.AY$27]*[.$Z$5]*MAGNET([.AY$24]+[.$BB19]) +RAND()*[.$BE$13]" office:value-type="float" office:value="-98.575642761859" calcext:value-type="float">
            <text:p>-98.575642761859</text:p>
          </table:table-cell>
          <table:table-cell table:style-name="ce71" table:formula="of:=[.E$28]*[.$Z$5]*MAGNET([.E$24]+[.$BB19])+[.F$28]*[.$Z$5]*MAGNET([.F$24]+[.$BB19])+[.G$28]*[.$Z$5]*MAGNET([.G$24]+[.$BB19])+[.H$28]*[.$Z$5]*MAGNET([.H$24]+[.$BB19])+[.I$28]*[.$Z$5]*MAGNET([.I$24]+[.$BB19])+[.J$28]*[.$Z$5]*MAGNET([.J$24]+[.$BB19])+[.K$28]*[.$Z$5]*MAGNET([.K$24]+[.$BB19])+[.L$28]*[.$Z$5]*MAGNET([.L$24]+[.$BB19])+[.M$28]*[.$Z$5]*MAGNET([.M$24]+[.$BB19])+[.N$28]*[.$Z$5]*MAGNET([.N$24]+[.$BB19])+[.O$28]*[.$Z$5]*MAGNET([.O$24]+[.$BB19])+[.P$28]*[.$Z$5]*MAGNET([.P$24]+[.$BB19])+[.Q$28]*[.$Z$5]*MAGNET([.Q$24]+[.$BB19])+[.R$28]*[.$Z$5]*MAGNET([.R$24]+[.$BB19])+[.S$28]*[.$Z$5]*MAGNET([.S$24]+[.$BB19])+[.T$28]*[.$Z$5]*MAGNET([.T$24]+[.$BB19])+[.U$28]*[.$Z$5]*MAGNET([.U$24]+[.$BB19])+[.V$28]*[.$Z$5]*MAGNET([.V$24]+[.$BB19])+[.W$28]*[.$Z$5]*MAGNET([.W$24]+[.$BB19])+[.X$28]*[.$Z$5]*MAGNET([.X$24]+[.$BB19])+[.Y$28]*[.$Z$5]*MAGNET([.Y$24]+[.$BB19])+[.Z$28]*[.$Z$5]*MAGNET([.Z$24]+[.$BB19])+[.AA$28]*[.$Z$5]*MAGNET([.AA$24]+[.$BB19])+[.AB$28]*[.$Z$5]*MAGNET([.AB$24]+[.$BB19])+[.AC$28]*[.$Z$5]*MAGNET([.AC$24]+[.$BB19])+[.AD$28]*[.$Z$5]*MAGNET([.AD$24]+[.$BB19])+[.AE$28]*[.$Z$5]*MAGNET([.AE$24]+[.$BB19])+[.AF$28]*[.$Z$5]*MAGNET([.AF$24]+[.$BB19])+[.AG$28]*[.$Z$5]*MAGNET([.AG$24]+[.$BB19])+[.D$28]*[.$Z$5]*MAGNET([.D$24]+[.$BB19])+[.AH$28]*[.$Z$5]*MAGNET([.AH$24]+[.BB19]) +[.AI$28]*[.$Z$5]*MAGNET([.AI$24]+[.BB19]) +[.AJ$28]*[.$Z$5]*MAGNET([.AJ$24]+[.BB19]) +[.AK$28]*[.$Z$5]*MAGNET([.AK$24]+[.BB19]) +[.AL$28]*[.$Z$5]*MAGNET([.AL$24]+[.BB19]) +[.AM$28]*[.$Z$5]*MAGNET([.AM$24]+[.BB19]) +[.AN$28]*[.$Z$5]*MAGNET([.AN$24]+[.BB19]) +[.AO$28]*[.$Z$5]*MAGNET([.AO$24]+[.BB19]) +[.AP$28]*[.$Z$5]*MAGNET([.AP$24]+[.$BB19])&#10;+[.AQ$28]*[.$Z$5]*MAGNET([.AQ$24]+[.$BB19])&#10;+[.AR$28]*[.$Z$5]*MAGNET([.AR$24]+[.$BB19])&#10;+[.AS$28]*[.$Z$5]*MAGNET([.AS$24]+[.$BB19])&#10;+[.AT$28]*[.$Z$5]*MAGNET([.AT$24]+[.$BB19])&#10;+[.AU$28]*[.$Z$5]*MAGNET([.AU$24]+[.$BB19])&#10;+[.AV$28]*[.$Z$5]*MAGNET([.AV$24]+[.$BB19])&#10;+[.AW$28]*[.$Z$5]*MAGNET([.AW$24]+[.$BB19])&#10;+[.AX$28]*[.$Z$5]*MAGNET([.AX$24]+[.$BB19])&#10;+[.AY$28]*[.$Z$5]*MAGNET([.AY$24]+[.$BB19]) +RAND()*[.$BF$13]" office:value-type="float" office:value="-12.3378539629429" calcext:value-type="float">
            <text:p>-12.3378539629429</text:p>
          </table:table-cell>
          <table:table-cell table:style-name="ce71" table:formula="of:=[.E$29]*[.$Z$5]*MAGNET([.E$24]+[.$BB19])+[.F$29]*[.$Z$5]*MAGNET([.F$24]+[.$BB19])+[.G$29]*[.$Z$5]*MAGNET([.G$24]+[.$BB19])+[.H$29]*[.$Z$5]*MAGNET([.H$24]+[.$BB19])+[.I$29]*[.$Z$5]*MAGNET([.I$24]+[.$BB19])+[.J$29]*[.$Z$5]*MAGNET([.J$24]+[.$BB19])+[.K$29]*[.$Z$5]*MAGNET([.K$24]+[.$BB19])+[.L$29]*[.$Z$5]*MAGNET([.L$24]+[.$BB19])+[.M$29]*[.$Z$5]*MAGNET([.M$24]+[.$BB19])+[.N$29]*[.$Z$5]*MAGNET([.N$24]+[.$BB19])+[.O$29]*[.$Z$5]*MAGNET([.O$24]+[.$BB19])+[.P$29]*[.$Z$5]*MAGNET([.P$24]+[.$BB19])+[.Q$29]*[.$Z$5]*MAGNET([.Q$24]+[.$BB19])+[.R$29]*[.$Z$5]*MAGNET([.R$24]+[.$BB19])+[.S$29]*[.$Z$5]*MAGNET([.S$24]+[.$BB19])+[.T$29]*[.$Z$5]*MAGNET([.T$24]+[.$BB19])+[.U$29]*[.$Z$5]*MAGNET([.U$24]+[.$BB19])+[.V$29]*[.$Z$5]*MAGNET([.V$24]+[.$BB19])+[.W$29]*[.$Z$5]*MAGNET([.W$24]+[.$BB19])+[.X$29]*[.$Z$5]*MAGNET([.X$24]+[.$BB19])+[.Y$29]*[.$Z$5]*MAGNET([.Y$24]+[.$BB19])+[.Z$29]*[.$Z$5]*MAGNET([.Z$24]+[.$BB19])+[.AA$29]*[.$Z$5]*MAGNET([.AA$24]+[.$BB19])+[.AB$29]*[.$Z$5]*MAGNET([.AB$24]+[.$BB19])+[.AC$29]*[.$Z$5]*MAGNET([.AC$24]+[.$BB19])+[.AD$29]*[.$Z$5]*MAGNET([.AD$24]+[.$BB19])+[.AE$29]*[.$Z$5]*MAGNET([.AE$24]+[.$BB19])+[.AF$29]*[.$Z$5]*MAGNET([.AF$24]+[.$BB19])+[.AG$29]*[.$Z$5]*MAGNET([.AG$24]+[.$BB19])+[.D$29]*[.$Z$5]*MAGNET([.D$24]+[.$BB19])+[.AH$29]*[.$Z$5]*MAGNET([.AH$24]+[.BB19]) +[.AI$29]*[.$Z$5]*MAGNET([.AI$24]+[.BB19]) +[.AJ$29]*[.$Z$5]*MAGNET([.AJ$24]+[.BB19]) +[.AK$29]*[.$Z$5]*MAGNET([.AK$24]+[.BB19]) +[.AL$29]*[.$Z$5]*MAGNET([.AL$24]+[.BB19]) +[.AM$29]*[.$Z$5]*MAGNET([.AM$24]+[.BB19]) +[.AN$29]*[.$Z$5]*MAGNET([.AN$24]+[.BB19]) +[.AO$29]*[.$Z$5]*MAGNET([.AO$24]+[.BB19]) +[.AP$29]*[.$Z$5]*MAGNET([.AP$24]+[.$BB19])&#10;+[.AQ$29]*[.$Z$5]*MAGNET([.AQ$24]+[.$BB19])&#10;+[.AR$29]*[.$Z$5]*MAGNET([.AR$24]+[.$BB19])&#10;+[.AS$29]*[.$Z$5]*MAGNET([.AS$24]+[.$BB19])&#10;+[.AT$29]*[.$Z$5]*MAGNET([.AT$24]+[.$BB19])&#10;+[.AU$29]*[.$Z$5]*MAGNET([.AU$24]+[.$BB19])&#10;+[.AV$29]*[.$Z$5]*MAGNET([.AV$24]+[.$BB19])&#10;+[.AW$29]*[.$Z$5]*MAGNET([.AW$24]+[.$BB19])&#10;+[.AX$29]*[.$Z$5]*MAGNET([.AX$24]+[.$BB19])&#10;+[.AY$29]*[.$Z$5]*MAGNET([.AY$24]+[.$BB19]) +RAND()*[.$BG$13]" office:value-type="float" office:value="42.3601368163195" calcext:value-type="float">
            <text:p>42.3601368163195</text:p>
          </table:table-cell>
          <table:table-cell table:style-name="ce71" table:formula="of:=[.E$30]*[.$Z$5]*MAGNET([.E$24]+[.$BB19])+[.F$30]*[.$Z$5]*MAGNET([.F$24]+[.$BB19])+[.G$30]*[.$Z$5]*MAGNET([.G$24]+[.$BB19])+[.H$30]*[.$Z$5]*MAGNET([.H$24]+[.$BB19])+[.I$30]*[.$Z$5]*MAGNET([.I$24]+[.$BB19])+[.J$30]*[.$Z$5]*MAGNET([.J$24]+[.$BB19])+[.K$30]*[.$Z$5]*MAGNET([.K$24]+[.$BB19])+[.L$30]*[.$Z$5]*MAGNET([.L$24]+[.$BB19])+[.M$30]*[.$Z$5]*MAGNET([.M$24]+[.$BB19])+[.N$30]*[.$Z$5]*MAGNET([.N$24]+[.$BB19])+[.O$30]*[.$Z$5]*MAGNET([.O$24]+[.$BB19])+[.P$30]*[.$Z$5]*MAGNET([.P$24]+[.$BB19])+[.Q$30]*[.$Z$5]*MAGNET([.Q$24]+[.$BB19])+[.R$30]*[.$Z$5]*MAGNET([.R$24]+[.$BB19])+[.S$30]*[.$Z$5]*MAGNET([.S$24]+[.$BB19])+[.T$30]*[.$Z$5]*MAGNET([.T$24]+[.$BB19])+[.U$30]*[.$Z$5]*MAGNET([.U$24]+[.$BB19])+[.V$30]*[.$Z$5]*MAGNET([.V$24]+[.$BB19])+[.W$30]*[.$Z$5]*MAGNET([.W$24]+[.$BB19])+[.X$30]*[.$Z$5]*MAGNET([.X$24]+[.$BB19])+[.Y$30]*[.$Z$5]*MAGNET([.Y$24]+[.$BB19])+[.Z$30]*[.$Z$5]*MAGNET([.Z$24]+[.$BB19])+[.AA$30]*[.$Z$5]*MAGNET([.AA$24]+[.$BB19])+[.AB$30]*[.$Z$5]*MAGNET([.AB$24]+[.$BB19])+[.AC$30]*[.$Z$5]*MAGNET([.AC$24]+[.$BB19])+[.AD$30]*[.$Z$5]*MAGNET([.AD$24]+[.$BB19])+[.AE$30]*[.$Z$5]*MAGNET([.AE$24]+[.$BB19])+[.AF$30]*[.$Z$5]*MAGNET([.AF$24]+[.$BB19])+[.AG$30]*[.$Z$5]*MAGNET([.AG$24]+[.$BB19])+[.D$30]*[.$Z$5]*MAGNET([.D$24]+[.$BB19])+[.AH$30]*[.$Z$5]*MAGNET([.AH$24]+[.BB19]) +[.AI$30]*[.$Z$5]*MAGNET([.AI$24]+[.BB19]) +[.AJ$30]*[.$Z$5]*MAGNET([.AJ$24]+[.BB19]) +[.AK$30]*[.$Z$5]*MAGNET([.AK$24]+[.BB19]) +[.AL$30]*[.$Z$5]*MAGNET([.AL$24]+[.BB19]) +[.AM$30]*[.$Z$5]*MAGNET([.AM$24]+[.BB19]) +[.AN$30]*[.$Z$5]*MAGNET([.AN$24]+[.BB19]) +[.AO$30]*[.$Z$5]*MAGNET([.AO$24]+[.BB19]) +[.AP$30]*[.$Z$5]*MAGNET([.AP$24]+[.$BB19])&#10;+[.AQ$30]*[.$Z$5]*MAGNET([.AQ$24]+[.$BB19])&#10;+[.AR$30]*[.$Z$5]*MAGNET([.AR$24]+[.$BB19])&#10;+[.AS$30]*[.$Z$5]*MAGNET([.AS$24]+[.$BB19])&#10;+[.AT$30]*[.$Z$5]*MAGNET([.AT$24]+[.$BB19])&#10;+[.AU$30]*[.$Z$5]*MAGNET([.AU$24]+[.$BB19])&#10;+[.AV$30]*[.$Z$5]*MAGNET([.AV$24]+[.$BB19])&#10;+[.AW$30]*[.$Z$5]*MAGNET([.AW$24]+[.$BB19])&#10;+[.AX$30]*[.$Z$5]*MAGNET([.AX$24]+[.$BB19])&#10;+[.AY$30]*[.$Z$5]*MAGNET([.AY$24]+[.$BB19]) +RAND()*[.$BH$13]" office:value-type="float" office:value="0" calcext:value-type="float">
            <text:p>0</text:p>
          </table:table-cell>
          <table:table-cell table:style-name="ce71" table:formula="of:=[.E$31]*[.$Z$5]*MAGNET([.E$24]+[.$BB19])+[.F$31]*[.$Z$5]*MAGNET([.F$24]+[.$BB19])+[.G$31]*[.$Z$5]*MAGNET([.G$24]+[.$BB19])+[.H$31]*[.$Z$5]*MAGNET([.H$24]+[.$BB19])+[.I$31]*[.$Z$5]*MAGNET([.I$24]+[.$BB19])+[.J$31]*[.$Z$5]*MAGNET([.J$24]+[.$BB19])+[.K$31]*[.$Z$5]*MAGNET([.K$24]+[.$BB19])+[.L$31]*[.$Z$5]*MAGNET([.L$24]+[.$BB19])+[.M$31]*[.$Z$5]*MAGNET([.M$24]+[.$BB19])+[.N$31]*[.$Z$5]*MAGNET([.N$24]+[.$BB19])+[.O$31]*[.$Z$5]*MAGNET([.O$24]+[.$BB19])+[.P$31]*[.$Z$5]*MAGNET([.P$24]+[.$BB19])+[.Q$31]*[.$Z$5]*MAGNET([.Q$24]+[.$BB19])+[.R$31]*[.$Z$5]*MAGNET([.R$24]+[.$BB19])+[.S$31]*[.$Z$5]*MAGNET([.S$24]+[.$BB19])+[.T$31]*[.$Z$5]*MAGNET([.T$24]+[.$BB19])+[.U$31]*[.$Z$5]*MAGNET([.U$24]+[.$BB19])+[.V$31]*[.$Z$5]*MAGNET([.V$24]+[.$BB19])+[.W$31]*[.$Z$5]*MAGNET([.W$24]+[.$BB19])+[.X$31]*[.$Z$5]*MAGNET([.X$24]+[.$BB19])+[.Y$31]*[.$Z$5]*MAGNET([.Y$24]+[.$BB19])+[.Z$31]*[.$Z$5]*MAGNET([.Z$24]+[.$BB19])+[.AA$31]*[.$Z$5]*MAGNET([.AA$24]+[.$BB19])+[.AB$31]*[.$Z$5]*MAGNET([.AB$24]+[.$BB19])+[.AC$31]*[.$Z$5]*MAGNET([.AC$24]+[.$BB19])+[.AD$31]*[.$Z$5]*MAGNET([.AD$24]+[.$BB19])+[.AE$31]*[.$Z$5]*MAGNET([.AE$24]+[.$BB19])+[.AF$31]*[.$Z$5]*MAGNET([.AF$24]+[.$BB19])+[.AG$31]*[.$Z$5]*MAGNET([.AG$24]+[.$BB19])+[.D$31]*[.$Z$5]*MAGNET([.D$24]+[.$BB19])+[.AH$31]*[.$Z$5]*MAGNET([.AH$24]+[.BB19]) +[.AI$31]*[.$Z$5]*MAGNET([.AI$24]+[.BB19]) +[.AJ$31]*[.$Z$5]*MAGNET([.AJ$24]+[.BB19]) +[.AK$31]*[.$Z$5]*MAGNET([.AK$24]+[.BB19]) +[.AL$31]*[.$Z$5]*MAGNET([.AL$24]+[.BB19]) +[.AM$31]*[.$Z$5]*MAGNET([.AM$24]+[.BB19]) +[.AN$31]*[.$Z$5]*MAGNET([.AN$24]+[.BB19]) +[.AO$31]*[.$Z$5]*MAGNET([.AO$24]+[.BB19]) +[.AP$31]*[.$Z$5]*MAGNET([.AP$24]+[.$BB19])&#10;+[.AQ$31]*[.$Z$5]*MAGNET([.AQ$24]+[.$BB19])&#10;+[.AR$31]*[.$Z$5]*MAGNET([.AR$24]+[.$BB19])&#10;+[.AS$31]*[.$Z$5]*MAGNET([.AS$24]+[.$BB19])&#10;+[.AT$31]*[.$Z$5]*MAGNET([.AT$24]+[.$BB19])&#10;+[.AU$31]*[.$Z$5]*MAGNET([.AU$24]+[.$BB19])&#10;+[.AV$31]*[.$Z$5]*MAGNET([.AV$24]+[.$BB19])&#10;+[.AW$31]*[.$Z$5]*MAGNET([.AW$24]+[.$BB19])&#10;+[.AX$31]*[.$Z$5]*MAGNET([.AX$24]+[.$BB19])&#10;+[.AY$31]*[.$Z$5]*MAGNET([.AY$24]+[.$BB19]) +RAND()*[.$BI$13]" office:value-type="float" office:value="0" calcext:value-type="float">
            <text:p>0</text:p>
          </table:table-cell>
          <table:table-cell table:style-name="ce71" table:formula="of:=[.E$32]*[.$Z$5]*MAGNET([.E$24]+[.$BB19])+[.F$32]*[.$Z$5]*MAGNET([.F$24]+[.$BB19])+[.G$32]*[.$Z$5]*MAGNET([.G$24]+[.$BB19])+[.H$32]*[.$Z$5]*MAGNET([.H$24]+[.$BB19])+[.I$32]*[.$Z$5]*MAGNET([.I$24]+[.$BB19])+[.J$32]*[.$Z$5]*MAGNET([.J$24]+[.$BB19])+[.K$32]*[.$Z$5]*MAGNET([.K$24]+[.$BB19])+[.L$32]*[.$Z$5]*MAGNET([.L$24]+[.$BB19])+[.M$32]*[.$Z$5]*MAGNET([.M$24]+[.$BB19])+[.N$32]*[.$Z$5]*MAGNET([.N$24]+[.$BB19])+[.O$32]*[.$Z$5]*MAGNET([.O$24]+[.$BB19])+[.P$32]*[.$Z$5]*MAGNET([.P$24]+[.$BB19])+[.Q$32]*[.$Z$5]*MAGNET([.Q$24]+[.$BB19])+[.R$32]*[.$Z$5]*MAGNET([.R$24]+[.$BB19])+[.S$32]*[.$Z$5]*MAGNET([.S$24]+[.$BB19])+[.T$32]*[.$Z$5]*MAGNET([.T$24]+[.$BB19])+[.U$32]*[.$Z$5]*MAGNET([.U$24]+[.$BB19])+[.V$32]*[.$Z$5]*MAGNET([.V$24]+[.$BB19])+[.W$32]*[.$Z$5]*MAGNET([.W$24]+[.$BB19])+[.X$32]*[.$Z$5]*MAGNET([.X$24]+[.$BB19])+[.Y$32]*[.$Z$5]*MAGNET([.Y$24]+[.$BB19])+[.Z$32]*[.$Z$5]*MAGNET([.Z$24]+[.$BB19])+[.AA$32]*[.$Z$5]*MAGNET([.AA$24]+[.$BB19])+[.AB$32]*[.$Z$5]*MAGNET([.AB$24]+[.$BB19])+[.AC$32]*[.$Z$5]*MAGNET([.AC$24]+[.$BB19])+[.AD$32]*[.$Z$5]*MAGNET([.AD$24]+[.$BB19])+[.AE$32]*[.$Z$5]*MAGNET([.AE$24]+[.$BB19])+[.AF$32]*[.$Z$5]*MAGNET([.AF$24]+[.$BB19])+[.AG$32]*[.$Z$5]*MAGNET([.AG$24]+[.$BB19])+[.D$32]*[.$Z$5]*MAGNET([.D$24]+[.$BB19])+[.AH$32]*[.$Z$5]*MAGNET([.AH$24]+[.BB19]) +[.AI$32]*[.$Z$5]*MAGNET([.AI$24]+[.BB19]) +[.AJ$32]*[.$Z$5]*MAGNET([.AJ$24]+[.BB19]) +[.AK$32]*[.$Z$5]*MAGNET([.AK$24]+[.BB19]) +[.AL$32]*[.$Z$5]*MAGNET([.AL$24]+[.BB19]) +[.AM$32]*[.$Z$5]*MAGNET([.AM$24]+[.BB19]) +[.AN$32]*[.$Z$5]*MAGNET([.AN$24]+[.BB19]) +[.AO$32]*[.$Z$5]*MAGNET([.AO$24]+[.BB19]) +[.AP$32]*[.$Z$5]*MAGNET([.AP$24]+[.$BB19])&#10;+[.AQ$32]*[.$Z$5]*MAGNET([.AQ$24]+[.$BB19])&#10;+[.AR$32]*[.$Z$5]*MAGNET([.AR$24]+[.$BB19])&#10;+[.AS$32]*[.$Z$5]*MAGNET([.AS$24]+[.$BB19])&#10;+[.AT$32]*[.$Z$5]*MAGNET([.AT$24]+[.$BB19])&#10;+[.AU$32]*[.$Z$5]*MAGNET([.AU$24]+[.$BB19])&#10;+[.AV$32]*[.$Z$5]*MAGNET([.AV$24]+[.$BB19])&#10;+[.AW$32]*[.$Z$5]*MAGNET([.AW$24]+[.$BB19])&#10;+[.AX$32]*[.$Z$5]*MAGNET([.AX$24]+[.$BB19])&#10;+[.AY$32]*[.$Z$5]*MAGNET([.AY$24]+[.$BB1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34" table:formula="of:=[$Lind.D15]" office:value-type="float" office:value="0" calcext:value-type="float">
            <text:p>0</text:p>
          </table:table-cell>
          <table:table-cell table:style-name="ce39" table:formula="of:=[$Lind.E15]" office:value-type="float" office:value="0" calcext:value-type="float">
            <text:p>0</text:p>
          </table:table-cell>
          <table:table-cell table:style-name="ce39" table:formula="of:=[$Lind.F15]" office:value-type="float" office:value="0" calcext:value-type="float">
            <text:p>0</text:p>
          </table:table-cell>
          <table:table-cell table:style-name="ce39" table:formula="of:=[$Lind.G15]" office:value-type="float" office:value="0" calcext:value-type="float">
            <text:p>0</text:p>
          </table:table-cell>
          <table:table-cell table:style-name="ce39" table:formula="of:=[$Lind.H15]" office:value-type="float" office:value="0" calcext:value-type="float">
            <text:p>0</text:p>
          </table:table-cell>
          <table:table-cell table:style-name="ce39" table:formula="of:=[$Lind.I15]" office:value-type="float" office:value="0" calcext:value-type="float">
            <text:p>0</text:p>
          </table:table-cell>
          <table:table-cell table:style-name="ce39" table:formula="of:=[$Lind.J15]" office:value-type="float" office:value="0" calcext:value-type="float">
            <text:p>0</text:p>
          </table:table-cell>
          <table:table-cell table:style-name="ce39" table:formula="of:=[$Lind.K15]" office:value-type="float" office:value="0" calcext:value-type="float">
            <text:p>0</text:p>
          </table:table-cell>
          <table:table-cell table:style-name="ce39" table:formula="of:=[$Lind.L15]" office:value-type="float" office:value="0" calcext:value-type="float">
            <text:p>0</text:p>
          </table:table-cell>
          <table:table-cell table:style-name="ce39" table:formula="of:=[$Lind.M15]" office:value-type="float" office:value="0" calcext:value-type="float">
            <text:p>0</text:p>
          </table:table-cell>
          <table:table-cell table:style-name="ce39" table:formula="of:=[$Lind.N15]" office:value-type="float" office:value="0" calcext:value-type="float">
            <text:p>0</text:p>
          </table:table-cell>
          <table:table-cell table:style-name="ce39" table:formula="of:=[$Lind.O15]" office:value-type="float" office:value="0" calcext:value-type="float">
            <text:p>0</text:p>
          </table:table-cell>
          <table:table-cell table:style-name="ce39" table:formula="of:=[$Lind.P15]" office:value-type="float" office:value="0" calcext:value-type="float">
            <text:p>0</text:p>
          </table:table-cell>
          <table:table-cell table:style-name="ce39" table:formula="of:=[$Lind.Q15]" office:value-type="float" office:value="0" calcext:value-type="float">
            <text:p>0</text:p>
          </table:table-cell>
          <table:table-cell table:style-name="ce39" table:formula="of:=[$Lind.R15]" office:value-type="float" office:value="0" calcext:value-type="float">
            <text:p>0</text:p>
          </table:table-cell>
          <table:table-cell table:style-name="ce39" table:formula="of:=[$Lind.S15]" office:value-type="float" office:value="0" calcext:value-type="float">
            <text:p>0</text:p>
          </table:table-cell>
          <table:table-cell table:style-name="ce39" table:formula="of:=[$Lind.T15]" office:value-type="float" office:value="0" calcext:value-type="float">
            <text:p>0</text:p>
          </table:table-cell>
          <table:table-cell table:style-name="ce39" table:formula="of:=[$Lind.U15]" office:value-type="float" office:value="0" calcext:value-type="float">
            <text:p>0</text:p>
          </table:table-cell>
          <table:table-cell table:style-name="ce39" table:formula="of:=[$Lind.V15]" office:value-type="float" office:value="0" calcext:value-type="float">
            <text:p>0</text:p>
          </table:table-cell>
          <table:table-cell table:style-name="ce39" table:formula="of:=[$Lind.W15]" office:value-type="float" office:value="0" calcext:value-type="float">
            <text:p>0</text:p>
          </table:table-cell>
          <table:table-cell table:style-name="ce39" table:formula="of:=[$Lind.X15]" office:value-type="float" office:value="0" calcext:value-type="float">
            <text:p>0</text:p>
          </table:table-cell>
          <table:table-cell table:style-name="ce39" table:formula="of:=[$Lind.Y15]" office:value-type="float" office:value="0" calcext:value-type="float">
            <text:p>0</text:p>
          </table:table-cell>
          <table:table-cell table:style-name="ce39" table:formula="of:=[$Lind.Z15]" office:value-type="float" office:value="0" calcext:value-type="float">
            <text:p>0</text:p>
          </table:table-cell>
          <table:table-cell table:style-name="ce39" table:formula="of:=[$Lind.AA15]" office:value-type="float" office:value="0" calcext:value-type="float">
            <text:p>0</text:p>
          </table:table-cell>
          <table:table-cell table:style-name="ce39" table:formula="of:=[$Lind.AB15]" office:value-type="float" office:value="0" calcext:value-type="float">
            <text:p>0</text:p>
          </table:table-cell>
          <table:table-cell table:style-name="ce39" table:formula="of:=[$Lind.AC15]" office:value-type="float" office:value="0" calcext:value-type="float">
            <text:p>0</text:p>
          </table:table-cell>
          <table:table-cell table:style-name="ce39" table:formula="of:=[$Lind.AD15]" office:value-type="float" office:value="0" calcext:value-type="float">
            <text:p>0</text:p>
          </table:table-cell>
          <table:table-cell table:style-name="ce39" table:formula="of:=[$Lind.AE15]" office:value-type="float" office:value="0" calcext:value-type="float">
            <text:p>0</text:p>
          </table:table-cell>
          <table:table-cell table:style-name="ce39" table:formula="of:=[$Lind.AF15]" office:value-type="float" office:value="0" calcext:value-type="float">
            <text:p>0</text:p>
          </table:table-cell>
          <table:table-cell table:style-name="ce52" table:formula="of:=[$Lind.AG15]" office:value-type="float" office:value="0" calcext:value-type="float">
            <text:p>0</text:p>
          </table:table-cell>
          <table:table-cell table:style-name="ce39" table:formula="of:=[$Lind.AH15]" office:value-type="float" office:value="0" calcext:value-type="float">
            <text:p>0</text:p>
          </table:table-cell>
          <table:table-cell table:style-name="ce39" table:formula="of:=[$Lind.AI15]" office:value-type="float" office:value="0" calcext:value-type="float">
            <text:p>0</text:p>
          </table:table-cell>
          <table:table-cell table:style-name="ce39" table:formula="of:=[$Lind.AJ15]" office:value-type="float" office:value="0" calcext:value-type="float">
            <text:p>0</text:p>
          </table:table-cell>
          <table:table-cell table:style-name="ce39" table:formula="of:=[$Lind.AK15]" office:value-type="float" office:value="0" calcext:value-type="float">
            <text:p>0</text:p>
          </table:table-cell>
          <table:table-cell table:style-name="ce39" table:formula="of:=[$Lind.AL15]" office:value-type="float" office:value="0" calcext:value-type="float">
            <text:p>0</text:p>
          </table:table-cell>
          <table:table-cell table:style-name="ce39" table:formula="of:=[$Lind.AM15]" office:value-type="float" office:value="0" calcext:value-type="float">
            <text:p>0</text:p>
          </table:table-cell>
          <table:table-cell table:style-name="ce39" table:formula="of:=[$Lind.AN15]" office:value-type="float" office:value="0" calcext:value-type="float">
            <text:p>0</text:p>
          </table:table-cell>
          <table:table-cell table:style-name="ce39" table:formula="of:=[$Lind.AO15]" office:value-type="float" office:value="0" calcext:value-type="float">
            <text:p>0</text:p>
          </table:table-cell>
          <table:table-cell table:style-name="ce39" table:formula="of:=[$Lind.AP15]" office:value-type="float" office:value="0" calcext:value-type="float">
            <text:p>0</text:p>
          </table:table-cell>
          <table:table-cell table:style-name="ce52" table:formula="of:=[$Lind.AQ15]" office:value-type="float" office:value="0" calcext:value-type="float">
            <text:p>0</text:p>
          </table:table-cell>
          <table:table-cell table:style-name="ce39" table:formula="of:=[$Lind.AR15]" office:value-type="float" office:value="0" calcext:value-type="float">
            <text:p>0</text:p>
          </table:table-cell>
          <table:table-cell table:style-name="ce39" table:formula="of:=[$Lind.AS15]" office:value-type="float" office:value="0" calcext:value-type="float">
            <text:p>0</text:p>
          </table:table-cell>
          <table:table-cell table:style-name="ce39" table:formula="of:=[$Lind.AT15]" office:value-type="float" office:value="0" calcext:value-type="float">
            <text:p>0</text:p>
          </table:table-cell>
          <table:table-cell table:style-name="ce39" table:formula="of:=[$Lind.AU15]" office:value-type="float" office:value="0" calcext:value-type="float">
            <text:p>0</text:p>
          </table:table-cell>
          <table:table-cell table:style-name="ce39" table:formula="of:=[$Lind.AV15]" office:value-type="float" office:value="0" calcext:value-type="float">
            <text:p>0</text:p>
          </table:table-cell>
          <table:table-cell table:style-name="ce39" table:formula="of:=[$Lind.AW15]" office:value-type="float" office:value="0" calcext:value-type="float">
            <text:p>0</text:p>
          </table:table-cell>
          <table:table-cell table:style-name="ce39" table:formula="of:=[$Lind.AX15]" office:value-type="float" office:value="0" calcext:value-type="float">
            <text:p>0</text:p>
          </table:table-cell>
          <table:table-cell table:style-name="ce39" table:formula="of:=[$Lind.AY15]" office:value-type="float" office:value="0" calcext:value-type="float">
            <text:p>0</text:p>
          </table:table-cell>
          <table:table-cell/>
          <table:table-cell table:formula="of:=[.BA19]+0.002" office:value-type="float" office:value="0.01" calcext:value-type="float">
            <text:p>0.01</text:p>
          </table:table-cell>
          <table:table-cell table:formula="of:=[.BA20]*[.$D$6]" office:value-type="float" office:value="0.502654824574367" calcext:value-type="float">
            <text:p>0.503</text:p>
          </table:table-cell>
          <table:table-cell table:formula="of:=[.D$25]*[.$Z$5]*MAGNET([.D$24]+[.BB20])+[.E$25]*[.$Z$5]*MAGNET([.E$24]+[.BB20])+[.F$25]*[.$Z$5]*MAGNET([.F$24]+[.BB20])+[.G$25]*[.$Z$5]*MAGNET([.G$24]+[.BB20])+[.H$25]*[.$Z$5]*MAGNET([.H$24]+[.BB20])+[.I$25]*[.$Z$5]*MAGNET([.I$24]+[.BB20])+[.J$25]*[.$Z$5]*MAGNET([.J$24]+[.BB20])+[.K$25]*[.$Z$5]*MAGNET([.K$24]+[.BB20])+[.L$25]*[.$Z$5]*MAGNET([.L$24]+[.BB20])+[.M$25]*[.$Z$5]*MAGNET([.M$24]+[.BB20])+[.N$25]*[.$Z$5]*MAGNET([.N$24]+[.BB20])+[.O$25]*[.$Z$5]*MAGNET([.O$24]+[.BB20])+[.P$25]*[.$Z$5]*MAGNET([.P$24]+[.BB20])+[.Q$25]*[.$Z$5]*MAGNET([.Q$24]+[.BB20])+[.R$25]*[.$Z$5]*MAGNET([.R$24]+[.BB20])+[.S$25]*[.$Z$5]*MAGNET([.S$24]+[.BB20])+[.T$25]*[.$Z$5]*MAGNET([.T$24]+[.BB20])+[.U$25]*[.$Z$5]*MAGNET([.U$24]+[.BB20])+[.V$25]*[.$Z$5]*MAGNET([.V$24]+[.BB20])+[.W$25]*[.$Z$5]*MAGNET([.W$24]+[.BB20])+[.X$25]*[.$Z$5]*MAGNET([.X$24]+[.BB20])+[.Y$25]*[.$Z$5]*MAGNET([.Y$24]+[.BB20])+[.Z$25]*[.$Z$5]*MAGNET([.Z$24]+[.BB20])+[.AA$25]*[.$Z$5]*MAGNET([.AA$24]+[.BB20])+[.AB$25]*[.$Z$5]*MAGNET([.AB$24]+[.BB20])+[.AC$25]*[.$Z$5]*MAGNET([.AC$24]+[.BB20])+[.AD$25]*[.$Z$5]*MAGNET([.AD$24]+[.BB20])+[.AE$25]*[.$Z$5]*MAGNET([.AE$24]+[.BB20])+[.AF$25]*[.$Z$5]*MAGNET([.AF$24]+[.BB20])+[.AG$25]*[.$Z$5]*MAGNET([.AG$24]+[.BB20])+[.AH$25]*[.$Z$5]*MAGNET([.AH$24]+[.BB20]) +[.AI$25]*[.$Z$5]*MAGNET([.AI$24]+[.BB20]) +[.AJ$25]*[.$Z$5]*MAGNET([.AJ$24]+[.BB20]) +[.AK$25]*[.$Z$5]*MAGNET([.AK$24]+[.BB20]) +[.AL$25]*[.$Z$5]*MAGNET([.AL$24]+[.BB20]) +[.AM$25]*[.$Z$5]*MAGNET([.AM$24]+[.BB20]) +[.AN$25]*[.$Z$5]*MAGNET([.AN$24]+[.BB20]) +[.AO$25]*[.$Z$5]*MAGNET([.AO$24]+[.BB20])+RAND()*[.$BC$13]+[.AP$25]*[.$Z$5]*MAGNET([.AP$24]+[.BB20])&#10;+[.AQ$25]*[.$Z$5]*MAGNET([.AQ$24]+[.BB20])&#10;+[.AR$25]*[.$Z$5]*MAGNET([.AR$24]+[.BB20])&#10;+[.AS$25]*[.$Z$5]*MAGNET([.AS$24]+[.BB20])&#10;+[.AT$25]*[.$Z$5]*MAGNET([.AT$24]+[.BB20])&#10;+[.AU$25]*[.$Z$5]*MAGNET([.AU$24]+[.BB20])&#10;+[.AV$25]*[.$Z$5]*MAGNET([.AV$24]+[.BB20])&#10;+[.AW$25]*[.$Z$5]*MAGNET([.AW$24]+[.BB20])&#10;+[.AX$25]*[.$Z$5]*MAGNET([.AX$24]+[.BB20])&#10;+[.AY$25]*[.$Z$5]*MAGNET([.AY$24]+[.BB20])" office:value-type="float" office:value="10.5336068092235" calcext:value-type="float">
            <text:p>10.53</text:p>
          </table:table-cell>
          <table:table-cell table:style-name="ce70" table:formula="of:=[.E$26]*[.$Z$5]*MAGNET([.E$24]+[.$BB20])+[.F$26]*[.$Z$5]*MAGNET([.F$24]+[.$BB20])+[.G$26]*[.$Z$5]*MAGNET([.G$24]+[.$BB20])+[.H$26]*[.$Z$5]*MAGNET([.H$24]+[.$BB20])+[.I$26]*[.$Z$5]*MAGNET([.I$24]+[.$BB20])+[.J$26]*[.$Z$5]*MAGNET([.J$24]+[.$BB20])+[.K$26]*[.$Z$5]*MAGNET([.K$24]+[.$BB20])+[.L$26]*[.$Z$5]*MAGNET([.L$24]+[.$BB20])+[.M$26]*[.$Z$5]*MAGNET([.M$24]+[.$BB20])+[.N$26]*[.$Z$5]*MAGNET([.N$24]+[.$BB20])+[.O$26]*[.$Z$5]*MAGNET([.O$24]+[.$BB20])+[.P$26]*[.$Z$5]*MAGNET([.P$24]+[.$BB20])+[.Q$26]*[.$Z$5]*MAGNET([.Q$24]+[.$BB20])+[.R$26]*[.$Z$5]*MAGNET([.R$24]+[.$BB20])+[.S$26]*[.$Z$5]*MAGNET([.S$24]+[.$BB20])+[.T$26]*[.$Z$5]*MAGNET([.T$24]+[.$BB20])+[.U$26]*[.$Z$5]*MAGNET([.U$24]+[.$BB20])+[.V$26]*[.$Z$5]*MAGNET([.V$24]+[.$BB20])+[.W$26]*[.$Z$5]*MAGNET([.W$24]+[.$BB20])+[.X$26]*[.$Z$5]*MAGNET([.X$24]+[.$BB20])+[.Y$26]*[.$Z$5]*MAGNET([.Y$24]+[.$BB20])+[.Z$26]*[.$Z$5]*MAGNET([.Z$24]+[.$BB20])+[.AA$26]*[.$Z$5]*MAGNET([.AA$24]+[.$BB20])+[.AB$26]*[.$Z$5]*MAGNET([.AB$24]+[.$BB20])+[.AC$26]*[.$Z$5]*MAGNET([.AC$24]+[.$BB20])+[.AD$26]*[.$Z$5]*MAGNET([.AD$24]+[.$BB20])+[.AE$26]*[.$Z$5]*MAGNET([.AE$24]+[.$BB20])+[.AF$26]*[.$Z$5]*MAGNET([.AF$24]+[.$BB20])+[.AG$26]*[.$Z$5]*MAGNET([.AG$24]+[.$BB20])+[.D$26]*[.$Z$5]*MAGNET([.D$24]+[.$BB20])+[.AH$26]*[.$Z$5]*MAGNET([.AH$24]+[.BB20]) +[.AI$26]*[.$Z$5]*MAGNET([.AI$24]+[.BB20]) +[.AJ$26]*[.$Z$5]*MAGNET([.AJ$24]+[.BB20]) +[.AK$26]*[.$Z$5]*MAGNET([.AK$24]+[.BB20]) +[.AL$26]*[.$Z$5]*MAGNET([.AL$24]+[.BB20]) +[.AM$26]*[.$Z$5]*MAGNET([.AM$24]+[.BB20]) +[.AN$26]*[.$Z$5]*MAGNET([.AN$24]+[.BB20]) +[.AO$26]*[.$Z$5]*MAGNET([.AO$24]+[.BB20]) +[.AP$26]*[.$Z$5]*MAGNET([.AP$24]+[.$BB20])&#10;+[.AQ$26]*[.$Z$5]*MAGNET([.AQ$24]+[.$BB20])&#10;+[.AR$26]*[.$Z$5]*MAGNET([.AR$24]+[.$BB20])&#10;+[.AS$26]*[.$Z$5]*MAGNET([.AS$24]+[.$BB20])&#10;+[.AT$26]*[.$Z$5]*MAGNET([.AT$24]+[.$BB20])&#10;+[.AU$26]*[.$Z$5]*MAGNET([.AU$24]+[.$BB20])&#10;+[.AV$26]*[.$Z$5]*MAGNET([.AV$24]+[.$BB20])&#10;+[.AW$26]*[.$Z$5]*MAGNET([.AW$24]+[.$BB20])&#10;+[.AX$26]*[.$Z$5]*MAGNET([.AX$24]+[.$BB20])&#10;+[.AY$26]*[.$Z$5]*MAGNET([.AY$24]+[.$BB20]) +RAND()*[.$BD$13]" office:value-type="float" office:value="76.1977561541503" calcext:value-type="float">
            <text:p>76.20</text:p>
          </table:table-cell>
          <table:table-cell table:style-name="ce71" table:formula="of:=[.E$27]*[.$Z$5]*MAGNET([.E$24]+[.$BB20])+[.F$27]*[.$Z$5]*MAGNET([.F$24]+[.$BB20])+[.G$27]*[.$Z$5]*MAGNET([.G$24]+[.$BB20])+[.H$27]*[.$Z$5]*MAGNET([.H$24]+[.$BB20])+[.I$27]*[.$Z$5]*MAGNET([.I$24]+[.$BB20])+[.J$27]*[.$Z$5]*MAGNET([.J$24]+[.$BB20])+[.K$27]*[.$Z$5]*MAGNET([.K$24]+[.$BB20])+[.L$27]*[.$Z$5]*MAGNET([.L$24]+[.$BB20])+[.M$27]*[.$Z$5]*MAGNET([.M$24]+[.$BB20])+[.N$27]*[.$Z$5]*MAGNET([.N$24]+[.$BB20])+[.O$27]*[.$Z$5]*MAGNET([.O$24]+[.$BB20])+[.P$27]*[.$Z$5]*MAGNET([.P$24]+[.$BB20])+[.Q$27]*[.$Z$5]*MAGNET([.Q$24]+[.$BB20])+[.R$27]*[.$Z$5]*MAGNET([.R$24]+[.$BB20])+[.S$27]*[.$Z$5]*MAGNET([.S$24]+[.$BB20])+[.T$27]*[.$Z$5]*MAGNET([.T$24]+[.$BB20])+[.U$27]*[.$Z$5]*MAGNET([.U$24]+[.$BB20])+[.V$27]*[.$Z$5]*MAGNET([.V$24]+[.$BB20])+[.W$27]*[.$Z$5]*MAGNET([.W$24]+[.$BB20])+[.X$27]*[.$Z$5]*MAGNET([.X$24]+[.$BB20])+[.Y$27]*[.$Z$5]*MAGNET([.Y$24]+[.$BB20])+[.Z$27]*[.$Z$5]*MAGNET([.Z$24]+[.$BB20])+[.AA$27]*[.$Z$5]*MAGNET([.AA$24]+[.$BB20])+[.AB$27]*[.$Z$5]*MAGNET([.AB$24]+[.$BB20])+[.AC$27]*[.$Z$5]*MAGNET([.AC$24]+[.$BB20])+[.AD$27]*[.$Z$5]*MAGNET([.AD$24]+[.$BB20])+[.AE$27]*[.$Z$5]*MAGNET([.AE$24]+[.$BB20])+[.AF$27]*[.$Z$5]*MAGNET([.AF$24]+[.$BB20])+[.AG$27]*[.$Z$5]*MAGNET([.AG$24]+[.$BB20])+[.D$27]*[.$Z$5]*MAGNET([.D$24]+[.$BB20])+[.AH$27]*[.$Z$5]*MAGNET([.AH$24]+[.BB20]) +[.AI$27]*[.$Z$5]*MAGNET([.AI$24]+[.BB20]) +[.AJ$27]*[.$Z$5]*MAGNET([.AJ$24]+[.BB20]) +[.AK$27]*[.$Z$5]*MAGNET([.AK$24]+[.BB20]) +[.AL$27]*[.$Z$5]*MAGNET([.AL$24]+[.BB20]) +[.AM$27]*[.$Z$5]*MAGNET([.AM$24]+[.BB20]) +[.AN$27]*[.$Z$5]*MAGNET([.AN$24]+[.BB20]) +[.AO$27]*[.$Z$5]*MAGNET([.AO$24]+[.BB20]) +[.AP$27]*[.$Z$5]*MAGNET([.AP$24]+[.$BB20])&#10;+[.AQ$27]*[.$Z$5]*MAGNET([.AQ$24]+[.$BB20])&#10;+[.AR$27]*[.$Z$5]*MAGNET([.AR$24]+[.$BB20])&#10;+[.AS$27]*[.$Z$5]*MAGNET([.AS$24]+[.$BB20])&#10;+[.AT$27]*[.$Z$5]*MAGNET([.AT$24]+[.$BB20])&#10;+[.AU$27]*[.$Z$5]*MAGNET([.AU$24]+[.$BB20])&#10;+[.AV$27]*[.$Z$5]*MAGNET([.AV$24]+[.$BB20])&#10;+[.AW$27]*[.$Z$5]*MAGNET([.AW$24]+[.$BB20])&#10;+[.AX$27]*[.$Z$5]*MAGNET([.AX$24]+[.$BB20])&#10;+[.AY$27]*[.$Z$5]*MAGNET([.AY$24]+[.$BB20]) +RAND()*[.$BE$13]" office:value-type="float" office:value="-105.082906951975" calcext:value-type="float">
            <text:p>-105.082906951975</text:p>
          </table:table-cell>
          <table:table-cell table:style-name="ce71" table:formula="of:=[.E$28]*[.$Z$5]*MAGNET([.E$24]+[.$BB20])+[.F$28]*[.$Z$5]*MAGNET([.F$24]+[.$BB20])+[.G$28]*[.$Z$5]*MAGNET([.G$24]+[.$BB20])+[.H$28]*[.$Z$5]*MAGNET([.H$24]+[.$BB20])+[.I$28]*[.$Z$5]*MAGNET([.I$24]+[.$BB20])+[.J$28]*[.$Z$5]*MAGNET([.J$24]+[.$BB20])+[.K$28]*[.$Z$5]*MAGNET([.K$24]+[.$BB20])+[.L$28]*[.$Z$5]*MAGNET([.L$24]+[.$BB20])+[.M$28]*[.$Z$5]*MAGNET([.M$24]+[.$BB20])+[.N$28]*[.$Z$5]*MAGNET([.N$24]+[.$BB20])+[.O$28]*[.$Z$5]*MAGNET([.O$24]+[.$BB20])+[.P$28]*[.$Z$5]*MAGNET([.P$24]+[.$BB20])+[.Q$28]*[.$Z$5]*MAGNET([.Q$24]+[.$BB20])+[.R$28]*[.$Z$5]*MAGNET([.R$24]+[.$BB20])+[.S$28]*[.$Z$5]*MAGNET([.S$24]+[.$BB20])+[.T$28]*[.$Z$5]*MAGNET([.T$24]+[.$BB20])+[.U$28]*[.$Z$5]*MAGNET([.U$24]+[.$BB20])+[.V$28]*[.$Z$5]*MAGNET([.V$24]+[.$BB20])+[.W$28]*[.$Z$5]*MAGNET([.W$24]+[.$BB20])+[.X$28]*[.$Z$5]*MAGNET([.X$24]+[.$BB20])+[.Y$28]*[.$Z$5]*MAGNET([.Y$24]+[.$BB20])+[.Z$28]*[.$Z$5]*MAGNET([.Z$24]+[.$BB20])+[.AA$28]*[.$Z$5]*MAGNET([.AA$24]+[.$BB20])+[.AB$28]*[.$Z$5]*MAGNET([.AB$24]+[.$BB20])+[.AC$28]*[.$Z$5]*MAGNET([.AC$24]+[.$BB20])+[.AD$28]*[.$Z$5]*MAGNET([.AD$24]+[.$BB20])+[.AE$28]*[.$Z$5]*MAGNET([.AE$24]+[.$BB20])+[.AF$28]*[.$Z$5]*MAGNET([.AF$24]+[.$BB20])+[.AG$28]*[.$Z$5]*MAGNET([.AG$24]+[.$BB20])+[.D$28]*[.$Z$5]*MAGNET([.D$24]+[.$BB20])+[.AH$28]*[.$Z$5]*MAGNET([.AH$24]+[.BB20]) +[.AI$28]*[.$Z$5]*MAGNET([.AI$24]+[.BB20]) +[.AJ$28]*[.$Z$5]*MAGNET([.AJ$24]+[.BB20]) +[.AK$28]*[.$Z$5]*MAGNET([.AK$24]+[.BB20]) +[.AL$28]*[.$Z$5]*MAGNET([.AL$24]+[.BB20]) +[.AM$28]*[.$Z$5]*MAGNET([.AM$24]+[.BB20]) +[.AN$28]*[.$Z$5]*MAGNET([.AN$24]+[.BB20]) +[.AO$28]*[.$Z$5]*MAGNET([.AO$24]+[.BB20]) +[.AP$28]*[.$Z$5]*MAGNET([.AP$24]+[.$BB20])&#10;+[.AQ$28]*[.$Z$5]*MAGNET([.AQ$24]+[.$BB20])&#10;+[.AR$28]*[.$Z$5]*MAGNET([.AR$24]+[.$BB20])&#10;+[.AS$28]*[.$Z$5]*MAGNET([.AS$24]+[.$BB20])&#10;+[.AT$28]*[.$Z$5]*MAGNET([.AT$24]+[.$BB20])&#10;+[.AU$28]*[.$Z$5]*MAGNET([.AU$24]+[.$BB20])&#10;+[.AV$28]*[.$Z$5]*MAGNET([.AV$24]+[.$BB20])&#10;+[.AW$28]*[.$Z$5]*MAGNET([.AW$24]+[.$BB20])&#10;+[.AX$28]*[.$Z$5]*MAGNET([.AX$24]+[.$BB20])&#10;+[.AY$28]*[.$Z$5]*MAGNET([.AY$24]+[.$BB20]) +RAND()*[.$BF$13]" office:value-type="float" office:value="-13.5098441029683" calcext:value-type="float">
            <text:p>-13.5098441029683</text:p>
          </table:table-cell>
          <table:table-cell table:style-name="ce71" table:formula="of:=[.E$29]*[.$Z$5]*MAGNET([.E$24]+[.$BB20])+[.F$29]*[.$Z$5]*MAGNET([.F$24]+[.$BB20])+[.G$29]*[.$Z$5]*MAGNET([.G$24]+[.$BB20])+[.H$29]*[.$Z$5]*MAGNET([.H$24]+[.$BB20])+[.I$29]*[.$Z$5]*MAGNET([.I$24]+[.$BB20])+[.J$29]*[.$Z$5]*MAGNET([.J$24]+[.$BB20])+[.K$29]*[.$Z$5]*MAGNET([.K$24]+[.$BB20])+[.L$29]*[.$Z$5]*MAGNET([.L$24]+[.$BB20])+[.M$29]*[.$Z$5]*MAGNET([.M$24]+[.$BB20])+[.N$29]*[.$Z$5]*MAGNET([.N$24]+[.$BB20])+[.O$29]*[.$Z$5]*MAGNET([.O$24]+[.$BB20])+[.P$29]*[.$Z$5]*MAGNET([.P$24]+[.$BB20])+[.Q$29]*[.$Z$5]*MAGNET([.Q$24]+[.$BB20])+[.R$29]*[.$Z$5]*MAGNET([.R$24]+[.$BB20])+[.S$29]*[.$Z$5]*MAGNET([.S$24]+[.$BB20])+[.T$29]*[.$Z$5]*MAGNET([.T$24]+[.$BB20])+[.U$29]*[.$Z$5]*MAGNET([.U$24]+[.$BB20])+[.V$29]*[.$Z$5]*MAGNET([.V$24]+[.$BB20])+[.W$29]*[.$Z$5]*MAGNET([.W$24]+[.$BB20])+[.X$29]*[.$Z$5]*MAGNET([.X$24]+[.$BB20])+[.Y$29]*[.$Z$5]*MAGNET([.Y$24]+[.$BB20])+[.Z$29]*[.$Z$5]*MAGNET([.Z$24]+[.$BB20])+[.AA$29]*[.$Z$5]*MAGNET([.AA$24]+[.$BB20])+[.AB$29]*[.$Z$5]*MAGNET([.AB$24]+[.$BB20])+[.AC$29]*[.$Z$5]*MAGNET([.AC$24]+[.$BB20])+[.AD$29]*[.$Z$5]*MAGNET([.AD$24]+[.$BB20])+[.AE$29]*[.$Z$5]*MAGNET([.AE$24]+[.$BB20])+[.AF$29]*[.$Z$5]*MAGNET([.AF$24]+[.$BB20])+[.AG$29]*[.$Z$5]*MAGNET([.AG$24]+[.$BB20])+[.D$29]*[.$Z$5]*MAGNET([.D$24]+[.$BB20])+[.AH$29]*[.$Z$5]*MAGNET([.AH$24]+[.BB20]) +[.AI$29]*[.$Z$5]*MAGNET([.AI$24]+[.BB20]) +[.AJ$29]*[.$Z$5]*MAGNET([.AJ$24]+[.BB20]) +[.AK$29]*[.$Z$5]*MAGNET([.AK$24]+[.BB20]) +[.AL$29]*[.$Z$5]*MAGNET([.AL$24]+[.BB20]) +[.AM$29]*[.$Z$5]*MAGNET([.AM$24]+[.BB20]) +[.AN$29]*[.$Z$5]*MAGNET([.AN$24]+[.BB20]) +[.AO$29]*[.$Z$5]*MAGNET([.AO$24]+[.BB20]) +[.AP$29]*[.$Z$5]*MAGNET([.AP$24]+[.$BB20])&#10;+[.AQ$29]*[.$Z$5]*MAGNET([.AQ$24]+[.$BB20])&#10;+[.AR$29]*[.$Z$5]*MAGNET([.AR$24]+[.$BB20])&#10;+[.AS$29]*[.$Z$5]*MAGNET([.AS$24]+[.$BB20])&#10;+[.AT$29]*[.$Z$5]*MAGNET([.AT$24]+[.$BB20])&#10;+[.AU$29]*[.$Z$5]*MAGNET([.AU$24]+[.$BB20])&#10;+[.AV$29]*[.$Z$5]*MAGNET([.AV$24]+[.$BB20])&#10;+[.AW$29]*[.$Z$5]*MAGNET([.AW$24]+[.$BB20])&#10;+[.AX$29]*[.$Z$5]*MAGNET([.AX$24]+[.$BB20])&#10;+[.AY$29]*[.$Z$5]*MAGNET([.AY$24]+[.$BB20]) +RAND()*[.$BG$13]" office:value-type="float" office:value="43.3677126478192" calcext:value-type="float">
            <text:p>43.3677126478192</text:p>
          </table:table-cell>
          <table:table-cell table:style-name="ce71" table:formula="of:=[.E$30]*[.$Z$5]*MAGNET([.E$24]+[.$BB20])+[.F$30]*[.$Z$5]*MAGNET([.F$24]+[.$BB20])+[.G$30]*[.$Z$5]*MAGNET([.G$24]+[.$BB20])+[.H$30]*[.$Z$5]*MAGNET([.H$24]+[.$BB20])+[.I$30]*[.$Z$5]*MAGNET([.I$24]+[.$BB20])+[.J$30]*[.$Z$5]*MAGNET([.J$24]+[.$BB20])+[.K$30]*[.$Z$5]*MAGNET([.K$24]+[.$BB20])+[.L$30]*[.$Z$5]*MAGNET([.L$24]+[.$BB20])+[.M$30]*[.$Z$5]*MAGNET([.M$24]+[.$BB20])+[.N$30]*[.$Z$5]*MAGNET([.N$24]+[.$BB20])+[.O$30]*[.$Z$5]*MAGNET([.O$24]+[.$BB20])+[.P$30]*[.$Z$5]*MAGNET([.P$24]+[.$BB20])+[.Q$30]*[.$Z$5]*MAGNET([.Q$24]+[.$BB20])+[.R$30]*[.$Z$5]*MAGNET([.R$24]+[.$BB20])+[.S$30]*[.$Z$5]*MAGNET([.S$24]+[.$BB20])+[.T$30]*[.$Z$5]*MAGNET([.T$24]+[.$BB20])+[.U$30]*[.$Z$5]*MAGNET([.U$24]+[.$BB20])+[.V$30]*[.$Z$5]*MAGNET([.V$24]+[.$BB20])+[.W$30]*[.$Z$5]*MAGNET([.W$24]+[.$BB20])+[.X$30]*[.$Z$5]*MAGNET([.X$24]+[.$BB20])+[.Y$30]*[.$Z$5]*MAGNET([.Y$24]+[.$BB20])+[.Z$30]*[.$Z$5]*MAGNET([.Z$24]+[.$BB20])+[.AA$30]*[.$Z$5]*MAGNET([.AA$24]+[.$BB20])+[.AB$30]*[.$Z$5]*MAGNET([.AB$24]+[.$BB20])+[.AC$30]*[.$Z$5]*MAGNET([.AC$24]+[.$BB20])+[.AD$30]*[.$Z$5]*MAGNET([.AD$24]+[.$BB20])+[.AE$30]*[.$Z$5]*MAGNET([.AE$24]+[.$BB20])+[.AF$30]*[.$Z$5]*MAGNET([.AF$24]+[.$BB20])+[.AG$30]*[.$Z$5]*MAGNET([.AG$24]+[.$BB20])+[.D$30]*[.$Z$5]*MAGNET([.D$24]+[.$BB20])+[.AH$30]*[.$Z$5]*MAGNET([.AH$24]+[.BB20]) +[.AI$30]*[.$Z$5]*MAGNET([.AI$24]+[.BB20]) +[.AJ$30]*[.$Z$5]*MAGNET([.AJ$24]+[.BB20]) +[.AK$30]*[.$Z$5]*MAGNET([.AK$24]+[.BB20]) +[.AL$30]*[.$Z$5]*MAGNET([.AL$24]+[.BB20]) +[.AM$30]*[.$Z$5]*MAGNET([.AM$24]+[.BB20]) +[.AN$30]*[.$Z$5]*MAGNET([.AN$24]+[.BB20]) +[.AO$30]*[.$Z$5]*MAGNET([.AO$24]+[.BB20]) +[.AP$30]*[.$Z$5]*MAGNET([.AP$24]+[.$BB20])&#10;+[.AQ$30]*[.$Z$5]*MAGNET([.AQ$24]+[.$BB20])&#10;+[.AR$30]*[.$Z$5]*MAGNET([.AR$24]+[.$BB20])&#10;+[.AS$30]*[.$Z$5]*MAGNET([.AS$24]+[.$BB20])&#10;+[.AT$30]*[.$Z$5]*MAGNET([.AT$24]+[.$BB20])&#10;+[.AU$30]*[.$Z$5]*MAGNET([.AU$24]+[.$BB20])&#10;+[.AV$30]*[.$Z$5]*MAGNET([.AV$24]+[.$BB20])&#10;+[.AW$30]*[.$Z$5]*MAGNET([.AW$24]+[.$BB20])&#10;+[.AX$30]*[.$Z$5]*MAGNET([.AX$24]+[.$BB20])&#10;+[.AY$30]*[.$Z$5]*MAGNET([.AY$24]+[.$BB20]) +RAND()*[.$BH$13]" office:value-type="float" office:value="0" calcext:value-type="float">
            <text:p>0</text:p>
          </table:table-cell>
          <table:table-cell table:style-name="ce71" table:formula="of:=[.E$31]*[.$Z$5]*MAGNET([.E$24]+[.$BB20])+[.F$31]*[.$Z$5]*MAGNET([.F$24]+[.$BB20])+[.G$31]*[.$Z$5]*MAGNET([.G$24]+[.$BB20])+[.H$31]*[.$Z$5]*MAGNET([.H$24]+[.$BB20])+[.I$31]*[.$Z$5]*MAGNET([.I$24]+[.$BB20])+[.J$31]*[.$Z$5]*MAGNET([.J$24]+[.$BB20])+[.K$31]*[.$Z$5]*MAGNET([.K$24]+[.$BB20])+[.L$31]*[.$Z$5]*MAGNET([.L$24]+[.$BB20])+[.M$31]*[.$Z$5]*MAGNET([.M$24]+[.$BB20])+[.N$31]*[.$Z$5]*MAGNET([.N$24]+[.$BB20])+[.O$31]*[.$Z$5]*MAGNET([.O$24]+[.$BB20])+[.P$31]*[.$Z$5]*MAGNET([.P$24]+[.$BB20])+[.Q$31]*[.$Z$5]*MAGNET([.Q$24]+[.$BB20])+[.R$31]*[.$Z$5]*MAGNET([.R$24]+[.$BB20])+[.S$31]*[.$Z$5]*MAGNET([.S$24]+[.$BB20])+[.T$31]*[.$Z$5]*MAGNET([.T$24]+[.$BB20])+[.U$31]*[.$Z$5]*MAGNET([.U$24]+[.$BB20])+[.V$31]*[.$Z$5]*MAGNET([.V$24]+[.$BB20])+[.W$31]*[.$Z$5]*MAGNET([.W$24]+[.$BB20])+[.X$31]*[.$Z$5]*MAGNET([.X$24]+[.$BB20])+[.Y$31]*[.$Z$5]*MAGNET([.Y$24]+[.$BB20])+[.Z$31]*[.$Z$5]*MAGNET([.Z$24]+[.$BB20])+[.AA$31]*[.$Z$5]*MAGNET([.AA$24]+[.$BB20])+[.AB$31]*[.$Z$5]*MAGNET([.AB$24]+[.$BB20])+[.AC$31]*[.$Z$5]*MAGNET([.AC$24]+[.$BB20])+[.AD$31]*[.$Z$5]*MAGNET([.AD$24]+[.$BB20])+[.AE$31]*[.$Z$5]*MAGNET([.AE$24]+[.$BB20])+[.AF$31]*[.$Z$5]*MAGNET([.AF$24]+[.$BB20])+[.AG$31]*[.$Z$5]*MAGNET([.AG$24]+[.$BB20])+[.D$31]*[.$Z$5]*MAGNET([.D$24]+[.$BB20])+[.AH$31]*[.$Z$5]*MAGNET([.AH$24]+[.BB20]) +[.AI$31]*[.$Z$5]*MAGNET([.AI$24]+[.BB20]) +[.AJ$31]*[.$Z$5]*MAGNET([.AJ$24]+[.BB20]) +[.AK$31]*[.$Z$5]*MAGNET([.AK$24]+[.BB20]) +[.AL$31]*[.$Z$5]*MAGNET([.AL$24]+[.BB20]) +[.AM$31]*[.$Z$5]*MAGNET([.AM$24]+[.BB20]) +[.AN$31]*[.$Z$5]*MAGNET([.AN$24]+[.BB20]) +[.AO$31]*[.$Z$5]*MAGNET([.AO$24]+[.BB20]) +[.AP$31]*[.$Z$5]*MAGNET([.AP$24]+[.$BB20])&#10;+[.AQ$31]*[.$Z$5]*MAGNET([.AQ$24]+[.$BB20])&#10;+[.AR$31]*[.$Z$5]*MAGNET([.AR$24]+[.$BB20])&#10;+[.AS$31]*[.$Z$5]*MAGNET([.AS$24]+[.$BB20])&#10;+[.AT$31]*[.$Z$5]*MAGNET([.AT$24]+[.$BB20])&#10;+[.AU$31]*[.$Z$5]*MAGNET([.AU$24]+[.$BB20])&#10;+[.AV$31]*[.$Z$5]*MAGNET([.AV$24]+[.$BB20])&#10;+[.AW$31]*[.$Z$5]*MAGNET([.AW$24]+[.$BB20])&#10;+[.AX$31]*[.$Z$5]*MAGNET([.AX$24]+[.$BB20])&#10;+[.AY$31]*[.$Z$5]*MAGNET([.AY$24]+[.$BB20]) +RAND()*[.$BI$13]" office:value-type="float" office:value="0" calcext:value-type="float">
            <text:p>0</text:p>
          </table:table-cell>
          <table:table-cell table:style-name="ce71" table:formula="of:=[.E$32]*[.$Z$5]*MAGNET([.E$24]+[.$BB20])+[.F$32]*[.$Z$5]*MAGNET([.F$24]+[.$BB20])+[.G$32]*[.$Z$5]*MAGNET([.G$24]+[.$BB20])+[.H$32]*[.$Z$5]*MAGNET([.H$24]+[.$BB20])+[.I$32]*[.$Z$5]*MAGNET([.I$24]+[.$BB20])+[.J$32]*[.$Z$5]*MAGNET([.J$24]+[.$BB20])+[.K$32]*[.$Z$5]*MAGNET([.K$24]+[.$BB20])+[.L$32]*[.$Z$5]*MAGNET([.L$24]+[.$BB20])+[.M$32]*[.$Z$5]*MAGNET([.M$24]+[.$BB20])+[.N$32]*[.$Z$5]*MAGNET([.N$24]+[.$BB20])+[.O$32]*[.$Z$5]*MAGNET([.O$24]+[.$BB20])+[.P$32]*[.$Z$5]*MAGNET([.P$24]+[.$BB20])+[.Q$32]*[.$Z$5]*MAGNET([.Q$24]+[.$BB20])+[.R$32]*[.$Z$5]*MAGNET([.R$24]+[.$BB20])+[.S$32]*[.$Z$5]*MAGNET([.S$24]+[.$BB20])+[.T$32]*[.$Z$5]*MAGNET([.T$24]+[.$BB20])+[.U$32]*[.$Z$5]*MAGNET([.U$24]+[.$BB20])+[.V$32]*[.$Z$5]*MAGNET([.V$24]+[.$BB20])+[.W$32]*[.$Z$5]*MAGNET([.W$24]+[.$BB20])+[.X$32]*[.$Z$5]*MAGNET([.X$24]+[.$BB20])+[.Y$32]*[.$Z$5]*MAGNET([.Y$24]+[.$BB20])+[.Z$32]*[.$Z$5]*MAGNET([.Z$24]+[.$BB20])+[.AA$32]*[.$Z$5]*MAGNET([.AA$24]+[.$BB20])+[.AB$32]*[.$Z$5]*MAGNET([.AB$24]+[.$BB20])+[.AC$32]*[.$Z$5]*MAGNET([.AC$24]+[.$BB20])+[.AD$32]*[.$Z$5]*MAGNET([.AD$24]+[.$BB20])+[.AE$32]*[.$Z$5]*MAGNET([.AE$24]+[.$BB20])+[.AF$32]*[.$Z$5]*MAGNET([.AF$24]+[.$BB20])+[.AG$32]*[.$Z$5]*MAGNET([.AG$24]+[.$BB20])+[.D$32]*[.$Z$5]*MAGNET([.D$24]+[.$BB20])+[.AH$32]*[.$Z$5]*MAGNET([.AH$24]+[.BB20]) +[.AI$32]*[.$Z$5]*MAGNET([.AI$24]+[.BB20]) +[.AJ$32]*[.$Z$5]*MAGNET([.AJ$24]+[.BB20]) +[.AK$32]*[.$Z$5]*MAGNET([.AK$24]+[.BB20]) +[.AL$32]*[.$Z$5]*MAGNET([.AL$24]+[.BB20]) +[.AM$32]*[.$Z$5]*MAGNET([.AM$24]+[.BB20]) +[.AN$32]*[.$Z$5]*MAGNET([.AN$24]+[.BB20]) +[.AO$32]*[.$Z$5]*MAGNET([.AO$24]+[.BB20]) +[.AP$32]*[.$Z$5]*MAGNET([.AP$24]+[.$BB20])&#10;+[.AQ$32]*[.$Z$5]*MAGNET([.AQ$24]+[.$BB20])&#10;+[.AR$32]*[.$Z$5]*MAGNET([.AR$24]+[.$BB20])&#10;+[.AS$32]*[.$Z$5]*MAGNET([.AS$24]+[.$BB20])&#10;+[.AT$32]*[.$Z$5]*MAGNET([.AT$24]+[.$BB20])&#10;+[.AU$32]*[.$Z$5]*MAGNET([.AU$24]+[.$BB20])&#10;+[.AV$32]*[.$Z$5]*MAGNET([.AV$24]+[.$BB20])&#10;+[.AW$32]*[.$Z$5]*MAGNET([.AW$24]+[.$BB20])&#10;+[.AX$32]*[.$Z$5]*MAGNET([.AX$24]+[.$BB20])&#10;+[.AY$32]*[.$Z$5]*MAGNET([.AY$24]+[.$BB2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35" table:formula="of:=[$Lind.D16]" office:value-type="float" office:value="0" calcext:value-type="float">
            <text:p>0</text:p>
          </table:table-cell>
          <table:table-cell table:style-name="ce40" table:formula="of:=[$Lind.E16]" office:value-type="float" office:value="0" calcext:value-type="float">
            <text:p>0</text:p>
          </table:table-cell>
          <table:table-cell table:style-name="ce40" table:formula="of:=[$Lind.F16]" office:value-type="float" office:value="0" calcext:value-type="float">
            <text:p>0</text:p>
          </table:table-cell>
          <table:table-cell table:style-name="ce40" table:formula="of:=[$Lind.G16]" office:value-type="float" office:value="0" calcext:value-type="float">
            <text:p>0</text:p>
          </table:table-cell>
          <table:table-cell table:style-name="ce40" table:formula="of:=[$Lind.H16]" office:value-type="float" office:value="0" calcext:value-type="float">
            <text:p>0</text:p>
          </table:table-cell>
          <table:table-cell table:style-name="ce40" table:formula="of:=[$Lind.I16]" office:value-type="float" office:value="0" calcext:value-type="float">
            <text:p>0</text:p>
          </table:table-cell>
          <table:table-cell table:style-name="ce40" table:formula="of:=[$Lind.J16]" office:value-type="float" office:value="0" calcext:value-type="float">
            <text:p>0</text:p>
          </table:table-cell>
          <table:table-cell table:style-name="ce40" table:formula="of:=[$Lind.K16]" office:value-type="float" office:value="0" calcext:value-type="float">
            <text:p>0</text:p>
          </table:table-cell>
          <table:table-cell table:style-name="ce40" table:formula="of:=[$Lind.L16]" office:value-type="float" office:value="0" calcext:value-type="float">
            <text:p>0</text:p>
          </table:table-cell>
          <table:table-cell table:style-name="ce40" table:formula="of:=[$Lind.M16]" office:value-type="float" office:value="0" calcext:value-type="float">
            <text:p>0</text:p>
          </table:table-cell>
          <table:table-cell table:style-name="ce40" table:formula="of:=[$Lind.N16]" office:value-type="float" office:value="0" calcext:value-type="float">
            <text:p>0</text:p>
          </table:table-cell>
          <table:table-cell table:style-name="ce40" table:formula="of:=[$Lind.O16]" office:value-type="float" office:value="0" calcext:value-type="float">
            <text:p>0</text:p>
          </table:table-cell>
          <table:table-cell table:style-name="ce40" table:formula="of:=[$Lind.P16]" office:value-type="float" office:value="0" calcext:value-type="float">
            <text:p>0</text:p>
          </table:table-cell>
          <table:table-cell table:style-name="ce40" table:formula="of:=[$Lind.Q16]" office:value-type="float" office:value="0" calcext:value-type="float">
            <text:p>0</text:p>
          </table:table-cell>
          <table:table-cell table:style-name="ce40" table:formula="of:=[$Lind.R16]" office:value-type="float" office:value="0" calcext:value-type="float">
            <text:p>0</text:p>
          </table:table-cell>
          <table:table-cell table:style-name="ce40" table:formula="of:=[$Lind.S16]" office:value-type="float" office:value="0" calcext:value-type="float">
            <text:p>0</text:p>
          </table:table-cell>
          <table:table-cell table:style-name="ce40" table:formula="of:=[$Lind.T16]" office:value-type="float" office:value="0" calcext:value-type="float">
            <text:p>0</text:p>
          </table:table-cell>
          <table:table-cell table:style-name="ce40" table:formula="of:=[$Lind.U16]" office:value-type="float" office:value="0" calcext:value-type="float">
            <text:p>0</text:p>
          </table:table-cell>
          <table:table-cell table:style-name="ce40" table:formula="of:=[$Lind.V16]" office:value-type="float" office:value="0" calcext:value-type="float">
            <text:p>0</text:p>
          </table:table-cell>
          <table:table-cell table:style-name="ce40" table:formula="of:=[$Lind.W16]" office:value-type="float" office:value="0" calcext:value-type="float">
            <text:p>0</text:p>
          </table:table-cell>
          <table:table-cell table:style-name="ce40" table:formula="of:=[$Lind.X16]" office:value-type="float" office:value="0" calcext:value-type="float">
            <text:p>0</text:p>
          </table:table-cell>
          <table:table-cell table:style-name="ce40" table:formula="of:=[$Lind.Y16]" office:value-type="float" office:value="0" calcext:value-type="float">
            <text:p>0</text:p>
          </table:table-cell>
          <table:table-cell table:style-name="ce40" table:formula="of:=[$Lind.Z16]" office:value-type="float" office:value="0" calcext:value-type="float">
            <text:p>0</text:p>
          </table:table-cell>
          <table:table-cell table:style-name="ce40" table:formula="of:=[$Lind.AA16]" office:value-type="float" office:value="0" calcext:value-type="float">
            <text:p>0</text:p>
          </table:table-cell>
          <table:table-cell table:style-name="ce40" table:formula="of:=[$Lind.AB16]" office:value-type="float" office:value="0" calcext:value-type="float">
            <text:p>0</text:p>
          </table:table-cell>
          <table:table-cell table:style-name="ce40" table:formula="of:=[$Lind.AC16]" office:value-type="float" office:value="0" calcext:value-type="float">
            <text:p>0</text:p>
          </table:table-cell>
          <table:table-cell table:style-name="ce40" table:formula="of:=[$Lind.AD16]" office:value-type="float" office:value="0" calcext:value-type="float">
            <text:p>0</text:p>
          </table:table-cell>
          <table:table-cell table:style-name="ce40" table:formula="of:=[$Lind.AE16]" office:value-type="float" office:value="0" calcext:value-type="float">
            <text:p>0</text:p>
          </table:table-cell>
          <table:table-cell table:style-name="ce40" table:formula="of:=[$Lind.AF16]" office:value-type="float" office:value="0" calcext:value-type="float">
            <text:p>0</text:p>
          </table:table-cell>
          <table:table-cell table:style-name="ce51" table:formula="of:=[$Lind.AG16]" office:value-type="float" office:value="0" calcext:value-type="float">
            <text:p>0</text:p>
          </table:table-cell>
          <table:table-cell table:style-name="ce40" table:formula="of:=[$Lind.AH16]" office:value-type="float" office:value="0" calcext:value-type="float">
            <text:p>0</text:p>
          </table:table-cell>
          <table:table-cell table:style-name="ce40" table:formula="of:=[$Lind.AI16]" office:value-type="float" office:value="0" calcext:value-type="float">
            <text:p>0</text:p>
          </table:table-cell>
          <table:table-cell table:style-name="ce40" table:formula="of:=[$Lind.AJ16]" office:value-type="float" office:value="0" calcext:value-type="float">
            <text:p>0</text:p>
          </table:table-cell>
          <table:table-cell table:style-name="ce40" table:formula="of:=[$Lind.AK16]" office:value-type="float" office:value="0" calcext:value-type="float">
            <text:p>0</text:p>
          </table:table-cell>
          <table:table-cell table:style-name="ce40" table:formula="of:=[$Lind.AL16]" office:value-type="float" office:value="0" calcext:value-type="float">
            <text:p>0</text:p>
          </table:table-cell>
          <table:table-cell table:style-name="ce40" table:formula="of:=[$Lind.AM16]" office:value-type="float" office:value="0" calcext:value-type="float">
            <text:p>0</text:p>
          </table:table-cell>
          <table:table-cell table:style-name="ce40" table:formula="of:=[$Lind.AN16]" office:value-type="float" office:value="0" calcext:value-type="float">
            <text:p>0</text:p>
          </table:table-cell>
          <table:table-cell table:style-name="ce40" table:formula="of:=[$Lind.AO16]" office:value-type="float" office:value="0" calcext:value-type="float">
            <text:p>0</text:p>
          </table:table-cell>
          <table:table-cell table:style-name="ce40" table:formula="of:=[$Lind.AP16]" office:value-type="float" office:value="0" calcext:value-type="float">
            <text:p>0</text:p>
          </table:table-cell>
          <table:table-cell table:style-name="ce51" table:formula="of:=[$Lind.AQ16]" office:value-type="float" office:value="0" calcext:value-type="float">
            <text:p>0</text:p>
          </table:table-cell>
          <table:table-cell table:style-name="ce40" table:formula="of:=[$Lind.AR16]" office:value-type="float" office:value="0" calcext:value-type="float">
            <text:p>0</text:p>
          </table:table-cell>
          <table:table-cell table:style-name="ce40" table:formula="of:=[$Lind.AS16]" office:value-type="float" office:value="0" calcext:value-type="float">
            <text:p>0</text:p>
          </table:table-cell>
          <table:table-cell table:style-name="ce40" table:formula="of:=[$Lind.AT16]" office:value-type="float" office:value="0" calcext:value-type="float">
            <text:p>0</text:p>
          </table:table-cell>
          <table:table-cell table:style-name="ce40" table:formula="of:=[$Lind.AU16]" office:value-type="float" office:value="0" calcext:value-type="float">
            <text:p>0</text:p>
          </table:table-cell>
          <table:table-cell table:style-name="ce40" table:formula="of:=[$Lind.AV16]" office:value-type="float" office:value="0" calcext:value-type="float">
            <text:p>0</text:p>
          </table:table-cell>
          <table:table-cell table:style-name="ce40" table:formula="of:=[$Lind.AW16]" office:value-type="float" office:value="0" calcext:value-type="float">
            <text:p>0</text:p>
          </table:table-cell>
          <table:table-cell table:style-name="ce40" table:formula="of:=[$Lind.AX16]" office:value-type="float" office:value="0" calcext:value-type="float">
            <text:p>0</text:p>
          </table:table-cell>
          <table:table-cell table:style-name="ce40" table:formula="of:=[$Lind.AY16]" office:value-type="float" office:value="0" calcext:value-type="float">
            <text:p>0</text:p>
          </table:table-cell>
          <table:table-cell/>
          <table:table-cell table:formula="of:=[.BA20]+0.002" office:value-type="float" office:value="0.012" calcext:value-type="float">
            <text:p>0.012</text:p>
          </table:table-cell>
          <table:table-cell table:formula="of:=[.BA21]*[.$D$6]" office:value-type="float" office:value="0.60318578948924" calcext:value-type="float">
            <text:p>0.603</text:p>
          </table:table-cell>
          <table:table-cell table:formula="of:=[.D$25]*[.$Z$5]*MAGNET([.D$24]+[.BB21])+[.E$25]*[.$Z$5]*MAGNET([.E$24]+[.BB21])+[.F$25]*[.$Z$5]*MAGNET([.F$24]+[.BB21])+[.G$25]*[.$Z$5]*MAGNET([.G$24]+[.BB21])+[.H$25]*[.$Z$5]*MAGNET([.H$24]+[.BB21])+[.I$25]*[.$Z$5]*MAGNET([.I$24]+[.BB21])+[.J$25]*[.$Z$5]*MAGNET([.J$24]+[.BB21])+[.K$25]*[.$Z$5]*MAGNET([.K$24]+[.BB21])+[.L$25]*[.$Z$5]*MAGNET([.L$24]+[.BB21])+[.M$25]*[.$Z$5]*MAGNET([.M$24]+[.BB21])+[.N$25]*[.$Z$5]*MAGNET([.N$24]+[.BB21])+[.O$25]*[.$Z$5]*MAGNET([.O$24]+[.BB21])+[.P$25]*[.$Z$5]*MAGNET([.P$24]+[.BB21])+[.Q$25]*[.$Z$5]*MAGNET([.Q$24]+[.BB21])+[.R$25]*[.$Z$5]*MAGNET([.R$24]+[.BB21])+[.S$25]*[.$Z$5]*MAGNET([.S$24]+[.BB21])+[.T$25]*[.$Z$5]*MAGNET([.T$24]+[.BB21])+[.U$25]*[.$Z$5]*MAGNET([.U$24]+[.BB21])+[.V$25]*[.$Z$5]*MAGNET([.V$24]+[.BB21])+[.W$25]*[.$Z$5]*MAGNET([.W$24]+[.BB21])+[.X$25]*[.$Z$5]*MAGNET([.X$24]+[.BB21])+[.Y$25]*[.$Z$5]*MAGNET([.Y$24]+[.BB21])+[.Z$25]*[.$Z$5]*MAGNET([.Z$24]+[.BB21])+[.AA$25]*[.$Z$5]*MAGNET([.AA$24]+[.BB21])+[.AB$25]*[.$Z$5]*MAGNET([.AB$24]+[.BB21])+[.AC$25]*[.$Z$5]*MAGNET([.AC$24]+[.BB21])+[.AD$25]*[.$Z$5]*MAGNET([.AD$24]+[.BB21])+[.AE$25]*[.$Z$5]*MAGNET([.AE$24]+[.BB21])+[.AF$25]*[.$Z$5]*MAGNET([.AF$24]+[.BB21])+[.AG$25]*[.$Z$5]*MAGNET([.AG$24]+[.BB21])+[.AH$25]*[.$Z$5]*MAGNET([.AH$24]+[.BB21]) +[.AI$25]*[.$Z$5]*MAGNET([.AI$24]+[.BB21]) +[.AJ$25]*[.$Z$5]*MAGNET([.AJ$24]+[.BB21]) +[.AK$25]*[.$Z$5]*MAGNET([.AK$24]+[.BB21]) +[.AL$25]*[.$Z$5]*MAGNET([.AL$24]+[.BB21]) +[.AM$25]*[.$Z$5]*MAGNET([.AM$24]+[.BB21]) +[.AN$25]*[.$Z$5]*MAGNET([.AN$24]+[.BB21]) +[.AO$25]*[.$Z$5]*MAGNET([.AO$24]+[.BB21])+RAND()*[.$BC$13]+[.AP$25]*[.$Z$5]*MAGNET([.AP$24]+[.BB21])&#10;+[.AQ$25]*[.$Z$5]*MAGNET([.AQ$24]+[.BB21])&#10;+[.AR$25]*[.$Z$5]*MAGNET([.AR$24]+[.BB21])&#10;+[.AS$25]*[.$Z$5]*MAGNET([.AS$24]+[.BB21])&#10;+[.AT$25]*[.$Z$5]*MAGNET([.AT$24]+[.BB21])&#10;+[.AU$25]*[.$Z$5]*MAGNET([.AU$24]+[.BB21])&#10;+[.AV$25]*[.$Z$5]*MAGNET([.AV$24]+[.BB21])&#10;+[.AW$25]*[.$Z$5]*MAGNET([.AW$24]+[.BB21])&#10;+[.AX$25]*[.$Z$5]*MAGNET([.AX$24]+[.BB21])&#10;+[.AY$25]*[.$Z$5]*MAGNET([.AY$24]+[.BB21])" office:value-type="float" office:value="26.9597575268949" calcext:value-type="float">
            <text:p>26.96</text:p>
          </table:table-cell>
          <table:table-cell table:style-name="ce70" table:formula="of:=[.E$26]*[.$Z$5]*MAGNET([.E$24]+[.$BB21])+[.F$26]*[.$Z$5]*MAGNET([.F$24]+[.$BB21])+[.G$26]*[.$Z$5]*MAGNET([.G$24]+[.$BB21])+[.H$26]*[.$Z$5]*MAGNET([.H$24]+[.$BB21])+[.I$26]*[.$Z$5]*MAGNET([.I$24]+[.$BB21])+[.J$26]*[.$Z$5]*MAGNET([.J$24]+[.$BB21])+[.K$26]*[.$Z$5]*MAGNET([.K$24]+[.$BB21])+[.L$26]*[.$Z$5]*MAGNET([.L$24]+[.$BB21])+[.M$26]*[.$Z$5]*MAGNET([.M$24]+[.$BB21])+[.N$26]*[.$Z$5]*MAGNET([.N$24]+[.$BB21])+[.O$26]*[.$Z$5]*MAGNET([.O$24]+[.$BB21])+[.P$26]*[.$Z$5]*MAGNET([.P$24]+[.$BB21])+[.Q$26]*[.$Z$5]*MAGNET([.Q$24]+[.$BB21])+[.R$26]*[.$Z$5]*MAGNET([.R$24]+[.$BB21])+[.S$26]*[.$Z$5]*MAGNET([.S$24]+[.$BB21])+[.T$26]*[.$Z$5]*MAGNET([.T$24]+[.$BB21])+[.U$26]*[.$Z$5]*MAGNET([.U$24]+[.$BB21])+[.V$26]*[.$Z$5]*MAGNET([.V$24]+[.$BB21])+[.W$26]*[.$Z$5]*MAGNET([.W$24]+[.$BB21])+[.X$26]*[.$Z$5]*MAGNET([.X$24]+[.$BB21])+[.Y$26]*[.$Z$5]*MAGNET([.Y$24]+[.$BB21])+[.Z$26]*[.$Z$5]*MAGNET([.Z$24]+[.$BB21])+[.AA$26]*[.$Z$5]*MAGNET([.AA$24]+[.$BB21])+[.AB$26]*[.$Z$5]*MAGNET([.AB$24]+[.$BB21])+[.AC$26]*[.$Z$5]*MAGNET([.AC$24]+[.$BB21])+[.AD$26]*[.$Z$5]*MAGNET([.AD$24]+[.$BB21])+[.AE$26]*[.$Z$5]*MAGNET([.AE$24]+[.$BB21])+[.AF$26]*[.$Z$5]*MAGNET([.AF$24]+[.$BB21])+[.AG$26]*[.$Z$5]*MAGNET([.AG$24]+[.$BB21])+[.D$26]*[.$Z$5]*MAGNET([.D$24]+[.$BB21])+[.AH$26]*[.$Z$5]*MAGNET([.AH$24]+[.BB21]) +[.AI$26]*[.$Z$5]*MAGNET([.AI$24]+[.BB21]) +[.AJ$26]*[.$Z$5]*MAGNET([.AJ$24]+[.BB21]) +[.AK$26]*[.$Z$5]*MAGNET([.AK$24]+[.BB21]) +[.AL$26]*[.$Z$5]*MAGNET([.AL$24]+[.BB21]) +[.AM$26]*[.$Z$5]*MAGNET([.AM$24]+[.BB21]) +[.AN$26]*[.$Z$5]*MAGNET([.AN$24]+[.BB21]) +[.AO$26]*[.$Z$5]*MAGNET([.AO$24]+[.BB21]) +[.AP$26]*[.$Z$5]*MAGNET([.AP$24]+[.$BB21])&#10;+[.AQ$26]*[.$Z$5]*MAGNET([.AQ$24]+[.$BB21])&#10;+[.AR$26]*[.$Z$5]*MAGNET([.AR$24]+[.$BB21])&#10;+[.AS$26]*[.$Z$5]*MAGNET([.AS$24]+[.$BB21])&#10;+[.AT$26]*[.$Z$5]*MAGNET([.AT$24]+[.$BB21])&#10;+[.AU$26]*[.$Z$5]*MAGNET([.AU$24]+[.$BB21])&#10;+[.AV$26]*[.$Z$5]*MAGNET([.AV$24]+[.$BB21])&#10;+[.AW$26]*[.$Z$5]*MAGNET([.AW$24]+[.$BB21])&#10;+[.AX$26]*[.$Z$5]*MAGNET([.AX$24]+[.$BB21])&#10;+[.AY$26]*[.$Z$5]*MAGNET([.AY$24]+[.$BB21]) +RAND()*[.$BD$13]" office:value-type="float" office:value="70.1862748021926" calcext:value-type="float">
            <text:p>70.19</text:p>
          </table:table-cell>
          <table:table-cell table:style-name="ce71" table:formula="of:=[.E$27]*[.$Z$5]*MAGNET([.E$24]+[.$BB21])+[.F$27]*[.$Z$5]*MAGNET([.F$24]+[.$BB21])+[.G$27]*[.$Z$5]*MAGNET([.G$24]+[.$BB21])+[.H$27]*[.$Z$5]*MAGNET([.H$24]+[.$BB21])+[.I$27]*[.$Z$5]*MAGNET([.I$24]+[.$BB21])+[.J$27]*[.$Z$5]*MAGNET([.J$24]+[.$BB21])+[.K$27]*[.$Z$5]*MAGNET([.K$24]+[.$BB21])+[.L$27]*[.$Z$5]*MAGNET([.L$24]+[.$BB21])+[.M$27]*[.$Z$5]*MAGNET([.M$24]+[.$BB21])+[.N$27]*[.$Z$5]*MAGNET([.N$24]+[.$BB21])+[.O$27]*[.$Z$5]*MAGNET([.O$24]+[.$BB21])+[.P$27]*[.$Z$5]*MAGNET([.P$24]+[.$BB21])+[.Q$27]*[.$Z$5]*MAGNET([.Q$24]+[.$BB21])+[.R$27]*[.$Z$5]*MAGNET([.R$24]+[.$BB21])+[.S$27]*[.$Z$5]*MAGNET([.S$24]+[.$BB21])+[.T$27]*[.$Z$5]*MAGNET([.T$24]+[.$BB21])+[.U$27]*[.$Z$5]*MAGNET([.U$24]+[.$BB21])+[.V$27]*[.$Z$5]*MAGNET([.V$24]+[.$BB21])+[.W$27]*[.$Z$5]*MAGNET([.W$24]+[.$BB21])+[.X$27]*[.$Z$5]*MAGNET([.X$24]+[.$BB21])+[.Y$27]*[.$Z$5]*MAGNET([.Y$24]+[.$BB21])+[.Z$27]*[.$Z$5]*MAGNET([.Z$24]+[.$BB21])+[.AA$27]*[.$Z$5]*MAGNET([.AA$24]+[.$BB21])+[.AB$27]*[.$Z$5]*MAGNET([.AB$24]+[.$BB21])+[.AC$27]*[.$Z$5]*MAGNET([.AC$24]+[.$BB21])+[.AD$27]*[.$Z$5]*MAGNET([.AD$24]+[.$BB21])+[.AE$27]*[.$Z$5]*MAGNET([.AE$24]+[.$BB21])+[.AF$27]*[.$Z$5]*MAGNET([.AF$24]+[.$BB21])+[.AG$27]*[.$Z$5]*MAGNET([.AG$24]+[.$BB21])+[.D$27]*[.$Z$5]*MAGNET([.D$24]+[.$BB21])+[.AH$27]*[.$Z$5]*MAGNET([.AH$24]+[.BB21]) +[.AI$27]*[.$Z$5]*MAGNET([.AI$24]+[.BB21]) +[.AJ$27]*[.$Z$5]*MAGNET([.AJ$24]+[.BB21]) +[.AK$27]*[.$Z$5]*MAGNET([.AK$24]+[.BB21]) +[.AL$27]*[.$Z$5]*MAGNET([.AL$24]+[.BB21]) +[.AM$27]*[.$Z$5]*MAGNET([.AM$24]+[.BB21]) +[.AN$27]*[.$Z$5]*MAGNET([.AN$24]+[.BB21]) +[.AO$27]*[.$Z$5]*MAGNET([.AO$24]+[.BB21]) +[.AP$27]*[.$Z$5]*MAGNET([.AP$24]+[.$BB21])&#10;+[.AQ$27]*[.$Z$5]*MAGNET([.AQ$24]+[.$BB21])&#10;+[.AR$27]*[.$Z$5]*MAGNET([.AR$24]+[.$BB21])&#10;+[.AS$27]*[.$Z$5]*MAGNET([.AS$24]+[.$BB21])&#10;+[.AT$27]*[.$Z$5]*MAGNET([.AT$24]+[.$BB21])&#10;+[.AU$27]*[.$Z$5]*MAGNET([.AU$24]+[.$BB21])&#10;+[.AV$27]*[.$Z$5]*MAGNET([.AV$24]+[.$BB21])&#10;+[.AW$27]*[.$Z$5]*MAGNET([.AW$24]+[.$BB21])&#10;+[.AX$27]*[.$Z$5]*MAGNET([.AX$24]+[.$BB21])&#10;+[.AY$27]*[.$Z$5]*MAGNET([.AY$24]+[.$BB21]) +RAND()*[.$BE$13]" office:value-type="float" office:value="-107.062679985569" calcext:value-type="float">
            <text:p>-107.062679985569</text:p>
          </table:table-cell>
          <table:table-cell table:style-name="ce71" table:formula="of:=[.E$28]*[.$Z$5]*MAGNET([.E$24]+[.$BB21])+[.F$28]*[.$Z$5]*MAGNET([.F$24]+[.$BB21])+[.G$28]*[.$Z$5]*MAGNET([.G$24]+[.$BB21])+[.H$28]*[.$Z$5]*MAGNET([.H$24]+[.$BB21])+[.I$28]*[.$Z$5]*MAGNET([.I$24]+[.$BB21])+[.J$28]*[.$Z$5]*MAGNET([.J$24]+[.$BB21])+[.K$28]*[.$Z$5]*MAGNET([.K$24]+[.$BB21])+[.L$28]*[.$Z$5]*MAGNET([.L$24]+[.$BB21])+[.M$28]*[.$Z$5]*MAGNET([.M$24]+[.$BB21])+[.N$28]*[.$Z$5]*MAGNET([.N$24]+[.$BB21])+[.O$28]*[.$Z$5]*MAGNET([.O$24]+[.$BB21])+[.P$28]*[.$Z$5]*MAGNET([.P$24]+[.$BB21])+[.Q$28]*[.$Z$5]*MAGNET([.Q$24]+[.$BB21])+[.R$28]*[.$Z$5]*MAGNET([.R$24]+[.$BB21])+[.S$28]*[.$Z$5]*MAGNET([.S$24]+[.$BB21])+[.T$28]*[.$Z$5]*MAGNET([.T$24]+[.$BB21])+[.U$28]*[.$Z$5]*MAGNET([.U$24]+[.$BB21])+[.V$28]*[.$Z$5]*MAGNET([.V$24]+[.$BB21])+[.W$28]*[.$Z$5]*MAGNET([.W$24]+[.$BB21])+[.X$28]*[.$Z$5]*MAGNET([.X$24]+[.$BB21])+[.Y$28]*[.$Z$5]*MAGNET([.Y$24]+[.$BB21])+[.Z$28]*[.$Z$5]*MAGNET([.Z$24]+[.$BB21])+[.AA$28]*[.$Z$5]*MAGNET([.AA$24]+[.$BB21])+[.AB$28]*[.$Z$5]*MAGNET([.AB$24]+[.$BB21])+[.AC$28]*[.$Z$5]*MAGNET([.AC$24]+[.$BB21])+[.AD$28]*[.$Z$5]*MAGNET([.AD$24]+[.$BB21])+[.AE$28]*[.$Z$5]*MAGNET([.AE$24]+[.$BB21])+[.AF$28]*[.$Z$5]*MAGNET([.AF$24]+[.$BB21])+[.AG$28]*[.$Z$5]*MAGNET([.AG$24]+[.$BB21])+[.D$28]*[.$Z$5]*MAGNET([.D$24]+[.$BB21])+[.AH$28]*[.$Z$5]*MAGNET([.AH$24]+[.BB21]) +[.AI$28]*[.$Z$5]*MAGNET([.AI$24]+[.BB21]) +[.AJ$28]*[.$Z$5]*MAGNET([.AJ$24]+[.BB21]) +[.AK$28]*[.$Z$5]*MAGNET([.AK$24]+[.BB21]) +[.AL$28]*[.$Z$5]*MAGNET([.AL$24]+[.BB21]) +[.AM$28]*[.$Z$5]*MAGNET([.AM$24]+[.BB21]) +[.AN$28]*[.$Z$5]*MAGNET([.AN$24]+[.BB21]) +[.AO$28]*[.$Z$5]*MAGNET([.AO$24]+[.BB21]) +[.AP$28]*[.$Z$5]*MAGNET([.AP$24]+[.$BB21])&#10;+[.AQ$28]*[.$Z$5]*MAGNET([.AQ$24]+[.$BB21])&#10;+[.AR$28]*[.$Z$5]*MAGNET([.AR$24]+[.$BB21])&#10;+[.AS$28]*[.$Z$5]*MAGNET([.AS$24]+[.$BB21])&#10;+[.AT$28]*[.$Z$5]*MAGNET([.AT$24]+[.$BB21])&#10;+[.AU$28]*[.$Z$5]*MAGNET([.AU$24]+[.$BB21])&#10;+[.AV$28]*[.$Z$5]*MAGNET([.AV$24]+[.$BB21])&#10;+[.AW$28]*[.$Z$5]*MAGNET([.AW$24]+[.$BB21])&#10;+[.AX$28]*[.$Z$5]*MAGNET([.AX$24]+[.$BB21])&#10;+[.AY$28]*[.$Z$5]*MAGNET([.AY$24]+[.$BB21]) +RAND()*[.$BF$13]" office:value-type="float" office:value="-15.7139566040126" calcext:value-type="float">
            <text:p>-15.7139566040126</text:p>
          </table:table-cell>
          <table:table-cell table:style-name="ce71" table:formula="of:=[.E$29]*[.$Z$5]*MAGNET([.E$24]+[.$BB21])+[.F$29]*[.$Z$5]*MAGNET([.F$24]+[.$BB21])+[.G$29]*[.$Z$5]*MAGNET([.G$24]+[.$BB21])+[.H$29]*[.$Z$5]*MAGNET([.H$24]+[.$BB21])+[.I$29]*[.$Z$5]*MAGNET([.I$24]+[.$BB21])+[.J$29]*[.$Z$5]*MAGNET([.J$24]+[.$BB21])+[.K$29]*[.$Z$5]*MAGNET([.K$24]+[.$BB21])+[.L$29]*[.$Z$5]*MAGNET([.L$24]+[.$BB21])+[.M$29]*[.$Z$5]*MAGNET([.M$24]+[.$BB21])+[.N$29]*[.$Z$5]*MAGNET([.N$24]+[.$BB21])+[.O$29]*[.$Z$5]*MAGNET([.O$24]+[.$BB21])+[.P$29]*[.$Z$5]*MAGNET([.P$24]+[.$BB21])+[.Q$29]*[.$Z$5]*MAGNET([.Q$24]+[.$BB21])+[.R$29]*[.$Z$5]*MAGNET([.R$24]+[.$BB21])+[.S$29]*[.$Z$5]*MAGNET([.S$24]+[.$BB21])+[.T$29]*[.$Z$5]*MAGNET([.T$24]+[.$BB21])+[.U$29]*[.$Z$5]*MAGNET([.U$24]+[.$BB21])+[.V$29]*[.$Z$5]*MAGNET([.V$24]+[.$BB21])+[.W$29]*[.$Z$5]*MAGNET([.W$24]+[.$BB21])+[.X$29]*[.$Z$5]*MAGNET([.X$24]+[.$BB21])+[.Y$29]*[.$Z$5]*MAGNET([.Y$24]+[.$BB21])+[.Z$29]*[.$Z$5]*MAGNET([.Z$24]+[.$BB21])+[.AA$29]*[.$Z$5]*MAGNET([.AA$24]+[.$BB21])+[.AB$29]*[.$Z$5]*MAGNET([.AB$24]+[.$BB21])+[.AC$29]*[.$Z$5]*MAGNET([.AC$24]+[.$BB21])+[.AD$29]*[.$Z$5]*MAGNET([.AD$24]+[.$BB21])+[.AE$29]*[.$Z$5]*MAGNET([.AE$24]+[.$BB21])+[.AF$29]*[.$Z$5]*MAGNET([.AF$24]+[.$BB21])+[.AG$29]*[.$Z$5]*MAGNET([.AG$24]+[.$BB21])+[.D$29]*[.$Z$5]*MAGNET([.D$24]+[.$BB21])+[.AH$29]*[.$Z$5]*MAGNET([.AH$24]+[.BB21]) +[.AI$29]*[.$Z$5]*MAGNET([.AI$24]+[.BB21]) +[.AJ$29]*[.$Z$5]*MAGNET([.AJ$24]+[.BB21]) +[.AK$29]*[.$Z$5]*MAGNET([.AK$24]+[.BB21]) +[.AL$29]*[.$Z$5]*MAGNET([.AL$24]+[.BB21]) +[.AM$29]*[.$Z$5]*MAGNET([.AM$24]+[.BB21]) +[.AN$29]*[.$Z$5]*MAGNET([.AN$24]+[.BB21]) +[.AO$29]*[.$Z$5]*MAGNET([.AO$24]+[.BB21]) +[.AP$29]*[.$Z$5]*MAGNET([.AP$24]+[.$BB21])&#10;+[.AQ$29]*[.$Z$5]*MAGNET([.AQ$24]+[.$BB21])&#10;+[.AR$29]*[.$Z$5]*MAGNET([.AR$24]+[.$BB21])&#10;+[.AS$29]*[.$Z$5]*MAGNET([.AS$24]+[.$BB21])&#10;+[.AT$29]*[.$Z$5]*MAGNET([.AT$24]+[.$BB21])&#10;+[.AU$29]*[.$Z$5]*MAGNET([.AU$24]+[.$BB21])&#10;+[.AV$29]*[.$Z$5]*MAGNET([.AV$24]+[.$BB21])&#10;+[.AW$29]*[.$Z$5]*MAGNET([.AW$24]+[.$BB21])&#10;+[.AX$29]*[.$Z$5]*MAGNET([.AX$24]+[.$BB21])&#10;+[.AY$29]*[.$Z$5]*MAGNET([.AY$24]+[.$BB21]) +RAND()*[.$BG$13]" office:value-type="float" office:value="46.3156276353557" calcext:value-type="float">
            <text:p>46.3156276353557</text:p>
          </table:table-cell>
          <table:table-cell table:style-name="ce71" table:formula="of:=[.E$30]*[.$Z$5]*MAGNET([.E$24]+[.$BB21])+[.F$30]*[.$Z$5]*MAGNET([.F$24]+[.$BB21])+[.G$30]*[.$Z$5]*MAGNET([.G$24]+[.$BB21])+[.H$30]*[.$Z$5]*MAGNET([.H$24]+[.$BB21])+[.I$30]*[.$Z$5]*MAGNET([.I$24]+[.$BB21])+[.J$30]*[.$Z$5]*MAGNET([.J$24]+[.$BB21])+[.K$30]*[.$Z$5]*MAGNET([.K$24]+[.$BB21])+[.L$30]*[.$Z$5]*MAGNET([.L$24]+[.$BB21])+[.M$30]*[.$Z$5]*MAGNET([.M$24]+[.$BB21])+[.N$30]*[.$Z$5]*MAGNET([.N$24]+[.$BB21])+[.O$30]*[.$Z$5]*MAGNET([.O$24]+[.$BB21])+[.P$30]*[.$Z$5]*MAGNET([.P$24]+[.$BB21])+[.Q$30]*[.$Z$5]*MAGNET([.Q$24]+[.$BB21])+[.R$30]*[.$Z$5]*MAGNET([.R$24]+[.$BB21])+[.S$30]*[.$Z$5]*MAGNET([.S$24]+[.$BB21])+[.T$30]*[.$Z$5]*MAGNET([.T$24]+[.$BB21])+[.U$30]*[.$Z$5]*MAGNET([.U$24]+[.$BB21])+[.V$30]*[.$Z$5]*MAGNET([.V$24]+[.$BB21])+[.W$30]*[.$Z$5]*MAGNET([.W$24]+[.$BB21])+[.X$30]*[.$Z$5]*MAGNET([.X$24]+[.$BB21])+[.Y$30]*[.$Z$5]*MAGNET([.Y$24]+[.$BB21])+[.Z$30]*[.$Z$5]*MAGNET([.Z$24]+[.$BB21])+[.AA$30]*[.$Z$5]*MAGNET([.AA$24]+[.$BB21])+[.AB$30]*[.$Z$5]*MAGNET([.AB$24]+[.$BB21])+[.AC$30]*[.$Z$5]*MAGNET([.AC$24]+[.$BB21])+[.AD$30]*[.$Z$5]*MAGNET([.AD$24]+[.$BB21])+[.AE$30]*[.$Z$5]*MAGNET([.AE$24]+[.$BB21])+[.AF$30]*[.$Z$5]*MAGNET([.AF$24]+[.$BB21])+[.AG$30]*[.$Z$5]*MAGNET([.AG$24]+[.$BB21])+[.D$30]*[.$Z$5]*MAGNET([.D$24]+[.$BB21])+[.AH$30]*[.$Z$5]*MAGNET([.AH$24]+[.BB21]) +[.AI$30]*[.$Z$5]*MAGNET([.AI$24]+[.BB21]) +[.AJ$30]*[.$Z$5]*MAGNET([.AJ$24]+[.BB21]) +[.AK$30]*[.$Z$5]*MAGNET([.AK$24]+[.BB21]) +[.AL$30]*[.$Z$5]*MAGNET([.AL$24]+[.BB21]) +[.AM$30]*[.$Z$5]*MAGNET([.AM$24]+[.BB21]) +[.AN$30]*[.$Z$5]*MAGNET([.AN$24]+[.BB21]) +[.AO$30]*[.$Z$5]*MAGNET([.AO$24]+[.BB21]) +[.AP$30]*[.$Z$5]*MAGNET([.AP$24]+[.$BB21])&#10;+[.AQ$30]*[.$Z$5]*MAGNET([.AQ$24]+[.$BB21])&#10;+[.AR$30]*[.$Z$5]*MAGNET([.AR$24]+[.$BB21])&#10;+[.AS$30]*[.$Z$5]*MAGNET([.AS$24]+[.$BB21])&#10;+[.AT$30]*[.$Z$5]*MAGNET([.AT$24]+[.$BB21])&#10;+[.AU$30]*[.$Z$5]*MAGNET([.AU$24]+[.$BB21])&#10;+[.AV$30]*[.$Z$5]*MAGNET([.AV$24]+[.$BB21])&#10;+[.AW$30]*[.$Z$5]*MAGNET([.AW$24]+[.$BB21])&#10;+[.AX$30]*[.$Z$5]*MAGNET([.AX$24]+[.$BB21])&#10;+[.AY$30]*[.$Z$5]*MAGNET([.AY$24]+[.$BB21]) +RAND()*[.$BH$13]" office:value-type="float" office:value="0" calcext:value-type="float">
            <text:p>0</text:p>
          </table:table-cell>
          <table:table-cell table:style-name="ce71" table:formula="of:=[.E$31]*[.$Z$5]*MAGNET([.E$24]+[.$BB21])+[.F$31]*[.$Z$5]*MAGNET([.F$24]+[.$BB21])+[.G$31]*[.$Z$5]*MAGNET([.G$24]+[.$BB21])+[.H$31]*[.$Z$5]*MAGNET([.H$24]+[.$BB21])+[.I$31]*[.$Z$5]*MAGNET([.I$24]+[.$BB21])+[.J$31]*[.$Z$5]*MAGNET([.J$24]+[.$BB21])+[.K$31]*[.$Z$5]*MAGNET([.K$24]+[.$BB21])+[.L$31]*[.$Z$5]*MAGNET([.L$24]+[.$BB21])+[.M$31]*[.$Z$5]*MAGNET([.M$24]+[.$BB21])+[.N$31]*[.$Z$5]*MAGNET([.N$24]+[.$BB21])+[.O$31]*[.$Z$5]*MAGNET([.O$24]+[.$BB21])+[.P$31]*[.$Z$5]*MAGNET([.P$24]+[.$BB21])+[.Q$31]*[.$Z$5]*MAGNET([.Q$24]+[.$BB21])+[.R$31]*[.$Z$5]*MAGNET([.R$24]+[.$BB21])+[.S$31]*[.$Z$5]*MAGNET([.S$24]+[.$BB21])+[.T$31]*[.$Z$5]*MAGNET([.T$24]+[.$BB21])+[.U$31]*[.$Z$5]*MAGNET([.U$24]+[.$BB21])+[.V$31]*[.$Z$5]*MAGNET([.V$24]+[.$BB21])+[.W$31]*[.$Z$5]*MAGNET([.W$24]+[.$BB21])+[.X$31]*[.$Z$5]*MAGNET([.X$24]+[.$BB21])+[.Y$31]*[.$Z$5]*MAGNET([.Y$24]+[.$BB21])+[.Z$31]*[.$Z$5]*MAGNET([.Z$24]+[.$BB21])+[.AA$31]*[.$Z$5]*MAGNET([.AA$24]+[.$BB21])+[.AB$31]*[.$Z$5]*MAGNET([.AB$24]+[.$BB21])+[.AC$31]*[.$Z$5]*MAGNET([.AC$24]+[.$BB21])+[.AD$31]*[.$Z$5]*MAGNET([.AD$24]+[.$BB21])+[.AE$31]*[.$Z$5]*MAGNET([.AE$24]+[.$BB21])+[.AF$31]*[.$Z$5]*MAGNET([.AF$24]+[.$BB21])+[.AG$31]*[.$Z$5]*MAGNET([.AG$24]+[.$BB21])+[.D$31]*[.$Z$5]*MAGNET([.D$24]+[.$BB21])+[.AH$31]*[.$Z$5]*MAGNET([.AH$24]+[.BB21]) +[.AI$31]*[.$Z$5]*MAGNET([.AI$24]+[.BB21]) +[.AJ$31]*[.$Z$5]*MAGNET([.AJ$24]+[.BB21]) +[.AK$31]*[.$Z$5]*MAGNET([.AK$24]+[.BB21]) +[.AL$31]*[.$Z$5]*MAGNET([.AL$24]+[.BB21]) +[.AM$31]*[.$Z$5]*MAGNET([.AM$24]+[.BB21]) +[.AN$31]*[.$Z$5]*MAGNET([.AN$24]+[.BB21]) +[.AO$31]*[.$Z$5]*MAGNET([.AO$24]+[.BB21]) +[.AP$31]*[.$Z$5]*MAGNET([.AP$24]+[.$BB21])&#10;+[.AQ$31]*[.$Z$5]*MAGNET([.AQ$24]+[.$BB21])&#10;+[.AR$31]*[.$Z$5]*MAGNET([.AR$24]+[.$BB21])&#10;+[.AS$31]*[.$Z$5]*MAGNET([.AS$24]+[.$BB21])&#10;+[.AT$31]*[.$Z$5]*MAGNET([.AT$24]+[.$BB21])&#10;+[.AU$31]*[.$Z$5]*MAGNET([.AU$24]+[.$BB21])&#10;+[.AV$31]*[.$Z$5]*MAGNET([.AV$24]+[.$BB21])&#10;+[.AW$31]*[.$Z$5]*MAGNET([.AW$24]+[.$BB21])&#10;+[.AX$31]*[.$Z$5]*MAGNET([.AX$24]+[.$BB21])&#10;+[.AY$31]*[.$Z$5]*MAGNET([.AY$24]+[.$BB21]) +RAND()*[.$BI$13]" office:value-type="float" office:value="0" calcext:value-type="float">
            <text:p>0</text:p>
          </table:table-cell>
          <table:table-cell table:style-name="ce71" table:formula="of:=[.E$32]*[.$Z$5]*MAGNET([.E$24]+[.$BB21])+[.F$32]*[.$Z$5]*MAGNET([.F$24]+[.$BB21])+[.G$32]*[.$Z$5]*MAGNET([.G$24]+[.$BB21])+[.H$32]*[.$Z$5]*MAGNET([.H$24]+[.$BB21])+[.I$32]*[.$Z$5]*MAGNET([.I$24]+[.$BB21])+[.J$32]*[.$Z$5]*MAGNET([.J$24]+[.$BB21])+[.K$32]*[.$Z$5]*MAGNET([.K$24]+[.$BB21])+[.L$32]*[.$Z$5]*MAGNET([.L$24]+[.$BB21])+[.M$32]*[.$Z$5]*MAGNET([.M$24]+[.$BB21])+[.N$32]*[.$Z$5]*MAGNET([.N$24]+[.$BB21])+[.O$32]*[.$Z$5]*MAGNET([.O$24]+[.$BB21])+[.P$32]*[.$Z$5]*MAGNET([.P$24]+[.$BB21])+[.Q$32]*[.$Z$5]*MAGNET([.Q$24]+[.$BB21])+[.R$32]*[.$Z$5]*MAGNET([.R$24]+[.$BB21])+[.S$32]*[.$Z$5]*MAGNET([.S$24]+[.$BB21])+[.T$32]*[.$Z$5]*MAGNET([.T$24]+[.$BB21])+[.U$32]*[.$Z$5]*MAGNET([.U$24]+[.$BB21])+[.V$32]*[.$Z$5]*MAGNET([.V$24]+[.$BB21])+[.W$32]*[.$Z$5]*MAGNET([.W$24]+[.$BB21])+[.X$32]*[.$Z$5]*MAGNET([.X$24]+[.$BB21])+[.Y$32]*[.$Z$5]*MAGNET([.Y$24]+[.$BB21])+[.Z$32]*[.$Z$5]*MAGNET([.Z$24]+[.$BB21])+[.AA$32]*[.$Z$5]*MAGNET([.AA$24]+[.$BB21])+[.AB$32]*[.$Z$5]*MAGNET([.AB$24]+[.$BB21])+[.AC$32]*[.$Z$5]*MAGNET([.AC$24]+[.$BB21])+[.AD$32]*[.$Z$5]*MAGNET([.AD$24]+[.$BB21])+[.AE$32]*[.$Z$5]*MAGNET([.AE$24]+[.$BB21])+[.AF$32]*[.$Z$5]*MAGNET([.AF$24]+[.$BB21])+[.AG$32]*[.$Z$5]*MAGNET([.AG$24]+[.$BB21])+[.D$32]*[.$Z$5]*MAGNET([.D$24]+[.$BB21])+[.AH$32]*[.$Z$5]*MAGNET([.AH$24]+[.BB21]) +[.AI$32]*[.$Z$5]*MAGNET([.AI$24]+[.BB21]) +[.AJ$32]*[.$Z$5]*MAGNET([.AJ$24]+[.BB21]) +[.AK$32]*[.$Z$5]*MAGNET([.AK$24]+[.BB21]) +[.AL$32]*[.$Z$5]*MAGNET([.AL$24]+[.BB21]) +[.AM$32]*[.$Z$5]*MAGNET([.AM$24]+[.BB21]) +[.AN$32]*[.$Z$5]*MAGNET([.AN$24]+[.BB21]) +[.AO$32]*[.$Z$5]*MAGNET([.AO$24]+[.BB21]) +[.AP$32]*[.$Z$5]*MAGNET([.AP$24]+[.$BB21])&#10;+[.AQ$32]*[.$Z$5]*MAGNET([.AQ$24]+[.$BB21])&#10;+[.AR$32]*[.$Z$5]*MAGNET([.AR$24]+[.$BB21])&#10;+[.AS$32]*[.$Z$5]*MAGNET([.AS$24]+[.$BB21])&#10;+[.AT$32]*[.$Z$5]*MAGNET([.AT$24]+[.$BB21])&#10;+[.AU$32]*[.$Z$5]*MAGNET([.AU$24]+[.$BB21])&#10;+[.AV$32]*[.$Z$5]*MAGNET([.AV$24]+[.$BB21])&#10;+[.AW$32]*[.$Z$5]*MAGNET([.AW$24]+[.$BB21])&#10;+[.AX$32]*[.$Z$5]*MAGNET([.AX$24]+[.$BB21])&#10;+[.AY$32]*[.$Z$5]*MAGNET([.AY$24]+[.$BB2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36" table:formula="of:=[$Lind.D17]" office:value-type="float" office:value="0" calcext:value-type="float">
            <text:p>0</text:p>
          </table:table-cell>
          <table:table-cell table:style-name="ce41" table:formula="of:=[$Lind.E17]" office:value-type="float" office:value="0" calcext:value-type="float">
            <text:p>0</text:p>
          </table:table-cell>
          <table:table-cell table:style-name="ce41" table:formula="of:=[$Lind.F17]" office:value-type="float" office:value="0" calcext:value-type="float">
            <text:p>0</text:p>
          </table:table-cell>
          <table:table-cell table:style-name="ce41" table:formula="of:=[$Lind.G17]" office:value-type="float" office:value="0" calcext:value-type="float">
            <text:p>0</text:p>
          </table:table-cell>
          <table:table-cell table:style-name="ce41" table:formula="of:=[$Lind.H17]" office:value-type="float" office:value="0" calcext:value-type="float">
            <text:p>0</text:p>
          </table:table-cell>
          <table:table-cell table:style-name="ce41" table:formula="of:=[$Lind.I17]" office:value-type="float" office:value="0" calcext:value-type="float">
            <text:p>0</text:p>
          </table:table-cell>
          <table:table-cell table:style-name="ce41" table:formula="of:=[$Lind.J17]" office:value-type="float" office:value="0" calcext:value-type="float">
            <text:p>0</text:p>
          </table:table-cell>
          <table:table-cell table:style-name="ce41" table:formula="of:=[$Lind.K17]" office:value-type="float" office:value="0" calcext:value-type="float">
            <text:p>0</text:p>
          </table:table-cell>
          <table:table-cell table:style-name="ce41" table:formula="of:=[$Lind.L17]" office:value-type="float" office:value="0" calcext:value-type="float">
            <text:p>0</text:p>
          </table:table-cell>
          <table:table-cell table:style-name="ce41" table:formula="of:=[$Lind.M17]" office:value-type="float" office:value="0" calcext:value-type="float">
            <text:p>0</text:p>
          </table:table-cell>
          <table:table-cell table:style-name="ce41" table:formula="of:=[$Lind.N17]" office:value-type="float" office:value="0" calcext:value-type="float">
            <text:p>0</text:p>
          </table:table-cell>
          <table:table-cell table:style-name="ce41" table:formula="of:=[$Lind.O17]" office:value-type="float" office:value="0" calcext:value-type="float">
            <text:p>0</text:p>
          </table:table-cell>
          <table:table-cell table:style-name="ce41" table:formula="of:=[$Lind.P17]" office:value-type="float" office:value="0" calcext:value-type="float">
            <text:p>0</text:p>
          </table:table-cell>
          <table:table-cell table:style-name="ce41" table:formula="of:=[$Lind.Q17]" office:value-type="float" office:value="0" calcext:value-type="float">
            <text:p>0</text:p>
          </table:table-cell>
          <table:table-cell table:style-name="ce41" table:formula="of:=[$Lind.R17]" office:value-type="float" office:value="0" calcext:value-type="float">
            <text:p>0</text:p>
          </table:table-cell>
          <table:table-cell table:style-name="ce41" table:formula="of:=[$Lind.S17]" office:value-type="float" office:value="0" calcext:value-type="float">
            <text:p>0</text:p>
          </table:table-cell>
          <table:table-cell table:style-name="ce41" table:formula="of:=[$Lind.T17]" office:value-type="float" office:value="0" calcext:value-type="float">
            <text:p>0</text:p>
          </table:table-cell>
          <table:table-cell table:style-name="ce41" table:formula="of:=[$Lind.U17]" office:value-type="float" office:value="0" calcext:value-type="float">
            <text:p>0</text:p>
          </table:table-cell>
          <table:table-cell table:style-name="ce41" table:formula="of:=[$Lind.V17]" office:value-type="float" office:value="0" calcext:value-type="float">
            <text:p>0</text:p>
          </table:table-cell>
          <table:table-cell table:style-name="ce41" table:formula="of:=[$Lind.W17]" office:value-type="float" office:value="0" calcext:value-type="float">
            <text:p>0</text:p>
          </table:table-cell>
          <table:table-cell table:style-name="ce41" table:formula="of:=[$Lind.X17]" office:value-type="float" office:value="0" calcext:value-type="float">
            <text:p>0</text:p>
          </table:table-cell>
          <table:table-cell table:style-name="ce41" table:formula="of:=[$Lind.Y17]" office:value-type="float" office:value="0" calcext:value-type="float">
            <text:p>0</text:p>
          </table:table-cell>
          <table:table-cell table:style-name="ce41" table:formula="of:=[$Lind.Z17]" office:value-type="float" office:value="0" calcext:value-type="float">
            <text:p>0</text:p>
          </table:table-cell>
          <table:table-cell table:style-name="ce41" table:formula="of:=[$Lind.AA17]" office:value-type="float" office:value="0" calcext:value-type="float">
            <text:p>0</text:p>
          </table:table-cell>
          <table:table-cell table:style-name="ce41" table:formula="of:=[$Lind.AB17]" office:value-type="float" office:value="0" calcext:value-type="float">
            <text:p>0</text:p>
          </table:table-cell>
          <table:table-cell table:style-name="ce41" table:formula="of:=[$Lind.AC17]" office:value-type="float" office:value="0" calcext:value-type="float">
            <text:p>0</text:p>
          </table:table-cell>
          <table:table-cell table:style-name="ce41" table:formula="of:=[$Lind.AD17]" office:value-type="float" office:value="0" calcext:value-type="float">
            <text:p>0</text:p>
          </table:table-cell>
          <table:table-cell table:style-name="ce41" table:formula="of:=[$Lind.AE17]" office:value-type="float" office:value="0" calcext:value-type="float">
            <text:p>0</text:p>
          </table:table-cell>
          <table:table-cell table:style-name="ce41" table:formula="of:=[$Lind.AF17]" office:value-type="float" office:value="0" calcext:value-type="float">
            <text:p>0</text:p>
          </table:table-cell>
          <table:table-cell table:style-name="ce53" table:formula="of:=[$Lind.AG17]" office:value-type="float" office:value="0" calcext:value-type="float">
            <text:p>0</text:p>
          </table:table-cell>
          <table:table-cell table:style-name="ce41" table:formula="of:=[$Lind.AH17]" office:value-type="float" office:value="0" calcext:value-type="float">
            <text:p>0</text:p>
          </table:table-cell>
          <table:table-cell table:style-name="ce41" table:formula="of:=[$Lind.AI17]" office:value-type="float" office:value="0" calcext:value-type="float">
            <text:p>0</text:p>
          </table:table-cell>
          <table:table-cell table:style-name="ce41" table:formula="of:=[$Lind.AJ17]" office:value-type="float" office:value="0" calcext:value-type="float">
            <text:p>0</text:p>
          </table:table-cell>
          <table:table-cell table:style-name="ce41" table:formula="of:=[$Lind.AK17]" office:value-type="float" office:value="0" calcext:value-type="float">
            <text:p>0</text:p>
          </table:table-cell>
          <table:table-cell table:style-name="ce41" table:formula="of:=[$Lind.AL17]" office:value-type="float" office:value="0" calcext:value-type="float">
            <text:p>0</text:p>
          </table:table-cell>
          <table:table-cell table:style-name="ce41" table:formula="of:=[$Lind.AM17]" office:value-type="float" office:value="0" calcext:value-type="float">
            <text:p>0</text:p>
          </table:table-cell>
          <table:table-cell table:style-name="ce41" table:formula="of:=[$Lind.AN17]" office:value-type="float" office:value="0" calcext:value-type="float">
            <text:p>0</text:p>
          </table:table-cell>
          <table:table-cell table:style-name="ce41" table:formula="of:=[$Lind.AO17]" office:value-type="float" office:value="0" calcext:value-type="float">
            <text:p>0</text:p>
          </table:table-cell>
          <table:table-cell table:style-name="ce41" table:formula="of:=[$Lind.AP17]" office:value-type="float" office:value="0" calcext:value-type="float">
            <text:p>0</text:p>
          </table:table-cell>
          <table:table-cell table:style-name="ce53" table:formula="of:=[$Lind.AQ17]" office:value-type="float" office:value="0" calcext:value-type="float">
            <text:p>0</text:p>
          </table:table-cell>
          <table:table-cell table:style-name="ce41" table:formula="of:=[$Lind.AR17]" office:value-type="float" office:value="0" calcext:value-type="float">
            <text:p>0</text:p>
          </table:table-cell>
          <table:table-cell table:style-name="ce41" table:formula="of:=[$Lind.AS17]" office:value-type="float" office:value="0" calcext:value-type="float">
            <text:p>0</text:p>
          </table:table-cell>
          <table:table-cell table:style-name="ce41" table:formula="of:=[$Lind.AT17]" office:value-type="float" office:value="0" calcext:value-type="float">
            <text:p>0</text:p>
          </table:table-cell>
          <table:table-cell table:style-name="ce41" table:formula="of:=[$Lind.AU17]" office:value-type="float" office:value="0" calcext:value-type="float">
            <text:p>0</text:p>
          </table:table-cell>
          <table:table-cell table:style-name="ce41" table:formula="of:=[$Lind.AV17]" office:value-type="float" office:value="0" calcext:value-type="float">
            <text:p>0</text:p>
          </table:table-cell>
          <table:table-cell table:style-name="ce41" table:formula="of:=[$Lind.AW17]" office:value-type="float" office:value="0" calcext:value-type="float">
            <text:p>0</text:p>
          </table:table-cell>
          <table:table-cell table:style-name="ce41" table:formula="of:=[$Lind.AX17]" office:value-type="float" office:value="0" calcext:value-type="float">
            <text:p>0</text:p>
          </table:table-cell>
          <table:table-cell table:style-name="ce41" table:formula="of:=[$Lind.AY17]" office:value-type="float" office:value="0" calcext:value-type="float">
            <text:p>0</text:p>
          </table:table-cell>
          <table:table-cell/>
          <table:table-cell table:formula="of:=[.BA21]+0.002" office:value-type="float" office:value="0.014" calcext:value-type="float">
            <text:p>0.014</text:p>
          </table:table-cell>
          <table:table-cell table:formula="of:=[.BA22]*[.$D$6]" office:value-type="float" office:value="0.703716754404114" calcext:value-type="float">
            <text:p>0.704</text:p>
          </table:table-cell>
          <table:table-cell table:formula="of:=[.D$25]*[.$Z$5]*MAGNET([.D$24]+[.BB22])+[.E$25]*[.$Z$5]*MAGNET([.E$24]+[.BB22])+[.F$25]*[.$Z$5]*MAGNET([.F$24]+[.BB22])+[.G$25]*[.$Z$5]*MAGNET([.G$24]+[.BB22])+[.H$25]*[.$Z$5]*MAGNET([.H$24]+[.BB22])+[.I$25]*[.$Z$5]*MAGNET([.I$24]+[.BB22])+[.J$25]*[.$Z$5]*MAGNET([.J$24]+[.BB22])+[.K$25]*[.$Z$5]*MAGNET([.K$24]+[.BB22])+[.L$25]*[.$Z$5]*MAGNET([.L$24]+[.BB22])+[.M$25]*[.$Z$5]*MAGNET([.M$24]+[.BB22])+[.N$25]*[.$Z$5]*MAGNET([.N$24]+[.BB22])+[.O$25]*[.$Z$5]*MAGNET([.O$24]+[.BB22])+[.P$25]*[.$Z$5]*MAGNET([.P$24]+[.BB22])+[.Q$25]*[.$Z$5]*MAGNET([.Q$24]+[.BB22])+[.R$25]*[.$Z$5]*MAGNET([.R$24]+[.BB22])+[.S$25]*[.$Z$5]*MAGNET([.S$24]+[.BB22])+[.T$25]*[.$Z$5]*MAGNET([.T$24]+[.BB22])+[.U$25]*[.$Z$5]*MAGNET([.U$24]+[.BB22])+[.V$25]*[.$Z$5]*MAGNET([.V$24]+[.BB22])+[.W$25]*[.$Z$5]*MAGNET([.W$24]+[.BB22])+[.X$25]*[.$Z$5]*MAGNET([.X$24]+[.BB22])+[.Y$25]*[.$Z$5]*MAGNET([.Y$24]+[.BB22])+[.Z$25]*[.$Z$5]*MAGNET([.Z$24]+[.BB22])+[.AA$25]*[.$Z$5]*MAGNET([.AA$24]+[.BB22])+[.AB$25]*[.$Z$5]*MAGNET([.AB$24]+[.BB22])+[.AC$25]*[.$Z$5]*MAGNET([.AC$24]+[.BB22])+[.AD$25]*[.$Z$5]*MAGNET([.AD$24]+[.BB22])+[.AE$25]*[.$Z$5]*MAGNET([.AE$24]+[.BB22])+[.AF$25]*[.$Z$5]*MAGNET([.AF$24]+[.BB22])+[.AG$25]*[.$Z$5]*MAGNET([.AG$24]+[.BB22])+[.AH$25]*[.$Z$5]*MAGNET([.AH$24]+[.BB22]) +[.AI$25]*[.$Z$5]*MAGNET([.AI$24]+[.BB22]) +[.AJ$25]*[.$Z$5]*MAGNET([.AJ$24]+[.BB22]) +[.AK$25]*[.$Z$5]*MAGNET([.AK$24]+[.BB22]) +[.AL$25]*[.$Z$5]*MAGNET([.AL$24]+[.BB22]) +[.AM$25]*[.$Z$5]*MAGNET([.AM$24]+[.BB22]) +[.AN$25]*[.$Z$5]*MAGNET([.AN$24]+[.BB22]) +[.AO$25]*[.$Z$5]*MAGNET([.AO$24]+[.BB22])+RAND()*[.$BC$13]+[.AP$25]*[.$Z$5]*MAGNET([.AP$24]+[.BB22])&#10;+[.AQ$25]*[.$Z$5]*MAGNET([.AQ$24]+[.BB22])&#10;+[.AR$25]*[.$Z$5]*MAGNET([.AR$24]+[.BB22])&#10;+[.AS$25]*[.$Z$5]*MAGNET([.AS$24]+[.BB22])&#10;+[.AT$25]*[.$Z$5]*MAGNET([.AT$24]+[.BB22])&#10;+[.AU$25]*[.$Z$5]*MAGNET([.AU$24]+[.BB22])&#10;+[.AV$25]*[.$Z$5]*MAGNET([.AV$24]+[.BB22])&#10;+[.AW$25]*[.$Z$5]*MAGNET([.AW$24]+[.BB22])&#10;+[.AX$25]*[.$Z$5]*MAGNET([.AX$24]+[.BB22])&#10;+[.AY$25]*[.$Z$5]*MAGNET([.AY$24]+[.BB22])" office:value-type="float" office:value="37.0583260748221" calcext:value-type="float">
            <text:p>37.06</text:p>
          </table:table-cell>
          <table:table-cell table:style-name="ce70" table:formula="of:=[.E$26]*[.$Z$5]*MAGNET([.E$24]+[.$BB22])+[.F$26]*[.$Z$5]*MAGNET([.F$24]+[.$BB22])+[.G$26]*[.$Z$5]*MAGNET([.G$24]+[.$BB22])+[.H$26]*[.$Z$5]*MAGNET([.H$24]+[.$BB22])+[.I$26]*[.$Z$5]*MAGNET([.I$24]+[.$BB22])+[.J$26]*[.$Z$5]*MAGNET([.J$24]+[.$BB22])+[.K$26]*[.$Z$5]*MAGNET([.K$24]+[.$BB22])+[.L$26]*[.$Z$5]*MAGNET([.L$24]+[.$BB22])+[.M$26]*[.$Z$5]*MAGNET([.M$24]+[.$BB22])+[.N$26]*[.$Z$5]*MAGNET([.N$24]+[.$BB22])+[.O$26]*[.$Z$5]*MAGNET([.O$24]+[.$BB22])+[.P$26]*[.$Z$5]*MAGNET([.P$24]+[.$BB22])+[.Q$26]*[.$Z$5]*MAGNET([.Q$24]+[.$BB22])+[.R$26]*[.$Z$5]*MAGNET([.R$24]+[.$BB22])+[.S$26]*[.$Z$5]*MAGNET([.S$24]+[.$BB22])+[.T$26]*[.$Z$5]*MAGNET([.T$24]+[.$BB22])+[.U$26]*[.$Z$5]*MAGNET([.U$24]+[.$BB22])+[.V$26]*[.$Z$5]*MAGNET([.V$24]+[.$BB22])+[.W$26]*[.$Z$5]*MAGNET([.W$24]+[.$BB22])+[.X$26]*[.$Z$5]*MAGNET([.X$24]+[.$BB22])+[.Y$26]*[.$Z$5]*MAGNET([.Y$24]+[.$BB22])+[.Z$26]*[.$Z$5]*MAGNET([.Z$24]+[.$BB22])+[.AA$26]*[.$Z$5]*MAGNET([.AA$24]+[.$BB22])+[.AB$26]*[.$Z$5]*MAGNET([.AB$24]+[.$BB22])+[.AC$26]*[.$Z$5]*MAGNET([.AC$24]+[.$BB22])+[.AD$26]*[.$Z$5]*MAGNET([.AD$24]+[.$BB22])+[.AE$26]*[.$Z$5]*MAGNET([.AE$24]+[.$BB22])+[.AF$26]*[.$Z$5]*MAGNET([.AF$24]+[.$BB22])+[.AG$26]*[.$Z$5]*MAGNET([.AG$24]+[.$BB22])+[.D$26]*[.$Z$5]*MAGNET([.D$24]+[.$BB22])+[.AH$26]*[.$Z$5]*MAGNET([.AH$24]+[.BB22]) +[.AI$26]*[.$Z$5]*MAGNET([.AI$24]+[.BB22]) +[.AJ$26]*[.$Z$5]*MAGNET([.AJ$24]+[.BB22]) +[.AK$26]*[.$Z$5]*MAGNET([.AK$24]+[.BB22]) +[.AL$26]*[.$Z$5]*MAGNET([.AL$24]+[.BB22]) +[.AM$26]*[.$Z$5]*MAGNET([.AM$24]+[.BB22]) +[.AN$26]*[.$Z$5]*MAGNET([.AN$24]+[.BB22]) +[.AO$26]*[.$Z$5]*MAGNET([.AO$24]+[.BB22]) +[.AP$26]*[.$Z$5]*MAGNET([.AP$24]+[.$BB22])&#10;+[.AQ$26]*[.$Z$5]*MAGNET([.AQ$24]+[.$BB22])&#10;+[.AR$26]*[.$Z$5]*MAGNET([.AR$24]+[.$BB22])&#10;+[.AS$26]*[.$Z$5]*MAGNET([.AS$24]+[.$BB22])&#10;+[.AT$26]*[.$Z$5]*MAGNET([.AT$24]+[.$BB22])&#10;+[.AU$26]*[.$Z$5]*MAGNET([.AU$24]+[.$BB22])&#10;+[.AV$26]*[.$Z$5]*MAGNET([.AV$24]+[.$BB22])&#10;+[.AW$26]*[.$Z$5]*MAGNET([.AW$24]+[.$BB22])&#10;+[.AX$26]*[.$Z$5]*MAGNET([.AX$24]+[.$BB22])&#10;+[.AY$26]*[.$Z$5]*MAGNET([.AY$24]+[.$BB22]) +RAND()*[.$BD$13]" office:value-type="float" office:value="63.0830898664415" calcext:value-type="float">
            <text:p>63.08</text:p>
          </table:table-cell>
          <table:table-cell table:style-name="ce71" table:formula="of:=[.E$27]*[.$Z$5]*MAGNET([.E$24]+[.$BB22])+[.F$27]*[.$Z$5]*MAGNET([.F$24]+[.$BB22])+[.G$27]*[.$Z$5]*MAGNET([.G$24]+[.$BB22])+[.H$27]*[.$Z$5]*MAGNET([.H$24]+[.$BB22])+[.I$27]*[.$Z$5]*MAGNET([.I$24]+[.$BB22])+[.J$27]*[.$Z$5]*MAGNET([.J$24]+[.$BB22])+[.K$27]*[.$Z$5]*MAGNET([.K$24]+[.$BB22])+[.L$27]*[.$Z$5]*MAGNET([.L$24]+[.$BB22])+[.M$27]*[.$Z$5]*MAGNET([.M$24]+[.$BB22])+[.N$27]*[.$Z$5]*MAGNET([.N$24]+[.$BB22])+[.O$27]*[.$Z$5]*MAGNET([.O$24]+[.$BB22])+[.P$27]*[.$Z$5]*MAGNET([.P$24]+[.$BB22])+[.Q$27]*[.$Z$5]*MAGNET([.Q$24]+[.$BB22])+[.R$27]*[.$Z$5]*MAGNET([.R$24]+[.$BB22])+[.S$27]*[.$Z$5]*MAGNET([.S$24]+[.$BB22])+[.T$27]*[.$Z$5]*MAGNET([.T$24]+[.$BB22])+[.U$27]*[.$Z$5]*MAGNET([.U$24]+[.$BB22])+[.V$27]*[.$Z$5]*MAGNET([.V$24]+[.$BB22])+[.W$27]*[.$Z$5]*MAGNET([.W$24]+[.$BB22])+[.X$27]*[.$Z$5]*MAGNET([.X$24]+[.$BB22])+[.Y$27]*[.$Z$5]*MAGNET([.Y$24]+[.$BB22])+[.Z$27]*[.$Z$5]*MAGNET([.Z$24]+[.$BB22])+[.AA$27]*[.$Z$5]*MAGNET([.AA$24]+[.$BB22])+[.AB$27]*[.$Z$5]*MAGNET([.AB$24]+[.$BB22])+[.AC$27]*[.$Z$5]*MAGNET([.AC$24]+[.$BB22])+[.AD$27]*[.$Z$5]*MAGNET([.AD$24]+[.$BB22])+[.AE$27]*[.$Z$5]*MAGNET([.AE$24]+[.$BB22])+[.AF$27]*[.$Z$5]*MAGNET([.AF$24]+[.$BB22])+[.AG$27]*[.$Z$5]*MAGNET([.AG$24]+[.$BB22])+[.D$27]*[.$Z$5]*MAGNET([.D$24]+[.$BB22])+[.AH$27]*[.$Z$5]*MAGNET([.AH$24]+[.BB22]) +[.AI$27]*[.$Z$5]*MAGNET([.AI$24]+[.BB22]) +[.AJ$27]*[.$Z$5]*MAGNET([.AJ$24]+[.BB22]) +[.AK$27]*[.$Z$5]*MAGNET([.AK$24]+[.BB22]) +[.AL$27]*[.$Z$5]*MAGNET([.AL$24]+[.BB22]) +[.AM$27]*[.$Z$5]*MAGNET([.AM$24]+[.BB22]) +[.AN$27]*[.$Z$5]*MAGNET([.AN$24]+[.BB22]) +[.AO$27]*[.$Z$5]*MAGNET([.AO$24]+[.BB22]) +[.AP$27]*[.$Z$5]*MAGNET([.AP$24]+[.$BB22])&#10;+[.AQ$27]*[.$Z$5]*MAGNET([.AQ$24]+[.$BB22])&#10;+[.AR$27]*[.$Z$5]*MAGNET([.AR$24]+[.$BB22])&#10;+[.AS$27]*[.$Z$5]*MAGNET([.AS$24]+[.$BB22])&#10;+[.AT$27]*[.$Z$5]*MAGNET([.AT$24]+[.$BB22])&#10;+[.AU$27]*[.$Z$5]*MAGNET([.AU$24]+[.$BB22])&#10;+[.AV$27]*[.$Z$5]*MAGNET([.AV$24]+[.$BB22])&#10;+[.AW$27]*[.$Z$5]*MAGNET([.AW$24]+[.$BB22])&#10;+[.AX$27]*[.$Z$5]*MAGNET([.AX$24]+[.$BB22])&#10;+[.AY$27]*[.$Z$5]*MAGNET([.AY$24]+[.$BB22]) +RAND()*[.$BE$13]" office:value-type="float" office:value="-112.80013050683" calcext:value-type="float">
            <text:p>-112.80013050683</text:p>
          </table:table-cell>
          <table:table-cell table:style-name="ce71" table:formula="of:=[.E$28]*[.$Z$5]*MAGNET([.E$24]+[.$BB22])+[.F$28]*[.$Z$5]*MAGNET([.F$24]+[.$BB22])+[.G$28]*[.$Z$5]*MAGNET([.G$24]+[.$BB22])+[.H$28]*[.$Z$5]*MAGNET([.H$24]+[.$BB22])+[.I$28]*[.$Z$5]*MAGNET([.I$24]+[.$BB22])+[.J$28]*[.$Z$5]*MAGNET([.J$24]+[.$BB22])+[.K$28]*[.$Z$5]*MAGNET([.K$24]+[.$BB22])+[.L$28]*[.$Z$5]*MAGNET([.L$24]+[.$BB22])+[.M$28]*[.$Z$5]*MAGNET([.M$24]+[.$BB22])+[.N$28]*[.$Z$5]*MAGNET([.N$24]+[.$BB22])+[.O$28]*[.$Z$5]*MAGNET([.O$24]+[.$BB22])+[.P$28]*[.$Z$5]*MAGNET([.P$24]+[.$BB22])+[.Q$28]*[.$Z$5]*MAGNET([.Q$24]+[.$BB22])+[.R$28]*[.$Z$5]*MAGNET([.R$24]+[.$BB22])+[.S$28]*[.$Z$5]*MAGNET([.S$24]+[.$BB22])+[.T$28]*[.$Z$5]*MAGNET([.T$24]+[.$BB22])+[.U$28]*[.$Z$5]*MAGNET([.U$24]+[.$BB22])+[.V$28]*[.$Z$5]*MAGNET([.V$24]+[.$BB22])+[.W$28]*[.$Z$5]*MAGNET([.W$24]+[.$BB22])+[.X$28]*[.$Z$5]*MAGNET([.X$24]+[.$BB22])+[.Y$28]*[.$Z$5]*MAGNET([.Y$24]+[.$BB22])+[.Z$28]*[.$Z$5]*MAGNET([.Z$24]+[.$BB22])+[.AA$28]*[.$Z$5]*MAGNET([.AA$24]+[.$BB22])+[.AB$28]*[.$Z$5]*MAGNET([.AB$24]+[.$BB22])+[.AC$28]*[.$Z$5]*MAGNET([.AC$24]+[.$BB22])+[.AD$28]*[.$Z$5]*MAGNET([.AD$24]+[.$BB22])+[.AE$28]*[.$Z$5]*MAGNET([.AE$24]+[.$BB22])+[.AF$28]*[.$Z$5]*MAGNET([.AF$24]+[.$BB22])+[.AG$28]*[.$Z$5]*MAGNET([.AG$24]+[.$BB22])+[.D$28]*[.$Z$5]*MAGNET([.D$24]+[.$BB22])+[.AH$28]*[.$Z$5]*MAGNET([.AH$24]+[.BB22]) +[.AI$28]*[.$Z$5]*MAGNET([.AI$24]+[.BB22]) +[.AJ$28]*[.$Z$5]*MAGNET([.AJ$24]+[.BB22]) +[.AK$28]*[.$Z$5]*MAGNET([.AK$24]+[.BB22]) +[.AL$28]*[.$Z$5]*MAGNET([.AL$24]+[.BB22]) +[.AM$28]*[.$Z$5]*MAGNET([.AM$24]+[.BB22]) +[.AN$28]*[.$Z$5]*MAGNET([.AN$24]+[.BB22]) +[.AO$28]*[.$Z$5]*MAGNET([.AO$24]+[.BB22]) +[.AP$28]*[.$Z$5]*MAGNET([.AP$24]+[.$BB22])&#10;+[.AQ$28]*[.$Z$5]*MAGNET([.AQ$24]+[.$BB22])&#10;+[.AR$28]*[.$Z$5]*MAGNET([.AR$24]+[.$BB22])&#10;+[.AS$28]*[.$Z$5]*MAGNET([.AS$24]+[.$BB22])&#10;+[.AT$28]*[.$Z$5]*MAGNET([.AT$24]+[.$BB22])&#10;+[.AU$28]*[.$Z$5]*MAGNET([.AU$24]+[.$BB22])&#10;+[.AV$28]*[.$Z$5]*MAGNET([.AV$24]+[.$BB22])&#10;+[.AW$28]*[.$Z$5]*MAGNET([.AW$24]+[.$BB22])&#10;+[.AX$28]*[.$Z$5]*MAGNET([.AX$24]+[.$BB22])&#10;+[.AY$28]*[.$Z$5]*MAGNET([.AY$24]+[.$BB22]) +RAND()*[.$BF$13]" office:value-type="float" office:value="-15.9933396022933" calcext:value-type="float">
            <text:p>-15.9933396022933</text:p>
          </table:table-cell>
          <table:table-cell table:style-name="ce71" table:formula="of:=[.E$29]*[.$Z$5]*MAGNET([.E$24]+[.$BB22])+[.F$29]*[.$Z$5]*MAGNET([.F$24]+[.$BB22])+[.G$29]*[.$Z$5]*MAGNET([.G$24]+[.$BB22])+[.H$29]*[.$Z$5]*MAGNET([.H$24]+[.$BB22])+[.I$29]*[.$Z$5]*MAGNET([.I$24]+[.$BB22])+[.J$29]*[.$Z$5]*MAGNET([.J$24]+[.$BB22])+[.K$29]*[.$Z$5]*MAGNET([.K$24]+[.$BB22])+[.L$29]*[.$Z$5]*MAGNET([.L$24]+[.$BB22])+[.M$29]*[.$Z$5]*MAGNET([.M$24]+[.$BB22])+[.N$29]*[.$Z$5]*MAGNET([.N$24]+[.$BB22])+[.O$29]*[.$Z$5]*MAGNET([.O$24]+[.$BB22])+[.P$29]*[.$Z$5]*MAGNET([.P$24]+[.$BB22])+[.Q$29]*[.$Z$5]*MAGNET([.Q$24]+[.$BB22])+[.R$29]*[.$Z$5]*MAGNET([.R$24]+[.$BB22])+[.S$29]*[.$Z$5]*MAGNET([.S$24]+[.$BB22])+[.T$29]*[.$Z$5]*MAGNET([.T$24]+[.$BB22])+[.U$29]*[.$Z$5]*MAGNET([.U$24]+[.$BB22])+[.V$29]*[.$Z$5]*MAGNET([.V$24]+[.$BB22])+[.W$29]*[.$Z$5]*MAGNET([.W$24]+[.$BB22])+[.X$29]*[.$Z$5]*MAGNET([.X$24]+[.$BB22])+[.Y$29]*[.$Z$5]*MAGNET([.Y$24]+[.$BB22])+[.Z$29]*[.$Z$5]*MAGNET([.Z$24]+[.$BB22])+[.AA$29]*[.$Z$5]*MAGNET([.AA$24]+[.$BB22])+[.AB$29]*[.$Z$5]*MAGNET([.AB$24]+[.$BB22])+[.AC$29]*[.$Z$5]*MAGNET([.AC$24]+[.$BB22])+[.AD$29]*[.$Z$5]*MAGNET([.AD$24]+[.$BB22])+[.AE$29]*[.$Z$5]*MAGNET([.AE$24]+[.$BB22])+[.AF$29]*[.$Z$5]*MAGNET([.AF$24]+[.$BB22])+[.AG$29]*[.$Z$5]*MAGNET([.AG$24]+[.$BB22])+[.D$29]*[.$Z$5]*MAGNET([.D$24]+[.$BB22])+[.AH$29]*[.$Z$5]*MAGNET([.AH$24]+[.BB22]) +[.AI$29]*[.$Z$5]*MAGNET([.AI$24]+[.BB22]) +[.AJ$29]*[.$Z$5]*MAGNET([.AJ$24]+[.BB22]) +[.AK$29]*[.$Z$5]*MAGNET([.AK$24]+[.BB22]) +[.AL$29]*[.$Z$5]*MAGNET([.AL$24]+[.BB22]) +[.AM$29]*[.$Z$5]*MAGNET([.AM$24]+[.BB22]) +[.AN$29]*[.$Z$5]*MAGNET([.AN$24]+[.BB22]) +[.AO$29]*[.$Z$5]*MAGNET([.AO$24]+[.BB22]) +[.AP$29]*[.$Z$5]*MAGNET([.AP$24]+[.$BB22])&#10;+[.AQ$29]*[.$Z$5]*MAGNET([.AQ$24]+[.$BB22])&#10;+[.AR$29]*[.$Z$5]*MAGNET([.AR$24]+[.$BB22])&#10;+[.AS$29]*[.$Z$5]*MAGNET([.AS$24]+[.$BB22])&#10;+[.AT$29]*[.$Z$5]*MAGNET([.AT$24]+[.$BB22])&#10;+[.AU$29]*[.$Z$5]*MAGNET([.AU$24]+[.$BB22])&#10;+[.AV$29]*[.$Z$5]*MAGNET([.AV$24]+[.$BB22])&#10;+[.AW$29]*[.$Z$5]*MAGNET([.AW$24]+[.$BB22])&#10;+[.AX$29]*[.$Z$5]*MAGNET([.AX$24]+[.$BB22])&#10;+[.AY$29]*[.$Z$5]*MAGNET([.AY$24]+[.$BB22]) +RAND()*[.$BG$13]" office:value-type="float" office:value="45.6704962324656" calcext:value-type="float">
            <text:p>45.6704962324656</text:p>
          </table:table-cell>
          <table:table-cell table:style-name="ce71" table:formula="of:=[.E$30]*[.$Z$5]*MAGNET([.E$24]+[.$BB22])+[.F$30]*[.$Z$5]*MAGNET([.F$24]+[.$BB22])+[.G$30]*[.$Z$5]*MAGNET([.G$24]+[.$BB22])+[.H$30]*[.$Z$5]*MAGNET([.H$24]+[.$BB22])+[.I$30]*[.$Z$5]*MAGNET([.I$24]+[.$BB22])+[.J$30]*[.$Z$5]*MAGNET([.J$24]+[.$BB22])+[.K$30]*[.$Z$5]*MAGNET([.K$24]+[.$BB22])+[.L$30]*[.$Z$5]*MAGNET([.L$24]+[.$BB22])+[.M$30]*[.$Z$5]*MAGNET([.M$24]+[.$BB22])+[.N$30]*[.$Z$5]*MAGNET([.N$24]+[.$BB22])+[.O$30]*[.$Z$5]*MAGNET([.O$24]+[.$BB22])+[.P$30]*[.$Z$5]*MAGNET([.P$24]+[.$BB22])+[.Q$30]*[.$Z$5]*MAGNET([.Q$24]+[.$BB22])+[.R$30]*[.$Z$5]*MAGNET([.R$24]+[.$BB22])+[.S$30]*[.$Z$5]*MAGNET([.S$24]+[.$BB22])+[.T$30]*[.$Z$5]*MAGNET([.T$24]+[.$BB22])+[.U$30]*[.$Z$5]*MAGNET([.U$24]+[.$BB22])+[.V$30]*[.$Z$5]*MAGNET([.V$24]+[.$BB22])+[.W$30]*[.$Z$5]*MAGNET([.W$24]+[.$BB22])+[.X$30]*[.$Z$5]*MAGNET([.X$24]+[.$BB22])+[.Y$30]*[.$Z$5]*MAGNET([.Y$24]+[.$BB22])+[.Z$30]*[.$Z$5]*MAGNET([.Z$24]+[.$BB22])+[.AA$30]*[.$Z$5]*MAGNET([.AA$24]+[.$BB22])+[.AB$30]*[.$Z$5]*MAGNET([.AB$24]+[.$BB22])+[.AC$30]*[.$Z$5]*MAGNET([.AC$24]+[.$BB22])+[.AD$30]*[.$Z$5]*MAGNET([.AD$24]+[.$BB22])+[.AE$30]*[.$Z$5]*MAGNET([.AE$24]+[.$BB22])+[.AF$30]*[.$Z$5]*MAGNET([.AF$24]+[.$BB22])+[.AG$30]*[.$Z$5]*MAGNET([.AG$24]+[.$BB22])+[.D$30]*[.$Z$5]*MAGNET([.D$24]+[.$BB22])+[.AH$30]*[.$Z$5]*MAGNET([.AH$24]+[.BB22]) +[.AI$30]*[.$Z$5]*MAGNET([.AI$24]+[.BB22]) +[.AJ$30]*[.$Z$5]*MAGNET([.AJ$24]+[.BB22]) +[.AK$30]*[.$Z$5]*MAGNET([.AK$24]+[.BB22]) +[.AL$30]*[.$Z$5]*MAGNET([.AL$24]+[.BB22]) +[.AM$30]*[.$Z$5]*MAGNET([.AM$24]+[.BB22]) +[.AN$30]*[.$Z$5]*MAGNET([.AN$24]+[.BB22]) +[.AO$30]*[.$Z$5]*MAGNET([.AO$24]+[.BB22]) +[.AP$30]*[.$Z$5]*MAGNET([.AP$24]+[.$BB22])&#10;+[.AQ$30]*[.$Z$5]*MAGNET([.AQ$24]+[.$BB22])&#10;+[.AR$30]*[.$Z$5]*MAGNET([.AR$24]+[.$BB22])&#10;+[.AS$30]*[.$Z$5]*MAGNET([.AS$24]+[.$BB22])&#10;+[.AT$30]*[.$Z$5]*MAGNET([.AT$24]+[.$BB22])&#10;+[.AU$30]*[.$Z$5]*MAGNET([.AU$24]+[.$BB22])&#10;+[.AV$30]*[.$Z$5]*MAGNET([.AV$24]+[.$BB22])&#10;+[.AW$30]*[.$Z$5]*MAGNET([.AW$24]+[.$BB22])&#10;+[.AX$30]*[.$Z$5]*MAGNET([.AX$24]+[.$BB22])&#10;+[.AY$30]*[.$Z$5]*MAGNET([.AY$24]+[.$BB22]) +RAND()*[.$BH$13]" office:value-type="float" office:value="0" calcext:value-type="float">
            <text:p>0</text:p>
          </table:table-cell>
          <table:table-cell table:style-name="ce71" table:formula="of:=[.E$31]*[.$Z$5]*MAGNET([.E$24]+[.$BB22])+[.F$31]*[.$Z$5]*MAGNET([.F$24]+[.$BB22])+[.G$31]*[.$Z$5]*MAGNET([.G$24]+[.$BB22])+[.H$31]*[.$Z$5]*MAGNET([.H$24]+[.$BB22])+[.I$31]*[.$Z$5]*MAGNET([.I$24]+[.$BB22])+[.J$31]*[.$Z$5]*MAGNET([.J$24]+[.$BB22])+[.K$31]*[.$Z$5]*MAGNET([.K$24]+[.$BB22])+[.L$31]*[.$Z$5]*MAGNET([.L$24]+[.$BB22])+[.M$31]*[.$Z$5]*MAGNET([.M$24]+[.$BB22])+[.N$31]*[.$Z$5]*MAGNET([.N$24]+[.$BB22])+[.O$31]*[.$Z$5]*MAGNET([.O$24]+[.$BB22])+[.P$31]*[.$Z$5]*MAGNET([.P$24]+[.$BB22])+[.Q$31]*[.$Z$5]*MAGNET([.Q$24]+[.$BB22])+[.R$31]*[.$Z$5]*MAGNET([.R$24]+[.$BB22])+[.S$31]*[.$Z$5]*MAGNET([.S$24]+[.$BB22])+[.T$31]*[.$Z$5]*MAGNET([.T$24]+[.$BB22])+[.U$31]*[.$Z$5]*MAGNET([.U$24]+[.$BB22])+[.V$31]*[.$Z$5]*MAGNET([.V$24]+[.$BB22])+[.W$31]*[.$Z$5]*MAGNET([.W$24]+[.$BB22])+[.X$31]*[.$Z$5]*MAGNET([.X$24]+[.$BB22])+[.Y$31]*[.$Z$5]*MAGNET([.Y$24]+[.$BB22])+[.Z$31]*[.$Z$5]*MAGNET([.Z$24]+[.$BB22])+[.AA$31]*[.$Z$5]*MAGNET([.AA$24]+[.$BB22])+[.AB$31]*[.$Z$5]*MAGNET([.AB$24]+[.$BB22])+[.AC$31]*[.$Z$5]*MAGNET([.AC$24]+[.$BB22])+[.AD$31]*[.$Z$5]*MAGNET([.AD$24]+[.$BB22])+[.AE$31]*[.$Z$5]*MAGNET([.AE$24]+[.$BB22])+[.AF$31]*[.$Z$5]*MAGNET([.AF$24]+[.$BB22])+[.AG$31]*[.$Z$5]*MAGNET([.AG$24]+[.$BB22])+[.D$31]*[.$Z$5]*MAGNET([.D$24]+[.$BB22])+[.AH$31]*[.$Z$5]*MAGNET([.AH$24]+[.BB22]) +[.AI$31]*[.$Z$5]*MAGNET([.AI$24]+[.BB22]) +[.AJ$31]*[.$Z$5]*MAGNET([.AJ$24]+[.BB22]) +[.AK$31]*[.$Z$5]*MAGNET([.AK$24]+[.BB22]) +[.AL$31]*[.$Z$5]*MAGNET([.AL$24]+[.BB22]) +[.AM$31]*[.$Z$5]*MAGNET([.AM$24]+[.BB22]) +[.AN$31]*[.$Z$5]*MAGNET([.AN$24]+[.BB22]) +[.AO$31]*[.$Z$5]*MAGNET([.AO$24]+[.BB22]) +[.AP$31]*[.$Z$5]*MAGNET([.AP$24]+[.$BB22])&#10;+[.AQ$31]*[.$Z$5]*MAGNET([.AQ$24]+[.$BB22])&#10;+[.AR$31]*[.$Z$5]*MAGNET([.AR$24]+[.$BB22])&#10;+[.AS$31]*[.$Z$5]*MAGNET([.AS$24]+[.$BB22])&#10;+[.AT$31]*[.$Z$5]*MAGNET([.AT$24]+[.$BB22])&#10;+[.AU$31]*[.$Z$5]*MAGNET([.AU$24]+[.$BB22])&#10;+[.AV$31]*[.$Z$5]*MAGNET([.AV$24]+[.$BB22])&#10;+[.AW$31]*[.$Z$5]*MAGNET([.AW$24]+[.$BB22])&#10;+[.AX$31]*[.$Z$5]*MAGNET([.AX$24]+[.$BB22])&#10;+[.AY$31]*[.$Z$5]*MAGNET([.AY$24]+[.$BB22]) +RAND()*[.$BI$13]" office:value-type="float" office:value="0" calcext:value-type="float">
            <text:p>0</text:p>
          </table:table-cell>
          <table:table-cell table:style-name="ce71" table:formula="of:=[.E$32]*[.$Z$5]*MAGNET([.E$24]+[.$BB22])+[.F$32]*[.$Z$5]*MAGNET([.F$24]+[.$BB22])+[.G$32]*[.$Z$5]*MAGNET([.G$24]+[.$BB22])+[.H$32]*[.$Z$5]*MAGNET([.H$24]+[.$BB22])+[.I$32]*[.$Z$5]*MAGNET([.I$24]+[.$BB22])+[.J$32]*[.$Z$5]*MAGNET([.J$24]+[.$BB22])+[.K$32]*[.$Z$5]*MAGNET([.K$24]+[.$BB22])+[.L$32]*[.$Z$5]*MAGNET([.L$24]+[.$BB22])+[.M$32]*[.$Z$5]*MAGNET([.M$24]+[.$BB22])+[.N$32]*[.$Z$5]*MAGNET([.N$24]+[.$BB22])+[.O$32]*[.$Z$5]*MAGNET([.O$24]+[.$BB22])+[.P$32]*[.$Z$5]*MAGNET([.P$24]+[.$BB22])+[.Q$32]*[.$Z$5]*MAGNET([.Q$24]+[.$BB22])+[.R$32]*[.$Z$5]*MAGNET([.R$24]+[.$BB22])+[.S$32]*[.$Z$5]*MAGNET([.S$24]+[.$BB22])+[.T$32]*[.$Z$5]*MAGNET([.T$24]+[.$BB22])+[.U$32]*[.$Z$5]*MAGNET([.U$24]+[.$BB22])+[.V$32]*[.$Z$5]*MAGNET([.V$24]+[.$BB22])+[.W$32]*[.$Z$5]*MAGNET([.W$24]+[.$BB22])+[.X$32]*[.$Z$5]*MAGNET([.X$24]+[.$BB22])+[.Y$32]*[.$Z$5]*MAGNET([.Y$24]+[.$BB22])+[.Z$32]*[.$Z$5]*MAGNET([.Z$24]+[.$BB22])+[.AA$32]*[.$Z$5]*MAGNET([.AA$24]+[.$BB22])+[.AB$32]*[.$Z$5]*MAGNET([.AB$24]+[.$BB22])+[.AC$32]*[.$Z$5]*MAGNET([.AC$24]+[.$BB22])+[.AD$32]*[.$Z$5]*MAGNET([.AD$24]+[.$BB22])+[.AE$32]*[.$Z$5]*MAGNET([.AE$24]+[.$BB22])+[.AF$32]*[.$Z$5]*MAGNET([.AF$24]+[.$BB22])+[.AG$32]*[.$Z$5]*MAGNET([.AG$24]+[.$BB22])+[.D$32]*[.$Z$5]*MAGNET([.D$24]+[.$BB22])+[.AH$32]*[.$Z$5]*MAGNET([.AH$24]+[.BB22]) +[.AI$32]*[.$Z$5]*MAGNET([.AI$24]+[.BB22]) +[.AJ$32]*[.$Z$5]*MAGNET([.AJ$24]+[.BB22]) +[.AK$32]*[.$Z$5]*MAGNET([.AK$24]+[.BB22]) +[.AL$32]*[.$Z$5]*MAGNET([.AL$24]+[.BB22]) +[.AM$32]*[.$Z$5]*MAGNET([.AM$24]+[.BB22]) +[.AN$32]*[.$Z$5]*MAGNET([.AN$24]+[.BB22]) +[.AO$32]*[.$Z$5]*MAGNET([.AO$24]+[.BB22]) +[.AP$32]*[.$Z$5]*MAGNET([.AP$24]+[.$BB22])&#10;+[.AQ$32]*[.$Z$5]*MAGNET([.AQ$24]+[.$BB22])&#10;+[.AR$32]*[.$Z$5]*MAGNET([.AR$24]+[.$BB22])&#10;+[.AS$32]*[.$Z$5]*MAGNET([.AS$24]+[.$BB22])&#10;+[.AT$32]*[.$Z$5]*MAGNET([.AT$24]+[.$BB22])&#10;+[.AU$32]*[.$Z$5]*MAGNET([.AU$24]+[.$BB22])&#10;+[.AV$32]*[.$Z$5]*MAGNET([.AV$24]+[.$BB22])&#10;+[.AW$32]*[.$Z$5]*MAGNET([.AW$24]+[.$BB22])&#10;+[.AX$32]*[.$Z$5]*MAGNET([.AX$24]+[.$BB22])&#10;+[.AY$32]*[.$Z$5]*MAGNET([.AY$24]+[.$BB2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22]+0.002" office:value-type="float" office:value="0.016" calcext:value-type="float">
            <text:p>0.016</text:p>
          </table:table-cell>
          <table:table-cell table:formula="of:=[.BA23]*[.$D$6]" office:value-type="float" office:value="0.804247719318987" calcext:value-type="float">
            <text:p>0.804</text:p>
          </table:table-cell>
          <table:table-cell table:formula="of:=[.D$25]*[.$Z$5]*MAGNET([.D$24]+[.BB23])+[.E$25]*[.$Z$5]*MAGNET([.E$24]+[.BB23])+[.F$25]*[.$Z$5]*MAGNET([.F$24]+[.BB23])+[.G$25]*[.$Z$5]*MAGNET([.G$24]+[.BB23])+[.H$25]*[.$Z$5]*MAGNET([.H$24]+[.BB23])+[.I$25]*[.$Z$5]*MAGNET([.I$24]+[.BB23])+[.J$25]*[.$Z$5]*MAGNET([.J$24]+[.BB23])+[.K$25]*[.$Z$5]*MAGNET([.K$24]+[.BB23])+[.L$25]*[.$Z$5]*MAGNET([.L$24]+[.BB23])+[.M$25]*[.$Z$5]*MAGNET([.M$24]+[.BB23])+[.N$25]*[.$Z$5]*MAGNET([.N$24]+[.BB23])+[.O$25]*[.$Z$5]*MAGNET([.O$24]+[.BB23])+[.P$25]*[.$Z$5]*MAGNET([.P$24]+[.BB23])+[.Q$25]*[.$Z$5]*MAGNET([.Q$24]+[.BB23])+[.R$25]*[.$Z$5]*MAGNET([.R$24]+[.BB23])+[.S$25]*[.$Z$5]*MAGNET([.S$24]+[.BB23])+[.T$25]*[.$Z$5]*MAGNET([.T$24]+[.BB23])+[.U$25]*[.$Z$5]*MAGNET([.U$24]+[.BB23])+[.V$25]*[.$Z$5]*MAGNET([.V$24]+[.BB23])+[.W$25]*[.$Z$5]*MAGNET([.W$24]+[.BB23])+[.X$25]*[.$Z$5]*MAGNET([.X$24]+[.BB23])+[.Y$25]*[.$Z$5]*MAGNET([.Y$24]+[.BB23])+[.Z$25]*[.$Z$5]*MAGNET([.Z$24]+[.BB23])+[.AA$25]*[.$Z$5]*MAGNET([.AA$24]+[.BB23])+[.AB$25]*[.$Z$5]*MAGNET([.AB$24]+[.BB23])+[.AC$25]*[.$Z$5]*MAGNET([.AC$24]+[.BB23])+[.AD$25]*[.$Z$5]*MAGNET([.AD$24]+[.BB23])+[.AE$25]*[.$Z$5]*MAGNET([.AE$24]+[.BB23])+[.AF$25]*[.$Z$5]*MAGNET([.AF$24]+[.BB23])+[.AG$25]*[.$Z$5]*MAGNET([.AG$24]+[.BB23])+[.AH$25]*[.$Z$5]*MAGNET([.AH$24]+[.BB23]) +[.AI$25]*[.$Z$5]*MAGNET([.AI$24]+[.BB23]) +[.AJ$25]*[.$Z$5]*MAGNET([.AJ$24]+[.BB23]) +[.AK$25]*[.$Z$5]*MAGNET([.AK$24]+[.BB23]) +[.AL$25]*[.$Z$5]*MAGNET([.AL$24]+[.BB23]) +[.AM$25]*[.$Z$5]*MAGNET([.AM$24]+[.BB23]) +[.AN$25]*[.$Z$5]*MAGNET([.AN$24]+[.BB23]) +[.AO$25]*[.$Z$5]*MAGNET([.AO$24]+[.BB23])+RAND()*[.$BC$13]+[.AP$25]*[.$Z$5]*MAGNET([.AP$24]+[.BB23])&#10;+[.AQ$25]*[.$Z$5]*MAGNET([.AQ$24]+[.BB23])&#10;+[.AR$25]*[.$Z$5]*MAGNET([.AR$24]+[.BB23])&#10;+[.AS$25]*[.$Z$5]*MAGNET([.AS$24]+[.BB23])&#10;+[.AT$25]*[.$Z$5]*MAGNET([.AT$24]+[.BB23])&#10;+[.AU$25]*[.$Z$5]*MAGNET([.AU$24]+[.BB23])&#10;+[.AV$25]*[.$Z$5]*MAGNET([.AV$24]+[.BB23])&#10;+[.AW$25]*[.$Z$5]*MAGNET([.AW$24]+[.BB23])&#10;+[.AX$25]*[.$Z$5]*MAGNET([.AX$24]+[.BB23])&#10;+[.AY$25]*[.$Z$5]*MAGNET([.AY$24]+[.BB23])" office:value-type="float" office:value="46.7832218988005" calcext:value-type="float">
            <text:p>46.78</text:p>
          </table:table-cell>
          <table:table-cell table:style-name="ce70" table:formula="of:=[.E$26]*[.$Z$5]*MAGNET([.E$24]+[.$BB23])+[.F$26]*[.$Z$5]*MAGNET([.F$24]+[.$BB23])+[.G$26]*[.$Z$5]*MAGNET([.G$24]+[.$BB23])+[.H$26]*[.$Z$5]*MAGNET([.H$24]+[.$BB23])+[.I$26]*[.$Z$5]*MAGNET([.I$24]+[.$BB23])+[.J$26]*[.$Z$5]*MAGNET([.J$24]+[.$BB23])+[.K$26]*[.$Z$5]*MAGNET([.K$24]+[.$BB23])+[.L$26]*[.$Z$5]*MAGNET([.L$24]+[.$BB23])+[.M$26]*[.$Z$5]*MAGNET([.M$24]+[.$BB23])+[.N$26]*[.$Z$5]*MAGNET([.N$24]+[.$BB23])+[.O$26]*[.$Z$5]*MAGNET([.O$24]+[.$BB23])+[.P$26]*[.$Z$5]*MAGNET([.P$24]+[.$BB23])+[.Q$26]*[.$Z$5]*MAGNET([.Q$24]+[.$BB23])+[.R$26]*[.$Z$5]*MAGNET([.R$24]+[.$BB23])+[.S$26]*[.$Z$5]*MAGNET([.S$24]+[.$BB23])+[.T$26]*[.$Z$5]*MAGNET([.T$24]+[.$BB23])+[.U$26]*[.$Z$5]*MAGNET([.U$24]+[.$BB23])+[.V$26]*[.$Z$5]*MAGNET([.V$24]+[.$BB23])+[.W$26]*[.$Z$5]*MAGNET([.W$24]+[.$BB23])+[.X$26]*[.$Z$5]*MAGNET([.X$24]+[.$BB23])+[.Y$26]*[.$Z$5]*MAGNET([.Y$24]+[.$BB23])+[.Z$26]*[.$Z$5]*MAGNET([.Z$24]+[.$BB23])+[.AA$26]*[.$Z$5]*MAGNET([.AA$24]+[.$BB23])+[.AB$26]*[.$Z$5]*MAGNET([.AB$24]+[.$BB23])+[.AC$26]*[.$Z$5]*MAGNET([.AC$24]+[.$BB23])+[.AD$26]*[.$Z$5]*MAGNET([.AD$24]+[.$BB23])+[.AE$26]*[.$Z$5]*MAGNET([.AE$24]+[.$BB23])+[.AF$26]*[.$Z$5]*MAGNET([.AF$24]+[.$BB23])+[.AG$26]*[.$Z$5]*MAGNET([.AG$24]+[.$BB23])+[.D$26]*[.$Z$5]*MAGNET([.D$24]+[.$BB23])+[.AH$26]*[.$Z$5]*MAGNET([.AH$24]+[.BB23]) +[.AI$26]*[.$Z$5]*MAGNET([.AI$24]+[.BB23]) +[.AJ$26]*[.$Z$5]*MAGNET([.AJ$24]+[.BB23]) +[.AK$26]*[.$Z$5]*MAGNET([.AK$24]+[.BB23]) +[.AL$26]*[.$Z$5]*MAGNET([.AL$24]+[.BB23]) +[.AM$26]*[.$Z$5]*MAGNET([.AM$24]+[.BB23]) +[.AN$26]*[.$Z$5]*MAGNET([.AN$24]+[.BB23]) +[.AO$26]*[.$Z$5]*MAGNET([.AO$24]+[.BB23]) +[.AP$26]*[.$Z$5]*MAGNET([.AP$24]+[.$BB23])&#10;+[.AQ$26]*[.$Z$5]*MAGNET([.AQ$24]+[.$BB23])&#10;+[.AR$26]*[.$Z$5]*MAGNET([.AR$24]+[.$BB23])&#10;+[.AS$26]*[.$Z$5]*MAGNET([.AS$24]+[.$BB23])&#10;+[.AT$26]*[.$Z$5]*MAGNET([.AT$24]+[.$BB23])&#10;+[.AU$26]*[.$Z$5]*MAGNET([.AU$24]+[.$BB23])&#10;+[.AV$26]*[.$Z$5]*MAGNET([.AV$24]+[.$BB23])&#10;+[.AW$26]*[.$Z$5]*MAGNET([.AW$24]+[.$BB23])&#10;+[.AX$26]*[.$Z$5]*MAGNET([.AX$24]+[.$BB23])&#10;+[.AY$26]*[.$Z$5]*MAGNET([.AY$24]+[.$BB23]) +RAND()*[.$BD$13]" office:value-type="float" office:value="56.6011975803255" calcext:value-type="float">
            <text:p>56.60</text:p>
          </table:table-cell>
          <table:table-cell table:style-name="ce71" table:formula="of:=[.E$27]*[.$Z$5]*MAGNET([.E$24]+[.$BB23])+[.F$27]*[.$Z$5]*MAGNET([.F$24]+[.$BB23])+[.G$27]*[.$Z$5]*MAGNET([.G$24]+[.$BB23])+[.H$27]*[.$Z$5]*MAGNET([.H$24]+[.$BB23])+[.I$27]*[.$Z$5]*MAGNET([.I$24]+[.$BB23])+[.J$27]*[.$Z$5]*MAGNET([.J$24]+[.$BB23])+[.K$27]*[.$Z$5]*MAGNET([.K$24]+[.$BB23])+[.L$27]*[.$Z$5]*MAGNET([.L$24]+[.$BB23])+[.M$27]*[.$Z$5]*MAGNET([.M$24]+[.$BB23])+[.N$27]*[.$Z$5]*MAGNET([.N$24]+[.$BB23])+[.O$27]*[.$Z$5]*MAGNET([.O$24]+[.$BB23])+[.P$27]*[.$Z$5]*MAGNET([.P$24]+[.$BB23])+[.Q$27]*[.$Z$5]*MAGNET([.Q$24]+[.$BB23])+[.R$27]*[.$Z$5]*MAGNET([.R$24]+[.$BB23])+[.S$27]*[.$Z$5]*MAGNET([.S$24]+[.$BB23])+[.T$27]*[.$Z$5]*MAGNET([.T$24]+[.$BB23])+[.U$27]*[.$Z$5]*MAGNET([.U$24]+[.$BB23])+[.V$27]*[.$Z$5]*MAGNET([.V$24]+[.$BB23])+[.W$27]*[.$Z$5]*MAGNET([.W$24]+[.$BB23])+[.X$27]*[.$Z$5]*MAGNET([.X$24]+[.$BB23])+[.Y$27]*[.$Z$5]*MAGNET([.Y$24]+[.$BB23])+[.Z$27]*[.$Z$5]*MAGNET([.Z$24]+[.$BB23])+[.AA$27]*[.$Z$5]*MAGNET([.AA$24]+[.$BB23])+[.AB$27]*[.$Z$5]*MAGNET([.AB$24]+[.$BB23])+[.AC$27]*[.$Z$5]*MAGNET([.AC$24]+[.$BB23])+[.AD$27]*[.$Z$5]*MAGNET([.AD$24]+[.$BB23])+[.AE$27]*[.$Z$5]*MAGNET([.AE$24]+[.$BB23])+[.AF$27]*[.$Z$5]*MAGNET([.AF$24]+[.$BB23])+[.AG$27]*[.$Z$5]*MAGNET([.AG$24]+[.$BB23])+[.D$27]*[.$Z$5]*MAGNET([.D$24]+[.$BB23])+[.AH$27]*[.$Z$5]*MAGNET([.AH$24]+[.BB23]) +[.AI$27]*[.$Z$5]*MAGNET([.AI$24]+[.BB23]) +[.AJ$27]*[.$Z$5]*MAGNET([.AJ$24]+[.BB23]) +[.AK$27]*[.$Z$5]*MAGNET([.AK$24]+[.BB23]) +[.AL$27]*[.$Z$5]*MAGNET([.AL$24]+[.BB23]) +[.AM$27]*[.$Z$5]*MAGNET([.AM$24]+[.BB23]) +[.AN$27]*[.$Z$5]*MAGNET([.AN$24]+[.BB23]) +[.AO$27]*[.$Z$5]*MAGNET([.AO$24]+[.BB23]) +[.AP$27]*[.$Z$5]*MAGNET([.AP$24]+[.$BB23])&#10;+[.AQ$27]*[.$Z$5]*MAGNET([.AQ$24]+[.$BB23])&#10;+[.AR$27]*[.$Z$5]*MAGNET([.AR$24]+[.$BB23])&#10;+[.AS$27]*[.$Z$5]*MAGNET([.AS$24]+[.$BB23])&#10;+[.AT$27]*[.$Z$5]*MAGNET([.AT$24]+[.$BB23])&#10;+[.AU$27]*[.$Z$5]*MAGNET([.AU$24]+[.$BB23])&#10;+[.AV$27]*[.$Z$5]*MAGNET([.AV$24]+[.$BB23])&#10;+[.AW$27]*[.$Z$5]*MAGNET([.AW$24]+[.$BB23])&#10;+[.AX$27]*[.$Z$5]*MAGNET([.AX$24]+[.$BB23])&#10;+[.AY$27]*[.$Z$5]*MAGNET([.AY$24]+[.$BB23]) +RAND()*[.$BE$13]" office:value-type="float" office:value="-121.222669932166" calcext:value-type="float">
            <text:p>-121.222669932166</text:p>
          </table:table-cell>
          <table:table-cell table:style-name="ce71" table:formula="of:=[.E$28]*[.$Z$5]*MAGNET([.E$24]+[.$BB23])+[.F$28]*[.$Z$5]*MAGNET([.F$24]+[.$BB23])+[.G$28]*[.$Z$5]*MAGNET([.G$24]+[.$BB23])+[.H$28]*[.$Z$5]*MAGNET([.H$24]+[.$BB23])+[.I$28]*[.$Z$5]*MAGNET([.I$24]+[.$BB23])+[.J$28]*[.$Z$5]*MAGNET([.J$24]+[.$BB23])+[.K$28]*[.$Z$5]*MAGNET([.K$24]+[.$BB23])+[.L$28]*[.$Z$5]*MAGNET([.L$24]+[.$BB23])+[.M$28]*[.$Z$5]*MAGNET([.M$24]+[.$BB23])+[.N$28]*[.$Z$5]*MAGNET([.N$24]+[.$BB23])+[.O$28]*[.$Z$5]*MAGNET([.O$24]+[.$BB23])+[.P$28]*[.$Z$5]*MAGNET([.P$24]+[.$BB23])+[.Q$28]*[.$Z$5]*MAGNET([.Q$24]+[.$BB23])+[.R$28]*[.$Z$5]*MAGNET([.R$24]+[.$BB23])+[.S$28]*[.$Z$5]*MAGNET([.S$24]+[.$BB23])+[.T$28]*[.$Z$5]*MAGNET([.T$24]+[.$BB23])+[.U$28]*[.$Z$5]*MAGNET([.U$24]+[.$BB23])+[.V$28]*[.$Z$5]*MAGNET([.V$24]+[.$BB23])+[.W$28]*[.$Z$5]*MAGNET([.W$24]+[.$BB23])+[.X$28]*[.$Z$5]*MAGNET([.X$24]+[.$BB23])+[.Y$28]*[.$Z$5]*MAGNET([.Y$24]+[.$BB23])+[.Z$28]*[.$Z$5]*MAGNET([.Z$24]+[.$BB23])+[.AA$28]*[.$Z$5]*MAGNET([.AA$24]+[.$BB23])+[.AB$28]*[.$Z$5]*MAGNET([.AB$24]+[.$BB23])+[.AC$28]*[.$Z$5]*MAGNET([.AC$24]+[.$BB23])+[.AD$28]*[.$Z$5]*MAGNET([.AD$24]+[.$BB23])+[.AE$28]*[.$Z$5]*MAGNET([.AE$24]+[.$BB23])+[.AF$28]*[.$Z$5]*MAGNET([.AF$24]+[.$BB23])+[.AG$28]*[.$Z$5]*MAGNET([.AG$24]+[.$BB23])+[.D$28]*[.$Z$5]*MAGNET([.D$24]+[.$BB23])+[.AH$28]*[.$Z$5]*MAGNET([.AH$24]+[.BB23]) +[.AI$28]*[.$Z$5]*MAGNET([.AI$24]+[.BB23]) +[.AJ$28]*[.$Z$5]*MAGNET([.AJ$24]+[.BB23]) +[.AK$28]*[.$Z$5]*MAGNET([.AK$24]+[.BB23]) +[.AL$28]*[.$Z$5]*MAGNET([.AL$24]+[.BB23]) +[.AM$28]*[.$Z$5]*MAGNET([.AM$24]+[.BB23]) +[.AN$28]*[.$Z$5]*MAGNET([.AN$24]+[.BB23]) +[.AO$28]*[.$Z$5]*MAGNET([.AO$24]+[.BB23]) +[.AP$28]*[.$Z$5]*MAGNET([.AP$24]+[.$BB23])&#10;+[.AQ$28]*[.$Z$5]*MAGNET([.AQ$24]+[.$BB23])&#10;+[.AR$28]*[.$Z$5]*MAGNET([.AR$24]+[.$BB23])&#10;+[.AS$28]*[.$Z$5]*MAGNET([.AS$24]+[.$BB23])&#10;+[.AT$28]*[.$Z$5]*MAGNET([.AT$24]+[.$BB23])&#10;+[.AU$28]*[.$Z$5]*MAGNET([.AU$24]+[.$BB23])&#10;+[.AV$28]*[.$Z$5]*MAGNET([.AV$24]+[.$BB23])&#10;+[.AW$28]*[.$Z$5]*MAGNET([.AW$24]+[.$BB23])&#10;+[.AX$28]*[.$Z$5]*MAGNET([.AX$24]+[.$BB23])&#10;+[.AY$28]*[.$Z$5]*MAGNET([.AY$24]+[.$BB23]) +RAND()*[.$BF$13]" office:value-type="float" office:value="-17.7465877354858" calcext:value-type="float">
            <text:p>-17.7465877354858</text:p>
          </table:table-cell>
          <table:table-cell table:style-name="ce71" table:formula="of:=[.E$29]*[.$Z$5]*MAGNET([.E$24]+[.$BB23])+[.F$29]*[.$Z$5]*MAGNET([.F$24]+[.$BB23])+[.G$29]*[.$Z$5]*MAGNET([.G$24]+[.$BB23])+[.H$29]*[.$Z$5]*MAGNET([.H$24]+[.$BB23])+[.I$29]*[.$Z$5]*MAGNET([.I$24]+[.$BB23])+[.J$29]*[.$Z$5]*MAGNET([.J$24]+[.$BB23])+[.K$29]*[.$Z$5]*MAGNET([.K$24]+[.$BB23])+[.L$29]*[.$Z$5]*MAGNET([.L$24]+[.$BB23])+[.M$29]*[.$Z$5]*MAGNET([.M$24]+[.$BB23])+[.N$29]*[.$Z$5]*MAGNET([.N$24]+[.$BB23])+[.O$29]*[.$Z$5]*MAGNET([.O$24]+[.$BB23])+[.P$29]*[.$Z$5]*MAGNET([.P$24]+[.$BB23])+[.Q$29]*[.$Z$5]*MAGNET([.Q$24]+[.$BB23])+[.R$29]*[.$Z$5]*MAGNET([.R$24]+[.$BB23])+[.S$29]*[.$Z$5]*MAGNET([.S$24]+[.$BB23])+[.T$29]*[.$Z$5]*MAGNET([.T$24]+[.$BB23])+[.U$29]*[.$Z$5]*MAGNET([.U$24]+[.$BB23])+[.V$29]*[.$Z$5]*MAGNET([.V$24]+[.$BB23])+[.W$29]*[.$Z$5]*MAGNET([.W$24]+[.$BB23])+[.X$29]*[.$Z$5]*MAGNET([.X$24]+[.$BB23])+[.Y$29]*[.$Z$5]*MAGNET([.Y$24]+[.$BB23])+[.Z$29]*[.$Z$5]*MAGNET([.Z$24]+[.$BB23])+[.AA$29]*[.$Z$5]*MAGNET([.AA$24]+[.$BB23])+[.AB$29]*[.$Z$5]*MAGNET([.AB$24]+[.$BB23])+[.AC$29]*[.$Z$5]*MAGNET([.AC$24]+[.$BB23])+[.AD$29]*[.$Z$5]*MAGNET([.AD$24]+[.$BB23])+[.AE$29]*[.$Z$5]*MAGNET([.AE$24]+[.$BB23])+[.AF$29]*[.$Z$5]*MAGNET([.AF$24]+[.$BB23])+[.AG$29]*[.$Z$5]*MAGNET([.AG$24]+[.$BB23])+[.D$29]*[.$Z$5]*MAGNET([.D$24]+[.$BB23])+[.AH$29]*[.$Z$5]*MAGNET([.AH$24]+[.BB23]) +[.AI$29]*[.$Z$5]*MAGNET([.AI$24]+[.BB23]) +[.AJ$29]*[.$Z$5]*MAGNET([.AJ$24]+[.BB23]) +[.AK$29]*[.$Z$5]*MAGNET([.AK$24]+[.BB23]) +[.AL$29]*[.$Z$5]*MAGNET([.AL$24]+[.BB23]) +[.AM$29]*[.$Z$5]*MAGNET([.AM$24]+[.BB23]) +[.AN$29]*[.$Z$5]*MAGNET([.AN$24]+[.BB23]) +[.AO$29]*[.$Z$5]*MAGNET([.AO$24]+[.BB23]) +[.AP$29]*[.$Z$5]*MAGNET([.AP$24]+[.$BB23])&#10;+[.AQ$29]*[.$Z$5]*MAGNET([.AQ$24]+[.$BB23])&#10;+[.AR$29]*[.$Z$5]*MAGNET([.AR$24]+[.$BB23])&#10;+[.AS$29]*[.$Z$5]*MAGNET([.AS$24]+[.$BB23])&#10;+[.AT$29]*[.$Z$5]*MAGNET([.AT$24]+[.$BB23])&#10;+[.AU$29]*[.$Z$5]*MAGNET([.AU$24]+[.$BB23])&#10;+[.AV$29]*[.$Z$5]*MAGNET([.AV$24]+[.$BB23])&#10;+[.AW$29]*[.$Z$5]*MAGNET([.AW$24]+[.$BB23])&#10;+[.AX$29]*[.$Z$5]*MAGNET([.AX$24]+[.$BB23])&#10;+[.AY$29]*[.$Z$5]*MAGNET([.AY$24]+[.$BB23]) +RAND()*[.$BG$13]" office:value-type="float" office:value="46.8648776488597" calcext:value-type="float">
            <text:p>46.8648776488597</text:p>
          </table:table-cell>
          <table:table-cell table:style-name="ce71" table:formula="of:=[.E$30]*[.$Z$5]*MAGNET([.E$24]+[.$BB23])+[.F$30]*[.$Z$5]*MAGNET([.F$24]+[.$BB23])+[.G$30]*[.$Z$5]*MAGNET([.G$24]+[.$BB23])+[.H$30]*[.$Z$5]*MAGNET([.H$24]+[.$BB23])+[.I$30]*[.$Z$5]*MAGNET([.I$24]+[.$BB23])+[.J$30]*[.$Z$5]*MAGNET([.J$24]+[.$BB23])+[.K$30]*[.$Z$5]*MAGNET([.K$24]+[.$BB23])+[.L$30]*[.$Z$5]*MAGNET([.L$24]+[.$BB23])+[.M$30]*[.$Z$5]*MAGNET([.M$24]+[.$BB23])+[.N$30]*[.$Z$5]*MAGNET([.N$24]+[.$BB23])+[.O$30]*[.$Z$5]*MAGNET([.O$24]+[.$BB23])+[.P$30]*[.$Z$5]*MAGNET([.P$24]+[.$BB23])+[.Q$30]*[.$Z$5]*MAGNET([.Q$24]+[.$BB23])+[.R$30]*[.$Z$5]*MAGNET([.R$24]+[.$BB23])+[.S$30]*[.$Z$5]*MAGNET([.S$24]+[.$BB23])+[.T$30]*[.$Z$5]*MAGNET([.T$24]+[.$BB23])+[.U$30]*[.$Z$5]*MAGNET([.U$24]+[.$BB23])+[.V$30]*[.$Z$5]*MAGNET([.V$24]+[.$BB23])+[.W$30]*[.$Z$5]*MAGNET([.W$24]+[.$BB23])+[.X$30]*[.$Z$5]*MAGNET([.X$24]+[.$BB23])+[.Y$30]*[.$Z$5]*MAGNET([.Y$24]+[.$BB23])+[.Z$30]*[.$Z$5]*MAGNET([.Z$24]+[.$BB23])+[.AA$30]*[.$Z$5]*MAGNET([.AA$24]+[.$BB23])+[.AB$30]*[.$Z$5]*MAGNET([.AB$24]+[.$BB23])+[.AC$30]*[.$Z$5]*MAGNET([.AC$24]+[.$BB23])+[.AD$30]*[.$Z$5]*MAGNET([.AD$24]+[.$BB23])+[.AE$30]*[.$Z$5]*MAGNET([.AE$24]+[.$BB23])+[.AF$30]*[.$Z$5]*MAGNET([.AF$24]+[.$BB23])+[.AG$30]*[.$Z$5]*MAGNET([.AG$24]+[.$BB23])+[.D$30]*[.$Z$5]*MAGNET([.D$24]+[.$BB23])+[.AH$30]*[.$Z$5]*MAGNET([.AH$24]+[.BB23]) +[.AI$30]*[.$Z$5]*MAGNET([.AI$24]+[.BB23]) +[.AJ$30]*[.$Z$5]*MAGNET([.AJ$24]+[.BB23]) +[.AK$30]*[.$Z$5]*MAGNET([.AK$24]+[.BB23]) +[.AL$30]*[.$Z$5]*MAGNET([.AL$24]+[.BB23]) +[.AM$30]*[.$Z$5]*MAGNET([.AM$24]+[.BB23]) +[.AN$30]*[.$Z$5]*MAGNET([.AN$24]+[.BB23]) +[.AO$30]*[.$Z$5]*MAGNET([.AO$24]+[.BB23]) +[.AP$30]*[.$Z$5]*MAGNET([.AP$24]+[.$BB23])&#10;+[.AQ$30]*[.$Z$5]*MAGNET([.AQ$24]+[.$BB23])&#10;+[.AR$30]*[.$Z$5]*MAGNET([.AR$24]+[.$BB23])&#10;+[.AS$30]*[.$Z$5]*MAGNET([.AS$24]+[.$BB23])&#10;+[.AT$30]*[.$Z$5]*MAGNET([.AT$24]+[.$BB23])&#10;+[.AU$30]*[.$Z$5]*MAGNET([.AU$24]+[.$BB23])&#10;+[.AV$30]*[.$Z$5]*MAGNET([.AV$24]+[.$BB23])&#10;+[.AW$30]*[.$Z$5]*MAGNET([.AW$24]+[.$BB23])&#10;+[.AX$30]*[.$Z$5]*MAGNET([.AX$24]+[.$BB23])&#10;+[.AY$30]*[.$Z$5]*MAGNET([.AY$24]+[.$BB23]) +RAND()*[.$BH$13]" office:value-type="float" office:value="0" calcext:value-type="float">
            <text:p>0</text:p>
          </table:table-cell>
          <table:table-cell table:style-name="ce71" table:formula="of:=[.E$31]*[.$Z$5]*MAGNET([.E$24]+[.$BB23])+[.F$31]*[.$Z$5]*MAGNET([.F$24]+[.$BB23])+[.G$31]*[.$Z$5]*MAGNET([.G$24]+[.$BB23])+[.H$31]*[.$Z$5]*MAGNET([.H$24]+[.$BB23])+[.I$31]*[.$Z$5]*MAGNET([.I$24]+[.$BB23])+[.J$31]*[.$Z$5]*MAGNET([.J$24]+[.$BB23])+[.K$31]*[.$Z$5]*MAGNET([.K$24]+[.$BB23])+[.L$31]*[.$Z$5]*MAGNET([.L$24]+[.$BB23])+[.M$31]*[.$Z$5]*MAGNET([.M$24]+[.$BB23])+[.N$31]*[.$Z$5]*MAGNET([.N$24]+[.$BB23])+[.O$31]*[.$Z$5]*MAGNET([.O$24]+[.$BB23])+[.P$31]*[.$Z$5]*MAGNET([.P$24]+[.$BB23])+[.Q$31]*[.$Z$5]*MAGNET([.Q$24]+[.$BB23])+[.R$31]*[.$Z$5]*MAGNET([.R$24]+[.$BB23])+[.S$31]*[.$Z$5]*MAGNET([.S$24]+[.$BB23])+[.T$31]*[.$Z$5]*MAGNET([.T$24]+[.$BB23])+[.U$31]*[.$Z$5]*MAGNET([.U$24]+[.$BB23])+[.V$31]*[.$Z$5]*MAGNET([.V$24]+[.$BB23])+[.W$31]*[.$Z$5]*MAGNET([.W$24]+[.$BB23])+[.X$31]*[.$Z$5]*MAGNET([.X$24]+[.$BB23])+[.Y$31]*[.$Z$5]*MAGNET([.Y$24]+[.$BB23])+[.Z$31]*[.$Z$5]*MAGNET([.Z$24]+[.$BB23])+[.AA$31]*[.$Z$5]*MAGNET([.AA$24]+[.$BB23])+[.AB$31]*[.$Z$5]*MAGNET([.AB$24]+[.$BB23])+[.AC$31]*[.$Z$5]*MAGNET([.AC$24]+[.$BB23])+[.AD$31]*[.$Z$5]*MAGNET([.AD$24]+[.$BB23])+[.AE$31]*[.$Z$5]*MAGNET([.AE$24]+[.$BB23])+[.AF$31]*[.$Z$5]*MAGNET([.AF$24]+[.$BB23])+[.AG$31]*[.$Z$5]*MAGNET([.AG$24]+[.$BB23])+[.D$31]*[.$Z$5]*MAGNET([.D$24]+[.$BB23])+[.AH$31]*[.$Z$5]*MAGNET([.AH$24]+[.BB23]) +[.AI$31]*[.$Z$5]*MAGNET([.AI$24]+[.BB23]) +[.AJ$31]*[.$Z$5]*MAGNET([.AJ$24]+[.BB23]) +[.AK$31]*[.$Z$5]*MAGNET([.AK$24]+[.BB23]) +[.AL$31]*[.$Z$5]*MAGNET([.AL$24]+[.BB23]) +[.AM$31]*[.$Z$5]*MAGNET([.AM$24]+[.BB23]) +[.AN$31]*[.$Z$5]*MAGNET([.AN$24]+[.BB23]) +[.AO$31]*[.$Z$5]*MAGNET([.AO$24]+[.BB23]) +[.AP$31]*[.$Z$5]*MAGNET([.AP$24]+[.$BB23])&#10;+[.AQ$31]*[.$Z$5]*MAGNET([.AQ$24]+[.$BB23])&#10;+[.AR$31]*[.$Z$5]*MAGNET([.AR$24]+[.$BB23])&#10;+[.AS$31]*[.$Z$5]*MAGNET([.AS$24]+[.$BB23])&#10;+[.AT$31]*[.$Z$5]*MAGNET([.AT$24]+[.$BB23])&#10;+[.AU$31]*[.$Z$5]*MAGNET([.AU$24]+[.$BB23])&#10;+[.AV$31]*[.$Z$5]*MAGNET([.AV$24]+[.$BB23])&#10;+[.AW$31]*[.$Z$5]*MAGNET([.AW$24]+[.$BB23])&#10;+[.AX$31]*[.$Z$5]*MAGNET([.AX$24]+[.$BB23])&#10;+[.AY$31]*[.$Z$5]*MAGNET([.AY$24]+[.$BB23]) +RAND()*[.$BI$13]" office:value-type="float" office:value="0" calcext:value-type="float">
            <text:p>0</text:p>
          </table:table-cell>
          <table:table-cell table:style-name="ce71" table:formula="of:=[.E$32]*[.$Z$5]*MAGNET([.E$24]+[.$BB23])+[.F$32]*[.$Z$5]*MAGNET([.F$24]+[.$BB23])+[.G$32]*[.$Z$5]*MAGNET([.G$24]+[.$BB23])+[.H$32]*[.$Z$5]*MAGNET([.H$24]+[.$BB23])+[.I$32]*[.$Z$5]*MAGNET([.I$24]+[.$BB23])+[.J$32]*[.$Z$5]*MAGNET([.J$24]+[.$BB23])+[.K$32]*[.$Z$5]*MAGNET([.K$24]+[.$BB23])+[.L$32]*[.$Z$5]*MAGNET([.L$24]+[.$BB23])+[.M$32]*[.$Z$5]*MAGNET([.M$24]+[.$BB23])+[.N$32]*[.$Z$5]*MAGNET([.N$24]+[.$BB23])+[.O$32]*[.$Z$5]*MAGNET([.O$24]+[.$BB23])+[.P$32]*[.$Z$5]*MAGNET([.P$24]+[.$BB23])+[.Q$32]*[.$Z$5]*MAGNET([.Q$24]+[.$BB23])+[.R$32]*[.$Z$5]*MAGNET([.R$24]+[.$BB23])+[.S$32]*[.$Z$5]*MAGNET([.S$24]+[.$BB23])+[.T$32]*[.$Z$5]*MAGNET([.T$24]+[.$BB23])+[.U$32]*[.$Z$5]*MAGNET([.U$24]+[.$BB23])+[.V$32]*[.$Z$5]*MAGNET([.V$24]+[.$BB23])+[.W$32]*[.$Z$5]*MAGNET([.W$24]+[.$BB23])+[.X$32]*[.$Z$5]*MAGNET([.X$24]+[.$BB23])+[.Y$32]*[.$Z$5]*MAGNET([.Y$24]+[.$BB23])+[.Z$32]*[.$Z$5]*MAGNET([.Z$24]+[.$BB23])+[.AA$32]*[.$Z$5]*MAGNET([.AA$24]+[.$BB23])+[.AB$32]*[.$Z$5]*MAGNET([.AB$24]+[.$BB23])+[.AC$32]*[.$Z$5]*MAGNET([.AC$24]+[.$BB23])+[.AD$32]*[.$Z$5]*MAGNET([.AD$24]+[.$BB23])+[.AE$32]*[.$Z$5]*MAGNET([.AE$24]+[.$BB23])+[.AF$32]*[.$Z$5]*MAGNET([.AF$24]+[.$BB23])+[.AG$32]*[.$Z$5]*MAGNET([.AG$24]+[.$BB23])+[.D$32]*[.$Z$5]*MAGNET([.D$24]+[.$BB23])+[.AH$32]*[.$Z$5]*MAGNET([.AH$24]+[.BB23]) +[.AI$32]*[.$Z$5]*MAGNET([.AI$24]+[.BB23]) +[.AJ$32]*[.$Z$5]*MAGNET([.AJ$24]+[.BB23]) +[.AK$32]*[.$Z$5]*MAGNET([.AK$24]+[.BB23]) +[.AL$32]*[.$Z$5]*MAGNET([.AL$24]+[.BB23]) +[.AM$32]*[.$Z$5]*MAGNET([.AM$24]+[.BB23]) +[.AN$32]*[.$Z$5]*MAGNET([.AN$24]+[.BB23]) +[.AO$32]*[.$Z$5]*MAGNET([.AO$24]+[.BB23]) +[.AP$32]*[.$Z$5]*MAGNET([.AP$24]+[.$BB23])&#10;+[.AQ$32]*[.$Z$5]*MAGNET([.AQ$24]+[.$BB23])&#10;+[.AR$32]*[.$Z$5]*MAGNET([.AR$24]+[.$BB23])&#10;+[.AS$32]*[.$Z$5]*MAGNET([.AS$24]+[.$BB23])&#10;+[.AT$32]*[.$Z$5]*MAGNET([.AT$24]+[.$BB23])&#10;+[.AU$32]*[.$Z$5]*MAGNET([.AU$24]+[.$BB23])&#10;+[.AV$32]*[.$Z$5]*MAGNET([.AV$24]+[.$BB23])&#10;+[.AW$32]*[.$Z$5]*MAGNET([.AW$24]+[.$BB23])&#10;+[.AX$32]*[.$Z$5]*MAGNET([.AX$24]+[.$BB23])&#10;+[.AY$32]*[.$Z$5]*MAGNET([.AY$24]+[.$BB2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2" office:value-type="string" calcext:value-type="string">
            <text:p>El.Vinkel</text:p>
          </table:table-cell>
          <table:table-cell table:formula="of:=[.D13]" office:value-type="float" office:value="0.330693963535768" calcext:value-type="float">
            <text:p>0.330693963535768</text:p>
          </table:table-cell>
          <table:table-cell table:formula="of:=[.E13]" office:value-type="float" office:value="0.661387927071535" calcext:value-type="float">
            <text:p>0.661387927071535</text:p>
          </table:table-cell>
          <table:table-cell table:formula="of:=[.F13]" office:value-type="float" office:value="0.992081890607303" calcext:value-type="float">
            <text:p>0.992081890607303</text:p>
          </table:table-cell>
          <table:table-cell table:formula="of:=[.G13]" office:value-type="float" office:value="1.32277585414307" calcext:value-type="float">
            <text:p>1.32277585414307</text:p>
          </table:table-cell>
          <table:table-cell table:formula="of:=[.H13]" office:value-type="float" office:value="1.65346981767884" calcext:value-type="float">
            <text:p>1.65346981767884</text:p>
          </table:table-cell>
          <table:table-cell table:formula="of:=[.I13]" office:value-type="float" office:value="1.98416378121461" calcext:value-type="float">
            <text:p>1.98416378121461</text:p>
          </table:table-cell>
          <table:table-cell table:formula="of:=[.J13]" office:value-type="float" office:value="2.31485774475037" calcext:value-type="float">
            <text:p>2.31485774475037</text:p>
          </table:table-cell>
          <table:table-cell table:formula="of:=[.K13]" office:value-type="float" office:value="2.64555170828614" calcext:value-type="float">
            <text:p>2.64555170828614</text:p>
          </table:table-cell>
          <table:table-cell table:formula="of:=[.L13]" office:value-type="float" office:value="2.97624567182191" calcext:value-type="float">
            <text:p>2.97624567182191</text:p>
          </table:table-cell>
          <table:table-cell table:formula="of:=[.M13]" office:value-type="float" office:value="3.30693963535768" calcext:value-type="float">
            <text:p>3.30693963535768</text:p>
          </table:table-cell>
          <table:table-cell table:formula="of:=[.N13]" office:value-type="float" office:value="3.63763359889344" calcext:value-type="float">
            <text:p>3.63763359889344</text:p>
          </table:table-cell>
          <table:table-cell table:formula="of:=[.O13]" office:value-type="float" office:value="3.96832756242921" calcext:value-type="float">
            <text:p>3.96832756242921</text:p>
          </table:table-cell>
          <table:table-cell table:formula="of:=[.P13]" office:value-type="float" office:value="4.29902152596498" calcext:value-type="float">
            <text:p>4.29902152596498</text:p>
          </table:table-cell>
          <table:table-cell table:formula="of:=[.Q13]" office:value-type="float" office:value="4.62971548950075" calcext:value-type="float">
            <text:p>4.62971548950075</text:p>
          </table:table-cell>
          <table:table-cell table:formula="of:=[.R13]" office:value-type="float" office:value="4.96040945303652" calcext:value-type="float">
            <text:p>4.96040945303652</text:p>
          </table:table-cell>
          <table:table-cell table:formula="of:=[.S13]" office:value-type="float" office:value="5.29110341657228" calcext:value-type="float">
            <text:p>5.29110341657228</text:p>
          </table:table-cell>
          <table:table-cell table:formula="of:=[.T13]" office:value-type="float" office:value="5.62179738010805" calcext:value-type="float">
            <text:p>5.62179738010805</text:p>
          </table:table-cell>
          <table:table-cell table:formula="of:=[.U13]" office:value-type="float" office:value="5.95249134364382" calcext:value-type="float">
            <text:p>5.95249134364382</text:p>
          </table:table-cell>
          <table:table-cell table:formula="of:=[.V13]" office:value-type="float" office:value="0.00018530717958587" calcext:value-type="float">
            <text:p>0.00018530717958587</text:p>
          </table:table-cell>
          <table:table-cell table:formula="of:=[.W13]" office:value-type="float" office:value="0.330879270715354" calcext:value-type="float">
            <text:p>0.330879270715354</text:p>
          </table:table-cell>
          <table:table-cell table:formula="of:=[.X13]" office:value-type="float" office:value="0.661573234251122" calcext:value-type="float">
            <text:p>0.661573234251122</text:p>
          </table:table-cell>
          <table:table-cell table:formula="of:=[.Y13]" office:value-type="float" office:value="0.992267197786889" calcext:value-type="float">
            <text:p>0.992267197786889</text:p>
          </table:table-cell>
          <table:table-cell table:formula="of:=[.Z13]" office:value-type="float" office:value="1.32296116132266" calcext:value-type="float">
            <text:p>1.32296116132266</text:p>
          </table:table-cell>
          <table:table-cell table:formula="of:=[.AA13]" office:value-type="float" office:value="1.65365512485842" calcext:value-type="float">
            <text:p>1.65365512485842</text:p>
          </table:table-cell>
          <table:table-cell table:formula="of:=[.AB13]" office:value-type="float" office:value="1.98434908839419" calcext:value-type="float">
            <text:p>1.98434908839419</text:p>
          </table:table-cell>
          <table:table-cell table:formula="of:=[.AC13]" office:value-type="float" office:value="2.31504305192996" calcext:value-type="float">
            <text:p>2.31504305192996</text:p>
          </table:table-cell>
          <table:table-cell table:formula="of:=[.AD13]" office:value-type="float" office:value="2.64573701546573" calcext:value-type="float">
            <text:p>2.64573701546573</text:p>
          </table:table-cell>
          <table:table-cell table:formula="of:=[.AE13]" office:value-type="float" office:value="2.97643097900149" calcext:value-type="float">
            <text:p>2.97643097900149</text:p>
          </table:table-cell>
          <table:table-cell table:formula="of:=[.AF13]" office:value-type="float" office:value="3.30712494253726" calcext:value-type="float">
            <text:p>3.30712494253726</text:p>
          </table:table-cell>
          <table:table-cell table:formula="of:=[.AG13]" office:value-type="float" office:value="3.63781890607303" calcext:value-type="float">
            <text:p>3.63781890607303</text:p>
          </table:table-cell>
          <table:table-cell table:formula="of:=[.AH13]" office:value-type="float" office:value="3.9685128696088" calcext:value-type="float">
            <text:p>3.9685128696088</text:p>
          </table:table-cell>
          <table:table-cell table:formula="of:=[.AI13]" office:value-type="float" office:value="4.29920683314457" calcext:value-type="float">
            <text:p>4.29920683314457</text:p>
          </table:table-cell>
          <table:table-cell table:formula="of:=[.AJ13]" office:value-type="float" office:value="4.62990079668033" calcext:value-type="float">
            <text:p>4.62990079668033</text:p>
          </table:table-cell>
          <table:table-cell table:formula="of:=[.AK13]" office:value-type="float" office:value="4.9605947602161" calcext:value-type="float">
            <text:p>4.9605947602161</text:p>
          </table:table-cell>
          <table:table-cell table:formula="of:=[.AL13]" office:value-type="float" office:value="5.29128872375187" calcext:value-type="float">
            <text:p>5.29128872375187</text:p>
          </table:table-cell>
          <table:table-cell table:formula="of:=[.AM13]" office:value-type="float" office:value="5.62198268728764" calcext:value-type="float">
            <text:p>5.62198268728764</text:p>
          </table:table-cell>
          <table:table-cell table:formula="of:=[.AN13]" office:value-type="float" office:value="5.95267665082341" calcext:value-type="float">
            <text:p>5.95267665082341</text:p>
          </table:table-cell>
          <table:table-cell table:formula="of:=[.AO13]" office:value-type="float" office:value="0.000370614359171739" calcext:value-type="float">
            <text:p>0.000370614359171739</text:p>
          </table:table-cell>
          <table:table-cell table:formula="of:=[.AP13]" office:value-type="float" office:value="0.33106457789494" calcext:value-type="float">
            <text:p>0.33106457789494</text:p>
          </table:table-cell>
          <table:table-cell table:formula="of:=[.AQ13]" office:value-type="float" office:value="0.661758541430707" calcext:value-type="float">
            <text:p>0.661758541430707</text:p>
          </table:table-cell>
          <table:table-cell table:formula="of:=[.AR13]" office:value-type="float" office:value="0.992452504966476" calcext:value-type="float">
            <text:p>0.992452504966476</text:p>
          </table:table-cell>
          <table:table-cell table:formula="of:=[.AS13]" office:value-type="float" office:value="1.32314646850224" calcext:value-type="float">
            <text:p>1.32314646850224</text:p>
          </table:table-cell>
          <table:table-cell table:formula="of:=[.AT13]" office:value-type="float" office:value="1.65384043203801" calcext:value-type="float">
            <text:p>1.65384043203801</text:p>
          </table:table-cell>
          <table:table-cell table:formula="of:=[.AU13]" office:value-type="float" office:value="1.98453439557378" calcext:value-type="float">
            <text:p>1.98453439557378</text:p>
          </table:table-cell>
          <table:table-cell table:formula="of:=[.AV13]" office:value-type="float" office:value="2.31522835910955" calcext:value-type="float">
            <text:p>2.31522835910955</text:p>
          </table:table-cell>
          <table:table-cell table:formula="of:=[.AW13]" office:value-type="float" office:value="2.64592232264531" calcext:value-type="float">
            <text:p>2.64592232264531</text:p>
          </table:table-cell>
          <table:table-cell table:formula="of:=[.AX13]" office:value-type="float" office:value="2.97661628618108" calcext:value-type="float">
            <text:p>2.97661628618108</text:p>
          </table:table-cell>
          <table:table-cell table:formula="of:=[.AY13]" office:value-type="float" office:value="3.30731024971685" calcext:value-type="float">
            <text:p>3.30731024971685</text:p>
          </table:table-cell>
          <table:table-cell/>
          <table:table-cell table:formula="of:=[.BA23]+0.002" office:value-type="float" office:value="0.018" calcext:value-type="float">
            <text:p>0.018</text:p>
          </table:table-cell>
          <table:table-cell table:formula="of:=[.BA24]*[.$D$6]" office:value-type="float" office:value="0.904778684233861" calcext:value-type="float">
            <text:p>0.905</text:p>
          </table:table-cell>
          <table:table-cell table:formula="of:=[.D$25]*[.$Z$5]*MAGNET([.D$24]+[.BB24])+[.E$25]*[.$Z$5]*MAGNET([.E$24]+[.BB24])+[.F$25]*[.$Z$5]*MAGNET([.F$24]+[.BB24])+[.G$25]*[.$Z$5]*MAGNET([.G$24]+[.BB24])+[.H$25]*[.$Z$5]*MAGNET([.H$24]+[.BB24])+[.I$25]*[.$Z$5]*MAGNET([.I$24]+[.BB24])+[.J$25]*[.$Z$5]*MAGNET([.J$24]+[.BB24])+[.K$25]*[.$Z$5]*MAGNET([.K$24]+[.BB24])+[.L$25]*[.$Z$5]*MAGNET([.L$24]+[.BB24])+[.M$25]*[.$Z$5]*MAGNET([.M$24]+[.BB24])+[.N$25]*[.$Z$5]*MAGNET([.N$24]+[.BB24])+[.O$25]*[.$Z$5]*MAGNET([.O$24]+[.BB24])+[.P$25]*[.$Z$5]*MAGNET([.P$24]+[.BB24])+[.Q$25]*[.$Z$5]*MAGNET([.Q$24]+[.BB24])+[.R$25]*[.$Z$5]*MAGNET([.R$24]+[.BB24])+[.S$25]*[.$Z$5]*MAGNET([.S$24]+[.BB24])+[.T$25]*[.$Z$5]*MAGNET([.T$24]+[.BB24])+[.U$25]*[.$Z$5]*MAGNET([.U$24]+[.BB24])+[.V$25]*[.$Z$5]*MAGNET([.V$24]+[.BB24])+[.W$25]*[.$Z$5]*MAGNET([.W$24]+[.BB24])+[.X$25]*[.$Z$5]*MAGNET([.X$24]+[.BB24])+[.Y$25]*[.$Z$5]*MAGNET([.Y$24]+[.BB24])+[.Z$25]*[.$Z$5]*MAGNET([.Z$24]+[.BB24])+[.AA$25]*[.$Z$5]*MAGNET([.AA$24]+[.BB24])+[.AB$25]*[.$Z$5]*MAGNET([.AB$24]+[.BB24])+[.AC$25]*[.$Z$5]*MAGNET([.AC$24]+[.BB24])+[.AD$25]*[.$Z$5]*MAGNET([.AD$24]+[.BB24])+[.AE$25]*[.$Z$5]*MAGNET([.AE$24]+[.BB24])+[.AF$25]*[.$Z$5]*MAGNET([.AF$24]+[.BB24])+[.AG$25]*[.$Z$5]*MAGNET([.AG$24]+[.BB24])+[.AH$25]*[.$Z$5]*MAGNET([.AH$24]+[.BB24]) +[.AI$25]*[.$Z$5]*MAGNET([.AI$24]+[.BB24]) +[.AJ$25]*[.$Z$5]*MAGNET([.AJ$24]+[.BB24]) +[.AK$25]*[.$Z$5]*MAGNET([.AK$24]+[.BB24]) +[.AL$25]*[.$Z$5]*MAGNET([.AL$24]+[.BB24]) +[.AM$25]*[.$Z$5]*MAGNET([.AM$24]+[.BB24]) +[.AN$25]*[.$Z$5]*MAGNET([.AN$24]+[.BB24]) +[.AO$25]*[.$Z$5]*MAGNET([.AO$24]+[.BB24])+RAND()*[.$BC$13]+[.AP$25]*[.$Z$5]*MAGNET([.AP$24]+[.BB24])&#10;+[.AQ$25]*[.$Z$5]*MAGNET([.AQ$24]+[.BB24])&#10;+[.AR$25]*[.$Z$5]*MAGNET([.AR$24]+[.BB24])&#10;+[.AS$25]*[.$Z$5]*MAGNET([.AS$24]+[.BB24])&#10;+[.AT$25]*[.$Z$5]*MAGNET([.AT$24]+[.BB24])&#10;+[.AU$25]*[.$Z$5]*MAGNET([.AU$24]+[.BB24])&#10;+[.AV$25]*[.$Z$5]*MAGNET([.AV$24]+[.BB24])&#10;+[.AW$25]*[.$Z$5]*MAGNET([.AW$24]+[.BB24])&#10;+[.AX$25]*[.$Z$5]*MAGNET([.AX$24]+[.BB24])&#10;+[.AY$25]*[.$Z$5]*MAGNET([.AY$24]+[.BB24])" office:value-type="float" office:value="56.0011144564276" calcext:value-type="float">
            <text:p>56.00</text:p>
          </table:table-cell>
          <table:table-cell table:style-name="ce70" table:formula="of:=[.E$26]*[.$Z$5]*MAGNET([.E$24]+[.$BB24])+[.F$26]*[.$Z$5]*MAGNET([.F$24]+[.$BB24])+[.G$26]*[.$Z$5]*MAGNET([.G$24]+[.$BB24])+[.H$26]*[.$Z$5]*MAGNET([.H$24]+[.$BB24])+[.I$26]*[.$Z$5]*MAGNET([.I$24]+[.$BB24])+[.J$26]*[.$Z$5]*MAGNET([.J$24]+[.$BB24])+[.K$26]*[.$Z$5]*MAGNET([.K$24]+[.$BB24])+[.L$26]*[.$Z$5]*MAGNET([.L$24]+[.$BB24])+[.M$26]*[.$Z$5]*MAGNET([.M$24]+[.$BB24])+[.N$26]*[.$Z$5]*MAGNET([.N$24]+[.$BB24])+[.O$26]*[.$Z$5]*MAGNET([.O$24]+[.$BB24])+[.P$26]*[.$Z$5]*MAGNET([.P$24]+[.$BB24])+[.Q$26]*[.$Z$5]*MAGNET([.Q$24]+[.$BB24])+[.R$26]*[.$Z$5]*MAGNET([.R$24]+[.$BB24])+[.S$26]*[.$Z$5]*MAGNET([.S$24]+[.$BB24])+[.T$26]*[.$Z$5]*MAGNET([.T$24]+[.$BB24])+[.U$26]*[.$Z$5]*MAGNET([.U$24]+[.$BB24])+[.V$26]*[.$Z$5]*MAGNET([.V$24]+[.$BB24])+[.W$26]*[.$Z$5]*MAGNET([.W$24]+[.$BB24])+[.X$26]*[.$Z$5]*MAGNET([.X$24]+[.$BB24])+[.Y$26]*[.$Z$5]*MAGNET([.Y$24]+[.$BB24])+[.Z$26]*[.$Z$5]*MAGNET([.Z$24]+[.$BB24])+[.AA$26]*[.$Z$5]*MAGNET([.AA$24]+[.$BB24])+[.AB$26]*[.$Z$5]*MAGNET([.AB$24]+[.$BB24])+[.AC$26]*[.$Z$5]*MAGNET([.AC$24]+[.$BB24])+[.AD$26]*[.$Z$5]*MAGNET([.AD$24]+[.$BB24])+[.AE$26]*[.$Z$5]*MAGNET([.AE$24]+[.$BB24])+[.AF$26]*[.$Z$5]*MAGNET([.AF$24]+[.$BB24])+[.AG$26]*[.$Z$5]*MAGNET([.AG$24]+[.$BB24])+[.D$26]*[.$Z$5]*MAGNET([.D$24]+[.$BB24])+[.AH$26]*[.$Z$5]*MAGNET([.AH$24]+[.BB24]) +[.AI$26]*[.$Z$5]*MAGNET([.AI$24]+[.BB24]) +[.AJ$26]*[.$Z$5]*MAGNET([.AJ$24]+[.BB24]) +[.AK$26]*[.$Z$5]*MAGNET([.AK$24]+[.BB24]) +[.AL$26]*[.$Z$5]*MAGNET([.AL$24]+[.BB24]) +[.AM$26]*[.$Z$5]*MAGNET([.AM$24]+[.BB24]) +[.AN$26]*[.$Z$5]*MAGNET([.AN$24]+[.BB24]) +[.AO$26]*[.$Z$5]*MAGNET([.AO$24]+[.BB24]) +[.AP$26]*[.$Z$5]*MAGNET([.AP$24]+[.$BB24])&#10;+[.AQ$26]*[.$Z$5]*MAGNET([.AQ$24]+[.$BB24])&#10;+[.AR$26]*[.$Z$5]*MAGNET([.AR$24]+[.$BB24])&#10;+[.AS$26]*[.$Z$5]*MAGNET([.AS$24]+[.$BB24])&#10;+[.AT$26]*[.$Z$5]*MAGNET([.AT$24]+[.$BB24])&#10;+[.AU$26]*[.$Z$5]*MAGNET([.AU$24]+[.$BB24])&#10;+[.AV$26]*[.$Z$5]*MAGNET([.AV$24]+[.$BB24])&#10;+[.AW$26]*[.$Z$5]*MAGNET([.AW$24]+[.$BB24])&#10;+[.AX$26]*[.$Z$5]*MAGNET([.AX$24]+[.$BB24])&#10;+[.AY$26]*[.$Z$5]*MAGNET([.AY$24]+[.$BB24]) +RAND()*[.$BD$13]" office:value-type="float" office:value="44.6760569668398" calcext:value-type="float">
            <text:p>44.68</text:p>
          </table:table-cell>
          <table:table-cell table:style-name="ce71" table:formula="of:=[.E$27]*[.$Z$5]*MAGNET([.E$24]+[.$BB24])+[.F$27]*[.$Z$5]*MAGNET([.F$24]+[.$BB24])+[.G$27]*[.$Z$5]*MAGNET([.G$24]+[.$BB24])+[.H$27]*[.$Z$5]*MAGNET([.H$24]+[.$BB24])+[.I$27]*[.$Z$5]*MAGNET([.I$24]+[.$BB24])+[.J$27]*[.$Z$5]*MAGNET([.J$24]+[.$BB24])+[.K$27]*[.$Z$5]*MAGNET([.K$24]+[.$BB24])+[.L$27]*[.$Z$5]*MAGNET([.L$24]+[.$BB24])+[.M$27]*[.$Z$5]*MAGNET([.M$24]+[.$BB24])+[.N$27]*[.$Z$5]*MAGNET([.N$24]+[.$BB24])+[.O$27]*[.$Z$5]*MAGNET([.O$24]+[.$BB24])+[.P$27]*[.$Z$5]*MAGNET([.P$24]+[.$BB24])+[.Q$27]*[.$Z$5]*MAGNET([.Q$24]+[.$BB24])+[.R$27]*[.$Z$5]*MAGNET([.R$24]+[.$BB24])+[.S$27]*[.$Z$5]*MAGNET([.S$24]+[.$BB24])+[.T$27]*[.$Z$5]*MAGNET([.T$24]+[.$BB24])+[.U$27]*[.$Z$5]*MAGNET([.U$24]+[.$BB24])+[.V$27]*[.$Z$5]*MAGNET([.V$24]+[.$BB24])+[.W$27]*[.$Z$5]*MAGNET([.W$24]+[.$BB24])+[.X$27]*[.$Z$5]*MAGNET([.X$24]+[.$BB24])+[.Y$27]*[.$Z$5]*MAGNET([.Y$24]+[.$BB24])+[.Z$27]*[.$Z$5]*MAGNET([.Z$24]+[.$BB24])+[.AA$27]*[.$Z$5]*MAGNET([.AA$24]+[.$BB24])+[.AB$27]*[.$Z$5]*MAGNET([.AB$24]+[.$BB24])+[.AC$27]*[.$Z$5]*MAGNET([.AC$24]+[.$BB24])+[.AD$27]*[.$Z$5]*MAGNET([.AD$24]+[.$BB24])+[.AE$27]*[.$Z$5]*MAGNET([.AE$24]+[.$BB24])+[.AF$27]*[.$Z$5]*MAGNET([.AF$24]+[.$BB24])+[.AG$27]*[.$Z$5]*MAGNET([.AG$24]+[.$BB24])+[.D$27]*[.$Z$5]*MAGNET([.D$24]+[.$BB24])+[.AH$27]*[.$Z$5]*MAGNET([.AH$24]+[.BB24]) +[.AI$27]*[.$Z$5]*MAGNET([.AI$24]+[.BB24]) +[.AJ$27]*[.$Z$5]*MAGNET([.AJ$24]+[.BB24]) +[.AK$27]*[.$Z$5]*MAGNET([.AK$24]+[.BB24]) +[.AL$27]*[.$Z$5]*MAGNET([.AL$24]+[.BB24]) +[.AM$27]*[.$Z$5]*MAGNET([.AM$24]+[.BB24]) +[.AN$27]*[.$Z$5]*MAGNET([.AN$24]+[.BB24]) +[.AO$27]*[.$Z$5]*MAGNET([.AO$24]+[.BB24]) +[.AP$27]*[.$Z$5]*MAGNET([.AP$24]+[.$BB24])&#10;+[.AQ$27]*[.$Z$5]*MAGNET([.AQ$24]+[.$BB24])&#10;+[.AR$27]*[.$Z$5]*MAGNET([.AR$24]+[.$BB24])&#10;+[.AS$27]*[.$Z$5]*MAGNET([.AS$24]+[.$BB24])&#10;+[.AT$27]*[.$Z$5]*MAGNET([.AT$24]+[.$BB24])&#10;+[.AU$27]*[.$Z$5]*MAGNET([.AU$24]+[.$BB24])&#10;+[.AV$27]*[.$Z$5]*MAGNET([.AV$24]+[.$BB24])&#10;+[.AW$27]*[.$Z$5]*MAGNET([.AW$24]+[.$BB24])&#10;+[.AX$27]*[.$Z$5]*MAGNET([.AX$24]+[.$BB24])&#10;+[.AY$27]*[.$Z$5]*MAGNET([.AY$24]+[.$BB24]) +RAND()*[.$BE$13]" office:value-type="float" office:value="-126.690715810922" calcext:value-type="float">
            <text:p>-126.690715810922</text:p>
          </table:table-cell>
          <table:table-cell table:style-name="ce71" table:formula="of:=[.E$28]*[.$Z$5]*MAGNET([.E$24]+[.$BB24])+[.F$28]*[.$Z$5]*MAGNET([.F$24]+[.$BB24])+[.G$28]*[.$Z$5]*MAGNET([.G$24]+[.$BB24])+[.H$28]*[.$Z$5]*MAGNET([.H$24]+[.$BB24])+[.I$28]*[.$Z$5]*MAGNET([.I$24]+[.$BB24])+[.J$28]*[.$Z$5]*MAGNET([.J$24]+[.$BB24])+[.K$28]*[.$Z$5]*MAGNET([.K$24]+[.$BB24])+[.L$28]*[.$Z$5]*MAGNET([.L$24]+[.$BB24])+[.M$28]*[.$Z$5]*MAGNET([.M$24]+[.$BB24])+[.N$28]*[.$Z$5]*MAGNET([.N$24]+[.$BB24])+[.O$28]*[.$Z$5]*MAGNET([.O$24]+[.$BB24])+[.P$28]*[.$Z$5]*MAGNET([.P$24]+[.$BB24])+[.Q$28]*[.$Z$5]*MAGNET([.Q$24]+[.$BB24])+[.R$28]*[.$Z$5]*MAGNET([.R$24]+[.$BB24])+[.S$28]*[.$Z$5]*MAGNET([.S$24]+[.$BB24])+[.T$28]*[.$Z$5]*MAGNET([.T$24]+[.$BB24])+[.U$28]*[.$Z$5]*MAGNET([.U$24]+[.$BB24])+[.V$28]*[.$Z$5]*MAGNET([.V$24]+[.$BB24])+[.W$28]*[.$Z$5]*MAGNET([.W$24]+[.$BB24])+[.X$28]*[.$Z$5]*MAGNET([.X$24]+[.$BB24])+[.Y$28]*[.$Z$5]*MAGNET([.Y$24]+[.$BB24])+[.Z$28]*[.$Z$5]*MAGNET([.Z$24]+[.$BB24])+[.AA$28]*[.$Z$5]*MAGNET([.AA$24]+[.$BB24])+[.AB$28]*[.$Z$5]*MAGNET([.AB$24]+[.$BB24])+[.AC$28]*[.$Z$5]*MAGNET([.AC$24]+[.$BB24])+[.AD$28]*[.$Z$5]*MAGNET([.AD$24]+[.$BB24])+[.AE$28]*[.$Z$5]*MAGNET([.AE$24]+[.$BB24])+[.AF$28]*[.$Z$5]*MAGNET([.AF$24]+[.$BB24])+[.AG$28]*[.$Z$5]*MAGNET([.AG$24]+[.$BB24])+[.D$28]*[.$Z$5]*MAGNET([.D$24]+[.$BB24])+[.AH$28]*[.$Z$5]*MAGNET([.AH$24]+[.BB24]) +[.AI$28]*[.$Z$5]*MAGNET([.AI$24]+[.BB24]) +[.AJ$28]*[.$Z$5]*MAGNET([.AJ$24]+[.BB24]) +[.AK$28]*[.$Z$5]*MAGNET([.AK$24]+[.BB24]) +[.AL$28]*[.$Z$5]*MAGNET([.AL$24]+[.BB24]) +[.AM$28]*[.$Z$5]*MAGNET([.AM$24]+[.BB24]) +[.AN$28]*[.$Z$5]*MAGNET([.AN$24]+[.BB24]) +[.AO$28]*[.$Z$5]*MAGNET([.AO$24]+[.BB24]) +[.AP$28]*[.$Z$5]*MAGNET([.AP$24]+[.$BB24])&#10;+[.AQ$28]*[.$Z$5]*MAGNET([.AQ$24]+[.$BB24])&#10;+[.AR$28]*[.$Z$5]*MAGNET([.AR$24]+[.$BB24])&#10;+[.AS$28]*[.$Z$5]*MAGNET([.AS$24]+[.$BB24])&#10;+[.AT$28]*[.$Z$5]*MAGNET([.AT$24]+[.$BB24])&#10;+[.AU$28]*[.$Z$5]*MAGNET([.AU$24]+[.$BB24])&#10;+[.AV$28]*[.$Z$5]*MAGNET([.AV$24]+[.$BB24])&#10;+[.AW$28]*[.$Z$5]*MAGNET([.AW$24]+[.$BB24])&#10;+[.AX$28]*[.$Z$5]*MAGNET([.AX$24]+[.$BB24])&#10;+[.AY$28]*[.$Z$5]*MAGNET([.AY$24]+[.$BB24]) +RAND()*[.$BF$13]" office:value-type="float" office:value="-18.029702677031" calcext:value-type="float">
            <text:p>-18.029702677031</text:p>
          </table:table-cell>
          <table:table-cell table:style-name="ce71" table:formula="of:=[.E$29]*[.$Z$5]*MAGNET([.E$24]+[.$BB24])+[.F$29]*[.$Z$5]*MAGNET([.F$24]+[.$BB24])+[.G$29]*[.$Z$5]*MAGNET([.G$24]+[.$BB24])+[.H$29]*[.$Z$5]*MAGNET([.H$24]+[.$BB24])+[.I$29]*[.$Z$5]*MAGNET([.I$24]+[.$BB24])+[.J$29]*[.$Z$5]*MAGNET([.J$24]+[.$BB24])+[.K$29]*[.$Z$5]*MAGNET([.K$24]+[.$BB24])+[.L$29]*[.$Z$5]*MAGNET([.L$24]+[.$BB24])+[.M$29]*[.$Z$5]*MAGNET([.M$24]+[.$BB24])+[.N$29]*[.$Z$5]*MAGNET([.N$24]+[.$BB24])+[.O$29]*[.$Z$5]*MAGNET([.O$24]+[.$BB24])+[.P$29]*[.$Z$5]*MAGNET([.P$24]+[.$BB24])+[.Q$29]*[.$Z$5]*MAGNET([.Q$24]+[.$BB24])+[.R$29]*[.$Z$5]*MAGNET([.R$24]+[.$BB24])+[.S$29]*[.$Z$5]*MAGNET([.S$24]+[.$BB24])+[.T$29]*[.$Z$5]*MAGNET([.T$24]+[.$BB24])+[.U$29]*[.$Z$5]*MAGNET([.U$24]+[.$BB24])+[.V$29]*[.$Z$5]*MAGNET([.V$24]+[.$BB24])+[.W$29]*[.$Z$5]*MAGNET([.W$24]+[.$BB24])+[.X$29]*[.$Z$5]*MAGNET([.X$24]+[.$BB24])+[.Y$29]*[.$Z$5]*MAGNET([.Y$24]+[.$BB24])+[.Z$29]*[.$Z$5]*MAGNET([.Z$24]+[.$BB24])+[.AA$29]*[.$Z$5]*MAGNET([.AA$24]+[.$BB24])+[.AB$29]*[.$Z$5]*MAGNET([.AB$24]+[.$BB24])+[.AC$29]*[.$Z$5]*MAGNET([.AC$24]+[.$BB24])+[.AD$29]*[.$Z$5]*MAGNET([.AD$24]+[.$BB24])+[.AE$29]*[.$Z$5]*MAGNET([.AE$24]+[.$BB24])+[.AF$29]*[.$Z$5]*MAGNET([.AF$24]+[.$BB24])+[.AG$29]*[.$Z$5]*MAGNET([.AG$24]+[.$BB24])+[.D$29]*[.$Z$5]*MAGNET([.D$24]+[.$BB24])+[.AH$29]*[.$Z$5]*MAGNET([.AH$24]+[.BB24]) +[.AI$29]*[.$Z$5]*MAGNET([.AI$24]+[.BB24]) +[.AJ$29]*[.$Z$5]*MAGNET([.AJ$24]+[.BB24]) +[.AK$29]*[.$Z$5]*MAGNET([.AK$24]+[.BB24]) +[.AL$29]*[.$Z$5]*MAGNET([.AL$24]+[.BB24]) +[.AM$29]*[.$Z$5]*MAGNET([.AM$24]+[.BB24]) +[.AN$29]*[.$Z$5]*MAGNET([.AN$24]+[.BB24]) +[.AO$29]*[.$Z$5]*MAGNET([.AO$24]+[.BB24]) +[.AP$29]*[.$Z$5]*MAGNET([.AP$24]+[.$BB24])&#10;+[.AQ$29]*[.$Z$5]*MAGNET([.AQ$24]+[.$BB24])&#10;+[.AR$29]*[.$Z$5]*MAGNET([.AR$24]+[.$BB24])&#10;+[.AS$29]*[.$Z$5]*MAGNET([.AS$24]+[.$BB24])&#10;+[.AT$29]*[.$Z$5]*MAGNET([.AT$24]+[.$BB24])&#10;+[.AU$29]*[.$Z$5]*MAGNET([.AU$24]+[.$BB24])&#10;+[.AV$29]*[.$Z$5]*MAGNET([.AV$24]+[.$BB24])&#10;+[.AW$29]*[.$Z$5]*MAGNET([.AW$24]+[.$BB24])&#10;+[.AX$29]*[.$Z$5]*MAGNET([.AX$24]+[.$BB24])&#10;+[.AY$29]*[.$Z$5]*MAGNET([.AY$24]+[.$BB24]) +RAND()*[.$BG$13]" office:value-type="float" office:value="48.2379714466889" calcext:value-type="float">
            <text:p>48.2379714466889</text:p>
          </table:table-cell>
          <table:table-cell table:style-name="ce71" table:formula="of:=[.E$30]*[.$Z$5]*MAGNET([.E$24]+[.$BB24])+[.F$30]*[.$Z$5]*MAGNET([.F$24]+[.$BB24])+[.G$30]*[.$Z$5]*MAGNET([.G$24]+[.$BB24])+[.H$30]*[.$Z$5]*MAGNET([.H$24]+[.$BB24])+[.I$30]*[.$Z$5]*MAGNET([.I$24]+[.$BB24])+[.J$30]*[.$Z$5]*MAGNET([.J$24]+[.$BB24])+[.K$30]*[.$Z$5]*MAGNET([.K$24]+[.$BB24])+[.L$30]*[.$Z$5]*MAGNET([.L$24]+[.$BB24])+[.M$30]*[.$Z$5]*MAGNET([.M$24]+[.$BB24])+[.N$30]*[.$Z$5]*MAGNET([.N$24]+[.$BB24])+[.O$30]*[.$Z$5]*MAGNET([.O$24]+[.$BB24])+[.P$30]*[.$Z$5]*MAGNET([.P$24]+[.$BB24])+[.Q$30]*[.$Z$5]*MAGNET([.Q$24]+[.$BB24])+[.R$30]*[.$Z$5]*MAGNET([.R$24]+[.$BB24])+[.S$30]*[.$Z$5]*MAGNET([.S$24]+[.$BB24])+[.T$30]*[.$Z$5]*MAGNET([.T$24]+[.$BB24])+[.U$30]*[.$Z$5]*MAGNET([.U$24]+[.$BB24])+[.V$30]*[.$Z$5]*MAGNET([.V$24]+[.$BB24])+[.W$30]*[.$Z$5]*MAGNET([.W$24]+[.$BB24])+[.X$30]*[.$Z$5]*MAGNET([.X$24]+[.$BB24])+[.Y$30]*[.$Z$5]*MAGNET([.Y$24]+[.$BB24])+[.Z$30]*[.$Z$5]*MAGNET([.Z$24]+[.$BB24])+[.AA$30]*[.$Z$5]*MAGNET([.AA$24]+[.$BB24])+[.AB$30]*[.$Z$5]*MAGNET([.AB$24]+[.$BB24])+[.AC$30]*[.$Z$5]*MAGNET([.AC$24]+[.$BB24])+[.AD$30]*[.$Z$5]*MAGNET([.AD$24]+[.$BB24])+[.AE$30]*[.$Z$5]*MAGNET([.AE$24]+[.$BB24])+[.AF$30]*[.$Z$5]*MAGNET([.AF$24]+[.$BB24])+[.AG$30]*[.$Z$5]*MAGNET([.AG$24]+[.$BB24])+[.D$30]*[.$Z$5]*MAGNET([.D$24]+[.$BB24])+[.AH$30]*[.$Z$5]*MAGNET([.AH$24]+[.BB24]) +[.AI$30]*[.$Z$5]*MAGNET([.AI$24]+[.BB24]) +[.AJ$30]*[.$Z$5]*MAGNET([.AJ$24]+[.BB24]) +[.AK$30]*[.$Z$5]*MAGNET([.AK$24]+[.BB24]) +[.AL$30]*[.$Z$5]*MAGNET([.AL$24]+[.BB24]) +[.AM$30]*[.$Z$5]*MAGNET([.AM$24]+[.BB24]) +[.AN$30]*[.$Z$5]*MAGNET([.AN$24]+[.BB24]) +[.AO$30]*[.$Z$5]*MAGNET([.AO$24]+[.BB24]) +[.AP$30]*[.$Z$5]*MAGNET([.AP$24]+[.$BB24])&#10;+[.AQ$30]*[.$Z$5]*MAGNET([.AQ$24]+[.$BB24])&#10;+[.AR$30]*[.$Z$5]*MAGNET([.AR$24]+[.$BB24])&#10;+[.AS$30]*[.$Z$5]*MAGNET([.AS$24]+[.$BB24])&#10;+[.AT$30]*[.$Z$5]*MAGNET([.AT$24]+[.$BB24])&#10;+[.AU$30]*[.$Z$5]*MAGNET([.AU$24]+[.$BB24])&#10;+[.AV$30]*[.$Z$5]*MAGNET([.AV$24]+[.$BB24])&#10;+[.AW$30]*[.$Z$5]*MAGNET([.AW$24]+[.$BB24])&#10;+[.AX$30]*[.$Z$5]*MAGNET([.AX$24]+[.$BB24])&#10;+[.AY$30]*[.$Z$5]*MAGNET([.AY$24]+[.$BB24]) +RAND()*[.$BH$13]" office:value-type="float" office:value="0" calcext:value-type="float">
            <text:p>0</text:p>
          </table:table-cell>
          <table:table-cell table:style-name="ce71" table:formula="of:=[.E$31]*[.$Z$5]*MAGNET([.E$24]+[.$BB24])+[.F$31]*[.$Z$5]*MAGNET([.F$24]+[.$BB24])+[.G$31]*[.$Z$5]*MAGNET([.G$24]+[.$BB24])+[.H$31]*[.$Z$5]*MAGNET([.H$24]+[.$BB24])+[.I$31]*[.$Z$5]*MAGNET([.I$24]+[.$BB24])+[.J$31]*[.$Z$5]*MAGNET([.J$24]+[.$BB24])+[.K$31]*[.$Z$5]*MAGNET([.K$24]+[.$BB24])+[.L$31]*[.$Z$5]*MAGNET([.L$24]+[.$BB24])+[.M$31]*[.$Z$5]*MAGNET([.M$24]+[.$BB24])+[.N$31]*[.$Z$5]*MAGNET([.N$24]+[.$BB24])+[.O$31]*[.$Z$5]*MAGNET([.O$24]+[.$BB24])+[.P$31]*[.$Z$5]*MAGNET([.P$24]+[.$BB24])+[.Q$31]*[.$Z$5]*MAGNET([.Q$24]+[.$BB24])+[.R$31]*[.$Z$5]*MAGNET([.R$24]+[.$BB24])+[.S$31]*[.$Z$5]*MAGNET([.S$24]+[.$BB24])+[.T$31]*[.$Z$5]*MAGNET([.T$24]+[.$BB24])+[.U$31]*[.$Z$5]*MAGNET([.U$24]+[.$BB24])+[.V$31]*[.$Z$5]*MAGNET([.V$24]+[.$BB24])+[.W$31]*[.$Z$5]*MAGNET([.W$24]+[.$BB24])+[.X$31]*[.$Z$5]*MAGNET([.X$24]+[.$BB24])+[.Y$31]*[.$Z$5]*MAGNET([.Y$24]+[.$BB24])+[.Z$31]*[.$Z$5]*MAGNET([.Z$24]+[.$BB24])+[.AA$31]*[.$Z$5]*MAGNET([.AA$24]+[.$BB24])+[.AB$31]*[.$Z$5]*MAGNET([.AB$24]+[.$BB24])+[.AC$31]*[.$Z$5]*MAGNET([.AC$24]+[.$BB24])+[.AD$31]*[.$Z$5]*MAGNET([.AD$24]+[.$BB24])+[.AE$31]*[.$Z$5]*MAGNET([.AE$24]+[.$BB24])+[.AF$31]*[.$Z$5]*MAGNET([.AF$24]+[.$BB24])+[.AG$31]*[.$Z$5]*MAGNET([.AG$24]+[.$BB24])+[.D$31]*[.$Z$5]*MAGNET([.D$24]+[.$BB24])+[.AH$31]*[.$Z$5]*MAGNET([.AH$24]+[.BB24]) +[.AI$31]*[.$Z$5]*MAGNET([.AI$24]+[.BB24]) +[.AJ$31]*[.$Z$5]*MAGNET([.AJ$24]+[.BB24]) +[.AK$31]*[.$Z$5]*MAGNET([.AK$24]+[.BB24]) +[.AL$31]*[.$Z$5]*MAGNET([.AL$24]+[.BB24]) +[.AM$31]*[.$Z$5]*MAGNET([.AM$24]+[.BB24]) +[.AN$31]*[.$Z$5]*MAGNET([.AN$24]+[.BB24]) +[.AO$31]*[.$Z$5]*MAGNET([.AO$24]+[.BB24]) +[.AP$31]*[.$Z$5]*MAGNET([.AP$24]+[.$BB24])&#10;+[.AQ$31]*[.$Z$5]*MAGNET([.AQ$24]+[.$BB24])&#10;+[.AR$31]*[.$Z$5]*MAGNET([.AR$24]+[.$BB24])&#10;+[.AS$31]*[.$Z$5]*MAGNET([.AS$24]+[.$BB24])&#10;+[.AT$31]*[.$Z$5]*MAGNET([.AT$24]+[.$BB24])&#10;+[.AU$31]*[.$Z$5]*MAGNET([.AU$24]+[.$BB24])&#10;+[.AV$31]*[.$Z$5]*MAGNET([.AV$24]+[.$BB24])&#10;+[.AW$31]*[.$Z$5]*MAGNET([.AW$24]+[.$BB24])&#10;+[.AX$31]*[.$Z$5]*MAGNET([.AX$24]+[.$BB24])&#10;+[.AY$31]*[.$Z$5]*MAGNET([.AY$24]+[.$BB24]) +RAND()*[.$BI$13]" office:value-type="float" office:value="0" calcext:value-type="float">
            <text:p>0</text:p>
          </table:table-cell>
          <table:table-cell table:style-name="ce71" table:formula="of:=[.E$32]*[.$Z$5]*MAGNET([.E$24]+[.$BB24])+[.F$32]*[.$Z$5]*MAGNET([.F$24]+[.$BB24])+[.G$32]*[.$Z$5]*MAGNET([.G$24]+[.$BB24])+[.H$32]*[.$Z$5]*MAGNET([.H$24]+[.$BB24])+[.I$32]*[.$Z$5]*MAGNET([.I$24]+[.$BB24])+[.J$32]*[.$Z$5]*MAGNET([.J$24]+[.$BB24])+[.K$32]*[.$Z$5]*MAGNET([.K$24]+[.$BB24])+[.L$32]*[.$Z$5]*MAGNET([.L$24]+[.$BB24])+[.M$32]*[.$Z$5]*MAGNET([.M$24]+[.$BB24])+[.N$32]*[.$Z$5]*MAGNET([.N$24]+[.$BB24])+[.O$32]*[.$Z$5]*MAGNET([.O$24]+[.$BB24])+[.P$32]*[.$Z$5]*MAGNET([.P$24]+[.$BB24])+[.Q$32]*[.$Z$5]*MAGNET([.Q$24]+[.$BB24])+[.R$32]*[.$Z$5]*MAGNET([.R$24]+[.$BB24])+[.S$32]*[.$Z$5]*MAGNET([.S$24]+[.$BB24])+[.T$32]*[.$Z$5]*MAGNET([.T$24]+[.$BB24])+[.U$32]*[.$Z$5]*MAGNET([.U$24]+[.$BB24])+[.V$32]*[.$Z$5]*MAGNET([.V$24]+[.$BB24])+[.W$32]*[.$Z$5]*MAGNET([.W$24]+[.$BB24])+[.X$32]*[.$Z$5]*MAGNET([.X$24]+[.$BB24])+[.Y$32]*[.$Z$5]*MAGNET([.Y$24]+[.$BB24])+[.Z$32]*[.$Z$5]*MAGNET([.Z$24]+[.$BB24])+[.AA$32]*[.$Z$5]*MAGNET([.AA$24]+[.$BB24])+[.AB$32]*[.$Z$5]*MAGNET([.AB$24]+[.$BB24])+[.AC$32]*[.$Z$5]*MAGNET([.AC$24]+[.$BB24])+[.AD$32]*[.$Z$5]*MAGNET([.AD$24]+[.$BB24])+[.AE$32]*[.$Z$5]*MAGNET([.AE$24]+[.$BB24])+[.AF$32]*[.$Z$5]*MAGNET([.AF$24]+[.$BB24])+[.AG$32]*[.$Z$5]*MAGNET([.AG$24]+[.$BB24])+[.D$32]*[.$Z$5]*MAGNET([.D$24]+[.$BB24])+[.AH$32]*[.$Z$5]*MAGNET([.AH$24]+[.BB24]) +[.AI$32]*[.$Z$5]*MAGNET([.AI$24]+[.BB24]) +[.AJ$32]*[.$Z$5]*MAGNET([.AJ$24]+[.BB24]) +[.AK$32]*[.$Z$5]*MAGNET([.AK$24]+[.BB24]) +[.AL$32]*[.$Z$5]*MAGNET([.AL$24]+[.BB24]) +[.AM$32]*[.$Z$5]*MAGNET([.AM$24]+[.BB24]) +[.AN$32]*[.$Z$5]*MAGNET([.AN$24]+[.BB24]) +[.AO$32]*[.$Z$5]*MAGNET([.AO$24]+[.BB24]) +[.AP$32]*[.$Z$5]*MAGNET([.AP$24]+[.$BB24])&#10;+[.AQ$32]*[.$Z$5]*MAGNET([.AQ$24]+[.$BB24])&#10;+[.AR$32]*[.$Z$5]*MAGNET([.AR$24]+[.$BB24])&#10;+[.AS$32]*[.$Z$5]*MAGNET([.AS$24]+[.$BB24])&#10;+[.AT$32]*[.$Z$5]*MAGNET([.AT$24]+[.$BB24])&#10;+[.AU$32]*[.$Z$5]*MAGNET([.AU$24]+[.$BB24])&#10;+[.AV$32]*[.$Z$5]*MAGNET([.AV$24]+[.$BB24])&#10;+[.AW$32]*[.$Z$5]*MAGNET([.AW$24]+[.$BB24])&#10;+[.AX$32]*[.$Z$5]*MAGNET([.AX$24]+[.$BB24])&#10;+[.AY$32]*[.$Z$5]*MAGNET([.AY$24]+[.$BB2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/>
          <table:table-cell office:value-type="string" calcext:value-type="string">
            <text:p>Faser</text:p>
          </table:table-cell>
          <table:table-cell table:style-name="ce4" office:value-type="float" office:value="1" calcext:value-type="float">
            <text:p>1</text:p>
          </table:table-cell>
          <table:table-cell table:formula="of:=[.D37]-[.D38]" office:value-type="float" office:value="4" calcext:value-type="float">
            <text:p>4</text:p>
          </table:table-cell>
          <table:table-cell table:formula="of:=[.E37]-[.E38]" office:value-type="float" office:value="4" calcext:value-type="float">
            <text:p>4</text:p>
          </table:table-cell>
          <table:table-cell table:formula="of:=[.F37]-[.F38]" office:value-type="float" office:value="2" calcext:value-type="float">
            <text:p>2</text:p>
          </table:table-cell>
          <table:table-cell table:formula="of:=[.G37]-[.G38]" office:value-type="float" office:value="0" calcext:value-type="float">
            <text:p>0</text:p>
          </table:table-cell>
          <table:table-cell table:formula="of:=[.H37]-[.H38]" office:value-type="float" office:value="0" calcext:value-type="float">
            <text:p>0</text:p>
          </table:table-cell>
          <table:table-cell table:formula="of:=[.I37]-[.I38]" office:value-type="float" office:value="0" calcext:value-type="float">
            <text:p>0</text:p>
          </table:table-cell>
          <table:table-cell table:formula="of:=[.J37]-[.J38]" office:value-type="float" office:value="0" calcext:value-type="float">
            <text:p>0</text:p>
          </table:table-cell>
          <table:table-cell table:formula="of:=[.K37]-[.K38]" office:value-type="float" office:value="-2" calcext:value-type="float">
            <text:p>-2</text:p>
          </table:table-cell>
          <table:table-cell table:formula="of:=[.L37]-[.L38]" office:value-type="float" office:value="-4" calcext:value-type="float">
            <text:p>-4</text:p>
          </table:table-cell>
          <table:table-cell table:formula="of:=[.M37]-[.M38]" office:value-type="float" office:value="-4" calcext:value-type="float">
            <text:p>-4</text:p>
          </table:table-cell>
          <table:table-cell table:formula="of:=[.N37]-[.N38]" office:value-type="float" office:value="0" calcext:value-type="float">
            <text:p>0</text:p>
          </table:table-cell>
          <table:table-cell table:formula="of:=[.O37]-[.O38]" office:value-type="float" office:value="0" calcext:value-type="float">
            <text:p>0</text:p>
          </table:table-cell>
          <table:table-cell table:formula="of:=[.P37]-[.P38]" office:value-type="float" office:value="0" calcext:value-type="float">
            <text:p>0</text:p>
          </table:table-cell>
          <table:table-cell table:formula="of:=[.Q37]-[.Q38]" office:value-type="float" office:value="0" calcext:value-type="float">
            <text:p>0</text:p>
          </table:table-cell>
          <table:table-cell table:formula="of:=[.R37]-[.R38]" office:value-type="float" office:value="0" calcext:value-type="float">
            <text:p>0</text:p>
          </table:table-cell>
          <table:table-cell table:formula="of:=[.S37]-[.S38]" office:value-type="float" office:value="4" calcext:value-type="float">
            <text:p>4</text:p>
          </table:table-cell>
          <table:table-cell table:formula="of:=[.T37]-[.T38]" office:value-type="float" office:value="4" calcext:value-type="float">
            <text:p>4</text:p>
          </table:table-cell>
          <table:table-cell table:formula="of:=[.U37]-[.U38]" office:value-type="float" office:value="2" calcext:value-type="float">
            <text:p>2</text:p>
          </table:table-cell>
          <table:table-cell table:formula="of:=[.V37]-[.V38]" office:value-type="float" office:value="0" calcext:value-type="float">
            <text:p>0</text:p>
          </table:table-cell>
          <table:table-cell table:formula="of:=[.W37]-[.W38]" office:value-type="float" office:value="0" calcext:value-type="float">
            <text:p>0</text:p>
          </table:table-cell>
          <table:table-cell table:formula="of:=[.X37]-[.X38]" office:value-type="float" office:value="0" calcext:value-type="float">
            <text:p>0</text:p>
          </table:table-cell>
          <table:table-cell table:formula="of:=[.Y37]-[.Y38]" office:value-type="float" office:value="0" calcext:value-type="float">
            <text:p>0</text:p>
          </table:table-cell>
          <table:table-cell table:formula="of:=[.Z37]-[.Z38]" office:value-type="float" office:value="-2" calcext:value-type="float">
            <text:p>-2</text:p>
          </table:table-cell>
          <table:table-cell table:formula="of:=[.AA37]-[.AA38]" office:value-type="float" office:value="-4" calcext:value-type="float">
            <text:p>-4</text:p>
          </table:table-cell>
          <table:table-cell table:formula="of:=[.AB37]-[.AB38]" office:value-type="float" office:value="-4" calcext:value-type="float">
            <text:p>-4</text:p>
          </table:table-cell>
          <table:table-cell table:formula="of:=[.AC37]-[.AC38]" office:value-type="float" office:value="0" calcext:value-type="float">
            <text:p>0</text:p>
          </table:table-cell>
          <table:table-cell table:formula="of:=[.AD37]-[.AD38]" office:value-type="float" office:value="0" calcext:value-type="float">
            <text:p>0</text:p>
          </table:table-cell>
          <table:table-cell table:formula="of:=[.AE37]-[.AE38]" office:value-type="float" office:value="0" calcext:value-type="float">
            <text:p>0</text:p>
          </table:table-cell>
          <table:table-cell table:formula="of:=[.AF37]-[.AF38]" office:value-type="float" office:value="0" calcext:value-type="float">
            <text:p>0</text:p>
          </table:table-cell>
          <table:table-cell table:formula="of:=[.AG37]-[.AG38]" office:value-type="float" office:value="0" calcext:value-type="float">
            <text:p>0</text:p>
          </table:table-cell>
          <table:table-cell table:formula="of:=[.AH37]-[.AH38]" office:value-type="float" office:value="0" calcext:value-type="float">
            <text:p>0</text:p>
          </table:table-cell>
          <table:table-cell table:formula="of:=[.AI37]-[.AI38]" office:value-type="float" office:value="0" calcext:value-type="float">
            <text:p>0</text:p>
          </table:table-cell>
          <table:table-cell table:formula="of:=[.AJ37]-[.AJ38]" office:value-type="float" office:value="0" calcext:value-type="float">
            <text:p>0</text:p>
          </table:table-cell>
          <table:table-cell table:formula="of:=[.AK37]-[.AK38]" office:value-type="float" office:value="0" calcext:value-type="float">
            <text:p>0</text:p>
          </table:table-cell>
          <table:table-cell table:formula="of:=[.AL37]-[.AL38]" office:value-type="float" office:value="0" calcext:value-type="float">
            <text:p>0</text:p>
          </table:table-cell>
          <table:table-cell table:formula="of:=[.AM37]-[.AM38]" office:value-type="float" office:value="4" calcext:value-type="float">
            <text:p>4</text:p>
          </table:table-cell>
          <table:table-cell table:formula="of:=[.AN37]-[.AN38]" office:value-type="float" office:value="0" calcext:value-type="float">
            <text:p>0</text:p>
          </table:table-cell>
          <table:table-cell table:formula="of:=[.AO37]-[.AO38]" office:value-type="float" office:value="2" calcext:value-type="float">
            <text:p>2</text:p>
          </table:table-cell>
          <table:table-cell table:formula="of:=[.AP37]-[.AP38]" office:value-type="float" office:value="0" calcext:value-type="float">
            <text:p>0</text:p>
          </table:table-cell>
          <table:table-cell table:formula="of:=[.AQ37]-[.AQ38]" office:value-type="float" office:value="0" calcext:value-type="float">
            <text:p>0</text:p>
          </table:table-cell>
          <table:table-cell table:formula="of:=[.AR37]-[.AR38]" office:value-type="float" office:value="0" calcext:value-type="float">
            <text:p>0</text:p>
          </table:table-cell>
          <table:table-cell table:formula="of:=[.AS37]-[.AS38]" office:value-type="float" office:value="0" calcext:value-type="float">
            <text:p>0</text:p>
          </table:table-cell>
          <table:table-cell table:formula="of:=[.AT37]-[.AT38]" office:value-type="float" office:value="0" calcext:value-type="float">
            <text:p>0</text:p>
          </table:table-cell>
          <table:table-cell table:formula="of:=[.AU37]-[.AU38]" office:value-type="float" office:value="0" calcext:value-type="float">
            <text:p>0</text:p>
          </table:table-cell>
          <table:table-cell table:formula="of:=[.AV37]-[.AV38]" office:value-type="float" office:value="0" calcext:value-type="float">
            <text:p>0</text:p>
          </table:table-cell>
          <table:table-cell table:formula="of:=[.AW37]-[.AW38]" office:value-type="float" office:value="0" calcext:value-type="float">
            <text:p>0</text:p>
          </table:table-cell>
          <table:table-cell table:formula="of:=[.AX37]-[.AX38]" office:value-type="float" office:value="0" calcext:value-type="float">
            <text:p>0</text:p>
          </table:table-cell>
          <table:table-cell table:formula="of:=[.AY37]-[.AY38]" office:value-type="float" office:value="0" calcext:value-type="float">
            <text:p>0</text:p>
          </table:table-cell>
          <table:table-cell/>
          <table:table-cell table:formula="of:=[.BA24]+0.002" office:value-type="float" office:value="0.02" calcext:value-type="float">
            <text:p>0.02</text:p>
          </table:table-cell>
          <table:table-cell table:formula="of:=[.BA25]*[.$D$6]" office:value-type="float" office:value="1.00530964914873" calcext:value-type="float">
            <text:p>1.005</text:p>
          </table:table-cell>
          <table:table-cell table:formula="of:=[.D$25]*[.$Z$5]*MAGNET([.D$24]+[.BB25])+[.E$25]*[.$Z$5]*MAGNET([.E$24]+[.BB25])+[.F$25]*[.$Z$5]*MAGNET([.F$24]+[.BB25])+[.G$25]*[.$Z$5]*MAGNET([.G$24]+[.BB25])+[.H$25]*[.$Z$5]*MAGNET([.H$24]+[.BB25])+[.I$25]*[.$Z$5]*MAGNET([.I$24]+[.BB25])+[.J$25]*[.$Z$5]*MAGNET([.J$24]+[.BB25])+[.K$25]*[.$Z$5]*MAGNET([.K$24]+[.BB25])+[.L$25]*[.$Z$5]*MAGNET([.L$24]+[.BB25])+[.M$25]*[.$Z$5]*MAGNET([.M$24]+[.BB25])+[.N$25]*[.$Z$5]*MAGNET([.N$24]+[.BB25])+[.O$25]*[.$Z$5]*MAGNET([.O$24]+[.BB25])+[.P$25]*[.$Z$5]*MAGNET([.P$24]+[.BB25])+[.Q$25]*[.$Z$5]*MAGNET([.Q$24]+[.BB25])+[.R$25]*[.$Z$5]*MAGNET([.R$24]+[.BB25])+[.S$25]*[.$Z$5]*MAGNET([.S$24]+[.BB25])+[.T$25]*[.$Z$5]*MAGNET([.T$24]+[.BB25])+[.U$25]*[.$Z$5]*MAGNET([.U$24]+[.BB25])+[.V$25]*[.$Z$5]*MAGNET([.V$24]+[.BB25])+[.W$25]*[.$Z$5]*MAGNET([.W$24]+[.BB25])+[.X$25]*[.$Z$5]*MAGNET([.X$24]+[.BB25])+[.Y$25]*[.$Z$5]*MAGNET([.Y$24]+[.BB25])+[.Z$25]*[.$Z$5]*MAGNET([.Z$24]+[.BB25])+[.AA$25]*[.$Z$5]*MAGNET([.AA$24]+[.BB25])+[.AB$25]*[.$Z$5]*MAGNET([.AB$24]+[.BB25])+[.AC$25]*[.$Z$5]*MAGNET([.AC$24]+[.BB25])+[.AD$25]*[.$Z$5]*MAGNET([.AD$24]+[.BB25])+[.AE$25]*[.$Z$5]*MAGNET([.AE$24]+[.BB25])+[.AF$25]*[.$Z$5]*MAGNET([.AF$24]+[.BB25])+[.AG$25]*[.$Z$5]*MAGNET([.AG$24]+[.BB25])+[.AH$25]*[.$Z$5]*MAGNET([.AH$24]+[.BB25]) +[.AI$25]*[.$Z$5]*MAGNET([.AI$24]+[.BB25]) +[.AJ$25]*[.$Z$5]*MAGNET([.AJ$24]+[.BB25]) +[.AK$25]*[.$Z$5]*MAGNET([.AK$24]+[.BB25]) +[.AL$25]*[.$Z$5]*MAGNET([.AL$24]+[.BB25]) +[.AM$25]*[.$Z$5]*MAGNET([.AM$24]+[.BB25]) +[.AN$25]*[.$Z$5]*MAGNET([.AN$24]+[.BB25]) +[.AO$25]*[.$Z$5]*MAGNET([.AO$24]+[.BB25])+RAND()*[.$BC$13]+[.AP$25]*[.$Z$5]*MAGNET([.AP$24]+[.BB25])&#10;+[.AQ$25]*[.$Z$5]*MAGNET([.AQ$24]+[.BB25])&#10;+[.AR$25]*[.$Z$5]*MAGNET([.AR$24]+[.BB25])&#10;+[.AS$25]*[.$Z$5]*MAGNET([.AS$24]+[.BB25])&#10;+[.AT$25]*[.$Z$5]*MAGNET([.AT$24]+[.BB25])&#10;+[.AU$25]*[.$Z$5]*MAGNET([.AU$24]+[.BB25])&#10;+[.AV$25]*[.$Z$5]*MAGNET([.AV$24]+[.BB25])&#10;+[.AW$25]*[.$Z$5]*MAGNET([.AW$24]+[.BB25])&#10;+[.AX$25]*[.$Z$5]*MAGNET([.AX$24]+[.BB25])&#10;+[.AY$25]*[.$Z$5]*MAGNET([.AY$24]+[.BB25])" office:value-type="float" office:value="69.9413057435124" calcext:value-type="float">
            <text:p>69.94</text:p>
          </table:table-cell>
          <table:table-cell table:style-name="ce70" table:formula="of:=[.E$26]*[.$Z$5]*MAGNET([.E$24]+[.$BB25])+[.F$26]*[.$Z$5]*MAGNET([.F$24]+[.$BB25])+[.G$26]*[.$Z$5]*MAGNET([.G$24]+[.$BB25])+[.H$26]*[.$Z$5]*MAGNET([.H$24]+[.$BB25])+[.I$26]*[.$Z$5]*MAGNET([.I$24]+[.$BB25])+[.J$26]*[.$Z$5]*MAGNET([.J$24]+[.$BB25])+[.K$26]*[.$Z$5]*MAGNET([.K$24]+[.$BB25])+[.L$26]*[.$Z$5]*MAGNET([.L$24]+[.$BB25])+[.M$26]*[.$Z$5]*MAGNET([.M$24]+[.$BB25])+[.N$26]*[.$Z$5]*MAGNET([.N$24]+[.$BB25])+[.O$26]*[.$Z$5]*MAGNET([.O$24]+[.$BB25])+[.P$26]*[.$Z$5]*MAGNET([.P$24]+[.$BB25])+[.Q$26]*[.$Z$5]*MAGNET([.Q$24]+[.$BB25])+[.R$26]*[.$Z$5]*MAGNET([.R$24]+[.$BB25])+[.S$26]*[.$Z$5]*MAGNET([.S$24]+[.$BB25])+[.T$26]*[.$Z$5]*MAGNET([.T$24]+[.$BB25])+[.U$26]*[.$Z$5]*MAGNET([.U$24]+[.$BB25])+[.V$26]*[.$Z$5]*MAGNET([.V$24]+[.$BB25])+[.W$26]*[.$Z$5]*MAGNET([.W$24]+[.$BB25])+[.X$26]*[.$Z$5]*MAGNET([.X$24]+[.$BB25])+[.Y$26]*[.$Z$5]*MAGNET([.Y$24]+[.$BB25])+[.Z$26]*[.$Z$5]*MAGNET([.Z$24]+[.$BB25])+[.AA$26]*[.$Z$5]*MAGNET([.AA$24]+[.$BB25])+[.AB$26]*[.$Z$5]*MAGNET([.AB$24]+[.$BB25])+[.AC$26]*[.$Z$5]*MAGNET([.AC$24]+[.$BB25])+[.AD$26]*[.$Z$5]*MAGNET([.AD$24]+[.$BB25])+[.AE$26]*[.$Z$5]*MAGNET([.AE$24]+[.$BB25])+[.AF$26]*[.$Z$5]*MAGNET([.AF$24]+[.$BB25])+[.AG$26]*[.$Z$5]*MAGNET([.AG$24]+[.$BB25])+[.D$26]*[.$Z$5]*MAGNET([.D$24]+[.$BB25])+[.AH$26]*[.$Z$5]*MAGNET([.AH$24]+[.BB25]) +[.AI$26]*[.$Z$5]*MAGNET([.AI$24]+[.BB25]) +[.AJ$26]*[.$Z$5]*MAGNET([.AJ$24]+[.BB25]) +[.AK$26]*[.$Z$5]*MAGNET([.AK$24]+[.BB25]) +[.AL$26]*[.$Z$5]*MAGNET([.AL$24]+[.BB25]) +[.AM$26]*[.$Z$5]*MAGNET([.AM$24]+[.BB25]) +[.AN$26]*[.$Z$5]*MAGNET([.AN$24]+[.BB25]) +[.AO$26]*[.$Z$5]*MAGNET([.AO$24]+[.BB25]) +[.AP$26]*[.$Z$5]*MAGNET([.AP$24]+[.$BB25])&#10;+[.AQ$26]*[.$Z$5]*MAGNET([.AQ$24]+[.$BB25])&#10;+[.AR$26]*[.$Z$5]*MAGNET([.AR$24]+[.$BB25])&#10;+[.AS$26]*[.$Z$5]*MAGNET([.AS$24]+[.$BB25])&#10;+[.AT$26]*[.$Z$5]*MAGNET([.AT$24]+[.$BB25])&#10;+[.AU$26]*[.$Z$5]*MAGNET([.AU$24]+[.$BB25])&#10;+[.AV$26]*[.$Z$5]*MAGNET([.AV$24]+[.$BB25])&#10;+[.AW$26]*[.$Z$5]*MAGNET([.AW$24]+[.$BB25])&#10;+[.AX$26]*[.$Z$5]*MAGNET([.AX$24]+[.$BB25])&#10;+[.AY$26]*[.$Z$5]*MAGNET([.AY$24]+[.$BB25]) +RAND()*[.$BD$13]" office:value-type="float" office:value="36.8756688150521" calcext:value-type="float">
            <text:p>36.88</text:p>
          </table:table-cell>
          <table:table-cell table:style-name="ce71" table:formula="of:=[.E$27]*[.$Z$5]*MAGNET([.E$24]+[.$BB25])+[.F$27]*[.$Z$5]*MAGNET([.F$24]+[.$BB25])+[.G$27]*[.$Z$5]*MAGNET([.G$24]+[.$BB25])+[.H$27]*[.$Z$5]*MAGNET([.H$24]+[.$BB25])+[.I$27]*[.$Z$5]*MAGNET([.I$24]+[.$BB25])+[.J$27]*[.$Z$5]*MAGNET([.J$24]+[.$BB25])+[.K$27]*[.$Z$5]*MAGNET([.K$24]+[.$BB25])+[.L$27]*[.$Z$5]*MAGNET([.L$24]+[.$BB25])+[.M$27]*[.$Z$5]*MAGNET([.M$24]+[.$BB25])+[.N$27]*[.$Z$5]*MAGNET([.N$24]+[.$BB25])+[.O$27]*[.$Z$5]*MAGNET([.O$24]+[.$BB25])+[.P$27]*[.$Z$5]*MAGNET([.P$24]+[.$BB25])+[.Q$27]*[.$Z$5]*MAGNET([.Q$24]+[.$BB25])+[.R$27]*[.$Z$5]*MAGNET([.R$24]+[.$BB25])+[.S$27]*[.$Z$5]*MAGNET([.S$24]+[.$BB25])+[.T$27]*[.$Z$5]*MAGNET([.T$24]+[.$BB25])+[.U$27]*[.$Z$5]*MAGNET([.U$24]+[.$BB25])+[.V$27]*[.$Z$5]*MAGNET([.V$24]+[.$BB25])+[.W$27]*[.$Z$5]*MAGNET([.W$24]+[.$BB25])+[.X$27]*[.$Z$5]*MAGNET([.X$24]+[.$BB25])+[.Y$27]*[.$Z$5]*MAGNET([.Y$24]+[.$BB25])+[.Z$27]*[.$Z$5]*MAGNET([.Z$24]+[.$BB25])+[.AA$27]*[.$Z$5]*MAGNET([.AA$24]+[.$BB25])+[.AB$27]*[.$Z$5]*MAGNET([.AB$24]+[.$BB25])+[.AC$27]*[.$Z$5]*MAGNET([.AC$24]+[.$BB25])+[.AD$27]*[.$Z$5]*MAGNET([.AD$24]+[.$BB25])+[.AE$27]*[.$Z$5]*MAGNET([.AE$24]+[.$BB25])+[.AF$27]*[.$Z$5]*MAGNET([.AF$24]+[.$BB25])+[.AG$27]*[.$Z$5]*MAGNET([.AG$24]+[.$BB25])+[.D$27]*[.$Z$5]*MAGNET([.D$24]+[.$BB25])+[.AH$27]*[.$Z$5]*MAGNET([.AH$24]+[.BB25]) +[.AI$27]*[.$Z$5]*MAGNET([.AI$24]+[.BB25]) +[.AJ$27]*[.$Z$5]*MAGNET([.AJ$24]+[.BB25]) +[.AK$27]*[.$Z$5]*MAGNET([.AK$24]+[.BB25]) +[.AL$27]*[.$Z$5]*MAGNET([.AL$24]+[.BB25]) +[.AM$27]*[.$Z$5]*MAGNET([.AM$24]+[.BB25]) +[.AN$27]*[.$Z$5]*MAGNET([.AN$24]+[.BB25]) +[.AO$27]*[.$Z$5]*MAGNET([.AO$24]+[.BB25]) +[.AP$27]*[.$Z$5]*MAGNET([.AP$24]+[.$BB25])&#10;+[.AQ$27]*[.$Z$5]*MAGNET([.AQ$24]+[.$BB25])&#10;+[.AR$27]*[.$Z$5]*MAGNET([.AR$24]+[.$BB25])&#10;+[.AS$27]*[.$Z$5]*MAGNET([.AS$24]+[.$BB25])&#10;+[.AT$27]*[.$Z$5]*MAGNET([.AT$24]+[.$BB25])&#10;+[.AU$27]*[.$Z$5]*MAGNET([.AU$24]+[.$BB25])&#10;+[.AV$27]*[.$Z$5]*MAGNET([.AV$24]+[.$BB25])&#10;+[.AW$27]*[.$Z$5]*MAGNET([.AW$24]+[.$BB25])&#10;+[.AX$27]*[.$Z$5]*MAGNET([.AX$24]+[.$BB25])&#10;+[.AY$27]*[.$Z$5]*MAGNET([.AY$24]+[.$BB25]) +RAND()*[.$BE$13]" office:value-type="float" office:value="-129.203961773981" calcext:value-type="float">
            <text:p>-129.203961773981</text:p>
          </table:table-cell>
          <table:table-cell table:style-name="ce71" table:formula="of:=[.E$28]*[.$Z$5]*MAGNET([.E$24]+[.$BB25])+[.F$28]*[.$Z$5]*MAGNET([.F$24]+[.$BB25])+[.G$28]*[.$Z$5]*MAGNET([.G$24]+[.$BB25])+[.H$28]*[.$Z$5]*MAGNET([.H$24]+[.$BB25])+[.I$28]*[.$Z$5]*MAGNET([.I$24]+[.$BB25])+[.J$28]*[.$Z$5]*MAGNET([.J$24]+[.$BB25])+[.K$28]*[.$Z$5]*MAGNET([.K$24]+[.$BB25])+[.L$28]*[.$Z$5]*MAGNET([.L$24]+[.$BB25])+[.M$28]*[.$Z$5]*MAGNET([.M$24]+[.$BB25])+[.N$28]*[.$Z$5]*MAGNET([.N$24]+[.$BB25])+[.O$28]*[.$Z$5]*MAGNET([.O$24]+[.$BB25])+[.P$28]*[.$Z$5]*MAGNET([.P$24]+[.$BB25])+[.Q$28]*[.$Z$5]*MAGNET([.Q$24]+[.$BB25])+[.R$28]*[.$Z$5]*MAGNET([.R$24]+[.$BB25])+[.S$28]*[.$Z$5]*MAGNET([.S$24]+[.$BB25])+[.T$28]*[.$Z$5]*MAGNET([.T$24]+[.$BB25])+[.U$28]*[.$Z$5]*MAGNET([.U$24]+[.$BB25])+[.V$28]*[.$Z$5]*MAGNET([.V$24]+[.$BB25])+[.W$28]*[.$Z$5]*MAGNET([.W$24]+[.$BB25])+[.X$28]*[.$Z$5]*MAGNET([.X$24]+[.$BB25])+[.Y$28]*[.$Z$5]*MAGNET([.Y$24]+[.$BB25])+[.Z$28]*[.$Z$5]*MAGNET([.Z$24]+[.$BB25])+[.AA$28]*[.$Z$5]*MAGNET([.AA$24]+[.$BB25])+[.AB$28]*[.$Z$5]*MAGNET([.AB$24]+[.$BB25])+[.AC$28]*[.$Z$5]*MAGNET([.AC$24]+[.$BB25])+[.AD$28]*[.$Z$5]*MAGNET([.AD$24]+[.$BB25])+[.AE$28]*[.$Z$5]*MAGNET([.AE$24]+[.$BB25])+[.AF$28]*[.$Z$5]*MAGNET([.AF$24]+[.$BB25])+[.AG$28]*[.$Z$5]*MAGNET([.AG$24]+[.$BB25])+[.D$28]*[.$Z$5]*MAGNET([.D$24]+[.$BB25])+[.AH$28]*[.$Z$5]*MAGNET([.AH$24]+[.BB25]) +[.AI$28]*[.$Z$5]*MAGNET([.AI$24]+[.BB25]) +[.AJ$28]*[.$Z$5]*MAGNET([.AJ$24]+[.BB25]) +[.AK$28]*[.$Z$5]*MAGNET([.AK$24]+[.BB25]) +[.AL$28]*[.$Z$5]*MAGNET([.AL$24]+[.BB25]) +[.AM$28]*[.$Z$5]*MAGNET([.AM$24]+[.BB25]) +[.AN$28]*[.$Z$5]*MAGNET([.AN$24]+[.BB25]) +[.AO$28]*[.$Z$5]*MAGNET([.AO$24]+[.BB25]) +[.AP$28]*[.$Z$5]*MAGNET([.AP$24]+[.$BB25])&#10;+[.AQ$28]*[.$Z$5]*MAGNET([.AQ$24]+[.$BB25])&#10;+[.AR$28]*[.$Z$5]*MAGNET([.AR$24]+[.$BB25])&#10;+[.AS$28]*[.$Z$5]*MAGNET([.AS$24]+[.$BB25])&#10;+[.AT$28]*[.$Z$5]*MAGNET([.AT$24]+[.$BB25])&#10;+[.AU$28]*[.$Z$5]*MAGNET([.AU$24]+[.$BB25])&#10;+[.AV$28]*[.$Z$5]*MAGNET([.AV$24]+[.$BB25])&#10;+[.AW$28]*[.$Z$5]*MAGNET([.AW$24]+[.$BB25])&#10;+[.AX$28]*[.$Z$5]*MAGNET([.AX$24]+[.$BB25])&#10;+[.AY$28]*[.$Z$5]*MAGNET([.AY$24]+[.$BB25]) +RAND()*[.$BF$13]" office:value-type="float" office:value="-18.5457720889777" calcext:value-type="float">
            <text:p>-18.5457720889777</text:p>
          </table:table-cell>
          <table:table-cell table:style-name="ce71" table:formula="of:=[.E$29]*[.$Z$5]*MAGNET([.E$24]+[.$BB25])+[.F$29]*[.$Z$5]*MAGNET([.F$24]+[.$BB25])+[.G$29]*[.$Z$5]*MAGNET([.G$24]+[.$BB25])+[.H$29]*[.$Z$5]*MAGNET([.H$24]+[.$BB25])+[.I$29]*[.$Z$5]*MAGNET([.I$24]+[.$BB25])+[.J$29]*[.$Z$5]*MAGNET([.J$24]+[.$BB25])+[.K$29]*[.$Z$5]*MAGNET([.K$24]+[.$BB25])+[.L$29]*[.$Z$5]*MAGNET([.L$24]+[.$BB25])+[.M$29]*[.$Z$5]*MAGNET([.M$24]+[.$BB25])+[.N$29]*[.$Z$5]*MAGNET([.N$24]+[.$BB25])+[.O$29]*[.$Z$5]*MAGNET([.O$24]+[.$BB25])+[.P$29]*[.$Z$5]*MAGNET([.P$24]+[.$BB25])+[.Q$29]*[.$Z$5]*MAGNET([.Q$24]+[.$BB25])+[.R$29]*[.$Z$5]*MAGNET([.R$24]+[.$BB25])+[.S$29]*[.$Z$5]*MAGNET([.S$24]+[.$BB25])+[.T$29]*[.$Z$5]*MAGNET([.T$24]+[.$BB25])+[.U$29]*[.$Z$5]*MAGNET([.U$24]+[.$BB25])+[.V$29]*[.$Z$5]*MAGNET([.V$24]+[.$BB25])+[.W$29]*[.$Z$5]*MAGNET([.W$24]+[.$BB25])+[.X$29]*[.$Z$5]*MAGNET([.X$24]+[.$BB25])+[.Y$29]*[.$Z$5]*MAGNET([.Y$24]+[.$BB25])+[.Z$29]*[.$Z$5]*MAGNET([.Z$24]+[.$BB25])+[.AA$29]*[.$Z$5]*MAGNET([.AA$24]+[.$BB25])+[.AB$29]*[.$Z$5]*MAGNET([.AB$24]+[.$BB25])+[.AC$29]*[.$Z$5]*MAGNET([.AC$24]+[.$BB25])+[.AD$29]*[.$Z$5]*MAGNET([.AD$24]+[.$BB25])+[.AE$29]*[.$Z$5]*MAGNET([.AE$24]+[.$BB25])+[.AF$29]*[.$Z$5]*MAGNET([.AF$24]+[.$BB25])+[.AG$29]*[.$Z$5]*MAGNET([.AG$24]+[.$BB25])+[.D$29]*[.$Z$5]*MAGNET([.D$24]+[.$BB25])+[.AH$29]*[.$Z$5]*MAGNET([.AH$24]+[.BB25]) +[.AI$29]*[.$Z$5]*MAGNET([.AI$24]+[.BB25]) +[.AJ$29]*[.$Z$5]*MAGNET([.AJ$24]+[.BB25]) +[.AK$29]*[.$Z$5]*MAGNET([.AK$24]+[.BB25]) +[.AL$29]*[.$Z$5]*MAGNET([.AL$24]+[.BB25]) +[.AM$29]*[.$Z$5]*MAGNET([.AM$24]+[.BB25]) +[.AN$29]*[.$Z$5]*MAGNET([.AN$24]+[.BB25]) +[.AO$29]*[.$Z$5]*MAGNET([.AO$24]+[.BB25]) +[.AP$29]*[.$Z$5]*MAGNET([.AP$24]+[.$BB25])&#10;+[.AQ$29]*[.$Z$5]*MAGNET([.AQ$24]+[.$BB25])&#10;+[.AR$29]*[.$Z$5]*MAGNET([.AR$24]+[.$BB25])&#10;+[.AS$29]*[.$Z$5]*MAGNET([.AS$24]+[.$BB25])&#10;+[.AT$29]*[.$Z$5]*MAGNET([.AT$24]+[.$BB25])&#10;+[.AU$29]*[.$Z$5]*MAGNET([.AU$24]+[.$BB25])&#10;+[.AV$29]*[.$Z$5]*MAGNET([.AV$24]+[.$BB25])&#10;+[.AW$29]*[.$Z$5]*MAGNET([.AW$24]+[.$BB25])&#10;+[.AX$29]*[.$Z$5]*MAGNET([.AX$24]+[.$BB25])&#10;+[.AY$29]*[.$Z$5]*MAGNET([.AY$24]+[.$BB25]) +RAND()*[.$BG$13]" office:value-type="float" office:value="47.9170447659188" calcext:value-type="float">
            <text:p>47.9170447659188</text:p>
          </table:table-cell>
          <table:table-cell table:style-name="ce71" table:formula="of:=[.E$30]*[.$Z$5]*MAGNET([.E$24]+[.$BB25])+[.F$30]*[.$Z$5]*MAGNET([.F$24]+[.$BB25])+[.G$30]*[.$Z$5]*MAGNET([.G$24]+[.$BB25])+[.H$30]*[.$Z$5]*MAGNET([.H$24]+[.$BB25])+[.I$30]*[.$Z$5]*MAGNET([.I$24]+[.$BB25])+[.J$30]*[.$Z$5]*MAGNET([.J$24]+[.$BB25])+[.K$30]*[.$Z$5]*MAGNET([.K$24]+[.$BB25])+[.L$30]*[.$Z$5]*MAGNET([.L$24]+[.$BB25])+[.M$30]*[.$Z$5]*MAGNET([.M$24]+[.$BB25])+[.N$30]*[.$Z$5]*MAGNET([.N$24]+[.$BB25])+[.O$30]*[.$Z$5]*MAGNET([.O$24]+[.$BB25])+[.P$30]*[.$Z$5]*MAGNET([.P$24]+[.$BB25])+[.Q$30]*[.$Z$5]*MAGNET([.Q$24]+[.$BB25])+[.R$30]*[.$Z$5]*MAGNET([.R$24]+[.$BB25])+[.S$30]*[.$Z$5]*MAGNET([.S$24]+[.$BB25])+[.T$30]*[.$Z$5]*MAGNET([.T$24]+[.$BB25])+[.U$30]*[.$Z$5]*MAGNET([.U$24]+[.$BB25])+[.V$30]*[.$Z$5]*MAGNET([.V$24]+[.$BB25])+[.W$30]*[.$Z$5]*MAGNET([.W$24]+[.$BB25])+[.X$30]*[.$Z$5]*MAGNET([.X$24]+[.$BB25])+[.Y$30]*[.$Z$5]*MAGNET([.Y$24]+[.$BB25])+[.Z$30]*[.$Z$5]*MAGNET([.Z$24]+[.$BB25])+[.AA$30]*[.$Z$5]*MAGNET([.AA$24]+[.$BB25])+[.AB$30]*[.$Z$5]*MAGNET([.AB$24]+[.$BB25])+[.AC$30]*[.$Z$5]*MAGNET([.AC$24]+[.$BB25])+[.AD$30]*[.$Z$5]*MAGNET([.AD$24]+[.$BB25])+[.AE$30]*[.$Z$5]*MAGNET([.AE$24]+[.$BB25])+[.AF$30]*[.$Z$5]*MAGNET([.AF$24]+[.$BB25])+[.AG$30]*[.$Z$5]*MAGNET([.AG$24]+[.$BB25])+[.D$30]*[.$Z$5]*MAGNET([.D$24]+[.$BB25])+[.AH$30]*[.$Z$5]*MAGNET([.AH$24]+[.BB25]) +[.AI$30]*[.$Z$5]*MAGNET([.AI$24]+[.BB25]) +[.AJ$30]*[.$Z$5]*MAGNET([.AJ$24]+[.BB25]) +[.AK$30]*[.$Z$5]*MAGNET([.AK$24]+[.BB25]) +[.AL$30]*[.$Z$5]*MAGNET([.AL$24]+[.BB25]) +[.AM$30]*[.$Z$5]*MAGNET([.AM$24]+[.BB25]) +[.AN$30]*[.$Z$5]*MAGNET([.AN$24]+[.BB25]) +[.AO$30]*[.$Z$5]*MAGNET([.AO$24]+[.BB25]) +[.AP$30]*[.$Z$5]*MAGNET([.AP$24]+[.$BB25])&#10;+[.AQ$30]*[.$Z$5]*MAGNET([.AQ$24]+[.$BB25])&#10;+[.AR$30]*[.$Z$5]*MAGNET([.AR$24]+[.$BB25])&#10;+[.AS$30]*[.$Z$5]*MAGNET([.AS$24]+[.$BB25])&#10;+[.AT$30]*[.$Z$5]*MAGNET([.AT$24]+[.$BB25])&#10;+[.AU$30]*[.$Z$5]*MAGNET([.AU$24]+[.$BB25])&#10;+[.AV$30]*[.$Z$5]*MAGNET([.AV$24]+[.$BB25])&#10;+[.AW$30]*[.$Z$5]*MAGNET([.AW$24]+[.$BB25])&#10;+[.AX$30]*[.$Z$5]*MAGNET([.AX$24]+[.$BB25])&#10;+[.AY$30]*[.$Z$5]*MAGNET([.AY$24]+[.$BB25]) +RAND()*[.$BH$13]" office:value-type="float" office:value="0" calcext:value-type="float">
            <text:p>0</text:p>
          </table:table-cell>
          <table:table-cell table:style-name="ce71" table:formula="of:=[.E$31]*[.$Z$5]*MAGNET([.E$24]+[.$BB25])+[.F$31]*[.$Z$5]*MAGNET([.F$24]+[.$BB25])+[.G$31]*[.$Z$5]*MAGNET([.G$24]+[.$BB25])+[.H$31]*[.$Z$5]*MAGNET([.H$24]+[.$BB25])+[.I$31]*[.$Z$5]*MAGNET([.I$24]+[.$BB25])+[.J$31]*[.$Z$5]*MAGNET([.J$24]+[.$BB25])+[.K$31]*[.$Z$5]*MAGNET([.K$24]+[.$BB25])+[.L$31]*[.$Z$5]*MAGNET([.L$24]+[.$BB25])+[.M$31]*[.$Z$5]*MAGNET([.M$24]+[.$BB25])+[.N$31]*[.$Z$5]*MAGNET([.N$24]+[.$BB25])+[.O$31]*[.$Z$5]*MAGNET([.O$24]+[.$BB25])+[.P$31]*[.$Z$5]*MAGNET([.P$24]+[.$BB25])+[.Q$31]*[.$Z$5]*MAGNET([.Q$24]+[.$BB25])+[.R$31]*[.$Z$5]*MAGNET([.R$24]+[.$BB25])+[.S$31]*[.$Z$5]*MAGNET([.S$24]+[.$BB25])+[.T$31]*[.$Z$5]*MAGNET([.T$24]+[.$BB25])+[.U$31]*[.$Z$5]*MAGNET([.U$24]+[.$BB25])+[.V$31]*[.$Z$5]*MAGNET([.V$24]+[.$BB25])+[.W$31]*[.$Z$5]*MAGNET([.W$24]+[.$BB25])+[.X$31]*[.$Z$5]*MAGNET([.X$24]+[.$BB25])+[.Y$31]*[.$Z$5]*MAGNET([.Y$24]+[.$BB25])+[.Z$31]*[.$Z$5]*MAGNET([.Z$24]+[.$BB25])+[.AA$31]*[.$Z$5]*MAGNET([.AA$24]+[.$BB25])+[.AB$31]*[.$Z$5]*MAGNET([.AB$24]+[.$BB25])+[.AC$31]*[.$Z$5]*MAGNET([.AC$24]+[.$BB25])+[.AD$31]*[.$Z$5]*MAGNET([.AD$24]+[.$BB25])+[.AE$31]*[.$Z$5]*MAGNET([.AE$24]+[.$BB25])+[.AF$31]*[.$Z$5]*MAGNET([.AF$24]+[.$BB25])+[.AG$31]*[.$Z$5]*MAGNET([.AG$24]+[.$BB25])+[.D$31]*[.$Z$5]*MAGNET([.D$24]+[.$BB25])+[.AH$31]*[.$Z$5]*MAGNET([.AH$24]+[.BB25]) +[.AI$31]*[.$Z$5]*MAGNET([.AI$24]+[.BB25]) +[.AJ$31]*[.$Z$5]*MAGNET([.AJ$24]+[.BB25]) +[.AK$31]*[.$Z$5]*MAGNET([.AK$24]+[.BB25]) +[.AL$31]*[.$Z$5]*MAGNET([.AL$24]+[.BB25]) +[.AM$31]*[.$Z$5]*MAGNET([.AM$24]+[.BB25]) +[.AN$31]*[.$Z$5]*MAGNET([.AN$24]+[.BB25]) +[.AO$31]*[.$Z$5]*MAGNET([.AO$24]+[.BB25]) +[.AP$31]*[.$Z$5]*MAGNET([.AP$24]+[.$BB25])&#10;+[.AQ$31]*[.$Z$5]*MAGNET([.AQ$24]+[.$BB25])&#10;+[.AR$31]*[.$Z$5]*MAGNET([.AR$24]+[.$BB25])&#10;+[.AS$31]*[.$Z$5]*MAGNET([.AS$24]+[.$BB25])&#10;+[.AT$31]*[.$Z$5]*MAGNET([.AT$24]+[.$BB25])&#10;+[.AU$31]*[.$Z$5]*MAGNET([.AU$24]+[.$BB25])&#10;+[.AV$31]*[.$Z$5]*MAGNET([.AV$24]+[.$BB25])&#10;+[.AW$31]*[.$Z$5]*MAGNET([.AW$24]+[.$BB25])&#10;+[.AX$31]*[.$Z$5]*MAGNET([.AX$24]+[.$BB25])&#10;+[.AY$31]*[.$Z$5]*MAGNET([.AY$24]+[.$BB25]) +RAND()*[.$BI$13]" office:value-type="float" office:value="0" calcext:value-type="float">
            <text:p>0</text:p>
          </table:table-cell>
          <table:table-cell table:style-name="ce71" table:formula="of:=[.E$32]*[.$Z$5]*MAGNET([.E$24]+[.$BB25])+[.F$32]*[.$Z$5]*MAGNET([.F$24]+[.$BB25])+[.G$32]*[.$Z$5]*MAGNET([.G$24]+[.$BB25])+[.H$32]*[.$Z$5]*MAGNET([.H$24]+[.$BB25])+[.I$32]*[.$Z$5]*MAGNET([.I$24]+[.$BB25])+[.J$32]*[.$Z$5]*MAGNET([.J$24]+[.$BB25])+[.K$32]*[.$Z$5]*MAGNET([.K$24]+[.$BB25])+[.L$32]*[.$Z$5]*MAGNET([.L$24]+[.$BB25])+[.M$32]*[.$Z$5]*MAGNET([.M$24]+[.$BB25])+[.N$32]*[.$Z$5]*MAGNET([.N$24]+[.$BB25])+[.O$32]*[.$Z$5]*MAGNET([.O$24]+[.$BB25])+[.P$32]*[.$Z$5]*MAGNET([.P$24]+[.$BB25])+[.Q$32]*[.$Z$5]*MAGNET([.Q$24]+[.$BB25])+[.R$32]*[.$Z$5]*MAGNET([.R$24]+[.$BB25])+[.S$32]*[.$Z$5]*MAGNET([.S$24]+[.$BB25])+[.T$32]*[.$Z$5]*MAGNET([.T$24]+[.$BB25])+[.U$32]*[.$Z$5]*MAGNET([.U$24]+[.$BB25])+[.V$32]*[.$Z$5]*MAGNET([.V$24]+[.$BB25])+[.W$32]*[.$Z$5]*MAGNET([.W$24]+[.$BB25])+[.X$32]*[.$Z$5]*MAGNET([.X$24]+[.$BB25])+[.Y$32]*[.$Z$5]*MAGNET([.Y$24]+[.$BB25])+[.Z$32]*[.$Z$5]*MAGNET([.Z$24]+[.$BB25])+[.AA$32]*[.$Z$5]*MAGNET([.AA$24]+[.$BB25])+[.AB$32]*[.$Z$5]*MAGNET([.AB$24]+[.$BB25])+[.AC$32]*[.$Z$5]*MAGNET([.AC$24]+[.$BB25])+[.AD$32]*[.$Z$5]*MAGNET([.AD$24]+[.$BB25])+[.AE$32]*[.$Z$5]*MAGNET([.AE$24]+[.$BB25])+[.AF$32]*[.$Z$5]*MAGNET([.AF$24]+[.$BB25])+[.AG$32]*[.$Z$5]*MAGNET([.AG$24]+[.$BB25])+[.D$32]*[.$Z$5]*MAGNET([.D$24]+[.$BB25])+[.AH$32]*[.$Z$5]*MAGNET([.AH$24]+[.BB25]) +[.AI$32]*[.$Z$5]*MAGNET([.AI$24]+[.BB25]) +[.AJ$32]*[.$Z$5]*MAGNET([.AJ$24]+[.BB25]) +[.AK$32]*[.$Z$5]*MAGNET([.AK$24]+[.BB25]) +[.AL$32]*[.$Z$5]*MAGNET([.AL$24]+[.BB25]) +[.AM$32]*[.$Z$5]*MAGNET([.AM$24]+[.BB25]) +[.AN$32]*[.$Z$5]*MAGNET([.AN$24]+[.BB25]) +[.AO$32]*[.$Z$5]*MAGNET([.AO$24]+[.BB25]) +[.AP$32]*[.$Z$5]*MAGNET([.AP$24]+[.$BB25])&#10;+[.AQ$32]*[.$Z$5]*MAGNET([.AQ$24]+[.$BB25])&#10;+[.AR$32]*[.$Z$5]*MAGNET([.AR$24]+[.$BB25])&#10;+[.AS$32]*[.$Z$5]*MAGNET([.AS$24]+[.$BB25])&#10;+[.AT$32]*[.$Z$5]*MAGNET([.AT$24]+[.$BB25])&#10;+[.AU$32]*[.$Z$5]*MAGNET([.AU$24]+[.$BB25])&#10;+[.AV$32]*[.$Z$5]*MAGNET([.AV$24]+[.$BB25])&#10;+[.AW$32]*[.$Z$5]*MAGNET([.AW$24]+[.$BB25])&#10;+[.AX$32]*[.$Z$5]*MAGNET([.AX$24]+[.$BB25])&#10;+[.AY$32]*[.$Z$5]*MAGNET([.AY$24]+[.$BB2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[.D39]-[.D40]" office:value-type="float" office:value="0" calcext:value-type="float">
            <text:p>0</text:p>
          </table:table-cell>
          <table:table-cell table:formula="of:=[.E39]-[.E40]" office:value-type="float" office:value="0" calcext:value-type="float">
            <text:p>0</text:p>
          </table:table-cell>
          <table:table-cell table:formula="of:=[.F39]-[.F40]" office:value-type="float" office:value="0" calcext:value-type="float">
            <text:p>0</text:p>
          </table:table-cell>
          <table:table-cell table:formula="of:=[.G39]-[.G40]" office:value-type="float" office:value="0" calcext:value-type="float">
            <text:p>0</text:p>
          </table:table-cell>
          <table:table-cell table:formula="of:=[.H39]-[.H40]" office:value-type="float" office:value="0" calcext:value-type="float">
            <text:p>0</text:p>
          </table:table-cell>
          <table:table-cell table:formula="of:=[.I39]-[.I40]" office:value-type="float" office:value="4" calcext:value-type="float">
            <text:p>4</text:p>
          </table:table-cell>
          <table:table-cell table:formula="of:=[.J39]-[.J40]" office:value-type="float" office:value="4" calcext:value-type="float">
            <text:p>4</text:p>
          </table:table-cell>
          <table:table-cell table:formula="of:=[.K39]-[.K40]" office:value-type="float" office:value="2" calcext:value-type="float">
            <text:p>2</text:p>
          </table:table-cell>
          <table:table-cell table:formula="of:=[.L39]-[.L40]" office:value-type="float" office:value="0" calcext:value-type="float">
            <text:p>0</text:p>
          </table:table-cell>
          <table:table-cell table:formula="of:=[.M39]-[.M40]" office:value-type="float" office:value="0" calcext:value-type="float">
            <text:p>0</text:p>
          </table:table-cell>
          <table:table-cell table:formula="of:=[.N39]-[.N40]" office:value-type="float" office:value="0" calcext:value-type="float">
            <text:p>0</text:p>
          </table:table-cell>
          <table:table-cell table:formula="of:=[.O39]-[.O40]" office:value-type="float" office:value="0" calcext:value-type="float">
            <text:p>0</text:p>
          </table:table-cell>
          <table:table-cell table:formula="of:=[.P39]-[.P40]" office:value-type="float" office:value="-2" calcext:value-type="float">
            <text:p>-2</text:p>
          </table:table-cell>
          <table:table-cell table:formula="of:=[.Q39]-[.Q40]" office:value-type="float" office:value="-4" calcext:value-type="float">
            <text:p>-4</text:p>
          </table:table-cell>
          <table:table-cell table:formula="of:=[.R39]-[.R40]" office:value-type="float" office:value="-4" calcext:value-type="float">
            <text:p>-4</text:p>
          </table:table-cell>
          <table:table-cell table:formula="of:=[.S39]-[.S40]" office:value-type="float" office:value="0" calcext:value-type="float">
            <text:p>0</text:p>
          </table:table-cell>
          <table:table-cell table:formula="of:=[.T39]-[.T40]" office:value-type="float" office:value="0" calcext:value-type="float">
            <text:p>0</text:p>
          </table:table-cell>
          <table:table-cell table:formula="of:=[.U39]-[.U40]" office:value-type="float" office:value="0" calcext:value-type="float">
            <text:p>0</text:p>
          </table:table-cell>
          <table:table-cell table:formula="of:=[.V39]-[.V40]" office:value-type="float" office:value="0" calcext:value-type="float">
            <text:p>0</text:p>
          </table:table-cell>
          <table:table-cell table:formula="of:=[.W39]-[.W40]" office:value-type="float" office:value="0" calcext:value-type="float">
            <text:p>0</text:p>
          </table:table-cell>
          <table:table-cell table:formula="of:=[.X39]-[.X40]" office:value-type="float" office:value="0" calcext:value-type="float">
            <text:p>0</text:p>
          </table:table-cell>
          <table:table-cell table:formula="of:=[.Y39]-[.Y40]" office:value-type="float" office:value="0" calcext:value-type="float">
            <text:p>0</text:p>
          </table:table-cell>
          <table:table-cell table:formula="of:=[.Z39]-[.Z40]" office:value-type="float" office:value="2" calcext:value-type="float">
            <text:p>2</text:p>
          </table:table-cell>
          <table:table-cell table:formula="of:=[.AA39]-[.AA40]" office:value-type="float" office:value="0" calcext:value-type="float">
            <text:p>0</text:p>
          </table:table-cell>
          <table:table-cell table:formula="of:=[.AB39]-[.AB40]" office:value-type="float" office:value="0" calcext:value-type="float">
            <text:p>0</text:p>
          </table:table-cell>
          <table:table-cell table:formula="of:=[.AC39]-[.AC40]" office:value-type="float" office:value="0" calcext:value-type="float">
            <text:p>0</text:p>
          </table:table-cell>
          <table:table-cell table:formula="of:=[.AD39]-[.AD40]" office:value-type="float" office:value="0" calcext:value-type="float">
            <text:p>0</text:p>
          </table:table-cell>
          <table:table-cell table:formula="of:=[.AE39]-[.AE40]" office:value-type="float" office:value="-2" calcext:value-type="float">
            <text:p>-2</text:p>
          </table:table-cell>
          <table:table-cell table:formula="of:=[.AF39]-[.AF40]" office:value-type="float" office:value="0" calcext:value-type="float">
            <text:p>0</text:p>
          </table:table-cell>
          <table:table-cell table:formula="of:=[.AG39]-[.AG40]" office:value-type="float" office:value="-1" calcext:value-type="float">
            <text:p>-1</text:p>
          </table:table-cell>
          <table:table-cell table:formula="of:=[.AH39]-[.AH40]" office:value-type="float" office:value="0" calcext:value-type="float">
            <text:p>0</text:p>
          </table:table-cell>
          <table:table-cell table:formula="of:=[.AI39]-[.AI40]" office:value-type="float" office:value="0" calcext:value-type="float">
            <text:p>0</text:p>
          </table:table-cell>
          <table:table-cell table:formula="of:=[.AJ39]-[.AJ40]" office:value-type="float" office:value="0" calcext:value-type="float">
            <text:p>0</text:p>
          </table:table-cell>
          <table:table-cell table:formula="of:=[.AK39]-[.AK40]" office:value-type="float" office:value="-4" calcext:value-type="float">
            <text:p>-4</text:p>
          </table:table-cell>
          <table:table-cell table:formula="of:=[.AL39]-[.AL40]" office:value-type="float" office:value="-4" calcext:value-type="float">
            <text:p>-4</text:p>
          </table:table-cell>
          <table:table-cell table:formula="of:=[.AM39]-[.AM40]" office:value-type="float" office:value="0" calcext:value-type="float">
            <text:p>0</text:p>
          </table:table-cell>
          <table:table-cell table:formula="of:=[.AN39]-[.AN40]" office:value-type="float" office:value="0" calcext:value-type="float">
            <text:p>0</text:p>
          </table:table-cell>
          <table:table-cell table:formula="of:=[.AO39]-[.AO40]" office:value-type="float" office:value="0" calcext:value-type="float">
            <text:p>0</text:p>
          </table:table-cell>
          <table:table-cell table:formula="of:=[.AP39]-[.AP40]" office:value-type="float" office:value="0" calcext:value-type="float">
            <text:p>0</text:p>
          </table:table-cell>
          <table:table-cell table:formula="of:=[.AQ39]-[.AQ40]" office:value-type="float" office:value="0" calcext:value-type="float">
            <text:p>0</text:p>
          </table:table-cell>
          <table:table-cell table:formula="of:=[.AR39]-[.AR40]" office:value-type="float" office:value="0" calcext:value-type="float">
            <text:p>0</text:p>
          </table:table-cell>
          <table:table-cell table:formula="of:=[.AS39]-[.AS40]" office:value-type="float" office:value="0" calcext:value-type="float">
            <text:p>0</text:p>
          </table:table-cell>
          <table:table-cell table:formula="of:=[.AT39]-[.AT40]" office:value-type="float" office:value="0" calcext:value-type="float">
            <text:p>0</text:p>
          </table:table-cell>
          <table:table-cell table:formula="of:=[.AU39]-[.AU40]" office:value-type="float" office:value="0" calcext:value-type="float">
            <text:p>0</text:p>
          </table:table-cell>
          <table:table-cell table:formula="of:=[.AV39]-[.AV40]" office:value-type="float" office:value="0" calcext:value-type="float">
            <text:p>0</text:p>
          </table:table-cell>
          <table:table-cell table:formula="of:=[.AW39]-[.AW40]" office:value-type="float" office:value="0" calcext:value-type="float">
            <text:p>0</text:p>
          </table:table-cell>
          <table:table-cell table:formula="of:=[.AX39]-[.AX40]" office:value-type="float" office:value="0" calcext:value-type="float">
            <text:p>0</text:p>
          </table:table-cell>
          <table:table-cell table:formula="of:=[.AY39]-[.AY40]" office:value-type="float" office:value="0" calcext:value-type="float">
            <text:p>0</text:p>
          </table:table-cell>
          <table:table-cell/>
          <table:table-cell table:formula="of:=[.BA25]+0.002" office:value-type="float" office:value="0.022" calcext:value-type="float">
            <text:p>0.022</text:p>
          </table:table-cell>
          <table:table-cell table:formula="of:=[.BA26]*[.$D$6]" office:value-type="float" office:value="1.10584061406361" calcext:value-type="float">
            <text:p>1.106</text:p>
          </table:table-cell>
          <table:table-cell table:formula="of:=[.D$25]*[.$Z$5]*MAGNET([.D$24]+[.BB26])+[.E$25]*[.$Z$5]*MAGNET([.E$24]+[.BB26])+[.F$25]*[.$Z$5]*MAGNET([.F$24]+[.BB26])+[.G$25]*[.$Z$5]*MAGNET([.G$24]+[.BB26])+[.H$25]*[.$Z$5]*MAGNET([.H$24]+[.BB26])+[.I$25]*[.$Z$5]*MAGNET([.I$24]+[.BB26])+[.J$25]*[.$Z$5]*MAGNET([.J$24]+[.BB26])+[.K$25]*[.$Z$5]*MAGNET([.K$24]+[.BB26])+[.L$25]*[.$Z$5]*MAGNET([.L$24]+[.BB26])+[.M$25]*[.$Z$5]*MAGNET([.M$24]+[.BB26])+[.N$25]*[.$Z$5]*MAGNET([.N$24]+[.BB26])+[.O$25]*[.$Z$5]*MAGNET([.O$24]+[.BB26])+[.P$25]*[.$Z$5]*MAGNET([.P$24]+[.BB26])+[.Q$25]*[.$Z$5]*MAGNET([.Q$24]+[.BB26])+[.R$25]*[.$Z$5]*MAGNET([.R$24]+[.BB26])+[.S$25]*[.$Z$5]*MAGNET([.S$24]+[.BB26])+[.T$25]*[.$Z$5]*MAGNET([.T$24]+[.BB26])+[.U$25]*[.$Z$5]*MAGNET([.U$24]+[.BB26])+[.V$25]*[.$Z$5]*MAGNET([.V$24]+[.BB26])+[.W$25]*[.$Z$5]*MAGNET([.W$24]+[.BB26])+[.X$25]*[.$Z$5]*MAGNET([.X$24]+[.BB26])+[.Y$25]*[.$Z$5]*MAGNET([.Y$24]+[.BB26])+[.Z$25]*[.$Z$5]*MAGNET([.Z$24]+[.BB26])+[.AA$25]*[.$Z$5]*MAGNET([.AA$24]+[.BB26])+[.AB$25]*[.$Z$5]*MAGNET([.AB$24]+[.BB26])+[.AC$25]*[.$Z$5]*MAGNET([.AC$24]+[.BB26])+[.AD$25]*[.$Z$5]*MAGNET([.AD$24]+[.BB26])+[.AE$25]*[.$Z$5]*MAGNET([.AE$24]+[.BB26])+[.AF$25]*[.$Z$5]*MAGNET([.AF$24]+[.BB26])+[.AG$25]*[.$Z$5]*MAGNET([.AG$24]+[.BB26])+[.AH$25]*[.$Z$5]*MAGNET([.AH$24]+[.BB26]) +[.AI$25]*[.$Z$5]*MAGNET([.AI$24]+[.BB26]) +[.AJ$25]*[.$Z$5]*MAGNET([.AJ$24]+[.BB26]) +[.AK$25]*[.$Z$5]*MAGNET([.AK$24]+[.BB26]) +[.AL$25]*[.$Z$5]*MAGNET([.AL$24]+[.BB26]) +[.AM$25]*[.$Z$5]*MAGNET([.AM$24]+[.BB26]) +[.AN$25]*[.$Z$5]*MAGNET([.AN$24]+[.BB26]) +[.AO$25]*[.$Z$5]*MAGNET([.AO$24]+[.BB26])+RAND()*[.$BC$13]+[.AP$25]*[.$Z$5]*MAGNET([.AP$24]+[.BB26])&#10;+[.AQ$25]*[.$Z$5]*MAGNET([.AQ$24]+[.BB26])&#10;+[.AR$25]*[.$Z$5]*MAGNET([.AR$24]+[.BB26])&#10;+[.AS$25]*[.$Z$5]*MAGNET([.AS$24]+[.BB26])&#10;+[.AT$25]*[.$Z$5]*MAGNET([.AT$24]+[.BB26])&#10;+[.AU$25]*[.$Z$5]*MAGNET([.AU$24]+[.BB26])&#10;+[.AV$25]*[.$Z$5]*MAGNET([.AV$24]+[.BB26])&#10;+[.AW$25]*[.$Z$5]*MAGNET([.AW$24]+[.BB26])&#10;+[.AX$25]*[.$Z$5]*MAGNET([.AX$24]+[.BB26])&#10;+[.AY$25]*[.$Z$5]*MAGNET([.AY$24]+[.BB26])" office:value-type="float" office:value="78.8665085145154" calcext:value-type="float">
            <text:p>78.87</text:p>
          </table:table-cell>
          <table:table-cell table:style-name="ce70" table:formula="of:=[.E$26]*[.$Z$5]*MAGNET([.E$24]+[.$BB26])+[.F$26]*[.$Z$5]*MAGNET([.F$24]+[.$BB26])+[.G$26]*[.$Z$5]*MAGNET([.G$24]+[.$BB26])+[.H$26]*[.$Z$5]*MAGNET([.H$24]+[.$BB26])+[.I$26]*[.$Z$5]*MAGNET([.I$24]+[.$BB26])+[.J$26]*[.$Z$5]*MAGNET([.J$24]+[.$BB26])+[.K$26]*[.$Z$5]*MAGNET([.K$24]+[.$BB26])+[.L$26]*[.$Z$5]*MAGNET([.L$24]+[.$BB26])+[.M$26]*[.$Z$5]*MAGNET([.M$24]+[.$BB26])+[.N$26]*[.$Z$5]*MAGNET([.N$24]+[.$BB26])+[.O$26]*[.$Z$5]*MAGNET([.O$24]+[.$BB26])+[.P$26]*[.$Z$5]*MAGNET([.P$24]+[.$BB26])+[.Q$26]*[.$Z$5]*MAGNET([.Q$24]+[.$BB26])+[.R$26]*[.$Z$5]*MAGNET([.R$24]+[.$BB26])+[.S$26]*[.$Z$5]*MAGNET([.S$24]+[.$BB26])+[.T$26]*[.$Z$5]*MAGNET([.T$24]+[.$BB26])+[.U$26]*[.$Z$5]*MAGNET([.U$24]+[.$BB26])+[.V$26]*[.$Z$5]*MAGNET([.V$24]+[.$BB26])+[.W$26]*[.$Z$5]*MAGNET([.W$24]+[.$BB26])+[.X$26]*[.$Z$5]*MAGNET([.X$24]+[.$BB26])+[.Y$26]*[.$Z$5]*MAGNET([.Y$24]+[.$BB26])+[.Z$26]*[.$Z$5]*MAGNET([.Z$24]+[.$BB26])+[.AA$26]*[.$Z$5]*MAGNET([.AA$24]+[.$BB26])+[.AB$26]*[.$Z$5]*MAGNET([.AB$24]+[.$BB26])+[.AC$26]*[.$Z$5]*MAGNET([.AC$24]+[.$BB26])+[.AD$26]*[.$Z$5]*MAGNET([.AD$24]+[.$BB26])+[.AE$26]*[.$Z$5]*MAGNET([.AE$24]+[.$BB26])+[.AF$26]*[.$Z$5]*MAGNET([.AF$24]+[.$BB26])+[.AG$26]*[.$Z$5]*MAGNET([.AG$24]+[.$BB26])+[.D$26]*[.$Z$5]*MAGNET([.D$24]+[.$BB26])+[.AH$26]*[.$Z$5]*MAGNET([.AH$24]+[.BB26]) +[.AI$26]*[.$Z$5]*MAGNET([.AI$24]+[.BB26]) +[.AJ$26]*[.$Z$5]*MAGNET([.AJ$24]+[.BB26]) +[.AK$26]*[.$Z$5]*MAGNET([.AK$24]+[.BB26]) +[.AL$26]*[.$Z$5]*MAGNET([.AL$24]+[.BB26]) +[.AM$26]*[.$Z$5]*MAGNET([.AM$24]+[.BB26]) +[.AN$26]*[.$Z$5]*MAGNET([.AN$24]+[.BB26]) +[.AO$26]*[.$Z$5]*MAGNET([.AO$24]+[.BB26]) +[.AP$26]*[.$Z$5]*MAGNET([.AP$24]+[.$BB26])&#10;+[.AQ$26]*[.$Z$5]*MAGNET([.AQ$24]+[.$BB26])&#10;+[.AR$26]*[.$Z$5]*MAGNET([.AR$24]+[.$BB26])&#10;+[.AS$26]*[.$Z$5]*MAGNET([.AS$24]+[.$BB26])&#10;+[.AT$26]*[.$Z$5]*MAGNET([.AT$24]+[.$BB26])&#10;+[.AU$26]*[.$Z$5]*MAGNET([.AU$24]+[.$BB26])&#10;+[.AV$26]*[.$Z$5]*MAGNET([.AV$24]+[.$BB26])&#10;+[.AW$26]*[.$Z$5]*MAGNET([.AW$24]+[.$BB26])&#10;+[.AX$26]*[.$Z$5]*MAGNET([.AX$24]+[.$BB26])&#10;+[.AY$26]*[.$Z$5]*MAGNET([.AY$24]+[.$BB26]) +RAND()*[.$BD$13]" office:value-type="float" office:value="25.3387429084674" calcext:value-type="float">
            <text:p>25.34</text:p>
          </table:table-cell>
          <table:table-cell table:style-name="ce71" table:formula="of:=[.E$27]*[.$Z$5]*MAGNET([.E$24]+[.$BB26])+[.F$27]*[.$Z$5]*MAGNET([.F$24]+[.$BB26])+[.G$27]*[.$Z$5]*MAGNET([.G$24]+[.$BB26])+[.H$27]*[.$Z$5]*MAGNET([.H$24]+[.$BB26])+[.I$27]*[.$Z$5]*MAGNET([.I$24]+[.$BB26])+[.J$27]*[.$Z$5]*MAGNET([.J$24]+[.$BB26])+[.K$27]*[.$Z$5]*MAGNET([.K$24]+[.$BB26])+[.L$27]*[.$Z$5]*MAGNET([.L$24]+[.$BB26])+[.M$27]*[.$Z$5]*MAGNET([.M$24]+[.$BB26])+[.N$27]*[.$Z$5]*MAGNET([.N$24]+[.$BB26])+[.O$27]*[.$Z$5]*MAGNET([.O$24]+[.$BB26])+[.P$27]*[.$Z$5]*MAGNET([.P$24]+[.$BB26])+[.Q$27]*[.$Z$5]*MAGNET([.Q$24]+[.$BB26])+[.R$27]*[.$Z$5]*MAGNET([.R$24]+[.$BB26])+[.S$27]*[.$Z$5]*MAGNET([.S$24]+[.$BB26])+[.T$27]*[.$Z$5]*MAGNET([.T$24]+[.$BB26])+[.U$27]*[.$Z$5]*MAGNET([.U$24]+[.$BB26])+[.V$27]*[.$Z$5]*MAGNET([.V$24]+[.$BB26])+[.W$27]*[.$Z$5]*MAGNET([.W$24]+[.$BB26])+[.X$27]*[.$Z$5]*MAGNET([.X$24]+[.$BB26])+[.Y$27]*[.$Z$5]*MAGNET([.Y$24]+[.$BB26])+[.Z$27]*[.$Z$5]*MAGNET([.Z$24]+[.$BB26])+[.AA$27]*[.$Z$5]*MAGNET([.AA$24]+[.$BB26])+[.AB$27]*[.$Z$5]*MAGNET([.AB$24]+[.$BB26])+[.AC$27]*[.$Z$5]*MAGNET([.AC$24]+[.$BB26])+[.AD$27]*[.$Z$5]*MAGNET([.AD$24]+[.$BB26])+[.AE$27]*[.$Z$5]*MAGNET([.AE$24]+[.$BB26])+[.AF$27]*[.$Z$5]*MAGNET([.AF$24]+[.$BB26])+[.AG$27]*[.$Z$5]*MAGNET([.AG$24]+[.$BB26])+[.D$27]*[.$Z$5]*MAGNET([.D$24]+[.$BB26])+[.AH$27]*[.$Z$5]*MAGNET([.AH$24]+[.BB26]) +[.AI$27]*[.$Z$5]*MAGNET([.AI$24]+[.BB26]) +[.AJ$27]*[.$Z$5]*MAGNET([.AJ$24]+[.BB26]) +[.AK$27]*[.$Z$5]*MAGNET([.AK$24]+[.BB26]) +[.AL$27]*[.$Z$5]*MAGNET([.AL$24]+[.BB26]) +[.AM$27]*[.$Z$5]*MAGNET([.AM$24]+[.BB26]) +[.AN$27]*[.$Z$5]*MAGNET([.AN$24]+[.BB26]) +[.AO$27]*[.$Z$5]*MAGNET([.AO$24]+[.BB26]) +[.AP$27]*[.$Z$5]*MAGNET([.AP$24]+[.$BB26])&#10;+[.AQ$27]*[.$Z$5]*MAGNET([.AQ$24]+[.$BB26])&#10;+[.AR$27]*[.$Z$5]*MAGNET([.AR$24]+[.$BB26])&#10;+[.AS$27]*[.$Z$5]*MAGNET([.AS$24]+[.$BB26])&#10;+[.AT$27]*[.$Z$5]*MAGNET([.AT$24]+[.$BB26])&#10;+[.AU$27]*[.$Z$5]*MAGNET([.AU$24]+[.$BB26])&#10;+[.AV$27]*[.$Z$5]*MAGNET([.AV$24]+[.$BB26])&#10;+[.AW$27]*[.$Z$5]*MAGNET([.AW$24]+[.$BB26])&#10;+[.AX$27]*[.$Z$5]*MAGNET([.AX$24]+[.$BB26])&#10;+[.AY$27]*[.$Z$5]*MAGNET([.AY$24]+[.$BB26]) +RAND()*[.$BE$13]" office:value-type="float" office:value="-122.864142308402" calcext:value-type="float">
            <text:p>-122.864142308402</text:p>
          </table:table-cell>
          <table:table-cell table:style-name="ce71" table:formula="of:=[.E$28]*[.$Z$5]*MAGNET([.E$24]+[.$BB26])+[.F$28]*[.$Z$5]*MAGNET([.F$24]+[.$BB26])+[.G$28]*[.$Z$5]*MAGNET([.G$24]+[.$BB26])+[.H$28]*[.$Z$5]*MAGNET([.H$24]+[.$BB26])+[.I$28]*[.$Z$5]*MAGNET([.I$24]+[.$BB26])+[.J$28]*[.$Z$5]*MAGNET([.J$24]+[.$BB26])+[.K$28]*[.$Z$5]*MAGNET([.K$24]+[.$BB26])+[.L$28]*[.$Z$5]*MAGNET([.L$24]+[.$BB26])+[.M$28]*[.$Z$5]*MAGNET([.M$24]+[.$BB26])+[.N$28]*[.$Z$5]*MAGNET([.N$24]+[.$BB26])+[.O$28]*[.$Z$5]*MAGNET([.O$24]+[.$BB26])+[.P$28]*[.$Z$5]*MAGNET([.P$24]+[.$BB26])+[.Q$28]*[.$Z$5]*MAGNET([.Q$24]+[.$BB26])+[.R$28]*[.$Z$5]*MAGNET([.R$24]+[.$BB26])+[.S$28]*[.$Z$5]*MAGNET([.S$24]+[.$BB26])+[.T$28]*[.$Z$5]*MAGNET([.T$24]+[.$BB26])+[.U$28]*[.$Z$5]*MAGNET([.U$24]+[.$BB26])+[.V$28]*[.$Z$5]*MAGNET([.V$24]+[.$BB26])+[.W$28]*[.$Z$5]*MAGNET([.W$24]+[.$BB26])+[.X$28]*[.$Z$5]*MAGNET([.X$24]+[.$BB26])+[.Y$28]*[.$Z$5]*MAGNET([.Y$24]+[.$BB26])+[.Z$28]*[.$Z$5]*MAGNET([.Z$24]+[.$BB26])+[.AA$28]*[.$Z$5]*MAGNET([.AA$24]+[.$BB26])+[.AB$28]*[.$Z$5]*MAGNET([.AB$24]+[.$BB26])+[.AC$28]*[.$Z$5]*MAGNET([.AC$24]+[.$BB26])+[.AD$28]*[.$Z$5]*MAGNET([.AD$24]+[.$BB26])+[.AE$28]*[.$Z$5]*MAGNET([.AE$24]+[.$BB26])+[.AF$28]*[.$Z$5]*MAGNET([.AF$24]+[.$BB26])+[.AG$28]*[.$Z$5]*MAGNET([.AG$24]+[.$BB26])+[.D$28]*[.$Z$5]*MAGNET([.D$24]+[.$BB26])+[.AH$28]*[.$Z$5]*MAGNET([.AH$24]+[.BB26]) +[.AI$28]*[.$Z$5]*MAGNET([.AI$24]+[.BB26]) +[.AJ$28]*[.$Z$5]*MAGNET([.AJ$24]+[.BB26]) +[.AK$28]*[.$Z$5]*MAGNET([.AK$24]+[.BB26]) +[.AL$28]*[.$Z$5]*MAGNET([.AL$24]+[.BB26]) +[.AM$28]*[.$Z$5]*MAGNET([.AM$24]+[.BB26]) +[.AN$28]*[.$Z$5]*MAGNET([.AN$24]+[.BB26]) +[.AO$28]*[.$Z$5]*MAGNET([.AO$24]+[.BB26]) +[.AP$28]*[.$Z$5]*MAGNET([.AP$24]+[.$BB26])&#10;+[.AQ$28]*[.$Z$5]*MAGNET([.AQ$24]+[.$BB26])&#10;+[.AR$28]*[.$Z$5]*MAGNET([.AR$24]+[.$BB26])&#10;+[.AS$28]*[.$Z$5]*MAGNET([.AS$24]+[.$BB26])&#10;+[.AT$28]*[.$Z$5]*MAGNET([.AT$24]+[.$BB26])&#10;+[.AU$28]*[.$Z$5]*MAGNET([.AU$24]+[.$BB26])&#10;+[.AV$28]*[.$Z$5]*MAGNET([.AV$24]+[.$BB26])&#10;+[.AW$28]*[.$Z$5]*MAGNET([.AW$24]+[.$BB26])&#10;+[.AX$28]*[.$Z$5]*MAGNET([.AX$24]+[.$BB26])&#10;+[.AY$28]*[.$Z$5]*MAGNET([.AY$24]+[.$BB26]) +RAND()*[.$BF$13]" office:value-type="float" office:value="-18.033539600553" calcext:value-type="float">
            <text:p>-18.033539600553</text:p>
          </table:table-cell>
          <table:table-cell table:style-name="ce71" table:formula="of:=[.E$29]*[.$Z$5]*MAGNET([.E$24]+[.$BB26])+[.F$29]*[.$Z$5]*MAGNET([.F$24]+[.$BB26])+[.G$29]*[.$Z$5]*MAGNET([.G$24]+[.$BB26])+[.H$29]*[.$Z$5]*MAGNET([.H$24]+[.$BB26])+[.I$29]*[.$Z$5]*MAGNET([.I$24]+[.$BB26])+[.J$29]*[.$Z$5]*MAGNET([.J$24]+[.$BB26])+[.K$29]*[.$Z$5]*MAGNET([.K$24]+[.$BB26])+[.L$29]*[.$Z$5]*MAGNET([.L$24]+[.$BB26])+[.M$29]*[.$Z$5]*MAGNET([.M$24]+[.$BB26])+[.N$29]*[.$Z$5]*MAGNET([.N$24]+[.$BB26])+[.O$29]*[.$Z$5]*MAGNET([.O$24]+[.$BB26])+[.P$29]*[.$Z$5]*MAGNET([.P$24]+[.$BB26])+[.Q$29]*[.$Z$5]*MAGNET([.Q$24]+[.$BB26])+[.R$29]*[.$Z$5]*MAGNET([.R$24]+[.$BB26])+[.S$29]*[.$Z$5]*MAGNET([.S$24]+[.$BB26])+[.T$29]*[.$Z$5]*MAGNET([.T$24]+[.$BB26])+[.U$29]*[.$Z$5]*MAGNET([.U$24]+[.$BB26])+[.V$29]*[.$Z$5]*MAGNET([.V$24]+[.$BB26])+[.W$29]*[.$Z$5]*MAGNET([.W$24]+[.$BB26])+[.X$29]*[.$Z$5]*MAGNET([.X$24]+[.$BB26])+[.Y$29]*[.$Z$5]*MAGNET([.Y$24]+[.$BB26])+[.Z$29]*[.$Z$5]*MAGNET([.Z$24]+[.$BB26])+[.AA$29]*[.$Z$5]*MAGNET([.AA$24]+[.$BB26])+[.AB$29]*[.$Z$5]*MAGNET([.AB$24]+[.$BB26])+[.AC$29]*[.$Z$5]*MAGNET([.AC$24]+[.$BB26])+[.AD$29]*[.$Z$5]*MAGNET([.AD$24]+[.$BB26])+[.AE$29]*[.$Z$5]*MAGNET([.AE$24]+[.$BB26])+[.AF$29]*[.$Z$5]*MAGNET([.AF$24]+[.$BB26])+[.AG$29]*[.$Z$5]*MAGNET([.AG$24]+[.$BB26])+[.D$29]*[.$Z$5]*MAGNET([.D$24]+[.$BB26])+[.AH$29]*[.$Z$5]*MAGNET([.AH$24]+[.BB26]) +[.AI$29]*[.$Z$5]*MAGNET([.AI$24]+[.BB26]) +[.AJ$29]*[.$Z$5]*MAGNET([.AJ$24]+[.BB26]) +[.AK$29]*[.$Z$5]*MAGNET([.AK$24]+[.BB26]) +[.AL$29]*[.$Z$5]*MAGNET([.AL$24]+[.BB26]) +[.AM$29]*[.$Z$5]*MAGNET([.AM$24]+[.BB26]) +[.AN$29]*[.$Z$5]*MAGNET([.AN$24]+[.BB26]) +[.AO$29]*[.$Z$5]*MAGNET([.AO$24]+[.BB26]) +[.AP$29]*[.$Z$5]*MAGNET([.AP$24]+[.$BB26])&#10;+[.AQ$29]*[.$Z$5]*MAGNET([.AQ$24]+[.$BB26])&#10;+[.AR$29]*[.$Z$5]*MAGNET([.AR$24]+[.$BB26])&#10;+[.AS$29]*[.$Z$5]*MAGNET([.AS$24]+[.$BB26])&#10;+[.AT$29]*[.$Z$5]*MAGNET([.AT$24]+[.$BB26])&#10;+[.AU$29]*[.$Z$5]*MAGNET([.AU$24]+[.$BB26])&#10;+[.AV$29]*[.$Z$5]*MAGNET([.AV$24]+[.$BB26])&#10;+[.AW$29]*[.$Z$5]*MAGNET([.AW$24]+[.$BB26])&#10;+[.AX$29]*[.$Z$5]*MAGNET([.AX$24]+[.$BB26])&#10;+[.AY$29]*[.$Z$5]*MAGNET([.AY$24]+[.$BB26]) +RAND()*[.$BG$13]" office:value-type="float" office:value="47.0832942880144" calcext:value-type="float">
            <text:p>47.0832942880144</text:p>
          </table:table-cell>
          <table:table-cell table:style-name="ce71" table:formula="of:=[.E$30]*[.$Z$5]*MAGNET([.E$24]+[.$BB26])+[.F$30]*[.$Z$5]*MAGNET([.F$24]+[.$BB26])+[.G$30]*[.$Z$5]*MAGNET([.G$24]+[.$BB26])+[.H$30]*[.$Z$5]*MAGNET([.H$24]+[.$BB26])+[.I$30]*[.$Z$5]*MAGNET([.I$24]+[.$BB26])+[.J$30]*[.$Z$5]*MAGNET([.J$24]+[.$BB26])+[.K$30]*[.$Z$5]*MAGNET([.K$24]+[.$BB26])+[.L$30]*[.$Z$5]*MAGNET([.L$24]+[.$BB26])+[.M$30]*[.$Z$5]*MAGNET([.M$24]+[.$BB26])+[.N$30]*[.$Z$5]*MAGNET([.N$24]+[.$BB26])+[.O$30]*[.$Z$5]*MAGNET([.O$24]+[.$BB26])+[.P$30]*[.$Z$5]*MAGNET([.P$24]+[.$BB26])+[.Q$30]*[.$Z$5]*MAGNET([.Q$24]+[.$BB26])+[.R$30]*[.$Z$5]*MAGNET([.R$24]+[.$BB26])+[.S$30]*[.$Z$5]*MAGNET([.S$24]+[.$BB26])+[.T$30]*[.$Z$5]*MAGNET([.T$24]+[.$BB26])+[.U$30]*[.$Z$5]*MAGNET([.U$24]+[.$BB26])+[.V$30]*[.$Z$5]*MAGNET([.V$24]+[.$BB26])+[.W$30]*[.$Z$5]*MAGNET([.W$24]+[.$BB26])+[.X$30]*[.$Z$5]*MAGNET([.X$24]+[.$BB26])+[.Y$30]*[.$Z$5]*MAGNET([.Y$24]+[.$BB26])+[.Z$30]*[.$Z$5]*MAGNET([.Z$24]+[.$BB26])+[.AA$30]*[.$Z$5]*MAGNET([.AA$24]+[.$BB26])+[.AB$30]*[.$Z$5]*MAGNET([.AB$24]+[.$BB26])+[.AC$30]*[.$Z$5]*MAGNET([.AC$24]+[.$BB26])+[.AD$30]*[.$Z$5]*MAGNET([.AD$24]+[.$BB26])+[.AE$30]*[.$Z$5]*MAGNET([.AE$24]+[.$BB26])+[.AF$30]*[.$Z$5]*MAGNET([.AF$24]+[.$BB26])+[.AG$30]*[.$Z$5]*MAGNET([.AG$24]+[.$BB26])+[.D$30]*[.$Z$5]*MAGNET([.D$24]+[.$BB26])+[.AH$30]*[.$Z$5]*MAGNET([.AH$24]+[.BB26]) +[.AI$30]*[.$Z$5]*MAGNET([.AI$24]+[.BB26]) +[.AJ$30]*[.$Z$5]*MAGNET([.AJ$24]+[.BB26]) +[.AK$30]*[.$Z$5]*MAGNET([.AK$24]+[.BB26]) +[.AL$30]*[.$Z$5]*MAGNET([.AL$24]+[.BB26]) +[.AM$30]*[.$Z$5]*MAGNET([.AM$24]+[.BB26]) +[.AN$30]*[.$Z$5]*MAGNET([.AN$24]+[.BB26]) +[.AO$30]*[.$Z$5]*MAGNET([.AO$24]+[.BB26]) +[.AP$30]*[.$Z$5]*MAGNET([.AP$24]+[.$BB26])&#10;+[.AQ$30]*[.$Z$5]*MAGNET([.AQ$24]+[.$BB26])&#10;+[.AR$30]*[.$Z$5]*MAGNET([.AR$24]+[.$BB26])&#10;+[.AS$30]*[.$Z$5]*MAGNET([.AS$24]+[.$BB26])&#10;+[.AT$30]*[.$Z$5]*MAGNET([.AT$24]+[.$BB26])&#10;+[.AU$30]*[.$Z$5]*MAGNET([.AU$24]+[.$BB26])&#10;+[.AV$30]*[.$Z$5]*MAGNET([.AV$24]+[.$BB26])&#10;+[.AW$30]*[.$Z$5]*MAGNET([.AW$24]+[.$BB26])&#10;+[.AX$30]*[.$Z$5]*MAGNET([.AX$24]+[.$BB26])&#10;+[.AY$30]*[.$Z$5]*MAGNET([.AY$24]+[.$BB26]) +RAND()*[.$BH$13]" office:value-type="float" office:value="0" calcext:value-type="float">
            <text:p>0</text:p>
          </table:table-cell>
          <table:table-cell table:style-name="ce71" table:formula="of:=[.E$31]*[.$Z$5]*MAGNET([.E$24]+[.$BB26])+[.F$31]*[.$Z$5]*MAGNET([.F$24]+[.$BB26])+[.G$31]*[.$Z$5]*MAGNET([.G$24]+[.$BB26])+[.H$31]*[.$Z$5]*MAGNET([.H$24]+[.$BB26])+[.I$31]*[.$Z$5]*MAGNET([.I$24]+[.$BB26])+[.J$31]*[.$Z$5]*MAGNET([.J$24]+[.$BB26])+[.K$31]*[.$Z$5]*MAGNET([.K$24]+[.$BB26])+[.L$31]*[.$Z$5]*MAGNET([.L$24]+[.$BB26])+[.M$31]*[.$Z$5]*MAGNET([.M$24]+[.$BB26])+[.N$31]*[.$Z$5]*MAGNET([.N$24]+[.$BB26])+[.O$31]*[.$Z$5]*MAGNET([.O$24]+[.$BB26])+[.P$31]*[.$Z$5]*MAGNET([.P$24]+[.$BB26])+[.Q$31]*[.$Z$5]*MAGNET([.Q$24]+[.$BB26])+[.R$31]*[.$Z$5]*MAGNET([.R$24]+[.$BB26])+[.S$31]*[.$Z$5]*MAGNET([.S$24]+[.$BB26])+[.T$31]*[.$Z$5]*MAGNET([.T$24]+[.$BB26])+[.U$31]*[.$Z$5]*MAGNET([.U$24]+[.$BB26])+[.V$31]*[.$Z$5]*MAGNET([.V$24]+[.$BB26])+[.W$31]*[.$Z$5]*MAGNET([.W$24]+[.$BB26])+[.X$31]*[.$Z$5]*MAGNET([.X$24]+[.$BB26])+[.Y$31]*[.$Z$5]*MAGNET([.Y$24]+[.$BB26])+[.Z$31]*[.$Z$5]*MAGNET([.Z$24]+[.$BB26])+[.AA$31]*[.$Z$5]*MAGNET([.AA$24]+[.$BB26])+[.AB$31]*[.$Z$5]*MAGNET([.AB$24]+[.$BB26])+[.AC$31]*[.$Z$5]*MAGNET([.AC$24]+[.$BB26])+[.AD$31]*[.$Z$5]*MAGNET([.AD$24]+[.$BB26])+[.AE$31]*[.$Z$5]*MAGNET([.AE$24]+[.$BB26])+[.AF$31]*[.$Z$5]*MAGNET([.AF$24]+[.$BB26])+[.AG$31]*[.$Z$5]*MAGNET([.AG$24]+[.$BB26])+[.D$31]*[.$Z$5]*MAGNET([.D$24]+[.$BB26])+[.AH$31]*[.$Z$5]*MAGNET([.AH$24]+[.BB26]) +[.AI$31]*[.$Z$5]*MAGNET([.AI$24]+[.BB26]) +[.AJ$31]*[.$Z$5]*MAGNET([.AJ$24]+[.BB26]) +[.AK$31]*[.$Z$5]*MAGNET([.AK$24]+[.BB26]) +[.AL$31]*[.$Z$5]*MAGNET([.AL$24]+[.BB26]) +[.AM$31]*[.$Z$5]*MAGNET([.AM$24]+[.BB26]) +[.AN$31]*[.$Z$5]*MAGNET([.AN$24]+[.BB26]) +[.AO$31]*[.$Z$5]*MAGNET([.AO$24]+[.BB26]) +[.AP$31]*[.$Z$5]*MAGNET([.AP$24]+[.$BB26])&#10;+[.AQ$31]*[.$Z$5]*MAGNET([.AQ$24]+[.$BB26])&#10;+[.AR$31]*[.$Z$5]*MAGNET([.AR$24]+[.$BB26])&#10;+[.AS$31]*[.$Z$5]*MAGNET([.AS$24]+[.$BB26])&#10;+[.AT$31]*[.$Z$5]*MAGNET([.AT$24]+[.$BB26])&#10;+[.AU$31]*[.$Z$5]*MAGNET([.AU$24]+[.$BB26])&#10;+[.AV$31]*[.$Z$5]*MAGNET([.AV$24]+[.$BB26])&#10;+[.AW$31]*[.$Z$5]*MAGNET([.AW$24]+[.$BB26])&#10;+[.AX$31]*[.$Z$5]*MAGNET([.AX$24]+[.$BB26])&#10;+[.AY$31]*[.$Z$5]*MAGNET([.AY$24]+[.$BB26]) +RAND()*[.$BI$13]" office:value-type="float" office:value="0" calcext:value-type="float">
            <text:p>0</text:p>
          </table:table-cell>
          <table:table-cell table:style-name="ce71" table:formula="of:=[.E$32]*[.$Z$5]*MAGNET([.E$24]+[.$BB26])+[.F$32]*[.$Z$5]*MAGNET([.F$24]+[.$BB26])+[.G$32]*[.$Z$5]*MAGNET([.G$24]+[.$BB26])+[.H$32]*[.$Z$5]*MAGNET([.H$24]+[.$BB26])+[.I$32]*[.$Z$5]*MAGNET([.I$24]+[.$BB26])+[.J$32]*[.$Z$5]*MAGNET([.J$24]+[.$BB26])+[.K$32]*[.$Z$5]*MAGNET([.K$24]+[.$BB26])+[.L$32]*[.$Z$5]*MAGNET([.L$24]+[.$BB26])+[.M$32]*[.$Z$5]*MAGNET([.M$24]+[.$BB26])+[.N$32]*[.$Z$5]*MAGNET([.N$24]+[.$BB26])+[.O$32]*[.$Z$5]*MAGNET([.O$24]+[.$BB26])+[.P$32]*[.$Z$5]*MAGNET([.P$24]+[.$BB26])+[.Q$32]*[.$Z$5]*MAGNET([.Q$24]+[.$BB26])+[.R$32]*[.$Z$5]*MAGNET([.R$24]+[.$BB26])+[.S$32]*[.$Z$5]*MAGNET([.S$24]+[.$BB26])+[.T$32]*[.$Z$5]*MAGNET([.T$24]+[.$BB26])+[.U$32]*[.$Z$5]*MAGNET([.U$24]+[.$BB26])+[.V$32]*[.$Z$5]*MAGNET([.V$24]+[.$BB26])+[.W$32]*[.$Z$5]*MAGNET([.W$24]+[.$BB26])+[.X$32]*[.$Z$5]*MAGNET([.X$24]+[.$BB26])+[.Y$32]*[.$Z$5]*MAGNET([.Y$24]+[.$BB26])+[.Z$32]*[.$Z$5]*MAGNET([.Z$24]+[.$BB26])+[.AA$32]*[.$Z$5]*MAGNET([.AA$24]+[.$BB26])+[.AB$32]*[.$Z$5]*MAGNET([.AB$24]+[.$BB26])+[.AC$32]*[.$Z$5]*MAGNET([.AC$24]+[.$BB26])+[.AD$32]*[.$Z$5]*MAGNET([.AD$24]+[.$BB26])+[.AE$32]*[.$Z$5]*MAGNET([.AE$24]+[.$BB26])+[.AF$32]*[.$Z$5]*MAGNET([.AF$24]+[.$BB26])+[.AG$32]*[.$Z$5]*MAGNET([.AG$24]+[.$BB26])+[.D$32]*[.$Z$5]*MAGNET([.D$24]+[.$BB26])+[.AH$32]*[.$Z$5]*MAGNET([.AH$24]+[.BB26]) +[.AI$32]*[.$Z$5]*MAGNET([.AI$24]+[.BB26]) +[.AJ$32]*[.$Z$5]*MAGNET([.AJ$24]+[.BB26]) +[.AK$32]*[.$Z$5]*MAGNET([.AK$24]+[.BB26]) +[.AL$32]*[.$Z$5]*MAGNET([.AL$24]+[.BB26]) +[.AM$32]*[.$Z$5]*MAGNET([.AM$24]+[.BB26]) +[.AN$32]*[.$Z$5]*MAGNET([.AN$24]+[.BB26]) +[.AO$32]*[.$Z$5]*MAGNET([.AO$24]+[.BB26]) +[.AP$32]*[.$Z$5]*MAGNET([.AP$24]+[.$BB26])&#10;+[.AQ$32]*[.$Z$5]*MAGNET([.AQ$24]+[.$BB26])&#10;+[.AR$32]*[.$Z$5]*MAGNET([.AR$24]+[.$BB26])&#10;+[.AS$32]*[.$Z$5]*MAGNET([.AS$24]+[.$BB26])&#10;+[.AT$32]*[.$Z$5]*MAGNET([.AT$24]+[.$BB26])&#10;+[.AU$32]*[.$Z$5]*MAGNET([.AU$24]+[.$BB26])&#10;+[.AV$32]*[.$Z$5]*MAGNET([.AV$24]+[.$BB26])&#10;+[.AW$32]*[.$Z$5]*MAGNET([.AW$24]+[.$BB26])&#10;+[.AX$32]*[.$Z$5]*MAGNET([.AX$24]+[.$BB26])&#10;+[.AY$32]*[.$Z$5]*MAGNET([.AY$24]+[.$BB2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formula="of:=[.D41]-[.D42]" office:value-type="float" office:value="0" calcext:value-type="float">
            <text:p>0</text:p>
          </table:table-cell>
          <table:table-cell table:formula="of:=[.E41]-[.E42]" office:value-type="float" office:value="0" calcext:value-type="float">
            <text:p>0</text:p>
          </table:table-cell>
          <table:table-cell table:formula="of:=[.F41]-[.F42]" office:value-type="float" office:value="-2" calcext:value-type="float">
            <text:p>-2</text:p>
          </table:table-cell>
          <table:table-cell table:formula="of:=[.G41]-[.G42]" office:value-type="float" office:value="-4" calcext:value-type="float">
            <text:p>-4</text:p>
          </table:table-cell>
          <table:table-cell table:formula="of:=[.H41]-[.H42]" office:value-type="float" office:value="-4" calcext:value-type="float">
            <text:p>-4</text:p>
          </table:table-cell>
          <table:table-cell table:formula="of:=[.I41]-[.I42]" office:value-type="float" office:value="0" calcext:value-type="float">
            <text:p>0</text:p>
          </table:table-cell>
          <table:table-cell table:formula="of:=[.J41]-[.J42]" office:value-type="float" office:value="0" calcext:value-type="float">
            <text:p>0</text:p>
          </table:table-cell>
          <table:table-cell table:formula="of:=[.K41]-[.K42]" office:value-type="float" office:value="0" calcext:value-type="float">
            <text:p>0</text:p>
          </table:table-cell>
          <table:table-cell table:formula="of:=[.L41]-[.L42]" office:value-type="float" office:value="0" calcext:value-type="float">
            <text:p>0</text:p>
          </table:table-cell>
          <table:table-cell table:formula="of:=[.M41]-[.M42]" office:value-type="float" office:value="0" calcext:value-type="float">
            <text:p>0</text:p>
          </table:table-cell>
          <table:table-cell table:formula="of:=[.N41]-[.N42]" office:value-type="float" office:value="4" calcext:value-type="float">
            <text:p>4</text:p>
          </table:table-cell>
          <table:table-cell table:formula="of:=[.O41]-[.O42]" office:value-type="float" office:value="4" calcext:value-type="float">
            <text:p>4</text:p>
          </table:table-cell>
          <table:table-cell table:formula="of:=[.P41]-[.P42]" office:value-type="float" office:value="2" calcext:value-type="float">
            <text:p>2</text:p>
          </table:table-cell>
          <table:table-cell table:formula="of:=[.Q41]-[.Q42]" office:value-type="float" office:value="0" calcext:value-type="float">
            <text:p>0</text:p>
          </table:table-cell>
          <table:table-cell table:formula="of:=[.R41]-[.R42]" office:value-type="float" office:value="0" calcext:value-type="float">
            <text:p>0</text:p>
          </table:table-cell>
          <table:table-cell table:formula="of:=[.S41]-[.S42]" office:value-type="float" office:value="0" calcext:value-type="float">
            <text:p>0</text:p>
          </table:table-cell>
          <table:table-cell table:formula="of:=[.T41]-[.T42]" office:value-type="float" office:value="0" calcext:value-type="float">
            <text:p>0</text:p>
          </table:table-cell>
          <table:table-cell table:formula="of:=[.U41]-[.U42]" office:value-type="float" office:value="-2" calcext:value-type="float">
            <text:p>-2</text:p>
          </table:table-cell>
          <table:table-cell table:formula="of:=[.V41]-[.V42]" office:value-type="float" office:value="-4" calcext:value-type="float">
            <text:p>-4</text:p>
          </table:table-cell>
          <table:table-cell table:formula="of:=[.W41]-[.W42]" office:value-type="float" office:value="-4" calcext:value-type="float">
            <text:p>-4</text:p>
          </table:table-cell>
          <table:table-cell table:formula="of:=[.X41]-[.X42]" office:value-type="float" office:value="0" calcext:value-type="float">
            <text:p>0</text:p>
          </table:table-cell>
          <table:table-cell table:formula="of:=[.Y41]-[.Y42]" office:value-type="float" office:value="0" calcext:value-type="float">
            <text:p>0</text:p>
          </table:table-cell>
          <table:table-cell table:formula="of:=[.Z41]-[.Z42]" office:value-type="float" office:value="0" calcext:value-type="float">
            <text:p>0</text:p>
          </table:table-cell>
          <table:table-cell table:formula="of:=[.AA41]-[.AA42]" office:value-type="float" office:value="0" calcext:value-type="float">
            <text:p>0</text:p>
          </table:table-cell>
          <table:table-cell table:formula="of:=[.AB41]-[.AB42]" office:value-type="float" office:value="0" calcext:value-type="float">
            <text:p>0</text:p>
          </table:table-cell>
          <table:table-cell table:formula="of:=[.AC41]-[.AC42]" office:value-type="float" office:value="4" calcext:value-type="float">
            <text:p>4</text:p>
          </table:table-cell>
          <table:table-cell table:formula="of:=[.AD41]-[.AD42]" office:value-type="float" office:value="4" calcext:value-type="float">
            <text:p>4</text:p>
          </table:table-cell>
          <table:table-cell table:formula="of:=[.AE41]-[.AE42]" office:value-type="float" office:value="2" calcext:value-type="float">
            <text:p>2</text:p>
          </table:table-cell>
          <table:table-cell table:formula="of:=[.AF41]-[.AF42]" office:value-type="float" office:value="0" calcext:value-type="float">
            <text:p>0</text:p>
          </table:table-cell>
          <table:table-cell table:formula="of:=[.AG41]-[.AG42]" office:value-type="float" office:value="0" calcext:value-type="float">
            <text:p>0</text:p>
          </table:table-cell>
          <table:table-cell table:formula="of:=[.AH41]-[.AH42]" office:value-type="float" office:value="4" calcext:value-type="float">
            <text:p>4</text:p>
          </table:table-cell>
          <table:table-cell table:formula="of:=[.AI41]-[.AI42]" office:value-type="float" office:value="4" calcext:value-type="float">
            <text:p>4</text:p>
          </table:table-cell>
          <table:table-cell table:formula="of:=[.AJ41]-[.AJ42]" office:value-type="float" office:value="0" calcext:value-type="float">
            <text:p>0</text:p>
          </table:table-cell>
          <table:table-cell table:formula="of:=[.AK41]-[.AK42]" office:value-type="float" office:value="0" calcext:value-type="float">
            <text:p>0</text:p>
          </table:table-cell>
          <table:table-cell table:formula="of:=[.AL41]-[.AL42]" office:value-type="float" office:value="0" calcext:value-type="float">
            <text:p>0</text:p>
          </table:table-cell>
          <table:table-cell table:formula="of:=[.AM41]-[.AM42]" office:value-type="float" office:value="0" calcext:value-type="float">
            <text:p>0</text:p>
          </table:table-cell>
          <table:table-cell table:formula="of:=[.AN41]-[.AN42]" office:value-type="float" office:value="0" calcext:value-type="float">
            <text:p>0</text:p>
          </table:table-cell>
          <table:table-cell table:formula="of:=[.AO41]-[.AO42]" office:value-type="float" office:value="-2" calcext:value-type="float">
            <text:p>-2</text:p>
          </table:table-cell>
          <table:table-cell table:formula="of:=[.AP41]-[.AP42]" office:value-type="float" office:value="0" calcext:value-type="float">
            <text:p>0</text:p>
          </table:table-cell>
          <table:table-cell table:formula="of:=[.AQ41]-[.AQ42]" office:value-type="float" office:value="0" calcext:value-type="float">
            <text:p>0</text:p>
          </table:table-cell>
          <table:table-cell table:formula="of:=[.AR41]-[.AR42]" office:value-type="float" office:value="0" calcext:value-type="float">
            <text:p>0</text:p>
          </table:table-cell>
          <table:table-cell table:formula="of:=[.AS41]-[.AS42]" office:value-type="float" office:value="0" calcext:value-type="float">
            <text:p>0</text:p>
          </table:table-cell>
          <table:table-cell table:formula="of:=[.AT41]-[.AT42]" office:value-type="float" office:value="0" calcext:value-type="float">
            <text:p>0</text:p>
          </table:table-cell>
          <table:table-cell table:formula="of:=[.AU41]-[.AU42]" office:value-type="float" office:value="0" calcext:value-type="float">
            <text:p>0</text:p>
          </table:table-cell>
          <table:table-cell table:formula="of:=[.AV41]-[.AV42]" office:value-type="float" office:value="0" calcext:value-type="float">
            <text:p>0</text:p>
          </table:table-cell>
          <table:table-cell table:formula="of:=[.AW41]-[.AW42]" office:value-type="float" office:value="0" calcext:value-type="float">
            <text:p>0</text:p>
          </table:table-cell>
          <table:table-cell table:formula="of:=[.AX41]-[.AX42]" office:value-type="float" office:value="0" calcext:value-type="float">
            <text:p>0</text:p>
          </table:table-cell>
          <table:table-cell table:formula="of:=[.AY41]-[.AY42]" office:value-type="float" office:value="0" calcext:value-type="float">
            <text:p>0</text:p>
          </table:table-cell>
          <table:table-cell/>
          <table:table-cell table:formula="of:=[.BA26]+0.002" office:value-type="float" office:value="0.024" calcext:value-type="float">
            <text:p>0.024</text:p>
          </table:table-cell>
          <table:table-cell table:formula="of:=[.BA27]*[.$D$6]" office:value-type="float" office:value="1.20637157897848" calcext:value-type="float">
            <text:p>1.206</text:p>
          </table:table-cell>
          <table:table-cell table:formula="of:=[.D$25]*[.$Z$5]*MAGNET([.D$24]+[.BB27])+[.E$25]*[.$Z$5]*MAGNET([.E$24]+[.BB27])+[.F$25]*[.$Z$5]*MAGNET([.F$24]+[.BB27])+[.G$25]*[.$Z$5]*MAGNET([.G$24]+[.BB27])+[.H$25]*[.$Z$5]*MAGNET([.H$24]+[.BB27])+[.I$25]*[.$Z$5]*MAGNET([.I$24]+[.BB27])+[.J$25]*[.$Z$5]*MAGNET([.J$24]+[.BB27])+[.K$25]*[.$Z$5]*MAGNET([.K$24]+[.BB27])+[.L$25]*[.$Z$5]*MAGNET([.L$24]+[.BB27])+[.M$25]*[.$Z$5]*MAGNET([.M$24]+[.BB27])+[.N$25]*[.$Z$5]*MAGNET([.N$24]+[.BB27])+[.O$25]*[.$Z$5]*MAGNET([.O$24]+[.BB27])+[.P$25]*[.$Z$5]*MAGNET([.P$24]+[.BB27])+[.Q$25]*[.$Z$5]*MAGNET([.Q$24]+[.BB27])+[.R$25]*[.$Z$5]*MAGNET([.R$24]+[.BB27])+[.S$25]*[.$Z$5]*MAGNET([.S$24]+[.BB27])+[.T$25]*[.$Z$5]*MAGNET([.T$24]+[.BB27])+[.U$25]*[.$Z$5]*MAGNET([.U$24]+[.BB27])+[.V$25]*[.$Z$5]*MAGNET([.V$24]+[.BB27])+[.W$25]*[.$Z$5]*MAGNET([.W$24]+[.BB27])+[.X$25]*[.$Z$5]*MAGNET([.X$24]+[.BB27])+[.Y$25]*[.$Z$5]*MAGNET([.Y$24]+[.BB27])+[.Z$25]*[.$Z$5]*MAGNET([.Z$24]+[.BB27])+[.AA$25]*[.$Z$5]*MAGNET([.AA$24]+[.BB27])+[.AB$25]*[.$Z$5]*MAGNET([.AB$24]+[.BB27])+[.AC$25]*[.$Z$5]*MAGNET([.AC$24]+[.BB27])+[.AD$25]*[.$Z$5]*MAGNET([.AD$24]+[.BB27])+[.AE$25]*[.$Z$5]*MAGNET([.AE$24]+[.BB27])+[.AF$25]*[.$Z$5]*MAGNET([.AF$24]+[.BB27])+[.AG$25]*[.$Z$5]*MAGNET([.AG$24]+[.BB27])+[.AH$25]*[.$Z$5]*MAGNET([.AH$24]+[.BB27]) +[.AI$25]*[.$Z$5]*MAGNET([.AI$24]+[.BB27]) +[.AJ$25]*[.$Z$5]*MAGNET([.AJ$24]+[.BB27]) +[.AK$25]*[.$Z$5]*MAGNET([.AK$24]+[.BB27]) +[.AL$25]*[.$Z$5]*MAGNET([.AL$24]+[.BB27]) +[.AM$25]*[.$Z$5]*MAGNET([.AM$24]+[.BB27]) +[.AN$25]*[.$Z$5]*MAGNET([.AN$24]+[.BB27]) +[.AO$25]*[.$Z$5]*MAGNET([.AO$24]+[.BB27])+RAND()*[.$BC$13]+[.AP$25]*[.$Z$5]*MAGNET([.AP$24]+[.BB27])&#10;+[.AQ$25]*[.$Z$5]*MAGNET([.AQ$24]+[.BB27])&#10;+[.AR$25]*[.$Z$5]*MAGNET([.AR$24]+[.BB27])&#10;+[.AS$25]*[.$Z$5]*MAGNET([.AS$24]+[.BB27])&#10;+[.AT$25]*[.$Z$5]*MAGNET([.AT$24]+[.BB27])&#10;+[.AU$25]*[.$Z$5]*MAGNET([.AU$24]+[.BB27])&#10;+[.AV$25]*[.$Z$5]*MAGNET([.AV$24]+[.BB27])&#10;+[.AW$25]*[.$Z$5]*MAGNET([.AW$24]+[.BB27])&#10;+[.AX$25]*[.$Z$5]*MAGNET([.AX$24]+[.BB27])&#10;+[.AY$25]*[.$Z$5]*MAGNET([.AY$24]+[.BB27])" office:value-type="float" office:value="87.7531580988359" calcext:value-type="float">
            <text:p>87.75</text:p>
          </table:table-cell>
          <table:table-cell table:style-name="ce70" table:formula="of:=[.E$26]*[.$Z$5]*MAGNET([.E$24]+[.$BB27])+[.F$26]*[.$Z$5]*MAGNET([.F$24]+[.$BB27])+[.G$26]*[.$Z$5]*MAGNET([.G$24]+[.$BB27])+[.H$26]*[.$Z$5]*MAGNET([.H$24]+[.$BB27])+[.I$26]*[.$Z$5]*MAGNET([.I$24]+[.$BB27])+[.J$26]*[.$Z$5]*MAGNET([.J$24]+[.$BB27])+[.K$26]*[.$Z$5]*MAGNET([.K$24]+[.$BB27])+[.L$26]*[.$Z$5]*MAGNET([.L$24]+[.$BB27])+[.M$26]*[.$Z$5]*MAGNET([.M$24]+[.$BB27])+[.N$26]*[.$Z$5]*MAGNET([.N$24]+[.$BB27])+[.O$26]*[.$Z$5]*MAGNET([.O$24]+[.$BB27])+[.P$26]*[.$Z$5]*MAGNET([.P$24]+[.$BB27])+[.Q$26]*[.$Z$5]*MAGNET([.Q$24]+[.$BB27])+[.R$26]*[.$Z$5]*MAGNET([.R$24]+[.$BB27])+[.S$26]*[.$Z$5]*MAGNET([.S$24]+[.$BB27])+[.T$26]*[.$Z$5]*MAGNET([.T$24]+[.$BB27])+[.U$26]*[.$Z$5]*MAGNET([.U$24]+[.$BB27])+[.V$26]*[.$Z$5]*MAGNET([.V$24]+[.$BB27])+[.W$26]*[.$Z$5]*MAGNET([.W$24]+[.$BB27])+[.X$26]*[.$Z$5]*MAGNET([.X$24]+[.$BB27])+[.Y$26]*[.$Z$5]*MAGNET([.Y$24]+[.$BB27])+[.Z$26]*[.$Z$5]*MAGNET([.Z$24]+[.$BB27])+[.AA$26]*[.$Z$5]*MAGNET([.AA$24]+[.$BB27])+[.AB$26]*[.$Z$5]*MAGNET([.AB$24]+[.$BB27])+[.AC$26]*[.$Z$5]*MAGNET([.AC$24]+[.$BB27])+[.AD$26]*[.$Z$5]*MAGNET([.AD$24]+[.$BB27])+[.AE$26]*[.$Z$5]*MAGNET([.AE$24]+[.$BB27])+[.AF$26]*[.$Z$5]*MAGNET([.AF$24]+[.$BB27])+[.AG$26]*[.$Z$5]*MAGNET([.AG$24]+[.$BB27])+[.D$26]*[.$Z$5]*MAGNET([.D$24]+[.$BB27])+[.AH$26]*[.$Z$5]*MAGNET([.AH$24]+[.BB27]) +[.AI$26]*[.$Z$5]*MAGNET([.AI$24]+[.BB27]) +[.AJ$26]*[.$Z$5]*MAGNET([.AJ$24]+[.BB27]) +[.AK$26]*[.$Z$5]*MAGNET([.AK$24]+[.BB27]) +[.AL$26]*[.$Z$5]*MAGNET([.AL$24]+[.BB27]) +[.AM$26]*[.$Z$5]*MAGNET([.AM$24]+[.BB27]) +[.AN$26]*[.$Z$5]*MAGNET([.AN$24]+[.BB27]) +[.AO$26]*[.$Z$5]*MAGNET([.AO$24]+[.BB27]) +[.AP$26]*[.$Z$5]*MAGNET([.AP$24]+[.$BB27])&#10;+[.AQ$26]*[.$Z$5]*MAGNET([.AQ$24]+[.$BB27])&#10;+[.AR$26]*[.$Z$5]*MAGNET([.AR$24]+[.$BB27])&#10;+[.AS$26]*[.$Z$5]*MAGNET([.AS$24]+[.$BB27])&#10;+[.AT$26]*[.$Z$5]*MAGNET([.AT$24]+[.$BB27])&#10;+[.AU$26]*[.$Z$5]*MAGNET([.AU$24]+[.$BB27])&#10;+[.AV$26]*[.$Z$5]*MAGNET([.AV$24]+[.$BB27])&#10;+[.AW$26]*[.$Z$5]*MAGNET([.AW$24]+[.$BB27])&#10;+[.AX$26]*[.$Z$5]*MAGNET([.AX$24]+[.$BB27])&#10;+[.AY$26]*[.$Z$5]*MAGNET([.AY$24]+[.$BB27]) +RAND()*[.$BD$13]" office:value-type="float" office:value="17.4460090896936" calcext:value-type="float">
            <text:p>17.45</text:p>
          </table:table-cell>
          <table:table-cell table:style-name="ce71" table:formula="of:=[.E$27]*[.$Z$5]*MAGNET([.E$24]+[.$BB27])+[.F$27]*[.$Z$5]*MAGNET([.F$24]+[.$BB27])+[.G$27]*[.$Z$5]*MAGNET([.G$24]+[.$BB27])+[.H$27]*[.$Z$5]*MAGNET([.H$24]+[.$BB27])+[.I$27]*[.$Z$5]*MAGNET([.I$24]+[.$BB27])+[.J$27]*[.$Z$5]*MAGNET([.J$24]+[.$BB27])+[.K$27]*[.$Z$5]*MAGNET([.K$24]+[.$BB27])+[.L$27]*[.$Z$5]*MAGNET([.L$24]+[.$BB27])+[.M$27]*[.$Z$5]*MAGNET([.M$24]+[.$BB27])+[.N$27]*[.$Z$5]*MAGNET([.N$24]+[.$BB27])+[.O$27]*[.$Z$5]*MAGNET([.O$24]+[.$BB27])+[.P$27]*[.$Z$5]*MAGNET([.P$24]+[.$BB27])+[.Q$27]*[.$Z$5]*MAGNET([.Q$24]+[.$BB27])+[.R$27]*[.$Z$5]*MAGNET([.R$24]+[.$BB27])+[.S$27]*[.$Z$5]*MAGNET([.S$24]+[.$BB27])+[.T$27]*[.$Z$5]*MAGNET([.T$24]+[.$BB27])+[.U$27]*[.$Z$5]*MAGNET([.U$24]+[.$BB27])+[.V$27]*[.$Z$5]*MAGNET([.V$24]+[.$BB27])+[.W$27]*[.$Z$5]*MAGNET([.W$24]+[.$BB27])+[.X$27]*[.$Z$5]*MAGNET([.X$24]+[.$BB27])+[.Y$27]*[.$Z$5]*MAGNET([.Y$24]+[.$BB27])+[.Z$27]*[.$Z$5]*MAGNET([.Z$24]+[.$BB27])+[.AA$27]*[.$Z$5]*MAGNET([.AA$24]+[.$BB27])+[.AB$27]*[.$Z$5]*MAGNET([.AB$24]+[.$BB27])+[.AC$27]*[.$Z$5]*MAGNET([.AC$24]+[.$BB27])+[.AD$27]*[.$Z$5]*MAGNET([.AD$24]+[.$BB27])+[.AE$27]*[.$Z$5]*MAGNET([.AE$24]+[.$BB27])+[.AF$27]*[.$Z$5]*MAGNET([.AF$24]+[.$BB27])+[.AG$27]*[.$Z$5]*MAGNET([.AG$24]+[.$BB27])+[.D$27]*[.$Z$5]*MAGNET([.D$24]+[.$BB27])+[.AH$27]*[.$Z$5]*MAGNET([.AH$24]+[.BB27]) +[.AI$27]*[.$Z$5]*MAGNET([.AI$24]+[.BB27]) +[.AJ$27]*[.$Z$5]*MAGNET([.AJ$24]+[.BB27]) +[.AK$27]*[.$Z$5]*MAGNET([.AK$24]+[.BB27]) +[.AL$27]*[.$Z$5]*MAGNET([.AL$24]+[.BB27]) +[.AM$27]*[.$Z$5]*MAGNET([.AM$24]+[.BB27]) +[.AN$27]*[.$Z$5]*MAGNET([.AN$24]+[.BB27]) +[.AO$27]*[.$Z$5]*MAGNET([.AO$24]+[.BB27]) +[.AP$27]*[.$Z$5]*MAGNET([.AP$24]+[.$BB27])&#10;+[.AQ$27]*[.$Z$5]*MAGNET([.AQ$24]+[.$BB27])&#10;+[.AR$27]*[.$Z$5]*MAGNET([.AR$24]+[.$BB27])&#10;+[.AS$27]*[.$Z$5]*MAGNET([.AS$24]+[.$BB27])&#10;+[.AT$27]*[.$Z$5]*MAGNET([.AT$24]+[.$BB27])&#10;+[.AU$27]*[.$Z$5]*MAGNET([.AU$24]+[.$BB27])&#10;+[.AV$27]*[.$Z$5]*MAGNET([.AV$24]+[.$BB27])&#10;+[.AW$27]*[.$Z$5]*MAGNET([.AW$24]+[.$BB27])&#10;+[.AX$27]*[.$Z$5]*MAGNET([.AX$24]+[.$BB27])&#10;+[.AY$27]*[.$Z$5]*MAGNET([.AY$24]+[.$BB27]) +RAND()*[.$BE$13]" office:value-type="float" office:value="-128.916515435909" calcext:value-type="float">
            <text:p>-128.916515435909</text:p>
          </table:table-cell>
          <table:table-cell table:style-name="ce71" table:formula="of:=[.E$28]*[.$Z$5]*MAGNET([.E$24]+[.$BB27])+[.F$28]*[.$Z$5]*MAGNET([.F$24]+[.$BB27])+[.G$28]*[.$Z$5]*MAGNET([.G$24]+[.$BB27])+[.H$28]*[.$Z$5]*MAGNET([.H$24]+[.$BB27])+[.I$28]*[.$Z$5]*MAGNET([.I$24]+[.$BB27])+[.J$28]*[.$Z$5]*MAGNET([.J$24]+[.$BB27])+[.K$28]*[.$Z$5]*MAGNET([.K$24]+[.$BB27])+[.L$28]*[.$Z$5]*MAGNET([.L$24]+[.$BB27])+[.M$28]*[.$Z$5]*MAGNET([.M$24]+[.$BB27])+[.N$28]*[.$Z$5]*MAGNET([.N$24]+[.$BB27])+[.O$28]*[.$Z$5]*MAGNET([.O$24]+[.$BB27])+[.P$28]*[.$Z$5]*MAGNET([.P$24]+[.$BB27])+[.Q$28]*[.$Z$5]*MAGNET([.Q$24]+[.$BB27])+[.R$28]*[.$Z$5]*MAGNET([.R$24]+[.$BB27])+[.S$28]*[.$Z$5]*MAGNET([.S$24]+[.$BB27])+[.T$28]*[.$Z$5]*MAGNET([.T$24]+[.$BB27])+[.U$28]*[.$Z$5]*MAGNET([.U$24]+[.$BB27])+[.V$28]*[.$Z$5]*MAGNET([.V$24]+[.$BB27])+[.W$28]*[.$Z$5]*MAGNET([.W$24]+[.$BB27])+[.X$28]*[.$Z$5]*MAGNET([.X$24]+[.$BB27])+[.Y$28]*[.$Z$5]*MAGNET([.Y$24]+[.$BB27])+[.Z$28]*[.$Z$5]*MAGNET([.Z$24]+[.$BB27])+[.AA$28]*[.$Z$5]*MAGNET([.AA$24]+[.$BB27])+[.AB$28]*[.$Z$5]*MAGNET([.AB$24]+[.$BB27])+[.AC$28]*[.$Z$5]*MAGNET([.AC$24]+[.$BB27])+[.AD$28]*[.$Z$5]*MAGNET([.AD$24]+[.$BB27])+[.AE$28]*[.$Z$5]*MAGNET([.AE$24]+[.$BB27])+[.AF$28]*[.$Z$5]*MAGNET([.AF$24]+[.$BB27])+[.AG$28]*[.$Z$5]*MAGNET([.AG$24]+[.$BB27])+[.D$28]*[.$Z$5]*MAGNET([.D$24]+[.$BB27])+[.AH$28]*[.$Z$5]*MAGNET([.AH$24]+[.BB27]) +[.AI$28]*[.$Z$5]*MAGNET([.AI$24]+[.BB27]) +[.AJ$28]*[.$Z$5]*MAGNET([.AJ$24]+[.BB27]) +[.AK$28]*[.$Z$5]*MAGNET([.AK$24]+[.BB27]) +[.AL$28]*[.$Z$5]*MAGNET([.AL$24]+[.BB27]) +[.AM$28]*[.$Z$5]*MAGNET([.AM$24]+[.BB27]) +[.AN$28]*[.$Z$5]*MAGNET([.AN$24]+[.BB27]) +[.AO$28]*[.$Z$5]*MAGNET([.AO$24]+[.BB27]) +[.AP$28]*[.$Z$5]*MAGNET([.AP$24]+[.$BB27])&#10;+[.AQ$28]*[.$Z$5]*MAGNET([.AQ$24]+[.$BB27])&#10;+[.AR$28]*[.$Z$5]*MAGNET([.AR$24]+[.$BB27])&#10;+[.AS$28]*[.$Z$5]*MAGNET([.AS$24]+[.$BB27])&#10;+[.AT$28]*[.$Z$5]*MAGNET([.AT$24]+[.$BB27])&#10;+[.AU$28]*[.$Z$5]*MAGNET([.AU$24]+[.$BB27])&#10;+[.AV$28]*[.$Z$5]*MAGNET([.AV$24]+[.$BB27])&#10;+[.AW$28]*[.$Z$5]*MAGNET([.AW$24]+[.$BB27])&#10;+[.AX$28]*[.$Z$5]*MAGNET([.AX$24]+[.$BB27])&#10;+[.AY$28]*[.$Z$5]*MAGNET([.AY$24]+[.$BB27]) +RAND()*[.$BF$13]" office:value-type="float" office:value="-17.2815348349861" calcext:value-type="float">
            <text:p>-17.2815348349861</text:p>
          </table:table-cell>
          <table:table-cell table:style-name="ce71" table:formula="of:=[.E$29]*[.$Z$5]*MAGNET([.E$24]+[.$BB27])+[.F$29]*[.$Z$5]*MAGNET([.F$24]+[.$BB27])+[.G$29]*[.$Z$5]*MAGNET([.G$24]+[.$BB27])+[.H$29]*[.$Z$5]*MAGNET([.H$24]+[.$BB27])+[.I$29]*[.$Z$5]*MAGNET([.I$24]+[.$BB27])+[.J$29]*[.$Z$5]*MAGNET([.J$24]+[.$BB27])+[.K$29]*[.$Z$5]*MAGNET([.K$24]+[.$BB27])+[.L$29]*[.$Z$5]*MAGNET([.L$24]+[.$BB27])+[.M$29]*[.$Z$5]*MAGNET([.M$24]+[.$BB27])+[.N$29]*[.$Z$5]*MAGNET([.N$24]+[.$BB27])+[.O$29]*[.$Z$5]*MAGNET([.O$24]+[.$BB27])+[.P$29]*[.$Z$5]*MAGNET([.P$24]+[.$BB27])+[.Q$29]*[.$Z$5]*MAGNET([.Q$24]+[.$BB27])+[.R$29]*[.$Z$5]*MAGNET([.R$24]+[.$BB27])+[.S$29]*[.$Z$5]*MAGNET([.S$24]+[.$BB27])+[.T$29]*[.$Z$5]*MAGNET([.T$24]+[.$BB27])+[.U$29]*[.$Z$5]*MAGNET([.U$24]+[.$BB27])+[.V$29]*[.$Z$5]*MAGNET([.V$24]+[.$BB27])+[.W$29]*[.$Z$5]*MAGNET([.W$24]+[.$BB27])+[.X$29]*[.$Z$5]*MAGNET([.X$24]+[.$BB27])+[.Y$29]*[.$Z$5]*MAGNET([.Y$24]+[.$BB27])+[.Z$29]*[.$Z$5]*MAGNET([.Z$24]+[.$BB27])+[.AA$29]*[.$Z$5]*MAGNET([.AA$24]+[.$BB27])+[.AB$29]*[.$Z$5]*MAGNET([.AB$24]+[.$BB27])+[.AC$29]*[.$Z$5]*MAGNET([.AC$24]+[.$BB27])+[.AD$29]*[.$Z$5]*MAGNET([.AD$24]+[.$BB27])+[.AE$29]*[.$Z$5]*MAGNET([.AE$24]+[.$BB27])+[.AF$29]*[.$Z$5]*MAGNET([.AF$24]+[.$BB27])+[.AG$29]*[.$Z$5]*MAGNET([.AG$24]+[.$BB27])+[.D$29]*[.$Z$5]*MAGNET([.D$24]+[.$BB27])+[.AH$29]*[.$Z$5]*MAGNET([.AH$24]+[.BB27]) +[.AI$29]*[.$Z$5]*MAGNET([.AI$24]+[.BB27]) +[.AJ$29]*[.$Z$5]*MAGNET([.AJ$24]+[.BB27]) +[.AK$29]*[.$Z$5]*MAGNET([.AK$24]+[.BB27]) +[.AL$29]*[.$Z$5]*MAGNET([.AL$24]+[.BB27]) +[.AM$29]*[.$Z$5]*MAGNET([.AM$24]+[.BB27]) +[.AN$29]*[.$Z$5]*MAGNET([.AN$24]+[.BB27]) +[.AO$29]*[.$Z$5]*MAGNET([.AO$24]+[.BB27]) +[.AP$29]*[.$Z$5]*MAGNET([.AP$24]+[.$BB27])&#10;+[.AQ$29]*[.$Z$5]*MAGNET([.AQ$24]+[.$BB27])&#10;+[.AR$29]*[.$Z$5]*MAGNET([.AR$24]+[.$BB27])&#10;+[.AS$29]*[.$Z$5]*MAGNET([.AS$24]+[.$BB27])&#10;+[.AT$29]*[.$Z$5]*MAGNET([.AT$24]+[.$BB27])&#10;+[.AU$29]*[.$Z$5]*MAGNET([.AU$24]+[.$BB27])&#10;+[.AV$29]*[.$Z$5]*MAGNET([.AV$24]+[.$BB27])&#10;+[.AW$29]*[.$Z$5]*MAGNET([.AW$24]+[.$BB27])&#10;+[.AX$29]*[.$Z$5]*MAGNET([.AX$24]+[.$BB27])&#10;+[.AY$29]*[.$Z$5]*MAGNET([.AY$24]+[.$BB27]) +RAND()*[.$BG$13]" office:value-type="float" office:value="46.8494161163296" calcext:value-type="float">
            <text:p>46.8494161163296</text:p>
          </table:table-cell>
          <table:table-cell table:style-name="ce71" table:formula="of:=[.E$30]*[.$Z$5]*MAGNET([.E$24]+[.$BB27])+[.F$30]*[.$Z$5]*MAGNET([.F$24]+[.$BB27])+[.G$30]*[.$Z$5]*MAGNET([.G$24]+[.$BB27])+[.H$30]*[.$Z$5]*MAGNET([.H$24]+[.$BB27])+[.I$30]*[.$Z$5]*MAGNET([.I$24]+[.$BB27])+[.J$30]*[.$Z$5]*MAGNET([.J$24]+[.$BB27])+[.K$30]*[.$Z$5]*MAGNET([.K$24]+[.$BB27])+[.L$30]*[.$Z$5]*MAGNET([.L$24]+[.$BB27])+[.M$30]*[.$Z$5]*MAGNET([.M$24]+[.$BB27])+[.N$30]*[.$Z$5]*MAGNET([.N$24]+[.$BB27])+[.O$30]*[.$Z$5]*MAGNET([.O$24]+[.$BB27])+[.P$30]*[.$Z$5]*MAGNET([.P$24]+[.$BB27])+[.Q$30]*[.$Z$5]*MAGNET([.Q$24]+[.$BB27])+[.R$30]*[.$Z$5]*MAGNET([.R$24]+[.$BB27])+[.S$30]*[.$Z$5]*MAGNET([.S$24]+[.$BB27])+[.T$30]*[.$Z$5]*MAGNET([.T$24]+[.$BB27])+[.U$30]*[.$Z$5]*MAGNET([.U$24]+[.$BB27])+[.V$30]*[.$Z$5]*MAGNET([.V$24]+[.$BB27])+[.W$30]*[.$Z$5]*MAGNET([.W$24]+[.$BB27])+[.X$30]*[.$Z$5]*MAGNET([.X$24]+[.$BB27])+[.Y$30]*[.$Z$5]*MAGNET([.Y$24]+[.$BB27])+[.Z$30]*[.$Z$5]*MAGNET([.Z$24]+[.$BB27])+[.AA$30]*[.$Z$5]*MAGNET([.AA$24]+[.$BB27])+[.AB$30]*[.$Z$5]*MAGNET([.AB$24]+[.$BB27])+[.AC$30]*[.$Z$5]*MAGNET([.AC$24]+[.$BB27])+[.AD$30]*[.$Z$5]*MAGNET([.AD$24]+[.$BB27])+[.AE$30]*[.$Z$5]*MAGNET([.AE$24]+[.$BB27])+[.AF$30]*[.$Z$5]*MAGNET([.AF$24]+[.$BB27])+[.AG$30]*[.$Z$5]*MAGNET([.AG$24]+[.$BB27])+[.D$30]*[.$Z$5]*MAGNET([.D$24]+[.$BB27])+[.AH$30]*[.$Z$5]*MAGNET([.AH$24]+[.BB27]) +[.AI$30]*[.$Z$5]*MAGNET([.AI$24]+[.BB27]) +[.AJ$30]*[.$Z$5]*MAGNET([.AJ$24]+[.BB27]) +[.AK$30]*[.$Z$5]*MAGNET([.AK$24]+[.BB27]) +[.AL$30]*[.$Z$5]*MAGNET([.AL$24]+[.BB27]) +[.AM$30]*[.$Z$5]*MAGNET([.AM$24]+[.BB27]) +[.AN$30]*[.$Z$5]*MAGNET([.AN$24]+[.BB27]) +[.AO$30]*[.$Z$5]*MAGNET([.AO$24]+[.BB27]) +[.AP$30]*[.$Z$5]*MAGNET([.AP$24]+[.$BB27])&#10;+[.AQ$30]*[.$Z$5]*MAGNET([.AQ$24]+[.$BB27])&#10;+[.AR$30]*[.$Z$5]*MAGNET([.AR$24]+[.$BB27])&#10;+[.AS$30]*[.$Z$5]*MAGNET([.AS$24]+[.$BB27])&#10;+[.AT$30]*[.$Z$5]*MAGNET([.AT$24]+[.$BB27])&#10;+[.AU$30]*[.$Z$5]*MAGNET([.AU$24]+[.$BB27])&#10;+[.AV$30]*[.$Z$5]*MAGNET([.AV$24]+[.$BB27])&#10;+[.AW$30]*[.$Z$5]*MAGNET([.AW$24]+[.$BB27])&#10;+[.AX$30]*[.$Z$5]*MAGNET([.AX$24]+[.$BB27])&#10;+[.AY$30]*[.$Z$5]*MAGNET([.AY$24]+[.$BB27]) +RAND()*[.$BH$13]" office:value-type="float" office:value="0" calcext:value-type="float">
            <text:p>0</text:p>
          </table:table-cell>
          <table:table-cell table:style-name="ce71" table:formula="of:=[.E$31]*[.$Z$5]*MAGNET([.E$24]+[.$BB27])+[.F$31]*[.$Z$5]*MAGNET([.F$24]+[.$BB27])+[.G$31]*[.$Z$5]*MAGNET([.G$24]+[.$BB27])+[.H$31]*[.$Z$5]*MAGNET([.H$24]+[.$BB27])+[.I$31]*[.$Z$5]*MAGNET([.I$24]+[.$BB27])+[.J$31]*[.$Z$5]*MAGNET([.J$24]+[.$BB27])+[.K$31]*[.$Z$5]*MAGNET([.K$24]+[.$BB27])+[.L$31]*[.$Z$5]*MAGNET([.L$24]+[.$BB27])+[.M$31]*[.$Z$5]*MAGNET([.M$24]+[.$BB27])+[.N$31]*[.$Z$5]*MAGNET([.N$24]+[.$BB27])+[.O$31]*[.$Z$5]*MAGNET([.O$24]+[.$BB27])+[.P$31]*[.$Z$5]*MAGNET([.P$24]+[.$BB27])+[.Q$31]*[.$Z$5]*MAGNET([.Q$24]+[.$BB27])+[.R$31]*[.$Z$5]*MAGNET([.R$24]+[.$BB27])+[.S$31]*[.$Z$5]*MAGNET([.S$24]+[.$BB27])+[.T$31]*[.$Z$5]*MAGNET([.T$24]+[.$BB27])+[.U$31]*[.$Z$5]*MAGNET([.U$24]+[.$BB27])+[.V$31]*[.$Z$5]*MAGNET([.V$24]+[.$BB27])+[.W$31]*[.$Z$5]*MAGNET([.W$24]+[.$BB27])+[.X$31]*[.$Z$5]*MAGNET([.X$24]+[.$BB27])+[.Y$31]*[.$Z$5]*MAGNET([.Y$24]+[.$BB27])+[.Z$31]*[.$Z$5]*MAGNET([.Z$24]+[.$BB27])+[.AA$31]*[.$Z$5]*MAGNET([.AA$24]+[.$BB27])+[.AB$31]*[.$Z$5]*MAGNET([.AB$24]+[.$BB27])+[.AC$31]*[.$Z$5]*MAGNET([.AC$24]+[.$BB27])+[.AD$31]*[.$Z$5]*MAGNET([.AD$24]+[.$BB27])+[.AE$31]*[.$Z$5]*MAGNET([.AE$24]+[.$BB27])+[.AF$31]*[.$Z$5]*MAGNET([.AF$24]+[.$BB27])+[.AG$31]*[.$Z$5]*MAGNET([.AG$24]+[.$BB27])+[.D$31]*[.$Z$5]*MAGNET([.D$24]+[.$BB27])+[.AH$31]*[.$Z$5]*MAGNET([.AH$24]+[.BB27]) +[.AI$31]*[.$Z$5]*MAGNET([.AI$24]+[.BB27]) +[.AJ$31]*[.$Z$5]*MAGNET([.AJ$24]+[.BB27]) +[.AK$31]*[.$Z$5]*MAGNET([.AK$24]+[.BB27]) +[.AL$31]*[.$Z$5]*MAGNET([.AL$24]+[.BB27]) +[.AM$31]*[.$Z$5]*MAGNET([.AM$24]+[.BB27]) +[.AN$31]*[.$Z$5]*MAGNET([.AN$24]+[.BB27]) +[.AO$31]*[.$Z$5]*MAGNET([.AO$24]+[.BB27]) +[.AP$31]*[.$Z$5]*MAGNET([.AP$24]+[.$BB27])&#10;+[.AQ$31]*[.$Z$5]*MAGNET([.AQ$24]+[.$BB27])&#10;+[.AR$31]*[.$Z$5]*MAGNET([.AR$24]+[.$BB27])&#10;+[.AS$31]*[.$Z$5]*MAGNET([.AS$24]+[.$BB27])&#10;+[.AT$31]*[.$Z$5]*MAGNET([.AT$24]+[.$BB27])&#10;+[.AU$31]*[.$Z$5]*MAGNET([.AU$24]+[.$BB27])&#10;+[.AV$31]*[.$Z$5]*MAGNET([.AV$24]+[.$BB27])&#10;+[.AW$31]*[.$Z$5]*MAGNET([.AW$24]+[.$BB27])&#10;+[.AX$31]*[.$Z$5]*MAGNET([.AX$24]+[.$BB27])&#10;+[.AY$31]*[.$Z$5]*MAGNET([.AY$24]+[.$BB27]) +RAND()*[.$BI$13]" office:value-type="float" office:value="0" calcext:value-type="float">
            <text:p>0</text:p>
          </table:table-cell>
          <table:table-cell table:style-name="ce71" table:formula="of:=[.E$32]*[.$Z$5]*MAGNET([.E$24]+[.$BB27])+[.F$32]*[.$Z$5]*MAGNET([.F$24]+[.$BB27])+[.G$32]*[.$Z$5]*MAGNET([.G$24]+[.$BB27])+[.H$32]*[.$Z$5]*MAGNET([.H$24]+[.$BB27])+[.I$32]*[.$Z$5]*MAGNET([.I$24]+[.$BB27])+[.J$32]*[.$Z$5]*MAGNET([.J$24]+[.$BB27])+[.K$32]*[.$Z$5]*MAGNET([.K$24]+[.$BB27])+[.L$32]*[.$Z$5]*MAGNET([.L$24]+[.$BB27])+[.M$32]*[.$Z$5]*MAGNET([.M$24]+[.$BB27])+[.N$32]*[.$Z$5]*MAGNET([.N$24]+[.$BB27])+[.O$32]*[.$Z$5]*MAGNET([.O$24]+[.$BB27])+[.P$32]*[.$Z$5]*MAGNET([.P$24]+[.$BB27])+[.Q$32]*[.$Z$5]*MAGNET([.Q$24]+[.$BB27])+[.R$32]*[.$Z$5]*MAGNET([.R$24]+[.$BB27])+[.S$32]*[.$Z$5]*MAGNET([.S$24]+[.$BB27])+[.T$32]*[.$Z$5]*MAGNET([.T$24]+[.$BB27])+[.U$32]*[.$Z$5]*MAGNET([.U$24]+[.$BB27])+[.V$32]*[.$Z$5]*MAGNET([.V$24]+[.$BB27])+[.W$32]*[.$Z$5]*MAGNET([.W$24]+[.$BB27])+[.X$32]*[.$Z$5]*MAGNET([.X$24]+[.$BB27])+[.Y$32]*[.$Z$5]*MAGNET([.Y$24]+[.$BB27])+[.Z$32]*[.$Z$5]*MAGNET([.Z$24]+[.$BB27])+[.AA$32]*[.$Z$5]*MAGNET([.AA$24]+[.$BB27])+[.AB$32]*[.$Z$5]*MAGNET([.AB$24]+[.$BB27])+[.AC$32]*[.$Z$5]*MAGNET([.AC$24]+[.$BB27])+[.AD$32]*[.$Z$5]*MAGNET([.AD$24]+[.$BB27])+[.AE$32]*[.$Z$5]*MAGNET([.AE$24]+[.$BB27])+[.AF$32]*[.$Z$5]*MAGNET([.AF$24]+[.$BB27])+[.AG$32]*[.$Z$5]*MAGNET([.AG$24]+[.$BB27])+[.D$32]*[.$Z$5]*MAGNET([.D$24]+[.$BB27])+[.AH$32]*[.$Z$5]*MAGNET([.AH$24]+[.BB27]) +[.AI$32]*[.$Z$5]*MAGNET([.AI$24]+[.BB27]) +[.AJ$32]*[.$Z$5]*MAGNET([.AJ$24]+[.BB27]) +[.AK$32]*[.$Z$5]*MAGNET([.AK$24]+[.BB27]) +[.AL$32]*[.$Z$5]*MAGNET([.AL$24]+[.BB27]) +[.AM$32]*[.$Z$5]*MAGNET([.AM$24]+[.BB27]) +[.AN$32]*[.$Z$5]*MAGNET([.AN$24]+[.BB27]) +[.AO$32]*[.$Z$5]*MAGNET([.AO$24]+[.BB27]) +[.AP$32]*[.$Z$5]*MAGNET([.AP$24]+[.$BB27])&#10;+[.AQ$32]*[.$Z$5]*MAGNET([.AQ$24]+[.$BB27])&#10;+[.AR$32]*[.$Z$5]*MAGNET([.AR$24]+[.$BB27])&#10;+[.AS$32]*[.$Z$5]*MAGNET([.AS$24]+[.$BB27])&#10;+[.AT$32]*[.$Z$5]*MAGNET([.AT$24]+[.$BB27])&#10;+[.AU$32]*[.$Z$5]*MAGNET([.AU$24]+[.$BB27])&#10;+[.AV$32]*[.$Z$5]*MAGNET([.AV$24]+[.$BB27])&#10;+[.AW$32]*[.$Z$5]*MAGNET([.AW$24]+[.$BB27])&#10;+[.AX$32]*[.$Z$5]*MAGNET([.AX$24]+[.$BB27])&#10;+[.AY$32]*[.$Z$5]*MAGNET([.AY$24]+[.$BB2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formula="of:=[.H43]-[.H44]" office:value-type="float" office:value="0" calcext:value-type="float">
            <text:p>0</text:p>
          </table:table-cell>
          <table:table-cell table:formula="of:=[.I43]-[.I44]" office:value-type="float" office:value="0" calcext:value-type="float">
            <text:p>0</text:p>
          </table:table-cell>
          <table:table-cell table:formula="of:=[.J43]-[.J44]" office:value-type="float" office:value="0" calcext:value-type="float">
            <text:p>0</text:p>
          </table:table-cell>
          <table:table-cell table:formula="of:=[.K43]-[.K44]" office:value-type="float" office:value="0" calcext:value-type="float">
            <text:p>0</text:p>
          </table:table-cell>
          <table:table-cell table:formula="of:=[.L43]-[.L44]" office:value-type="float" office:value="0" calcext:value-type="float">
            <text:p>0</text:p>
          </table:table-cell>
          <table:table-cell table:formula="of:=[.M43]-[.M44]" office:value-type="float" office:value="0" calcext:value-type="float">
            <text:p>0</text:p>
          </table:table-cell>
          <table:table-cell table:formula="of:=[.N43]-[.N44]" office:value-type="float" office:value="0" calcext:value-type="float">
            <text:p>0</text:p>
          </table:table-cell>
          <table:table-cell table:formula="of:=[.O43]-[.O44]" office:value-type="float" office:value="0" calcext:value-type="float">
            <text:p>0</text:p>
          </table:table-cell>
          <table:table-cell table:formula="of:=[.P43]-[.P44]" office:value-type="float" office:value="0" calcext:value-type="float">
            <text:p>0</text:p>
          </table:table-cell>
          <table:table-cell table:formula="of:=[.Q43]-[.Q44]" office:value-type="float" office:value="0" calcext:value-type="float">
            <text:p>0</text:p>
          </table:table-cell>
          <table:table-cell table:formula="of:=[.R43]-[.R44]" office:value-type="float" office:value="0" calcext:value-type="float">
            <text:p>0</text:p>
          </table:table-cell>
          <table:table-cell table:formula="of:=[.S43]-[.S44]" office:value-type="float" office:value="0" calcext:value-type="float">
            <text:p>0</text:p>
          </table:table-cell>
          <table:table-cell table:formula="of:=[.T43]-[.T44]" office:value-type="float" office:value="0" calcext:value-type="float">
            <text:p>0</text:p>
          </table:table-cell>
          <table:table-cell table:formula="of:=[.U43]-[.U44]" office:value-type="float" office:value="0" calcext:value-type="float">
            <text:p>0</text:p>
          </table:table-cell>
          <table:table-cell table:formula="of:=[.V43]-[.V44]" office:value-type="float" office:value="0" calcext:value-type="float">
            <text:p>0</text:p>
          </table:table-cell>
          <table:table-cell table:formula="of:=[.W43]-[.W44]" office:value-type="float" office:value="0" calcext:value-type="float">
            <text:p>0</text:p>
          </table:table-cell>
          <table:table-cell table:formula="of:=[.X43]-[.X44]" office:value-type="float" office:value="0" calcext:value-type="float">
            <text:p>0</text:p>
          </table:table-cell>
          <table:table-cell table:formula="of:=[.Y43]-[.Y44]" office:value-type="float" office:value="0" calcext:value-type="float">
            <text:p>0</text:p>
          </table:table-cell>
          <table:table-cell table:formula="of:=[.Z43]-[.Z44]" office:value-type="float" office:value="0" calcext:value-type="float">
            <text:p>0</text:p>
          </table:table-cell>
          <table:table-cell table:formula="of:=[.AA43]-[.AA44]" office:value-type="float" office:value="0" calcext:value-type="float">
            <text:p>0</text:p>
          </table:table-cell>
          <table:table-cell table:formula="of:=[.AB43]-[.AB44]" office:value-type="float" office:value="0" calcext:value-type="float">
            <text:p>0</text:p>
          </table:table-cell>
          <table:table-cell table:formula="of:=[.AC43]-[.AC44]" office:value-type="float" office:value="0" calcext:value-type="float">
            <text:p>0</text:p>
          </table:table-cell>
          <table:table-cell table:formula="of:=[.AD43]-[.AD44]" office:value-type="float" office:value="0" calcext:value-type="float">
            <text:p>0</text:p>
          </table:table-cell>
          <table:table-cell table:formula="of:=[.AE43]-[.AE44]" office:value-type="float" office:value="0" calcext:value-type="float">
            <text:p>0</text:p>
          </table:table-cell>
          <table:table-cell table:formula="of:=[.AF43]-[.AF44]" office:value-type="float" office:value="0" calcext:value-type="float">
            <text:p>0</text:p>
          </table:table-cell>
          <table:table-cell table:formula="of:=[.AG43]-[.AG44]" office:value-type="float" office:value="0" calcext:value-type="float">
            <text:p>0</text:p>
          </table:table-cell>
          <table:table-cell table:formula="of:=[.AH43]-[.AH44]" office:value-type="float" office:value="0" calcext:value-type="float">
            <text:p>0</text:p>
          </table:table-cell>
          <table:table-cell table:formula="of:=[.AI43]-[.AI44]" office:value-type="float" office:value="0" calcext:value-type="float">
            <text:p>0</text:p>
          </table:table-cell>
          <table:table-cell table:formula="of:=[.AJ43]-[.AJ44]" office:value-type="float" office:value="4" calcext:value-type="float">
            <text:p>4</text:p>
          </table:table-cell>
          <table:table-cell table:formula="of:=[.AK43]-[.AK44]" office:value-type="float" office:value="0" calcext:value-type="float">
            <text:p>0</text:p>
          </table:table-cell>
          <table:table-cell table:formula="of:=[.AL43]-[.AL44]" office:value-type="float" office:value="0" calcext:value-type="float">
            <text:p>0</text:p>
          </table:table-cell>
          <table:table-cell table:formula="of:=[.AM43]-[.AM44]" office:value-type="float" office:value="0" calcext:value-type="float">
            <text:p>0</text:p>
          </table:table-cell>
          <table:table-cell table:formula="of:=[.AN43]-[.AN44]" office:value-type="float" office:value="-4" calcext:value-type="float">
            <text:p>-4</text:p>
          </table:table-cell>
          <table:table-cell table:formula="of:=[.AO43]-[.AO44]" office:value-type="float" office:value="0" calcext:value-type="float">
            <text:p>0</text:p>
          </table:table-cell>
          <table:table-cell table:formula="of:=[.AP43]-[.AP44]" office:value-type="float" office:value="0" calcext:value-type="float">
            <text:p>0</text:p>
          </table:table-cell>
          <table:table-cell table:formula="of:=[.AQ43]-[.AQ44]" office:value-type="float" office:value="0" calcext:value-type="float">
            <text:p>0</text:p>
          </table:table-cell>
          <table:table-cell table:formula="of:=[.AR43]-[.AR44]" office:value-type="float" office:value="0" calcext:value-type="float">
            <text:p>0</text:p>
          </table:table-cell>
          <table:table-cell table:formula="of:=[.AS43]-[.AS44]" office:value-type="float" office:value="0" calcext:value-type="float">
            <text:p>0</text:p>
          </table:table-cell>
          <table:table-cell table:formula="of:=[.AT43]-[.AT44]" office:value-type="float" office:value="0" calcext:value-type="float">
            <text:p>0</text:p>
          </table:table-cell>
          <table:table-cell table:formula="of:=[.AU43]-[.AU44]" office:value-type="float" office:value="0" calcext:value-type="float">
            <text:p>0</text:p>
          </table:table-cell>
          <table:table-cell table:formula="of:=[.AV43]-[.AV44]" office:value-type="float" office:value="0" calcext:value-type="float">
            <text:p>0</text:p>
          </table:table-cell>
          <table:table-cell table:formula="of:=[.AW43]-[.AW44]" office:value-type="float" office:value="0" calcext:value-type="float">
            <text:p>0</text:p>
          </table:table-cell>
          <table:table-cell table:formula="of:=[.AX43]-[.AX44]" office:value-type="float" office:value="0" calcext:value-type="float">
            <text:p>0</text:p>
          </table:table-cell>
          <table:table-cell table:formula="of:=[.AY43]-[.AY44]" office:value-type="float" office:value="0" calcext:value-type="float">
            <text:p>0</text:p>
          </table:table-cell>
          <table:table-cell/>
          <table:table-cell table:formula="of:=[.BA27]+0.002" office:value-type="float" office:value="0.026" calcext:value-type="float">
            <text:p>0.026</text:p>
          </table:table-cell>
          <table:table-cell table:formula="of:=[.BA28]*[.$D$6]" office:value-type="float" office:value="1.30690254389335" calcext:value-type="float">
            <text:p>1.307</text:p>
          </table:table-cell>
          <table:table-cell table:formula="of:=[.D$25]*[.$Z$5]*MAGNET([.D$24]+[.BB28])+[.E$25]*[.$Z$5]*MAGNET([.E$24]+[.BB28])+[.F$25]*[.$Z$5]*MAGNET([.F$24]+[.BB28])+[.G$25]*[.$Z$5]*MAGNET([.G$24]+[.BB28])+[.H$25]*[.$Z$5]*MAGNET([.H$24]+[.BB28])+[.I$25]*[.$Z$5]*MAGNET([.I$24]+[.BB28])+[.J$25]*[.$Z$5]*MAGNET([.J$24]+[.BB28])+[.K$25]*[.$Z$5]*MAGNET([.K$24]+[.BB28])+[.L$25]*[.$Z$5]*MAGNET([.L$24]+[.BB28])+[.M$25]*[.$Z$5]*MAGNET([.M$24]+[.BB28])+[.N$25]*[.$Z$5]*MAGNET([.N$24]+[.BB28])+[.O$25]*[.$Z$5]*MAGNET([.O$24]+[.BB28])+[.P$25]*[.$Z$5]*MAGNET([.P$24]+[.BB28])+[.Q$25]*[.$Z$5]*MAGNET([.Q$24]+[.BB28])+[.R$25]*[.$Z$5]*MAGNET([.R$24]+[.BB28])+[.S$25]*[.$Z$5]*MAGNET([.S$24]+[.BB28])+[.T$25]*[.$Z$5]*MAGNET([.T$24]+[.BB28])+[.U$25]*[.$Z$5]*MAGNET([.U$24]+[.BB28])+[.V$25]*[.$Z$5]*MAGNET([.V$24]+[.BB28])+[.W$25]*[.$Z$5]*MAGNET([.W$24]+[.BB28])+[.X$25]*[.$Z$5]*MAGNET([.X$24]+[.BB28])+[.Y$25]*[.$Z$5]*MAGNET([.Y$24]+[.BB28])+[.Z$25]*[.$Z$5]*MAGNET([.Z$24]+[.BB28])+[.AA$25]*[.$Z$5]*MAGNET([.AA$24]+[.BB28])+[.AB$25]*[.$Z$5]*MAGNET([.AB$24]+[.BB28])+[.AC$25]*[.$Z$5]*MAGNET([.AC$24]+[.BB28])+[.AD$25]*[.$Z$5]*MAGNET([.AD$24]+[.BB28])+[.AE$25]*[.$Z$5]*MAGNET([.AE$24]+[.BB28])+[.AF$25]*[.$Z$5]*MAGNET([.AF$24]+[.BB28])+[.AG$25]*[.$Z$5]*MAGNET([.AG$24]+[.BB28])+[.AH$25]*[.$Z$5]*MAGNET([.AH$24]+[.BB28]) +[.AI$25]*[.$Z$5]*MAGNET([.AI$24]+[.BB28]) +[.AJ$25]*[.$Z$5]*MAGNET([.AJ$24]+[.BB28]) +[.AK$25]*[.$Z$5]*MAGNET([.AK$24]+[.BB28]) +[.AL$25]*[.$Z$5]*MAGNET([.AL$24]+[.BB28]) +[.AM$25]*[.$Z$5]*MAGNET([.AM$24]+[.BB28]) +[.AN$25]*[.$Z$5]*MAGNET([.AN$24]+[.BB28]) +[.AO$25]*[.$Z$5]*MAGNET([.AO$24]+[.BB28])+RAND()*[.$BC$13]+[.AP$25]*[.$Z$5]*MAGNET([.AP$24]+[.BB28])&#10;+[.AQ$25]*[.$Z$5]*MAGNET([.AQ$24]+[.BB28])&#10;+[.AR$25]*[.$Z$5]*MAGNET([.AR$24]+[.BB28])&#10;+[.AS$25]*[.$Z$5]*MAGNET([.AS$24]+[.BB28])&#10;+[.AT$25]*[.$Z$5]*MAGNET([.AT$24]+[.BB28])&#10;+[.AU$25]*[.$Z$5]*MAGNET([.AU$24]+[.BB28])&#10;+[.AV$25]*[.$Z$5]*MAGNET([.AV$24]+[.BB28])&#10;+[.AW$25]*[.$Z$5]*MAGNET([.AW$24]+[.BB28])&#10;+[.AX$25]*[.$Z$5]*MAGNET([.AX$24]+[.BB28])&#10;+[.AY$25]*[.$Z$5]*MAGNET([.AY$24]+[.BB28])" office:value-type="float" office:value="94.0888999791946" calcext:value-type="float">
            <text:p>94.09</text:p>
          </table:table-cell>
          <table:table-cell table:style-name="ce70" table:formula="of:=[.E$26]*[.$Z$5]*MAGNET([.E$24]+[.$BB28])+[.F$26]*[.$Z$5]*MAGNET([.F$24]+[.$BB28])+[.G$26]*[.$Z$5]*MAGNET([.G$24]+[.$BB28])+[.H$26]*[.$Z$5]*MAGNET([.H$24]+[.$BB28])+[.I$26]*[.$Z$5]*MAGNET([.I$24]+[.$BB28])+[.J$26]*[.$Z$5]*MAGNET([.J$24]+[.$BB28])+[.K$26]*[.$Z$5]*MAGNET([.K$24]+[.$BB28])+[.L$26]*[.$Z$5]*MAGNET([.L$24]+[.$BB28])+[.M$26]*[.$Z$5]*MAGNET([.M$24]+[.$BB28])+[.N$26]*[.$Z$5]*MAGNET([.N$24]+[.$BB28])+[.O$26]*[.$Z$5]*MAGNET([.O$24]+[.$BB28])+[.P$26]*[.$Z$5]*MAGNET([.P$24]+[.$BB28])+[.Q$26]*[.$Z$5]*MAGNET([.Q$24]+[.$BB28])+[.R$26]*[.$Z$5]*MAGNET([.R$24]+[.$BB28])+[.S$26]*[.$Z$5]*MAGNET([.S$24]+[.$BB28])+[.T$26]*[.$Z$5]*MAGNET([.T$24]+[.$BB28])+[.U$26]*[.$Z$5]*MAGNET([.U$24]+[.$BB28])+[.V$26]*[.$Z$5]*MAGNET([.V$24]+[.$BB28])+[.W$26]*[.$Z$5]*MAGNET([.W$24]+[.$BB28])+[.X$26]*[.$Z$5]*MAGNET([.X$24]+[.$BB28])+[.Y$26]*[.$Z$5]*MAGNET([.Y$24]+[.$BB28])+[.Z$26]*[.$Z$5]*MAGNET([.Z$24]+[.$BB28])+[.AA$26]*[.$Z$5]*MAGNET([.AA$24]+[.$BB28])+[.AB$26]*[.$Z$5]*MAGNET([.AB$24]+[.$BB28])+[.AC$26]*[.$Z$5]*MAGNET([.AC$24]+[.$BB28])+[.AD$26]*[.$Z$5]*MAGNET([.AD$24]+[.$BB28])+[.AE$26]*[.$Z$5]*MAGNET([.AE$24]+[.$BB28])+[.AF$26]*[.$Z$5]*MAGNET([.AF$24]+[.$BB28])+[.AG$26]*[.$Z$5]*MAGNET([.AG$24]+[.$BB28])+[.D$26]*[.$Z$5]*MAGNET([.D$24]+[.$BB28])+[.AH$26]*[.$Z$5]*MAGNET([.AH$24]+[.BB28]) +[.AI$26]*[.$Z$5]*MAGNET([.AI$24]+[.BB28]) +[.AJ$26]*[.$Z$5]*MAGNET([.AJ$24]+[.BB28]) +[.AK$26]*[.$Z$5]*MAGNET([.AK$24]+[.BB28]) +[.AL$26]*[.$Z$5]*MAGNET([.AL$24]+[.BB28]) +[.AM$26]*[.$Z$5]*MAGNET([.AM$24]+[.BB28]) +[.AN$26]*[.$Z$5]*MAGNET([.AN$24]+[.BB28]) +[.AO$26]*[.$Z$5]*MAGNET([.AO$24]+[.BB28]) +[.AP$26]*[.$Z$5]*MAGNET([.AP$24]+[.$BB28])&#10;+[.AQ$26]*[.$Z$5]*MAGNET([.AQ$24]+[.$BB28])&#10;+[.AR$26]*[.$Z$5]*MAGNET([.AR$24]+[.$BB28])&#10;+[.AS$26]*[.$Z$5]*MAGNET([.AS$24]+[.$BB28])&#10;+[.AT$26]*[.$Z$5]*MAGNET([.AT$24]+[.$BB28])&#10;+[.AU$26]*[.$Z$5]*MAGNET([.AU$24]+[.$BB28])&#10;+[.AV$26]*[.$Z$5]*MAGNET([.AV$24]+[.$BB28])&#10;+[.AW$26]*[.$Z$5]*MAGNET([.AW$24]+[.$BB28])&#10;+[.AX$26]*[.$Z$5]*MAGNET([.AX$24]+[.$BB28])&#10;+[.AY$26]*[.$Z$5]*MAGNET([.AY$24]+[.$BB28]) +RAND()*[.$BD$13]" office:value-type="float" office:value="7.14125892494416" calcext:value-type="float">
            <text:p>7.14</text:p>
          </table:table-cell>
          <table:table-cell table:style-name="ce71" table:formula="of:=[.E$27]*[.$Z$5]*MAGNET([.E$24]+[.$BB28])+[.F$27]*[.$Z$5]*MAGNET([.F$24]+[.$BB28])+[.G$27]*[.$Z$5]*MAGNET([.G$24]+[.$BB28])+[.H$27]*[.$Z$5]*MAGNET([.H$24]+[.$BB28])+[.I$27]*[.$Z$5]*MAGNET([.I$24]+[.$BB28])+[.J$27]*[.$Z$5]*MAGNET([.J$24]+[.$BB28])+[.K$27]*[.$Z$5]*MAGNET([.K$24]+[.$BB28])+[.L$27]*[.$Z$5]*MAGNET([.L$24]+[.$BB28])+[.M$27]*[.$Z$5]*MAGNET([.M$24]+[.$BB28])+[.N$27]*[.$Z$5]*MAGNET([.N$24]+[.$BB28])+[.O$27]*[.$Z$5]*MAGNET([.O$24]+[.$BB28])+[.P$27]*[.$Z$5]*MAGNET([.P$24]+[.$BB28])+[.Q$27]*[.$Z$5]*MAGNET([.Q$24]+[.$BB28])+[.R$27]*[.$Z$5]*MAGNET([.R$24]+[.$BB28])+[.S$27]*[.$Z$5]*MAGNET([.S$24]+[.$BB28])+[.T$27]*[.$Z$5]*MAGNET([.T$24]+[.$BB28])+[.U$27]*[.$Z$5]*MAGNET([.U$24]+[.$BB28])+[.V$27]*[.$Z$5]*MAGNET([.V$24]+[.$BB28])+[.W$27]*[.$Z$5]*MAGNET([.W$24]+[.$BB28])+[.X$27]*[.$Z$5]*MAGNET([.X$24]+[.$BB28])+[.Y$27]*[.$Z$5]*MAGNET([.Y$24]+[.$BB28])+[.Z$27]*[.$Z$5]*MAGNET([.Z$24]+[.$BB28])+[.AA$27]*[.$Z$5]*MAGNET([.AA$24]+[.$BB28])+[.AB$27]*[.$Z$5]*MAGNET([.AB$24]+[.$BB28])+[.AC$27]*[.$Z$5]*MAGNET([.AC$24]+[.$BB28])+[.AD$27]*[.$Z$5]*MAGNET([.AD$24]+[.$BB28])+[.AE$27]*[.$Z$5]*MAGNET([.AE$24]+[.$BB28])+[.AF$27]*[.$Z$5]*MAGNET([.AF$24]+[.$BB28])+[.AG$27]*[.$Z$5]*MAGNET([.AG$24]+[.$BB28])+[.D$27]*[.$Z$5]*MAGNET([.D$24]+[.$BB28])+[.AH$27]*[.$Z$5]*MAGNET([.AH$24]+[.BB28]) +[.AI$27]*[.$Z$5]*MAGNET([.AI$24]+[.BB28]) +[.AJ$27]*[.$Z$5]*MAGNET([.AJ$24]+[.BB28]) +[.AK$27]*[.$Z$5]*MAGNET([.AK$24]+[.BB28]) +[.AL$27]*[.$Z$5]*MAGNET([.AL$24]+[.BB28]) +[.AM$27]*[.$Z$5]*MAGNET([.AM$24]+[.BB28]) +[.AN$27]*[.$Z$5]*MAGNET([.AN$24]+[.BB28]) +[.AO$27]*[.$Z$5]*MAGNET([.AO$24]+[.BB28]) +[.AP$27]*[.$Z$5]*MAGNET([.AP$24]+[.$BB28])&#10;+[.AQ$27]*[.$Z$5]*MAGNET([.AQ$24]+[.$BB28])&#10;+[.AR$27]*[.$Z$5]*MAGNET([.AR$24]+[.$BB28])&#10;+[.AS$27]*[.$Z$5]*MAGNET([.AS$24]+[.$BB28])&#10;+[.AT$27]*[.$Z$5]*MAGNET([.AT$24]+[.$BB28])&#10;+[.AU$27]*[.$Z$5]*MAGNET([.AU$24]+[.$BB28])&#10;+[.AV$27]*[.$Z$5]*MAGNET([.AV$24]+[.$BB28])&#10;+[.AW$27]*[.$Z$5]*MAGNET([.AW$24]+[.$BB28])&#10;+[.AX$27]*[.$Z$5]*MAGNET([.AX$24]+[.$BB28])&#10;+[.AY$27]*[.$Z$5]*MAGNET([.AY$24]+[.$BB28]) +RAND()*[.$BE$13]" office:value-type="float" office:value="-126.214139674053" calcext:value-type="float">
            <text:p>-126.214139674053</text:p>
          </table:table-cell>
          <table:table-cell table:style-name="ce71" table:formula="of:=[.E$28]*[.$Z$5]*MAGNET([.E$24]+[.$BB28])+[.F$28]*[.$Z$5]*MAGNET([.F$24]+[.$BB28])+[.G$28]*[.$Z$5]*MAGNET([.G$24]+[.$BB28])+[.H$28]*[.$Z$5]*MAGNET([.H$24]+[.$BB28])+[.I$28]*[.$Z$5]*MAGNET([.I$24]+[.$BB28])+[.J$28]*[.$Z$5]*MAGNET([.J$24]+[.$BB28])+[.K$28]*[.$Z$5]*MAGNET([.K$24]+[.$BB28])+[.L$28]*[.$Z$5]*MAGNET([.L$24]+[.$BB28])+[.M$28]*[.$Z$5]*MAGNET([.M$24]+[.$BB28])+[.N$28]*[.$Z$5]*MAGNET([.N$24]+[.$BB28])+[.O$28]*[.$Z$5]*MAGNET([.O$24]+[.$BB28])+[.P$28]*[.$Z$5]*MAGNET([.P$24]+[.$BB28])+[.Q$28]*[.$Z$5]*MAGNET([.Q$24]+[.$BB28])+[.R$28]*[.$Z$5]*MAGNET([.R$24]+[.$BB28])+[.S$28]*[.$Z$5]*MAGNET([.S$24]+[.$BB28])+[.T$28]*[.$Z$5]*MAGNET([.T$24]+[.$BB28])+[.U$28]*[.$Z$5]*MAGNET([.U$24]+[.$BB28])+[.V$28]*[.$Z$5]*MAGNET([.V$24]+[.$BB28])+[.W$28]*[.$Z$5]*MAGNET([.W$24]+[.$BB28])+[.X$28]*[.$Z$5]*MAGNET([.X$24]+[.$BB28])+[.Y$28]*[.$Z$5]*MAGNET([.Y$24]+[.$BB28])+[.Z$28]*[.$Z$5]*MAGNET([.Z$24]+[.$BB28])+[.AA$28]*[.$Z$5]*MAGNET([.AA$24]+[.$BB28])+[.AB$28]*[.$Z$5]*MAGNET([.AB$24]+[.$BB28])+[.AC$28]*[.$Z$5]*MAGNET([.AC$24]+[.$BB28])+[.AD$28]*[.$Z$5]*MAGNET([.AD$24]+[.$BB28])+[.AE$28]*[.$Z$5]*MAGNET([.AE$24]+[.$BB28])+[.AF$28]*[.$Z$5]*MAGNET([.AF$24]+[.$BB28])+[.AG$28]*[.$Z$5]*MAGNET([.AG$24]+[.$BB28])+[.D$28]*[.$Z$5]*MAGNET([.D$24]+[.$BB28])+[.AH$28]*[.$Z$5]*MAGNET([.AH$24]+[.BB28]) +[.AI$28]*[.$Z$5]*MAGNET([.AI$24]+[.BB28]) +[.AJ$28]*[.$Z$5]*MAGNET([.AJ$24]+[.BB28]) +[.AK$28]*[.$Z$5]*MAGNET([.AK$24]+[.BB28]) +[.AL$28]*[.$Z$5]*MAGNET([.AL$24]+[.BB28]) +[.AM$28]*[.$Z$5]*MAGNET([.AM$24]+[.BB28]) +[.AN$28]*[.$Z$5]*MAGNET([.AN$24]+[.BB28]) +[.AO$28]*[.$Z$5]*MAGNET([.AO$24]+[.BB28]) +[.AP$28]*[.$Z$5]*MAGNET([.AP$24]+[.$BB28])&#10;+[.AQ$28]*[.$Z$5]*MAGNET([.AQ$24]+[.$BB28])&#10;+[.AR$28]*[.$Z$5]*MAGNET([.AR$24]+[.$BB28])&#10;+[.AS$28]*[.$Z$5]*MAGNET([.AS$24]+[.$BB28])&#10;+[.AT$28]*[.$Z$5]*MAGNET([.AT$24]+[.$BB28])&#10;+[.AU$28]*[.$Z$5]*MAGNET([.AU$24]+[.$BB28])&#10;+[.AV$28]*[.$Z$5]*MAGNET([.AV$24]+[.$BB28])&#10;+[.AW$28]*[.$Z$5]*MAGNET([.AW$24]+[.$BB28])&#10;+[.AX$28]*[.$Z$5]*MAGNET([.AX$24]+[.$BB28])&#10;+[.AY$28]*[.$Z$5]*MAGNET([.AY$24]+[.$BB28]) +RAND()*[.$BF$13]" office:value-type="float" office:value="-15.913524358389" calcext:value-type="float">
            <text:p>-15.913524358389</text:p>
          </table:table-cell>
          <table:table-cell table:style-name="ce71" table:formula="of:=[.E$29]*[.$Z$5]*MAGNET([.E$24]+[.$BB28])+[.F$29]*[.$Z$5]*MAGNET([.F$24]+[.$BB28])+[.G$29]*[.$Z$5]*MAGNET([.G$24]+[.$BB28])+[.H$29]*[.$Z$5]*MAGNET([.H$24]+[.$BB28])+[.I$29]*[.$Z$5]*MAGNET([.I$24]+[.$BB28])+[.J$29]*[.$Z$5]*MAGNET([.J$24]+[.$BB28])+[.K$29]*[.$Z$5]*MAGNET([.K$24]+[.$BB28])+[.L$29]*[.$Z$5]*MAGNET([.L$24]+[.$BB28])+[.M$29]*[.$Z$5]*MAGNET([.M$24]+[.$BB28])+[.N$29]*[.$Z$5]*MAGNET([.N$24]+[.$BB28])+[.O$29]*[.$Z$5]*MAGNET([.O$24]+[.$BB28])+[.P$29]*[.$Z$5]*MAGNET([.P$24]+[.$BB28])+[.Q$29]*[.$Z$5]*MAGNET([.Q$24]+[.$BB28])+[.R$29]*[.$Z$5]*MAGNET([.R$24]+[.$BB28])+[.S$29]*[.$Z$5]*MAGNET([.S$24]+[.$BB28])+[.T$29]*[.$Z$5]*MAGNET([.T$24]+[.$BB28])+[.U$29]*[.$Z$5]*MAGNET([.U$24]+[.$BB28])+[.V$29]*[.$Z$5]*MAGNET([.V$24]+[.$BB28])+[.W$29]*[.$Z$5]*MAGNET([.W$24]+[.$BB28])+[.X$29]*[.$Z$5]*MAGNET([.X$24]+[.$BB28])+[.Y$29]*[.$Z$5]*MAGNET([.Y$24]+[.$BB28])+[.Z$29]*[.$Z$5]*MAGNET([.Z$24]+[.$BB28])+[.AA$29]*[.$Z$5]*MAGNET([.AA$24]+[.$BB28])+[.AB$29]*[.$Z$5]*MAGNET([.AB$24]+[.$BB28])+[.AC$29]*[.$Z$5]*MAGNET([.AC$24]+[.$BB28])+[.AD$29]*[.$Z$5]*MAGNET([.AD$24]+[.$BB28])+[.AE$29]*[.$Z$5]*MAGNET([.AE$24]+[.$BB28])+[.AF$29]*[.$Z$5]*MAGNET([.AF$24]+[.$BB28])+[.AG$29]*[.$Z$5]*MAGNET([.AG$24]+[.$BB28])+[.D$29]*[.$Z$5]*MAGNET([.D$24]+[.$BB28])+[.AH$29]*[.$Z$5]*MAGNET([.AH$24]+[.BB28]) +[.AI$29]*[.$Z$5]*MAGNET([.AI$24]+[.BB28]) +[.AJ$29]*[.$Z$5]*MAGNET([.AJ$24]+[.BB28]) +[.AK$29]*[.$Z$5]*MAGNET([.AK$24]+[.BB28]) +[.AL$29]*[.$Z$5]*MAGNET([.AL$24]+[.BB28]) +[.AM$29]*[.$Z$5]*MAGNET([.AM$24]+[.BB28]) +[.AN$29]*[.$Z$5]*MAGNET([.AN$24]+[.BB28]) +[.AO$29]*[.$Z$5]*MAGNET([.AO$24]+[.BB28]) +[.AP$29]*[.$Z$5]*MAGNET([.AP$24]+[.$BB28])&#10;+[.AQ$29]*[.$Z$5]*MAGNET([.AQ$24]+[.$BB28])&#10;+[.AR$29]*[.$Z$5]*MAGNET([.AR$24]+[.$BB28])&#10;+[.AS$29]*[.$Z$5]*MAGNET([.AS$24]+[.$BB28])&#10;+[.AT$29]*[.$Z$5]*MAGNET([.AT$24]+[.$BB28])&#10;+[.AU$29]*[.$Z$5]*MAGNET([.AU$24]+[.$BB28])&#10;+[.AV$29]*[.$Z$5]*MAGNET([.AV$24]+[.$BB28])&#10;+[.AW$29]*[.$Z$5]*MAGNET([.AW$24]+[.$BB28])&#10;+[.AX$29]*[.$Z$5]*MAGNET([.AX$24]+[.$BB28])&#10;+[.AY$29]*[.$Z$5]*MAGNET([.AY$24]+[.$BB28]) +RAND()*[.$BG$13]" office:value-type="float" office:value="47.477011250495" calcext:value-type="float">
            <text:p>47.477011250495</text:p>
          </table:table-cell>
          <table:table-cell table:style-name="ce71" table:formula="of:=[.E$30]*[.$Z$5]*MAGNET([.E$24]+[.$BB28])+[.F$30]*[.$Z$5]*MAGNET([.F$24]+[.$BB28])+[.G$30]*[.$Z$5]*MAGNET([.G$24]+[.$BB28])+[.H$30]*[.$Z$5]*MAGNET([.H$24]+[.$BB28])+[.I$30]*[.$Z$5]*MAGNET([.I$24]+[.$BB28])+[.J$30]*[.$Z$5]*MAGNET([.J$24]+[.$BB28])+[.K$30]*[.$Z$5]*MAGNET([.K$24]+[.$BB28])+[.L$30]*[.$Z$5]*MAGNET([.L$24]+[.$BB28])+[.M$30]*[.$Z$5]*MAGNET([.M$24]+[.$BB28])+[.N$30]*[.$Z$5]*MAGNET([.N$24]+[.$BB28])+[.O$30]*[.$Z$5]*MAGNET([.O$24]+[.$BB28])+[.P$30]*[.$Z$5]*MAGNET([.P$24]+[.$BB28])+[.Q$30]*[.$Z$5]*MAGNET([.Q$24]+[.$BB28])+[.R$30]*[.$Z$5]*MAGNET([.R$24]+[.$BB28])+[.S$30]*[.$Z$5]*MAGNET([.S$24]+[.$BB28])+[.T$30]*[.$Z$5]*MAGNET([.T$24]+[.$BB28])+[.U$30]*[.$Z$5]*MAGNET([.U$24]+[.$BB28])+[.V$30]*[.$Z$5]*MAGNET([.V$24]+[.$BB28])+[.W$30]*[.$Z$5]*MAGNET([.W$24]+[.$BB28])+[.X$30]*[.$Z$5]*MAGNET([.X$24]+[.$BB28])+[.Y$30]*[.$Z$5]*MAGNET([.Y$24]+[.$BB28])+[.Z$30]*[.$Z$5]*MAGNET([.Z$24]+[.$BB28])+[.AA$30]*[.$Z$5]*MAGNET([.AA$24]+[.$BB28])+[.AB$30]*[.$Z$5]*MAGNET([.AB$24]+[.$BB28])+[.AC$30]*[.$Z$5]*MAGNET([.AC$24]+[.$BB28])+[.AD$30]*[.$Z$5]*MAGNET([.AD$24]+[.$BB28])+[.AE$30]*[.$Z$5]*MAGNET([.AE$24]+[.$BB28])+[.AF$30]*[.$Z$5]*MAGNET([.AF$24]+[.$BB28])+[.AG$30]*[.$Z$5]*MAGNET([.AG$24]+[.$BB28])+[.D$30]*[.$Z$5]*MAGNET([.D$24]+[.$BB28])+[.AH$30]*[.$Z$5]*MAGNET([.AH$24]+[.BB28]) +[.AI$30]*[.$Z$5]*MAGNET([.AI$24]+[.BB28]) +[.AJ$30]*[.$Z$5]*MAGNET([.AJ$24]+[.BB28]) +[.AK$30]*[.$Z$5]*MAGNET([.AK$24]+[.BB28]) +[.AL$30]*[.$Z$5]*MAGNET([.AL$24]+[.BB28]) +[.AM$30]*[.$Z$5]*MAGNET([.AM$24]+[.BB28]) +[.AN$30]*[.$Z$5]*MAGNET([.AN$24]+[.BB28]) +[.AO$30]*[.$Z$5]*MAGNET([.AO$24]+[.BB28]) +[.AP$30]*[.$Z$5]*MAGNET([.AP$24]+[.$BB28])&#10;+[.AQ$30]*[.$Z$5]*MAGNET([.AQ$24]+[.$BB28])&#10;+[.AR$30]*[.$Z$5]*MAGNET([.AR$24]+[.$BB28])&#10;+[.AS$30]*[.$Z$5]*MAGNET([.AS$24]+[.$BB28])&#10;+[.AT$30]*[.$Z$5]*MAGNET([.AT$24]+[.$BB28])&#10;+[.AU$30]*[.$Z$5]*MAGNET([.AU$24]+[.$BB28])&#10;+[.AV$30]*[.$Z$5]*MAGNET([.AV$24]+[.$BB28])&#10;+[.AW$30]*[.$Z$5]*MAGNET([.AW$24]+[.$BB28])&#10;+[.AX$30]*[.$Z$5]*MAGNET([.AX$24]+[.$BB28])&#10;+[.AY$30]*[.$Z$5]*MAGNET([.AY$24]+[.$BB28]) +RAND()*[.$BH$13]" office:value-type="float" office:value="0" calcext:value-type="float">
            <text:p>0</text:p>
          </table:table-cell>
          <table:table-cell table:style-name="ce71" table:formula="of:=[.E$31]*[.$Z$5]*MAGNET([.E$24]+[.$BB28])+[.F$31]*[.$Z$5]*MAGNET([.F$24]+[.$BB28])+[.G$31]*[.$Z$5]*MAGNET([.G$24]+[.$BB28])+[.H$31]*[.$Z$5]*MAGNET([.H$24]+[.$BB28])+[.I$31]*[.$Z$5]*MAGNET([.I$24]+[.$BB28])+[.J$31]*[.$Z$5]*MAGNET([.J$24]+[.$BB28])+[.K$31]*[.$Z$5]*MAGNET([.K$24]+[.$BB28])+[.L$31]*[.$Z$5]*MAGNET([.L$24]+[.$BB28])+[.M$31]*[.$Z$5]*MAGNET([.M$24]+[.$BB28])+[.N$31]*[.$Z$5]*MAGNET([.N$24]+[.$BB28])+[.O$31]*[.$Z$5]*MAGNET([.O$24]+[.$BB28])+[.P$31]*[.$Z$5]*MAGNET([.P$24]+[.$BB28])+[.Q$31]*[.$Z$5]*MAGNET([.Q$24]+[.$BB28])+[.R$31]*[.$Z$5]*MAGNET([.R$24]+[.$BB28])+[.S$31]*[.$Z$5]*MAGNET([.S$24]+[.$BB28])+[.T$31]*[.$Z$5]*MAGNET([.T$24]+[.$BB28])+[.U$31]*[.$Z$5]*MAGNET([.U$24]+[.$BB28])+[.V$31]*[.$Z$5]*MAGNET([.V$24]+[.$BB28])+[.W$31]*[.$Z$5]*MAGNET([.W$24]+[.$BB28])+[.X$31]*[.$Z$5]*MAGNET([.X$24]+[.$BB28])+[.Y$31]*[.$Z$5]*MAGNET([.Y$24]+[.$BB28])+[.Z$31]*[.$Z$5]*MAGNET([.Z$24]+[.$BB28])+[.AA$31]*[.$Z$5]*MAGNET([.AA$24]+[.$BB28])+[.AB$31]*[.$Z$5]*MAGNET([.AB$24]+[.$BB28])+[.AC$31]*[.$Z$5]*MAGNET([.AC$24]+[.$BB28])+[.AD$31]*[.$Z$5]*MAGNET([.AD$24]+[.$BB28])+[.AE$31]*[.$Z$5]*MAGNET([.AE$24]+[.$BB28])+[.AF$31]*[.$Z$5]*MAGNET([.AF$24]+[.$BB28])+[.AG$31]*[.$Z$5]*MAGNET([.AG$24]+[.$BB28])+[.D$31]*[.$Z$5]*MAGNET([.D$24]+[.$BB28])+[.AH$31]*[.$Z$5]*MAGNET([.AH$24]+[.BB28]) +[.AI$31]*[.$Z$5]*MAGNET([.AI$24]+[.BB28]) +[.AJ$31]*[.$Z$5]*MAGNET([.AJ$24]+[.BB28]) +[.AK$31]*[.$Z$5]*MAGNET([.AK$24]+[.BB28]) +[.AL$31]*[.$Z$5]*MAGNET([.AL$24]+[.BB28]) +[.AM$31]*[.$Z$5]*MAGNET([.AM$24]+[.BB28]) +[.AN$31]*[.$Z$5]*MAGNET([.AN$24]+[.BB28]) +[.AO$31]*[.$Z$5]*MAGNET([.AO$24]+[.BB28]) +[.AP$31]*[.$Z$5]*MAGNET([.AP$24]+[.$BB28])&#10;+[.AQ$31]*[.$Z$5]*MAGNET([.AQ$24]+[.$BB28])&#10;+[.AR$31]*[.$Z$5]*MAGNET([.AR$24]+[.$BB28])&#10;+[.AS$31]*[.$Z$5]*MAGNET([.AS$24]+[.$BB28])&#10;+[.AT$31]*[.$Z$5]*MAGNET([.AT$24]+[.$BB28])&#10;+[.AU$31]*[.$Z$5]*MAGNET([.AU$24]+[.$BB28])&#10;+[.AV$31]*[.$Z$5]*MAGNET([.AV$24]+[.$BB28])&#10;+[.AW$31]*[.$Z$5]*MAGNET([.AW$24]+[.$BB28])&#10;+[.AX$31]*[.$Z$5]*MAGNET([.AX$24]+[.$BB28])&#10;+[.AY$31]*[.$Z$5]*MAGNET([.AY$24]+[.$BB28]) +RAND()*[.$BI$13]" office:value-type="float" office:value="0" calcext:value-type="float">
            <text:p>0</text:p>
          </table:table-cell>
          <table:table-cell table:style-name="ce71" table:formula="of:=[.E$32]*[.$Z$5]*MAGNET([.E$24]+[.$BB28])+[.F$32]*[.$Z$5]*MAGNET([.F$24]+[.$BB28])+[.G$32]*[.$Z$5]*MAGNET([.G$24]+[.$BB28])+[.H$32]*[.$Z$5]*MAGNET([.H$24]+[.$BB28])+[.I$32]*[.$Z$5]*MAGNET([.I$24]+[.$BB28])+[.J$32]*[.$Z$5]*MAGNET([.J$24]+[.$BB28])+[.K$32]*[.$Z$5]*MAGNET([.K$24]+[.$BB28])+[.L$32]*[.$Z$5]*MAGNET([.L$24]+[.$BB28])+[.M$32]*[.$Z$5]*MAGNET([.M$24]+[.$BB28])+[.N$32]*[.$Z$5]*MAGNET([.N$24]+[.$BB28])+[.O$32]*[.$Z$5]*MAGNET([.O$24]+[.$BB28])+[.P$32]*[.$Z$5]*MAGNET([.P$24]+[.$BB28])+[.Q$32]*[.$Z$5]*MAGNET([.Q$24]+[.$BB28])+[.R$32]*[.$Z$5]*MAGNET([.R$24]+[.$BB28])+[.S$32]*[.$Z$5]*MAGNET([.S$24]+[.$BB28])+[.T$32]*[.$Z$5]*MAGNET([.T$24]+[.$BB28])+[.U$32]*[.$Z$5]*MAGNET([.U$24]+[.$BB28])+[.V$32]*[.$Z$5]*MAGNET([.V$24]+[.$BB28])+[.W$32]*[.$Z$5]*MAGNET([.W$24]+[.$BB28])+[.X$32]*[.$Z$5]*MAGNET([.X$24]+[.$BB28])+[.Y$32]*[.$Z$5]*MAGNET([.Y$24]+[.$BB28])+[.Z$32]*[.$Z$5]*MAGNET([.Z$24]+[.$BB28])+[.AA$32]*[.$Z$5]*MAGNET([.AA$24]+[.$BB28])+[.AB$32]*[.$Z$5]*MAGNET([.AB$24]+[.$BB28])+[.AC$32]*[.$Z$5]*MAGNET([.AC$24]+[.$BB28])+[.AD$32]*[.$Z$5]*MAGNET([.AD$24]+[.$BB28])+[.AE$32]*[.$Z$5]*MAGNET([.AE$24]+[.$BB28])+[.AF$32]*[.$Z$5]*MAGNET([.AF$24]+[.$BB28])+[.AG$32]*[.$Z$5]*MAGNET([.AG$24]+[.$BB28])+[.D$32]*[.$Z$5]*MAGNET([.D$24]+[.$BB28])+[.AH$32]*[.$Z$5]*MAGNET([.AH$24]+[.BB28]) +[.AI$32]*[.$Z$5]*MAGNET([.AI$24]+[.BB28]) +[.AJ$32]*[.$Z$5]*MAGNET([.AJ$24]+[.BB28]) +[.AK$32]*[.$Z$5]*MAGNET([.AK$24]+[.BB28]) +[.AL$32]*[.$Z$5]*MAGNET([.AL$24]+[.BB28]) +[.AM$32]*[.$Z$5]*MAGNET([.AM$24]+[.BB28]) +[.AN$32]*[.$Z$5]*MAGNET([.AN$24]+[.BB28]) +[.AO$32]*[.$Z$5]*MAGNET([.AO$24]+[.BB28]) +[.AP$32]*[.$Z$5]*MAGNET([.AP$24]+[.$BB28])&#10;+[.AQ$32]*[.$Z$5]*MAGNET([.AQ$24]+[.$BB28])&#10;+[.AR$32]*[.$Z$5]*MAGNET([.AR$24]+[.$BB28])&#10;+[.AS$32]*[.$Z$5]*MAGNET([.AS$24]+[.$BB28])&#10;+[.AT$32]*[.$Z$5]*MAGNET([.AT$24]+[.$BB28])&#10;+[.AU$32]*[.$Z$5]*MAGNET([.AU$24]+[.$BB28])&#10;+[.AV$32]*[.$Z$5]*MAGNET([.AV$24]+[.$BB28])&#10;+[.AW$32]*[.$Z$5]*MAGNET([.AW$24]+[.$BB28])&#10;+[.AX$32]*[.$Z$5]*MAGNET([.AX$24]+[.$BB28])&#10;+[.AY$32]*[.$Z$5]*MAGNET([.AY$24]+[.$BB2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formula="of:=[.D45]-[.D46]" office:value-type="float" office:value="0" calcext:value-type="float">
            <text:p>0</text:p>
          </table:table-cell>
          <table:table-cell table:formula="of:=[.E45]-[.E46]" office:value-type="float" office:value="0" calcext:value-type="float">
            <text:p>0</text:p>
          </table:table-cell>
          <table:table-cell table:formula="of:=[.F45]-[.F46]" office:value-type="float" office:value="0" calcext:value-type="float">
            <text:p>0</text:p>
          </table:table-cell>
          <table:table-cell table:formula="of:=[.G45]-[.G46]" office:value-type="float" office:value="0" calcext:value-type="float">
            <text:p>0</text:p>
          </table:table-cell>
          <table:table-cell table:formula="of:=[.H45]-[.H46]" office:value-type="float" office:value="0" calcext:value-type="float">
            <text:p>0</text:p>
          </table:table-cell>
          <table:table-cell table:formula="of:=[.I45]-[.I46]" office:value-type="float" office:value="0" calcext:value-type="float">
            <text:p>0</text:p>
          </table:table-cell>
          <table:table-cell table:formula="of:=[.J45]-[.J46]" office:value-type="float" office:value="0" calcext:value-type="float">
            <text:p>0</text:p>
          </table:table-cell>
          <table:table-cell table:formula="of:=[.K45]-[.K46]" office:value-type="float" office:value="0" calcext:value-type="float">
            <text:p>0</text:p>
          </table:table-cell>
          <table:table-cell table:formula="of:=[.L45]-[.L46]" office:value-type="float" office:value="0" calcext:value-type="float">
            <text:p>0</text:p>
          </table:table-cell>
          <table:table-cell table:formula="of:=[.M45]-[.M46]" office:value-type="float" office:value="0" calcext:value-type="float">
            <text:p>0</text:p>
          </table:table-cell>
          <table:table-cell table:formula="of:=[.N45]-[.N46]" office:value-type="float" office:value="0" calcext:value-type="float">
            <text:p>0</text:p>
          </table:table-cell>
          <table:table-cell table:formula="of:=[.O45]-[.O46]" office:value-type="float" office:value="0" calcext:value-type="float">
            <text:p>0</text:p>
          </table:table-cell>
          <table:table-cell table:formula="of:=[.P45]-[.P46]" office:value-type="float" office:value="0" calcext:value-type="float">
            <text:p>0</text:p>
          </table:table-cell>
          <table:table-cell table:formula="of:=[.Q45]-[.Q46]" office:value-type="float" office:value="0" calcext:value-type="float">
            <text:p>0</text:p>
          </table:table-cell>
          <table:table-cell table:formula="of:=[.R45]-[.R46]" office:value-type="float" office:value="0" calcext:value-type="float">
            <text:p>0</text:p>
          </table:table-cell>
          <table:table-cell table:formula="of:=[.S45]-[.S46]" office:value-type="float" office:value="0" calcext:value-type="float">
            <text:p>0</text:p>
          </table:table-cell>
          <table:table-cell table:formula="of:=[.T45]-[.T46]" office:value-type="float" office:value="0" calcext:value-type="float">
            <text:p>0</text:p>
          </table:table-cell>
          <table:table-cell table:formula="of:=[.U45]-[.U46]" office:value-type="float" office:value="0" calcext:value-type="float">
            <text:p>0</text:p>
          </table:table-cell>
          <table:table-cell table:formula="of:=[.V45]-[.V46]" office:value-type="float" office:value="0" calcext:value-type="float">
            <text:p>0</text:p>
          </table:table-cell>
          <table:table-cell table:formula="of:=[.W45]-[.W46]" office:value-type="float" office:value="0" calcext:value-type="float">
            <text:p>0</text:p>
          </table:table-cell>
          <table:table-cell table:formula="of:=[.X45]-[.X46]" office:value-type="float" office:value="4" calcext:value-type="float">
            <text:p>4</text:p>
          </table:table-cell>
          <table:table-cell table:formula="of:=[.Y45]-[.Y46]" office:value-type="float" office:value="4" calcext:value-type="float">
            <text:p>4</text:p>
          </table:table-cell>
          <table:table-cell table:formula="of:=[.Z45]-[.Z46]" office:value-type="float" office:value="0" calcext:value-type="float">
            <text:p>0</text:p>
          </table:table-cell>
          <table:table-cell table:formula="of:=[.AA45]-[.AA46]" office:value-type="float" office:value="0" calcext:value-type="float">
            <text:p>0</text:p>
          </table:table-cell>
          <table:table-cell table:formula="of:=[.AB45]-[.AB46]" office:value-type="float" office:value="0" calcext:value-type="float">
            <text:p>0</text:p>
          </table:table-cell>
          <table:table-cell table:formula="of:=[.AC45]-[.AC46]" office:value-type="float" office:value="0" calcext:value-type="float">
            <text:p>0</text:p>
          </table:table-cell>
          <table:table-cell table:formula="of:=[.AD45]-[.AD46]" office:value-type="float" office:value="0" calcext:value-type="float">
            <text:p>0</text:p>
          </table:table-cell>
          <table:table-cell table:formula="of:=[.AE45]-[.AE46]" office:value-type="float" office:value="0" calcext:value-type="float">
            <text:p>0</text:p>
          </table:table-cell>
          <table:table-cell table:formula="of:=[.AF45]-[.AF46]" office:value-type="float" office:value="-4" calcext:value-type="float">
            <text:p>-4</text:p>
          </table:table-cell>
          <table:table-cell table:formula="of:=[.AG45]-[.AG46]" office:value-type="float" office:value="-3" calcext:value-type="float">
            <text:p>-3</text:p>
          </table:table-cell>
          <table:table-cell table:formula="of:=[.AH45]-[.AH46]" office:value-type="float" office:value="0" calcext:value-type="float">
            <text:p>0</text:p>
          </table:table-cell>
          <table:table-cell table:formula="of:=[.AI45]-[.AI46]" office:value-type="float" office:value="0" calcext:value-type="float">
            <text:p>0</text:p>
          </table:table-cell>
          <table:table-cell table:formula="of:=[.AJ45]-[.AJ46]" office:value-type="float" office:value="0" calcext:value-type="float">
            <text:p>0</text:p>
          </table:table-cell>
          <table:table-cell table:formula="of:=[.AK45]-[.AK46]" office:value-type="float" office:value="0" calcext:value-type="float">
            <text:p>0</text:p>
          </table:table-cell>
          <table:table-cell table:formula="of:=[.AL45]-[.AL46]" office:value-type="float" office:value="0" calcext:value-type="float">
            <text:p>0</text:p>
          </table:table-cell>
          <table:table-cell table:formula="of:=[.AM45]-[.AM46]" office:value-type="float" office:value="0" calcext:value-type="float">
            <text:p>0</text:p>
          </table:table-cell>
          <table:table-cell table:formula="of:=[.AN45]-[.AN46]" office:value-type="float" office:value="0" calcext:value-type="float">
            <text:p>0</text:p>
          </table:table-cell>
          <table:table-cell table:formula="of:=[.AO45]-[.AO46]" office:value-type="float" office:value="0" calcext:value-type="float">
            <text:p>0</text:p>
          </table:table-cell>
          <table:table-cell table:formula="of:=[.AP45]-[.AP46]" office:value-type="float" office:value="0" calcext:value-type="float">
            <text:p>0</text:p>
          </table:table-cell>
          <table:table-cell table:formula="of:=[.AQ45]-[.AQ46]" office:value-type="float" office:value="0" calcext:value-type="float">
            <text:p>0</text:p>
          </table:table-cell>
          <table:table-cell table:formula="of:=[.AR45]-[.AR46]" office:value-type="float" office:value="0" calcext:value-type="float">
            <text:p>0</text:p>
          </table:table-cell>
          <table:table-cell table:formula="of:=[.AS45]-[.AS46]" office:value-type="float" office:value="0" calcext:value-type="float">
            <text:p>0</text:p>
          </table:table-cell>
          <table:table-cell table:formula="of:=[.AT45]-[.AT46]" office:value-type="float" office:value="0" calcext:value-type="float">
            <text:p>0</text:p>
          </table:table-cell>
          <table:table-cell table:formula="of:=[.AU45]-[.AU46]" office:value-type="float" office:value="0" calcext:value-type="float">
            <text:p>0</text:p>
          </table:table-cell>
          <table:table-cell table:formula="of:=[.AV45]-[.AV46]" office:value-type="float" office:value="0" calcext:value-type="float">
            <text:p>0</text:p>
          </table:table-cell>
          <table:table-cell table:formula="of:=[.AW45]-[.AW46]" office:value-type="float" office:value="0" calcext:value-type="float">
            <text:p>0</text:p>
          </table:table-cell>
          <table:table-cell table:formula="of:=[.AX45]-[.AX46]" office:value-type="float" office:value="0" calcext:value-type="float">
            <text:p>0</text:p>
          </table:table-cell>
          <table:table-cell table:formula="of:=[.AY45]-[.AY46]" office:value-type="float" office:value="0" calcext:value-type="float">
            <text:p>0</text:p>
          </table:table-cell>
          <table:table-cell/>
          <table:table-cell table:formula="of:=[.BA28]+0.002" office:value-type="float" office:value="0.028" calcext:value-type="float">
            <text:p>0.028</text:p>
          </table:table-cell>
          <table:table-cell table:formula="of:=[.BA29]*[.$D$6]" office:value-type="float" office:value="1.40743350880823" calcext:value-type="float">
            <text:p>1.407</text:p>
          </table:table-cell>
          <table:table-cell table:formula="of:=[.D$25]*[.$Z$5]*MAGNET([.D$24]+[.BB29])+[.E$25]*[.$Z$5]*MAGNET([.E$24]+[.BB29])+[.F$25]*[.$Z$5]*MAGNET([.F$24]+[.BB29])+[.G$25]*[.$Z$5]*MAGNET([.G$24]+[.BB29])+[.H$25]*[.$Z$5]*MAGNET([.H$24]+[.BB29])+[.I$25]*[.$Z$5]*MAGNET([.I$24]+[.BB29])+[.J$25]*[.$Z$5]*MAGNET([.J$24]+[.BB29])+[.K$25]*[.$Z$5]*MAGNET([.K$24]+[.BB29])+[.L$25]*[.$Z$5]*MAGNET([.L$24]+[.BB29])+[.M$25]*[.$Z$5]*MAGNET([.M$24]+[.BB29])+[.N$25]*[.$Z$5]*MAGNET([.N$24]+[.BB29])+[.O$25]*[.$Z$5]*MAGNET([.O$24]+[.BB29])+[.P$25]*[.$Z$5]*MAGNET([.P$24]+[.BB29])+[.Q$25]*[.$Z$5]*MAGNET([.Q$24]+[.BB29])+[.R$25]*[.$Z$5]*MAGNET([.R$24]+[.BB29])+[.S$25]*[.$Z$5]*MAGNET([.S$24]+[.BB29])+[.T$25]*[.$Z$5]*MAGNET([.T$24]+[.BB29])+[.U$25]*[.$Z$5]*MAGNET([.U$24]+[.BB29])+[.V$25]*[.$Z$5]*MAGNET([.V$24]+[.BB29])+[.W$25]*[.$Z$5]*MAGNET([.W$24]+[.BB29])+[.X$25]*[.$Z$5]*MAGNET([.X$24]+[.BB29])+[.Y$25]*[.$Z$5]*MAGNET([.Y$24]+[.BB29])+[.Z$25]*[.$Z$5]*MAGNET([.Z$24]+[.BB29])+[.AA$25]*[.$Z$5]*MAGNET([.AA$24]+[.BB29])+[.AB$25]*[.$Z$5]*MAGNET([.AB$24]+[.BB29])+[.AC$25]*[.$Z$5]*MAGNET([.AC$24]+[.BB29])+[.AD$25]*[.$Z$5]*MAGNET([.AD$24]+[.BB29])+[.AE$25]*[.$Z$5]*MAGNET([.AE$24]+[.BB29])+[.AF$25]*[.$Z$5]*MAGNET([.AF$24]+[.BB29])+[.AG$25]*[.$Z$5]*MAGNET([.AG$24]+[.BB29])+[.AH$25]*[.$Z$5]*MAGNET([.AH$24]+[.BB29]) +[.AI$25]*[.$Z$5]*MAGNET([.AI$24]+[.BB29]) +[.AJ$25]*[.$Z$5]*MAGNET([.AJ$24]+[.BB29]) +[.AK$25]*[.$Z$5]*MAGNET([.AK$24]+[.BB29]) +[.AL$25]*[.$Z$5]*MAGNET([.AL$24]+[.BB29]) +[.AM$25]*[.$Z$5]*MAGNET([.AM$24]+[.BB29]) +[.AN$25]*[.$Z$5]*MAGNET([.AN$24]+[.BB29]) +[.AO$25]*[.$Z$5]*MAGNET([.AO$24]+[.BB29])+RAND()*[.$BC$13]+[.AP$25]*[.$Z$5]*MAGNET([.AP$24]+[.BB29])&#10;+[.AQ$25]*[.$Z$5]*MAGNET([.AQ$24]+[.BB29])&#10;+[.AR$25]*[.$Z$5]*MAGNET([.AR$24]+[.BB29])&#10;+[.AS$25]*[.$Z$5]*MAGNET([.AS$24]+[.BB29])&#10;+[.AT$25]*[.$Z$5]*MAGNET([.AT$24]+[.BB29])&#10;+[.AU$25]*[.$Z$5]*MAGNET([.AU$24]+[.BB29])&#10;+[.AV$25]*[.$Z$5]*MAGNET([.AV$24]+[.BB29])&#10;+[.AW$25]*[.$Z$5]*MAGNET([.AW$24]+[.BB29])&#10;+[.AX$25]*[.$Z$5]*MAGNET([.AX$24]+[.BB29])&#10;+[.AY$25]*[.$Z$5]*MAGNET([.AY$24]+[.BB29])" office:value-type="float" office:value="103.997786048075" calcext:value-type="float">
            <text:p>104.00</text:p>
          </table:table-cell>
          <table:table-cell table:style-name="ce70" table:formula="of:=[.E$26]*[.$Z$5]*MAGNET([.E$24]+[.$BB29])+[.F$26]*[.$Z$5]*MAGNET([.F$24]+[.$BB29])+[.G$26]*[.$Z$5]*MAGNET([.G$24]+[.$BB29])+[.H$26]*[.$Z$5]*MAGNET([.H$24]+[.$BB29])+[.I$26]*[.$Z$5]*MAGNET([.I$24]+[.$BB29])+[.J$26]*[.$Z$5]*MAGNET([.J$24]+[.$BB29])+[.K$26]*[.$Z$5]*MAGNET([.K$24]+[.$BB29])+[.L$26]*[.$Z$5]*MAGNET([.L$24]+[.$BB29])+[.M$26]*[.$Z$5]*MAGNET([.M$24]+[.$BB29])+[.N$26]*[.$Z$5]*MAGNET([.N$24]+[.$BB29])+[.O$26]*[.$Z$5]*MAGNET([.O$24]+[.$BB29])+[.P$26]*[.$Z$5]*MAGNET([.P$24]+[.$BB29])+[.Q$26]*[.$Z$5]*MAGNET([.Q$24]+[.$BB29])+[.R$26]*[.$Z$5]*MAGNET([.R$24]+[.$BB29])+[.S$26]*[.$Z$5]*MAGNET([.S$24]+[.$BB29])+[.T$26]*[.$Z$5]*MAGNET([.T$24]+[.$BB29])+[.U$26]*[.$Z$5]*MAGNET([.U$24]+[.$BB29])+[.V$26]*[.$Z$5]*MAGNET([.V$24]+[.$BB29])+[.W$26]*[.$Z$5]*MAGNET([.W$24]+[.$BB29])+[.X$26]*[.$Z$5]*MAGNET([.X$24]+[.$BB29])+[.Y$26]*[.$Z$5]*MAGNET([.Y$24]+[.$BB29])+[.Z$26]*[.$Z$5]*MAGNET([.Z$24]+[.$BB29])+[.AA$26]*[.$Z$5]*MAGNET([.AA$24]+[.$BB29])+[.AB$26]*[.$Z$5]*MAGNET([.AB$24]+[.$BB29])+[.AC$26]*[.$Z$5]*MAGNET([.AC$24]+[.$BB29])+[.AD$26]*[.$Z$5]*MAGNET([.AD$24]+[.$BB29])+[.AE$26]*[.$Z$5]*MAGNET([.AE$24]+[.$BB29])+[.AF$26]*[.$Z$5]*MAGNET([.AF$24]+[.$BB29])+[.AG$26]*[.$Z$5]*MAGNET([.AG$24]+[.$BB29])+[.D$26]*[.$Z$5]*MAGNET([.D$24]+[.$BB29])+[.AH$26]*[.$Z$5]*MAGNET([.AH$24]+[.BB29]) +[.AI$26]*[.$Z$5]*MAGNET([.AI$24]+[.BB29]) +[.AJ$26]*[.$Z$5]*MAGNET([.AJ$24]+[.BB29]) +[.AK$26]*[.$Z$5]*MAGNET([.AK$24]+[.BB29]) +[.AL$26]*[.$Z$5]*MAGNET([.AL$24]+[.BB29]) +[.AM$26]*[.$Z$5]*MAGNET([.AM$24]+[.BB29]) +[.AN$26]*[.$Z$5]*MAGNET([.AN$24]+[.BB29]) +[.AO$26]*[.$Z$5]*MAGNET([.AO$24]+[.BB29]) +[.AP$26]*[.$Z$5]*MAGNET([.AP$24]+[.$BB29])&#10;+[.AQ$26]*[.$Z$5]*MAGNET([.AQ$24]+[.$BB29])&#10;+[.AR$26]*[.$Z$5]*MAGNET([.AR$24]+[.$BB29])&#10;+[.AS$26]*[.$Z$5]*MAGNET([.AS$24]+[.$BB29])&#10;+[.AT$26]*[.$Z$5]*MAGNET([.AT$24]+[.$BB29])&#10;+[.AU$26]*[.$Z$5]*MAGNET([.AU$24]+[.$BB29])&#10;+[.AV$26]*[.$Z$5]*MAGNET([.AV$24]+[.$BB29])&#10;+[.AW$26]*[.$Z$5]*MAGNET([.AW$24]+[.$BB29])&#10;+[.AX$26]*[.$Z$5]*MAGNET([.AX$24]+[.$BB29])&#10;+[.AY$26]*[.$Z$5]*MAGNET([.AY$24]+[.$BB29]) +RAND()*[.$BD$13]" office:value-type="float" office:value="-0.914614733080094" calcext:value-type="float">
            <text:p>-0.91</text:p>
          </table:table-cell>
          <table:table-cell table:style-name="ce71" table:formula="of:=[.E$27]*[.$Z$5]*MAGNET([.E$24]+[.$BB29])+[.F$27]*[.$Z$5]*MAGNET([.F$24]+[.$BB29])+[.G$27]*[.$Z$5]*MAGNET([.G$24]+[.$BB29])+[.H$27]*[.$Z$5]*MAGNET([.H$24]+[.$BB29])+[.I$27]*[.$Z$5]*MAGNET([.I$24]+[.$BB29])+[.J$27]*[.$Z$5]*MAGNET([.J$24]+[.$BB29])+[.K$27]*[.$Z$5]*MAGNET([.K$24]+[.$BB29])+[.L$27]*[.$Z$5]*MAGNET([.L$24]+[.$BB29])+[.M$27]*[.$Z$5]*MAGNET([.M$24]+[.$BB29])+[.N$27]*[.$Z$5]*MAGNET([.N$24]+[.$BB29])+[.O$27]*[.$Z$5]*MAGNET([.O$24]+[.$BB29])+[.P$27]*[.$Z$5]*MAGNET([.P$24]+[.$BB29])+[.Q$27]*[.$Z$5]*MAGNET([.Q$24]+[.$BB29])+[.R$27]*[.$Z$5]*MAGNET([.R$24]+[.$BB29])+[.S$27]*[.$Z$5]*MAGNET([.S$24]+[.$BB29])+[.T$27]*[.$Z$5]*MAGNET([.T$24]+[.$BB29])+[.U$27]*[.$Z$5]*MAGNET([.U$24]+[.$BB29])+[.V$27]*[.$Z$5]*MAGNET([.V$24]+[.$BB29])+[.W$27]*[.$Z$5]*MAGNET([.W$24]+[.$BB29])+[.X$27]*[.$Z$5]*MAGNET([.X$24]+[.$BB29])+[.Y$27]*[.$Z$5]*MAGNET([.Y$24]+[.$BB29])+[.Z$27]*[.$Z$5]*MAGNET([.Z$24]+[.$BB29])+[.AA$27]*[.$Z$5]*MAGNET([.AA$24]+[.$BB29])+[.AB$27]*[.$Z$5]*MAGNET([.AB$24]+[.$BB29])+[.AC$27]*[.$Z$5]*MAGNET([.AC$24]+[.$BB29])+[.AD$27]*[.$Z$5]*MAGNET([.AD$24]+[.$BB29])+[.AE$27]*[.$Z$5]*MAGNET([.AE$24]+[.$BB29])+[.AF$27]*[.$Z$5]*MAGNET([.AF$24]+[.$BB29])+[.AG$27]*[.$Z$5]*MAGNET([.AG$24]+[.$BB29])+[.D$27]*[.$Z$5]*MAGNET([.D$24]+[.$BB29])+[.AH$27]*[.$Z$5]*MAGNET([.AH$24]+[.BB29]) +[.AI$27]*[.$Z$5]*MAGNET([.AI$24]+[.BB29]) +[.AJ$27]*[.$Z$5]*MAGNET([.AJ$24]+[.BB29]) +[.AK$27]*[.$Z$5]*MAGNET([.AK$24]+[.BB29]) +[.AL$27]*[.$Z$5]*MAGNET([.AL$24]+[.BB29]) +[.AM$27]*[.$Z$5]*MAGNET([.AM$24]+[.BB29]) +[.AN$27]*[.$Z$5]*MAGNET([.AN$24]+[.BB29]) +[.AO$27]*[.$Z$5]*MAGNET([.AO$24]+[.BB29]) +[.AP$27]*[.$Z$5]*MAGNET([.AP$24]+[.$BB29])&#10;+[.AQ$27]*[.$Z$5]*MAGNET([.AQ$24]+[.$BB29])&#10;+[.AR$27]*[.$Z$5]*MAGNET([.AR$24]+[.$BB29])&#10;+[.AS$27]*[.$Z$5]*MAGNET([.AS$24]+[.$BB29])&#10;+[.AT$27]*[.$Z$5]*MAGNET([.AT$24]+[.$BB29])&#10;+[.AU$27]*[.$Z$5]*MAGNET([.AU$24]+[.$BB29])&#10;+[.AV$27]*[.$Z$5]*MAGNET([.AV$24]+[.$BB29])&#10;+[.AW$27]*[.$Z$5]*MAGNET([.AW$24]+[.$BB29])&#10;+[.AX$27]*[.$Z$5]*MAGNET([.AX$24]+[.$BB29])&#10;+[.AY$27]*[.$Z$5]*MAGNET([.AY$24]+[.$BB29]) +RAND()*[.$BE$13]" office:value-type="float" office:value="-119.440212700318" calcext:value-type="float">
            <text:p>-119.440212700318</text:p>
          </table:table-cell>
          <table:table-cell table:style-name="ce71" table:formula="of:=[.E$28]*[.$Z$5]*MAGNET([.E$24]+[.$BB29])+[.F$28]*[.$Z$5]*MAGNET([.F$24]+[.$BB29])+[.G$28]*[.$Z$5]*MAGNET([.G$24]+[.$BB29])+[.H$28]*[.$Z$5]*MAGNET([.H$24]+[.$BB29])+[.I$28]*[.$Z$5]*MAGNET([.I$24]+[.$BB29])+[.J$28]*[.$Z$5]*MAGNET([.J$24]+[.$BB29])+[.K$28]*[.$Z$5]*MAGNET([.K$24]+[.$BB29])+[.L$28]*[.$Z$5]*MAGNET([.L$24]+[.$BB29])+[.M$28]*[.$Z$5]*MAGNET([.M$24]+[.$BB29])+[.N$28]*[.$Z$5]*MAGNET([.N$24]+[.$BB29])+[.O$28]*[.$Z$5]*MAGNET([.O$24]+[.$BB29])+[.P$28]*[.$Z$5]*MAGNET([.P$24]+[.$BB29])+[.Q$28]*[.$Z$5]*MAGNET([.Q$24]+[.$BB29])+[.R$28]*[.$Z$5]*MAGNET([.R$24]+[.$BB29])+[.S$28]*[.$Z$5]*MAGNET([.S$24]+[.$BB29])+[.T$28]*[.$Z$5]*MAGNET([.T$24]+[.$BB29])+[.U$28]*[.$Z$5]*MAGNET([.U$24]+[.$BB29])+[.V$28]*[.$Z$5]*MAGNET([.V$24]+[.$BB29])+[.W$28]*[.$Z$5]*MAGNET([.W$24]+[.$BB29])+[.X$28]*[.$Z$5]*MAGNET([.X$24]+[.$BB29])+[.Y$28]*[.$Z$5]*MAGNET([.Y$24]+[.$BB29])+[.Z$28]*[.$Z$5]*MAGNET([.Z$24]+[.$BB29])+[.AA$28]*[.$Z$5]*MAGNET([.AA$24]+[.$BB29])+[.AB$28]*[.$Z$5]*MAGNET([.AB$24]+[.$BB29])+[.AC$28]*[.$Z$5]*MAGNET([.AC$24]+[.$BB29])+[.AD$28]*[.$Z$5]*MAGNET([.AD$24]+[.$BB29])+[.AE$28]*[.$Z$5]*MAGNET([.AE$24]+[.$BB29])+[.AF$28]*[.$Z$5]*MAGNET([.AF$24]+[.$BB29])+[.AG$28]*[.$Z$5]*MAGNET([.AG$24]+[.$BB29])+[.D$28]*[.$Z$5]*MAGNET([.D$24]+[.$BB29])+[.AH$28]*[.$Z$5]*MAGNET([.AH$24]+[.BB29]) +[.AI$28]*[.$Z$5]*MAGNET([.AI$24]+[.BB29]) +[.AJ$28]*[.$Z$5]*MAGNET([.AJ$24]+[.BB29]) +[.AK$28]*[.$Z$5]*MAGNET([.AK$24]+[.BB29]) +[.AL$28]*[.$Z$5]*MAGNET([.AL$24]+[.BB29]) +[.AM$28]*[.$Z$5]*MAGNET([.AM$24]+[.BB29]) +[.AN$28]*[.$Z$5]*MAGNET([.AN$24]+[.BB29]) +[.AO$28]*[.$Z$5]*MAGNET([.AO$24]+[.BB29]) +[.AP$28]*[.$Z$5]*MAGNET([.AP$24]+[.$BB29])&#10;+[.AQ$28]*[.$Z$5]*MAGNET([.AQ$24]+[.$BB29])&#10;+[.AR$28]*[.$Z$5]*MAGNET([.AR$24]+[.$BB29])&#10;+[.AS$28]*[.$Z$5]*MAGNET([.AS$24]+[.$BB29])&#10;+[.AT$28]*[.$Z$5]*MAGNET([.AT$24]+[.$BB29])&#10;+[.AU$28]*[.$Z$5]*MAGNET([.AU$24]+[.$BB29])&#10;+[.AV$28]*[.$Z$5]*MAGNET([.AV$24]+[.$BB29])&#10;+[.AW$28]*[.$Z$5]*MAGNET([.AW$24]+[.$BB29])&#10;+[.AX$28]*[.$Z$5]*MAGNET([.AX$24]+[.$BB29])&#10;+[.AY$28]*[.$Z$5]*MAGNET([.AY$24]+[.$BB29]) +RAND()*[.$BF$13]" office:value-type="float" office:value="-15.4341116955627" calcext:value-type="float">
            <text:p>-15.4341116955627</text:p>
          </table:table-cell>
          <table:table-cell table:style-name="ce71" table:formula="of:=[.E$29]*[.$Z$5]*MAGNET([.E$24]+[.$BB29])+[.F$29]*[.$Z$5]*MAGNET([.F$24]+[.$BB29])+[.G$29]*[.$Z$5]*MAGNET([.G$24]+[.$BB29])+[.H$29]*[.$Z$5]*MAGNET([.H$24]+[.$BB29])+[.I$29]*[.$Z$5]*MAGNET([.I$24]+[.$BB29])+[.J$29]*[.$Z$5]*MAGNET([.J$24]+[.$BB29])+[.K$29]*[.$Z$5]*MAGNET([.K$24]+[.$BB29])+[.L$29]*[.$Z$5]*MAGNET([.L$24]+[.$BB29])+[.M$29]*[.$Z$5]*MAGNET([.M$24]+[.$BB29])+[.N$29]*[.$Z$5]*MAGNET([.N$24]+[.$BB29])+[.O$29]*[.$Z$5]*MAGNET([.O$24]+[.$BB29])+[.P$29]*[.$Z$5]*MAGNET([.P$24]+[.$BB29])+[.Q$29]*[.$Z$5]*MAGNET([.Q$24]+[.$BB29])+[.R$29]*[.$Z$5]*MAGNET([.R$24]+[.$BB29])+[.S$29]*[.$Z$5]*MAGNET([.S$24]+[.$BB29])+[.T$29]*[.$Z$5]*MAGNET([.T$24]+[.$BB29])+[.U$29]*[.$Z$5]*MAGNET([.U$24]+[.$BB29])+[.V$29]*[.$Z$5]*MAGNET([.V$24]+[.$BB29])+[.W$29]*[.$Z$5]*MAGNET([.W$24]+[.$BB29])+[.X$29]*[.$Z$5]*MAGNET([.X$24]+[.$BB29])+[.Y$29]*[.$Z$5]*MAGNET([.Y$24]+[.$BB29])+[.Z$29]*[.$Z$5]*MAGNET([.Z$24]+[.$BB29])+[.AA$29]*[.$Z$5]*MAGNET([.AA$24]+[.$BB29])+[.AB$29]*[.$Z$5]*MAGNET([.AB$24]+[.$BB29])+[.AC$29]*[.$Z$5]*MAGNET([.AC$24]+[.$BB29])+[.AD$29]*[.$Z$5]*MAGNET([.AD$24]+[.$BB29])+[.AE$29]*[.$Z$5]*MAGNET([.AE$24]+[.$BB29])+[.AF$29]*[.$Z$5]*MAGNET([.AF$24]+[.$BB29])+[.AG$29]*[.$Z$5]*MAGNET([.AG$24]+[.$BB29])+[.D$29]*[.$Z$5]*MAGNET([.D$24]+[.$BB29])+[.AH$29]*[.$Z$5]*MAGNET([.AH$24]+[.BB29]) +[.AI$29]*[.$Z$5]*MAGNET([.AI$24]+[.BB29]) +[.AJ$29]*[.$Z$5]*MAGNET([.AJ$24]+[.BB29]) +[.AK$29]*[.$Z$5]*MAGNET([.AK$24]+[.BB29]) +[.AL$29]*[.$Z$5]*MAGNET([.AL$24]+[.BB29]) +[.AM$29]*[.$Z$5]*MAGNET([.AM$24]+[.BB29]) +[.AN$29]*[.$Z$5]*MAGNET([.AN$24]+[.BB29]) +[.AO$29]*[.$Z$5]*MAGNET([.AO$24]+[.BB29]) +[.AP$29]*[.$Z$5]*MAGNET([.AP$24]+[.$BB29])&#10;+[.AQ$29]*[.$Z$5]*MAGNET([.AQ$24]+[.$BB29])&#10;+[.AR$29]*[.$Z$5]*MAGNET([.AR$24]+[.$BB29])&#10;+[.AS$29]*[.$Z$5]*MAGNET([.AS$24]+[.$BB29])&#10;+[.AT$29]*[.$Z$5]*MAGNET([.AT$24]+[.$BB29])&#10;+[.AU$29]*[.$Z$5]*MAGNET([.AU$24]+[.$BB29])&#10;+[.AV$29]*[.$Z$5]*MAGNET([.AV$24]+[.$BB29])&#10;+[.AW$29]*[.$Z$5]*MAGNET([.AW$24]+[.$BB29])&#10;+[.AX$29]*[.$Z$5]*MAGNET([.AX$24]+[.$BB29])&#10;+[.AY$29]*[.$Z$5]*MAGNET([.AY$24]+[.$BB29]) +RAND()*[.$BG$13]" office:value-type="float" office:value="45.5664237064086" calcext:value-type="float">
            <text:p>45.5664237064086</text:p>
          </table:table-cell>
          <table:table-cell table:style-name="ce71" table:formula="of:=[.E$30]*[.$Z$5]*MAGNET([.E$24]+[.$BB29])+[.F$30]*[.$Z$5]*MAGNET([.F$24]+[.$BB29])+[.G$30]*[.$Z$5]*MAGNET([.G$24]+[.$BB29])+[.H$30]*[.$Z$5]*MAGNET([.H$24]+[.$BB29])+[.I$30]*[.$Z$5]*MAGNET([.I$24]+[.$BB29])+[.J$30]*[.$Z$5]*MAGNET([.J$24]+[.$BB29])+[.K$30]*[.$Z$5]*MAGNET([.K$24]+[.$BB29])+[.L$30]*[.$Z$5]*MAGNET([.L$24]+[.$BB29])+[.M$30]*[.$Z$5]*MAGNET([.M$24]+[.$BB29])+[.N$30]*[.$Z$5]*MAGNET([.N$24]+[.$BB29])+[.O$30]*[.$Z$5]*MAGNET([.O$24]+[.$BB29])+[.P$30]*[.$Z$5]*MAGNET([.P$24]+[.$BB29])+[.Q$30]*[.$Z$5]*MAGNET([.Q$24]+[.$BB29])+[.R$30]*[.$Z$5]*MAGNET([.R$24]+[.$BB29])+[.S$30]*[.$Z$5]*MAGNET([.S$24]+[.$BB29])+[.T$30]*[.$Z$5]*MAGNET([.T$24]+[.$BB29])+[.U$30]*[.$Z$5]*MAGNET([.U$24]+[.$BB29])+[.V$30]*[.$Z$5]*MAGNET([.V$24]+[.$BB29])+[.W$30]*[.$Z$5]*MAGNET([.W$24]+[.$BB29])+[.X$30]*[.$Z$5]*MAGNET([.X$24]+[.$BB29])+[.Y$30]*[.$Z$5]*MAGNET([.Y$24]+[.$BB29])+[.Z$30]*[.$Z$5]*MAGNET([.Z$24]+[.$BB29])+[.AA$30]*[.$Z$5]*MAGNET([.AA$24]+[.$BB29])+[.AB$30]*[.$Z$5]*MAGNET([.AB$24]+[.$BB29])+[.AC$30]*[.$Z$5]*MAGNET([.AC$24]+[.$BB29])+[.AD$30]*[.$Z$5]*MAGNET([.AD$24]+[.$BB29])+[.AE$30]*[.$Z$5]*MAGNET([.AE$24]+[.$BB29])+[.AF$30]*[.$Z$5]*MAGNET([.AF$24]+[.$BB29])+[.AG$30]*[.$Z$5]*MAGNET([.AG$24]+[.$BB29])+[.D$30]*[.$Z$5]*MAGNET([.D$24]+[.$BB29])+[.AH$30]*[.$Z$5]*MAGNET([.AH$24]+[.BB29]) +[.AI$30]*[.$Z$5]*MAGNET([.AI$24]+[.BB29]) +[.AJ$30]*[.$Z$5]*MAGNET([.AJ$24]+[.BB29]) +[.AK$30]*[.$Z$5]*MAGNET([.AK$24]+[.BB29]) +[.AL$30]*[.$Z$5]*MAGNET([.AL$24]+[.BB29]) +[.AM$30]*[.$Z$5]*MAGNET([.AM$24]+[.BB29]) +[.AN$30]*[.$Z$5]*MAGNET([.AN$24]+[.BB29]) +[.AO$30]*[.$Z$5]*MAGNET([.AO$24]+[.BB29]) +[.AP$30]*[.$Z$5]*MAGNET([.AP$24]+[.$BB29])&#10;+[.AQ$30]*[.$Z$5]*MAGNET([.AQ$24]+[.$BB29])&#10;+[.AR$30]*[.$Z$5]*MAGNET([.AR$24]+[.$BB29])&#10;+[.AS$30]*[.$Z$5]*MAGNET([.AS$24]+[.$BB29])&#10;+[.AT$30]*[.$Z$5]*MAGNET([.AT$24]+[.$BB29])&#10;+[.AU$30]*[.$Z$5]*MAGNET([.AU$24]+[.$BB29])&#10;+[.AV$30]*[.$Z$5]*MAGNET([.AV$24]+[.$BB29])&#10;+[.AW$30]*[.$Z$5]*MAGNET([.AW$24]+[.$BB29])&#10;+[.AX$30]*[.$Z$5]*MAGNET([.AX$24]+[.$BB29])&#10;+[.AY$30]*[.$Z$5]*MAGNET([.AY$24]+[.$BB29]) +RAND()*[.$BH$13]" office:value-type="float" office:value="0" calcext:value-type="float">
            <text:p>0</text:p>
          </table:table-cell>
          <table:table-cell table:style-name="ce71" table:formula="of:=[.E$31]*[.$Z$5]*MAGNET([.E$24]+[.$BB29])+[.F$31]*[.$Z$5]*MAGNET([.F$24]+[.$BB29])+[.G$31]*[.$Z$5]*MAGNET([.G$24]+[.$BB29])+[.H$31]*[.$Z$5]*MAGNET([.H$24]+[.$BB29])+[.I$31]*[.$Z$5]*MAGNET([.I$24]+[.$BB29])+[.J$31]*[.$Z$5]*MAGNET([.J$24]+[.$BB29])+[.K$31]*[.$Z$5]*MAGNET([.K$24]+[.$BB29])+[.L$31]*[.$Z$5]*MAGNET([.L$24]+[.$BB29])+[.M$31]*[.$Z$5]*MAGNET([.M$24]+[.$BB29])+[.N$31]*[.$Z$5]*MAGNET([.N$24]+[.$BB29])+[.O$31]*[.$Z$5]*MAGNET([.O$24]+[.$BB29])+[.P$31]*[.$Z$5]*MAGNET([.P$24]+[.$BB29])+[.Q$31]*[.$Z$5]*MAGNET([.Q$24]+[.$BB29])+[.R$31]*[.$Z$5]*MAGNET([.R$24]+[.$BB29])+[.S$31]*[.$Z$5]*MAGNET([.S$24]+[.$BB29])+[.T$31]*[.$Z$5]*MAGNET([.T$24]+[.$BB29])+[.U$31]*[.$Z$5]*MAGNET([.U$24]+[.$BB29])+[.V$31]*[.$Z$5]*MAGNET([.V$24]+[.$BB29])+[.W$31]*[.$Z$5]*MAGNET([.W$24]+[.$BB29])+[.X$31]*[.$Z$5]*MAGNET([.X$24]+[.$BB29])+[.Y$31]*[.$Z$5]*MAGNET([.Y$24]+[.$BB29])+[.Z$31]*[.$Z$5]*MAGNET([.Z$24]+[.$BB29])+[.AA$31]*[.$Z$5]*MAGNET([.AA$24]+[.$BB29])+[.AB$31]*[.$Z$5]*MAGNET([.AB$24]+[.$BB29])+[.AC$31]*[.$Z$5]*MAGNET([.AC$24]+[.$BB29])+[.AD$31]*[.$Z$5]*MAGNET([.AD$24]+[.$BB29])+[.AE$31]*[.$Z$5]*MAGNET([.AE$24]+[.$BB29])+[.AF$31]*[.$Z$5]*MAGNET([.AF$24]+[.$BB29])+[.AG$31]*[.$Z$5]*MAGNET([.AG$24]+[.$BB29])+[.D$31]*[.$Z$5]*MAGNET([.D$24]+[.$BB29])+[.AH$31]*[.$Z$5]*MAGNET([.AH$24]+[.BB29]) +[.AI$31]*[.$Z$5]*MAGNET([.AI$24]+[.BB29]) +[.AJ$31]*[.$Z$5]*MAGNET([.AJ$24]+[.BB29]) +[.AK$31]*[.$Z$5]*MAGNET([.AK$24]+[.BB29]) +[.AL$31]*[.$Z$5]*MAGNET([.AL$24]+[.BB29]) +[.AM$31]*[.$Z$5]*MAGNET([.AM$24]+[.BB29]) +[.AN$31]*[.$Z$5]*MAGNET([.AN$24]+[.BB29]) +[.AO$31]*[.$Z$5]*MAGNET([.AO$24]+[.BB29]) +[.AP$31]*[.$Z$5]*MAGNET([.AP$24]+[.$BB29])&#10;+[.AQ$31]*[.$Z$5]*MAGNET([.AQ$24]+[.$BB29])&#10;+[.AR$31]*[.$Z$5]*MAGNET([.AR$24]+[.$BB29])&#10;+[.AS$31]*[.$Z$5]*MAGNET([.AS$24]+[.$BB29])&#10;+[.AT$31]*[.$Z$5]*MAGNET([.AT$24]+[.$BB29])&#10;+[.AU$31]*[.$Z$5]*MAGNET([.AU$24]+[.$BB29])&#10;+[.AV$31]*[.$Z$5]*MAGNET([.AV$24]+[.$BB29])&#10;+[.AW$31]*[.$Z$5]*MAGNET([.AW$24]+[.$BB29])&#10;+[.AX$31]*[.$Z$5]*MAGNET([.AX$24]+[.$BB29])&#10;+[.AY$31]*[.$Z$5]*MAGNET([.AY$24]+[.$BB29]) +RAND()*[.$BI$13]" office:value-type="float" office:value="0" calcext:value-type="float">
            <text:p>0</text:p>
          </table:table-cell>
          <table:table-cell table:style-name="ce71" table:formula="of:=[.E$32]*[.$Z$5]*MAGNET([.E$24]+[.$BB29])+[.F$32]*[.$Z$5]*MAGNET([.F$24]+[.$BB29])+[.G$32]*[.$Z$5]*MAGNET([.G$24]+[.$BB29])+[.H$32]*[.$Z$5]*MAGNET([.H$24]+[.$BB29])+[.I$32]*[.$Z$5]*MAGNET([.I$24]+[.$BB29])+[.J$32]*[.$Z$5]*MAGNET([.J$24]+[.$BB29])+[.K$32]*[.$Z$5]*MAGNET([.K$24]+[.$BB29])+[.L$32]*[.$Z$5]*MAGNET([.L$24]+[.$BB29])+[.M$32]*[.$Z$5]*MAGNET([.M$24]+[.$BB29])+[.N$32]*[.$Z$5]*MAGNET([.N$24]+[.$BB29])+[.O$32]*[.$Z$5]*MAGNET([.O$24]+[.$BB29])+[.P$32]*[.$Z$5]*MAGNET([.P$24]+[.$BB29])+[.Q$32]*[.$Z$5]*MAGNET([.Q$24]+[.$BB29])+[.R$32]*[.$Z$5]*MAGNET([.R$24]+[.$BB29])+[.S$32]*[.$Z$5]*MAGNET([.S$24]+[.$BB29])+[.T$32]*[.$Z$5]*MAGNET([.T$24]+[.$BB29])+[.U$32]*[.$Z$5]*MAGNET([.U$24]+[.$BB29])+[.V$32]*[.$Z$5]*MAGNET([.V$24]+[.$BB29])+[.W$32]*[.$Z$5]*MAGNET([.W$24]+[.$BB29])+[.X$32]*[.$Z$5]*MAGNET([.X$24]+[.$BB29])+[.Y$32]*[.$Z$5]*MAGNET([.Y$24]+[.$BB29])+[.Z$32]*[.$Z$5]*MAGNET([.Z$24]+[.$BB29])+[.AA$32]*[.$Z$5]*MAGNET([.AA$24]+[.$BB29])+[.AB$32]*[.$Z$5]*MAGNET([.AB$24]+[.$BB29])+[.AC$32]*[.$Z$5]*MAGNET([.AC$24]+[.$BB29])+[.AD$32]*[.$Z$5]*MAGNET([.AD$24]+[.$BB29])+[.AE$32]*[.$Z$5]*MAGNET([.AE$24]+[.$BB29])+[.AF$32]*[.$Z$5]*MAGNET([.AF$24]+[.$BB29])+[.AG$32]*[.$Z$5]*MAGNET([.AG$24]+[.$BB29])+[.D$32]*[.$Z$5]*MAGNET([.D$24]+[.$BB29])+[.AH$32]*[.$Z$5]*MAGNET([.AH$24]+[.BB29]) +[.AI$32]*[.$Z$5]*MAGNET([.AI$24]+[.BB29]) +[.AJ$32]*[.$Z$5]*MAGNET([.AJ$24]+[.BB29]) +[.AK$32]*[.$Z$5]*MAGNET([.AK$24]+[.BB29]) +[.AL$32]*[.$Z$5]*MAGNET([.AL$24]+[.BB29]) +[.AM$32]*[.$Z$5]*MAGNET([.AM$24]+[.BB29]) +[.AN$32]*[.$Z$5]*MAGNET([.AN$24]+[.BB29]) +[.AO$32]*[.$Z$5]*MAGNET([.AO$24]+[.BB29]) +[.AP$32]*[.$Z$5]*MAGNET([.AP$24]+[.$BB29])&#10;+[.AQ$32]*[.$Z$5]*MAGNET([.AQ$24]+[.$BB29])&#10;+[.AR$32]*[.$Z$5]*MAGNET([.AR$24]+[.$BB29])&#10;+[.AS$32]*[.$Z$5]*MAGNET([.AS$24]+[.$BB29])&#10;+[.AT$32]*[.$Z$5]*MAGNET([.AT$24]+[.$BB29])&#10;+[.AU$32]*[.$Z$5]*MAGNET([.AU$24]+[.$BB29])&#10;+[.AV$32]*[.$Z$5]*MAGNET([.AV$24]+[.$BB29])&#10;+[.AW$32]*[.$Z$5]*MAGNET([.AW$24]+[.$BB29])&#10;+[.AX$32]*[.$Z$5]*MAGNET([.AX$24]+[.$BB29])&#10;+[.AY$32]*[.$Z$5]*MAGNET([.AY$24]+[.$BB2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formula="of:=[.D47]-[.D48]" office:value-type="float" office:value="0" calcext:value-type="float">
            <text:p>0</text:p>
          </table:table-cell>
          <table:table-cell table:formula="of:=[.E47]-[.E48]" office:value-type="float" office:value="0" calcext:value-type="float">
            <text:p>0</text:p>
          </table:table-cell>
          <table:table-cell table:formula="of:=[.F47]-[.F48]" office:value-type="float" office:value="0" calcext:value-type="float">
            <text:p>0</text:p>
          </table:table-cell>
          <table:table-cell table:formula="of:=[.G47]-[.G48]" office:value-type="float" office:value="0" calcext:value-type="float">
            <text:p>0</text:p>
          </table:table-cell>
          <table:table-cell table:formula="of:=[.H47]-[.H48]" office:value-type="float" office:value="0" calcext:value-type="float">
            <text:p>0</text:p>
          </table:table-cell>
          <table:table-cell table:formula="of:=[.I47]-[.I48]" office:value-type="float" office:value="0" calcext:value-type="float">
            <text:p>0</text:p>
          </table:table-cell>
          <table:table-cell table:formula="of:=[.J47]-[.J48]" office:value-type="float" office:value="0" calcext:value-type="float">
            <text:p>0</text:p>
          </table:table-cell>
          <table:table-cell table:formula="of:=[.K47]-[.K48]" office:value-type="float" office:value="0" calcext:value-type="float">
            <text:p>0</text:p>
          </table:table-cell>
          <table:table-cell table:formula="of:=[.L47]-[.L48]" office:value-type="float" office:value="0" calcext:value-type="float">
            <text:p>0</text:p>
          </table:table-cell>
          <table:table-cell table:formula="of:=[.M47]-[.M48]" office:value-type="float" office:value="0" calcext:value-type="float">
            <text:p>0</text:p>
          </table:table-cell>
          <table:table-cell table:formula="of:=[.N47]-[.N48]" office:value-type="float" office:value="0" calcext:value-type="float">
            <text:p>0</text:p>
          </table:table-cell>
          <table:table-cell table:formula="of:=[.O47]-[.O48]" office:value-type="float" office:value="0" calcext:value-type="float">
            <text:p>0</text:p>
          </table:table-cell>
          <table:table-cell table:formula="of:=[.P47]-[.P48]" office:value-type="float" office:value="0" calcext:value-type="float">
            <text:p>0</text:p>
          </table:table-cell>
          <table:table-cell table:formula="of:=[.Q47]-[.Q48]" office:value-type="float" office:value="0" calcext:value-type="float">
            <text:p>0</text:p>
          </table:table-cell>
          <table:table-cell table:formula="of:=[.R47]-[.R48]" office:value-type="float" office:value="0" calcext:value-type="float">
            <text:p>0</text:p>
          </table:table-cell>
          <table:table-cell table:formula="of:=[.S47]-[.S48]" office:value-type="float" office:value="0" calcext:value-type="float">
            <text:p>0</text:p>
          </table:table-cell>
          <table:table-cell table:formula="of:=[.T47]-[.T48]" office:value-type="float" office:value="0" calcext:value-type="float">
            <text:p>0</text:p>
          </table:table-cell>
          <table:table-cell table:formula="of:=[.U47]-[.U48]" office:value-type="float" office:value="0" calcext:value-type="float">
            <text:p>0</text:p>
          </table:table-cell>
          <table:table-cell table:formula="of:=[.V47]-[.V48]" office:value-type="float" office:value="0" calcext:value-type="float">
            <text:p>0</text:p>
          </table:table-cell>
          <table:table-cell table:formula="of:=[.W47]-[.W48]" office:value-type="float" office:value="0" calcext:value-type="float">
            <text:p>0</text:p>
          </table:table-cell>
          <table:table-cell table:formula="of:=[.X47]-[.X48]" office:value-type="float" office:value="0" calcext:value-type="float">
            <text:p>0</text:p>
          </table:table-cell>
          <table:table-cell table:formula="of:=[.Y47]-[.Y48]" office:value-type="float" office:value="0" calcext:value-type="float">
            <text:p>0</text:p>
          </table:table-cell>
          <table:table-cell table:formula="of:=[.Z47]-[.Z48]" office:value-type="float" office:value="0" calcext:value-type="float">
            <text:p>0</text:p>
          </table:table-cell>
          <table:table-cell table:formula="of:=[.AA47]-[.AA48]" office:value-type="float" office:value="0" calcext:value-type="float">
            <text:p>0</text:p>
          </table:table-cell>
          <table:table-cell table:formula="of:=[.AB47]-[.AB48]" office:value-type="float" office:value="0" calcext:value-type="float">
            <text:p>0</text:p>
          </table:table-cell>
          <table:table-cell table:formula="of:=[.AC47]-[.AC48]" office:value-type="float" office:value="0" calcext:value-type="float">
            <text:p>0</text:p>
          </table:table-cell>
          <table:table-cell table:formula="of:=[.AD47]-[.AD48]" office:value-type="float" office:value="0" calcext:value-type="float">
            <text:p>0</text:p>
          </table:table-cell>
          <table:table-cell table:formula="of:=[.AE47]-[.AE48]" office:value-type="float" office:value="0" calcext:value-type="float">
            <text:p>0</text:p>
          </table:table-cell>
          <table:table-cell table:formula="of:=[.AF47]-[.AF48]" office:value-type="float" office:value="0" calcext:value-type="float">
            <text:p>0</text:p>
          </table:table-cell>
          <table:table-cell table:formula="of:=[.AG47]-[.AG48]" office:value-type="float" office:value="0" calcext:value-type="float">
            <text:p>0</text:p>
          </table:table-cell>
          <table:table-cell table:formula="of:=[.AH47]-[.AH48]" office:value-type="float" office:value="0" calcext:value-type="float">
            <text:p>0</text:p>
          </table:table-cell>
          <table:table-cell table:formula="of:=[.AI47]-[.AI48]" office:value-type="float" office:value="0" calcext:value-type="float">
            <text:p>0</text:p>
          </table:table-cell>
          <table:table-cell table:formula="of:=[.AJ47]-[.AJ48]" office:value-type="float" office:value="0" calcext:value-type="float">
            <text:p>0</text:p>
          </table:table-cell>
          <table:table-cell table:formula="of:=[.AK47]-[.AK48]" office:value-type="float" office:value="0" calcext:value-type="float">
            <text:p>0</text:p>
          </table:table-cell>
          <table:table-cell table:formula="of:=[.AL47]-[.AL48]" office:value-type="float" office:value="0" calcext:value-type="float">
            <text:p>0</text:p>
          </table:table-cell>
          <table:table-cell table:formula="of:=[.AM47]-[.AM48]" office:value-type="float" office:value="0" calcext:value-type="float">
            <text:p>0</text:p>
          </table:table-cell>
          <table:table-cell table:formula="of:=[.AN47]-[.AN48]" office:value-type="float" office:value="0" calcext:value-type="float">
            <text:p>0</text:p>
          </table:table-cell>
          <table:table-cell table:formula="of:=[.AO47]-[.AO48]" office:value-type="float" office:value="0" calcext:value-type="float">
            <text:p>0</text:p>
          </table:table-cell>
          <table:table-cell table:formula="of:=[.AP47]-[.AP48]" office:value-type="float" office:value="0" calcext:value-type="float">
            <text:p>0</text:p>
          </table:table-cell>
          <table:table-cell table:formula="of:=[.AQ47]-[.AQ48]" office:value-type="float" office:value="0" calcext:value-type="float">
            <text:p>0</text:p>
          </table:table-cell>
          <table:table-cell table:formula="of:=[.AR47]-[.AR48]" office:value-type="float" office:value="0" calcext:value-type="float">
            <text:p>0</text:p>
          </table:table-cell>
          <table:table-cell table:formula="of:=[.AS47]-[.AS48]" office:value-type="float" office:value="0" calcext:value-type="float">
            <text:p>0</text:p>
          </table:table-cell>
          <table:table-cell table:formula="of:=[.AT47]-[.AT48]" office:value-type="float" office:value="0" calcext:value-type="float">
            <text:p>0</text:p>
          </table:table-cell>
          <table:table-cell table:formula="of:=[.AU47]-[.AU48]" office:value-type="float" office:value="0" calcext:value-type="float">
            <text:p>0</text:p>
          </table:table-cell>
          <table:table-cell table:formula="of:=[.AV47]-[.AV48]" office:value-type="float" office:value="0" calcext:value-type="float">
            <text:p>0</text:p>
          </table:table-cell>
          <table:table-cell table:formula="of:=[.AW47]-[.AW48]" office:value-type="float" office:value="0" calcext:value-type="float">
            <text:p>0</text:p>
          </table:table-cell>
          <table:table-cell table:formula="of:=[.AX47]-[.AX48]" office:value-type="float" office:value="0" calcext:value-type="float">
            <text:p>0</text:p>
          </table:table-cell>
          <table:table-cell table:formula="of:=[.AY47]-[.AY48]" office:value-type="float" office:value="0" calcext:value-type="float">
            <text:p>0</text:p>
          </table:table-cell>
          <table:table-cell/>
          <table:table-cell table:formula="of:=[.BA29]+0.002" office:value-type="float" office:value="0.03" calcext:value-type="float">
            <text:p>0.03</text:p>
          </table:table-cell>
          <table:table-cell table:formula="of:=[.BA30]*[.$D$6]" office:value-type="float" office:value="1.5079644737231" calcext:value-type="float">
            <text:p>1.508</text:p>
          </table:table-cell>
          <table:table-cell table:formula="of:=[.D$25]*[.$Z$5]*MAGNET([.D$24]+[.BB30])+[.E$25]*[.$Z$5]*MAGNET([.E$24]+[.BB30])+[.F$25]*[.$Z$5]*MAGNET([.F$24]+[.BB30])+[.G$25]*[.$Z$5]*MAGNET([.G$24]+[.BB30])+[.H$25]*[.$Z$5]*MAGNET([.H$24]+[.BB30])+[.I$25]*[.$Z$5]*MAGNET([.I$24]+[.BB30])+[.J$25]*[.$Z$5]*MAGNET([.J$24]+[.BB30])+[.K$25]*[.$Z$5]*MAGNET([.K$24]+[.BB30])+[.L$25]*[.$Z$5]*MAGNET([.L$24]+[.BB30])+[.M$25]*[.$Z$5]*MAGNET([.M$24]+[.BB30])+[.N$25]*[.$Z$5]*MAGNET([.N$24]+[.BB30])+[.O$25]*[.$Z$5]*MAGNET([.O$24]+[.BB30])+[.P$25]*[.$Z$5]*MAGNET([.P$24]+[.BB30])+[.Q$25]*[.$Z$5]*MAGNET([.Q$24]+[.BB30])+[.R$25]*[.$Z$5]*MAGNET([.R$24]+[.BB30])+[.S$25]*[.$Z$5]*MAGNET([.S$24]+[.BB30])+[.T$25]*[.$Z$5]*MAGNET([.T$24]+[.BB30])+[.U$25]*[.$Z$5]*MAGNET([.U$24]+[.BB30])+[.V$25]*[.$Z$5]*MAGNET([.V$24]+[.BB30])+[.W$25]*[.$Z$5]*MAGNET([.W$24]+[.BB30])+[.X$25]*[.$Z$5]*MAGNET([.X$24]+[.BB30])+[.Y$25]*[.$Z$5]*MAGNET([.Y$24]+[.BB30])+[.Z$25]*[.$Z$5]*MAGNET([.Z$24]+[.BB30])+[.AA$25]*[.$Z$5]*MAGNET([.AA$24]+[.BB30])+[.AB$25]*[.$Z$5]*MAGNET([.AB$24]+[.BB30])+[.AC$25]*[.$Z$5]*MAGNET([.AC$24]+[.BB30])+[.AD$25]*[.$Z$5]*MAGNET([.AD$24]+[.BB30])+[.AE$25]*[.$Z$5]*MAGNET([.AE$24]+[.BB30])+[.AF$25]*[.$Z$5]*MAGNET([.AF$24]+[.BB30])+[.AG$25]*[.$Z$5]*MAGNET([.AG$24]+[.BB30])+[.AH$25]*[.$Z$5]*MAGNET([.AH$24]+[.BB30]) +[.AI$25]*[.$Z$5]*MAGNET([.AI$24]+[.BB30]) +[.AJ$25]*[.$Z$5]*MAGNET([.AJ$24]+[.BB30]) +[.AK$25]*[.$Z$5]*MAGNET([.AK$24]+[.BB30]) +[.AL$25]*[.$Z$5]*MAGNET([.AL$24]+[.BB30]) +[.AM$25]*[.$Z$5]*MAGNET([.AM$24]+[.BB30]) +[.AN$25]*[.$Z$5]*MAGNET([.AN$24]+[.BB30]) +[.AO$25]*[.$Z$5]*MAGNET([.AO$24]+[.BB30])+RAND()*[.$BC$13]+[.AP$25]*[.$Z$5]*MAGNET([.AP$24]+[.BB30])&#10;+[.AQ$25]*[.$Z$5]*MAGNET([.AQ$24]+[.BB30])&#10;+[.AR$25]*[.$Z$5]*MAGNET([.AR$24]+[.BB30])&#10;+[.AS$25]*[.$Z$5]*MAGNET([.AS$24]+[.BB30])&#10;+[.AT$25]*[.$Z$5]*MAGNET([.AT$24]+[.BB30])&#10;+[.AU$25]*[.$Z$5]*MAGNET([.AU$24]+[.BB30])&#10;+[.AV$25]*[.$Z$5]*MAGNET([.AV$24]+[.BB30])&#10;+[.AW$25]*[.$Z$5]*MAGNET([.AW$24]+[.BB30])&#10;+[.AX$25]*[.$Z$5]*MAGNET([.AX$24]+[.BB30])&#10;+[.AY$25]*[.$Z$5]*MAGNET([.AY$24]+[.BB30])" office:value-type="float" office:value="109.457391910942" calcext:value-type="float">
            <text:p>109.46</text:p>
          </table:table-cell>
          <table:table-cell table:style-name="ce70" table:formula="of:=[.E$26]*[.$Z$5]*MAGNET([.E$24]+[.$BB30])+[.F$26]*[.$Z$5]*MAGNET([.F$24]+[.$BB30])+[.G$26]*[.$Z$5]*MAGNET([.G$24]+[.$BB30])+[.H$26]*[.$Z$5]*MAGNET([.H$24]+[.$BB30])+[.I$26]*[.$Z$5]*MAGNET([.I$24]+[.$BB30])+[.J$26]*[.$Z$5]*MAGNET([.J$24]+[.$BB30])+[.K$26]*[.$Z$5]*MAGNET([.K$24]+[.$BB30])+[.L$26]*[.$Z$5]*MAGNET([.L$24]+[.$BB30])+[.M$26]*[.$Z$5]*MAGNET([.M$24]+[.$BB30])+[.N$26]*[.$Z$5]*MAGNET([.N$24]+[.$BB30])+[.O$26]*[.$Z$5]*MAGNET([.O$24]+[.$BB30])+[.P$26]*[.$Z$5]*MAGNET([.P$24]+[.$BB30])+[.Q$26]*[.$Z$5]*MAGNET([.Q$24]+[.$BB30])+[.R$26]*[.$Z$5]*MAGNET([.R$24]+[.$BB30])+[.S$26]*[.$Z$5]*MAGNET([.S$24]+[.$BB30])+[.T$26]*[.$Z$5]*MAGNET([.T$24]+[.$BB30])+[.U$26]*[.$Z$5]*MAGNET([.U$24]+[.$BB30])+[.V$26]*[.$Z$5]*MAGNET([.V$24]+[.$BB30])+[.W$26]*[.$Z$5]*MAGNET([.W$24]+[.$BB30])+[.X$26]*[.$Z$5]*MAGNET([.X$24]+[.$BB30])+[.Y$26]*[.$Z$5]*MAGNET([.Y$24]+[.$BB30])+[.Z$26]*[.$Z$5]*MAGNET([.Z$24]+[.$BB30])+[.AA$26]*[.$Z$5]*MAGNET([.AA$24]+[.$BB30])+[.AB$26]*[.$Z$5]*MAGNET([.AB$24]+[.$BB30])+[.AC$26]*[.$Z$5]*MAGNET([.AC$24]+[.$BB30])+[.AD$26]*[.$Z$5]*MAGNET([.AD$24]+[.$BB30])+[.AE$26]*[.$Z$5]*MAGNET([.AE$24]+[.$BB30])+[.AF$26]*[.$Z$5]*MAGNET([.AF$24]+[.$BB30])+[.AG$26]*[.$Z$5]*MAGNET([.AG$24]+[.$BB30])+[.D$26]*[.$Z$5]*MAGNET([.D$24]+[.$BB30])+[.AH$26]*[.$Z$5]*MAGNET([.AH$24]+[.BB30]) +[.AI$26]*[.$Z$5]*MAGNET([.AI$24]+[.BB30]) +[.AJ$26]*[.$Z$5]*MAGNET([.AJ$24]+[.BB30]) +[.AK$26]*[.$Z$5]*MAGNET([.AK$24]+[.BB30]) +[.AL$26]*[.$Z$5]*MAGNET([.AL$24]+[.BB30]) +[.AM$26]*[.$Z$5]*MAGNET([.AM$24]+[.BB30]) +[.AN$26]*[.$Z$5]*MAGNET([.AN$24]+[.BB30]) +[.AO$26]*[.$Z$5]*MAGNET([.AO$24]+[.BB30]) +[.AP$26]*[.$Z$5]*MAGNET([.AP$24]+[.$BB30])&#10;+[.AQ$26]*[.$Z$5]*MAGNET([.AQ$24]+[.$BB30])&#10;+[.AR$26]*[.$Z$5]*MAGNET([.AR$24]+[.$BB30])&#10;+[.AS$26]*[.$Z$5]*MAGNET([.AS$24]+[.$BB30])&#10;+[.AT$26]*[.$Z$5]*MAGNET([.AT$24]+[.$BB30])&#10;+[.AU$26]*[.$Z$5]*MAGNET([.AU$24]+[.$BB30])&#10;+[.AV$26]*[.$Z$5]*MAGNET([.AV$24]+[.$BB30])&#10;+[.AW$26]*[.$Z$5]*MAGNET([.AW$24]+[.$BB30])&#10;+[.AX$26]*[.$Z$5]*MAGNET([.AX$24]+[.$BB30])&#10;+[.AY$26]*[.$Z$5]*MAGNET([.AY$24]+[.$BB30]) +RAND()*[.$BD$13]" office:value-type="float" office:value="-12.8801308367368" calcext:value-type="float">
            <text:p>-12.88</text:p>
          </table:table-cell>
          <table:table-cell table:style-name="ce71" table:formula="of:=[.E$27]*[.$Z$5]*MAGNET([.E$24]+[.$BB30])+[.F$27]*[.$Z$5]*MAGNET([.F$24]+[.$BB30])+[.G$27]*[.$Z$5]*MAGNET([.G$24]+[.$BB30])+[.H$27]*[.$Z$5]*MAGNET([.H$24]+[.$BB30])+[.I$27]*[.$Z$5]*MAGNET([.I$24]+[.$BB30])+[.J$27]*[.$Z$5]*MAGNET([.J$24]+[.$BB30])+[.K$27]*[.$Z$5]*MAGNET([.K$24]+[.$BB30])+[.L$27]*[.$Z$5]*MAGNET([.L$24]+[.$BB30])+[.M$27]*[.$Z$5]*MAGNET([.M$24]+[.$BB30])+[.N$27]*[.$Z$5]*MAGNET([.N$24]+[.$BB30])+[.O$27]*[.$Z$5]*MAGNET([.O$24]+[.$BB30])+[.P$27]*[.$Z$5]*MAGNET([.P$24]+[.$BB30])+[.Q$27]*[.$Z$5]*MAGNET([.Q$24]+[.$BB30])+[.R$27]*[.$Z$5]*MAGNET([.R$24]+[.$BB30])+[.S$27]*[.$Z$5]*MAGNET([.S$24]+[.$BB30])+[.T$27]*[.$Z$5]*MAGNET([.T$24]+[.$BB30])+[.U$27]*[.$Z$5]*MAGNET([.U$24]+[.$BB30])+[.V$27]*[.$Z$5]*MAGNET([.V$24]+[.$BB30])+[.W$27]*[.$Z$5]*MAGNET([.W$24]+[.$BB30])+[.X$27]*[.$Z$5]*MAGNET([.X$24]+[.$BB30])+[.Y$27]*[.$Z$5]*MAGNET([.Y$24]+[.$BB30])+[.Z$27]*[.$Z$5]*MAGNET([.Z$24]+[.$BB30])+[.AA$27]*[.$Z$5]*MAGNET([.AA$24]+[.$BB30])+[.AB$27]*[.$Z$5]*MAGNET([.AB$24]+[.$BB30])+[.AC$27]*[.$Z$5]*MAGNET([.AC$24]+[.$BB30])+[.AD$27]*[.$Z$5]*MAGNET([.AD$24]+[.$BB30])+[.AE$27]*[.$Z$5]*MAGNET([.AE$24]+[.$BB30])+[.AF$27]*[.$Z$5]*MAGNET([.AF$24]+[.$BB30])+[.AG$27]*[.$Z$5]*MAGNET([.AG$24]+[.$BB30])+[.D$27]*[.$Z$5]*MAGNET([.D$24]+[.$BB30])+[.AH$27]*[.$Z$5]*MAGNET([.AH$24]+[.BB30]) +[.AI$27]*[.$Z$5]*MAGNET([.AI$24]+[.BB30]) +[.AJ$27]*[.$Z$5]*MAGNET([.AJ$24]+[.BB30]) +[.AK$27]*[.$Z$5]*MAGNET([.AK$24]+[.BB30]) +[.AL$27]*[.$Z$5]*MAGNET([.AL$24]+[.BB30]) +[.AM$27]*[.$Z$5]*MAGNET([.AM$24]+[.BB30]) +[.AN$27]*[.$Z$5]*MAGNET([.AN$24]+[.BB30]) +[.AO$27]*[.$Z$5]*MAGNET([.AO$24]+[.BB30]) +[.AP$27]*[.$Z$5]*MAGNET([.AP$24]+[.$BB30])&#10;+[.AQ$27]*[.$Z$5]*MAGNET([.AQ$24]+[.$BB30])&#10;+[.AR$27]*[.$Z$5]*MAGNET([.AR$24]+[.$BB30])&#10;+[.AS$27]*[.$Z$5]*MAGNET([.AS$24]+[.$BB30])&#10;+[.AT$27]*[.$Z$5]*MAGNET([.AT$24]+[.$BB30])&#10;+[.AU$27]*[.$Z$5]*MAGNET([.AU$24]+[.$BB30])&#10;+[.AV$27]*[.$Z$5]*MAGNET([.AV$24]+[.$BB30])&#10;+[.AW$27]*[.$Z$5]*MAGNET([.AW$24]+[.$BB30])&#10;+[.AX$27]*[.$Z$5]*MAGNET([.AX$24]+[.$BB30])&#10;+[.AY$27]*[.$Z$5]*MAGNET([.AY$24]+[.$BB30]) +RAND()*[.$BE$13]" office:value-type="float" office:value="-117.656452872906" calcext:value-type="float">
            <text:p>-117.656452872906</text:p>
          </table:table-cell>
          <table:table-cell table:style-name="ce71" table:formula="of:=[.E$28]*[.$Z$5]*MAGNET([.E$24]+[.$BB30])+[.F$28]*[.$Z$5]*MAGNET([.F$24]+[.$BB30])+[.G$28]*[.$Z$5]*MAGNET([.G$24]+[.$BB30])+[.H$28]*[.$Z$5]*MAGNET([.H$24]+[.$BB30])+[.I$28]*[.$Z$5]*MAGNET([.I$24]+[.$BB30])+[.J$28]*[.$Z$5]*MAGNET([.J$24]+[.$BB30])+[.K$28]*[.$Z$5]*MAGNET([.K$24]+[.$BB30])+[.L$28]*[.$Z$5]*MAGNET([.L$24]+[.$BB30])+[.M$28]*[.$Z$5]*MAGNET([.M$24]+[.$BB30])+[.N$28]*[.$Z$5]*MAGNET([.N$24]+[.$BB30])+[.O$28]*[.$Z$5]*MAGNET([.O$24]+[.$BB30])+[.P$28]*[.$Z$5]*MAGNET([.P$24]+[.$BB30])+[.Q$28]*[.$Z$5]*MAGNET([.Q$24]+[.$BB30])+[.R$28]*[.$Z$5]*MAGNET([.R$24]+[.$BB30])+[.S$28]*[.$Z$5]*MAGNET([.S$24]+[.$BB30])+[.T$28]*[.$Z$5]*MAGNET([.T$24]+[.$BB30])+[.U$28]*[.$Z$5]*MAGNET([.U$24]+[.$BB30])+[.V$28]*[.$Z$5]*MAGNET([.V$24]+[.$BB30])+[.W$28]*[.$Z$5]*MAGNET([.W$24]+[.$BB30])+[.X$28]*[.$Z$5]*MAGNET([.X$24]+[.$BB30])+[.Y$28]*[.$Z$5]*MAGNET([.Y$24]+[.$BB30])+[.Z$28]*[.$Z$5]*MAGNET([.Z$24]+[.$BB30])+[.AA$28]*[.$Z$5]*MAGNET([.AA$24]+[.$BB30])+[.AB$28]*[.$Z$5]*MAGNET([.AB$24]+[.$BB30])+[.AC$28]*[.$Z$5]*MAGNET([.AC$24]+[.$BB30])+[.AD$28]*[.$Z$5]*MAGNET([.AD$24]+[.$BB30])+[.AE$28]*[.$Z$5]*MAGNET([.AE$24]+[.$BB30])+[.AF$28]*[.$Z$5]*MAGNET([.AF$24]+[.$BB30])+[.AG$28]*[.$Z$5]*MAGNET([.AG$24]+[.$BB30])+[.D$28]*[.$Z$5]*MAGNET([.D$24]+[.$BB30])+[.AH$28]*[.$Z$5]*MAGNET([.AH$24]+[.BB30]) +[.AI$28]*[.$Z$5]*MAGNET([.AI$24]+[.BB30]) +[.AJ$28]*[.$Z$5]*MAGNET([.AJ$24]+[.BB30]) +[.AK$28]*[.$Z$5]*MAGNET([.AK$24]+[.BB30]) +[.AL$28]*[.$Z$5]*MAGNET([.AL$24]+[.BB30]) +[.AM$28]*[.$Z$5]*MAGNET([.AM$24]+[.BB30]) +[.AN$28]*[.$Z$5]*MAGNET([.AN$24]+[.BB30]) +[.AO$28]*[.$Z$5]*MAGNET([.AO$24]+[.BB30]) +[.AP$28]*[.$Z$5]*MAGNET([.AP$24]+[.$BB30])&#10;+[.AQ$28]*[.$Z$5]*MAGNET([.AQ$24]+[.$BB30])&#10;+[.AR$28]*[.$Z$5]*MAGNET([.AR$24]+[.$BB30])&#10;+[.AS$28]*[.$Z$5]*MAGNET([.AS$24]+[.$BB30])&#10;+[.AT$28]*[.$Z$5]*MAGNET([.AT$24]+[.$BB30])&#10;+[.AU$28]*[.$Z$5]*MAGNET([.AU$24]+[.$BB30])&#10;+[.AV$28]*[.$Z$5]*MAGNET([.AV$24]+[.$BB30])&#10;+[.AW$28]*[.$Z$5]*MAGNET([.AW$24]+[.$BB30])&#10;+[.AX$28]*[.$Z$5]*MAGNET([.AX$24]+[.$BB30])&#10;+[.AY$28]*[.$Z$5]*MAGNET([.AY$24]+[.$BB30]) +RAND()*[.$BF$13]" office:value-type="float" office:value="-13.6377916174042" calcext:value-type="float">
            <text:p>-13.6377916174042</text:p>
          </table:table-cell>
          <table:table-cell table:style-name="ce71" table:formula="of:=[.E$29]*[.$Z$5]*MAGNET([.E$24]+[.$BB30])+[.F$29]*[.$Z$5]*MAGNET([.F$24]+[.$BB30])+[.G$29]*[.$Z$5]*MAGNET([.G$24]+[.$BB30])+[.H$29]*[.$Z$5]*MAGNET([.H$24]+[.$BB30])+[.I$29]*[.$Z$5]*MAGNET([.I$24]+[.$BB30])+[.J$29]*[.$Z$5]*MAGNET([.J$24]+[.$BB30])+[.K$29]*[.$Z$5]*MAGNET([.K$24]+[.$BB30])+[.L$29]*[.$Z$5]*MAGNET([.L$24]+[.$BB30])+[.M$29]*[.$Z$5]*MAGNET([.M$24]+[.$BB30])+[.N$29]*[.$Z$5]*MAGNET([.N$24]+[.$BB30])+[.O$29]*[.$Z$5]*MAGNET([.O$24]+[.$BB30])+[.P$29]*[.$Z$5]*MAGNET([.P$24]+[.$BB30])+[.Q$29]*[.$Z$5]*MAGNET([.Q$24]+[.$BB30])+[.R$29]*[.$Z$5]*MAGNET([.R$24]+[.$BB30])+[.S$29]*[.$Z$5]*MAGNET([.S$24]+[.$BB30])+[.T$29]*[.$Z$5]*MAGNET([.T$24]+[.$BB30])+[.U$29]*[.$Z$5]*MAGNET([.U$24]+[.$BB30])+[.V$29]*[.$Z$5]*MAGNET([.V$24]+[.$BB30])+[.W$29]*[.$Z$5]*MAGNET([.W$24]+[.$BB30])+[.X$29]*[.$Z$5]*MAGNET([.X$24]+[.$BB30])+[.Y$29]*[.$Z$5]*MAGNET([.Y$24]+[.$BB30])+[.Z$29]*[.$Z$5]*MAGNET([.Z$24]+[.$BB30])+[.AA$29]*[.$Z$5]*MAGNET([.AA$24]+[.$BB30])+[.AB$29]*[.$Z$5]*MAGNET([.AB$24]+[.$BB30])+[.AC$29]*[.$Z$5]*MAGNET([.AC$24]+[.$BB30])+[.AD$29]*[.$Z$5]*MAGNET([.AD$24]+[.$BB30])+[.AE$29]*[.$Z$5]*MAGNET([.AE$24]+[.$BB30])+[.AF$29]*[.$Z$5]*MAGNET([.AF$24]+[.$BB30])+[.AG$29]*[.$Z$5]*MAGNET([.AG$24]+[.$BB30])+[.D$29]*[.$Z$5]*MAGNET([.D$24]+[.$BB30])+[.AH$29]*[.$Z$5]*MAGNET([.AH$24]+[.BB30]) +[.AI$29]*[.$Z$5]*MAGNET([.AI$24]+[.BB30]) +[.AJ$29]*[.$Z$5]*MAGNET([.AJ$24]+[.BB30]) +[.AK$29]*[.$Z$5]*MAGNET([.AK$24]+[.BB30]) +[.AL$29]*[.$Z$5]*MAGNET([.AL$24]+[.BB30]) +[.AM$29]*[.$Z$5]*MAGNET([.AM$24]+[.BB30]) +[.AN$29]*[.$Z$5]*MAGNET([.AN$24]+[.BB30]) +[.AO$29]*[.$Z$5]*MAGNET([.AO$24]+[.BB30]) +[.AP$29]*[.$Z$5]*MAGNET([.AP$24]+[.$BB30])&#10;+[.AQ$29]*[.$Z$5]*MAGNET([.AQ$24]+[.$BB30])&#10;+[.AR$29]*[.$Z$5]*MAGNET([.AR$24]+[.$BB30])&#10;+[.AS$29]*[.$Z$5]*MAGNET([.AS$24]+[.$BB30])&#10;+[.AT$29]*[.$Z$5]*MAGNET([.AT$24]+[.$BB30])&#10;+[.AU$29]*[.$Z$5]*MAGNET([.AU$24]+[.$BB30])&#10;+[.AV$29]*[.$Z$5]*MAGNET([.AV$24]+[.$BB30])&#10;+[.AW$29]*[.$Z$5]*MAGNET([.AW$24]+[.$BB30])&#10;+[.AX$29]*[.$Z$5]*MAGNET([.AX$24]+[.$BB30])&#10;+[.AY$29]*[.$Z$5]*MAGNET([.AY$24]+[.$BB30]) +RAND()*[.$BG$13]" office:value-type="float" office:value="44.4159769390047" calcext:value-type="float">
            <text:p>44.4159769390047</text:p>
          </table:table-cell>
          <table:table-cell table:style-name="ce71" table:formula="of:=[.E$30]*[.$Z$5]*MAGNET([.E$24]+[.$BB30])+[.F$30]*[.$Z$5]*MAGNET([.F$24]+[.$BB30])+[.G$30]*[.$Z$5]*MAGNET([.G$24]+[.$BB30])+[.H$30]*[.$Z$5]*MAGNET([.H$24]+[.$BB30])+[.I$30]*[.$Z$5]*MAGNET([.I$24]+[.$BB30])+[.J$30]*[.$Z$5]*MAGNET([.J$24]+[.$BB30])+[.K$30]*[.$Z$5]*MAGNET([.K$24]+[.$BB30])+[.L$30]*[.$Z$5]*MAGNET([.L$24]+[.$BB30])+[.M$30]*[.$Z$5]*MAGNET([.M$24]+[.$BB30])+[.N$30]*[.$Z$5]*MAGNET([.N$24]+[.$BB30])+[.O$30]*[.$Z$5]*MAGNET([.O$24]+[.$BB30])+[.P$30]*[.$Z$5]*MAGNET([.P$24]+[.$BB30])+[.Q$30]*[.$Z$5]*MAGNET([.Q$24]+[.$BB30])+[.R$30]*[.$Z$5]*MAGNET([.R$24]+[.$BB30])+[.S$30]*[.$Z$5]*MAGNET([.S$24]+[.$BB30])+[.T$30]*[.$Z$5]*MAGNET([.T$24]+[.$BB30])+[.U$30]*[.$Z$5]*MAGNET([.U$24]+[.$BB30])+[.V$30]*[.$Z$5]*MAGNET([.V$24]+[.$BB30])+[.W$30]*[.$Z$5]*MAGNET([.W$24]+[.$BB30])+[.X$30]*[.$Z$5]*MAGNET([.X$24]+[.$BB30])+[.Y$30]*[.$Z$5]*MAGNET([.Y$24]+[.$BB30])+[.Z$30]*[.$Z$5]*MAGNET([.Z$24]+[.$BB30])+[.AA$30]*[.$Z$5]*MAGNET([.AA$24]+[.$BB30])+[.AB$30]*[.$Z$5]*MAGNET([.AB$24]+[.$BB30])+[.AC$30]*[.$Z$5]*MAGNET([.AC$24]+[.$BB30])+[.AD$30]*[.$Z$5]*MAGNET([.AD$24]+[.$BB30])+[.AE$30]*[.$Z$5]*MAGNET([.AE$24]+[.$BB30])+[.AF$30]*[.$Z$5]*MAGNET([.AF$24]+[.$BB30])+[.AG$30]*[.$Z$5]*MAGNET([.AG$24]+[.$BB30])+[.D$30]*[.$Z$5]*MAGNET([.D$24]+[.$BB30])+[.AH$30]*[.$Z$5]*MAGNET([.AH$24]+[.BB30]) +[.AI$30]*[.$Z$5]*MAGNET([.AI$24]+[.BB30]) +[.AJ$30]*[.$Z$5]*MAGNET([.AJ$24]+[.BB30]) +[.AK$30]*[.$Z$5]*MAGNET([.AK$24]+[.BB30]) +[.AL$30]*[.$Z$5]*MAGNET([.AL$24]+[.BB30]) +[.AM$30]*[.$Z$5]*MAGNET([.AM$24]+[.BB30]) +[.AN$30]*[.$Z$5]*MAGNET([.AN$24]+[.BB30]) +[.AO$30]*[.$Z$5]*MAGNET([.AO$24]+[.BB30]) +[.AP$30]*[.$Z$5]*MAGNET([.AP$24]+[.$BB30])&#10;+[.AQ$30]*[.$Z$5]*MAGNET([.AQ$24]+[.$BB30])&#10;+[.AR$30]*[.$Z$5]*MAGNET([.AR$24]+[.$BB30])&#10;+[.AS$30]*[.$Z$5]*MAGNET([.AS$24]+[.$BB30])&#10;+[.AT$30]*[.$Z$5]*MAGNET([.AT$24]+[.$BB30])&#10;+[.AU$30]*[.$Z$5]*MAGNET([.AU$24]+[.$BB30])&#10;+[.AV$30]*[.$Z$5]*MAGNET([.AV$24]+[.$BB30])&#10;+[.AW$30]*[.$Z$5]*MAGNET([.AW$24]+[.$BB30])&#10;+[.AX$30]*[.$Z$5]*MAGNET([.AX$24]+[.$BB30])&#10;+[.AY$30]*[.$Z$5]*MAGNET([.AY$24]+[.$BB30]) +RAND()*[.$BH$13]" office:value-type="float" office:value="0" calcext:value-type="float">
            <text:p>0</text:p>
          </table:table-cell>
          <table:table-cell table:style-name="ce71" table:formula="of:=[.E$31]*[.$Z$5]*MAGNET([.E$24]+[.$BB30])+[.F$31]*[.$Z$5]*MAGNET([.F$24]+[.$BB30])+[.G$31]*[.$Z$5]*MAGNET([.G$24]+[.$BB30])+[.H$31]*[.$Z$5]*MAGNET([.H$24]+[.$BB30])+[.I$31]*[.$Z$5]*MAGNET([.I$24]+[.$BB30])+[.J$31]*[.$Z$5]*MAGNET([.J$24]+[.$BB30])+[.K$31]*[.$Z$5]*MAGNET([.K$24]+[.$BB30])+[.L$31]*[.$Z$5]*MAGNET([.L$24]+[.$BB30])+[.M$31]*[.$Z$5]*MAGNET([.M$24]+[.$BB30])+[.N$31]*[.$Z$5]*MAGNET([.N$24]+[.$BB30])+[.O$31]*[.$Z$5]*MAGNET([.O$24]+[.$BB30])+[.P$31]*[.$Z$5]*MAGNET([.P$24]+[.$BB30])+[.Q$31]*[.$Z$5]*MAGNET([.Q$24]+[.$BB30])+[.R$31]*[.$Z$5]*MAGNET([.R$24]+[.$BB30])+[.S$31]*[.$Z$5]*MAGNET([.S$24]+[.$BB30])+[.T$31]*[.$Z$5]*MAGNET([.T$24]+[.$BB30])+[.U$31]*[.$Z$5]*MAGNET([.U$24]+[.$BB30])+[.V$31]*[.$Z$5]*MAGNET([.V$24]+[.$BB30])+[.W$31]*[.$Z$5]*MAGNET([.W$24]+[.$BB30])+[.X$31]*[.$Z$5]*MAGNET([.X$24]+[.$BB30])+[.Y$31]*[.$Z$5]*MAGNET([.Y$24]+[.$BB30])+[.Z$31]*[.$Z$5]*MAGNET([.Z$24]+[.$BB30])+[.AA$31]*[.$Z$5]*MAGNET([.AA$24]+[.$BB30])+[.AB$31]*[.$Z$5]*MAGNET([.AB$24]+[.$BB30])+[.AC$31]*[.$Z$5]*MAGNET([.AC$24]+[.$BB30])+[.AD$31]*[.$Z$5]*MAGNET([.AD$24]+[.$BB30])+[.AE$31]*[.$Z$5]*MAGNET([.AE$24]+[.$BB30])+[.AF$31]*[.$Z$5]*MAGNET([.AF$24]+[.$BB30])+[.AG$31]*[.$Z$5]*MAGNET([.AG$24]+[.$BB30])+[.D$31]*[.$Z$5]*MAGNET([.D$24]+[.$BB30])+[.AH$31]*[.$Z$5]*MAGNET([.AH$24]+[.BB30]) +[.AI$31]*[.$Z$5]*MAGNET([.AI$24]+[.BB30]) +[.AJ$31]*[.$Z$5]*MAGNET([.AJ$24]+[.BB30]) +[.AK$31]*[.$Z$5]*MAGNET([.AK$24]+[.BB30]) +[.AL$31]*[.$Z$5]*MAGNET([.AL$24]+[.BB30]) +[.AM$31]*[.$Z$5]*MAGNET([.AM$24]+[.BB30]) +[.AN$31]*[.$Z$5]*MAGNET([.AN$24]+[.BB30]) +[.AO$31]*[.$Z$5]*MAGNET([.AO$24]+[.BB30]) +[.AP$31]*[.$Z$5]*MAGNET([.AP$24]+[.$BB30])&#10;+[.AQ$31]*[.$Z$5]*MAGNET([.AQ$24]+[.$BB30])&#10;+[.AR$31]*[.$Z$5]*MAGNET([.AR$24]+[.$BB30])&#10;+[.AS$31]*[.$Z$5]*MAGNET([.AS$24]+[.$BB30])&#10;+[.AT$31]*[.$Z$5]*MAGNET([.AT$24]+[.$BB30])&#10;+[.AU$31]*[.$Z$5]*MAGNET([.AU$24]+[.$BB30])&#10;+[.AV$31]*[.$Z$5]*MAGNET([.AV$24]+[.$BB30])&#10;+[.AW$31]*[.$Z$5]*MAGNET([.AW$24]+[.$BB30])&#10;+[.AX$31]*[.$Z$5]*MAGNET([.AX$24]+[.$BB30])&#10;+[.AY$31]*[.$Z$5]*MAGNET([.AY$24]+[.$BB30]) +RAND()*[.$BI$13]" office:value-type="float" office:value="0" calcext:value-type="float">
            <text:p>0</text:p>
          </table:table-cell>
          <table:table-cell table:style-name="ce71" table:formula="of:=[.E$32]*[.$Z$5]*MAGNET([.E$24]+[.$BB30])+[.F$32]*[.$Z$5]*MAGNET([.F$24]+[.$BB30])+[.G$32]*[.$Z$5]*MAGNET([.G$24]+[.$BB30])+[.H$32]*[.$Z$5]*MAGNET([.H$24]+[.$BB30])+[.I$32]*[.$Z$5]*MAGNET([.I$24]+[.$BB30])+[.J$32]*[.$Z$5]*MAGNET([.J$24]+[.$BB30])+[.K$32]*[.$Z$5]*MAGNET([.K$24]+[.$BB30])+[.L$32]*[.$Z$5]*MAGNET([.L$24]+[.$BB30])+[.M$32]*[.$Z$5]*MAGNET([.M$24]+[.$BB30])+[.N$32]*[.$Z$5]*MAGNET([.N$24]+[.$BB30])+[.O$32]*[.$Z$5]*MAGNET([.O$24]+[.$BB30])+[.P$32]*[.$Z$5]*MAGNET([.P$24]+[.$BB30])+[.Q$32]*[.$Z$5]*MAGNET([.Q$24]+[.$BB30])+[.R$32]*[.$Z$5]*MAGNET([.R$24]+[.$BB30])+[.S$32]*[.$Z$5]*MAGNET([.S$24]+[.$BB30])+[.T$32]*[.$Z$5]*MAGNET([.T$24]+[.$BB30])+[.U$32]*[.$Z$5]*MAGNET([.U$24]+[.$BB30])+[.V$32]*[.$Z$5]*MAGNET([.V$24]+[.$BB30])+[.W$32]*[.$Z$5]*MAGNET([.W$24]+[.$BB30])+[.X$32]*[.$Z$5]*MAGNET([.X$24]+[.$BB30])+[.Y$32]*[.$Z$5]*MAGNET([.Y$24]+[.$BB30])+[.Z$32]*[.$Z$5]*MAGNET([.Z$24]+[.$BB30])+[.AA$32]*[.$Z$5]*MAGNET([.AA$24]+[.$BB30])+[.AB$32]*[.$Z$5]*MAGNET([.AB$24]+[.$BB30])+[.AC$32]*[.$Z$5]*MAGNET([.AC$24]+[.$BB30])+[.AD$32]*[.$Z$5]*MAGNET([.AD$24]+[.$BB30])+[.AE$32]*[.$Z$5]*MAGNET([.AE$24]+[.$BB30])+[.AF$32]*[.$Z$5]*MAGNET([.AF$24]+[.$BB30])+[.AG$32]*[.$Z$5]*MAGNET([.AG$24]+[.$BB30])+[.D$32]*[.$Z$5]*MAGNET([.D$24]+[.$BB30])+[.AH$32]*[.$Z$5]*MAGNET([.AH$24]+[.BB30]) +[.AI$32]*[.$Z$5]*MAGNET([.AI$24]+[.BB30]) +[.AJ$32]*[.$Z$5]*MAGNET([.AJ$24]+[.BB30]) +[.AK$32]*[.$Z$5]*MAGNET([.AK$24]+[.BB30]) +[.AL$32]*[.$Z$5]*MAGNET([.AL$24]+[.BB30]) +[.AM$32]*[.$Z$5]*MAGNET([.AM$24]+[.BB30]) +[.AN$32]*[.$Z$5]*MAGNET([.AN$24]+[.BB30]) +[.AO$32]*[.$Z$5]*MAGNET([.AO$24]+[.BB30]) +[.AP$32]*[.$Z$5]*MAGNET([.AP$24]+[.$BB30])&#10;+[.AQ$32]*[.$Z$5]*MAGNET([.AQ$24]+[.$BB30])&#10;+[.AR$32]*[.$Z$5]*MAGNET([.AR$24]+[.$BB30])&#10;+[.AS$32]*[.$Z$5]*MAGNET([.AS$24]+[.$BB30])&#10;+[.AT$32]*[.$Z$5]*MAGNET([.AT$24]+[.$BB30])&#10;+[.AU$32]*[.$Z$5]*MAGNET([.AU$24]+[.$BB30])&#10;+[.AV$32]*[.$Z$5]*MAGNET([.AV$24]+[.$BB30])&#10;+[.AW$32]*[.$Z$5]*MAGNET([.AW$24]+[.$BB30])&#10;+[.AX$32]*[.$Z$5]*MAGNET([.AX$24]+[.$BB30])&#10;+[.AY$32]*[.$Z$5]*MAGNET([.AY$24]+[.$BB3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formula="of:=[.D49]-[.D50]" office:value-type="float" office:value="0" calcext:value-type="float">
            <text:p>0</text:p>
          </table:table-cell>
          <table:table-cell table:formula="of:=[.E49]-[.E50]" office:value-type="float" office:value="0" calcext:value-type="float">
            <text:p>0</text:p>
          </table:table-cell>
          <table:table-cell table:formula="of:=[.F49]-[.F50]" office:value-type="float" office:value="0" calcext:value-type="float">
            <text:p>0</text:p>
          </table:table-cell>
          <table:table-cell table:formula="of:=[.G49]-[.G50]" office:value-type="float" office:value="0" calcext:value-type="float">
            <text:p>0</text:p>
          </table:table-cell>
          <table:table-cell table:formula="of:=[.H49]-[.H50]" office:value-type="float" office:value="0" calcext:value-type="float">
            <text:p>0</text:p>
          </table:table-cell>
          <table:table-cell table:formula="of:=[.I49]-[.I50]" office:value-type="float" office:value="0" calcext:value-type="float">
            <text:p>0</text:p>
          </table:table-cell>
          <table:table-cell table:formula="of:=[.J49]-[.J50]" office:value-type="float" office:value="0" calcext:value-type="float">
            <text:p>0</text:p>
          </table:table-cell>
          <table:table-cell table:formula="of:=[.K49]-[.K50]" office:value-type="float" office:value="0" calcext:value-type="float">
            <text:p>0</text:p>
          </table:table-cell>
          <table:table-cell table:formula="of:=[.L49]-[.L50]" office:value-type="float" office:value="0" calcext:value-type="float">
            <text:p>0</text:p>
          </table:table-cell>
          <table:table-cell table:formula="of:=[.M49]-[.M50]" office:value-type="float" office:value="0" calcext:value-type="float">
            <text:p>0</text:p>
          </table:table-cell>
          <table:table-cell table:formula="of:=[.N49]-[.N50]" office:value-type="float" office:value="0" calcext:value-type="float">
            <text:p>0</text:p>
          </table:table-cell>
          <table:table-cell table:formula="of:=[.O49]-[.O50]" office:value-type="float" office:value="0" calcext:value-type="float">
            <text:p>0</text:p>
          </table:table-cell>
          <table:table-cell table:formula="of:=[.P49]-[.P50]" office:value-type="float" office:value="0" calcext:value-type="float">
            <text:p>0</text:p>
          </table:table-cell>
          <table:table-cell table:formula="of:=[.Q49]-[.Q50]" office:value-type="float" office:value="0" calcext:value-type="float">
            <text:p>0</text:p>
          </table:table-cell>
          <table:table-cell table:formula="of:=[.R49]-[.R50]" office:value-type="float" office:value="0" calcext:value-type="float">
            <text:p>0</text:p>
          </table:table-cell>
          <table:table-cell table:formula="of:=[.S49]-[.S50]" office:value-type="float" office:value="0" calcext:value-type="float">
            <text:p>0</text:p>
          </table:table-cell>
          <table:table-cell table:formula="of:=[.T49]-[.T50]" office:value-type="float" office:value="0" calcext:value-type="float">
            <text:p>0</text:p>
          </table:table-cell>
          <table:table-cell table:formula="of:=[.U49]-[.U50]" office:value-type="float" office:value="0" calcext:value-type="float">
            <text:p>0</text:p>
          </table:table-cell>
          <table:table-cell table:formula="of:=[.V49]-[.V50]" office:value-type="float" office:value="0" calcext:value-type="float">
            <text:p>0</text:p>
          </table:table-cell>
          <table:table-cell table:formula="of:=[.W49]-[.W50]" office:value-type="float" office:value="0" calcext:value-type="float">
            <text:p>0</text:p>
          </table:table-cell>
          <table:table-cell table:formula="of:=[.X49]-[.X50]" office:value-type="float" office:value="0" calcext:value-type="float">
            <text:p>0</text:p>
          </table:table-cell>
          <table:table-cell table:formula="of:=[.Y49]-[.Y50]" office:value-type="float" office:value="0" calcext:value-type="float">
            <text:p>0</text:p>
          </table:table-cell>
          <table:table-cell table:formula="of:=[.Z49]-[.Z50]" office:value-type="float" office:value="0" calcext:value-type="float">
            <text:p>0</text:p>
          </table:table-cell>
          <table:table-cell table:formula="of:=[.AA49]-[.AA50]" office:value-type="float" office:value="0" calcext:value-type="float">
            <text:p>0</text:p>
          </table:table-cell>
          <table:table-cell table:formula="of:=[.AB49]-[.AB50]" office:value-type="float" office:value="0" calcext:value-type="float">
            <text:p>0</text:p>
          </table:table-cell>
          <table:table-cell table:formula="of:=[.AC49]-[.AC50]" office:value-type="float" office:value="0" calcext:value-type="float">
            <text:p>0</text:p>
          </table:table-cell>
          <table:table-cell table:formula="of:=[.AD49]-[.AD50]" office:value-type="float" office:value="0" calcext:value-type="float">
            <text:p>0</text:p>
          </table:table-cell>
          <table:table-cell table:formula="of:=[.AE49]-[.AE50]" office:value-type="float" office:value="0" calcext:value-type="float">
            <text:p>0</text:p>
          </table:table-cell>
          <table:table-cell table:formula="of:=[.AF49]-[.AF50]" office:value-type="float" office:value="0" calcext:value-type="float">
            <text:p>0</text:p>
          </table:table-cell>
          <table:table-cell table:formula="of:=[.AG49]-[.AG50]" office:value-type="float" office:value="0" calcext:value-type="float">
            <text:p>0</text:p>
          </table:table-cell>
          <table:table-cell table:formula="of:=[.AH49]-[.AH50]" office:value-type="float" office:value="0" calcext:value-type="float">
            <text:p>0</text:p>
          </table:table-cell>
          <table:table-cell table:formula="of:=[.AI49]-[.AI50]" office:value-type="float" office:value="0" calcext:value-type="float">
            <text:p>0</text:p>
          </table:table-cell>
          <table:table-cell table:formula="of:=[.AJ49]-[.AJ50]" office:value-type="float" office:value="0" calcext:value-type="float">
            <text:p>0</text:p>
          </table:table-cell>
          <table:table-cell table:formula="of:=[.AK49]-[.AK50]" office:value-type="float" office:value="0" calcext:value-type="float">
            <text:p>0</text:p>
          </table:table-cell>
          <table:table-cell table:formula="of:=[.AL49]-[.AL50]" office:value-type="float" office:value="0" calcext:value-type="float">
            <text:p>0</text:p>
          </table:table-cell>
          <table:table-cell table:formula="of:=[.AM49]-[.AM50]" office:value-type="float" office:value="0" calcext:value-type="float">
            <text:p>0</text:p>
          </table:table-cell>
          <table:table-cell table:formula="of:=[.AN49]-[.AN50]" office:value-type="float" office:value="0" calcext:value-type="float">
            <text:p>0</text:p>
          </table:table-cell>
          <table:table-cell table:formula="of:=[.AO49]-[.AO50]" office:value-type="float" office:value="0" calcext:value-type="float">
            <text:p>0</text:p>
          </table:table-cell>
          <table:table-cell table:formula="of:=[.AP49]-[.AP50]" office:value-type="float" office:value="0" calcext:value-type="float">
            <text:p>0</text:p>
          </table:table-cell>
          <table:table-cell table:formula="of:=[.AQ49]-[.AQ50]" office:value-type="float" office:value="0" calcext:value-type="float">
            <text:p>0</text:p>
          </table:table-cell>
          <table:table-cell table:formula="of:=[.AR49]-[.AR50]" office:value-type="float" office:value="0" calcext:value-type="float">
            <text:p>0</text:p>
          </table:table-cell>
          <table:table-cell table:formula="of:=[.AS49]-[.AS50]" office:value-type="float" office:value="0" calcext:value-type="float">
            <text:p>0</text:p>
          </table:table-cell>
          <table:table-cell table:formula="of:=[.AT49]-[.AT50]" office:value-type="float" office:value="0" calcext:value-type="float">
            <text:p>0</text:p>
          </table:table-cell>
          <table:table-cell table:formula="of:=[.AU49]-[.AU50]" office:value-type="float" office:value="0" calcext:value-type="float">
            <text:p>0</text:p>
          </table:table-cell>
          <table:table-cell table:formula="of:=[.AV49]-[.AV50]" office:value-type="float" office:value="0" calcext:value-type="float">
            <text:p>0</text:p>
          </table:table-cell>
          <table:table-cell table:formula="of:=[.AW49]-[.AW50]" office:value-type="float" office:value="0" calcext:value-type="float">
            <text:p>0</text:p>
          </table:table-cell>
          <table:table-cell table:formula="of:=[.AX49]-[.AX50]" office:value-type="float" office:value="0" calcext:value-type="float">
            <text:p>0</text:p>
          </table:table-cell>
          <table:table-cell table:formula="of:=[.AY49]-[.AY50]" office:value-type="float" office:value="0" calcext:value-type="float">
            <text:p>0</text:p>
          </table:table-cell>
          <table:table-cell/>
          <table:table-cell table:formula="of:=[.BA30]+0.002" office:value-type="float" office:value="0.032" calcext:value-type="float">
            <text:p>0.032</text:p>
          </table:table-cell>
          <table:table-cell table:formula="of:=[.BA31]*[.$D$6]" office:value-type="float" office:value="1.60849543863797" calcext:value-type="float">
            <text:p>1.608</text:p>
          </table:table-cell>
          <table:table-cell table:formula="of:=[.D$25]*[.$Z$5]*MAGNET([.D$24]+[.BB31])+[.E$25]*[.$Z$5]*MAGNET([.E$24]+[.BB31])+[.F$25]*[.$Z$5]*MAGNET([.F$24]+[.BB31])+[.G$25]*[.$Z$5]*MAGNET([.G$24]+[.BB31])+[.H$25]*[.$Z$5]*MAGNET([.H$24]+[.BB31])+[.I$25]*[.$Z$5]*MAGNET([.I$24]+[.BB31])+[.J$25]*[.$Z$5]*MAGNET([.J$24]+[.BB31])+[.K$25]*[.$Z$5]*MAGNET([.K$24]+[.BB31])+[.L$25]*[.$Z$5]*MAGNET([.L$24]+[.BB31])+[.M$25]*[.$Z$5]*MAGNET([.M$24]+[.BB31])+[.N$25]*[.$Z$5]*MAGNET([.N$24]+[.BB31])+[.O$25]*[.$Z$5]*MAGNET([.O$24]+[.BB31])+[.P$25]*[.$Z$5]*MAGNET([.P$24]+[.BB31])+[.Q$25]*[.$Z$5]*MAGNET([.Q$24]+[.BB31])+[.R$25]*[.$Z$5]*MAGNET([.R$24]+[.BB31])+[.S$25]*[.$Z$5]*MAGNET([.S$24]+[.BB31])+[.T$25]*[.$Z$5]*MAGNET([.T$24]+[.BB31])+[.U$25]*[.$Z$5]*MAGNET([.U$24]+[.BB31])+[.V$25]*[.$Z$5]*MAGNET([.V$24]+[.BB31])+[.W$25]*[.$Z$5]*MAGNET([.W$24]+[.BB31])+[.X$25]*[.$Z$5]*MAGNET([.X$24]+[.BB31])+[.Y$25]*[.$Z$5]*MAGNET([.Y$24]+[.BB31])+[.Z$25]*[.$Z$5]*MAGNET([.Z$24]+[.BB31])+[.AA$25]*[.$Z$5]*MAGNET([.AA$24]+[.BB31])+[.AB$25]*[.$Z$5]*MAGNET([.AB$24]+[.BB31])+[.AC$25]*[.$Z$5]*MAGNET([.AC$24]+[.BB31])+[.AD$25]*[.$Z$5]*MAGNET([.AD$24]+[.BB31])+[.AE$25]*[.$Z$5]*MAGNET([.AE$24]+[.BB31])+[.AF$25]*[.$Z$5]*MAGNET([.AF$24]+[.BB31])+[.AG$25]*[.$Z$5]*MAGNET([.AG$24]+[.BB31])+[.AH$25]*[.$Z$5]*MAGNET([.AH$24]+[.BB31]) +[.AI$25]*[.$Z$5]*MAGNET([.AI$24]+[.BB31]) +[.AJ$25]*[.$Z$5]*MAGNET([.AJ$24]+[.BB31]) +[.AK$25]*[.$Z$5]*MAGNET([.AK$24]+[.BB31]) +[.AL$25]*[.$Z$5]*MAGNET([.AL$24]+[.BB31]) +[.AM$25]*[.$Z$5]*MAGNET([.AM$24]+[.BB31]) +[.AN$25]*[.$Z$5]*MAGNET([.AN$24]+[.BB31]) +[.AO$25]*[.$Z$5]*MAGNET([.AO$24]+[.BB31])+RAND()*[.$BC$13]+[.AP$25]*[.$Z$5]*MAGNET([.AP$24]+[.BB31])&#10;+[.AQ$25]*[.$Z$5]*MAGNET([.AQ$24]+[.BB31])&#10;+[.AR$25]*[.$Z$5]*MAGNET([.AR$24]+[.BB31])&#10;+[.AS$25]*[.$Z$5]*MAGNET([.AS$24]+[.BB31])&#10;+[.AT$25]*[.$Z$5]*MAGNET([.AT$24]+[.BB31])&#10;+[.AU$25]*[.$Z$5]*MAGNET([.AU$24]+[.BB31])&#10;+[.AV$25]*[.$Z$5]*MAGNET([.AV$24]+[.BB31])&#10;+[.AW$25]*[.$Z$5]*MAGNET([.AW$24]+[.BB31])&#10;+[.AX$25]*[.$Z$5]*MAGNET([.AX$24]+[.BB31])&#10;+[.AY$25]*[.$Z$5]*MAGNET([.AY$24]+[.BB31])" office:value-type="float" office:value="115.171731395967" calcext:value-type="float">
            <text:p>115.17</text:p>
          </table:table-cell>
          <table:table-cell table:style-name="ce70" table:formula="of:=[.E$26]*[.$Z$5]*MAGNET([.E$24]+[.$BB31])+[.F$26]*[.$Z$5]*MAGNET([.F$24]+[.$BB31])+[.G$26]*[.$Z$5]*MAGNET([.G$24]+[.$BB31])+[.H$26]*[.$Z$5]*MAGNET([.H$24]+[.$BB31])+[.I$26]*[.$Z$5]*MAGNET([.I$24]+[.$BB31])+[.J$26]*[.$Z$5]*MAGNET([.J$24]+[.$BB31])+[.K$26]*[.$Z$5]*MAGNET([.K$24]+[.$BB31])+[.L$26]*[.$Z$5]*MAGNET([.L$24]+[.$BB31])+[.M$26]*[.$Z$5]*MAGNET([.M$24]+[.$BB31])+[.N$26]*[.$Z$5]*MAGNET([.N$24]+[.$BB31])+[.O$26]*[.$Z$5]*MAGNET([.O$24]+[.$BB31])+[.P$26]*[.$Z$5]*MAGNET([.P$24]+[.$BB31])+[.Q$26]*[.$Z$5]*MAGNET([.Q$24]+[.$BB31])+[.R$26]*[.$Z$5]*MAGNET([.R$24]+[.$BB31])+[.S$26]*[.$Z$5]*MAGNET([.S$24]+[.$BB31])+[.T$26]*[.$Z$5]*MAGNET([.T$24]+[.$BB31])+[.U$26]*[.$Z$5]*MAGNET([.U$24]+[.$BB31])+[.V$26]*[.$Z$5]*MAGNET([.V$24]+[.$BB31])+[.W$26]*[.$Z$5]*MAGNET([.W$24]+[.$BB31])+[.X$26]*[.$Z$5]*MAGNET([.X$24]+[.$BB31])+[.Y$26]*[.$Z$5]*MAGNET([.Y$24]+[.$BB31])+[.Z$26]*[.$Z$5]*MAGNET([.Z$24]+[.$BB31])+[.AA$26]*[.$Z$5]*MAGNET([.AA$24]+[.$BB31])+[.AB$26]*[.$Z$5]*MAGNET([.AB$24]+[.$BB31])+[.AC$26]*[.$Z$5]*MAGNET([.AC$24]+[.$BB31])+[.AD$26]*[.$Z$5]*MAGNET([.AD$24]+[.$BB31])+[.AE$26]*[.$Z$5]*MAGNET([.AE$24]+[.$BB31])+[.AF$26]*[.$Z$5]*MAGNET([.AF$24]+[.$BB31])+[.AG$26]*[.$Z$5]*MAGNET([.AG$24]+[.$BB31])+[.D$26]*[.$Z$5]*MAGNET([.D$24]+[.$BB31])+[.AH$26]*[.$Z$5]*MAGNET([.AH$24]+[.BB31]) +[.AI$26]*[.$Z$5]*MAGNET([.AI$24]+[.BB31]) +[.AJ$26]*[.$Z$5]*MAGNET([.AJ$24]+[.BB31]) +[.AK$26]*[.$Z$5]*MAGNET([.AK$24]+[.BB31]) +[.AL$26]*[.$Z$5]*MAGNET([.AL$24]+[.BB31]) +[.AM$26]*[.$Z$5]*MAGNET([.AM$24]+[.BB31]) +[.AN$26]*[.$Z$5]*MAGNET([.AN$24]+[.BB31]) +[.AO$26]*[.$Z$5]*MAGNET([.AO$24]+[.BB31]) +[.AP$26]*[.$Z$5]*MAGNET([.AP$24]+[.$BB31])&#10;+[.AQ$26]*[.$Z$5]*MAGNET([.AQ$24]+[.$BB31])&#10;+[.AR$26]*[.$Z$5]*MAGNET([.AR$24]+[.$BB31])&#10;+[.AS$26]*[.$Z$5]*MAGNET([.AS$24]+[.$BB31])&#10;+[.AT$26]*[.$Z$5]*MAGNET([.AT$24]+[.$BB31])&#10;+[.AU$26]*[.$Z$5]*MAGNET([.AU$24]+[.$BB31])&#10;+[.AV$26]*[.$Z$5]*MAGNET([.AV$24]+[.$BB31])&#10;+[.AW$26]*[.$Z$5]*MAGNET([.AW$24]+[.$BB31])&#10;+[.AX$26]*[.$Z$5]*MAGNET([.AX$24]+[.$BB31])&#10;+[.AY$26]*[.$Z$5]*MAGNET([.AY$24]+[.$BB31]) +RAND()*[.$BD$13]" office:value-type="float" office:value="-25.0419163370395" calcext:value-type="float">
            <text:p>-25.04</text:p>
          </table:table-cell>
          <table:table-cell table:style-name="ce71" table:formula="of:=[.E$27]*[.$Z$5]*MAGNET([.E$24]+[.$BB31])+[.F$27]*[.$Z$5]*MAGNET([.F$24]+[.$BB31])+[.G$27]*[.$Z$5]*MAGNET([.G$24]+[.$BB31])+[.H$27]*[.$Z$5]*MAGNET([.H$24]+[.$BB31])+[.I$27]*[.$Z$5]*MAGNET([.I$24]+[.$BB31])+[.J$27]*[.$Z$5]*MAGNET([.J$24]+[.$BB31])+[.K$27]*[.$Z$5]*MAGNET([.K$24]+[.$BB31])+[.L$27]*[.$Z$5]*MAGNET([.L$24]+[.$BB31])+[.M$27]*[.$Z$5]*MAGNET([.M$24]+[.$BB31])+[.N$27]*[.$Z$5]*MAGNET([.N$24]+[.$BB31])+[.O$27]*[.$Z$5]*MAGNET([.O$24]+[.$BB31])+[.P$27]*[.$Z$5]*MAGNET([.P$24]+[.$BB31])+[.Q$27]*[.$Z$5]*MAGNET([.Q$24]+[.$BB31])+[.R$27]*[.$Z$5]*MAGNET([.R$24]+[.$BB31])+[.S$27]*[.$Z$5]*MAGNET([.S$24]+[.$BB31])+[.T$27]*[.$Z$5]*MAGNET([.T$24]+[.$BB31])+[.U$27]*[.$Z$5]*MAGNET([.U$24]+[.$BB31])+[.V$27]*[.$Z$5]*MAGNET([.V$24]+[.$BB31])+[.W$27]*[.$Z$5]*MAGNET([.W$24]+[.$BB31])+[.X$27]*[.$Z$5]*MAGNET([.X$24]+[.$BB31])+[.Y$27]*[.$Z$5]*MAGNET([.Y$24]+[.$BB31])+[.Z$27]*[.$Z$5]*MAGNET([.Z$24]+[.$BB31])+[.AA$27]*[.$Z$5]*MAGNET([.AA$24]+[.$BB31])+[.AB$27]*[.$Z$5]*MAGNET([.AB$24]+[.$BB31])+[.AC$27]*[.$Z$5]*MAGNET([.AC$24]+[.$BB31])+[.AD$27]*[.$Z$5]*MAGNET([.AD$24]+[.$BB31])+[.AE$27]*[.$Z$5]*MAGNET([.AE$24]+[.$BB31])+[.AF$27]*[.$Z$5]*MAGNET([.AF$24]+[.$BB31])+[.AG$27]*[.$Z$5]*MAGNET([.AG$24]+[.$BB31])+[.D$27]*[.$Z$5]*MAGNET([.D$24]+[.$BB31])+[.AH$27]*[.$Z$5]*MAGNET([.AH$24]+[.BB31]) +[.AI$27]*[.$Z$5]*MAGNET([.AI$24]+[.BB31]) +[.AJ$27]*[.$Z$5]*MAGNET([.AJ$24]+[.BB31]) +[.AK$27]*[.$Z$5]*MAGNET([.AK$24]+[.BB31]) +[.AL$27]*[.$Z$5]*MAGNET([.AL$24]+[.BB31]) +[.AM$27]*[.$Z$5]*MAGNET([.AM$24]+[.BB31]) +[.AN$27]*[.$Z$5]*MAGNET([.AN$24]+[.BB31]) +[.AO$27]*[.$Z$5]*MAGNET([.AO$24]+[.BB31]) +[.AP$27]*[.$Z$5]*MAGNET([.AP$24]+[.$BB31])&#10;+[.AQ$27]*[.$Z$5]*MAGNET([.AQ$24]+[.$BB31])&#10;+[.AR$27]*[.$Z$5]*MAGNET([.AR$24]+[.$BB31])&#10;+[.AS$27]*[.$Z$5]*MAGNET([.AS$24]+[.$BB31])&#10;+[.AT$27]*[.$Z$5]*MAGNET([.AT$24]+[.$BB31])&#10;+[.AU$27]*[.$Z$5]*MAGNET([.AU$24]+[.$BB31])&#10;+[.AV$27]*[.$Z$5]*MAGNET([.AV$24]+[.$BB31])&#10;+[.AW$27]*[.$Z$5]*MAGNET([.AW$24]+[.$BB31])&#10;+[.AX$27]*[.$Z$5]*MAGNET([.AX$24]+[.$BB31])&#10;+[.AY$27]*[.$Z$5]*MAGNET([.AY$24]+[.$BB31]) +RAND()*[.$BE$13]" office:value-type="float" office:value="-111.436306474086" calcext:value-type="float">
            <text:p>-111.436306474086</text:p>
          </table:table-cell>
          <table:table-cell table:style-name="ce71" table:formula="of:=[.E$28]*[.$Z$5]*MAGNET([.E$24]+[.$BB31])+[.F$28]*[.$Z$5]*MAGNET([.F$24]+[.$BB31])+[.G$28]*[.$Z$5]*MAGNET([.G$24]+[.$BB31])+[.H$28]*[.$Z$5]*MAGNET([.H$24]+[.$BB31])+[.I$28]*[.$Z$5]*MAGNET([.I$24]+[.$BB31])+[.J$28]*[.$Z$5]*MAGNET([.J$24]+[.$BB31])+[.K$28]*[.$Z$5]*MAGNET([.K$24]+[.$BB31])+[.L$28]*[.$Z$5]*MAGNET([.L$24]+[.$BB31])+[.M$28]*[.$Z$5]*MAGNET([.M$24]+[.$BB31])+[.N$28]*[.$Z$5]*MAGNET([.N$24]+[.$BB31])+[.O$28]*[.$Z$5]*MAGNET([.O$24]+[.$BB31])+[.P$28]*[.$Z$5]*MAGNET([.P$24]+[.$BB31])+[.Q$28]*[.$Z$5]*MAGNET([.Q$24]+[.$BB31])+[.R$28]*[.$Z$5]*MAGNET([.R$24]+[.$BB31])+[.S$28]*[.$Z$5]*MAGNET([.S$24]+[.$BB31])+[.T$28]*[.$Z$5]*MAGNET([.T$24]+[.$BB31])+[.U$28]*[.$Z$5]*MAGNET([.U$24]+[.$BB31])+[.V$28]*[.$Z$5]*MAGNET([.V$24]+[.$BB31])+[.W$28]*[.$Z$5]*MAGNET([.W$24]+[.$BB31])+[.X$28]*[.$Z$5]*MAGNET([.X$24]+[.$BB31])+[.Y$28]*[.$Z$5]*MAGNET([.Y$24]+[.$BB31])+[.Z$28]*[.$Z$5]*MAGNET([.Z$24]+[.$BB31])+[.AA$28]*[.$Z$5]*MAGNET([.AA$24]+[.$BB31])+[.AB$28]*[.$Z$5]*MAGNET([.AB$24]+[.$BB31])+[.AC$28]*[.$Z$5]*MAGNET([.AC$24]+[.$BB31])+[.AD$28]*[.$Z$5]*MAGNET([.AD$24]+[.$BB31])+[.AE$28]*[.$Z$5]*MAGNET([.AE$24]+[.$BB31])+[.AF$28]*[.$Z$5]*MAGNET([.AF$24]+[.$BB31])+[.AG$28]*[.$Z$5]*MAGNET([.AG$24]+[.$BB31])+[.D$28]*[.$Z$5]*MAGNET([.D$24]+[.$BB31])+[.AH$28]*[.$Z$5]*MAGNET([.AH$24]+[.BB31]) +[.AI$28]*[.$Z$5]*MAGNET([.AI$24]+[.BB31]) +[.AJ$28]*[.$Z$5]*MAGNET([.AJ$24]+[.BB31]) +[.AK$28]*[.$Z$5]*MAGNET([.AK$24]+[.BB31]) +[.AL$28]*[.$Z$5]*MAGNET([.AL$24]+[.BB31]) +[.AM$28]*[.$Z$5]*MAGNET([.AM$24]+[.BB31]) +[.AN$28]*[.$Z$5]*MAGNET([.AN$24]+[.BB31]) +[.AO$28]*[.$Z$5]*MAGNET([.AO$24]+[.BB31]) +[.AP$28]*[.$Z$5]*MAGNET([.AP$24]+[.$BB31])&#10;+[.AQ$28]*[.$Z$5]*MAGNET([.AQ$24]+[.$BB31])&#10;+[.AR$28]*[.$Z$5]*MAGNET([.AR$24]+[.$BB31])&#10;+[.AS$28]*[.$Z$5]*MAGNET([.AS$24]+[.$BB31])&#10;+[.AT$28]*[.$Z$5]*MAGNET([.AT$24]+[.$BB31])&#10;+[.AU$28]*[.$Z$5]*MAGNET([.AU$24]+[.$BB31])&#10;+[.AV$28]*[.$Z$5]*MAGNET([.AV$24]+[.$BB31])&#10;+[.AW$28]*[.$Z$5]*MAGNET([.AW$24]+[.$BB31])&#10;+[.AX$28]*[.$Z$5]*MAGNET([.AX$24]+[.$BB31])&#10;+[.AY$28]*[.$Z$5]*MAGNET([.AY$24]+[.$BB31]) +RAND()*[.$BF$13]" office:value-type="float" office:value="-12.7546573569278" calcext:value-type="float">
            <text:p>-12.7546573569278</text:p>
          </table:table-cell>
          <table:table-cell table:style-name="ce71" table:formula="of:=[.E$29]*[.$Z$5]*MAGNET([.E$24]+[.$BB31])+[.F$29]*[.$Z$5]*MAGNET([.F$24]+[.$BB31])+[.G$29]*[.$Z$5]*MAGNET([.G$24]+[.$BB31])+[.H$29]*[.$Z$5]*MAGNET([.H$24]+[.$BB31])+[.I$29]*[.$Z$5]*MAGNET([.I$24]+[.$BB31])+[.J$29]*[.$Z$5]*MAGNET([.J$24]+[.$BB31])+[.K$29]*[.$Z$5]*MAGNET([.K$24]+[.$BB31])+[.L$29]*[.$Z$5]*MAGNET([.L$24]+[.$BB31])+[.M$29]*[.$Z$5]*MAGNET([.M$24]+[.$BB31])+[.N$29]*[.$Z$5]*MAGNET([.N$24]+[.$BB31])+[.O$29]*[.$Z$5]*MAGNET([.O$24]+[.$BB31])+[.P$29]*[.$Z$5]*MAGNET([.P$24]+[.$BB31])+[.Q$29]*[.$Z$5]*MAGNET([.Q$24]+[.$BB31])+[.R$29]*[.$Z$5]*MAGNET([.R$24]+[.$BB31])+[.S$29]*[.$Z$5]*MAGNET([.S$24]+[.$BB31])+[.T$29]*[.$Z$5]*MAGNET([.T$24]+[.$BB31])+[.U$29]*[.$Z$5]*MAGNET([.U$24]+[.$BB31])+[.V$29]*[.$Z$5]*MAGNET([.V$24]+[.$BB31])+[.W$29]*[.$Z$5]*MAGNET([.W$24]+[.$BB31])+[.X$29]*[.$Z$5]*MAGNET([.X$24]+[.$BB31])+[.Y$29]*[.$Z$5]*MAGNET([.Y$24]+[.$BB31])+[.Z$29]*[.$Z$5]*MAGNET([.Z$24]+[.$BB31])+[.AA$29]*[.$Z$5]*MAGNET([.AA$24]+[.$BB31])+[.AB$29]*[.$Z$5]*MAGNET([.AB$24]+[.$BB31])+[.AC$29]*[.$Z$5]*MAGNET([.AC$24]+[.$BB31])+[.AD$29]*[.$Z$5]*MAGNET([.AD$24]+[.$BB31])+[.AE$29]*[.$Z$5]*MAGNET([.AE$24]+[.$BB31])+[.AF$29]*[.$Z$5]*MAGNET([.AF$24]+[.$BB31])+[.AG$29]*[.$Z$5]*MAGNET([.AG$24]+[.$BB31])+[.D$29]*[.$Z$5]*MAGNET([.D$24]+[.$BB31])+[.AH$29]*[.$Z$5]*MAGNET([.AH$24]+[.BB31]) +[.AI$29]*[.$Z$5]*MAGNET([.AI$24]+[.BB31]) +[.AJ$29]*[.$Z$5]*MAGNET([.AJ$24]+[.BB31]) +[.AK$29]*[.$Z$5]*MAGNET([.AK$24]+[.BB31]) +[.AL$29]*[.$Z$5]*MAGNET([.AL$24]+[.BB31]) +[.AM$29]*[.$Z$5]*MAGNET([.AM$24]+[.BB31]) +[.AN$29]*[.$Z$5]*MAGNET([.AN$24]+[.BB31]) +[.AO$29]*[.$Z$5]*MAGNET([.AO$24]+[.BB31]) +[.AP$29]*[.$Z$5]*MAGNET([.AP$24]+[.$BB31])&#10;+[.AQ$29]*[.$Z$5]*MAGNET([.AQ$24]+[.$BB31])&#10;+[.AR$29]*[.$Z$5]*MAGNET([.AR$24]+[.$BB31])&#10;+[.AS$29]*[.$Z$5]*MAGNET([.AS$24]+[.$BB31])&#10;+[.AT$29]*[.$Z$5]*MAGNET([.AT$24]+[.$BB31])&#10;+[.AU$29]*[.$Z$5]*MAGNET([.AU$24]+[.$BB31])&#10;+[.AV$29]*[.$Z$5]*MAGNET([.AV$24]+[.$BB31])&#10;+[.AW$29]*[.$Z$5]*MAGNET([.AW$24]+[.$BB31])&#10;+[.AX$29]*[.$Z$5]*MAGNET([.AX$24]+[.$BB31])&#10;+[.AY$29]*[.$Z$5]*MAGNET([.AY$24]+[.$BB31]) +RAND()*[.$BG$13]" office:value-type="float" office:value="41.5833242012244" calcext:value-type="float">
            <text:p>41.5833242012244</text:p>
          </table:table-cell>
          <table:table-cell table:style-name="ce71" table:formula="of:=[.E$30]*[.$Z$5]*MAGNET([.E$24]+[.$BB31])+[.F$30]*[.$Z$5]*MAGNET([.F$24]+[.$BB31])+[.G$30]*[.$Z$5]*MAGNET([.G$24]+[.$BB31])+[.H$30]*[.$Z$5]*MAGNET([.H$24]+[.$BB31])+[.I$30]*[.$Z$5]*MAGNET([.I$24]+[.$BB31])+[.J$30]*[.$Z$5]*MAGNET([.J$24]+[.$BB31])+[.K$30]*[.$Z$5]*MAGNET([.K$24]+[.$BB31])+[.L$30]*[.$Z$5]*MAGNET([.L$24]+[.$BB31])+[.M$30]*[.$Z$5]*MAGNET([.M$24]+[.$BB31])+[.N$30]*[.$Z$5]*MAGNET([.N$24]+[.$BB31])+[.O$30]*[.$Z$5]*MAGNET([.O$24]+[.$BB31])+[.P$30]*[.$Z$5]*MAGNET([.P$24]+[.$BB31])+[.Q$30]*[.$Z$5]*MAGNET([.Q$24]+[.$BB31])+[.R$30]*[.$Z$5]*MAGNET([.R$24]+[.$BB31])+[.S$30]*[.$Z$5]*MAGNET([.S$24]+[.$BB31])+[.T$30]*[.$Z$5]*MAGNET([.T$24]+[.$BB31])+[.U$30]*[.$Z$5]*MAGNET([.U$24]+[.$BB31])+[.V$30]*[.$Z$5]*MAGNET([.V$24]+[.$BB31])+[.W$30]*[.$Z$5]*MAGNET([.W$24]+[.$BB31])+[.X$30]*[.$Z$5]*MAGNET([.X$24]+[.$BB31])+[.Y$30]*[.$Z$5]*MAGNET([.Y$24]+[.$BB31])+[.Z$30]*[.$Z$5]*MAGNET([.Z$24]+[.$BB31])+[.AA$30]*[.$Z$5]*MAGNET([.AA$24]+[.$BB31])+[.AB$30]*[.$Z$5]*MAGNET([.AB$24]+[.$BB31])+[.AC$30]*[.$Z$5]*MAGNET([.AC$24]+[.$BB31])+[.AD$30]*[.$Z$5]*MAGNET([.AD$24]+[.$BB31])+[.AE$30]*[.$Z$5]*MAGNET([.AE$24]+[.$BB31])+[.AF$30]*[.$Z$5]*MAGNET([.AF$24]+[.$BB31])+[.AG$30]*[.$Z$5]*MAGNET([.AG$24]+[.$BB31])+[.D$30]*[.$Z$5]*MAGNET([.D$24]+[.$BB31])+[.AH$30]*[.$Z$5]*MAGNET([.AH$24]+[.BB31]) +[.AI$30]*[.$Z$5]*MAGNET([.AI$24]+[.BB31]) +[.AJ$30]*[.$Z$5]*MAGNET([.AJ$24]+[.BB31]) +[.AK$30]*[.$Z$5]*MAGNET([.AK$24]+[.BB31]) +[.AL$30]*[.$Z$5]*MAGNET([.AL$24]+[.BB31]) +[.AM$30]*[.$Z$5]*MAGNET([.AM$24]+[.BB31]) +[.AN$30]*[.$Z$5]*MAGNET([.AN$24]+[.BB31]) +[.AO$30]*[.$Z$5]*MAGNET([.AO$24]+[.BB31]) +[.AP$30]*[.$Z$5]*MAGNET([.AP$24]+[.$BB31])&#10;+[.AQ$30]*[.$Z$5]*MAGNET([.AQ$24]+[.$BB31])&#10;+[.AR$30]*[.$Z$5]*MAGNET([.AR$24]+[.$BB31])&#10;+[.AS$30]*[.$Z$5]*MAGNET([.AS$24]+[.$BB31])&#10;+[.AT$30]*[.$Z$5]*MAGNET([.AT$24]+[.$BB31])&#10;+[.AU$30]*[.$Z$5]*MAGNET([.AU$24]+[.$BB31])&#10;+[.AV$30]*[.$Z$5]*MAGNET([.AV$24]+[.$BB31])&#10;+[.AW$30]*[.$Z$5]*MAGNET([.AW$24]+[.$BB31])&#10;+[.AX$30]*[.$Z$5]*MAGNET([.AX$24]+[.$BB31])&#10;+[.AY$30]*[.$Z$5]*MAGNET([.AY$24]+[.$BB31]) +RAND()*[.$BH$13]" office:value-type="float" office:value="0" calcext:value-type="float">
            <text:p>0</text:p>
          </table:table-cell>
          <table:table-cell table:style-name="ce71" table:formula="of:=[.E$31]*[.$Z$5]*MAGNET([.E$24]+[.$BB31])+[.F$31]*[.$Z$5]*MAGNET([.F$24]+[.$BB31])+[.G$31]*[.$Z$5]*MAGNET([.G$24]+[.$BB31])+[.H$31]*[.$Z$5]*MAGNET([.H$24]+[.$BB31])+[.I$31]*[.$Z$5]*MAGNET([.I$24]+[.$BB31])+[.J$31]*[.$Z$5]*MAGNET([.J$24]+[.$BB31])+[.K$31]*[.$Z$5]*MAGNET([.K$24]+[.$BB31])+[.L$31]*[.$Z$5]*MAGNET([.L$24]+[.$BB31])+[.M$31]*[.$Z$5]*MAGNET([.M$24]+[.$BB31])+[.N$31]*[.$Z$5]*MAGNET([.N$24]+[.$BB31])+[.O$31]*[.$Z$5]*MAGNET([.O$24]+[.$BB31])+[.P$31]*[.$Z$5]*MAGNET([.P$24]+[.$BB31])+[.Q$31]*[.$Z$5]*MAGNET([.Q$24]+[.$BB31])+[.R$31]*[.$Z$5]*MAGNET([.R$24]+[.$BB31])+[.S$31]*[.$Z$5]*MAGNET([.S$24]+[.$BB31])+[.T$31]*[.$Z$5]*MAGNET([.T$24]+[.$BB31])+[.U$31]*[.$Z$5]*MAGNET([.U$24]+[.$BB31])+[.V$31]*[.$Z$5]*MAGNET([.V$24]+[.$BB31])+[.W$31]*[.$Z$5]*MAGNET([.W$24]+[.$BB31])+[.X$31]*[.$Z$5]*MAGNET([.X$24]+[.$BB31])+[.Y$31]*[.$Z$5]*MAGNET([.Y$24]+[.$BB31])+[.Z$31]*[.$Z$5]*MAGNET([.Z$24]+[.$BB31])+[.AA$31]*[.$Z$5]*MAGNET([.AA$24]+[.$BB31])+[.AB$31]*[.$Z$5]*MAGNET([.AB$24]+[.$BB31])+[.AC$31]*[.$Z$5]*MAGNET([.AC$24]+[.$BB31])+[.AD$31]*[.$Z$5]*MAGNET([.AD$24]+[.$BB31])+[.AE$31]*[.$Z$5]*MAGNET([.AE$24]+[.$BB31])+[.AF$31]*[.$Z$5]*MAGNET([.AF$24]+[.$BB31])+[.AG$31]*[.$Z$5]*MAGNET([.AG$24]+[.$BB31])+[.D$31]*[.$Z$5]*MAGNET([.D$24]+[.$BB31])+[.AH$31]*[.$Z$5]*MAGNET([.AH$24]+[.BB31]) +[.AI$31]*[.$Z$5]*MAGNET([.AI$24]+[.BB31]) +[.AJ$31]*[.$Z$5]*MAGNET([.AJ$24]+[.BB31]) +[.AK$31]*[.$Z$5]*MAGNET([.AK$24]+[.BB31]) +[.AL$31]*[.$Z$5]*MAGNET([.AL$24]+[.BB31]) +[.AM$31]*[.$Z$5]*MAGNET([.AM$24]+[.BB31]) +[.AN$31]*[.$Z$5]*MAGNET([.AN$24]+[.BB31]) +[.AO$31]*[.$Z$5]*MAGNET([.AO$24]+[.BB31]) +[.AP$31]*[.$Z$5]*MAGNET([.AP$24]+[.$BB31])&#10;+[.AQ$31]*[.$Z$5]*MAGNET([.AQ$24]+[.$BB31])&#10;+[.AR$31]*[.$Z$5]*MAGNET([.AR$24]+[.$BB31])&#10;+[.AS$31]*[.$Z$5]*MAGNET([.AS$24]+[.$BB31])&#10;+[.AT$31]*[.$Z$5]*MAGNET([.AT$24]+[.$BB31])&#10;+[.AU$31]*[.$Z$5]*MAGNET([.AU$24]+[.$BB31])&#10;+[.AV$31]*[.$Z$5]*MAGNET([.AV$24]+[.$BB31])&#10;+[.AW$31]*[.$Z$5]*MAGNET([.AW$24]+[.$BB31])&#10;+[.AX$31]*[.$Z$5]*MAGNET([.AX$24]+[.$BB31])&#10;+[.AY$31]*[.$Z$5]*MAGNET([.AY$24]+[.$BB31]) +RAND()*[.$BI$13]" office:value-type="float" office:value="0" calcext:value-type="float">
            <text:p>0</text:p>
          </table:table-cell>
          <table:table-cell table:style-name="ce71" table:formula="of:=[.E$32]*[.$Z$5]*MAGNET([.E$24]+[.$BB31])+[.F$32]*[.$Z$5]*MAGNET([.F$24]+[.$BB31])+[.G$32]*[.$Z$5]*MAGNET([.G$24]+[.$BB31])+[.H$32]*[.$Z$5]*MAGNET([.H$24]+[.$BB31])+[.I$32]*[.$Z$5]*MAGNET([.I$24]+[.$BB31])+[.J$32]*[.$Z$5]*MAGNET([.J$24]+[.$BB31])+[.K$32]*[.$Z$5]*MAGNET([.K$24]+[.$BB31])+[.L$32]*[.$Z$5]*MAGNET([.L$24]+[.$BB31])+[.M$32]*[.$Z$5]*MAGNET([.M$24]+[.$BB31])+[.N$32]*[.$Z$5]*MAGNET([.N$24]+[.$BB31])+[.O$32]*[.$Z$5]*MAGNET([.O$24]+[.$BB31])+[.P$32]*[.$Z$5]*MAGNET([.P$24]+[.$BB31])+[.Q$32]*[.$Z$5]*MAGNET([.Q$24]+[.$BB31])+[.R$32]*[.$Z$5]*MAGNET([.R$24]+[.$BB31])+[.S$32]*[.$Z$5]*MAGNET([.S$24]+[.$BB31])+[.T$32]*[.$Z$5]*MAGNET([.T$24]+[.$BB31])+[.U$32]*[.$Z$5]*MAGNET([.U$24]+[.$BB31])+[.V$32]*[.$Z$5]*MAGNET([.V$24]+[.$BB31])+[.W$32]*[.$Z$5]*MAGNET([.W$24]+[.$BB31])+[.X$32]*[.$Z$5]*MAGNET([.X$24]+[.$BB31])+[.Y$32]*[.$Z$5]*MAGNET([.Y$24]+[.$BB31])+[.Z$32]*[.$Z$5]*MAGNET([.Z$24]+[.$BB31])+[.AA$32]*[.$Z$5]*MAGNET([.AA$24]+[.$BB31])+[.AB$32]*[.$Z$5]*MAGNET([.AB$24]+[.$BB31])+[.AC$32]*[.$Z$5]*MAGNET([.AC$24]+[.$BB31])+[.AD$32]*[.$Z$5]*MAGNET([.AD$24]+[.$BB31])+[.AE$32]*[.$Z$5]*MAGNET([.AE$24]+[.$BB31])+[.AF$32]*[.$Z$5]*MAGNET([.AF$24]+[.$BB31])+[.AG$32]*[.$Z$5]*MAGNET([.AG$24]+[.$BB31])+[.D$32]*[.$Z$5]*MAGNET([.D$24]+[.$BB31])+[.AH$32]*[.$Z$5]*MAGNET([.AH$24]+[.BB31]) +[.AI$32]*[.$Z$5]*MAGNET([.AI$24]+[.BB31]) +[.AJ$32]*[.$Z$5]*MAGNET([.AJ$24]+[.BB31]) +[.AK$32]*[.$Z$5]*MAGNET([.AK$24]+[.BB31]) +[.AL$32]*[.$Z$5]*MAGNET([.AL$24]+[.BB31]) +[.AM$32]*[.$Z$5]*MAGNET([.AM$24]+[.BB31]) +[.AN$32]*[.$Z$5]*MAGNET([.AN$24]+[.BB31]) +[.AO$32]*[.$Z$5]*MAGNET([.AO$24]+[.BB31]) +[.AP$32]*[.$Z$5]*MAGNET([.AP$24]+[.$BB31])&#10;+[.AQ$32]*[.$Z$5]*MAGNET([.AQ$24]+[.$BB31])&#10;+[.AR$32]*[.$Z$5]*MAGNET([.AR$24]+[.$BB31])&#10;+[.AS$32]*[.$Z$5]*MAGNET([.AS$24]+[.$BB31])&#10;+[.AT$32]*[.$Z$5]*MAGNET([.AT$24]+[.$BB31])&#10;+[.AU$32]*[.$Z$5]*MAGNET([.AU$24]+[.$BB31])&#10;+[.AV$32]*[.$Z$5]*MAGNET([.AV$24]+[.$BB31])&#10;+[.AW$32]*[.$Z$5]*MAGNET([.AW$24]+[.$BB31])&#10;+[.AX$32]*[.$Z$5]*MAGNET([.AX$24]+[.$BB31])&#10;+[.AY$32]*[.$Z$5]*MAGNET([.AY$24]+[.$BB3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formula="of:=[.D51]-[.D52]" office:value-type="float" office:value="0" calcext:value-type="float">
            <text:p>0</text:p>
          </table:table-cell>
          <table:table-cell table:formula="of:=[.E51]-[.E52]" office:value-type="float" office:value="0" calcext:value-type="float">
            <text:p>0</text:p>
          </table:table-cell>
          <table:table-cell table:formula="of:=[.F51]-[.F52]" office:value-type="float" office:value="0" calcext:value-type="float">
            <text:p>0</text:p>
          </table:table-cell>
          <table:table-cell table:formula="of:=[.G51]-[.G52]" office:value-type="float" office:value="0" calcext:value-type="float">
            <text:p>0</text:p>
          </table:table-cell>
          <table:table-cell table:formula="of:=[.H51]-[.H52]" office:value-type="float" office:value="0" calcext:value-type="float">
            <text:p>0</text:p>
          </table:table-cell>
          <table:table-cell table:formula="of:=[.I51]-[.I52]" office:value-type="float" office:value="0" calcext:value-type="float">
            <text:p>0</text:p>
          </table:table-cell>
          <table:table-cell table:formula="of:=[.J51]-[.J52]" office:value-type="float" office:value="0" calcext:value-type="float">
            <text:p>0</text:p>
          </table:table-cell>
          <table:table-cell table:formula="of:=[.K51]-[.K52]" office:value-type="float" office:value="0" calcext:value-type="float">
            <text:p>0</text:p>
          </table:table-cell>
          <table:table-cell table:formula="of:=[.L51]-[.L52]" office:value-type="float" office:value="0" calcext:value-type="float">
            <text:p>0</text:p>
          </table:table-cell>
          <table:table-cell table:formula="of:=[.M51]-[.M52]" office:value-type="float" office:value="0" calcext:value-type="float">
            <text:p>0</text:p>
          </table:table-cell>
          <table:table-cell table:formula="of:=[.N51]-[.N52]" office:value-type="float" office:value="0" calcext:value-type="float">
            <text:p>0</text:p>
          </table:table-cell>
          <table:table-cell table:formula="of:=[.O51]-[.O52]" office:value-type="float" office:value="0" calcext:value-type="float">
            <text:p>0</text:p>
          </table:table-cell>
          <table:table-cell table:formula="of:=[.P51]-[.P52]" office:value-type="float" office:value="0" calcext:value-type="float">
            <text:p>0</text:p>
          </table:table-cell>
          <table:table-cell table:formula="of:=[.Q51]-[.Q52]" office:value-type="float" office:value="0" calcext:value-type="float">
            <text:p>0</text:p>
          </table:table-cell>
          <table:table-cell table:formula="of:=[.R51]-[.R52]" office:value-type="float" office:value="0" calcext:value-type="float">
            <text:p>0</text:p>
          </table:table-cell>
          <table:table-cell table:formula="of:=[.S51]-[.S52]" office:value-type="float" office:value="0" calcext:value-type="float">
            <text:p>0</text:p>
          </table:table-cell>
          <table:table-cell table:formula="of:=[.T51]-[.T52]" office:value-type="float" office:value="0" calcext:value-type="float">
            <text:p>0</text:p>
          </table:table-cell>
          <table:table-cell table:formula="of:=[.U51]-[.U52]" office:value-type="float" office:value="0" calcext:value-type="float">
            <text:p>0</text:p>
          </table:table-cell>
          <table:table-cell table:formula="of:=[.V51]-[.V52]" office:value-type="float" office:value="0" calcext:value-type="float">
            <text:p>0</text:p>
          </table:table-cell>
          <table:table-cell table:formula="of:=[.W51]-[.W52]" office:value-type="float" office:value="0" calcext:value-type="float">
            <text:p>0</text:p>
          </table:table-cell>
          <table:table-cell table:formula="of:=[.X51]-[.X52]" office:value-type="float" office:value="0" calcext:value-type="float">
            <text:p>0</text:p>
          </table:table-cell>
          <table:table-cell table:formula="of:=[.Y51]-[.Y52]" office:value-type="float" office:value="0" calcext:value-type="float">
            <text:p>0</text:p>
          </table:table-cell>
          <table:table-cell table:formula="of:=[.Z51]-[.Z52]" office:value-type="float" office:value="0" calcext:value-type="float">
            <text:p>0</text:p>
          </table:table-cell>
          <table:table-cell table:formula="of:=[.AA51]-[.AA52]" office:value-type="float" office:value="0" calcext:value-type="float">
            <text:p>0</text:p>
          </table:table-cell>
          <table:table-cell table:formula="of:=[.AB51]-[.AB52]" office:value-type="float" office:value="0" calcext:value-type="float">
            <text:p>0</text:p>
          </table:table-cell>
          <table:table-cell table:formula="of:=[.AC51]-[.AC52]" office:value-type="float" office:value="0" calcext:value-type="float">
            <text:p>0</text:p>
          </table:table-cell>
          <table:table-cell table:formula="of:=[.AD51]-[.AD52]" office:value-type="float" office:value="0" calcext:value-type="float">
            <text:p>0</text:p>
          </table:table-cell>
          <table:table-cell table:formula="of:=[.AE51]-[.AE52]" office:value-type="float" office:value="0" calcext:value-type="float">
            <text:p>0</text:p>
          </table:table-cell>
          <table:table-cell table:formula="of:=[.AF51]-[.AF52]" office:value-type="float" office:value="0" calcext:value-type="float">
            <text:p>0</text:p>
          </table:table-cell>
          <table:table-cell table:formula="of:=[.AG51]-[.AG52]" office:value-type="float" office:value="0" calcext:value-type="float">
            <text:p>0</text:p>
          </table:table-cell>
          <table:table-cell table:formula="of:=[.AH51]-[.AH52]" office:value-type="float" office:value="0" calcext:value-type="float">
            <text:p>0</text:p>
          </table:table-cell>
          <table:table-cell table:formula="of:=[.AI51]-[.AI52]" office:value-type="float" office:value="0" calcext:value-type="float">
            <text:p>0</text:p>
          </table:table-cell>
          <table:table-cell table:formula="of:=[.AJ51]-[.AJ52]" office:value-type="float" office:value="0" calcext:value-type="float">
            <text:p>0</text:p>
          </table:table-cell>
          <table:table-cell table:formula="of:=[.AK51]-[.AK52]" office:value-type="float" office:value="0" calcext:value-type="float">
            <text:p>0</text:p>
          </table:table-cell>
          <table:table-cell table:formula="of:=[.AL51]-[.AL52]" office:value-type="float" office:value="0" calcext:value-type="float">
            <text:p>0</text:p>
          </table:table-cell>
          <table:table-cell table:formula="of:=[.AM51]-[.AM52]" office:value-type="float" office:value="0" calcext:value-type="float">
            <text:p>0</text:p>
          </table:table-cell>
          <table:table-cell table:formula="of:=[.AN51]-[.AN52]" office:value-type="float" office:value="0" calcext:value-type="float">
            <text:p>0</text:p>
          </table:table-cell>
          <table:table-cell table:formula="of:=[.AO51]-[.AO52]" office:value-type="float" office:value="0" calcext:value-type="float">
            <text:p>0</text:p>
          </table:table-cell>
          <table:table-cell table:formula="of:=[.AP51]-[.AP52]" office:value-type="float" office:value="0" calcext:value-type="float">
            <text:p>0</text:p>
          </table:table-cell>
          <table:table-cell table:formula="of:=[.AQ51]-[.AQ52]" office:value-type="float" office:value="0" calcext:value-type="float">
            <text:p>0</text:p>
          </table:table-cell>
          <table:table-cell table:formula="of:=[.AR51]-[.AR52]" office:value-type="float" office:value="0" calcext:value-type="float">
            <text:p>0</text:p>
          </table:table-cell>
          <table:table-cell table:formula="of:=[.AS51]-[.AS52]" office:value-type="float" office:value="0" calcext:value-type="float">
            <text:p>0</text:p>
          </table:table-cell>
          <table:table-cell table:formula="of:=[.AT51]-[.AT52]" office:value-type="float" office:value="0" calcext:value-type="float">
            <text:p>0</text:p>
          </table:table-cell>
          <table:table-cell table:formula="of:=[.AU51]-[.AU52]" office:value-type="float" office:value="0" calcext:value-type="float">
            <text:p>0</text:p>
          </table:table-cell>
          <table:table-cell table:formula="of:=[.AV51]-[.AV52]" office:value-type="float" office:value="0" calcext:value-type="float">
            <text:p>0</text:p>
          </table:table-cell>
          <table:table-cell table:formula="of:=[.AW51]-[.AW52]" office:value-type="float" office:value="0" calcext:value-type="float">
            <text:p>0</text:p>
          </table:table-cell>
          <table:table-cell table:formula="of:=[.AX51]-[.AX52]" office:value-type="float" office:value="0" calcext:value-type="float">
            <text:p>0</text:p>
          </table:table-cell>
          <table:table-cell table:formula="of:=[.AY51]-[.AY52]" office:value-type="float" office:value="0" calcext:value-type="float">
            <text:p>0</text:p>
          </table:table-cell>
          <table:table-cell/>
          <table:table-cell table:formula="of:=[.BA31]+0.002" office:value-type="float" office:value="0.034" calcext:value-type="float">
            <text:p>0.034</text:p>
          </table:table-cell>
          <table:table-cell table:formula="of:=[.BA32]*[.$D$6]" office:value-type="float" office:value="1.70902640355285" calcext:value-type="float">
            <text:p>1.709</text:p>
          </table:table-cell>
          <table:table-cell table:formula="of:=[.D$25]*[.$Z$5]*MAGNET([.D$24]+[.BB32])+[.E$25]*[.$Z$5]*MAGNET([.E$24]+[.BB32])+[.F$25]*[.$Z$5]*MAGNET([.F$24]+[.BB32])+[.G$25]*[.$Z$5]*MAGNET([.G$24]+[.BB32])+[.H$25]*[.$Z$5]*MAGNET([.H$24]+[.BB32])+[.I$25]*[.$Z$5]*MAGNET([.I$24]+[.BB32])+[.J$25]*[.$Z$5]*MAGNET([.J$24]+[.BB32])+[.K$25]*[.$Z$5]*MAGNET([.K$24]+[.BB32])+[.L$25]*[.$Z$5]*MAGNET([.L$24]+[.BB32])+[.M$25]*[.$Z$5]*MAGNET([.M$24]+[.BB32])+[.N$25]*[.$Z$5]*MAGNET([.N$24]+[.BB32])+[.O$25]*[.$Z$5]*MAGNET([.O$24]+[.BB32])+[.P$25]*[.$Z$5]*MAGNET([.P$24]+[.BB32])+[.Q$25]*[.$Z$5]*MAGNET([.Q$24]+[.BB32])+[.R$25]*[.$Z$5]*MAGNET([.R$24]+[.BB32])+[.S$25]*[.$Z$5]*MAGNET([.S$24]+[.BB32])+[.T$25]*[.$Z$5]*MAGNET([.T$24]+[.BB32])+[.U$25]*[.$Z$5]*MAGNET([.U$24]+[.BB32])+[.V$25]*[.$Z$5]*MAGNET([.V$24]+[.BB32])+[.W$25]*[.$Z$5]*MAGNET([.W$24]+[.BB32])+[.X$25]*[.$Z$5]*MAGNET([.X$24]+[.BB32])+[.Y$25]*[.$Z$5]*MAGNET([.Y$24]+[.BB32])+[.Z$25]*[.$Z$5]*MAGNET([.Z$24]+[.BB32])+[.AA$25]*[.$Z$5]*MAGNET([.AA$24]+[.BB32])+[.AB$25]*[.$Z$5]*MAGNET([.AB$24]+[.BB32])+[.AC$25]*[.$Z$5]*MAGNET([.AC$24]+[.BB32])+[.AD$25]*[.$Z$5]*MAGNET([.AD$24]+[.BB32])+[.AE$25]*[.$Z$5]*MAGNET([.AE$24]+[.BB32])+[.AF$25]*[.$Z$5]*MAGNET([.AF$24]+[.BB32])+[.AG$25]*[.$Z$5]*MAGNET([.AG$24]+[.BB32])+[.AH$25]*[.$Z$5]*MAGNET([.AH$24]+[.BB32]) +[.AI$25]*[.$Z$5]*MAGNET([.AI$24]+[.BB32]) +[.AJ$25]*[.$Z$5]*MAGNET([.AJ$24]+[.BB32]) +[.AK$25]*[.$Z$5]*MAGNET([.AK$24]+[.BB32]) +[.AL$25]*[.$Z$5]*MAGNET([.AL$24]+[.BB32]) +[.AM$25]*[.$Z$5]*MAGNET([.AM$24]+[.BB32]) +[.AN$25]*[.$Z$5]*MAGNET([.AN$24]+[.BB32]) +[.AO$25]*[.$Z$5]*MAGNET([.AO$24]+[.BB32])+RAND()*[.$BC$13]+[.AP$25]*[.$Z$5]*MAGNET([.AP$24]+[.BB32])&#10;+[.AQ$25]*[.$Z$5]*MAGNET([.AQ$24]+[.BB32])&#10;+[.AR$25]*[.$Z$5]*MAGNET([.AR$24]+[.BB32])&#10;+[.AS$25]*[.$Z$5]*MAGNET([.AS$24]+[.BB32])&#10;+[.AT$25]*[.$Z$5]*MAGNET([.AT$24]+[.BB32])&#10;+[.AU$25]*[.$Z$5]*MAGNET([.AU$24]+[.BB32])&#10;+[.AV$25]*[.$Z$5]*MAGNET([.AV$24]+[.BB32])&#10;+[.AW$25]*[.$Z$5]*MAGNET([.AW$24]+[.BB32])&#10;+[.AX$25]*[.$Z$5]*MAGNET([.AX$24]+[.BB32])&#10;+[.AY$25]*[.$Z$5]*MAGNET([.AY$24]+[.BB32])" office:value-type="float" office:value="115.986885100608" calcext:value-type="float">
            <text:p>115.99</text:p>
          </table:table-cell>
          <table:table-cell table:style-name="ce70" table:formula="of:=[.E$26]*[.$Z$5]*MAGNET([.E$24]+[.$BB32])+[.F$26]*[.$Z$5]*MAGNET([.F$24]+[.$BB32])+[.G$26]*[.$Z$5]*MAGNET([.G$24]+[.$BB32])+[.H$26]*[.$Z$5]*MAGNET([.H$24]+[.$BB32])+[.I$26]*[.$Z$5]*MAGNET([.I$24]+[.$BB32])+[.J$26]*[.$Z$5]*MAGNET([.J$24]+[.$BB32])+[.K$26]*[.$Z$5]*MAGNET([.K$24]+[.$BB32])+[.L$26]*[.$Z$5]*MAGNET([.L$24]+[.$BB32])+[.M$26]*[.$Z$5]*MAGNET([.M$24]+[.$BB32])+[.N$26]*[.$Z$5]*MAGNET([.N$24]+[.$BB32])+[.O$26]*[.$Z$5]*MAGNET([.O$24]+[.$BB32])+[.P$26]*[.$Z$5]*MAGNET([.P$24]+[.$BB32])+[.Q$26]*[.$Z$5]*MAGNET([.Q$24]+[.$BB32])+[.R$26]*[.$Z$5]*MAGNET([.R$24]+[.$BB32])+[.S$26]*[.$Z$5]*MAGNET([.S$24]+[.$BB32])+[.T$26]*[.$Z$5]*MAGNET([.T$24]+[.$BB32])+[.U$26]*[.$Z$5]*MAGNET([.U$24]+[.$BB32])+[.V$26]*[.$Z$5]*MAGNET([.V$24]+[.$BB32])+[.W$26]*[.$Z$5]*MAGNET([.W$24]+[.$BB32])+[.X$26]*[.$Z$5]*MAGNET([.X$24]+[.$BB32])+[.Y$26]*[.$Z$5]*MAGNET([.Y$24]+[.$BB32])+[.Z$26]*[.$Z$5]*MAGNET([.Z$24]+[.$BB32])+[.AA$26]*[.$Z$5]*MAGNET([.AA$24]+[.$BB32])+[.AB$26]*[.$Z$5]*MAGNET([.AB$24]+[.$BB32])+[.AC$26]*[.$Z$5]*MAGNET([.AC$24]+[.$BB32])+[.AD$26]*[.$Z$5]*MAGNET([.AD$24]+[.$BB32])+[.AE$26]*[.$Z$5]*MAGNET([.AE$24]+[.$BB32])+[.AF$26]*[.$Z$5]*MAGNET([.AF$24]+[.$BB32])+[.AG$26]*[.$Z$5]*MAGNET([.AG$24]+[.$BB32])+[.D$26]*[.$Z$5]*MAGNET([.D$24]+[.$BB32])+[.AH$26]*[.$Z$5]*MAGNET([.AH$24]+[.BB32]) +[.AI$26]*[.$Z$5]*MAGNET([.AI$24]+[.BB32]) +[.AJ$26]*[.$Z$5]*MAGNET([.AJ$24]+[.BB32]) +[.AK$26]*[.$Z$5]*MAGNET([.AK$24]+[.BB32]) +[.AL$26]*[.$Z$5]*MAGNET([.AL$24]+[.BB32]) +[.AM$26]*[.$Z$5]*MAGNET([.AM$24]+[.BB32]) +[.AN$26]*[.$Z$5]*MAGNET([.AN$24]+[.BB32]) +[.AO$26]*[.$Z$5]*MAGNET([.AO$24]+[.BB32]) +[.AP$26]*[.$Z$5]*MAGNET([.AP$24]+[.$BB32])&#10;+[.AQ$26]*[.$Z$5]*MAGNET([.AQ$24]+[.$BB32])&#10;+[.AR$26]*[.$Z$5]*MAGNET([.AR$24]+[.$BB32])&#10;+[.AS$26]*[.$Z$5]*MAGNET([.AS$24]+[.$BB32])&#10;+[.AT$26]*[.$Z$5]*MAGNET([.AT$24]+[.$BB32])&#10;+[.AU$26]*[.$Z$5]*MAGNET([.AU$24]+[.$BB32])&#10;+[.AV$26]*[.$Z$5]*MAGNET([.AV$24]+[.$BB32])&#10;+[.AW$26]*[.$Z$5]*MAGNET([.AW$24]+[.$BB32])&#10;+[.AX$26]*[.$Z$5]*MAGNET([.AX$24]+[.$BB32])&#10;+[.AY$26]*[.$Z$5]*MAGNET([.AY$24]+[.$BB32]) +RAND()*[.$BD$13]" office:value-type="float" office:value="-32.2425533673663" calcext:value-type="float">
            <text:p>-32.24</text:p>
          </table:table-cell>
          <table:table-cell table:style-name="ce71" table:formula="of:=[.E$27]*[.$Z$5]*MAGNET([.E$24]+[.$BB32])+[.F$27]*[.$Z$5]*MAGNET([.F$24]+[.$BB32])+[.G$27]*[.$Z$5]*MAGNET([.G$24]+[.$BB32])+[.H$27]*[.$Z$5]*MAGNET([.H$24]+[.$BB32])+[.I$27]*[.$Z$5]*MAGNET([.I$24]+[.$BB32])+[.J$27]*[.$Z$5]*MAGNET([.J$24]+[.$BB32])+[.K$27]*[.$Z$5]*MAGNET([.K$24]+[.$BB32])+[.L$27]*[.$Z$5]*MAGNET([.L$24]+[.$BB32])+[.M$27]*[.$Z$5]*MAGNET([.M$24]+[.$BB32])+[.N$27]*[.$Z$5]*MAGNET([.N$24]+[.$BB32])+[.O$27]*[.$Z$5]*MAGNET([.O$24]+[.$BB32])+[.P$27]*[.$Z$5]*MAGNET([.P$24]+[.$BB32])+[.Q$27]*[.$Z$5]*MAGNET([.Q$24]+[.$BB32])+[.R$27]*[.$Z$5]*MAGNET([.R$24]+[.$BB32])+[.S$27]*[.$Z$5]*MAGNET([.S$24]+[.$BB32])+[.T$27]*[.$Z$5]*MAGNET([.T$24]+[.$BB32])+[.U$27]*[.$Z$5]*MAGNET([.U$24]+[.$BB32])+[.V$27]*[.$Z$5]*MAGNET([.V$24]+[.$BB32])+[.W$27]*[.$Z$5]*MAGNET([.W$24]+[.$BB32])+[.X$27]*[.$Z$5]*MAGNET([.X$24]+[.$BB32])+[.Y$27]*[.$Z$5]*MAGNET([.Y$24]+[.$BB32])+[.Z$27]*[.$Z$5]*MAGNET([.Z$24]+[.$BB32])+[.AA$27]*[.$Z$5]*MAGNET([.AA$24]+[.$BB32])+[.AB$27]*[.$Z$5]*MAGNET([.AB$24]+[.$BB32])+[.AC$27]*[.$Z$5]*MAGNET([.AC$24]+[.$BB32])+[.AD$27]*[.$Z$5]*MAGNET([.AD$24]+[.$BB32])+[.AE$27]*[.$Z$5]*MAGNET([.AE$24]+[.$BB32])+[.AF$27]*[.$Z$5]*MAGNET([.AF$24]+[.$BB32])+[.AG$27]*[.$Z$5]*MAGNET([.AG$24]+[.$BB32])+[.D$27]*[.$Z$5]*MAGNET([.D$24]+[.$BB32])+[.AH$27]*[.$Z$5]*MAGNET([.AH$24]+[.BB32]) +[.AI$27]*[.$Z$5]*MAGNET([.AI$24]+[.BB32]) +[.AJ$27]*[.$Z$5]*MAGNET([.AJ$24]+[.BB32]) +[.AK$27]*[.$Z$5]*MAGNET([.AK$24]+[.BB32]) +[.AL$27]*[.$Z$5]*MAGNET([.AL$24]+[.BB32]) +[.AM$27]*[.$Z$5]*MAGNET([.AM$24]+[.BB32]) +[.AN$27]*[.$Z$5]*MAGNET([.AN$24]+[.BB32]) +[.AO$27]*[.$Z$5]*MAGNET([.AO$24]+[.BB32]) +[.AP$27]*[.$Z$5]*MAGNET([.AP$24]+[.$BB32])&#10;+[.AQ$27]*[.$Z$5]*MAGNET([.AQ$24]+[.$BB32])&#10;+[.AR$27]*[.$Z$5]*MAGNET([.AR$24]+[.$BB32])&#10;+[.AS$27]*[.$Z$5]*MAGNET([.AS$24]+[.$BB32])&#10;+[.AT$27]*[.$Z$5]*MAGNET([.AT$24]+[.$BB32])&#10;+[.AU$27]*[.$Z$5]*MAGNET([.AU$24]+[.$BB32])&#10;+[.AV$27]*[.$Z$5]*MAGNET([.AV$24]+[.$BB32])&#10;+[.AW$27]*[.$Z$5]*MAGNET([.AW$24]+[.$BB32])&#10;+[.AX$27]*[.$Z$5]*MAGNET([.AX$24]+[.$BB32])&#10;+[.AY$27]*[.$Z$5]*MAGNET([.AY$24]+[.$BB32]) +RAND()*[.$BE$13]" office:value-type="float" office:value="-103.504281015645" calcext:value-type="float">
            <text:p>-103.504281015645</text:p>
          </table:table-cell>
          <table:table-cell table:style-name="ce71" table:formula="of:=[.E$28]*[.$Z$5]*MAGNET([.E$24]+[.$BB32])+[.F$28]*[.$Z$5]*MAGNET([.F$24]+[.$BB32])+[.G$28]*[.$Z$5]*MAGNET([.G$24]+[.$BB32])+[.H$28]*[.$Z$5]*MAGNET([.H$24]+[.$BB32])+[.I$28]*[.$Z$5]*MAGNET([.I$24]+[.$BB32])+[.J$28]*[.$Z$5]*MAGNET([.J$24]+[.$BB32])+[.K$28]*[.$Z$5]*MAGNET([.K$24]+[.$BB32])+[.L$28]*[.$Z$5]*MAGNET([.L$24]+[.$BB32])+[.M$28]*[.$Z$5]*MAGNET([.M$24]+[.$BB32])+[.N$28]*[.$Z$5]*MAGNET([.N$24]+[.$BB32])+[.O$28]*[.$Z$5]*MAGNET([.O$24]+[.$BB32])+[.P$28]*[.$Z$5]*MAGNET([.P$24]+[.$BB32])+[.Q$28]*[.$Z$5]*MAGNET([.Q$24]+[.$BB32])+[.R$28]*[.$Z$5]*MAGNET([.R$24]+[.$BB32])+[.S$28]*[.$Z$5]*MAGNET([.S$24]+[.$BB32])+[.T$28]*[.$Z$5]*MAGNET([.T$24]+[.$BB32])+[.U$28]*[.$Z$5]*MAGNET([.U$24]+[.$BB32])+[.V$28]*[.$Z$5]*MAGNET([.V$24]+[.$BB32])+[.W$28]*[.$Z$5]*MAGNET([.W$24]+[.$BB32])+[.X$28]*[.$Z$5]*MAGNET([.X$24]+[.$BB32])+[.Y$28]*[.$Z$5]*MAGNET([.Y$24]+[.$BB32])+[.Z$28]*[.$Z$5]*MAGNET([.Z$24]+[.$BB32])+[.AA$28]*[.$Z$5]*MAGNET([.AA$24]+[.$BB32])+[.AB$28]*[.$Z$5]*MAGNET([.AB$24]+[.$BB32])+[.AC$28]*[.$Z$5]*MAGNET([.AC$24]+[.$BB32])+[.AD$28]*[.$Z$5]*MAGNET([.AD$24]+[.$BB32])+[.AE$28]*[.$Z$5]*MAGNET([.AE$24]+[.$BB32])+[.AF$28]*[.$Z$5]*MAGNET([.AF$24]+[.$BB32])+[.AG$28]*[.$Z$5]*MAGNET([.AG$24]+[.$BB32])+[.D$28]*[.$Z$5]*MAGNET([.D$24]+[.$BB32])+[.AH$28]*[.$Z$5]*MAGNET([.AH$24]+[.BB32]) +[.AI$28]*[.$Z$5]*MAGNET([.AI$24]+[.BB32]) +[.AJ$28]*[.$Z$5]*MAGNET([.AJ$24]+[.BB32]) +[.AK$28]*[.$Z$5]*MAGNET([.AK$24]+[.BB32]) +[.AL$28]*[.$Z$5]*MAGNET([.AL$24]+[.BB32]) +[.AM$28]*[.$Z$5]*MAGNET([.AM$24]+[.BB32]) +[.AN$28]*[.$Z$5]*MAGNET([.AN$24]+[.BB32]) +[.AO$28]*[.$Z$5]*MAGNET([.AO$24]+[.BB32]) +[.AP$28]*[.$Z$5]*MAGNET([.AP$24]+[.$BB32])&#10;+[.AQ$28]*[.$Z$5]*MAGNET([.AQ$24]+[.$BB32])&#10;+[.AR$28]*[.$Z$5]*MAGNET([.AR$24]+[.$BB32])&#10;+[.AS$28]*[.$Z$5]*MAGNET([.AS$24]+[.$BB32])&#10;+[.AT$28]*[.$Z$5]*MAGNET([.AT$24]+[.$BB32])&#10;+[.AU$28]*[.$Z$5]*MAGNET([.AU$24]+[.$BB32])&#10;+[.AV$28]*[.$Z$5]*MAGNET([.AV$24]+[.$BB32])&#10;+[.AW$28]*[.$Z$5]*MAGNET([.AW$24]+[.$BB32])&#10;+[.AX$28]*[.$Z$5]*MAGNET([.AX$24]+[.$BB32])&#10;+[.AY$28]*[.$Z$5]*MAGNET([.AY$24]+[.$BB32]) +RAND()*[.$BF$13]" office:value-type="float" office:value="-11.3997785816191" calcext:value-type="float">
            <text:p>-11.3997785816191</text:p>
          </table:table-cell>
          <table:table-cell table:style-name="ce71" table:formula="of:=[.E$29]*[.$Z$5]*MAGNET([.E$24]+[.$BB32])+[.F$29]*[.$Z$5]*MAGNET([.F$24]+[.$BB32])+[.G$29]*[.$Z$5]*MAGNET([.G$24]+[.$BB32])+[.H$29]*[.$Z$5]*MAGNET([.H$24]+[.$BB32])+[.I$29]*[.$Z$5]*MAGNET([.I$24]+[.$BB32])+[.J$29]*[.$Z$5]*MAGNET([.J$24]+[.$BB32])+[.K$29]*[.$Z$5]*MAGNET([.K$24]+[.$BB32])+[.L$29]*[.$Z$5]*MAGNET([.L$24]+[.$BB32])+[.M$29]*[.$Z$5]*MAGNET([.M$24]+[.$BB32])+[.N$29]*[.$Z$5]*MAGNET([.N$24]+[.$BB32])+[.O$29]*[.$Z$5]*MAGNET([.O$24]+[.$BB32])+[.P$29]*[.$Z$5]*MAGNET([.P$24]+[.$BB32])+[.Q$29]*[.$Z$5]*MAGNET([.Q$24]+[.$BB32])+[.R$29]*[.$Z$5]*MAGNET([.R$24]+[.$BB32])+[.S$29]*[.$Z$5]*MAGNET([.S$24]+[.$BB32])+[.T$29]*[.$Z$5]*MAGNET([.T$24]+[.$BB32])+[.U$29]*[.$Z$5]*MAGNET([.U$24]+[.$BB32])+[.V$29]*[.$Z$5]*MAGNET([.V$24]+[.$BB32])+[.W$29]*[.$Z$5]*MAGNET([.W$24]+[.$BB32])+[.X$29]*[.$Z$5]*MAGNET([.X$24]+[.$BB32])+[.Y$29]*[.$Z$5]*MAGNET([.Y$24]+[.$BB32])+[.Z$29]*[.$Z$5]*MAGNET([.Z$24]+[.$BB32])+[.AA$29]*[.$Z$5]*MAGNET([.AA$24]+[.$BB32])+[.AB$29]*[.$Z$5]*MAGNET([.AB$24]+[.$BB32])+[.AC$29]*[.$Z$5]*MAGNET([.AC$24]+[.$BB32])+[.AD$29]*[.$Z$5]*MAGNET([.AD$24]+[.$BB32])+[.AE$29]*[.$Z$5]*MAGNET([.AE$24]+[.$BB32])+[.AF$29]*[.$Z$5]*MAGNET([.AF$24]+[.$BB32])+[.AG$29]*[.$Z$5]*MAGNET([.AG$24]+[.$BB32])+[.D$29]*[.$Z$5]*MAGNET([.D$24]+[.$BB32])+[.AH$29]*[.$Z$5]*MAGNET([.AH$24]+[.BB32]) +[.AI$29]*[.$Z$5]*MAGNET([.AI$24]+[.BB32]) +[.AJ$29]*[.$Z$5]*MAGNET([.AJ$24]+[.BB32]) +[.AK$29]*[.$Z$5]*MAGNET([.AK$24]+[.BB32]) +[.AL$29]*[.$Z$5]*MAGNET([.AL$24]+[.BB32]) +[.AM$29]*[.$Z$5]*MAGNET([.AM$24]+[.BB32]) +[.AN$29]*[.$Z$5]*MAGNET([.AN$24]+[.BB32]) +[.AO$29]*[.$Z$5]*MAGNET([.AO$24]+[.BB32]) +[.AP$29]*[.$Z$5]*MAGNET([.AP$24]+[.$BB32])&#10;+[.AQ$29]*[.$Z$5]*MAGNET([.AQ$24]+[.$BB32])&#10;+[.AR$29]*[.$Z$5]*MAGNET([.AR$24]+[.$BB32])&#10;+[.AS$29]*[.$Z$5]*MAGNET([.AS$24]+[.$BB32])&#10;+[.AT$29]*[.$Z$5]*MAGNET([.AT$24]+[.$BB32])&#10;+[.AU$29]*[.$Z$5]*MAGNET([.AU$24]+[.$BB32])&#10;+[.AV$29]*[.$Z$5]*MAGNET([.AV$24]+[.$BB32])&#10;+[.AW$29]*[.$Z$5]*MAGNET([.AW$24]+[.$BB32])&#10;+[.AX$29]*[.$Z$5]*MAGNET([.AX$24]+[.$BB32])&#10;+[.AY$29]*[.$Z$5]*MAGNET([.AY$24]+[.$BB32]) +RAND()*[.$BG$13]" office:value-type="float" office:value="39.4685480927862" calcext:value-type="float">
            <text:p>39.4685480927862</text:p>
          </table:table-cell>
          <table:table-cell table:style-name="ce71" table:formula="of:=[.E$30]*[.$Z$5]*MAGNET([.E$24]+[.$BB32])+[.F$30]*[.$Z$5]*MAGNET([.F$24]+[.$BB32])+[.G$30]*[.$Z$5]*MAGNET([.G$24]+[.$BB32])+[.H$30]*[.$Z$5]*MAGNET([.H$24]+[.$BB32])+[.I$30]*[.$Z$5]*MAGNET([.I$24]+[.$BB32])+[.J$30]*[.$Z$5]*MAGNET([.J$24]+[.$BB32])+[.K$30]*[.$Z$5]*MAGNET([.K$24]+[.$BB32])+[.L$30]*[.$Z$5]*MAGNET([.L$24]+[.$BB32])+[.M$30]*[.$Z$5]*MAGNET([.M$24]+[.$BB32])+[.N$30]*[.$Z$5]*MAGNET([.N$24]+[.$BB32])+[.O$30]*[.$Z$5]*MAGNET([.O$24]+[.$BB32])+[.P$30]*[.$Z$5]*MAGNET([.P$24]+[.$BB32])+[.Q$30]*[.$Z$5]*MAGNET([.Q$24]+[.$BB32])+[.R$30]*[.$Z$5]*MAGNET([.R$24]+[.$BB32])+[.S$30]*[.$Z$5]*MAGNET([.S$24]+[.$BB32])+[.T$30]*[.$Z$5]*MAGNET([.T$24]+[.$BB32])+[.U$30]*[.$Z$5]*MAGNET([.U$24]+[.$BB32])+[.V$30]*[.$Z$5]*MAGNET([.V$24]+[.$BB32])+[.W$30]*[.$Z$5]*MAGNET([.W$24]+[.$BB32])+[.X$30]*[.$Z$5]*MAGNET([.X$24]+[.$BB32])+[.Y$30]*[.$Z$5]*MAGNET([.Y$24]+[.$BB32])+[.Z$30]*[.$Z$5]*MAGNET([.Z$24]+[.$BB32])+[.AA$30]*[.$Z$5]*MAGNET([.AA$24]+[.$BB32])+[.AB$30]*[.$Z$5]*MAGNET([.AB$24]+[.$BB32])+[.AC$30]*[.$Z$5]*MAGNET([.AC$24]+[.$BB32])+[.AD$30]*[.$Z$5]*MAGNET([.AD$24]+[.$BB32])+[.AE$30]*[.$Z$5]*MAGNET([.AE$24]+[.$BB32])+[.AF$30]*[.$Z$5]*MAGNET([.AF$24]+[.$BB32])+[.AG$30]*[.$Z$5]*MAGNET([.AG$24]+[.$BB32])+[.D$30]*[.$Z$5]*MAGNET([.D$24]+[.$BB32])+[.AH$30]*[.$Z$5]*MAGNET([.AH$24]+[.BB32]) +[.AI$30]*[.$Z$5]*MAGNET([.AI$24]+[.BB32]) +[.AJ$30]*[.$Z$5]*MAGNET([.AJ$24]+[.BB32]) +[.AK$30]*[.$Z$5]*MAGNET([.AK$24]+[.BB32]) +[.AL$30]*[.$Z$5]*MAGNET([.AL$24]+[.BB32]) +[.AM$30]*[.$Z$5]*MAGNET([.AM$24]+[.BB32]) +[.AN$30]*[.$Z$5]*MAGNET([.AN$24]+[.BB32]) +[.AO$30]*[.$Z$5]*MAGNET([.AO$24]+[.BB32]) +[.AP$30]*[.$Z$5]*MAGNET([.AP$24]+[.$BB32])&#10;+[.AQ$30]*[.$Z$5]*MAGNET([.AQ$24]+[.$BB32])&#10;+[.AR$30]*[.$Z$5]*MAGNET([.AR$24]+[.$BB32])&#10;+[.AS$30]*[.$Z$5]*MAGNET([.AS$24]+[.$BB32])&#10;+[.AT$30]*[.$Z$5]*MAGNET([.AT$24]+[.$BB32])&#10;+[.AU$30]*[.$Z$5]*MAGNET([.AU$24]+[.$BB32])&#10;+[.AV$30]*[.$Z$5]*MAGNET([.AV$24]+[.$BB32])&#10;+[.AW$30]*[.$Z$5]*MAGNET([.AW$24]+[.$BB32])&#10;+[.AX$30]*[.$Z$5]*MAGNET([.AX$24]+[.$BB32])&#10;+[.AY$30]*[.$Z$5]*MAGNET([.AY$24]+[.$BB32]) +RAND()*[.$BH$13]" office:value-type="float" office:value="0" calcext:value-type="float">
            <text:p>0</text:p>
          </table:table-cell>
          <table:table-cell table:style-name="ce71" table:formula="of:=[.E$31]*[.$Z$5]*MAGNET([.E$24]+[.$BB32])+[.F$31]*[.$Z$5]*MAGNET([.F$24]+[.$BB32])+[.G$31]*[.$Z$5]*MAGNET([.G$24]+[.$BB32])+[.H$31]*[.$Z$5]*MAGNET([.H$24]+[.$BB32])+[.I$31]*[.$Z$5]*MAGNET([.I$24]+[.$BB32])+[.J$31]*[.$Z$5]*MAGNET([.J$24]+[.$BB32])+[.K$31]*[.$Z$5]*MAGNET([.K$24]+[.$BB32])+[.L$31]*[.$Z$5]*MAGNET([.L$24]+[.$BB32])+[.M$31]*[.$Z$5]*MAGNET([.M$24]+[.$BB32])+[.N$31]*[.$Z$5]*MAGNET([.N$24]+[.$BB32])+[.O$31]*[.$Z$5]*MAGNET([.O$24]+[.$BB32])+[.P$31]*[.$Z$5]*MAGNET([.P$24]+[.$BB32])+[.Q$31]*[.$Z$5]*MAGNET([.Q$24]+[.$BB32])+[.R$31]*[.$Z$5]*MAGNET([.R$24]+[.$BB32])+[.S$31]*[.$Z$5]*MAGNET([.S$24]+[.$BB32])+[.T$31]*[.$Z$5]*MAGNET([.T$24]+[.$BB32])+[.U$31]*[.$Z$5]*MAGNET([.U$24]+[.$BB32])+[.V$31]*[.$Z$5]*MAGNET([.V$24]+[.$BB32])+[.W$31]*[.$Z$5]*MAGNET([.W$24]+[.$BB32])+[.X$31]*[.$Z$5]*MAGNET([.X$24]+[.$BB32])+[.Y$31]*[.$Z$5]*MAGNET([.Y$24]+[.$BB32])+[.Z$31]*[.$Z$5]*MAGNET([.Z$24]+[.$BB32])+[.AA$31]*[.$Z$5]*MAGNET([.AA$24]+[.$BB32])+[.AB$31]*[.$Z$5]*MAGNET([.AB$24]+[.$BB32])+[.AC$31]*[.$Z$5]*MAGNET([.AC$24]+[.$BB32])+[.AD$31]*[.$Z$5]*MAGNET([.AD$24]+[.$BB32])+[.AE$31]*[.$Z$5]*MAGNET([.AE$24]+[.$BB32])+[.AF$31]*[.$Z$5]*MAGNET([.AF$24]+[.$BB32])+[.AG$31]*[.$Z$5]*MAGNET([.AG$24]+[.$BB32])+[.D$31]*[.$Z$5]*MAGNET([.D$24]+[.$BB32])+[.AH$31]*[.$Z$5]*MAGNET([.AH$24]+[.BB32]) +[.AI$31]*[.$Z$5]*MAGNET([.AI$24]+[.BB32]) +[.AJ$31]*[.$Z$5]*MAGNET([.AJ$24]+[.BB32]) +[.AK$31]*[.$Z$5]*MAGNET([.AK$24]+[.BB32]) +[.AL$31]*[.$Z$5]*MAGNET([.AL$24]+[.BB32]) +[.AM$31]*[.$Z$5]*MAGNET([.AM$24]+[.BB32]) +[.AN$31]*[.$Z$5]*MAGNET([.AN$24]+[.BB32]) +[.AO$31]*[.$Z$5]*MAGNET([.AO$24]+[.BB32]) +[.AP$31]*[.$Z$5]*MAGNET([.AP$24]+[.$BB32])&#10;+[.AQ$31]*[.$Z$5]*MAGNET([.AQ$24]+[.$BB32])&#10;+[.AR$31]*[.$Z$5]*MAGNET([.AR$24]+[.$BB32])&#10;+[.AS$31]*[.$Z$5]*MAGNET([.AS$24]+[.$BB32])&#10;+[.AT$31]*[.$Z$5]*MAGNET([.AT$24]+[.$BB32])&#10;+[.AU$31]*[.$Z$5]*MAGNET([.AU$24]+[.$BB32])&#10;+[.AV$31]*[.$Z$5]*MAGNET([.AV$24]+[.$BB32])&#10;+[.AW$31]*[.$Z$5]*MAGNET([.AW$24]+[.$BB32])&#10;+[.AX$31]*[.$Z$5]*MAGNET([.AX$24]+[.$BB32])&#10;+[.AY$31]*[.$Z$5]*MAGNET([.AY$24]+[.$BB32]) +RAND()*[.$BI$13]" office:value-type="float" office:value="0" calcext:value-type="float">
            <text:p>0</text:p>
          </table:table-cell>
          <table:table-cell table:style-name="ce71" table:formula="of:=[.E$32]*[.$Z$5]*MAGNET([.E$24]+[.$BB32])+[.F$32]*[.$Z$5]*MAGNET([.F$24]+[.$BB32])+[.G$32]*[.$Z$5]*MAGNET([.G$24]+[.$BB32])+[.H$32]*[.$Z$5]*MAGNET([.H$24]+[.$BB32])+[.I$32]*[.$Z$5]*MAGNET([.I$24]+[.$BB32])+[.J$32]*[.$Z$5]*MAGNET([.J$24]+[.$BB32])+[.K$32]*[.$Z$5]*MAGNET([.K$24]+[.$BB32])+[.L$32]*[.$Z$5]*MAGNET([.L$24]+[.$BB32])+[.M$32]*[.$Z$5]*MAGNET([.M$24]+[.$BB32])+[.N$32]*[.$Z$5]*MAGNET([.N$24]+[.$BB32])+[.O$32]*[.$Z$5]*MAGNET([.O$24]+[.$BB32])+[.P$32]*[.$Z$5]*MAGNET([.P$24]+[.$BB32])+[.Q$32]*[.$Z$5]*MAGNET([.Q$24]+[.$BB32])+[.R$32]*[.$Z$5]*MAGNET([.R$24]+[.$BB32])+[.S$32]*[.$Z$5]*MAGNET([.S$24]+[.$BB32])+[.T$32]*[.$Z$5]*MAGNET([.T$24]+[.$BB32])+[.U$32]*[.$Z$5]*MAGNET([.U$24]+[.$BB32])+[.V$32]*[.$Z$5]*MAGNET([.V$24]+[.$BB32])+[.W$32]*[.$Z$5]*MAGNET([.W$24]+[.$BB32])+[.X$32]*[.$Z$5]*MAGNET([.X$24]+[.$BB32])+[.Y$32]*[.$Z$5]*MAGNET([.Y$24]+[.$BB32])+[.Z$32]*[.$Z$5]*MAGNET([.Z$24]+[.$BB32])+[.AA$32]*[.$Z$5]*MAGNET([.AA$24]+[.$BB32])+[.AB$32]*[.$Z$5]*MAGNET([.AB$24]+[.$BB32])+[.AC$32]*[.$Z$5]*MAGNET([.AC$24]+[.$BB32])+[.AD$32]*[.$Z$5]*MAGNET([.AD$24]+[.$BB32])+[.AE$32]*[.$Z$5]*MAGNET([.AE$24]+[.$BB32])+[.AF$32]*[.$Z$5]*MAGNET([.AF$24]+[.$BB32])+[.AG$32]*[.$Z$5]*MAGNET([.AG$24]+[.$BB32])+[.D$32]*[.$Z$5]*MAGNET([.D$24]+[.$BB32])+[.AH$32]*[.$Z$5]*MAGNET([.AH$24]+[.BB32]) +[.AI$32]*[.$Z$5]*MAGNET([.AI$24]+[.BB32]) +[.AJ$32]*[.$Z$5]*MAGNET([.AJ$24]+[.BB32]) +[.AK$32]*[.$Z$5]*MAGNET([.AK$24]+[.BB32]) +[.AL$32]*[.$Z$5]*MAGNET([.AL$24]+[.BB32]) +[.AM$32]*[.$Z$5]*MAGNET([.AM$24]+[.BB32]) +[.AN$32]*[.$Z$5]*MAGNET([.AN$24]+[.BB32]) +[.AO$32]*[.$Z$5]*MAGNET([.AO$24]+[.BB32]) +[.AP$32]*[.$Z$5]*MAGNET([.AP$24]+[.$BB32])&#10;+[.AQ$32]*[.$Z$5]*MAGNET([.AQ$24]+[.$BB32])&#10;+[.AR$32]*[.$Z$5]*MAGNET([.AR$24]+[.$BB32])&#10;+[.AS$32]*[.$Z$5]*MAGNET([.AS$24]+[.$BB32])&#10;+[.AT$32]*[.$Z$5]*MAGNET([.AT$24]+[.$BB32])&#10;+[.AU$32]*[.$Z$5]*MAGNET([.AU$24]+[.$BB32])&#10;+[.AV$32]*[.$Z$5]*MAGNET([.AV$24]+[.$BB32])&#10;+[.AW$32]*[.$Z$5]*MAGNET([.AW$24]+[.$BB32])&#10;+[.AX$32]*[.$Z$5]*MAGNET([.AX$24]+[.$BB32])&#10;+[.AY$32]*[.$Z$5]*MAGNET([.AY$24]+[.$BB3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/>
          <table:table-cell table:number-columns-repeated="49"/>
          <table:table-cell table:formula="of:=[.BA32]+0.002" office:value-type="float" office:value="0.036" calcext:value-type="float">
            <text:p>0.036</text:p>
          </table:table-cell>
          <table:table-cell table:formula="of:=[.BA33]*[.$D$6]" office:value-type="float" office:value="1.80955736846772" calcext:value-type="float">
            <text:p>1.810</text:p>
          </table:table-cell>
          <table:table-cell table:formula="of:=[.D$25]*[.$Z$5]*MAGNET([.D$24]+[.BB33])+[.E$25]*[.$Z$5]*MAGNET([.E$24]+[.BB33])+[.F$25]*[.$Z$5]*MAGNET([.F$24]+[.BB33])+[.G$25]*[.$Z$5]*MAGNET([.G$24]+[.BB33])+[.H$25]*[.$Z$5]*MAGNET([.H$24]+[.BB33])+[.I$25]*[.$Z$5]*MAGNET([.I$24]+[.BB33])+[.J$25]*[.$Z$5]*MAGNET([.J$24]+[.BB33])+[.K$25]*[.$Z$5]*MAGNET([.K$24]+[.BB33])+[.L$25]*[.$Z$5]*MAGNET([.L$24]+[.BB33])+[.M$25]*[.$Z$5]*MAGNET([.M$24]+[.BB33])+[.N$25]*[.$Z$5]*MAGNET([.N$24]+[.BB33])+[.O$25]*[.$Z$5]*MAGNET([.O$24]+[.BB33])+[.P$25]*[.$Z$5]*MAGNET([.P$24]+[.BB33])+[.Q$25]*[.$Z$5]*MAGNET([.Q$24]+[.BB33])+[.R$25]*[.$Z$5]*MAGNET([.R$24]+[.BB33])+[.S$25]*[.$Z$5]*MAGNET([.S$24]+[.BB33])+[.T$25]*[.$Z$5]*MAGNET([.T$24]+[.BB33])+[.U$25]*[.$Z$5]*MAGNET([.U$24]+[.BB33])+[.V$25]*[.$Z$5]*MAGNET([.V$24]+[.BB33])+[.W$25]*[.$Z$5]*MAGNET([.W$24]+[.BB33])+[.X$25]*[.$Z$5]*MAGNET([.X$24]+[.BB33])+[.Y$25]*[.$Z$5]*MAGNET([.Y$24]+[.BB33])+[.Z$25]*[.$Z$5]*MAGNET([.Z$24]+[.BB33])+[.AA$25]*[.$Z$5]*MAGNET([.AA$24]+[.BB33])+[.AB$25]*[.$Z$5]*MAGNET([.AB$24]+[.BB33])+[.AC$25]*[.$Z$5]*MAGNET([.AC$24]+[.BB33])+[.AD$25]*[.$Z$5]*MAGNET([.AD$24]+[.BB33])+[.AE$25]*[.$Z$5]*MAGNET([.AE$24]+[.BB33])+[.AF$25]*[.$Z$5]*MAGNET([.AF$24]+[.BB33])+[.AG$25]*[.$Z$5]*MAGNET([.AG$24]+[.BB33])+[.AH$25]*[.$Z$5]*MAGNET([.AH$24]+[.BB33]) +[.AI$25]*[.$Z$5]*MAGNET([.AI$24]+[.BB33]) +[.AJ$25]*[.$Z$5]*MAGNET([.AJ$24]+[.BB33]) +[.AK$25]*[.$Z$5]*MAGNET([.AK$24]+[.BB33]) +[.AL$25]*[.$Z$5]*MAGNET([.AL$24]+[.BB33]) +[.AM$25]*[.$Z$5]*MAGNET([.AM$24]+[.BB33]) +[.AN$25]*[.$Z$5]*MAGNET([.AN$24]+[.BB33]) +[.AO$25]*[.$Z$5]*MAGNET([.AO$24]+[.BB33])+RAND()*[.$BC$13]+[.AP$25]*[.$Z$5]*MAGNET([.AP$24]+[.BB33])&#10;+[.AQ$25]*[.$Z$5]*MAGNET([.AQ$24]+[.BB33])&#10;+[.AR$25]*[.$Z$5]*MAGNET([.AR$24]+[.BB33])&#10;+[.AS$25]*[.$Z$5]*MAGNET([.AS$24]+[.BB33])&#10;+[.AT$25]*[.$Z$5]*MAGNET([.AT$24]+[.BB33])&#10;+[.AU$25]*[.$Z$5]*MAGNET([.AU$24]+[.BB33])&#10;+[.AV$25]*[.$Z$5]*MAGNET([.AV$24]+[.BB33])&#10;+[.AW$25]*[.$Z$5]*MAGNET([.AW$24]+[.BB33])&#10;+[.AX$25]*[.$Z$5]*MAGNET([.AX$24]+[.BB33])&#10;+[.AY$25]*[.$Z$5]*MAGNET([.AY$24]+[.BB33])" office:value-type="float" office:value="123.616229447862" calcext:value-type="float">
            <text:p>123.62</text:p>
          </table:table-cell>
          <table:table-cell table:style-name="ce70" table:formula="of:=[.E$26]*[.$Z$5]*MAGNET([.E$24]+[.$BB33])+[.F$26]*[.$Z$5]*MAGNET([.F$24]+[.$BB33])+[.G$26]*[.$Z$5]*MAGNET([.G$24]+[.$BB33])+[.H$26]*[.$Z$5]*MAGNET([.H$24]+[.$BB33])+[.I$26]*[.$Z$5]*MAGNET([.I$24]+[.$BB33])+[.J$26]*[.$Z$5]*MAGNET([.J$24]+[.$BB33])+[.K$26]*[.$Z$5]*MAGNET([.K$24]+[.$BB33])+[.L$26]*[.$Z$5]*MAGNET([.L$24]+[.$BB33])+[.M$26]*[.$Z$5]*MAGNET([.M$24]+[.$BB33])+[.N$26]*[.$Z$5]*MAGNET([.N$24]+[.$BB33])+[.O$26]*[.$Z$5]*MAGNET([.O$24]+[.$BB33])+[.P$26]*[.$Z$5]*MAGNET([.P$24]+[.$BB33])+[.Q$26]*[.$Z$5]*MAGNET([.Q$24]+[.$BB33])+[.R$26]*[.$Z$5]*MAGNET([.R$24]+[.$BB33])+[.S$26]*[.$Z$5]*MAGNET([.S$24]+[.$BB33])+[.T$26]*[.$Z$5]*MAGNET([.T$24]+[.$BB33])+[.U$26]*[.$Z$5]*MAGNET([.U$24]+[.$BB33])+[.V$26]*[.$Z$5]*MAGNET([.V$24]+[.$BB33])+[.W$26]*[.$Z$5]*MAGNET([.W$24]+[.$BB33])+[.X$26]*[.$Z$5]*MAGNET([.X$24]+[.$BB33])+[.Y$26]*[.$Z$5]*MAGNET([.Y$24]+[.$BB33])+[.Z$26]*[.$Z$5]*MAGNET([.Z$24]+[.$BB33])+[.AA$26]*[.$Z$5]*MAGNET([.AA$24]+[.$BB33])+[.AB$26]*[.$Z$5]*MAGNET([.AB$24]+[.$BB33])+[.AC$26]*[.$Z$5]*MAGNET([.AC$24]+[.$BB33])+[.AD$26]*[.$Z$5]*MAGNET([.AD$24]+[.$BB33])+[.AE$26]*[.$Z$5]*MAGNET([.AE$24]+[.$BB33])+[.AF$26]*[.$Z$5]*MAGNET([.AF$24]+[.$BB33])+[.AG$26]*[.$Z$5]*MAGNET([.AG$24]+[.$BB33])+[.D$26]*[.$Z$5]*MAGNET([.D$24]+[.$BB33])+[.AH$26]*[.$Z$5]*MAGNET([.AH$24]+[.BB33]) +[.AI$26]*[.$Z$5]*MAGNET([.AI$24]+[.BB33]) +[.AJ$26]*[.$Z$5]*MAGNET([.AJ$24]+[.BB33]) +[.AK$26]*[.$Z$5]*MAGNET([.AK$24]+[.BB33]) +[.AL$26]*[.$Z$5]*MAGNET([.AL$24]+[.BB33]) +[.AM$26]*[.$Z$5]*MAGNET([.AM$24]+[.BB33]) +[.AN$26]*[.$Z$5]*MAGNET([.AN$24]+[.BB33]) +[.AO$26]*[.$Z$5]*MAGNET([.AO$24]+[.BB33]) +[.AP$26]*[.$Z$5]*MAGNET([.AP$24]+[.$BB33])&#10;+[.AQ$26]*[.$Z$5]*MAGNET([.AQ$24]+[.$BB33])&#10;+[.AR$26]*[.$Z$5]*MAGNET([.AR$24]+[.$BB33])&#10;+[.AS$26]*[.$Z$5]*MAGNET([.AS$24]+[.$BB33])&#10;+[.AT$26]*[.$Z$5]*MAGNET([.AT$24]+[.$BB33])&#10;+[.AU$26]*[.$Z$5]*MAGNET([.AU$24]+[.$BB33])&#10;+[.AV$26]*[.$Z$5]*MAGNET([.AV$24]+[.$BB33])&#10;+[.AW$26]*[.$Z$5]*MAGNET([.AW$24]+[.$BB33])&#10;+[.AX$26]*[.$Z$5]*MAGNET([.AX$24]+[.$BB33])&#10;+[.AY$26]*[.$Z$5]*MAGNET([.AY$24]+[.$BB33]) +RAND()*[.$BD$13]" office:value-type="float" office:value="-41.7687960337964" calcext:value-type="float">
            <text:p>-41.77</text:p>
          </table:table-cell>
          <table:table-cell table:style-name="ce71" table:formula="of:=[.E$27]*[.$Z$5]*MAGNET([.E$24]+[.$BB33])+[.F$27]*[.$Z$5]*MAGNET([.F$24]+[.$BB33])+[.G$27]*[.$Z$5]*MAGNET([.G$24]+[.$BB33])+[.H$27]*[.$Z$5]*MAGNET([.H$24]+[.$BB33])+[.I$27]*[.$Z$5]*MAGNET([.I$24]+[.$BB33])+[.J$27]*[.$Z$5]*MAGNET([.J$24]+[.$BB33])+[.K$27]*[.$Z$5]*MAGNET([.K$24]+[.$BB33])+[.L$27]*[.$Z$5]*MAGNET([.L$24]+[.$BB33])+[.M$27]*[.$Z$5]*MAGNET([.M$24]+[.$BB33])+[.N$27]*[.$Z$5]*MAGNET([.N$24]+[.$BB33])+[.O$27]*[.$Z$5]*MAGNET([.O$24]+[.$BB33])+[.P$27]*[.$Z$5]*MAGNET([.P$24]+[.$BB33])+[.Q$27]*[.$Z$5]*MAGNET([.Q$24]+[.$BB33])+[.R$27]*[.$Z$5]*MAGNET([.R$24]+[.$BB33])+[.S$27]*[.$Z$5]*MAGNET([.S$24]+[.$BB33])+[.T$27]*[.$Z$5]*MAGNET([.T$24]+[.$BB33])+[.U$27]*[.$Z$5]*MAGNET([.U$24]+[.$BB33])+[.V$27]*[.$Z$5]*MAGNET([.V$24]+[.$BB33])+[.W$27]*[.$Z$5]*MAGNET([.W$24]+[.$BB33])+[.X$27]*[.$Z$5]*MAGNET([.X$24]+[.$BB33])+[.Y$27]*[.$Z$5]*MAGNET([.Y$24]+[.$BB33])+[.Z$27]*[.$Z$5]*MAGNET([.Z$24]+[.$BB33])+[.AA$27]*[.$Z$5]*MAGNET([.AA$24]+[.$BB33])+[.AB$27]*[.$Z$5]*MAGNET([.AB$24]+[.$BB33])+[.AC$27]*[.$Z$5]*MAGNET([.AC$24]+[.$BB33])+[.AD$27]*[.$Z$5]*MAGNET([.AD$24]+[.$BB33])+[.AE$27]*[.$Z$5]*MAGNET([.AE$24]+[.$BB33])+[.AF$27]*[.$Z$5]*MAGNET([.AF$24]+[.$BB33])+[.AG$27]*[.$Z$5]*MAGNET([.AG$24]+[.$BB33])+[.D$27]*[.$Z$5]*MAGNET([.D$24]+[.$BB33])+[.AH$27]*[.$Z$5]*MAGNET([.AH$24]+[.BB33]) +[.AI$27]*[.$Z$5]*MAGNET([.AI$24]+[.BB33]) +[.AJ$27]*[.$Z$5]*MAGNET([.AJ$24]+[.BB33]) +[.AK$27]*[.$Z$5]*MAGNET([.AK$24]+[.BB33]) +[.AL$27]*[.$Z$5]*MAGNET([.AL$24]+[.BB33]) +[.AM$27]*[.$Z$5]*MAGNET([.AM$24]+[.BB33]) +[.AN$27]*[.$Z$5]*MAGNET([.AN$24]+[.BB33]) +[.AO$27]*[.$Z$5]*MAGNET([.AO$24]+[.BB33]) +[.AP$27]*[.$Z$5]*MAGNET([.AP$24]+[.$BB33])&#10;+[.AQ$27]*[.$Z$5]*MAGNET([.AQ$24]+[.$BB33])&#10;+[.AR$27]*[.$Z$5]*MAGNET([.AR$24]+[.$BB33])&#10;+[.AS$27]*[.$Z$5]*MAGNET([.AS$24]+[.$BB33])&#10;+[.AT$27]*[.$Z$5]*MAGNET([.AT$24]+[.$BB33])&#10;+[.AU$27]*[.$Z$5]*MAGNET([.AU$24]+[.$BB33])&#10;+[.AV$27]*[.$Z$5]*MAGNET([.AV$24]+[.$BB33])&#10;+[.AW$27]*[.$Z$5]*MAGNET([.AW$24]+[.$BB33])&#10;+[.AX$27]*[.$Z$5]*MAGNET([.AX$24]+[.$BB33])&#10;+[.AY$27]*[.$Z$5]*MAGNET([.AY$24]+[.$BB33]) +RAND()*[.$BE$13]" office:value-type="float" office:value="-87.7987199870197" calcext:value-type="float">
            <text:p>-87.7987199870197</text:p>
          </table:table-cell>
          <table:table-cell table:style-name="ce71" table:formula="of:=[.E$28]*[.$Z$5]*MAGNET([.E$24]+[.$BB33])+[.F$28]*[.$Z$5]*MAGNET([.F$24]+[.$BB33])+[.G$28]*[.$Z$5]*MAGNET([.G$24]+[.$BB33])+[.H$28]*[.$Z$5]*MAGNET([.H$24]+[.$BB33])+[.I$28]*[.$Z$5]*MAGNET([.I$24]+[.$BB33])+[.J$28]*[.$Z$5]*MAGNET([.J$24]+[.$BB33])+[.K$28]*[.$Z$5]*MAGNET([.K$24]+[.$BB33])+[.L$28]*[.$Z$5]*MAGNET([.L$24]+[.$BB33])+[.M$28]*[.$Z$5]*MAGNET([.M$24]+[.$BB33])+[.N$28]*[.$Z$5]*MAGNET([.N$24]+[.$BB33])+[.O$28]*[.$Z$5]*MAGNET([.O$24]+[.$BB33])+[.P$28]*[.$Z$5]*MAGNET([.P$24]+[.$BB33])+[.Q$28]*[.$Z$5]*MAGNET([.Q$24]+[.$BB33])+[.R$28]*[.$Z$5]*MAGNET([.R$24]+[.$BB33])+[.S$28]*[.$Z$5]*MAGNET([.S$24]+[.$BB33])+[.T$28]*[.$Z$5]*MAGNET([.T$24]+[.$BB33])+[.U$28]*[.$Z$5]*MAGNET([.U$24]+[.$BB33])+[.V$28]*[.$Z$5]*MAGNET([.V$24]+[.$BB33])+[.W$28]*[.$Z$5]*MAGNET([.W$24]+[.$BB33])+[.X$28]*[.$Z$5]*MAGNET([.X$24]+[.$BB33])+[.Y$28]*[.$Z$5]*MAGNET([.Y$24]+[.$BB33])+[.Z$28]*[.$Z$5]*MAGNET([.Z$24]+[.$BB33])+[.AA$28]*[.$Z$5]*MAGNET([.AA$24]+[.$BB33])+[.AB$28]*[.$Z$5]*MAGNET([.AB$24]+[.$BB33])+[.AC$28]*[.$Z$5]*MAGNET([.AC$24]+[.$BB33])+[.AD$28]*[.$Z$5]*MAGNET([.AD$24]+[.$BB33])+[.AE$28]*[.$Z$5]*MAGNET([.AE$24]+[.$BB33])+[.AF$28]*[.$Z$5]*MAGNET([.AF$24]+[.$BB33])+[.AG$28]*[.$Z$5]*MAGNET([.AG$24]+[.$BB33])+[.D$28]*[.$Z$5]*MAGNET([.D$24]+[.$BB33])+[.AH$28]*[.$Z$5]*MAGNET([.AH$24]+[.BB33]) +[.AI$28]*[.$Z$5]*MAGNET([.AI$24]+[.BB33]) +[.AJ$28]*[.$Z$5]*MAGNET([.AJ$24]+[.BB33]) +[.AK$28]*[.$Z$5]*MAGNET([.AK$24]+[.BB33]) +[.AL$28]*[.$Z$5]*MAGNET([.AL$24]+[.BB33]) +[.AM$28]*[.$Z$5]*MAGNET([.AM$24]+[.BB33]) +[.AN$28]*[.$Z$5]*MAGNET([.AN$24]+[.BB33]) +[.AO$28]*[.$Z$5]*MAGNET([.AO$24]+[.BB33]) +[.AP$28]*[.$Z$5]*MAGNET([.AP$24]+[.$BB33])&#10;+[.AQ$28]*[.$Z$5]*MAGNET([.AQ$24]+[.$BB33])&#10;+[.AR$28]*[.$Z$5]*MAGNET([.AR$24]+[.$BB33])&#10;+[.AS$28]*[.$Z$5]*MAGNET([.AS$24]+[.$BB33])&#10;+[.AT$28]*[.$Z$5]*MAGNET([.AT$24]+[.$BB33])&#10;+[.AU$28]*[.$Z$5]*MAGNET([.AU$24]+[.$BB33])&#10;+[.AV$28]*[.$Z$5]*MAGNET([.AV$24]+[.$BB33])&#10;+[.AW$28]*[.$Z$5]*MAGNET([.AW$24]+[.$BB33])&#10;+[.AX$28]*[.$Z$5]*MAGNET([.AX$24]+[.$BB33])&#10;+[.AY$28]*[.$Z$5]*MAGNET([.AY$24]+[.$BB33]) +RAND()*[.$BF$13]" office:value-type="float" office:value="-10.0979910197545" calcext:value-type="float">
            <text:p>-10.0979910197545</text:p>
          </table:table-cell>
          <table:table-cell table:style-name="ce71" table:formula="of:=[.E$29]*[.$Z$5]*MAGNET([.E$24]+[.$BB33])+[.F$29]*[.$Z$5]*MAGNET([.F$24]+[.$BB33])+[.G$29]*[.$Z$5]*MAGNET([.G$24]+[.$BB33])+[.H$29]*[.$Z$5]*MAGNET([.H$24]+[.$BB33])+[.I$29]*[.$Z$5]*MAGNET([.I$24]+[.$BB33])+[.J$29]*[.$Z$5]*MAGNET([.J$24]+[.$BB33])+[.K$29]*[.$Z$5]*MAGNET([.K$24]+[.$BB33])+[.L$29]*[.$Z$5]*MAGNET([.L$24]+[.$BB33])+[.M$29]*[.$Z$5]*MAGNET([.M$24]+[.$BB33])+[.N$29]*[.$Z$5]*MAGNET([.N$24]+[.$BB33])+[.O$29]*[.$Z$5]*MAGNET([.O$24]+[.$BB33])+[.P$29]*[.$Z$5]*MAGNET([.P$24]+[.$BB33])+[.Q$29]*[.$Z$5]*MAGNET([.Q$24]+[.$BB33])+[.R$29]*[.$Z$5]*MAGNET([.R$24]+[.$BB33])+[.S$29]*[.$Z$5]*MAGNET([.S$24]+[.$BB33])+[.T$29]*[.$Z$5]*MAGNET([.T$24]+[.$BB33])+[.U$29]*[.$Z$5]*MAGNET([.U$24]+[.$BB33])+[.V$29]*[.$Z$5]*MAGNET([.V$24]+[.$BB33])+[.W$29]*[.$Z$5]*MAGNET([.W$24]+[.$BB33])+[.X$29]*[.$Z$5]*MAGNET([.X$24]+[.$BB33])+[.Y$29]*[.$Z$5]*MAGNET([.Y$24]+[.$BB33])+[.Z$29]*[.$Z$5]*MAGNET([.Z$24]+[.$BB33])+[.AA$29]*[.$Z$5]*MAGNET([.AA$24]+[.$BB33])+[.AB$29]*[.$Z$5]*MAGNET([.AB$24]+[.$BB33])+[.AC$29]*[.$Z$5]*MAGNET([.AC$24]+[.$BB33])+[.AD$29]*[.$Z$5]*MAGNET([.AD$24]+[.$BB33])+[.AE$29]*[.$Z$5]*MAGNET([.AE$24]+[.$BB33])+[.AF$29]*[.$Z$5]*MAGNET([.AF$24]+[.$BB33])+[.AG$29]*[.$Z$5]*MAGNET([.AG$24]+[.$BB33])+[.D$29]*[.$Z$5]*MAGNET([.D$24]+[.$BB33])+[.AH$29]*[.$Z$5]*MAGNET([.AH$24]+[.BB33]) +[.AI$29]*[.$Z$5]*MAGNET([.AI$24]+[.BB33]) +[.AJ$29]*[.$Z$5]*MAGNET([.AJ$24]+[.BB33]) +[.AK$29]*[.$Z$5]*MAGNET([.AK$24]+[.BB33]) +[.AL$29]*[.$Z$5]*MAGNET([.AL$24]+[.BB33]) +[.AM$29]*[.$Z$5]*MAGNET([.AM$24]+[.BB33]) +[.AN$29]*[.$Z$5]*MAGNET([.AN$24]+[.BB33]) +[.AO$29]*[.$Z$5]*MAGNET([.AO$24]+[.BB33]) +[.AP$29]*[.$Z$5]*MAGNET([.AP$24]+[.$BB33])&#10;+[.AQ$29]*[.$Z$5]*MAGNET([.AQ$24]+[.$BB33])&#10;+[.AR$29]*[.$Z$5]*MAGNET([.AR$24]+[.$BB33])&#10;+[.AS$29]*[.$Z$5]*MAGNET([.AS$24]+[.$BB33])&#10;+[.AT$29]*[.$Z$5]*MAGNET([.AT$24]+[.$BB33])&#10;+[.AU$29]*[.$Z$5]*MAGNET([.AU$24]+[.$BB33])&#10;+[.AV$29]*[.$Z$5]*MAGNET([.AV$24]+[.$BB33])&#10;+[.AW$29]*[.$Z$5]*MAGNET([.AW$24]+[.$BB33])&#10;+[.AX$29]*[.$Z$5]*MAGNET([.AX$24]+[.$BB33])&#10;+[.AY$29]*[.$Z$5]*MAGNET([.AY$24]+[.$BB33]) +RAND()*[.$BG$13]" office:value-type="float" office:value="37.3268053647903" calcext:value-type="float">
            <text:p>37.3268053647903</text:p>
          </table:table-cell>
          <table:table-cell table:style-name="ce71" table:formula="of:=[.E$30]*[.$Z$5]*MAGNET([.E$24]+[.$BB33])+[.F$30]*[.$Z$5]*MAGNET([.F$24]+[.$BB33])+[.G$30]*[.$Z$5]*MAGNET([.G$24]+[.$BB33])+[.H$30]*[.$Z$5]*MAGNET([.H$24]+[.$BB33])+[.I$30]*[.$Z$5]*MAGNET([.I$24]+[.$BB33])+[.J$30]*[.$Z$5]*MAGNET([.J$24]+[.$BB33])+[.K$30]*[.$Z$5]*MAGNET([.K$24]+[.$BB33])+[.L$30]*[.$Z$5]*MAGNET([.L$24]+[.$BB33])+[.M$30]*[.$Z$5]*MAGNET([.M$24]+[.$BB33])+[.N$30]*[.$Z$5]*MAGNET([.N$24]+[.$BB33])+[.O$30]*[.$Z$5]*MAGNET([.O$24]+[.$BB33])+[.P$30]*[.$Z$5]*MAGNET([.P$24]+[.$BB33])+[.Q$30]*[.$Z$5]*MAGNET([.Q$24]+[.$BB33])+[.R$30]*[.$Z$5]*MAGNET([.R$24]+[.$BB33])+[.S$30]*[.$Z$5]*MAGNET([.S$24]+[.$BB33])+[.T$30]*[.$Z$5]*MAGNET([.T$24]+[.$BB33])+[.U$30]*[.$Z$5]*MAGNET([.U$24]+[.$BB33])+[.V$30]*[.$Z$5]*MAGNET([.V$24]+[.$BB33])+[.W$30]*[.$Z$5]*MAGNET([.W$24]+[.$BB33])+[.X$30]*[.$Z$5]*MAGNET([.X$24]+[.$BB33])+[.Y$30]*[.$Z$5]*MAGNET([.Y$24]+[.$BB33])+[.Z$30]*[.$Z$5]*MAGNET([.Z$24]+[.$BB33])+[.AA$30]*[.$Z$5]*MAGNET([.AA$24]+[.$BB33])+[.AB$30]*[.$Z$5]*MAGNET([.AB$24]+[.$BB33])+[.AC$30]*[.$Z$5]*MAGNET([.AC$24]+[.$BB33])+[.AD$30]*[.$Z$5]*MAGNET([.AD$24]+[.$BB33])+[.AE$30]*[.$Z$5]*MAGNET([.AE$24]+[.$BB33])+[.AF$30]*[.$Z$5]*MAGNET([.AF$24]+[.$BB33])+[.AG$30]*[.$Z$5]*MAGNET([.AG$24]+[.$BB33])+[.D$30]*[.$Z$5]*MAGNET([.D$24]+[.$BB33])+[.AH$30]*[.$Z$5]*MAGNET([.AH$24]+[.BB33]) +[.AI$30]*[.$Z$5]*MAGNET([.AI$24]+[.BB33]) +[.AJ$30]*[.$Z$5]*MAGNET([.AJ$24]+[.BB33]) +[.AK$30]*[.$Z$5]*MAGNET([.AK$24]+[.BB33]) +[.AL$30]*[.$Z$5]*MAGNET([.AL$24]+[.BB33]) +[.AM$30]*[.$Z$5]*MAGNET([.AM$24]+[.BB33]) +[.AN$30]*[.$Z$5]*MAGNET([.AN$24]+[.BB33]) +[.AO$30]*[.$Z$5]*MAGNET([.AO$24]+[.BB33]) +[.AP$30]*[.$Z$5]*MAGNET([.AP$24]+[.$BB33])&#10;+[.AQ$30]*[.$Z$5]*MAGNET([.AQ$24]+[.$BB33])&#10;+[.AR$30]*[.$Z$5]*MAGNET([.AR$24]+[.$BB33])&#10;+[.AS$30]*[.$Z$5]*MAGNET([.AS$24]+[.$BB33])&#10;+[.AT$30]*[.$Z$5]*MAGNET([.AT$24]+[.$BB33])&#10;+[.AU$30]*[.$Z$5]*MAGNET([.AU$24]+[.$BB33])&#10;+[.AV$30]*[.$Z$5]*MAGNET([.AV$24]+[.$BB33])&#10;+[.AW$30]*[.$Z$5]*MAGNET([.AW$24]+[.$BB33])&#10;+[.AX$30]*[.$Z$5]*MAGNET([.AX$24]+[.$BB33])&#10;+[.AY$30]*[.$Z$5]*MAGNET([.AY$24]+[.$BB33]) +RAND()*[.$BH$13]" office:value-type="float" office:value="0" calcext:value-type="float">
            <text:p>0</text:p>
          </table:table-cell>
          <table:table-cell table:style-name="ce71" table:formula="of:=[.E$31]*[.$Z$5]*MAGNET([.E$24]+[.$BB33])+[.F$31]*[.$Z$5]*MAGNET([.F$24]+[.$BB33])+[.G$31]*[.$Z$5]*MAGNET([.G$24]+[.$BB33])+[.H$31]*[.$Z$5]*MAGNET([.H$24]+[.$BB33])+[.I$31]*[.$Z$5]*MAGNET([.I$24]+[.$BB33])+[.J$31]*[.$Z$5]*MAGNET([.J$24]+[.$BB33])+[.K$31]*[.$Z$5]*MAGNET([.K$24]+[.$BB33])+[.L$31]*[.$Z$5]*MAGNET([.L$24]+[.$BB33])+[.M$31]*[.$Z$5]*MAGNET([.M$24]+[.$BB33])+[.N$31]*[.$Z$5]*MAGNET([.N$24]+[.$BB33])+[.O$31]*[.$Z$5]*MAGNET([.O$24]+[.$BB33])+[.P$31]*[.$Z$5]*MAGNET([.P$24]+[.$BB33])+[.Q$31]*[.$Z$5]*MAGNET([.Q$24]+[.$BB33])+[.R$31]*[.$Z$5]*MAGNET([.R$24]+[.$BB33])+[.S$31]*[.$Z$5]*MAGNET([.S$24]+[.$BB33])+[.T$31]*[.$Z$5]*MAGNET([.T$24]+[.$BB33])+[.U$31]*[.$Z$5]*MAGNET([.U$24]+[.$BB33])+[.V$31]*[.$Z$5]*MAGNET([.V$24]+[.$BB33])+[.W$31]*[.$Z$5]*MAGNET([.W$24]+[.$BB33])+[.X$31]*[.$Z$5]*MAGNET([.X$24]+[.$BB33])+[.Y$31]*[.$Z$5]*MAGNET([.Y$24]+[.$BB33])+[.Z$31]*[.$Z$5]*MAGNET([.Z$24]+[.$BB33])+[.AA$31]*[.$Z$5]*MAGNET([.AA$24]+[.$BB33])+[.AB$31]*[.$Z$5]*MAGNET([.AB$24]+[.$BB33])+[.AC$31]*[.$Z$5]*MAGNET([.AC$24]+[.$BB33])+[.AD$31]*[.$Z$5]*MAGNET([.AD$24]+[.$BB33])+[.AE$31]*[.$Z$5]*MAGNET([.AE$24]+[.$BB33])+[.AF$31]*[.$Z$5]*MAGNET([.AF$24]+[.$BB33])+[.AG$31]*[.$Z$5]*MAGNET([.AG$24]+[.$BB33])+[.D$31]*[.$Z$5]*MAGNET([.D$24]+[.$BB33])+[.AH$31]*[.$Z$5]*MAGNET([.AH$24]+[.BB33]) +[.AI$31]*[.$Z$5]*MAGNET([.AI$24]+[.BB33]) +[.AJ$31]*[.$Z$5]*MAGNET([.AJ$24]+[.BB33]) +[.AK$31]*[.$Z$5]*MAGNET([.AK$24]+[.BB33]) +[.AL$31]*[.$Z$5]*MAGNET([.AL$24]+[.BB33]) +[.AM$31]*[.$Z$5]*MAGNET([.AM$24]+[.BB33]) +[.AN$31]*[.$Z$5]*MAGNET([.AN$24]+[.BB33]) +[.AO$31]*[.$Z$5]*MAGNET([.AO$24]+[.BB33]) +[.AP$31]*[.$Z$5]*MAGNET([.AP$24]+[.$BB33])&#10;+[.AQ$31]*[.$Z$5]*MAGNET([.AQ$24]+[.$BB33])&#10;+[.AR$31]*[.$Z$5]*MAGNET([.AR$24]+[.$BB33])&#10;+[.AS$31]*[.$Z$5]*MAGNET([.AS$24]+[.$BB33])&#10;+[.AT$31]*[.$Z$5]*MAGNET([.AT$24]+[.$BB33])&#10;+[.AU$31]*[.$Z$5]*MAGNET([.AU$24]+[.$BB33])&#10;+[.AV$31]*[.$Z$5]*MAGNET([.AV$24]+[.$BB33])&#10;+[.AW$31]*[.$Z$5]*MAGNET([.AW$24]+[.$BB33])&#10;+[.AX$31]*[.$Z$5]*MAGNET([.AX$24]+[.$BB33])&#10;+[.AY$31]*[.$Z$5]*MAGNET([.AY$24]+[.$BB33]) +RAND()*[.$BI$13]" office:value-type="float" office:value="0" calcext:value-type="float">
            <text:p>0</text:p>
          </table:table-cell>
          <table:table-cell table:style-name="ce71" table:formula="of:=[.E$32]*[.$Z$5]*MAGNET([.E$24]+[.$BB33])+[.F$32]*[.$Z$5]*MAGNET([.F$24]+[.$BB33])+[.G$32]*[.$Z$5]*MAGNET([.G$24]+[.$BB33])+[.H$32]*[.$Z$5]*MAGNET([.H$24]+[.$BB33])+[.I$32]*[.$Z$5]*MAGNET([.I$24]+[.$BB33])+[.J$32]*[.$Z$5]*MAGNET([.J$24]+[.$BB33])+[.K$32]*[.$Z$5]*MAGNET([.K$24]+[.$BB33])+[.L$32]*[.$Z$5]*MAGNET([.L$24]+[.$BB33])+[.M$32]*[.$Z$5]*MAGNET([.M$24]+[.$BB33])+[.N$32]*[.$Z$5]*MAGNET([.N$24]+[.$BB33])+[.O$32]*[.$Z$5]*MAGNET([.O$24]+[.$BB33])+[.P$32]*[.$Z$5]*MAGNET([.P$24]+[.$BB33])+[.Q$32]*[.$Z$5]*MAGNET([.Q$24]+[.$BB33])+[.R$32]*[.$Z$5]*MAGNET([.R$24]+[.$BB33])+[.S$32]*[.$Z$5]*MAGNET([.S$24]+[.$BB33])+[.T$32]*[.$Z$5]*MAGNET([.T$24]+[.$BB33])+[.U$32]*[.$Z$5]*MAGNET([.U$24]+[.$BB33])+[.V$32]*[.$Z$5]*MAGNET([.V$24]+[.$BB33])+[.W$32]*[.$Z$5]*MAGNET([.W$24]+[.$BB33])+[.X$32]*[.$Z$5]*MAGNET([.X$24]+[.$BB33])+[.Y$32]*[.$Z$5]*MAGNET([.Y$24]+[.$BB33])+[.Z$32]*[.$Z$5]*MAGNET([.Z$24]+[.$BB33])+[.AA$32]*[.$Z$5]*MAGNET([.AA$24]+[.$BB33])+[.AB$32]*[.$Z$5]*MAGNET([.AB$24]+[.$BB33])+[.AC$32]*[.$Z$5]*MAGNET([.AC$24]+[.$BB33])+[.AD$32]*[.$Z$5]*MAGNET([.AD$24]+[.$BB33])+[.AE$32]*[.$Z$5]*MAGNET([.AE$24]+[.$BB33])+[.AF$32]*[.$Z$5]*MAGNET([.AF$24]+[.$BB33])+[.AG$32]*[.$Z$5]*MAGNET([.AG$24]+[.$BB33])+[.D$32]*[.$Z$5]*MAGNET([.D$24]+[.$BB33])+[.AH$32]*[.$Z$5]*MAGNET([.AH$24]+[.BB33]) +[.AI$32]*[.$Z$5]*MAGNET([.AI$24]+[.BB33]) +[.AJ$32]*[.$Z$5]*MAGNET([.AJ$24]+[.BB33]) +[.AK$32]*[.$Z$5]*MAGNET([.AK$24]+[.BB33]) +[.AL$32]*[.$Z$5]*MAGNET([.AL$24]+[.BB33]) +[.AM$32]*[.$Z$5]*MAGNET([.AM$24]+[.BB33]) +[.AN$32]*[.$Z$5]*MAGNET([.AN$24]+[.BB33]) +[.AO$32]*[.$Z$5]*MAGNET([.AO$24]+[.BB33]) +[.AP$32]*[.$Z$5]*MAGNET([.AP$24]+[.$BB33])&#10;+[.AQ$32]*[.$Z$5]*MAGNET([.AQ$24]+[.$BB33])&#10;+[.AR$32]*[.$Z$5]*MAGNET([.AR$24]+[.$BB33])&#10;+[.AS$32]*[.$Z$5]*MAGNET([.AS$24]+[.$BB33])&#10;+[.AT$32]*[.$Z$5]*MAGNET([.AT$24]+[.$BB33])&#10;+[.AU$32]*[.$Z$5]*MAGNET([.AU$24]+[.$BB33])&#10;+[.AV$32]*[.$Z$5]*MAGNET([.AV$24]+[.$BB33])&#10;+[.AW$32]*[.$Z$5]*MAGNET([.AW$24]+[.$BB33])&#10;+[.AX$32]*[.$Z$5]*MAGNET([.AX$24]+[.$BB33])&#10;+[.AY$32]*[.$Z$5]*MAGNET([.AY$24]+[.$BB3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/>
          <table:table-cell table:number-columns-repeated="49"/>
          <table:table-cell table:formula="of:=[.BA33]+0.002" office:value-type="float" office:value="0.038" calcext:value-type="float">
            <text:p>0.038</text:p>
          </table:table-cell>
          <table:table-cell table:formula="of:=[.BA34]*[.$D$6]" office:value-type="float" office:value="1.9100883333826" calcext:value-type="float">
            <text:p>1.910</text:p>
          </table:table-cell>
          <table:table-cell table:formula="of:=[.D$25]*[.$Z$5]*MAGNET([.D$24]+[.BB34])+[.E$25]*[.$Z$5]*MAGNET([.E$24]+[.BB34])+[.F$25]*[.$Z$5]*MAGNET([.F$24]+[.BB34])+[.G$25]*[.$Z$5]*MAGNET([.G$24]+[.BB34])+[.H$25]*[.$Z$5]*MAGNET([.H$24]+[.BB34])+[.I$25]*[.$Z$5]*MAGNET([.I$24]+[.BB34])+[.J$25]*[.$Z$5]*MAGNET([.J$24]+[.BB34])+[.K$25]*[.$Z$5]*MAGNET([.K$24]+[.BB34])+[.L$25]*[.$Z$5]*MAGNET([.L$24]+[.BB34])+[.M$25]*[.$Z$5]*MAGNET([.M$24]+[.BB34])+[.N$25]*[.$Z$5]*MAGNET([.N$24]+[.BB34])+[.O$25]*[.$Z$5]*MAGNET([.O$24]+[.BB34])+[.P$25]*[.$Z$5]*MAGNET([.P$24]+[.BB34])+[.Q$25]*[.$Z$5]*MAGNET([.Q$24]+[.BB34])+[.R$25]*[.$Z$5]*MAGNET([.R$24]+[.BB34])+[.S$25]*[.$Z$5]*MAGNET([.S$24]+[.BB34])+[.T$25]*[.$Z$5]*MAGNET([.T$24]+[.BB34])+[.U$25]*[.$Z$5]*MAGNET([.U$24]+[.BB34])+[.V$25]*[.$Z$5]*MAGNET([.V$24]+[.BB34])+[.W$25]*[.$Z$5]*MAGNET([.W$24]+[.BB34])+[.X$25]*[.$Z$5]*MAGNET([.X$24]+[.BB34])+[.Y$25]*[.$Z$5]*MAGNET([.Y$24]+[.BB34])+[.Z$25]*[.$Z$5]*MAGNET([.Z$24]+[.BB34])+[.AA$25]*[.$Z$5]*MAGNET([.AA$24]+[.BB34])+[.AB$25]*[.$Z$5]*MAGNET([.AB$24]+[.BB34])+[.AC$25]*[.$Z$5]*MAGNET([.AC$24]+[.BB34])+[.AD$25]*[.$Z$5]*MAGNET([.AD$24]+[.BB34])+[.AE$25]*[.$Z$5]*MAGNET([.AE$24]+[.BB34])+[.AF$25]*[.$Z$5]*MAGNET([.AF$24]+[.BB34])+[.AG$25]*[.$Z$5]*MAGNET([.AG$24]+[.BB34])+[.AH$25]*[.$Z$5]*MAGNET([.AH$24]+[.BB34]) +[.AI$25]*[.$Z$5]*MAGNET([.AI$24]+[.BB34]) +[.AJ$25]*[.$Z$5]*MAGNET([.AJ$24]+[.BB34]) +[.AK$25]*[.$Z$5]*MAGNET([.AK$24]+[.BB34]) +[.AL$25]*[.$Z$5]*MAGNET([.AL$24]+[.BB34]) +[.AM$25]*[.$Z$5]*MAGNET([.AM$24]+[.BB34]) +[.AN$25]*[.$Z$5]*MAGNET([.AN$24]+[.BB34]) +[.AO$25]*[.$Z$5]*MAGNET([.AO$24]+[.BB34])+RAND()*[.$BC$13]+[.AP$25]*[.$Z$5]*MAGNET([.AP$24]+[.BB34])&#10;+[.AQ$25]*[.$Z$5]*MAGNET([.AQ$24]+[.BB34])&#10;+[.AR$25]*[.$Z$5]*MAGNET([.AR$24]+[.BB34])&#10;+[.AS$25]*[.$Z$5]*MAGNET([.AS$24]+[.BB34])&#10;+[.AT$25]*[.$Z$5]*MAGNET([.AT$24]+[.BB34])&#10;+[.AU$25]*[.$Z$5]*MAGNET([.AU$24]+[.BB34])&#10;+[.AV$25]*[.$Z$5]*MAGNET([.AV$24]+[.BB34])&#10;+[.AW$25]*[.$Z$5]*MAGNET([.AW$24]+[.BB34])&#10;+[.AX$25]*[.$Z$5]*MAGNET([.AX$24]+[.BB34])&#10;+[.AY$25]*[.$Z$5]*MAGNET([.AY$24]+[.BB34])" office:value-type="float" office:value="124.808703212324" calcext:value-type="float">
            <text:p>124.81</text:p>
          </table:table-cell>
          <table:table-cell table:style-name="ce70" table:formula="of:=[.E$26]*[.$Z$5]*MAGNET([.E$24]+[.$BB34])+[.F$26]*[.$Z$5]*MAGNET([.F$24]+[.$BB34])+[.G$26]*[.$Z$5]*MAGNET([.G$24]+[.$BB34])+[.H$26]*[.$Z$5]*MAGNET([.H$24]+[.$BB34])+[.I$26]*[.$Z$5]*MAGNET([.I$24]+[.$BB34])+[.J$26]*[.$Z$5]*MAGNET([.J$24]+[.$BB34])+[.K$26]*[.$Z$5]*MAGNET([.K$24]+[.$BB34])+[.L$26]*[.$Z$5]*MAGNET([.L$24]+[.$BB34])+[.M$26]*[.$Z$5]*MAGNET([.M$24]+[.$BB34])+[.N$26]*[.$Z$5]*MAGNET([.N$24]+[.$BB34])+[.O$26]*[.$Z$5]*MAGNET([.O$24]+[.$BB34])+[.P$26]*[.$Z$5]*MAGNET([.P$24]+[.$BB34])+[.Q$26]*[.$Z$5]*MAGNET([.Q$24]+[.$BB34])+[.R$26]*[.$Z$5]*MAGNET([.R$24]+[.$BB34])+[.S$26]*[.$Z$5]*MAGNET([.S$24]+[.$BB34])+[.T$26]*[.$Z$5]*MAGNET([.T$24]+[.$BB34])+[.U$26]*[.$Z$5]*MAGNET([.U$24]+[.$BB34])+[.V$26]*[.$Z$5]*MAGNET([.V$24]+[.$BB34])+[.W$26]*[.$Z$5]*MAGNET([.W$24]+[.$BB34])+[.X$26]*[.$Z$5]*MAGNET([.X$24]+[.$BB34])+[.Y$26]*[.$Z$5]*MAGNET([.Y$24]+[.$BB34])+[.Z$26]*[.$Z$5]*MAGNET([.Z$24]+[.$BB34])+[.AA$26]*[.$Z$5]*MAGNET([.AA$24]+[.$BB34])+[.AB$26]*[.$Z$5]*MAGNET([.AB$24]+[.$BB34])+[.AC$26]*[.$Z$5]*MAGNET([.AC$24]+[.$BB34])+[.AD$26]*[.$Z$5]*MAGNET([.AD$24]+[.$BB34])+[.AE$26]*[.$Z$5]*MAGNET([.AE$24]+[.$BB34])+[.AF$26]*[.$Z$5]*MAGNET([.AF$24]+[.$BB34])+[.AG$26]*[.$Z$5]*MAGNET([.AG$24]+[.$BB34])+[.D$26]*[.$Z$5]*MAGNET([.D$24]+[.$BB34])+[.AH$26]*[.$Z$5]*MAGNET([.AH$24]+[.BB34]) +[.AI$26]*[.$Z$5]*MAGNET([.AI$24]+[.BB34]) +[.AJ$26]*[.$Z$5]*MAGNET([.AJ$24]+[.BB34]) +[.AK$26]*[.$Z$5]*MAGNET([.AK$24]+[.BB34]) +[.AL$26]*[.$Z$5]*MAGNET([.AL$24]+[.BB34]) +[.AM$26]*[.$Z$5]*MAGNET([.AM$24]+[.BB34]) +[.AN$26]*[.$Z$5]*MAGNET([.AN$24]+[.BB34]) +[.AO$26]*[.$Z$5]*MAGNET([.AO$24]+[.BB34]) +[.AP$26]*[.$Z$5]*MAGNET([.AP$24]+[.$BB34])&#10;+[.AQ$26]*[.$Z$5]*MAGNET([.AQ$24]+[.$BB34])&#10;+[.AR$26]*[.$Z$5]*MAGNET([.AR$24]+[.$BB34])&#10;+[.AS$26]*[.$Z$5]*MAGNET([.AS$24]+[.$BB34])&#10;+[.AT$26]*[.$Z$5]*MAGNET([.AT$24]+[.$BB34])&#10;+[.AU$26]*[.$Z$5]*MAGNET([.AU$24]+[.$BB34])&#10;+[.AV$26]*[.$Z$5]*MAGNET([.AV$24]+[.$BB34])&#10;+[.AW$26]*[.$Z$5]*MAGNET([.AW$24]+[.$BB34])&#10;+[.AX$26]*[.$Z$5]*MAGNET([.AX$24]+[.$BB34])&#10;+[.AY$26]*[.$Z$5]*MAGNET([.AY$24]+[.$BB34]) +RAND()*[.$BD$13]" office:value-type="float" office:value="-47.7349737030579" calcext:value-type="float">
            <text:p>-47.73</text:p>
          </table:table-cell>
          <table:table-cell table:style-name="ce71" table:formula="of:=[.E$27]*[.$Z$5]*MAGNET([.E$24]+[.$BB34])+[.F$27]*[.$Z$5]*MAGNET([.F$24]+[.$BB34])+[.G$27]*[.$Z$5]*MAGNET([.G$24]+[.$BB34])+[.H$27]*[.$Z$5]*MAGNET([.H$24]+[.$BB34])+[.I$27]*[.$Z$5]*MAGNET([.I$24]+[.$BB34])+[.J$27]*[.$Z$5]*MAGNET([.J$24]+[.$BB34])+[.K$27]*[.$Z$5]*MAGNET([.K$24]+[.$BB34])+[.L$27]*[.$Z$5]*MAGNET([.L$24]+[.$BB34])+[.M$27]*[.$Z$5]*MAGNET([.M$24]+[.$BB34])+[.N$27]*[.$Z$5]*MAGNET([.N$24]+[.$BB34])+[.O$27]*[.$Z$5]*MAGNET([.O$24]+[.$BB34])+[.P$27]*[.$Z$5]*MAGNET([.P$24]+[.$BB34])+[.Q$27]*[.$Z$5]*MAGNET([.Q$24]+[.$BB34])+[.R$27]*[.$Z$5]*MAGNET([.R$24]+[.$BB34])+[.S$27]*[.$Z$5]*MAGNET([.S$24]+[.$BB34])+[.T$27]*[.$Z$5]*MAGNET([.T$24]+[.$BB34])+[.U$27]*[.$Z$5]*MAGNET([.U$24]+[.$BB34])+[.V$27]*[.$Z$5]*MAGNET([.V$24]+[.$BB34])+[.W$27]*[.$Z$5]*MAGNET([.W$24]+[.$BB34])+[.X$27]*[.$Z$5]*MAGNET([.X$24]+[.$BB34])+[.Y$27]*[.$Z$5]*MAGNET([.Y$24]+[.$BB34])+[.Z$27]*[.$Z$5]*MAGNET([.Z$24]+[.$BB34])+[.AA$27]*[.$Z$5]*MAGNET([.AA$24]+[.$BB34])+[.AB$27]*[.$Z$5]*MAGNET([.AB$24]+[.$BB34])+[.AC$27]*[.$Z$5]*MAGNET([.AC$24]+[.$BB34])+[.AD$27]*[.$Z$5]*MAGNET([.AD$24]+[.$BB34])+[.AE$27]*[.$Z$5]*MAGNET([.AE$24]+[.$BB34])+[.AF$27]*[.$Z$5]*MAGNET([.AF$24]+[.$BB34])+[.AG$27]*[.$Z$5]*MAGNET([.AG$24]+[.$BB34])+[.D$27]*[.$Z$5]*MAGNET([.D$24]+[.$BB34])+[.AH$27]*[.$Z$5]*MAGNET([.AH$24]+[.BB34]) +[.AI$27]*[.$Z$5]*MAGNET([.AI$24]+[.BB34]) +[.AJ$27]*[.$Z$5]*MAGNET([.AJ$24]+[.BB34]) +[.AK$27]*[.$Z$5]*MAGNET([.AK$24]+[.BB34]) +[.AL$27]*[.$Z$5]*MAGNET([.AL$24]+[.BB34]) +[.AM$27]*[.$Z$5]*MAGNET([.AM$24]+[.BB34]) +[.AN$27]*[.$Z$5]*MAGNET([.AN$24]+[.BB34]) +[.AO$27]*[.$Z$5]*MAGNET([.AO$24]+[.BB34]) +[.AP$27]*[.$Z$5]*MAGNET([.AP$24]+[.$BB34])&#10;+[.AQ$27]*[.$Z$5]*MAGNET([.AQ$24]+[.$BB34])&#10;+[.AR$27]*[.$Z$5]*MAGNET([.AR$24]+[.$BB34])&#10;+[.AS$27]*[.$Z$5]*MAGNET([.AS$24]+[.$BB34])&#10;+[.AT$27]*[.$Z$5]*MAGNET([.AT$24]+[.$BB34])&#10;+[.AU$27]*[.$Z$5]*MAGNET([.AU$24]+[.$BB34])&#10;+[.AV$27]*[.$Z$5]*MAGNET([.AV$24]+[.$BB34])&#10;+[.AW$27]*[.$Z$5]*MAGNET([.AW$24]+[.$BB34])&#10;+[.AX$27]*[.$Z$5]*MAGNET([.AX$24]+[.$BB34])&#10;+[.AY$27]*[.$Z$5]*MAGNET([.AY$24]+[.$BB34]) +RAND()*[.$BE$13]" office:value-type="float" office:value="-77.7690917730395" calcext:value-type="float">
            <text:p>-77.7690917730395</text:p>
          </table:table-cell>
          <table:table-cell table:style-name="ce71" table:formula="of:=[.E$28]*[.$Z$5]*MAGNET([.E$24]+[.$BB34])+[.F$28]*[.$Z$5]*MAGNET([.F$24]+[.$BB34])+[.G$28]*[.$Z$5]*MAGNET([.G$24]+[.$BB34])+[.H$28]*[.$Z$5]*MAGNET([.H$24]+[.$BB34])+[.I$28]*[.$Z$5]*MAGNET([.I$24]+[.$BB34])+[.J$28]*[.$Z$5]*MAGNET([.J$24]+[.$BB34])+[.K$28]*[.$Z$5]*MAGNET([.K$24]+[.$BB34])+[.L$28]*[.$Z$5]*MAGNET([.L$24]+[.$BB34])+[.M$28]*[.$Z$5]*MAGNET([.M$24]+[.$BB34])+[.N$28]*[.$Z$5]*MAGNET([.N$24]+[.$BB34])+[.O$28]*[.$Z$5]*MAGNET([.O$24]+[.$BB34])+[.P$28]*[.$Z$5]*MAGNET([.P$24]+[.$BB34])+[.Q$28]*[.$Z$5]*MAGNET([.Q$24]+[.$BB34])+[.R$28]*[.$Z$5]*MAGNET([.R$24]+[.$BB34])+[.S$28]*[.$Z$5]*MAGNET([.S$24]+[.$BB34])+[.T$28]*[.$Z$5]*MAGNET([.T$24]+[.$BB34])+[.U$28]*[.$Z$5]*MAGNET([.U$24]+[.$BB34])+[.V$28]*[.$Z$5]*MAGNET([.V$24]+[.$BB34])+[.W$28]*[.$Z$5]*MAGNET([.W$24]+[.$BB34])+[.X$28]*[.$Z$5]*MAGNET([.X$24]+[.$BB34])+[.Y$28]*[.$Z$5]*MAGNET([.Y$24]+[.$BB34])+[.Z$28]*[.$Z$5]*MAGNET([.Z$24]+[.$BB34])+[.AA$28]*[.$Z$5]*MAGNET([.AA$24]+[.$BB34])+[.AB$28]*[.$Z$5]*MAGNET([.AB$24]+[.$BB34])+[.AC$28]*[.$Z$5]*MAGNET([.AC$24]+[.$BB34])+[.AD$28]*[.$Z$5]*MAGNET([.AD$24]+[.$BB34])+[.AE$28]*[.$Z$5]*MAGNET([.AE$24]+[.$BB34])+[.AF$28]*[.$Z$5]*MAGNET([.AF$24]+[.$BB34])+[.AG$28]*[.$Z$5]*MAGNET([.AG$24]+[.$BB34])+[.D$28]*[.$Z$5]*MAGNET([.D$24]+[.$BB34])+[.AH$28]*[.$Z$5]*MAGNET([.AH$24]+[.BB34]) +[.AI$28]*[.$Z$5]*MAGNET([.AI$24]+[.BB34]) +[.AJ$28]*[.$Z$5]*MAGNET([.AJ$24]+[.BB34]) +[.AK$28]*[.$Z$5]*MAGNET([.AK$24]+[.BB34]) +[.AL$28]*[.$Z$5]*MAGNET([.AL$24]+[.BB34]) +[.AM$28]*[.$Z$5]*MAGNET([.AM$24]+[.BB34]) +[.AN$28]*[.$Z$5]*MAGNET([.AN$24]+[.BB34]) +[.AO$28]*[.$Z$5]*MAGNET([.AO$24]+[.BB34]) +[.AP$28]*[.$Z$5]*MAGNET([.AP$24]+[.$BB34])&#10;+[.AQ$28]*[.$Z$5]*MAGNET([.AQ$24]+[.$BB34])&#10;+[.AR$28]*[.$Z$5]*MAGNET([.AR$24]+[.$BB34])&#10;+[.AS$28]*[.$Z$5]*MAGNET([.AS$24]+[.$BB34])&#10;+[.AT$28]*[.$Z$5]*MAGNET([.AT$24]+[.$BB34])&#10;+[.AU$28]*[.$Z$5]*MAGNET([.AU$24]+[.$BB34])&#10;+[.AV$28]*[.$Z$5]*MAGNET([.AV$24]+[.$BB34])&#10;+[.AW$28]*[.$Z$5]*MAGNET([.AW$24]+[.$BB34])&#10;+[.AX$28]*[.$Z$5]*MAGNET([.AX$24]+[.$BB34])&#10;+[.AY$28]*[.$Z$5]*MAGNET([.AY$24]+[.$BB34]) +RAND()*[.$BF$13]" office:value-type="float" office:value="-8.33398924842816" calcext:value-type="float">
            <text:p>-8.33398924842816</text:p>
          </table:table-cell>
          <table:table-cell table:style-name="ce71" table:formula="of:=[.E$29]*[.$Z$5]*MAGNET([.E$24]+[.$BB34])+[.F$29]*[.$Z$5]*MAGNET([.F$24]+[.$BB34])+[.G$29]*[.$Z$5]*MAGNET([.G$24]+[.$BB34])+[.H$29]*[.$Z$5]*MAGNET([.H$24]+[.$BB34])+[.I$29]*[.$Z$5]*MAGNET([.I$24]+[.$BB34])+[.J$29]*[.$Z$5]*MAGNET([.J$24]+[.$BB34])+[.K$29]*[.$Z$5]*MAGNET([.K$24]+[.$BB34])+[.L$29]*[.$Z$5]*MAGNET([.L$24]+[.$BB34])+[.M$29]*[.$Z$5]*MAGNET([.M$24]+[.$BB34])+[.N$29]*[.$Z$5]*MAGNET([.N$24]+[.$BB34])+[.O$29]*[.$Z$5]*MAGNET([.O$24]+[.$BB34])+[.P$29]*[.$Z$5]*MAGNET([.P$24]+[.$BB34])+[.Q$29]*[.$Z$5]*MAGNET([.Q$24]+[.$BB34])+[.R$29]*[.$Z$5]*MAGNET([.R$24]+[.$BB34])+[.S$29]*[.$Z$5]*MAGNET([.S$24]+[.$BB34])+[.T$29]*[.$Z$5]*MAGNET([.T$24]+[.$BB34])+[.U$29]*[.$Z$5]*MAGNET([.U$24]+[.$BB34])+[.V$29]*[.$Z$5]*MAGNET([.V$24]+[.$BB34])+[.W$29]*[.$Z$5]*MAGNET([.W$24]+[.$BB34])+[.X$29]*[.$Z$5]*MAGNET([.X$24]+[.$BB34])+[.Y$29]*[.$Z$5]*MAGNET([.Y$24]+[.$BB34])+[.Z$29]*[.$Z$5]*MAGNET([.Z$24]+[.$BB34])+[.AA$29]*[.$Z$5]*MAGNET([.AA$24]+[.$BB34])+[.AB$29]*[.$Z$5]*MAGNET([.AB$24]+[.$BB34])+[.AC$29]*[.$Z$5]*MAGNET([.AC$24]+[.$BB34])+[.AD$29]*[.$Z$5]*MAGNET([.AD$24]+[.$BB34])+[.AE$29]*[.$Z$5]*MAGNET([.AE$24]+[.$BB34])+[.AF$29]*[.$Z$5]*MAGNET([.AF$24]+[.$BB34])+[.AG$29]*[.$Z$5]*MAGNET([.AG$24]+[.$BB34])+[.D$29]*[.$Z$5]*MAGNET([.D$24]+[.$BB34])+[.AH$29]*[.$Z$5]*MAGNET([.AH$24]+[.BB34]) +[.AI$29]*[.$Z$5]*MAGNET([.AI$24]+[.BB34]) +[.AJ$29]*[.$Z$5]*MAGNET([.AJ$24]+[.BB34]) +[.AK$29]*[.$Z$5]*MAGNET([.AK$24]+[.BB34]) +[.AL$29]*[.$Z$5]*MAGNET([.AL$24]+[.BB34]) +[.AM$29]*[.$Z$5]*MAGNET([.AM$24]+[.BB34]) +[.AN$29]*[.$Z$5]*MAGNET([.AN$24]+[.BB34]) +[.AO$29]*[.$Z$5]*MAGNET([.AO$24]+[.BB34]) +[.AP$29]*[.$Z$5]*MAGNET([.AP$24]+[.$BB34])&#10;+[.AQ$29]*[.$Z$5]*MAGNET([.AQ$24]+[.$BB34])&#10;+[.AR$29]*[.$Z$5]*MAGNET([.AR$24]+[.$BB34])&#10;+[.AS$29]*[.$Z$5]*MAGNET([.AS$24]+[.$BB34])&#10;+[.AT$29]*[.$Z$5]*MAGNET([.AT$24]+[.$BB34])&#10;+[.AU$29]*[.$Z$5]*MAGNET([.AU$24]+[.$BB34])&#10;+[.AV$29]*[.$Z$5]*MAGNET([.AV$24]+[.$BB34])&#10;+[.AW$29]*[.$Z$5]*MAGNET([.AW$24]+[.$BB34])&#10;+[.AX$29]*[.$Z$5]*MAGNET([.AX$24]+[.$BB34])&#10;+[.AY$29]*[.$Z$5]*MAGNET([.AY$24]+[.$BB34]) +RAND()*[.$BG$13]" office:value-type="float" office:value="31.5738098021212" calcext:value-type="float">
            <text:p>31.5738098021212</text:p>
          </table:table-cell>
          <table:table-cell table:style-name="ce71" table:formula="of:=[.E$30]*[.$Z$5]*MAGNET([.E$24]+[.$BB34])+[.F$30]*[.$Z$5]*MAGNET([.F$24]+[.$BB34])+[.G$30]*[.$Z$5]*MAGNET([.G$24]+[.$BB34])+[.H$30]*[.$Z$5]*MAGNET([.H$24]+[.$BB34])+[.I$30]*[.$Z$5]*MAGNET([.I$24]+[.$BB34])+[.J$30]*[.$Z$5]*MAGNET([.J$24]+[.$BB34])+[.K$30]*[.$Z$5]*MAGNET([.K$24]+[.$BB34])+[.L$30]*[.$Z$5]*MAGNET([.L$24]+[.$BB34])+[.M$30]*[.$Z$5]*MAGNET([.M$24]+[.$BB34])+[.N$30]*[.$Z$5]*MAGNET([.N$24]+[.$BB34])+[.O$30]*[.$Z$5]*MAGNET([.O$24]+[.$BB34])+[.P$30]*[.$Z$5]*MAGNET([.P$24]+[.$BB34])+[.Q$30]*[.$Z$5]*MAGNET([.Q$24]+[.$BB34])+[.R$30]*[.$Z$5]*MAGNET([.R$24]+[.$BB34])+[.S$30]*[.$Z$5]*MAGNET([.S$24]+[.$BB34])+[.T$30]*[.$Z$5]*MAGNET([.T$24]+[.$BB34])+[.U$30]*[.$Z$5]*MAGNET([.U$24]+[.$BB34])+[.V$30]*[.$Z$5]*MAGNET([.V$24]+[.$BB34])+[.W$30]*[.$Z$5]*MAGNET([.W$24]+[.$BB34])+[.X$30]*[.$Z$5]*MAGNET([.X$24]+[.$BB34])+[.Y$30]*[.$Z$5]*MAGNET([.Y$24]+[.$BB34])+[.Z$30]*[.$Z$5]*MAGNET([.Z$24]+[.$BB34])+[.AA$30]*[.$Z$5]*MAGNET([.AA$24]+[.$BB34])+[.AB$30]*[.$Z$5]*MAGNET([.AB$24]+[.$BB34])+[.AC$30]*[.$Z$5]*MAGNET([.AC$24]+[.$BB34])+[.AD$30]*[.$Z$5]*MAGNET([.AD$24]+[.$BB34])+[.AE$30]*[.$Z$5]*MAGNET([.AE$24]+[.$BB34])+[.AF$30]*[.$Z$5]*MAGNET([.AF$24]+[.$BB34])+[.AG$30]*[.$Z$5]*MAGNET([.AG$24]+[.$BB34])+[.D$30]*[.$Z$5]*MAGNET([.D$24]+[.$BB34])+[.AH$30]*[.$Z$5]*MAGNET([.AH$24]+[.BB34]) +[.AI$30]*[.$Z$5]*MAGNET([.AI$24]+[.BB34]) +[.AJ$30]*[.$Z$5]*MAGNET([.AJ$24]+[.BB34]) +[.AK$30]*[.$Z$5]*MAGNET([.AK$24]+[.BB34]) +[.AL$30]*[.$Z$5]*MAGNET([.AL$24]+[.BB34]) +[.AM$30]*[.$Z$5]*MAGNET([.AM$24]+[.BB34]) +[.AN$30]*[.$Z$5]*MAGNET([.AN$24]+[.BB34]) +[.AO$30]*[.$Z$5]*MAGNET([.AO$24]+[.BB34]) +[.AP$30]*[.$Z$5]*MAGNET([.AP$24]+[.$BB34])&#10;+[.AQ$30]*[.$Z$5]*MAGNET([.AQ$24]+[.$BB34])&#10;+[.AR$30]*[.$Z$5]*MAGNET([.AR$24]+[.$BB34])&#10;+[.AS$30]*[.$Z$5]*MAGNET([.AS$24]+[.$BB34])&#10;+[.AT$30]*[.$Z$5]*MAGNET([.AT$24]+[.$BB34])&#10;+[.AU$30]*[.$Z$5]*MAGNET([.AU$24]+[.$BB34])&#10;+[.AV$30]*[.$Z$5]*MAGNET([.AV$24]+[.$BB34])&#10;+[.AW$30]*[.$Z$5]*MAGNET([.AW$24]+[.$BB34])&#10;+[.AX$30]*[.$Z$5]*MAGNET([.AX$24]+[.$BB34])&#10;+[.AY$30]*[.$Z$5]*MAGNET([.AY$24]+[.$BB34]) +RAND()*[.$BH$13]" office:value-type="float" office:value="0" calcext:value-type="float">
            <text:p>0</text:p>
          </table:table-cell>
          <table:table-cell table:style-name="ce71" table:formula="of:=[.E$31]*[.$Z$5]*MAGNET([.E$24]+[.$BB34])+[.F$31]*[.$Z$5]*MAGNET([.F$24]+[.$BB34])+[.G$31]*[.$Z$5]*MAGNET([.G$24]+[.$BB34])+[.H$31]*[.$Z$5]*MAGNET([.H$24]+[.$BB34])+[.I$31]*[.$Z$5]*MAGNET([.I$24]+[.$BB34])+[.J$31]*[.$Z$5]*MAGNET([.J$24]+[.$BB34])+[.K$31]*[.$Z$5]*MAGNET([.K$24]+[.$BB34])+[.L$31]*[.$Z$5]*MAGNET([.L$24]+[.$BB34])+[.M$31]*[.$Z$5]*MAGNET([.M$24]+[.$BB34])+[.N$31]*[.$Z$5]*MAGNET([.N$24]+[.$BB34])+[.O$31]*[.$Z$5]*MAGNET([.O$24]+[.$BB34])+[.P$31]*[.$Z$5]*MAGNET([.P$24]+[.$BB34])+[.Q$31]*[.$Z$5]*MAGNET([.Q$24]+[.$BB34])+[.R$31]*[.$Z$5]*MAGNET([.R$24]+[.$BB34])+[.S$31]*[.$Z$5]*MAGNET([.S$24]+[.$BB34])+[.T$31]*[.$Z$5]*MAGNET([.T$24]+[.$BB34])+[.U$31]*[.$Z$5]*MAGNET([.U$24]+[.$BB34])+[.V$31]*[.$Z$5]*MAGNET([.V$24]+[.$BB34])+[.W$31]*[.$Z$5]*MAGNET([.W$24]+[.$BB34])+[.X$31]*[.$Z$5]*MAGNET([.X$24]+[.$BB34])+[.Y$31]*[.$Z$5]*MAGNET([.Y$24]+[.$BB34])+[.Z$31]*[.$Z$5]*MAGNET([.Z$24]+[.$BB34])+[.AA$31]*[.$Z$5]*MAGNET([.AA$24]+[.$BB34])+[.AB$31]*[.$Z$5]*MAGNET([.AB$24]+[.$BB34])+[.AC$31]*[.$Z$5]*MAGNET([.AC$24]+[.$BB34])+[.AD$31]*[.$Z$5]*MAGNET([.AD$24]+[.$BB34])+[.AE$31]*[.$Z$5]*MAGNET([.AE$24]+[.$BB34])+[.AF$31]*[.$Z$5]*MAGNET([.AF$24]+[.$BB34])+[.AG$31]*[.$Z$5]*MAGNET([.AG$24]+[.$BB34])+[.D$31]*[.$Z$5]*MAGNET([.D$24]+[.$BB34])+[.AH$31]*[.$Z$5]*MAGNET([.AH$24]+[.BB34]) +[.AI$31]*[.$Z$5]*MAGNET([.AI$24]+[.BB34]) +[.AJ$31]*[.$Z$5]*MAGNET([.AJ$24]+[.BB34]) +[.AK$31]*[.$Z$5]*MAGNET([.AK$24]+[.BB34]) +[.AL$31]*[.$Z$5]*MAGNET([.AL$24]+[.BB34]) +[.AM$31]*[.$Z$5]*MAGNET([.AM$24]+[.BB34]) +[.AN$31]*[.$Z$5]*MAGNET([.AN$24]+[.BB34]) +[.AO$31]*[.$Z$5]*MAGNET([.AO$24]+[.BB34]) +[.AP$31]*[.$Z$5]*MAGNET([.AP$24]+[.$BB34])&#10;+[.AQ$31]*[.$Z$5]*MAGNET([.AQ$24]+[.$BB34])&#10;+[.AR$31]*[.$Z$5]*MAGNET([.AR$24]+[.$BB34])&#10;+[.AS$31]*[.$Z$5]*MAGNET([.AS$24]+[.$BB34])&#10;+[.AT$31]*[.$Z$5]*MAGNET([.AT$24]+[.$BB34])&#10;+[.AU$31]*[.$Z$5]*MAGNET([.AU$24]+[.$BB34])&#10;+[.AV$31]*[.$Z$5]*MAGNET([.AV$24]+[.$BB34])&#10;+[.AW$31]*[.$Z$5]*MAGNET([.AW$24]+[.$BB34])&#10;+[.AX$31]*[.$Z$5]*MAGNET([.AX$24]+[.$BB34])&#10;+[.AY$31]*[.$Z$5]*MAGNET([.AY$24]+[.$BB34]) +RAND()*[.$BI$13]" office:value-type="float" office:value="0" calcext:value-type="float">
            <text:p>0</text:p>
          </table:table-cell>
          <table:table-cell table:style-name="ce71" table:formula="of:=[.E$32]*[.$Z$5]*MAGNET([.E$24]+[.$BB34])+[.F$32]*[.$Z$5]*MAGNET([.F$24]+[.$BB34])+[.G$32]*[.$Z$5]*MAGNET([.G$24]+[.$BB34])+[.H$32]*[.$Z$5]*MAGNET([.H$24]+[.$BB34])+[.I$32]*[.$Z$5]*MAGNET([.I$24]+[.$BB34])+[.J$32]*[.$Z$5]*MAGNET([.J$24]+[.$BB34])+[.K$32]*[.$Z$5]*MAGNET([.K$24]+[.$BB34])+[.L$32]*[.$Z$5]*MAGNET([.L$24]+[.$BB34])+[.M$32]*[.$Z$5]*MAGNET([.M$24]+[.$BB34])+[.N$32]*[.$Z$5]*MAGNET([.N$24]+[.$BB34])+[.O$32]*[.$Z$5]*MAGNET([.O$24]+[.$BB34])+[.P$32]*[.$Z$5]*MAGNET([.P$24]+[.$BB34])+[.Q$32]*[.$Z$5]*MAGNET([.Q$24]+[.$BB34])+[.R$32]*[.$Z$5]*MAGNET([.R$24]+[.$BB34])+[.S$32]*[.$Z$5]*MAGNET([.S$24]+[.$BB34])+[.T$32]*[.$Z$5]*MAGNET([.T$24]+[.$BB34])+[.U$32]*[.$Z$5]*MAGNET([.U$24]+[.$BB34])+[.V$32]*[.$Z$5]*MAGNET([.V$24]+[.$BB34])+[.W$32]*[.$Z$5]*MAGNET([.W$24]+[.$BB34])+[.X$32]*[.$Z$5]*MAGNET([.X$24]+[.$BB34])+[.Y$32]*[.$Z$5]*MAGNET([.Y$24]+[.$BB34])+[.Z$32]*[.$Z$5]*MAGNET([.Z$24]+[.$BB34])+[.AA$32]*[.$Z$5]*MAGNET([.AA$24]+[.$BB34])+[.AB$32]*[.$Z$5]*MAGNET([.AB$24]+[.$BB34])+[.AC$32]*[.$Z$5]*MAGNET([.AC$24]+[.$BB34])+[.AD$32]*[.$Z$5]*MAGNET([.AD$24]+[.$BB34])+[.AE$32]*[.$Z$5]*MAGNET([.AE$24]+[.$BB34])+[.AF$32]*[.$Z$5]*MAGNET([.AF$24]+[.$BB34])+[.AG$32]*[.$Z$5]*MAGNET([.AG$24]+[.$BB34])+[.D$32]*[.$Z$5]*MAGNET([.D$24]+[.$BB34])+[.AH$32]*[.$Z$5]*MAGNET([.AH$24]+[.BB34]) +[.AI$32]*[.$Z$5]*MAGNET([.AI$24]+[.BB34]) +[.AJ$32]*[.$Z$5]*MAGNET([.AJ$24]+[.BB34]) +[.AK$32]*[.$Z$5]*MAGNET([.AK$24]+[.BB34]) +[.AL$32]*[.$Z$5]*MAGNET([.AL$24]+[.BB34]) +[.AM$32]*[.$Z$5]*MAGNET([.AM$24]+[.BB34]) +[.AN$32]*[.$Z$5]*MAGNET([.AN$24]+[.BB34]) +[.AO$32]*[.$Z$5]*MAGNET([.AO$24]+[.BB34]) +[.AP$32]*[.$Z$5]*MAGNET([.AP$24]+[.$BB34])&#10;+[.AQ$32]*[.$Z$5]*MAGNET([.AQ$24]+[.$BB34])&#10;+[.AR$32]*[.$Z$5]*MAGNET([.AR$24]+[.$BB34])&#10;+[.AS$32]*[.$Z$5]*MAGNET([.AS$24]+[.$BB34])&#10;+[.AT$32]*[.$Z$5]*MAGNET([.AT$24]+[.$BB34])&#10;+[.AU$32]*[.$Z$5]*MAGNET([.AU$24]+[.$BB34])&#10;+[.AV$32]*[.$Z$5]*MAGNET([.AV$24]+[.$BB34])&#10;+[.AW$32]*[.$Z$5]*MAGNET([.AW$24]+[.$BB34])&#10;+[.AX$32]*[.$Z$5]*MAGNET([.AX$24]+[.$BB34])&#10;+[.AY$32]*[.$Z$5]*MAGNET([.AY$24]+[.$BB3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34]+0.002" office:value-type="float" office:value="0.04" calcext:value-type="float">
            <text:p>0.04</text:p>
          </table:table-cell>
          <table:table-cell table:formula="of:=[.BA35]*[.$D$6]" office:value-type="float" office:value="2.01061929829747" calcext:value-type="float">
            <text:p>2.011</text:p>
          </table:table-cell>
          <table:table-cell table:formula="of:=[.D$25]*[.$Z$5]*MAGNET([.D$24]+[.BB35])+[.E$25]*[.$Z$5]*MAGNET([.E$24]+[.BB35])+[.F$25]*[.$Z$5]*MAGNET([.F$24]+[.BB35])+[.G$25]*[.$Z$5]*MAGNET([.G$24]+[.BB35])+[.H$25]*[.$Z$5]*MAGNET([.H$24]+[.BB35])+[.I$25]*[.$Z$5]*MAGNET([.I$24]+[.BB35])+[.J$25]*[.$Z$5]*MAGNET([.J$24]+[.BB35])+[.K$25]*[.$Z$5]*MAGNET([.K$24]+[.BB35])+[.L$25]*[.$Z$5]*MAGNET([.L$24]+[.BB35])+[.M$25]*[.$Z$5]*MAGNET([.M$24]+[.BB35])+[.N$25]*[.$Z$5]*MAGNET([.N$24]+[.BB35])+[.O$25]*[.$Z$5]*MAGNET([.O$24]+[.BB35])+[.P$25]*[.$Z$5]*MAGNET([.P$24]+[.BB35])+[.Q$25]*[.$Z$5]*MAGNET([.Q$24]+[.BB35])+[.R$25]*[.$Z$5]*MAGNET([.R$24]+[.BB35])+[.S$25]*[.$Z$5]*MAGNET([.S$24]+[.BB35])+[.T$25]*[.$Z$5]*MAGNET([.T$24]+[.BB35])+[.U$25]*[.$Z$5]*MAGNET([.U$24]+[.BB35])+[.V$25]*[.$Z$5]*MAGNET([.V$24]+[.BB35])+[.W$25]*[.$Z$5]*MAGNET([.W$24]+[.BB35])+[.X$25]*[.$Z$5]*MAGNET([.X$24]+[.BB35])+[.Y$25]*[.$Z$5]*MAGNET([.Y$24]+[.BB35])+[.Z$25]*[.$Z$5]*MAGNET([.Z$24]+[.BB35])+[.AA$25]*[.$Z$5]*MAGNET([.AA$24]+[.BB35])+[.AB$25]*[.$Z$5]*MAGNET([.AB$24]+[.BB35])+[.AC$25]*[.$Z$5]*MAGNET([.AC$24]+[.BB35])+[.AD$25]*[.$Z$5]*MAGNET([.AD$24]+[.BB35])+[.AE$25]*[.$Z$5]*MAGNET([.AE$24]+[.BB35])+[.AF$25]*[.$Z$5]*MAGNET([.AF$24]+[.BB35])+[.AG$25]*[.$Z$5]*MAGNET([.AG$24]+[.BB35])+[.AH$25]*[.$Z$5]*MAGNET([.AH$24]+[.BB35]) +[.AI$25]*[.$Z$5]*MAGNET([.AI$24]+[.BB35]) +[.AJ$25]*[.$Z$5]*MAGNET([.AJ$24]+[.BB35]) +[.AK$25]*[.$Z$5]*MAGNET([.AK$24]+[.BB35]) +[.AL$25]*[.$Z$5]*MAGNET([.AL$24]+[.BB35]) +[.AM$25]*[.$Z$5]*MAGNET([.AM$24]+[.BB35]) +[.AN$25]*[.$Z$5]*MAGNET([.AN$24]+[.BB35]) +[.AO$25]*[.$Z$5]*MAGNET([.AO$24]+[.BB35])+RAND()*[.$BC$13]+[.AP$25]*[.$Z$5]*MAGNET([.AP$24]+[.BB35])&#10;+[.AQ$25]*[.$Z$5]*MAGNET([.AQ$24]+[.BB35])&#10;+[.AR$25]*[.$Z$5]*MAGNET([.AR$24]+[.BB35])&#10;+[.AS$25]*[.$Z$5]*MAGNET([.AS$24]+[.BB35])&#10;+[.AT$25]*[.$Z$5]*MAGNET([.AT$24]+[.BB35])&#10;+[.AU$25]*[.$Z$5]*MAGNET([.AU$24]+[.BB35])&#10;+[.AV$25]*[.$Z$5]*MAGNET([.AV$24]+[.BB35])&#10;+[.AW$25]*[.$Z$5]*MAGNET([.AW$24]+[.BB35])&#10;+[.AX$25]*[.$Z$5]*MAGNET([.AX$24]+[.BB35])&#10;+[.AY$25]*[.$Z$5]*MAGNET([.AY$24]+[.BB35])" office:value-type="float" office:value="120.376283942091" calcext:value-type="float">
            <text:p>120.38</text:p>
          </table:table-cell>
          <table:table-cell table:style-name="ce70" table:formula="of:=[.E$26]*[.$Z$5]*MAGNET([.E$24]+[.$BB35])+[.F$26]*[.$Z$5]*MAGNET([.F$24]+[.$BB35])+[.G$26]*[.$Z$5]*MAGNET([.G$24]+[.$BB35])+[.H$26]*[.$Z$5]*MAGNET([.H$24]+[.$BB35])+[.I$26]*[.$Z$5]*MAGNET([.I$24]+[.$BB35])+[.J$26]*[.$Z$5]*MAGNET([.J$24]+[.$BB35])+[.K$26]*[.$Z$5]*MAGNET([.K$24]+[.$BB35])+[.L$26]*[.$Z$5]*MAGNET([.L$24]+[.$BB35])+[.M$26]*[.$Z$5]*MAGNET([.M$24]+[.$BB35])+[.N$26]*[.$Z$5]*MAGNET([.N$24]+[.$BB35])+[.O$26]*[.$Z$5]*MAGNET([.O$24]+[.$BB35])+[.P$26]*[.$Z$5]*MAGNET([.P$24]+[.$BB35])+[.Q$26]*[.$Z$5]*MAGNET([.Q$24]+[.$BB35])+[.R$26]*[.$Z$5]*MAGNET([.R$24]+[.$BB35])+[.S$26]*[.$Z$5]*MAGNET([.S$24]+[.$BB35])+[.T$26]*[.$Z$5]*MAGNET([.T$24]+[.$BB35])+[.U$26]*[.$Z$5]*MAGNET([.U$24]+[.$BB35])+[.V$26]*[.$Z$5]*MAGNET([.V$24]+[.$BB35])+[.W$26]*[.$Z$5]*MAGNET([.W$24]+[.$BB35])+[.X$26]*[.$Z$5]*MAGNET([.X$24]+[.$BB35])+[.Y$26]*[.$Z$5]*MAGNET([.Y$24]+[.$BB35])+[.Z$26]*[.$Z$5]*MAGNET([.Z$24]+[.$BB35])+[.AA$26]*[.$Z$5]*MAGNET([.AA$24]+[.$BB35])+[.AB$26]*[.$Z$5]*MAGNET([.AB$24]+[.$BB35])+[.AC$26]*[.$Z$5]*MAGNET([.AC$24]+[.$BB35])+[.AD$26]*[.$Z$5]*MAGNET([.AD$24]+[.$BB35])+[.AE$26]*[.$Z$5]*MAGNET([.AE$24]+[.$BB35])+[.AF$26]*[.$Z$5]*MAGNET([.AF$24]+[.$BB35])+[.AG$26]*[.$Z$5]*MAGNET([.AG$24]+[.$BB35])+[.D$26]*[.$Z$5]*MAGNET([.D$24]+[.$BB35])+[.AH$26]*[.$Z$5]*MAGNET([.AH$24]+[.BB35]) +[.AI$26]*[.$Z$5]*MAGNET([.AI$24]+[.BB35]) +[.AJ$26]*[.$Z$5]*MAGNET([.AJ$24]+[.BB35]) +[.AK$26]*[.$Z$5]*MAGNET([.AK$24]+[.BB35]) +[.AL$26]*[.$Z$5]*MAGNET([.AL$24]+[.BB35]) +[.AM$26]*[.$Z$5]*MAGNET([.AM$24]+[.BB35]) +[.AN$26]*[.$Z$5]*MAGNET([.AN$24]+[.BB35]) +[.AO$26]*[.$Z$5]*MAGNET([.AO$24]+[.BB35]) +[.AP$26]*[.$Z$5]*MAGNET([.AP$24]+[.$BB35])&#10;+[.AQ$26]*[.$Z$5]*MAGNET([.AQ$24]+[.$BB35])&#10;+[.AR$26]*[.$Z$5]*MAGNET([.AR$24]+[.$BB35])&#10;+[.AS$26]*[.$Z$5]*MAGNET([.AS$24]+[.$BB35])&#10;+[.AT$26]*[.$Z$5]*MAGNET([.AT$24]+[.$BB35])&#10;+[.AU$26]*[.$Z$5]*MAGNET([.AU$24]+[.$BB35])&#10;+[.AV$26]*[.$Z$5]*MAGNET([.AV$24]+[.$BB35])&#10;+[.AW$26]*[.$Z$5]*MAGNET([.AW$24]+[.$BB35])&#10;+[.AX$26]*[.$Z$5]*MAGNET([.AX$24]+[.$BB35])&#10;+[.AY$26]*[.$Z$5]*MAGNET([.AY$24]+[.$BB35]) +RAND()*[.$BD$13]" office:value-type="float" office:value="-56.864306107771" calcext:value-type="float">
            <text:p>-56.86</text:p>
          </table:table-cell>
          <table:table-cell table:style-name="ce71" table:formula="of:=[.E$27]*[.$Z$5]*MAGNET([.E$24]+[.$BB35])+[.F$27]*[.$Z$5]*MAGNET([.F$24]+[.$BB35])+[.G$27]*[.$Z$5]*MAGNET([.G$24]+[.$BB35])+[.H$27]*[.$Z$5]*MAGNET([.H$24]+[.$BB35])+[.I$27]*[.$Z$5]*MAGNET([.I$24]+[.$BB35])+[.J$27]*[.$Z$5]*MAGNET([.J$24]+[.$BB35])+[.K$27]*[.$Z$5]*MAGNET([.K$24]+[.$BB35])+[.L$27]*[.$Z$5]*MAGNET([.L$24]+[.$BB35])+[.M$27]*[.$Z$5]*MAGNET([.M$24]+[.$BB35])+[.N$27]*[.$Z$5]*MAGNET([.N$24]+[.$BB35])+[.O$27]*[.$Z$5]*MAGNET([.O$24]+[.$BB35])+[.P$27]*[.$Z$5]*MAGNET([.P$24]+[.$BB35])+[.Q$27]*[.$Z$5]*MAGNET([.Q$24]+[.$BB35])+[.R$27]*[.$Z$5]*MAGNET([.R$24]+[.$BB35])+[.S$27]*[.$Z$5]*MAGNET([.S$24]+[.$BB35])+[.T$27]*[.$Z$5]*MAGNET([.T$24]+[.$BB35])+[.U$27]*[.$Z$5]*MAGNET([.U$24]+[.$BB35])+[.V$27]*[.$Z$5]*MAGNET([.V$24]+[.$BB35])+[.W$27]*[.$Z$5]*MAGNET([.W$24]+[.$BB35])+[.X$27]*[.$Z$5]*MAGNET([.X$24]+[.$BB35])+[.Y$27]*[.$Z$5]*MAGNET([.Y$24]+[.$BB35])+[.Z$27]*[.$Z$5]*MAGNET([.Z$24]+[.$BB35])+[.AA$27]*[.$Z$5]*MAGNET([.AA$24]+[.$BB35])+[.AB$27]*[.$Z$5]*MAGNET([.AB$24]+[.$BB35])+[.AC$27]*[.$Z$5]*MAGNET([.AC$24]+[.$BB35])+[.AD$27]*[.$Z$5]*MAGNET([.AD$24]+[.$BB35])+[.AE$27]*[.$Z$5]*MAGNET([.AE$24]+[.$BB35])+[.AF$27]*[.$Z$5]*MAGNET([.AF$24]+[.$BB35])+[.AG$27]*[.$Z$5]*MAGNET([.AG$24]+[.$BB35])+[.D$27]*[.$Z$5]*MAGNET([.D$24]+[.$BB35])+[.AH$27]*[.$Z$5]*MAGNET([.AH$24]+[.BB35]) +[.AI$27]*[.$Z$5]*MAGNET([.AI$24]+[.BB35]) +[.AJ$27]*[.$Z$5]*MAGNET([.AJ$24]+[.BB35]) +[.AK$27]*[.$Z$5]*MAGNET([.AK$24]+[.BB35]) +[.AL$27]*[.$Z$5]*MAGNET([.AL$24]+[.BB35]) +[.AM$27]*[.$Z$5]*MAGNET([.AM$24]+[.BB35]) +[.AN$27]*[.$Z$5]*MAGNET([.AN$24]+[.BB35]) +[.AO$27]*[.$Z$5]*MAGNET([.AO$24]+[.BB35]) +[.AP$27]*[.$Z$5]*MAGNET([.AP$24]+[.$BB35])&#10;+[.AQ$27]*[.$Z$5]*MAGNET([.AQ$24]+[.$BB35])&#10;+[.AR$27]*[.$Z$5]*MAGNET([.AR$24]+[.$BB35])&#10;+[.AS$27]*[.$Z$5]*MAGNET([.AS$24]+[.$BB35])&#10;+[.AT$27]*[.$Z$5]*MAGNET([.AT$24]+[.$BB35])&#10;+[.AU$27]*[.$Z$5]*MAGNET([.AU$24]+[.$BB35])&#10;+[.AV$27]*[.$Z$5]*MAGNET([.AV$24]+[.$BB35])&#10;+[.AW$27]*[.$Z$5]*MAGNET([.AW$24]+[.$BB35])&#10;+[.AX$27]*[.$Z$5]*MAGNET([.AX$24]+[.$BB35])&#10;+[.AY$27]*[.$Z$5]*MAGNET([.AY$24]+[.$BB35]) +RAND()*[.$BE$13]" office:value-type="float" office:value="-71.3051884006697" calcext:value-type="float">
            <text:p>-71.3051884006697</text:p>
          </table:table-cell>
          <table:table-cell table:style-name="ce71" table:formula="of:=[.E$28]*[.$Z$5]*MAGNET([.E$24]+[.$BB35])+[.F$28]*[.$Z$5]*MAGNET([.F$24]+[.$BB35])+[.G$28]*[.$Z$5]*MAGNET([.G$24]+[.$BB35])+[.H$28]*[.$Z$5]*MAGNET([.H$24]+[.$BB35])+[.I$28]*[.$Z$5]*MAGNET([.I$24]+[.$BB35])+[.J$28]*[.$Z$5]*MAGNET([.J$24]+[.$BB35])+[.K$28]*[.$Z$5]*MAGNET([.K$24]+[.$BB35])+[.L$28]*[.$Z$5]*MAGNET([.L$24]+[.$BB35])+[.M$28]*[.$Z$5]*MAGNET([.M$24]+[.$BB35])+[.N$28]*[.$Z$5]*MAGNET([.N$24]+[.$BB35])+[.O$28]*[.$Z$5]*MAGNET([.O$24]+[.$BB35])+[.P$28]*[.$Z$5]*MAGNET([.P$24]+[.$BB35])+[.Q$28]*[.$Z$5]*MAGNET([.Q$24]+[.$BB35])+[.R$28]*[.$Z$5]*MAGNET([.R$24]+[.$BB35])+[.S$28]*[.$Z$5]*MAGNET([.S$24]+[.$BB35])+[.T$28]*[.$Z$5]*MAGNET([.T$24]+[.$BB35])+[.U$28]*[.$Z$5]*MAGNET([.U$24]+[.$BB35])+[.V$28]*[.$Z$5]*MAGNET([.V$24]+[.$BB35])+[.W$28]*[.$Z$5]*MAGNET([.W$24]+[.$BB35])+[.X$28]*[.$Z$5]*MAGNET([.X$24]+[.$BB35])+[.Y$28]*[.$Z$5]*MAGNET([.Y$24]+[.$BB35])+[.Z$28]*[.$Z$5]*MAGNET([.Z$24]+[.$BB35])+[.AA$28]*[.$Z$5]*MAGNET([.AA$24]+[.$BB35])+[.AB$28]*[.$Z$5]*MAGNET([.AB$24]+[.$BB35])+[.AC$28]*[.$Z$5]*MAGNET([.AC$24]+[.$BB35])+[.AD$28]*[.$Z$5]*MAGNET([.AD$24]+[.$BB35])+[.AE$28]*[.$Z$5]*MAGNET([.AE$24]+[.$BB35])+[.AF$28]*[.$Z$5]*MAGNET([.AF$24]+[.$BB35])+[.AG$28]*[.$Z$5]*MAGNET([.AG$24]+[.$BB35])+[.D$28]*[.$Z$5]*MAGNET([.D$24]+[.$BB35])+[.AH$28]*[.$Z$5]*MAGNET([.AH$24]+[.BB35]) +[.AI$28]*[.$Z$5]*MAGNET([.AI$24]+[.BB35]) +[.AJ$28]*[.$Z$5]*MAGNET([.AJ$24]+[.BB35]) +[.AK$28]*[.$Z$5]*MAGNET([.AK$24]+[.BB35]) +[.AL$28]*[.$Z$5]*MAGNET([.AL$24]+[.BB35]) +[.AM$28]*[.$Z$5]*MAGNET([.AM$24]+[.BB35]) +[.AN$28]*[.$Z$5]*MAGNET([.AN$24]+[.BB35]) +[.AO$28]*[.$Z$5]*MAGNET([.AO$24]+[.BB35]) +[.AP$28]*[.$Z$5]*MAGNET([.AP$24]+[.$BB35])&#10;+[.AQ$28]*[.$Z$5]*MAGNET([.AQ$24]+[.$BB35])&#10;+[.AR$28]*[.$Z$5]*MAGNET([.AR$24]+[.$BB35])&#10;+[.AS$28]*[.$Z$5]*MAGNET([.AS$24]+[.$BB35])&#10;+[.AT$28]*[.$Z$5]*MAGNET([.AT$24]+[.$BB35])&#10;+[.AU$28]*[.$Z$5]*MAGNET([.AU$24]+[.$BB35])&#10;+[.AV$28]*[.$Z$5]*MAGNET([.AV$24]+[.$BB35])&#10;+[.AW$28]*[.$Z$5]*MAGNET([.AW$24]+[.$BB35])&#10;+[.AX$28]*[.$Z$5]*MAGNET([.AX$24]+[.$BB35])&#10;+[.AY$28]*[.$Z$5]*MAGNET([.AY$24]+[.$BB35]) +RAND()*[.$BF$13]" office:value-type="float" office:value="-6.88857806060949" calcext:value-type="float">
            <text:p>-6.88857806060949</text:p>
          </table:table-cell>
          <table:table-cell table:style-name="ce71" table:formula="of:=[.E$29]*[.$Z$5]*MAGNET([.E$24]+[.$BB35])+[.F$29]*[.$Z$5]*MAGNET([.F$24]+[.$BB35])+[.G$29]*[.$Z$5]*MAGNET([.G$24]+[.$BB35])+[.H$29]*[.$Z$5]*MAGNET([.H$24]+[.$BB35])+[.I$29]*[.$Z$5]*MAGNET([.I$24]+[.$BB35])+[.J$29]*[.$Z$5]*MAGNET([.J$24]+[.$BB35])+[.K$29]*[.$Z$5]*MAGNET([.K$24]+[.$BB35])+[.L$29]*[.$Z$5]*MAGNET([.L$24]+[.$BB35])+[.M$29]*[.$Z$5]*MAGNET([.M$24]+[.$BB35])+[.N$29]*[.$Z$5]*MAGNET([.N$24]+[.$BB35])+[.O$29]*[.$Z$5]*MAGNET([.O$24]+[.$BB35])+[.P$29]*[.$Z$5]*MAGNET([.P$24]+[.$BB35])+[.Q$29]*[.$Z$5]*MAGNET([.Q$24]+[.$BB35])+[.R$29]*[.$Z$5]*MAGNET([.R$24]+[.$BB35])+[.S$29]*[.$Z$5]*MAGNET([.S$24]+[.$BB35])+[.T$29]*[.$Z$5]*MAGNET([.T$24]+[.$BB35])+[.U$29]*[.$Z$5]*MAGNET([.U$24]+[.$BB35])+[.V$29]*[.$Z$5]*MAGNET([.V$24]+[.$BB35])+[.W$29]*[.$Z$5]*MAGNET([.W$24]+[.$BB35])+[.X$29]*[.$Z$5]*MAGNET([.X$24]+[.$BB35])+[.Y$29]*[.$Z$5]*MAGNET([.Y$24]+[.$BB35])+[.Z$29]*[.$Z$5]*MAGNET([.Z$24]+[.$BB35])+[.AA$29]*[.$Z$5]*MAGNET([.AA$24]+[.$BB35])+[.AB$29]*[.$Z$5]*MAGNET([.AB$24]+[.$BB35])+[.AC$29]*[.$Z$5]*MAGNET([.AC$24]+[.$BB35])+[.AD$29]*[.$Z$5]*MAGNET([.AD$24]+[.$BB35])+[.AE$29]*[.$Z$5]*MAGNET([.AE$24]+[.$BB35])+[.AF$29]*[.$Z$5]*MAGNET([.AF$24]+[.$BB35])+[.AG$29]*[.$Z$5]*MAGNET([.AG$24]+[.$BB35])+[.D$29]*[.$Z$5]*MAGNET([.D$24]+[.$BB35])+[.AH$29]*[.$Z$5]*MAGNET([.AH$24]+[.BB35]) +[.AI$29]*[.$Z$5]*MAGNET([.AI$24]+[.BB35]) +[.AJ$29]*[.$Z$5]*MAGNET([.AJ$24]+[.BB35]) +[.AK$29]*[.$Z$5]*MAGNET([.AK$24]+[.BB35]) +[.AL$29]*[.$Z$5]*MAGNET([.AL$24]+[.BB35]) +[.AM$29]*[.$Z$5]*MAGNET([.AM$24]+[.BB35]) +[.AN$29]*[.$Z$5]*MAGNET([.AN$24]+[.BB35]) +[.AO$29]*[.$Z$5]*MAGNET([.AO$24]+[.BB35]) +[.AP$29]*[.$Z$5]*MAGNET([.AP$24]+[.$BB35])&#10;+[.AQ$29]*[.$Z$5]*MAGNET([.AQ$24]+[.$BB35])&#10;+[.AR$29]*[.$Z$5]*MAGNET([.AR$24]+[.$BB35])&#10;+[.AS$29]*[.$Z$5]*MAGNET([.AS$24]+[.$BB35])&#10;+[.AT$29]*[.$Z$5]*MAGNET([.AT$24]+[.$BB35])&#10;+[.AU$29]*[.$Z$5]*MAGNET([.AU$24]+[.$BB35])&#10;+[.AV$29]*[.$Z$5]*MAGNET([.AV$24]+[.$BB35])&#10;+[.AW$29]*[.$Z$5]*MAGNET([.AW$24]+[.$BB35])&#10;+[.AX$29]*[.$Z$5]*MAGNET([.AX$24]+[.$BB35])&#10;+[.AY$29]*[.$Z$5]*MAGNET([.AY$24]+[.$BB35]) +RAND()*[.$BG$13]" office:value-type="float" office:value="28.0015587075403" calcext:value-type="float">
            <text:p>28.0015587075403</text:p>
          </table:table-cell>
          <table:table-cell table:style-name="ce71" table:formula="of:=[.E$30]*[.$Z$5]*MAGNET([.E$24]+[.$BB35])+[.F$30]*[.$Z$5]*MAGNET([.F$24]+[.$BB35])+[.G$30]*[.$Z$5]*MAGNET([.G$24]+[.$BB35])+[.H$30]*[.$Z$5]*MAGNET([.H$24]+[.$BB35])+[.I$30]*[.$Z$5]*MAGNET([.I$24]+[.$BB35])+[.J$30]*[.$Z$5]*MAGNET([.J$24]+[.$BB35])+[.K$30]*[.$Z$5]*MAGNET([.K$24]+[.$BB35])+[.L$30]*[.$Z$5]*MAGNET([.L$24]+[.$BB35])+[.M$30]*[.$Z$5]*MAGNET([.M$24]+[.$BB35])+[.N$30]*[.$Z$5]*MAGNET([.N$24]+[.$BB35])+[.O$30]*[.$Z$5]*MAGNET([.O$24]+[.$BB35])+[.P$30]*[.$Z$5]*MAGNET([.P$24]+[.$BB35])+[.Q$30]*[.$Z$5]*MAGNET([.Q$24]+[.$BB35])+[.R$30]*[.$Z$5]*MAGNET([.R$24]+[.$BB35])+[.S$30]*[.$Z$5]*MAGNET([.S$24]+[.$BB35])+[.T$30]*[.$Z$5]*MAGNET([.T$24]+[.$BB35])+[.U$30]*[.$Z$5]*MAGNET([.U$24]+[.$BB35])+[.V$30]*[.$Z$5]*MAGNET([.V$24]+[.$BB35])+[.W$30]*[.$Z$5]*MAGNET([.W$24]+[.$BB35])+[.X$30]*[.$Z$5]*MAGNET([.X$24]+[.$BB35])+[.Y$30]*[.$Z$5]*MAGNET([.Y$24]+[.$BB35])+[.Z$30]*[.$Z$5]*MAGNET([.Z$24]+[.$BB35])+[.AA$30]*[.$Z$5]*MAGNET([.AA$24]+[.$BB35])+[.AB$30]*[.$Z$5]*MAGNET([.AB$24]+[.$BB35])+[.AC$30]*[.$Z$5]*MAGNET([.AC$24]+[.$BB35])+[.AD$30]*[.$Z$5]*MAGNET([.AD$24]+[.$BB35])+[.AE$30]*[.$Z$5]*MAGNET([.AE$24]+[.$BB35])+[.AF$30]*[.$Z$5]*MAGNET([.AF$24]+[.$BB35])+[.AG$30]*[.$Z$5]*MAGNET([.AG$24]+[.$BB35])+[.D$30]*[.$Z$5]*MAGNET([.D$24]+[.$BB35])+[.AH$30]*[.$Z$5]*MAGNET([.AH$24]+[.BB35]) +[.AI$30]*[.$Z$5]*MAGNET([.AI$24]+[.BB35]) +[.AJ$30]*[.$Z$5]*MAGNET([.AJ$24]+[.BB35]) +[.AK$30]*[.$Z$5]*MAGNET([.AK$24]+[.BB35]) +[.AL$30]*[.$Z$5]*MAGNET([.AL$24]+[.BB35]) +[.AM$30]*[.$Z$5]*MAGNET([.AM$24]+[.BB35]) +[.AN$30]*[.$Z$5]*MAGNET([.AN$24]+[.BB35]) +[.AO$30]*[.$Z$5]*MAGNET([.AO$24]+[.BB35]) +[.AP$30]*[.$Z$5]*MAGNET([.AP$24]+[.$BB35])&#10;+[.AQ$30]*[.$Z$5]*MAGNET([.AQ$24]+[.$BB35])&#10;+[.AR$30]*[.$Z$5]*MAGNET([.AR$24]+[.$BB35])&#10;+[.AS$30]*[.$Z$5]*MAGNET([.AS$24]+[.$BB35])&#10;+[.AT$30]*[.$Z$5]*MAGNET([.AT$24]+[.$BB35])&#10;+[.AU$30]*[.$Z$5]*MAGNET([.AU$24]+[.$BB35])&#10;+[.AV$30]*[.$Z$5]*MAGNET([.AV$24]+[.$BB35])&#10;+[.AW$30]*[.$Z$5]*MAGNET([.AW$24]+[.$BB35])&#10;+[.AX$30]*[.$Z$5]*MAGNET([.AX$24]+[.$BB35])&#10;+[.AY$30]*[.$Z$5]*MAGNET([.AY$24]+[.$BB35]) +RAND()*[.$BH$13]" office:value-type="float" office:value="0" calcext:value-type="float">
            <text:p>0</text:p>
          </table:table-cell>
          <table:table-cell table:style-name="ce71" table:formula="of:=[.E$31]*[.$Z$5]*MAGNET([.E$24]+[.$BB35])+[.F$31]*[.$Z$5]*MAGNET([.F$24]+[.$BB35])+[.G$31]*[.$Z$5]*MAGNET([.G$24]+[.$BB35])+[.H$31]*[.$Z$5]*MAGNET([.H$24]+[.$BB35])+[.I$31]*[.$Z$5]*MAGNET([.I$24]+[.$BB35])+[.J$31]*[.$Z$5]*MAGNET([.J$24]+[.$BB35])+[.K$31]*[.$Z$5]*MAGNET([.K$24]+[.$BB35])+[.L$31]*[.$Z$5]*MAGNET([.L$24]+[.$BB35])+[.M$31]*[.$Z$5]*MAGNET([.M$24]+[.$BB35])+[.N$31]*[.$Z$5]*MAGNET([.N$24]+[.$BB35])+[.O$31]*[.$Z$5]*MAGNET([.O$24]+[.$BB35])+[.P$31]*[.$Z$5]*MAGNET([.P$24]+[.$BB35])+[.Q$31]*[.$Z$5]*MAGNET([.Q$24]+[.$BB35])+[.R$31]*[.$Z$5]*MAGNET([.R$24]+[.$BB35])+[.S$31]*[.$Z$5]*MAGNET([.S$24]+[.$BB35])+[.T$31]*[.$Z$5]*MAGNET([.T$24]+[.$BB35])+[.U$31]*[.$Z$5]*MAGNET([.U$24]+[.$BB35])+[.V$31]*[.$Z$5]*MAGNET([.V$24]+[.$BB35])+[.W$31]*[.$Z$5]*MAGNET([.W$24]+[.$BB35])+[.X$31]*[.$Z$5]*MAGNET([.X$24]+[.$BB35])+[.Y$31]*[.$Z$5]*MAGNET([.Y$24]+[.$BB35])+[.Z$31]*[.$Z$5]*MAGNET([.Z$24]+[.$BB35])+[.AA$31]*[.$Z$5]*MAGNET([.AA$24]+[.$BB35])+[.AB$31]*[.$Z$5]*MAGNET([.AB$24]+[.$BB35])+[.AC$31]*[.$Z$5]*MAGNET([.AC$24]+[.$BB35])+[.AD$31]*[.$Z$5]*MAGNET([.AD$24]+[.$BB35])+[.AE$31]*[.$Z$5]*MAGNET([.AE$24]+[.$BB35])+[.AF$31]*[.$Z$5]*MAGNET([.AF$24]+[.$BB35])+[.AG$31]*[.$Z$5]*MAGNET([.AG$24]+[.$BB35])+[.D$31]*[.$Z$5]*MAGNET([.D$24]+[.$BB35])+[.AH$31]*[.$Z$5]*MAGNET([.AH$24]+[.BB35]) +[.AI$31]*[.$Z$5]*MAGNET([.AI$24]+[.BB35]) +[.AJ$31]*[.$Z$5]*MAGNET([.AJ$24]+[.BB35]) +[.AK$31]*[.$Z$5]*MAGNET([.AK$24]+[.BB35]) +[.AL$31]*[.$Z$5]*MAGNET([.AL$24]+[.BB35]) +[.AM$31]*[.$Z$5]*MAGNET([.AM$24]+[.BB35]) +[.AN$31]*[.$Z$5]*MAGNET([.AN$24]+[.BB35]) +[.AO$31]*[.$Z$5]*MAGNET([.AO$24]+[.BB35]) +[.AP$31]*[.$Z$5]*MAGNET([.AP$24]+[.$BB35])&#10;+[.AQ$31]*[.$Z$5]*MAGNET([.AQ$24]+[.$BB35])&#10;+[.AR$31]*[.$Z$5]*MAGNET([.AR$24]+[.$BB35])&#10;+[.AS$31]*[.$Z$5]*MAGNET([.AS$24]+[.$BB35])&#10;+[.AT$31]*[.$Z$5]*MAGNET([.AT$24]+[.$BB35])&#10;+[.AU$31]*[.$Z$5]*MAGNET([.AU$24]+[.$BB35])&#10;+[.AV$31]*[.$Z$5]*MAGNET([.AV$24]+[.$BB35])&#10;+[.AW$31]*[.$Z$5]*MAGNET([.AW$24]+[.$BB35])&#10;+[.AX$31]*[.$Z$5]*MAGNET([.AX$24]+[.$BB35])&#10;+[.AY$31]*[.$Z$5]*MAGNET([.AY$24]+[.$BB35]) +RAND()*[.$BI$13]" office:value-type="float" office:value="0" calcext:value-type="float">
            <text:p>0</text:p>
          </table:table-cell>
          <table:table-cell table:style-name="ce71" table:formula="of:=[.E$32]*[.$Z$5]*MAGNET([.E$24]+[.$BB35])+[.F$32]*[.$Z$5]*MAGNET([.F$24]+[.$BB35])+[.G$32]*[.$Z$5]*MAGNET([.G$24]+[.$BB35])+[.H$32]*[.$Z$5]*MAGNET([.H$24]+[.$BB35])+[.I$32]*[.$Z$5]*MAGNET([.I$24]+[.$BB35])+[.J$32]*[.$Z$5]*MAGNET([.J$24]+[.$BB35])+[.K$32]*[.$Z$5]*MAGNET([.K$24]+[.$BB35])+[.L$32]*[.$Z$5]*MAGNET([.L$24]+[.$BB35])+[.M$32]*[.$Z$5]*MAGNET([.M$24]+[.$BB35])+[.N$32]*[.$Z$5]*MAGNET([.N$24]+[.$BB35])+[.O$32]*[.$Z$5]*MAGNET([.O$24]+[.$BB35])+[.P$32]*[.$Z$5]*MAGNET([.P$24]+[.$BB35])+[.Q$32]*[.$Z$5]*MAGNET([.Q$24]+[.$BB35])+[.R$32]*[.$Z$5]*MAGNET([.R$24]+[.$BB35])+[.S$32]*[.$Z$5]*MAGNET([.S$24]+[.$BB35])+[.T$32]*[.$Z$5]*MAGNET([.T$24]+[.$BB35])+[.U$32]*[.$Z$5]*MAGNET([.U$24]+[.$BB35])+[.V$32]*[.$Z$5]*MAGNET([.V$24]+[.$BB35])+[.W$32]*[.$Z$5]*MAGNET([.W$24]+[.$BB35])+[.X$32]*[.$Z$5]*MAGNET([.X$24]+[.$BB35])+[.Y$32]*[.$Z$5]*MAGNET([.Y$24]+[.$BB35])+[.Z$32]*[.$Z$5]*MAGNET([.Z$24]+[.$BB35])+[.AA$32]*[.$Z$5]*MAGNET([.AA$24]+[.$BB35])+[.AB$32]*[.$Z$5]*MAGNET([.AB$24]+[.$BB35])+[.AC$32]*[.$Z$5]*MAGNET([.AC$24]+[.$BB35])+[.AD$32]*[.$Z$5]*MAGNET([.AD$24]+[.$BB35])+[.AE$32]*[.$Z$5]*MAGNET([.AE$24]+[.$BB35])+[.AF$32]*[.$Z$5]*MAGNET([.AF$24]+[.$BB35])+[.AG$32]*[.$Z$5]*MAGNET([.AG$24]+[.$BB35])+[.D$32]*[.$Z$5]*MAGNET([.D$24]+[.$BB35])+[.AH$32]*[.$Z$5]*MAGNET([.AH$24]+[.BB35]) +[.AI$32]*[.$Z$5]*MAGNET([.AI$24]+[.BB35]) +[.AJ$32]*[.$Z$5]*MAGNET([.AJ$24]+[.BB35]) +[.AK$32]*[.$Z$5]*MAGNET([.AK$24]+[.BB35]) +[.AL$32]*[.$Z$5]*MAGNET([.AL$24]+[.BB35]) +[.AM$32]*[.$Z$5]*MAGNET([.AM$24]+[.BB35]) +[.AN$32]*[.$Z$5]*MAGNET([.AN$24]+[.BB35]) +[.AO$32]*[.$Z$5]*MAGNET([.AO$24]+[.BB35]) +[.AP$32]*[.$Z$5]*MAGNET([.AP$24]+[.$BB35])&#10;+[.AQ$32]*[.$Z$5]*MAGNET([.AQ$24]+[.$BB35])&#10;+[.AR$32]*[.$Z$5]*MAGNET([.AR$24]+[.$BB35])&#10;+[.AS$32]*[.$Z$5]*MAGNET([.AS$24]+[.$BB35])&#10;+[.AT$32]*[.$Z$5]*MAGNET([.AT$24]+[.$BB35])&#10;+[.AU$32]*[.$Z$5]*MAGNET([.AU$24]+[.$BB35])&#10;+[.AV$32]*[.$Z$5]*MAGNET([.AV$24]+[.$BB35])&#10;+[.AW$32]*[.$Z$5]*MAGNET([.AW$24]+[.$BB35])&#10;+[.AX$32]*[.$Z$5]*MAGNET([.AX$24]+[.$BB35])&#10;+[.AY$32]*[.$Z$5]*MAGNET([.AY$24]+[.$BB3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Faser</text:p>
          </table:table-cell>
          <table:table-cell table:number-columns-repeated="49"/>
          <table:table-cell table:formula="of:=[.BA35]+0.002" office:value-type="float" office:value="0.042" calcext:value-type="float">
            <text:p>0.042</text:p>
          </table:table-cell>
          <table:table-cell table:formula="of:=[.BA36]*[.$D$6]" office:value-type="float" office:value="2.11115026321234" calcext:value-type="float">
            <text:p>2.111</text:p>
          </table:table-cell>
          <table:table-cell table:formula="of:=[.D$25]*[.$Z$5]*MAGNET([.D$24]+[.BB36])+[.E$25]*[.$Z$5]*MAGNET([.E$24]+[.BB36])+[.F$25]*[.$Z$5]*MAGNET([.F$24]+[.BB36])+[.G$25]*[.$Z$5]*MAGNET([.G$24]+[.BB36])+[.H$25]*[.$Z$5]*MAGNET([.H$24]+[.BB36])+[.I$25]*[.$Z$5]*MAGNET([.I$24]+[.BB36])+[.J$25]*[.$Z$5]*MAGNET([.J$24]+[.BB36])+[.K$25]*[.$Z$5]*MAGNET([.K$24]+[.BB36])+[.L$25]*[.$Z$5]*MAGNET([.L$24]+[.BB36])+[.M$25]*[.$Z$5]*MAGNET([.M$24]+[.BB36])+[.N$25]*[.$Z$5]*MAGNET([.N$24]+[.BB36])+[.O$25]*[.$Z$5]*MAGNET([.O$24]+[.BB36])+[.P$25]*[.$Z$5]*MAGNET([.P$24]+[.BB36])+[.Q$25]*[.$Z$5]*MAGNET([.Q$24]+[.BB36])+[.R$25]*[.$Z$5]*MAGNET([.R$24]+[.BB36])+[.S$25]*[.$Z$5]*MAGNET([.S$24]+[.BB36])+[.T$25]*[.$Z$5]*MAGNET([.T$24]+[.BB36])+[.U$25]*[.$Z$5]*MAGNET([.U$24]+[.BB36])+[.V$25]*[.$Z$5]*MAGNET([.V$24]+[.BB36])+[.W$25]*[.$Z$5]*MAGNET([.W$24]+[.BB36])+[.X$25]*[.$Z$5]*MAGNET([.X$24]+[.BB36])+[.Y$25]*[.$Z$5]*MAGNET([.Y$24]+[.BB36])+[.Z$25]*[.$Z$5]*MAGNET([.Z$24]+[.BB36])+[.AA$25]*[.$Z$5]*MAGNET([.AA$24]+[.BB36])+[.AB$25]*[.$Z$5]*MAGNET([.AB$24]+[.BB36])+[.AC$25]*[.$Z$5]*MAGNET([.AC$24]+[.BB36])+[.AD$25]*[.$Z$5]*MAGNET([.AD$24]+[.BB36])+[.AE$25]*[.$Z$5]*MAGNET([.AE$24]+[.BB36])+[.AF$25]*[.$Z$5]*MAGNET([.AF$24]+[.BB36])+[.AG$25]*[.$Z$5]*MAGNET([.AG$24]+[.BB36])+[.AH$25]*[.$Z$5]*MAGNET([.AH$24]+[.BB36]) +[.AI$25]*[.$Z$5]*MAGNET([.AI$24]+[.BB36]) +[.AJ$25]*[.$Z$5]*MAGNET([.AJ$24]+[.BB36]) +[.AK$25]*[.$Z$5]*MAGNET([.AK$24]+[.BB36]) +[.AL$25]*[.$Z$5]*MAGNET([.AL$24]+[.BB36]) +[.AM$25]*[.$Z$5]*MAGNET([.AM$24]+[.BB36]) +[.AN$25]*[.$Z$5]*MAGNET([.AN$24]+[.BB36]) +[.AO$25]*[.$Z$5]*MAGNET([.AO$24]+[.BB36])+RAND()*[.$BC$13]+[.AP$25]*[.$Z$5]*MAGNET([.AP$24]+[.BB36])&#10;+[.AQ$25]*[.$Z$5]*MAGNET([.AQ$24]+[.BB36])&#10;+[.AR$25]*[.$Z$5]*MAGNET([.AR$24]+[.BB36])&#10;+[.AS$25]*[.$Z$5]*MAGNET([.AS$24]+[.BB36])&#10;+[.AT$25]*[.$Z$5]*MAGNET([.AT$24]+[.BB36])&#10;+[.AU$25]*[.$Z$5]*MAGNET([.AU$24]+[.BB36])&#10;+[.AV$25]*[.$Z$5]*MAGNET([.AV$24]+[.BB36])&#10;+[.AW$25]*[.$Z$5]*MAGNET([.AW$24]+[.BB36])&#10;+[.AX$25]*[.$Z$5]*MAGNET([.AX$24]+[.BB36])&#10;+[.AY$25]*[.$Z$5]*MAGNET([.AY$24]+[.BB36])" office:value-type="float" office:value="120.413813460476" calcext:value-type="float">
            <text:p>120.41</text:p>
          </table:table-cell>
          <table:table-cell table:style-name="ce70" table:formula="of:=[.E$26]*[.$Z$5]*MAGNET([.E$24]+[.$BB36])+[.F$26]*[.$Z$5]*MAGNET([.F$24]+[.$BB36])+[.G$26]*[.$Z$5]*MAGNET([.G$24]+[.$BB36])+[.H$26]*[.$Z$5]*MAGNET([.H$24]+[.$BB36])+[.I$26]*[.$Z$5]*MAGNET([.I$24]+[.$BB36])+[.J$26]*[.$Z$5]*MAGNET([.J$24]+[.$BB36])+[.K$26]*[.$Z$5]*MAGNET([.K$24]+[.$BB36])+[.L$26]*[.$Z$5]*MAGNET([.L$24]+[.$BB36])+[.M$26]*[.$Z$5]*MAGNET([.M$24]+[.$BB36])+[.N$26]*[.$Z$5]*MAGNET([.N$24]+[.$BB36])+[.O$26]*[.$Z$5]*MAGNET([.O$24]+[.$BB36])+[.P$26]*[.$Z$5]*MAGNET([.P$24]+[.$BB36])+[.Q$26]*[.$Z$5]*MAGNET([.Q$24]+[.$BB36])+[.R$26]*[.$Z$5]*MAGNET([.R$24]+[.$BB36])+[.S$26]*[.$Z$5]*MAGNET([.S$24]+[.$BB36])+[.T$26]*[.$Z$5]*MAGNET([.T$24]+[.$BB36])+[.U$26]*[.$Z$5]*MAGNET([.U$24]+[.$BB36])+[.V$26]*[.$Z$5]*MAGNET([.V$24]+[.$BB36])+[.W$26]*[.$Z$5]*MAGNET([.W$24]+[.$BB36])+[.X$26]*[.$Z$5]*MAGNET([.X$24]+[.$BB36])+[.Y$26]*[.$Z$5]*MAGNET([.Y$24]+[.$BB36])+[.Z$26]*[.$Z$5]*MAGNET([.Z$24]+[.$BB36])+[.AA$26]*[.$Z$5]*MAGNET([.AA$24]+[.$BB36])+[.AB$26]*[.$Z$5]*MAGNET([.AB$24]+[.$BB36])+[.AC$26]*[.$Z$5]*MAGNET([.AC$24]+[.$BB36])+[.AD$26]*[.$Z$5]*MAGNET([.AD$24]+[.$BB36])+[.AE$26]*[.$Z$5]*MAGNET([.AE$24]+[.$BB36])+[.AF$26]*[.$Z$5]*MAGNET([.AF$24]+[.$BB36])+[.AG$26]*[.$Z$5]*MAGNET([.AG$24]+[.$BB36])+[.D$26]*[.$Z$5]*MAGNET([.D$24]+[.$BB36])+[.AH$26]*[.$Z$5]*MAGNET([.AH$24]+[.BB36]) +[.AI$26]*[.$Z$5]*MAGNET([.AI$24]+[.BB36]) +[.AJ$26]*[.$Z$5]*MAGNET([.AJ$24]+[.BB36]) +[.AK$26]*[.$Z$5]*MAGNET([.AK$24]+[.BB36]) +[.AL$26]*[.$Z$5]*MAGNET([.AL$24]+[.BB36]) +[.AM$26]*[.$Z$5]*MAGNET([.AM$24]+[.BB36]) +[.AN$26]*[.$Z$5]*MAGNET([.AN$24]+[.BB36]) +[.AO$26]*[.$Z$5]*MAGNET([.AO$24]+[.BB36]) +[.AP$26]*[.$Z$5]*MAGNET([.AP$24]+[.$BB36])&#10;+[.AQ$26]*[.$Z$5]*MAGNET([.AQ$24]+[.$BB36])&#10;+[.AR$26]*[.$Z$5]*MAGNET([.AR$24]+[.$BB36])&#10;+[.AS$26]*[.$Z$5]*MAGNET([.AS$24]+[.$BB36])&#10;+[.AT$26]*[.$Z$5]*MAGNET([.AT$24]+[.$BB36])&#10;+[.AU$26]*[.$Z$5]*MAGNET([.AU$24]+[.$BB36])&#10;+[.AV$26]*[.$Z$5]*MAGNET([.AV$24]+[.$BB36])&#10;+[.AW$26]*[.$Z$5]*MAGNET([.AW$24]+[.$BB36])&#10;+[.AX$26]*[.$Z$5]*MAGNET([.AX$24]+[.$BB36])&#10;+[.AY$26]*[.$Z$5]*MAGNET([.AY$24]+[.$BB36]) +RAND()*[.$BD$13]" office:value-type="float" office:value="-64.4783219293202" calcext:value-type="float">
            <text:p>-64.48</text:p>
          </table:table-cell>
          <table:table-cell table:style-name="ce71" table:formula="of:=[.E$27]*[.$Z$5]*MAGNET([.E$24]+[.$BB36])+[.F$27]*[.$Z$5]*MAGNET([.F$24]+[.$BB36])+[.G$27]*[.$Z$5]*MAGNET([.G$24]+[.$BB36])+[.H$27]*[.$Z$5]*MAGNET([.H$24]+[.$BB36])+[.I$27]*[.$Z$5]*MAGNET([.I$24]+[.$BB36])+[.J$27]*[.$Z$5]*MAGNET([.J$24]+[.$BB36])+[.K$27]*[.$Z$5]*MAGNET([.K$24]+[.$BB36])+[.L$27]*[.$Z$5]*MAGNET([.L$24]+[.$BB36])+[.M$27]*[.$Z$5]*MAGNET([.M$24]+[.$BB36])+[.N$27]*[.$Z$5]*MAGNET([.N$24]+[.$BB36])+[.O$27]*[.$Z$5]*MAGNET([.O$24]+[.$BB36])+[.P$27]*[.$Z$5]*MAGNET([.P$24]+[.$BB36])+[.Q$27]*[.$Z$5]*MAGNET([.Q$24]+[.$BB36])+[.R$27]*[.$Z$5]*MAGNET([.R$24]+[.$BB36])+[.S$27]*[.$Z$5]*MAGNET([.S$24]+[.$BB36])+[.T$27]*[.$Z$5]*MAGNET([.T$24]+[.$BB36])+[.U$27]*[.$Z$5]*MAGNET([.U$24]+[.$BB36])+[.V$27]*[.$Z$5]*MAGNET([.V$24]+[.$BB36])+[.W$27]*[.$Z$5]*MAGNET([.W$24]+[.$BB36])+[.X$27]*[.$Z$5]*MAGNET([.X$24]+[.$BB36])+[.Y$27]*[.$Z$5]*MAGNET([.Y$24]+[.$BB36])+[.Z$27]*[.$Z$5]*MAGNET([.Z$24]+[.$BB36])+[.AA$27]*[.$Z$5]*MAGNET([.AA$24]+[.$BB36])+[.AB$27]*[.$Z$5]*MAGNET([.AB$24]+[.$BB36])+[.AC$27]*[.$Z$5]*MAGNET([.AC$24]+[.$BB36])+[.AD$27]*[.$Z$5]*MAGNET([.AD$24]+[.$BB36])+[.AE$27]*[.$Z$5]*MAGNET([.AE$24]+[.$BB36])+[.AF$27]*[.$Z$5]*MAGNET([.AF$24]+[.$BB36])+[.AG$27]*[.$Z$5]*MAGNET([.AG$24]+[.$BB36])+[.D$27]*[.$Z$5]*MAGNET([.D$24]+[.$BB36])+[.AH$27]*[.$Z$5]*MAGNET([.AH$24]+[.BB36]) +[.AI$27]*[.$Z$5]*MAGNET([.AI$24]+[.BB36]) +[.AJ$27]*[.$Z$5]*MAGNET([.AJ$24]+[.BB36]) +[.AK$27]*[.$Z$5]*MAGNET([.AK$24]+[.BB36]) +[.AL$27]*[.$Z$5]*MAGNET([.AL$24]+[.BB36]) +[.AM$27]*[.$Z$5]*MAGNET([.AM$24]+[.BB36]) +[.AN$27]*[.$Z$5]*MAGNET([.AN$24]+[.BB36]) +[.AO$27]*[.$Z$5]*MAGNET([.AO$24]+[.BB36]) +[.AP$27]*[.$Z$5]*MAGNET([.AP$24]+[.$BB36])&#10;+[.AQ$27]*[.$Z$5]*MAGNET([.AQ$24]+[.$BB36])&#10;+[.AR$27]*[.$Z$5]*MAGNET([.AR$24]+[.$BB36])&#10;+[.AS$27]*[.$Z$5]*MAGNET([.AS$24]+[.$BB36])&#10;+[.AT$27]*[.$Z$5]*MAGNET([.AT$24]+[.$BB36])&#10;+[.AU$27]*[.$Z$5]*MAGNET([.AU$24]+[.$BB36])&#10;+[.AV$27]*[.$Z$5]*MAGNET([.AV$24]+[.$BB36])&#10;+[.AW$27]*[.$Z$5]*MAGNET([.AW$24]+[.$BB36])&#10;+[.AX$27]*[.$Z$5]*MAGNET([.AX$24]+[.$BB36])&#10;+[.AY$27]*[.$Z$5]*MAGNET([.AY$24]+[.$BB36]) +RAND()*[.$BE$13]" office:value-type="float" office:value="-62.3347476130008" calcext:value-type="float">
            <text:p>-62.3347476130008</text:p>
          </table:table-cell>
          <table:table-cell table:style-name="ce71" table:formula="of:=[.E$28]*[.$Z$5]*MAGNET([.E$24]+[.$BB36])+[.F$28]*[.$Z$5]*MAGNET([.F$24]+[.$BB36])+[.G$28]*[.$Z$5]*MAGNET([.G$24]+[.$BB36])+[.H$28]*[.$Z$5]*MAGNET([.H$24]+[.$BB36])+[.I$28]*[.$Z$5]*MAGNET([.I$24]+[.$BB36])+[.J$28]*[.$Z$5]*MAGNET([.J$24]+[.$BB36])+[.K$28]*[.$Z$5]*MAGNET([.K$24]+[.$BB36])+[.L$28]*[.$Z$5]*MAGNET([.L$24]+[.$BB36])+[.M$28]*[.$Z$5]*MAGNET([.M$24]+[.$BB36])+[.N$28]*[.$Z$5]*MAGNET([.N$24]+[.$BB36])+[.O$28]*[.$Z$5]*MAGNET([.O$24]+[.$BB36])+[.P$28]*[.$Z$5]*MAGNET([.P$24]+[.$BB36])+[.Q$28]*[.$Z$5]*MAGNET([.Q$24]+[.$BB36])+[.R$28]*[.$Z$5]*MAGNET([.R$24]+[.$BB36])+[.S$28]*[.$Z$5]*MAGNET([.S$24]+[.$BB36])+[.T$28]*[.$Z$5]*MAGNET([.T$24]+[.$BB36])+[.U$28]*[.$Z$5]*MAGNET([.U$24]+[.$BB36])+[.V$28]*[.$Z$5]*MAGNET([.V$24]+[.$BB36])+[.W$28]*[.$Z$5]*MAGNET([.W$24]+[.$BB36])+[.X$28]*[.$Z$5]*MAGNET([.X$24]+[.$BB36])+[.Y$28]*[.$Z$5]*MAGNET([.Y$24]+[.$BB36])+[.Z$28]*[.$Z$5]*MAGNET([.Z$24]+[.$BB36])+[.AA$28]*[.$Z$5]*MAGNET([.AA$24]+[.$BB36])+[.AB$28]*[.$Z$5]*MAGNET([.AB$24]+[.$BB36])+[.AC$28]*[.$Z$5]*MAGNET([.AC$24]+[.$BB36])+[.AD$28]*[.$Z$5]*MAGNET([.AD$24]+[.$BB36])+[.AE$28]*[.$Z$5]*MAGNET([.AE$24]+[.$BB36])+[.AF$28]*[.$Z$5]*MAGNET([.AF$24]+[.$BB36])+[.AG$28]*[.$Z$5]*MAGNET([.AG$24]+[.$BB36])+[.D$28]*[.$Z$5]*MAGNET([.D$24]+[.$BB36])+[.AH$28]*[.$Z$5]*MAGNET([.AH$24]+[.BB36]) +[.AI$28]*[.$Z$5]*MAGNET([.AI$24]+[.BB36]) +[.AJ$28]*[.$Z$5]*MAGNET([.AJ$24]+[.BB36]) +[.AK$28]*[.$Z$5]*MAGNET([.AK$24]+[.BB36]) +[.AL$28]*[.$Z$5]*MAGNET([.AL$24]+[.BB36]) +[.AM$28]*[.$Z$5]*MAGNET([.AM$24]+[.BB36]) +[.AN$28]*[.$Z$5]*MAGNET([.AN$24]+[.BB36]) +[.AO$28]*[.$Z$5]*MAGNET([.AO$24]+[.BB36]) +[.AP$28]*[.$Z$5]*MAGNET([.AP$24]+[.$BB36])&#10;+[.AQ$28]*[.$Z$5]*MAGNET([.AQ$24]+[.$BB36])&#10;+[.AR$28]*[.$Z$5]*MAGNET([.AR$24]+[.$BB36])&#10;+[.AS$28]*[.$Z$5]*MAGNET([.AS$24]+[.$BB36])&#10;+[.AT$28]*[.$Z$5]*MAGNET([.AT$24]+[.$BB36])&#10;+[.AU$28]*[.$Z$5]*MAGNET([.AU$24]+[.$BB36])&#10;+[.AV$28]*[.$Z$5]*MAGNET([.AV$24]+[.$BB36])&#10;+[.AW$28]*[.$Z$5]*MAGNET([.AW$24]+[.$BB36])&#10;+[.AX$28]*[.$Z$5]*MAGNET([.AX$24]+[.$BB36])&#10;+[.AY$28]*[.$Z$5]*MAGNET([.AY$24]+[.$BB36]) +RAND()*[.$BF$13]" office:value-type="float" office:value="-5.47922784537475" calcext:value-type="float">
            <text:p>-5.47922784537475</text:p>
          </table:table-cell>
          <table:table-cell table:style-name="ce71" table:formula="of:=[.E$29]*[.$Z$5]*MAGNET([.E$24]+[.$BB36])+[.F$29]*[.$Z$5]*MAGNET([.F$24]+[.$BB36])+[.G$29]*[.$Z$5]*MAGNET([.G$24]+[.$BB36])+[.H$29]*[.$Z$5]*MAGNET([.H$24]+[.$BB36])+[.I$29]*[.$Z$5]*MAGNET([.I$24]+[.$BB36])+[.J$29]*[.$Z$5]*MAGNET([.J$24]+[.$BB36])+[.K$29]*[.$Z$5]*MAGNET([.K$24]+[.$BB36])+[.L$29]*[.$Z$5]*MAGNET([.L$24]+[.$BB36])+[.M$29]*[.$Z$5]*MAGNET([.M$24]+[.$BB36])+[.N$29]*[.$Z$5]*MAGNET([.N$24]+[.$BB36])+[.O$29]*[.$Z$5]*MAGNET([.O$24]+[.$BB36])+[.P$29]*[.$Z$5]*MAGNET([.P$24]+[.$BB36])+[.Q$29]*[.$Z$5]*MAGNET([.Q$24]+[.$BB36])+[.R$29]*[.$Z$5]*MAGNET([.R$24]+[.$BB36])+[.S$29]*[.$Z$5]*MAGNET([.S$24]+[.$BB36])+[.T$29]*[.$Z$5]*MAGNET([.T$24]+[.$BB36])+[.U$29]*[.$Z$5]*MAGNET([.U$24]+[.$BB36])+[.V$29]*[.$Z$5]*MAGNET([.V$24]+[.$BB36])+[.W$29]*[.$Z$5]*MAGNET([.W$24]+[.$BB36])+[.X$29]*[.$Z$5]*MAGNET([.X$24]+[.$BB36])+[.Y$29]*[.$Z$5]*MAGNET([.Y$24]+[.$BB36])+[.Z$29]*[.$Z$5]*MAGNET([.Z$24]+[.$BB36])+[.AA$29]*[.$Z$5]*MAGNET([.AA$24]+[.$BB36])+[.AB$29]*[.$Z$5]*MAGNET([.AB$24]+[.$BB36])+[.AC$29]*[.$Z$5]*MAGNET([.AC$24]+[.$BB36])+[.AD$29]*[.$Z$5]*MAGNET([.AD$24]+[.$BB36])+[.AE$29]*[.$Z$5]*MAGNET([.AE$24]+[.$BB36])+[.AF$29]*[.$Z$5]*MAGNET([.AF$24]+[.$BB36])+[.AG$29]*[.$Z$5]*MAGNET([.AG$24]+[.$BB36])+[.D$29]*[.$Z$5]*MAGNET([.D$24]+[.$BB36])+[.AH$29]*[.$Z$5]*MAGNET([.AH$24]+[.BB36]) +[.AI$29]*[.$Z$5]*MAGNET([.AI$24]+[.BB36]) +[.AJ$29]*[.$Z$5]*MAGNET([.AJ$24]+[.BB36]) +[.AK$29]*[.$Z$5]*MAGNET([.AK$24]+[.BB36]) +[.AL$29]*[.$Z$5]*MAGNET([.AL$24]+[.BB36]) +[.AM$29]*[.$Z$5]*MAGNET([.AM$24]+[.BB36]) +[.AN$29]*[.$Z$5]*MAGNET([.AN$24]+[.BB36]) +[.AO$29]*[.$Z$5]*MAGNET([.AO$24]+[.BB36]) +[.AP$29]*[.$Z$5]*MAGNET([.AP$24]+[.$BB36])&#10;+[.AQ$29]*[.$Z$5]*MAGNET([.AQ$24]+[.$BB36])&#10;+[.AR$29]*[.$Z$5]*MAGNET([.AR$24]+[.$BB36])&#10;+[.AS$29]*[.$Z$5]*MAGNET([.AS$24]+[.$BB36])&#10;+[.AT$29]*[.$Z$5]*MAGNET([.AT$24]+[.$BB36])&#10;+[.AU$29]*[.$Z$5]*MAGNET([.AU$24]+[.$BB36])&#10;+[.AV$29]*[.$Z$5]*MAGNET([.AV$24]+[.$BB36])&#10;+[.AW$29]*[.$Z$5]*MAGNET([.AW$24]+[.$BB36])&#10;+[.AX$29]*[.$Z$5]*MAGNET([.AX$24]+[.$BB36])&#10;+[.AY$29]*[.$Z$5]*MAGNET([.AY$24]+[.$BB36]) +RAND()*[.$BG$13]" office:value-type="float" office:value="23.1599473360498" calcext:value-type="float">
            <text:p>23.1599473360498</text:p>
          </table:table-cell>
          <table:table-cell table:style-name="ce71" table:formula="of:=[.E$30]*[.$Z$5]*MAGNET([.E$24]+[.$BB36])+[.F$30]*[.$Z$5]*MAGNET([.F$24]+[.$BB36])+[.G$30]*[.$Z$5]*MAGNET([.G$24]+[.$BB36])+[.H$30]*[.$Z$5]*MAGNET([.H$24]+[.$BB36])+[.I$30]*[.$Z$5]*MAGNET([.I$24]+[.$BB36])+[.J$30]*[.$Z$5]*MAGNET([.J$24]+[.$BB36])+[.K$30]*[.$Z$5]*MAGNET([.K$24]+[.$BB36])+[.L$30]*[.$Z$5]*MAGNET([.L$24]+[.$BB36])+[.M$30]*[.$Z$5]*MAGNET([.M$24]+[.$BB36])+[.N$30]*[.$Z$5]*MAGNET([.N$24]+[.$BB36])+[.O$30]*[.$Z$5]*MAGNET([.O$24]+[.$BB36])+[.P$30]*[.$Z$5]*MAGNET([.P$24]+[.$BB36])+[.Q$30]*[.$Z$5]*MAGNET([.Q$24]+[.$BB36])+[.R$30]*[.$Z$5]*MAGNET([.R$24]+[.$BB36])+[.S$30]*[.$Z$5]*MAGNET([.S$24]+[.$BB36])+[.T$30]*[.$Z$5]*MAGNET([.T$24]+[.$BB36])+[.U$30]*[.$Z$5]*MAGNET([.U$24]+[.$BB36])+[.V$30]*[.$Z$5]*MAGNET([.V$24]+[.$BB36])+[.W$30]*[.$Z$5]*MAGNET([.W$24]+[.$BB36])+[.X$30]*[.$Z$5]*MAGNET([.X$24]+[.$BB36])+[.Y$30]*[.$Z$5]*MAGNET([.Y$24]+[.$BB36])+[.Z$30]*[.$Z$5]*MAGNET([.Z$24]+[.$BB36])+[.AA$30]*[.$Z$5]*MAGNET([.AA$24]+[.$BB36])+[.AB$30]*[.$Z$5]*MAGNET([.AB$24]+[.$BB36])+[.AC$30]*[.$Z$5]*MAGNET([.AC$24]+[.$BB36])+[.AD$30]*[.$Z$5]*MAGNET([.AD$24]+[.$BB36])+[.AE$30]*[.$Z$5]*MAGNET([.AE$24]+[.$BB36])+[.AF$30]*[.$Z$5]*MAGNET([.AF$24]+[.$BB36])+[.AG$30]*[.$Z$5]*MAGNET([.AG$24]+[.$BB36])+[.D$30]*[.$Z$5]*MAGNET([.D$24]+[.$BB36])+[.AH$30]*[.$Z$5]*MAGNET([.AH$24]+[.BB36]) +[.AI$30]*[.$Z$5]*MAGNET([.AI$24]+[.BB36]) +[.AJ$30]*[.$Z$5]*MAGNET([.AJ$24]+[.BB36]) +[.AK$30]*[.$Z$5]*MAGNET([.AK$24]+[.BB36]) +[.AL$30]*[.$Z$5]*MAGNET([.AL$24]+[.BB36]) +[.AM$30]*[.$Z$5]*MAGNET([.AM$24]+[.BB36]) +[.AN$30]*[.$Z$5]*MAGNET([.AN$24]+[.BB36]) +[.AO$30]*[.$Z$5]*MAGNET([.AO$24]+[.BB36]) +[.AP$30]*[.$Z$5]*MAGNET([.AP$24]+[.$BB36])&#10;+[.AQ$30]*[.$Z$5]*MAGNET([.AQ$24]+[.$BB36])&#10;+[.AR$30]*[.$Z$5]*MAGNET([.AR$24]+[.$BB36])&#10;+[.AS$30]*[.$Z$5]*MAGNET([.AS$24]+[.$BB36])&#10;+[.AT$30]*[.$Z$5]*MAGNET([.AT$24]+[.$BB36])&#10;+[.AU$30]*[.$Z$5]*MAGNET([.AU$24]+[.$BB36])&#10;+[.AV$30]*[.$Z$5]*MAGNET([.AV$24]+[.$BB36])&#10;+[.AW$30]*[.$Z$5]*MAGNET([.AW$24]+[.$BB36])&#10;+[.AX$30]*[.$Z$5]*MAGNET([.AX$24]+[.$BB36])&#10;+[.AY$30]*[.$Z$5]*MAGNET([.AY$24]+[.$BB36]) +RAND()*[.$BH$13]" office:value-type="float" office:value="0" calcext:value-type="float">
            <text:p>0</text:p>
          </table:table-cell>
          <table:table-cell table:style-name="ce71" table:formula="of:=[.E$31]*[.$Z$5]*MAGNET([.E$24]+[.$BB36])+[.F$31]*[.$Z$5]*MAGNET([.F$24]+[.$BB36])+[.G$31]*[.$Z$5]*MAGNET([.G$24]+[.$BB36])+[.H$31]*[.$Z$5]*MAGNET([.H$24]+[.$BB36])+[.I$31]*[.$Z$5]*MAGNET([.I$24]+[.$BB36])+[.J$31]*[.$Z$5]*MAGNET([.J$24]+[.$BB36])+[.K$31]*[.$Z$5]*MAGNET([.K$24]+[.$BB36])+[.L$31]*[.$Z$5]*MAGNET([.L$24]+[.$BB36])+[.M$31]*[.$Z$5]*MAGNET([.M$24]+[.$BB36])+[.N$31]*[.$Z$5]*MAGNET([.N$24]+[.$BB36])+[.O$31]*[.$Z$5]*MAGNET([.O$24]+[.$BB36])+[.P$31]*[.$Z$5]*MAGNET([.P$24]+[.$BB36])+[.Q$31]*[.$Z$5]*MAGNET([.Q$24]+[.$BB36])+[.R$31]*[.$Z$5]*MAGNET([.R$24]+[.$BB36])+[.S$31]*[.$Z$5]*MAGNET([.S$24]+[.$BB36])+[.T$31]*[.$Z$5]*MAGNET([.T$24]+[.$BB36])+[.U$31]*[.$Z$5]*MAGNET([.U$24]+[.$BB36])+[.V$31]*[.$Z$5]*MAGNET([.V$24]+[.$BB36])+[.W$31]*[.$Z$5]*MAGNET([.W$24]+[.$BB36])+[.X$31]*[.$Z$5]*MAGNET([.X$24]+[.$BB36])+[.Y$31]*[.$Z$5]*MAGNET([.Y$24]+[.$BB36])+[.Z$31]*[.$Z$5]*MAGNET([.Z$24]+[.$BB36])+[.AA$31]*[.$Z$5]*MAGNET([.AA$24]+[.$BB36])+[.AB$31]*[.$Z$5]*MAGNET([.AB$24]+[.$BB36])+[.AC$31]*[.$Z$5]*MAGNET([.AC$24]+[.$BB36])+[.AD$31]*[.$Z$5]*MAGNET([.AD$24]+[.$BB36])+[.AE$31]*[.$Z$5]*MAGNET([.AE$24]+[.$BB36])+[.AF$31]*[.$Z$5]*MAGNET([.AF$24]+[.$BB36])+[.AG$31]*[.$Z$5]*MAGNET([.AG$24]+[.$BB36])+[.D$31]*[.$Z$5]*MAGNET([.D$24]+[.$BB36])+[.AH$31]*[.$Z$5]*MAGNET([.AH$24]+[.BB36]) +[.AI$31]*[.$Z$5]*MAGNET([.AI$24]+[.BB36]) +[.AJ$31]*[.$Z$5]*MAGNET([.AJ$24]+[.BB36]) +[.AK$31]*[.$Z$5]*MAGNET([.AK$24]+[.BB36]) +[.AL$31]*[.$Z$5]*MAGNET([.AL$24]+[.BB36]) +[.AM$31]*[.$Z$5]*MAGNET([.AM$24]+[.BB36]) +[.AN$31]*[.$Z$5]*MAGNET([.AN$24]+[.BB36]) +[.AO$31]*[.$Z$5]*MAGNET([.AO$24]+[.BB36]) +[.AP$31]*[.$Z$5]*MAGNET([.AP$24]+[.$BB36])&#10;+[.AQ$31]*[.$Z$5]*MAGNET([.AQ$24]+[.$BB36])&#10;+[.AR$31]*[.$Z$5]*MAGNET([.AR$24]+[.$BB36])&#10;+[.AS$31]*[.$Z$5]*MAGNET([.AS$24]+[.$BB36])&#10;+[.AT$31]*[.$Z$5]*MAGNET([.AT$24]+[.$BB36])&#10;+[.AU$31]*[.$Z$5]*MAGNET([.AU$24]+[.$BB36])&#10;+[.AV$31]*[.$Z$5]*MAGNET([.AV$24]+[.$BB36])&#10;+[.AW$31]*[.$Z$5]*MAGNET([.AW$24]+[.$BB36])&#10;+[.AX$31]*[.$Z$5]*MAGNET([.AX$24]+[.$BB36])&#10;+[.AY$31]*[.$Z$5]*MAGNET([.AY$24]+[.$BB36]) +RAND()*[.$BI$13]" office:value-type="float" office:value="0" calcext:value-type="float">
            <text:p>0</text:p>
          </table:table-cell>
          <table:table-cell table:style-name="ce71" table:formula="of:=[.E$32]*[.$Z$5]*MAGNET([.E$24]+[.$BB36])+[.F$32]*[.$Z$5]*MAGNET([.F$24]+[.$BB36])+[.G$32]*[.$Z$5]*MAGNET([.G$24]+[.$BB36])+[.H$32]*[.$Z$5]*MAGNET([.H$24]+[.$BB36])+[.I$32]*[.$Z$5]*MAGNET([.I$24]+[.$BB36])+[.J$32]*[.$Z$5]*MAGNET([.J$24]+[.$BB36])+[.K$32]*[.$Z$5]*MAGNET([.K$24]+[.$BB36])+[.L$32]*[.$Z$5]*MAGNET([.L$24]+[.$BB36])+[.M$32]*[.$Z$5]*MAGNET([.M$24]+[.$BB36])+[.N$32]*[.$Z$5]*MAGNET([.N$24]+[.$BB36])+[.O$32]*[.$Z$5]*MAGNET([.O$24]+[.$BB36])+[.P$32]*[.$Z$5]*MAGNET([.P$24]+[.$BB36])+[.Q$32]*[.$Z$5]*MAGNET([.Q$24]+[.$BB36])+[.R$32]*[.$Z$5]*MAGNET([.R$24]+[.$BB36])+[.S$32]*[.$Z$5]*MAGNET([.S$24]+[.$BB36])+[.T$32]*[.$Z$5]*MAGNET([.T$24]+[.$BB36])+[.U$32]*[.$Z$5]*MAGNET([.U$24]+[.$BB36])+[.V$32]*[.$Z$5]*MAGNET([.V$24]+[.$BB36])+[.W$32]*[.$Z$5]*MAGNET([.W$24]+[.$BB36])+[.X$32]*[.$Z$5]*MAGNET([.X$24]+[.$BB36])+[.Y$32]*[.$Z$5]*MAGNET([.Y$24]+[.$BB36])+[.Z$32]*[.$Z$5]*MAGNET([.Z$24]+[.$BB36])+[.AA$32]*[.$Z$5]*MAGNET([.AA$24]+[.$BB36])+[.AB$32]*[.$Z$5]*MAGNET([.AB$24]+[.$BB36])+[.AC$32]*[.$Z$5]*MAGNET([.AC$24]+[.$BB36])+[.AD$32]*[.$Z$5]*MAGNET([.AD$24]+[.$BB36])+[.AE$32]*[.$Z$5]*MAGNET([.AE$24]+[.$BB36])+[.AF$32]*[.$Z$5]*MAGNET([.AF$24]+[.$BB36])+[.AG$32]*[.$Z$5]*MAGNET([.AG$24]+[.$BB36])+[.D$32]*[.$Z$5]*MAGNET([.D$24]+[.$BB36])+[.AH$32]*[.$Z$5]*MAGNET([.AH$24]+[.BB36]) +[.AI$32]*[.$Z$5]*MAGNET([.AI$24]+[.BB36]) +[.AJ$32]*[.$Z$5]*MAGNET([.AJ$24]+[.BB36]) +[.AK$32]*[.$Z$5]*MAGNET([.AK$24]+[.BB36]) +[.AL$32]*[.$Z$5]*MAGNET([.AL$24]+[.BB36]) +[.AM$32]*[.$Z$5]*MAGNET([.AM$24]+[.BB36]) +[.AN$32]*[.$Z$5]*MAGNET([.AN$24]+[.BB36]) +[.AO$32]*[.$Z$5]*MAGNET([.AO$24]+[.BB36]) +[.AP$32]*[.$Z$5]*MAGNET([.AP$24]+[.$BB36])&#10;+[.AQ$32]*[.$Z$5]*MAGNET([.AQ$24]+[.$BB36])&#10;+[.AR$32]*[.$Z$5]*MAGNET([.AR$24]+[.$BB36])&#10;+[.AS$32]*[.$Z$5]*MAGNET([.AS$24]+[.$BB36])&#10;+[.AT$32]*[.$Z$5]*MAGNET([.AT$24]+[.$BB36])&#10;+[.AU$32]*[.$Z$5]*MAGNET([.AU$24]+[.$BB36])&#10;+[.AV$32]*[.$Z$5]*MAGNET([.AV$24]+[.$BB36])&#10;+[.AW$32]*[.$Z$5]*MAGNET([.AW$24]+[.$BB36])&#10;+[.AX$32]*[.$Z$5]*MAGNET([.AX$24]+[.$BB36])&#10;+[.AY$32]*[.$Z$5]*MAGNET([.AY$24]+[.$BB3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formula="of:=COUNTIF([.D$15:.D$22];&quot;=&quot; &amp;[.$C37])" office:value-type="float" office:value="4" calcext:value-type="float">
            <text:p>4</text:p>
          </table:table-cell>
          <table:table-cell table:formula="of:=COUNTIF([.E$15:.E$22];&quot;=&quot; &amp;[.$C37])" office:value-type="float" office:value="4" calcext:value-type="float">
            <text:p>4</text:p>
          </table:table-cell>
          <table:table-cell table:formula="of:=COUNTIF([.F$15:.F$22];&quot;=&quot; &amp;[.$C37])" office:value-type="float" office:value="2" calcext:value-type="float">
            <text:p>2</text:p>
          </table:table-cell>
          <table:table-cell table:formula="of:=COUNTIF([.G$15:.G$22];&quot;=&quot; &amp;[.$C37])" office:value-type="float" office:value="0" calcext:value-type="float">
            <text:p>0</text:p>
          </table:table-cell>
          <table:table-cell table:formula="of:=COUNTIF([.H$15:.H$22];&quot;=&quot; &amp;[.$C37])" office:value-type="float" office:value="0" calcext:value-type="float">
            <text:p>0</text:p>
          </table:table-cell>
          <table:table-cell table:formula="of:=COUNTIF([.I$15:.I$22];&quot;=&quot; &amp;[.$C37])" office:value-type="float" office:value="0" calcext:value-type="float">
            <text:p>0</text:p>
          </table:table-cell>
          <table:table-cell table:formula="of:=COUNTIF([.J$15:.J$22];&quot;=&quot; &amp;[.$C37])" office:value-type="float" office:value="0" calcext:value-type="float">
            <text:p>0</text:p>
          </table:table-cell>
          <table:table-cell table:formula="of:=COUNTIF([.K$15:.K$22];&quot;=&quot; &amp;[.$C37])" office:value-type="float" office:value="0" calcext:value-type="float">
            <text:p>0</text:p>
          </table:table-cell>
          <table:table-cell table:formula="of:=COUNTIF([.L$15:.L$22];&quot;=&quot; &amp;[.$C37])" office:value-type="float" office:value="0" calcext:value-type="float">
            <text:p>0</text:p>
          </table:table-cell>
          <table:table-cell table:formula="of:=COUNTIF([.M$15:.M$22];&quot;=&quot; &amp;[.$C37])" office:value-type="float" office:value="0" calcext:value-type="float">
            <text:p>0</text:p>
          </table:table-cell>
          <table:table-cell table:formula="of:=COUNTIF([.N$15:.N$22];&quot;=&quot; &amp;[.$C37])" office:value-type="float" office:value="0" calcext:value-type="float">
            <text:p>0</text:p>
          </table:table-cell>
          <table:table-cell table:formula="of:=COUNTIF([.O$15:.O$22];&quot;=&quot; &amp;[.$C37])" office:value-type="float" office:value="0" calcext:value-type="float">
            <text:p>0</text:p>
          </table:table-cell>
          <table:table-cell table:formula="of:=COUNTIF([.P$15:.P$22];&quot;=&quot; &amp;[.$C37])" office:value-type="float" office:value="0" calcext:value-type="float">
            <text:p>0</text:p>
          </table:table-cell>
          <table:table-cell table:formula="of:=COUNTIF([.Q$15:.Q$22];&quot;=&quot; &amp;[.$C37])" office:value-type="float" office:value="0" calcext:value-type="float">
            <text:p>0</text:p>
          </table:table-cell>
          <table:table-cell table:formula="of:=COUNTIF([.R$15:.R$22];&quot;=&quot; &amp;[.$C37])" office:value-type="float" office:value="0" calcext:value-type="float">
            <text:p>0</text:p>
          </table:table-cell>
          <table:table-cell table:formula="of:=COUNTIF([.S$15:.S$22];&quot;=&quot; &amp;[.$C37])" office:value-type="float" office:value="4" calcext:value-type="float">
            <text:p>4</text:p>
          </table:table-cell>
          <table:table-cell table:formula="of:=COUNTIF([.T$15:.T$22];&quot;=&quot; &amp;[.$C37])" office:value-type="float" office:value="4" calcext:value-type="float">
            <text:p>4</text:p>
          </table:table-cell>
          <table:table-cell table:formula="of:=COUNTIF([.U$15:.U$22];&quot;=&quot; &amp;[.$C37])" office:value-type="float" office:value="2" calcext:value-type="float">
            <text:p>2</text:p>
          </table:table-cell>
          <table:table-cell table:formula="of:=COUNTIF([.V$15:.V$22];&quot;=&quot; &amp;[.$C37])" office:value-type="float" office:value="0" calcext:value-type="float">
            <text:p>0</text:p>
          </table:table-cell>
          <table:table-cell table:formula="of:=COUNTIF([.W$15:.W$22];&quot;=&quot; &amp;[.$C37])" office:value-type="float" office:value="0" calcext:value-type="float">
            <text:p>0</text:p>
          </table:table-cell>
          <table:table-cell table:formula="of:=COUNTIF([.X$15:.X$22];&quot;=&quot; &amp;[.$C37])" office:value-type="float" office:value="0" calcext:value-type="float">
            <text:p>0</text:p>
          </table:table-cell>
          <table:table-cell table:formula="of:=COUNTIF([.Y$15:.Y$22];&quot;=&quot; &amp;[.$C37])" office:value-type="float" office:value="0" calcext:value-type="float">
            <text:p>0</text:p>
          </table:table-cell>
          <table:table-cell table:formula="of:=COUNTIF([.Z$15:.Z$22];&quot;=&quot; &amp;[.$C37])" office:value-type="float" office:value="0" calcext:value-type="float">
            <text:p>0</text:p>
          </table:table-cell>
          <table:table-cell table:formula="of:=COUNTIF([.AA$15:.AA$22];&quot;=&quot; &amp;[.$C37])" office:value-type="float" office:value="0" calcext:value-type="float">
            <text:p>0</text:p>
          </table:table-cell>
          <table:table-cell table:formula="of:=COUNTIF([.AB$15:.AB$22];&quot;=&quot; &amp;[.$C37])" office:value-type="float" office:value="0" calcext:value-type="float">
            <text:p>0</text:p>
          </table:table-cell>
          <table:table-cell table:formula="of:=COUNTIF([.AC$15:.AC$22];&quot;=&quot; &amp;[.$C37])" office:value-type="float" office:value="0" calcext:value-type="float">
            <text:p>0</text:p>
          </table:table-cell>
          <table:table-cell table:formula="of:=COUNTIF([.AD$15:.AD$22];&quot;=&quot; &amp;[.$C37])" office:value-type="float" office:value="0" calcext:value-type="float">
            <text:p>0</text:p>
          </table:table-cell>
          <table:table-cell table:formula="of:=COUNTIF([.AE$15:.AE$22];&quot;=&quot; &amp;[.$C37])" office:value-type="float" office:value="0" calcext:value-type="float">
            <text:p>0</text:p>
          </table:table-cell>
          <table:table-cell table:formula="of:=COUNTIF([.AF$15:.AF$22];&quot;=&quot; &amp;[.$C37])" office:value-type="float" office:value="0" calcext:value-type="float">
            <text:p>0</text:p>
          </table:table-cell>
          <table:table-cell table:formula="of:=COUNTIF([.AG$15:.AG$22];&quot;=&quot; &amp;[.$C37])" office:value-type="float" office:value="0" calcext:value-type="float">
            <text:p>0</text:p>
          </table:table-cell>
          <table:table-cell table:formula="of:=COUNTIF([.AH$15:.AH$22];&quot;=&quot; &amp;[.$C37])" office:value-type="float" office:value="0" calcext:value-type="float">
            <text:p>0</text:p>
          </table:table-cell>
          <table:table-cell table:formula="of:=COUNTIF([.AI$15:.AI$22];&quot;=&quot; &amp;[.$C37])" office:value-type="float" office:value="0" calcext:value-type="float">
            <text:p>0</text:p>
          </table:table-cell>
          <table:table-cell table:formula="of:=COUNTIF([.AJ$15:.AJ$22];&quot;=&quot; &amp;[.$C37])" office:value-type="float" office:value="0" calcext:value-type="float">
            <text:p>0</text:p>
          </table:table-cell>
          <table:table-cell table:formula="of:=COUNTIF([.AK$15:.AK$22];&quot;=&quot; &amp;[.$C37])" office:value-type="float" office:value="0" calcext:value-type="float">
            <text:p>0</text:p>
          </table:table-cell>
          <table:table-cell table:formula="of:=COUNTIF([.AL$15:.AL$22];&quot;=&quot; &amp;[.$C37])" office:value-type="float" office:value="0" calcext:value-type="float">
            <text:p>0</text:p>
          </table:table-cell>
          <table:table-cell table:formula="of:=COUNTIF([.AM$15:.AM$22];&quot;=&quot; &amp;[.$C37])" office:value-type="float" office:value="4" calcext:value-type="float">
            <text:p>4</text:p>
          </table:table-cell>
          <table:table-cell table:formula="of:=COUNTIF([.AN$15:.AN$22];&quot;=&quot; &amp;[.$C37])" office:value-type="float" office:value="0" calcext:value-type="float">
            <text:p>0</text:p>
          </table:table-cell>
          <table:table-cell table:formula="of:=COUNTIF([.AO$15:.AO$22];&quot;=&quot; &amp;[.$C37])" office:value-type="float" office:value="2" calcext:value-type="float">
            <text:p>2</text:p>
          </table:table-cell>
          <table:table-cell table:formula="of:=COUNTIF([.AP$15:.AP$22];&quot;=&quot; &amp;[.$C37])" office:value-type="float" office:value="0" calcext:value-type="float">
            <text:p>0</text:p>
          </table:table-cell>
          <table:table-cell table:formula="of:=COUNTIF([.AQ$15:.AQ$22];&quot;=&quot; &amp;[.$C37])" office:value-type="float" office:value="0" calcext:value-type="float">
            <text:p>0</text:p>
          </table:table-cell>
          <table:table-cell table:formula="of:=COUNTIF([.AR$15:.AR$22];&quot;=&quot; &amp;[.$C37])" office:value-type="float" office:value="0" calcext:value-type="float">
            <text:p>0</text:p>
          </table:table-cell>
          <table:table-cell table:formula="of:=COUNTIF([.AS$15:.AS$22];&quot;=&quot; &amp;[.$C37])" office:value-type="float" office:value="0" calcext:value-type="float">
            <text:p>0</text:p>
          </table:table-cell>
          <table:table-cell table:formula="of:=COUNTIF([.AT$15:.AT$22];&quot;=&quot; &amp;[.$C37])" office:value-type="float" office:value="0" calcext:value-type="float">
            <text:p>0</text:p>
          </table:table-cell>
          <table:table-cell table:formula="of:=COUNTIF([.AU$15:.AU$22];&quot;=&quot; &amp;[.$C37])" office:value-type="float" office:value="0" calcext:value-type="float">
            <text:p>0</text:p>
          </table:table-cell>
          <table:table-cell table:formula="of:=COUNTIF([.AV$15:.AV$22];&quot;=&quot; &amp;[.$C37])" office:value-type="float" office:value="0" calcext:value-type="float">
            <text:p>0</text:p>
          </table:table-cell>
          <table:table-cell table:formula="of:=COUNTIF([.AW$15:.AW$22];&quot;=&quot; &amp;[.$C37])" office:value-type="float" office:value="0" calcext:value-type="float">
            <text:p>0</text:p>
          </table:table-cell>
          <table:table-cell table:formula="of:=COUNTIF([.AX$15:.AX$22];&quot;=&quot; &amp;[.$C37])" office:value-type="float" office:value="0" calcext:value-type="float">
            <text:p>0</text:p>
          </table:table-cell>
          <table:table-cell table:formula="of:=COUNTIF([.AY$15:.AY$22];&quot;=&quot; &amp;[.$C37])" office:value-type="float" office:value="0" calcext:value-type="float">
            <text:p>0</text:p>
          </table:table-cell>
          <table:table-cell/>
          <table:table-cell table:formula="of:=[.BA36]+0.002" office:value-type="float" office:value="0.044" calcext:value-type="float">
            <text:p>0.044</text:p>
          </table:table-cell>
          <table:table-cell table:formula="of:=[.BA37]*[.$D$6]" office:value-type="float" office:value="2.21168122812722" calcext:value-type="float">
            <text:p>2.212</text:p>
          </table:table-cell>
          <table:table-cell table:formula="of:=[.D$25]*[.$Z$5]*MAGNET([.D$24]+[.BB37])+[.E$25]*[.$Z$5]*MAGNET([.E$24]+[.BB37])+[.F$25]*[.$Z$5]*MAGNET([.F$24]+[.BB37])+[.G$25]*[.$Z$5]*MAGNET([.G$24]+[.BB37])+[.H$25]*[.$Z$5]*MAGNET([.H$24]+[.BB37])+[.I$25]*[.$Z$5]*MAGNET([.I$24]+[.BB37])+[.J$25]*[.$Z$5]*MAGNET([.J$24]+[.BB37])+[.K$25]*[.$Z$5]*MAGNET([.K$24]+[.BB37])+[.L$25]*[.$Z$5]*MAGNET([.L$24]+[.BB37])+[.M$25]*[.$Z$5]*MAGNET([.M$24]+[.BB37])+[.N$25]*[.$Z$5]*MAGNET([.N$24]+[.BB37])+[.O$25]*[.$Z$5]*MAGNET([.O$24]+[.BB37])+[.P$25]*[.$Z$5]*MAGNET([.P$24]+[.BB37])+[.Q$25]*[.$Z$5]*MAGNET([.Q$24]+[.BB37])+[.R$25]*[.$Z$5]*MAGNET([.R$24]+[.BB37])+[.S$25]*[.$Z$5]*MAGNET([.S$24]+[.BB37])+[.T$25]*[.$Z$5]*MAGNET([.T$24]+[.BB37])+[.U$25]*[.$Z$5]*MAGNET([.U$24]+[.BB37])+[.V$25]*[.$Z$5]*MAGNET([.V$24]+[.BB37])+[.W$25]*[.$Z$5]*MAGNET([.W$24]+[.BB37])+[.X$25]*[.$Z$5]*MAGNET([.X$24]+[.BB37])+[.Y$25]*[.$Z$5]*MAGNET([.Y$24]+[.BB37])+[.Z$25]*[.$Z$5]*MAGNET([.Z$24]+[.BB37])+[.AA$25]*[.$Z$5]*MAGNET([.AA$24]+[.BB37])+[.AB$25]*[.$Z$5]*MAGNET([.AB$24]+[.BB37])+[.AC$25]*[.$Z$5]*MAGNET([.AC$24]+[.BB37])+[.AD$25]*[.$Z$5]*MAGNET([.AD$24]+[.BB37])+[.AE$25]*[.$Z$5]*MAGNET([.AE$24]+[.BB37])+[.AF$25]*[.$Z$5]*MAGNET([.AF$24]+[.BB37])+[.AG$25]*[.$Z$5]*MAGNET([.AG$24]+[.BB37])+[.AH$25]*[.$Z$5]*MAGNET([.AH$24]+[.BB37]) +[.AI$25]*[.$Z$5]*MAGNET([.AI$24]+[.BB37]) +[.AJ$25]*[.$Z$5]*MAGNET([.AJ$24]+[.BB37]) +[.AK$25]*[.$Z$5]*MAGNET([.AK$24]+[.BB37]) +[.AL$25]*[.$Z$5]*MAGNET([.AL$24]+[.BB37]) +[.AM$25]*[.$Z$5]*MAGNET([.AM$24]+[.BB37]) +[.AN$25]*[.$Z$5]*MAGNET([.AN$24]+[.BB37]) +[.AO$25]*[.$Z$5]*MAGNET([.AO$24]+[.BB37])+RAND()*[.$BC$13]+[.AP$25]*[.$Z$5]*MAGNET([.AP$24]+[.BB37])&#10;+[.AQ$25]*[.$Z$5]*MAGNET([.AQ$24]+[.BB37])&#10;+[.AR$25]*[.$Z$5]*MAGNET([.AR$24]+[.BB37])&#10;+[.AS$25]*[.$Z$5]*MAGNET([.AS$24]+[.BB37])&#10;+[.AT$25]*[.$Z$5]*MAGNET([.AT$24]+[.BB37])&#10;+[.AU$25]*[.$Z$5]*MAGNET([.AU$24]+[.BB37])&#10;+[.AV$25]*[.$Z$5]*MAGNET([.AV$24]+[.BB37])&#10;+[.AW$25]*[.$Z$5]*MAGNET([.AW$24]+[.BB37])&#10;+[.AX$25]*[.$Z$5]*MAGNET([.AX$24]+[.BB37])&#10;+[.AY$25]*[.$Z$5]*MAGNET([.AY$24]+[.BB37])" office:value-type="float" office:value="119.453905878249" calcext:value-type="float">
            <text:p>119.45</text:p>
          </table:table-cell>
          <table:table-cell table:style-name="ce70" table:formula="of:=[.E$26]*[.$Z$5]*MAGNET([.E$24]+[.$BB37])+[.F$26]*[.$Z$5]*MAGNET([.F$24]+[.$BB37])+[.G$26]*[.$Z$5]*MAGNET([.G$24]+[.$BB37])+[.H$26]*[.$Z$5]*MAGNET([.H$24]+[.$BB37])+[.I$26]*[.$Z$5]*MAGNET([.I$24]+[.$BB37])+[.J$26]*[.$Z$5]*MAGNET([.J$24]+[.$BB37])+[.K$26]*[.$Z$5]*MAGNET([.K$24]+[.$BB37])+[.L$26]*[.$Z$5]*MAGNET([.L$24]+[.$BB37])+[.M$26]*[.$Z$5]*MAGNET([.M$24]+[.$BB37])+[.N$26]*[.$Z$5]*MAGNET([.N$24]+[.$BB37])+[.O$26]*[.$Z$5]*MAGNET([.O$24]+[.$BB37])+[.P$26]*[.$Z$5]*MAGNET([.P$24]+[.$BB37])+[.Q$26]*[.$Z$5]*MAGNET([.Q$24]+[.$BB37])+[.R$26]*[.$Z$5]*MAGNET([.R$24]+[.$BB37])+[.S$26]*[.$Z$5]*MAGNET([.S$24]+[.$BB37])+[.T$26]*[.$Z$5]*MAGNET([.T$24]+[.$BB37])+[.U$26]*[.$Z$5]*MAGNET([.U$24]+[.$BB37])+[.V$26]*[.$Z$5]*MAGNET([.V$24]+[.$BB37])+[.W$26]*[.$Z$5]*MAGNET([.W$24]+[.$BB37])+[.X$26]*[.$Z$5]*MAGNET([.X$24]+[.$BB37])+[.Y$26]*[.$Z$5]*MAGNET([.Y$24]+[.$BB37])+[.Z$26]*[.$Z$5]*MAGNET([.Z$24]+[.$BB37])+[.AA$26]*[.$Z$5]*MAGNET([.AA$24]+[.$BB37])+[.AB$26]*[.$Z$5]*MAGNET([.AB$24]+[.$BB37])+[.AC$26]*[.$Z$5]*MAGNET([.AC$24]+[.$BB37])+[.AD$26]*[.$Z$5]*MAGNET([.AD$24]+[.$BB37])+[.AE$26]*[.$Z$5]*MAGNET([.AE$24]+[.$BB37])+[.AF$26]*[.$Z$5]*MAGNET([.AF$24]+[.$BB37])+[.AG$26]*[.$Z$5]*MAGNET([.AG$24]+[.$BB37])+[.D$26]*[.$Z$5]*MAGNET([.D$24]+[.$BB37])+[.AH$26]*[.$Z$5]*MAGNET([.AH$24]+[.BB37]) +[.AI$26]*[.$Z$5]*MAGNET([.AI$24]+[.BB37]) +[.AJ$26]*[.$Z$5]*MAGNET([.AJ$24]+[.BB37]) +[.AK$26]*[.$Z$5]*MAGNET([.AK$24]+[.BB37]) +[.AL$26]*[.$Z$5]*MAGNET([.AL$24]+[.BB37]) +[.AM$26]*[.$Z$5]*MAGNET([.AM$24]+[.BB37]) +[.AN$26]*[.$Z$5]*MAGNET([.AN$24]+[.BB37]) +[.AO$26]*[.$Z$5]*MAGNET([.AO$24]+[.BB37]) +[.AP$26]*[.$Z$5]*MAGNET([.AP$24]+[.$BB37])&#10;+[.AQ$26]*[.$Z$5]*MAGNET([.AQ$24]+[.$BB37])&#10;+[.AR$26]*[.$Z$5]*MAGNET([.AR$24]+[.$BB37])&#10;+[.AS$26]*[.$Z$5]*MAGNET([.AS$24]+[.$BB37])&#10;+[.AT$26]*[.$Z$5]*MAGNET([.AT$24]+[.$BB37])&#10;+[.AU$26]*[.$Z$5]*MAGNET([.AU$24]+[.$BB37])&#10;+[.AV$26]*[.$Z$5]*MAGNET([.AV$24]+[.$BB37])&#10;+[.AW$26]*[.$Z$5]*MAGNET([.AW$24]+[.$BB37])&#10;+[.AX$26]*[.$Z$5]*MAGNET([.AX$24]+[.$BB37])&#10;+[.AY$26]*[.$Z$5]*MAGNET([.AY$24]+[.$BB37]) +RAND()*[.$BD$13]" office:value-type="float" office:value="-69.2030751803235" calcext:value-type="float">
            <text:p>-69.20</text:p>
          </table:table-cell>
          <table:table-cell table:style-name="ce71" table:formula="of:=[.E$27]*[.$Z$5]*MAGNET([.E$24]+[.$BB37])+[.F$27]*[.$Z$5]*MAGNET([.F$24]+[.$BB37])+[.G$27]*[.$Z$5]*MAGNET([.G$24]+[.$BB37])+[.H$27]*[.$Z$5]*MAGNET([.H$24]+[.$BB37])+[.I$27]*[.$Z$5]*MAGNET([.I$24]+[.$BB37])+[.J$27]*[.$Z$5]*MAGNET([.J$24]+[.$BB37])+[.K$27]*[.$Z$5]*MAGNET([.K$24]+[.$BB37])+[.L$27]*[.$Z$5]*MAGNET([.L$24]+[.$BB37])+[.M$27]*[.$Z$5]*MAGNET([.M$24]+[.$BB37])+[.N$27]*[.$Z$5]*MAGNET([.N$24]+[.$BB37])+[.O$27]*[.$Z$5]*MAGNET([.O$24]+[.$BB37])+[.P$27]*[.$Z$5]*MAGNET([.P$24]+[.$BB37])+[.Q$27]*[.$Z$5]*MAGNET([.Q$24]+[.$BB37])+[.R$27]*[.$Z$5]*MAGNET([.R$24]+[.$BB37])+[.S$27]*[.$Z$5]*MAGNET([.S$24]+[.$BB37])+[.T$27]*[.$Z$5]*MAGNET([.T$24]+[.$BB37])+[.U$27]*[.$Z$5]*MAGNET([.U$24]+[.$BB37])+[.V$27]*[.$Z$5]*MAGNET([.V$24]+[.$BB37])+[.W$27]*[.$Z$5]*MAGNET([.W$24]+[.$BB37])+[.X$27]*[.$Z$5]*MAGNET([.X$24]+[.$BB37])+[.Y$27]*[.$Z$5]*MAGNET([.Y$24]+[.$BB37])+[.Z$27]*[.$Z$5]*MAGNET([.Z$24]+[.$BB37])+[.AA$27]*[.$Z$5]*MAGNET([.AA$24]+[.$BB37])+[.AB$27]*[.$Z$5]*MAGNET([.AB$24]+[.$BB37])+[.AC$27]*[.$Z$5]*MAGNET([.AC$24]+[.$BB37])+[.AD$27]*[.$Z$5]*MAGNET([.AD$24]+[.$BB37])+[.AE$27]*[.$Z$5]*MAGNET([.AE$24]+[.$BB37])+[.AF$27]*[.$Z$5]*MAGNET([.AF$24]+[.$BB37])+[.AG$27]*[.$Z$5]*MAGNET([.AG$24]+[.$BB37])+[.D$27]*[.$Z$5]*MAGNET([.D$24]+[.$BB37])+[.AH$27]*[.$Z$5]*MAGNET([.AH$24]+[.BB37]) +[.AI$27]*[.$Z$5]*MAGNET([.AI$24]+[.BB37]) +[.AJ$27]*[.$Z$5]*MAGNET([.AJ$24]+[.BB37]) +[.AK$27]*[.$Z$5]*MAGNET([.AK$24]+[.BB37]) +[.AL$27]*[.$Z$5]*MAGNET([.AL$24]+[.BB37]) +[.AM$27]*[.$Z$5]*MAGNET([.AM$24]+[.BB37]) +[.AN$27]*[.$Z$5]*MAGNET([.AN$24]+[.BB37]) +[.AO$27]*[.$Z$5]*MAGNET([.AO$24]+[.BB37]) +[.AP$27]*[.$Z$5]*MAGNET([.AP$24]+[.$BB37])&#10;+[.AQ$27]*[.$Z$5]*MAGNET([.AQ$24]+[.$BB37])&#10;+[.AR$27]*[.$Z$5]*MAGNET([.AR$24]+[.$BB37])&#10;+[.AS$27]*[.$Z$5]*MAGNET([.AS$24]+[.$BB37])&#10;+[.AT$27]*[.$Z$5]*MAGNET([.AT$24]+[.$BB37])&#10;+[.AU$27]*[.$Z$5]*MAGNET([.AU$24]+[.$BB37])&#10;+[.AV$27]*[.$Z$5]*MAGNET([.AV$24]+[.$BB37])&#10;+[.AW$27]*[.$Z$5]*MAGNET([.AW$24]+[.$BB37])&#10;+[.AX$27]*[.$Z$5]*MAGNET([.AX$24]+[.$BB37])&#10;+[.AY$27]*[.$Z$5]*MAGNET([.AY$24]+[.$BB37]) +RAND()*[.$BE$13]" office:value-type="float" office:value="-50.1479753264679" calcext:value-type="float">
            <text:p>-50.1479753264679</text:p>
          </table:table-cell>
          <table:table-cell table:style-name="ce71" table:formula="of:=[.E$28]*[.$Z$5]*MAGNET([.E$24]+[.$BB37])+[.F$28]*[.$Z$5]*MAGNET([.F$24]+[.$BB37])+[.G$28]*[.$Z$5]*MAGNET([.G$24]+[.$BB37])+[.H$28]*[.$Z$5]*MAGNET([.H$24]+[.$BB37])+[.I$28]*[.$Z$5]*MAGNET([.I$24]+[.$BB37])+[.J$28]*[.$Z$5]*MAGNET([.J$24]+[.$BB37])+[.K$28]*[.$Z$5]*MAGNET([.K$24]+[.$BB37])+[.L$28]*[.$Z$5]*MAGNET([.L$24]+[.$BB37])+[.M$28]*[.$Z$5]*MAGNET([.M$24]+[.$BB37])+[.N$28]*[.$Z$5]*MAGNET([.N$24]+[.$BB37])+[.O$28]*[.$Z$5]*MAGNET([.O$24]+[.$BB37])+[.P$28]*[.$Z$5]*MAGNET([.P$24]+[.$BB37])+[.Q$28]*[.$Z$5]*MAGNET([.Q$24]+[.$BB37])+[.R$28]*[.$Z$5]*MAGNET([.R$24]+[.$BB37])+[.S$28]*[.$Z$5]*MAGNET([.S$24]+[.$BB37])+[.T$28]*[.$Z$5]*MAGNET([.T$24]+[.$BB37])+[.U$28]*[.$Z$5]*MAGNET([.U$24]+[.$BB37])+[.V$28]*[.$Z$5]*MAGNET([.V$24]+[.$BB37])+[.W$28]*[.$Z$5]*MAGNET([.W$24]+[.$BB37])+[.X$28]*[.$Z$5]*MAGNET([.X$24]+[.$BB37])+[.Y$28]*[.$Z$5]*MAGNET([.Y$24]+[.$BB37])+[.Z$28]*[.$Z$5]*MAGNET([.Z$24]+[.$BB37])+[.AA$28]*[.$Z$5]*MAGNET([.AA$24]+[.$BB37])+[.AB$28]*[.$Z$5]*MAGNET([.AB$24]+[.$BB37])+[.AC$28]*[.$Z$5]*MAGNET([.AC$24]+[.$BB37])+[.AD$28]*[.$Z$5]*MAGNET([.AD$24]+[.$BB37])+[.AE$28]*[.$Z$5]*MAGNET([.AE$24]+[.$BB37])+[.AF$28]*[.$Z$5]*MAGNET([.AF$24]+[.$BB37])+[.AG$28]*[.$Z$5]*MAGNET([.AG$24]+[.$BB37])+[.D$28]*[.$Z$5]*MAGNET([.D$24]+[.$BB37])+[.AH$28]*[.$Z$5]*MAGNET([.AH$24]+[.BB37]) +[.AI$28]*[.$Z$5]*MAGNET([.AI$24]+[.BB37]) +[.AJ$28]*[.$Z$5]*MAGNET([.AJ$24]+[.BB37]) +[.AK$28]*[.$Z$5]*MAGNET([.AK$24]+[.BB37]) +[.AL$28]*[.$Z$5]*MAGNET([.AL$24]+[.BB37]) +[.AM$28]*[.$Z$5]*MAGNET([.AM$24]+[.BB37]) +[.AN$28]*[.$Z$5]*MAGNET([.AN$24]+[.BB37]) +[.AO$28]*[.$Z$5]*MAGNET([.AO$24]+[.BB37]) +[.AP$28]*[.$Z$5]*MAGNET([.AP$24]+[.$BB37])&#10;+[.AQ$28]*[.$Z$5]*MAGNET([.AQ$24]+[.$BB37])&#10;+[.AR$28]*[.$Z$5]*MAGNET([.AR$24]+[.$BB37])&#10;+[.AS$28]*[.$Z$5]*MAGNET([.AS$24]+[.$BB37])&#10;+[.AT$28]*[.$Z$5]*MAGNET([.AT$24]+[.$BB37])&#10;+[.AU$28]*[.$Z$5]*MAGNET([.AU$24]+[.$BB37])&#10;+[.AV$28]*[.$Z$5]*MAGNET([.AV$24]+[.$BB37])&#10;+[.AW$28]*[.$Z$5]*MAGNET([.AW$24]+[.$BB37])&#10;+[.AX$28]*[.$Z$5]*MAGNET([.AX$24]+[.$BB37])&#10;+[.AY$28]*[.$Z$5]*MAGNET([.AY$24]+[.$BB37]) +RAND()*[.$BF$13]" office:value-type="float" office:value="-4.20502345273111" calcext:value-type="float">
            <text:p>-4.20502345273111</text:p>
          </table:table-cell>
          <table:table-cell table:style-name="ce71" table:formula="of:=[.E$29]*[.$Z$5]*MAGNET([.E$24]+[.$BB37])+[.F$29]*[.$Z$5]*MAGNET([.F$24]+[.$BB37])+[.G$29]*[.$Z$5]*MAGNET([.G$24]+[.$BB37])+[.H$29]*[.$Z$5]*MAGNET([.H$24]+[.$BB37])+[.I$29]*[.$Z$5]*MAGNET([.I$24]+[.$BB37])+[.J$29]*[.$Z$5]*MAGNET([.J$24]+[.$BB37])+[.K$29]*[.$Z$5]*MAGNET([.K$24]+[.$BB37])+[.L$29]*[.$Z$5]*MAGNET([.L$24]+[.$BB37])+[.M$29]*[.$Z$5]*MAGNET([.M$24]+[.$BB37])+[.N$29]*[.$Z$5]*MAGNET([.N$24]+[.$BB37])+[.O$29]*[.$Z$5]*MAGNET([.O$24]+[.$BB37])+[.P$29]*[.$Z$5]*MAGNET([.P$24]+[.$BB37])+[.Q$29]*[.$Z$5]*MAGNET([.Q$24]+[.$BB37])+[.R$29]*[.$Z$5]*MAGNET([.R$24]+[.$BB37])+[.S$29]*[.$Z$5]*MAGNET([.S$24]+[.$BB37])+[.T$29]*[.$Z$5]*MAGNET([.T$24]+[.$BB37])+[.U$29]*[.$Z$5]*MAGNET([.U$24]+[.$BB37])+[.V$29]*[.$Z$5]*MAGNET([.V$24]+[.$BB37])+[.W$29]*[.$Z$5]*MAGNET([.W$24]+[.$BB37])+[.X$29]*[.$Z$5]*MAGNET([.X$24]+[.$BB37])+[.Y$29]*[.$Z$5]*MAGNET([.Y$24]+[.$BB37])+[.Z$29]*[.$Z$5]*MAGNET([.Z$24]+[.$BB37])+[.AA$29]*[.$Z$5]*MAGNET([.AA$24]+[.$BB37])+[.AB$29]*[.$Z$5]*MAGNET([.AB$24]+[.$BB37])+[.AC$29]*[.$Z$5]*MAGNET([.AC$24]+[.$BB37])+[.AD$29]*[.$Z$5]*MAGNET([.AD$24]+[.$BB37])+[.AE$29]*[.$Z$5]*MAGNET([.AE$24]+[.$BB37])+[.AF$29]*[.$Z$5]*MAGNET([.AF$24]+[.$BB37])+[.AG$29]*[.$Z$5]*MAGNET([.AG$24]+[.$BB37])+[.D$29]*[.$Z$5]*MAGNET([.D$24]+[.$BB37])+[.AH$29]*[.$Z$5]*MAGNET([.AH$24]+[.BB37]) +[.AI$29]*[.$Z$5]*MAGNET([.AI$24]+[.BB37]) +[.AJ$29]*[.$Z$5]*MAGNET([.AJ$24]+[.BB37]) +[.AK$29]*[.$Z$5]*MAGNET([.AK$24]+[.BB37]) +[.AL$29]*[.$Z$5]*MAGNET([.AL$24]+[.BB37]) +[.AM$29]*[.$Z$5]*MAGNET([.AM$24]+[.BB37]) +[.AN$29]*[.$Z$5]*MAGNET([.AN$24]+[.BB37]) +[.AO$29]*[.$Z$5]*MAGNET([.AO$24]+[.BB37]) +[.AP$29]*[.$Z$5]*MAGNET([.AP$24]+[.$BB37])&#10;+[.AQ$29]*[.$Z$5]*MAGNET([.AQ$24]+[.$BB37])&#10;+[.AR$29]*[.$Z$5]*MAGNET([.AR$24]+[.$BB37])&#10;+[.AS$29]*[.$Z$5]*MAGNET([.AS$24]+[.$BB37])&#10;+[.AT$29]*[.$Z$5]*MAGNET([.AT$24]+[.$BB37])&#10;+[.AU$29]*[.$Z$5]*MAGNET([.AU$24]+[.$BB37])&#10;+[.AV$29]*[.$Z$5]*MAGNET([.AV$24]+[.$BB37])&#10;+[.AW$29]*[.$Z$5]*MAGNET([.AW$24]+[.$BB37])&#10;+[.AX$29]*[.$Z$5]*MAGNET([.AX$24]+[.$BB37])&#10;+[.AY$29]*[.$Z$5]*MAGNET([.AY$24]+[.$BB37]) +RAND()*[.$BG$13]" office:value-type="float" office:value="20.4441839769598" calcext:value-type="float">
            <text:p>20.4441839769598</text:p>
          </table:table-cell>
          <table:table-cell table:style-name="ce71" table:formula="of:=[.E$30]*[.$Z$5]*MAGNET([.E$24]+[.$BB37])+[.F$30]*[.$Z$5]*MAGNET([.F$24]+[.$BB37])+[.G$30]*[.$Z$5]*MAGNET([.G$24]+[.$BB37])+[.H$30]*[.$Z$5]*MAGNET([.H$24]+[.$BB37])+[.I$30]*[.$Z$5]*MAGNET([.I$24]+[.$BB37])+[.J$30]*[.$Z$5]*MAGNET([.J$24]+[.$BB37])+[.K$30]*[.$Z$5]*MAGNET([.K$24]+[.$BB37])+[.L$30]*[.$Z$5]*MAGNET([.L$24]+[.$BB37])+[.M$30]*[.$Z$5]*MAGNET([.M$24]+[.$BB37])+[.N$30]*[.$Z$5]*MAGNET([.N$24]+[.$BB37])+[.O$30]*[.$Z$5]*MAGNET([.O$24]+[.$BB37])+[.P$30]*[.$Z$5]*MAGNET([.P$24]+[.$BB37])+[.Q$30]*[.$Z$5]*MAGNET([.Q$24]+[.$BB37])+[.R$30]*[.$Z$5]*MAGNET([.R$24]+[.$BB37])+[.S$30]*[.$Z$5]*MAGNET([.S$24]+[.$BB37])+[.T$30]*[.$Z$5]*MAGNET([.T$24]+[.$BB37])+[.U$30]*[.$Z$5]*MAGNET([.U$24]+[.$BB37])+[.V$30]*[.$Z$5]*MAGNET([.V$24]+[.$BB37])+[.W$30]*[.$Z$5]*MAGNET([.W$24]+[.$BB37])+[.X$30]*[.$Z$5]*MAGNET([.X$24]+[.$BB37])+[.Y$30]*[.$Z$5]*MAGNET([.Y$24]+[.$BB37])+[.Z$30]*[.$Z$5]*MAGNET([.Z$24]+[.$BB37])+[.AA$30]*[.$Z$5]*MAGNET([.AA$24]+[.$BB37])+[.AB$30]*[.$Z$5]*MAGNET([.AB$24]+[.$BB37])+[.AC$30]*[.$Z$5]*MAGNET([.AC$24]+[.$BB37])+[.AD$30]*[.$Z$5]*MAGNET([.AD$24]+[.$BB37])+[.AE$30]*[.$Z$5]*MAGNET([.AE$24]+[.$BB37])+[.AF$30]*[.$Z$5]*MAGNET([.AF$24]+[.$BB37])+[.AG$30]*[.$Z$5]*MAGNET([.AG$24]+[.$BB37])+[.D$30]*[.$Z$5]*MAGNET([.D$24]+[.$BB37])+[.AH$30]*[.$Z$5]*MAGNET([.AH$24]+[.BB37]) +[.AI$30]*[.$Z$5]*MAGNET([.AI$24]+[.BB37]) +[.AJ$30]*[.$Z$5]*MAGNET([.AJ$24]+[.BB37]) +[.AK$30]*[.$Z$5]*MAGNET([.AK$24]+[.BB37]) +[.AL$30]*[.$Z$5]*MAGNET([.AL$24]+[.BB37]) +[.AM$30]*[.$Z$5]*MAGNET([.AM$24]+[.BB37]) +[.AN$30]*[.$Z$5]*MAGNET([.AN$24]+[.BB37]) +[.AO$30]*[.$Z$5]*MAGNET([.AO$24]+[.BB37]) +[.AP$30]*[.$Z$5]*MAGNET([.AP$24]+[.$BB37])&#10;+[.AQ$30]*[.$Z$5]*MAGNET([.AQ$24]+[.$BB37])&#10;+[.AR$30]*[.$Z$5]*MAGNET([.AR$24]+[.$BB37])&#10;+[.AS$30]*[.$Z$5]*MAGNET([.AS$24]+[.$BB37])&#10;+[.AT$30]*[.$Z$5]*MAGNET([.AT$24]+[.$BB37])&#10;+[.AU$30]*[.$Z$5]*MAGNET([.AU$24]+[.$BB37])&#10;+[.AV$30]*[.$Z$5]*MAGNET([.AV$24]+[.$BB37])&#10;+[.AW$30]*[.$Z$5]*MAGNET([.AW$24]+[.$BB37])&#10;+[.AX$30]*[.$Z$5]*MAGNET([.AX$24]+[.$BB37])&#10;+[.AY$30]*[.$Z$5]*MAGNET([.AY$24]+[.$BB37]) +RAND()*[.$BH$13]" office:value-type="float" office:value="0" calcext:value-type="float">
            <text:p>0</text:p>
          </table:table-cell>
          <table:table-cell table:style-name="ce71" table:formula="of:=[.E$31]*[.$Z$5]*MAGNET([.E$24]+[.$BB37])+[.F$31]*[.$Z$5]*MAGNET([.F$24]+[.$BB37])+[.G$31]*[.$Z$5]*MAGNET([.G$24]+[.$BB37])+[.H$31]*[.$Z$5]*MAGNET([.H$24]+[.$BB37])+[.I$31]*[.$Z$5]*MAGNET([.I$24]+[.$BB37])+[.J$31]*[.$Z$5]*MAGNET([.J$24]+[.$BB37])+[.K$31]*[.$Z$5]*MAGNET([.K$24]+[.$BB37])+[.L$31]*[.$Z$5]*MAGNET([.L$24]+[.$BB37])+[.M$31]*[.$Z$5]*MAGNET([.M$24]+[.$BB37])+[.N$31]*[.$Z$5]*MAGNET([.N$24]+[.$BB37])+[.O$31]*[.$Z$5]*MAGNET([.O$24]+[.$BB37])+[.P$31]*[.$Z$5]*MAGNET([.P$24]+[.$BB37])+[.Q$31]*[.$Z$5]*MAGNET([.Q$24]+[.$BB37])+[.R$31]*[.$Z$5]*MAGNET([.R$24]+[.$BB37])+[.S$31]*[.$Z$5]*MAGNET([.S$24]+[.$BB37])+[.T$31]*[.$Z$5]*MAGNET([.T$24]+[.$BB37])+[.U$31]*[.$Z$5]*MAGNET([.U$24]+[.$BB37])+[.V$31]*[.$Z$5]*MAGNET([.V$24]+[.$BB37])+[.W$31]*[.$Z$5]*MAGNET([.W$24]+[.$BB37])+[.X$31]*[.$Z$5]*MAGNET([.X$24]+[.$BB37])+[.Y$31]*[.$Z$5]*MAGNET([.Y$24]+[.$BB37])+[.Z$31]*[.$Z$5]*MAGNET([.Z$24]+[.$BB37])+[.AA$31]*[.$Z$5]*MAGNET([.AA$24]+[.$BB37])+[.AB$31]*[.$Z$5]*MAGNET([.AB$24]+[.$BB37])+[.AC$31]*[.$Z$5]*MAGNET([.AC$24]+[.$BB37])+[.AD$31]*[.$Z$5]*MAGNET([.AD$24]+[.$BB37])+[.AE$31]*[.$Z$5]*MAGNET([.AE$24]+[.$BB37])+[.AF$31]*[.$Z$5]*MAGNET([.AF$24]+[.$BB37])+[.AG$31]*[.$Z$5]*MAGNET([.AG$24]+[.$BB37])+[.D$31]*[.$Z$5]*MAGNET([.D$24]+[.$BB37])+[.AH$31]*[.$Z$5]*MAGNET([.AH$24]+[.BB37]) +[.AI$31]*[.$Z$5]*MAGNET([.AI$24]+[.BB37]) +[.AJ$31]*[.$Z$5]*MAGNET([.AJ$24]+[.BB37]) +[.AK$31]*[.$Z$5]*MAGNET([.AK$24]+[.BB37]) +[.AL$31]*[.$Z$5]*MAGNET([.AL$24]+[.BB37]) +[.AM$31]*[.$Z$5]*MAGNET([.AM$24]+[.BB37]) +[.AN$31]*[.$Z$5]*MAGNET([.AN$24]+[.BB37]) +[.AO$31]*[.$Z$5]*MAGNET([.AO$24]+[.BB37]) +[.AP$31]*[.$Z$5]*MAGNET([.AP$24]+[.$BB37])&#10;+[.AQ$31]*[.$Z$5]*MAGNET([.AQ$24]+[.$BB37])&#10;+[.AR$31]*[.$Z$5]*MAGNET([.AR$24]+[.$BB37])&#10;+[.AS$31]*[.$Z$5]*MAGNET([.AS$24]+[.$BB37])&#10;+[.AT$31]*[.$Z$5]*MAGNET([.AT$24]+[.$BB37])&#10;+[.AU$31]*[.$Z$5]*MAGNET([.AU$24]+[.$BB37])&#10;+[.AV$31]*[.$Z$5]*MAGNET([.AV$24]+[.$BB37])&#10;+[.AW$31]*[.$Z$5]*MAGNET([.AW$24]+[.$BB37])&#10;+[.AX$31]*[.$Z$5]*MAGNET([.AX$24]+[.$BB37])&#10;+[.AY$31]*[.$Z$5]*MAGNET([.AY$24]+[.$BB37]) +RAND()*[.$BI$13]" office:value-type="float" office:value="0" calcext:value-type="float">
            <text:p>0</text:p>
          </table:table-cell>
          <table:table-cell table:style-name="ce71" table:formula="of:=[.E$32]*[.$Z$5]*MAGNET([.E$24]+[.$BB37])+[.F$32]*[.$Z$5]*MAGNET([.F$24]+[.$BB37])+[.G$32]*[.$Z$5]*MAGNET([.G$24]+[.$BB37])+[.H$32]*[.$Z$5]*MAGNET([.H$24]+[.$BB37])+[.I$32]*[.$Z$5]*MAGNET([.I$24]+[.$BB37])+[.J$32]*[.$Z$5]*MAGNET([.J$24]+[.$BB37])+[.K$32]*[.$Z$5]*MAGNET([.K$24]+[.$BB37])+[.L$32]*[.$Z$5]*MAGNET([.L$24]+[.$BB37])+[.M$32]*[.$Z$5]*MAGNET([.M$24]+[.$BB37])+[.N$32]*[.$Z$5]*MAGNET([.N$24]+[.$BB37])+[.O$32]*[.$Z$5]*MAGNET([.O$24]+[.$BB37])+[.P$32]*[.$Z$5]*MAGNET([.P$24]+[.$BB37])+[.Q$32]*[.$Z$5]*MAGNET([.Q$24]+[.$BB37])+[.R$32]*[.$Z$5]*MAGNET([.R$24]+[.$BB37])+[.S$32]*[.$Z$5]*MAGNET([.S$24]+[.$BB37])+[.T$32]*[.$Z$5]*MAGNET([.T$24]+[.$BB37])+[.U$32]*[.$Z$5]*MAGNET([.U$24]+[.$BB37])+[.V$32]*[.$Z$5]*MAGNET([.V$24]+[.$BB37])+[.W$32]*[.$Z$5]*MAGNET([.W$24]+[.$BB37])+[.X$32]*[.$Z$5]*MAGNET([.X$24]+[.$BB37])+[.Y$32]*[.$Z$5]*MAGNET([.Y$24]+[.$BB37])+[.Z$32]*[.$Z$5]*MAGNET([.Z$24]+[.$BB37])+[.AA$32]*[.$Z$5]*MAGNET([.AA$24]+[.$BB37])+[.AB$32]*[.$Z$5]*MAGNET([.AB$24]+[.$BB37])+[.AC$32]*[.$Z$5]*MAGNET([.AC$24]+[.$BB37])+[.AD$32]*[.$Z$5]*MAGNET([.AD$24]+[.$BB37])+[.AE$32]*[.$Z$5]*MAGNET([.AE$24]+[.$BB37])+[.AF$32]*[.$Z$5]*MAGNET([.AF$24]+[.$BB37])+[.AG$32]*[.$Z$5]*MAGNET([.AG$24]+[.$BB37])+[.D$32]*[.$Z$5]*MAGNET([.D$24]+[.$BB37])+[.AH$32]*[.$Z$5]*MAGNET([.AH$24]+[.BB37]) +[.AI$32]*[.$Z$5]*MAGNET([.AI$24]+[.BB37]) +[.AJ$32]*[.$Z$5]*MAGNET([.AJ$24]+[.BB37]) +[.AK$32]*[.$Z$5]*MAGNET([.AK$24]+[.BB37]) +[.AL$32]*[.$Z$5]*MAGNET([.AL$24]+[.BB37]) +[.AM$32]*[.$Z$5]*MAGNET([.AM$24]+[.BB37]) +[.AN$32]*[.$Z$5]*MAGNET([.AN$24]+[.BB37]) +[.AO$32]*[.$Z$5]*MAGNET([.AO$24]+[.BB37]) +[.AP$32]*[.$Z$5]*MAGNET([.AP$24]+[.$BB37])&#10;+[.AQ$32]*[.$Z$5]*MAGNET([.AQ$24]+[.$BB37])&#10;+[.AR$32]*[.$Z$5]*MAGNET([.AR$24]+[.$BB37])&#10;+[.AS$32]*[.$Z$5]*MAGNET([.AS$24]+[.$BB37])&#10;+[.AT$32]*[.$Z$5]*MAGNET([.AT$24]+[.$BB37])&#10;+[.AU$32]*[.$Z$5]*MAGNET([.AU$24]+[.$BB37])&#10;+[.AV$32]*[.$Z$5]*MAGNET([.AV$24]+[.$BB37])&#10;+[.AW$32]*[.$Z$5]*MAGNET([.AW$24]+[.$BB37])&#10;+[.AX$32]*[.$Z$5]*MAGNET([.AX$24]+[.$BB37])&#10;+[.AY$32]*[.$Z$5]*MAGNET([.AY$24]+[.$BB3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1" calcext:value-type="float">
            <text:p>-1</text:p>
          </table:table-cell>
          <table:table-cell table:formula="of:=COUNTIF([.D$15:.D$22];&quot;=&quot; &amp;[.$C38])" office:value-type="float" office:value="0" calcext:value-type="float">
            <text:p>0</text:p>
          </table:table-cell>
          <table:table-cell table:formula="of:=COUNTIF([.E$15:.E$22];&quot;=&quot; &amp;[.$C38])" office:value-type="float" office:value="0" calcext:value-type="float">
            <text:p>0</text:p>
          </table:table-cell>
          <table:table-cell table:formula="of:=COUNTIF([.F$15:.F$22];&quot;=&quot; &amp;[.$C38])" office:value-type="float" office:value="0" calcext:value-type="float">
            <text:p>0</text:p>
          </table:table-cell>
          <table:table-cell table:formula="of:=COUNTIF([.G$15:.G$22];&quot;=&quot; &amp;[.$C38])" office:value-type="float" office:value="0" calcext:value-type="float">
            <text:p>0</text:p>
          </table:table-cell>
          <table:table-cell table:formula="of:=COUNTIF([.H$15:.H$22];&quot;=&quot; &amp;[.$C38])" office:value-type="float" office:value="0" calcext:value-type="float">
            <text:p>0</text:p>
          </table:table-cell>
          <table:table-cell table:formula="of:=COUNTIF([.I$15:.I$22];&quot;=&quot; &amp;[.$C38])" office:value-type="float" office:value="0" calcext:value-type="float">
            <text:p>0</text:p>
          </table:table-cell>
          <table:table-cell table:formula="of:=COUNTIF([.J$15:.J$22];&quot;=&quot; &amp;[.$C38])" office:value-type="float" office:value="0" calcext:value-type="float">
            <text:p>0</text:p>
          </table:table-cell>
          <table:table-cell table:formula="of:=COUNTIF([.K$15:.K$22];&quot;=&quot; &amp;[.$C38])" office:value-type="float" office:value="2" calcext:value-type="float">
            <text:p>2</text:p>
          </table:table-cell>
          <table:table-cell table:formula="of:=COUNTIF([.L$15:.L$22];&quot;=&quot; &amp;[.$C38])" office:value-type="float" office:value="4" calcext:value-type="float">
            <text:p>4</text:p>
          </table:table-cell>
          <table:table-cell table:formula="of:=COUNTIF([.M$15:.M$22];&quot;=&quot; &amp;[.$C38])" office:value-type="float" office:value="4" calcext:value-type="float">
            <text:p>4</text:p>
          </table:table-cell>
          <table:table-cell table:formula="of:=COUNTIF([.N$15:.N$22];&quot;=&quot; &amp;[.$C38])" office:value-type="float" office:value="0" calcext:value-type="float">
            <text:p>0</text:p>
          </table:table-cell>
          <table:table-cell table:formula="of:=COUNTIF([.O$15:.O$22];&quot;=&quot; &amp;[.$C38])" office:value-type="float" office:value="0" calcext:value-type="float">
            <text:p>0</text:p>
          </table:table-cell>
          <table:table-cell table:formula="of:=COUNTIF([.P$15:.P$22];&quot;=&quot; &amp;[.$C38])" office:value-type="float" office:value="0" calcext:value-type="float">
            <text:p>0</text:p>
          </table:table-cell>
          <table:table-cell table:formula="of:=COUNTIF([.Q$15:.Q$22];&quot;=&quot; &amp;[.$C38])" office:value-type="float" office:value="0" calcext:value-type="float">
            <text:p>0</text:p>
          </table:table-cell>
          <table:table-cell table:formula="of:=COUNTIF([.R$15:.R$22];&quot;=&quot; &amp;[.$C38])" office:value-type="float" office:value="0" calcext:value-type="float">
            <text:p>0</text:p>
          </table:table-cell>
          <table:table-cell table:formula="of:=COUNTIF([.S$15:.S$22];&quot;=&quot; &amp;[.$C38])" office:value-type="float" office:value="0" calcext:value-type="float">
            <text:p>0</text:p>
          </table:table-cell>
          <table:table-cell table:formula="of:=COUNTIF([.T$15:.T$22];&quot;=&quot; &amp;[.$C38])" office:value-type="float" office:value="0" calcext:value-type="float">
            <text:p>0</text:p>
          </table:table-cell>
          <table:table-cell table:formula="of:=COUNTIF([.U$15:.U$22];&quot;=&quot; &amp;[.$C38])" office:value-type="float" office:value="0" calcext:value-type="float">
            <text:p>0</text:p>
          </table:table-cell>
          <table:table-cell table:formula="of:=COUNTIF([.V$15:.V$22];&quot;=&quot; &amp;[.$C38])" office:value-type="float" office:value="0" calcext:value-type="float">
            <text:p>0</text:p>
          </table:table-cell>
          <table:table-cell table:formula="of:=COUNTIF([.W$15:.W$22];&quot;=&quot; &amp;[.$C38])" office:value-type="float" office:value="0" calcext:value-type="float">
            <text:p>0</text:p>
          </table:table-cell>
          <table:table-cell table:formula="of:=COUNTIF([.X$15:.X$22];&quot;=&quot; &amp;[.$C38])" office:value-type="float" office:value="0" calcext:value-type="float">
            <text:p>0</text:p>
          </table:table-cell>
          <table:table-cell table:formula="of:=COUNTIF([.Y$15:.Y$22];&quot;=&quot; &amp;[.$C38])" office:value-type="float" office:value="0" calcext:value-type="float">
            <text:p>0</text:p>
          </table:table-cell>
          <table:table-cell table:formula="of:=COUNTIF([.Z$15:.Z$22];&quot;=&quot; &amp;[.$C38])" office:value-type="float" office:value="2" calcext:value-type="float">
            <text:p>2</text:p>
          </table:table-cell>
          <table:table-cell table:formula="of:=COUNTIF([.AA$15:.AA$22];&quot;=&quot; &amp;[.$C38])" office:value-type="float" office:value="4" calcext:value-type="float">
            <text:p>4</text:p>
          </table:table-cell>
          <table:table-cell table:formula="of:=COUNTIF([.AB$15:.AB$22];&quot;=&quot; &amp;[.$C38])" office:value-type="float" office:value="4" calcext:value-type="float">
            <text:p>4</text:p>
          </table:table-cell>
          <table:table-cell table:formula="of:=COUNTIF([.AC$15:.AC$22];&quot;=&quot; &amp;[.$C38])" office:value-type="float" office:value="0" calcext:value-type="float">
            <text:p>0</text:p>
          </table:table-cell>
          <table:table-cell table:formula="of:=COUNTIF([.AD$15:.AD$22];&quot;=&quot; &amp;[.$C38])" office:value-type="float" office:value="0" calcext:value-type="float">
            <text:p>0</text:p>
          </table:table-cell>
          <table:table-cell table:formula="of:=COUNTIF([.AE$15:.AE$22];&quot;=&quot; &amp;[.$C38])" office:value-type="float" office:value="0" calcext:value-type="float">
            <text:p>0</text:p>
          </table:table-cell>
          <table:table-cell table:formula="of:=COUNTIF([.AF$15:.AF$22];&quot;=&quot; &amp;[.$C38])" office:value-type="float" office:value="0" calcext:value-type="float">
            <text:p>0</text:p>
          </table:table-cell>
          <table:table-cell table:formula="of:=COUNTIF([.AG$15:.AG$22];&quot;=&quot; &amp;[.$C38])" office:value-type="float" office:value="0" calcext:value-type="float">
            <text:p>0</text:p>
          </table:table-cell>
          <table:table-cell table:formula="of:=COUNTIF([.AH$15:.AH$22];&quot;=&quot; &amp;[.$C38])" office:value-type="float" office:value="0" calcext:value-type="float">
            <text:p>0</text:p>
          </table:table-cell>
          <table:table-cell table:formula="of:=COUNTIF([.AI$15:.AI$22];&quot;=&quot; &amp;[.$C38])" office:value-type="float" office:value="0" calcext:value-type="float">
            <text:p>0</text:p>
          </table:table-cell>
          <table:table-cell table:formula="of:=COUNTIF([.AJ$15:.AJ$22];&quot;=&quot; &amp;[.$C38])" office:value-type="float" office:value="0" calcext:value-type="float">
            <text:p>0</text:p>
          </table:table-cell>
          <table:table-cell table:formula="of:=COUNTIF([.AK$15:.AK$22];&quot;=&quot; &amp;[.$C38])" office:value-type="float" office:value="0" calcext:value-type="float">
            <text:p>0</text:p>
          </table:table-cell>
          <table:table-cell table:formula="of:=COUNTIF([.AL$15:.AL$22];&quot;=&quot; &amp;[.$C38])" office:value-type="float" office:value="0" calcext:value-type="float">
            <text:p>0</text:p>
          </table:table-cell>
          <table:table-cell table:formula="of:=COUNTIF([.AM$15:.AM$22];&quot;=&quot; &amp;[.$C38])" office:value-type="float" office:value="0" calcext:value-type="float">
            <text:p>0</text:p>
          </table:table-cell>
          <table:table-cell table:formula="of:=COUNTIF([.AN$15:.AN$22];&quot;=&quot; &amp;[.$C38])" office:value-type="float" office:value="0" calcext:value-type="float">
            <text:p>0</text:p>
          </table:table-cell>
          <table:table-cell table:formula="of:=COUNTIF([.AO$15:.AO$22];&quot;=&quot; &amp;[.$C38])" office:value-type="float" office:value="0" calcext:value-type="float">
            <text:p>0</text:p>
          </table:table-cell>
          <table:table-cell table:formula="of:=COUNTIF([.AP$15:.AP$22];&quot;=&quot; &amp;[.$C38])" office:value-type="float" office:value="0" calcext:value-type="float">
            <text:p>0</text:p>
          </table:table-cell>
          <table:table-cell table:formula="of:=COUNTIF([.AQ$15:.AQ$22];&quot;=&quot; &amp;[.$C38])" office:value-type="float" office:value="0" calcext:value-type="float">
            <text:p>0</text:p>
          </table:table-cell>
          <table:table-cell table:formula="of:=COUNTIF([.AR$15:.AR$22];&quot;=&quot; &amp;[.$C38])" office:value-type="float" office:value="0" calcext:value-type="float">
            <text:p>0</text:p>
          </table:table-cell>
          <table:table-cell table:formula="of:=COUNTIF([.AS$15:.AS$22];&quot;=&quot; &amp;[.$C38])" office:value-type="float" office:value="0" calcext:value-type="float">
            <text:p>0</text:p>
          </table:table-cell>
          <table:table-cell table:formula="of:=COUNTIF([.AT$15:.AT$22];&quot;=&quot; &amp;[.$C38])" office:value-type="float" office:value="0" calcext:value-type="float">
            <text:p>0</text:p>
          </table:table-cell>
          <table:table-cell table:formula="of:=COUNTIF([.AU$15:.AU$22];&quot;=&quot; &amp;[.$C38])" office:value-type="float" office:value="0" calcext:value-type="float">
            <text:p>0</text:p>
          </table:table-cell>
          <table:table-cell table:formula="of:=COUNTIF([.AV$15:.AV$22];&quot;=&quot; &amp;[.$C38])" office:value-type="float" office:value="0" calcext:value-type="float">
            <text:p>0</text:p>
          </table:table-cell>
          <table:table-cell table:formula="of:=COUNTIF([.AW$15:.AW$22];&quot;=&quot; &amp;[.$C38])" office:value-type="float" office:value="0" calcext:value-type="float">
            <text:p>0</text:p>
          </table:table-cell>
          <table:table-cell table:formula="of:=COUNTIF([.AX$15:.AX$22];&quot;=&quot; &amp;[.$C38])" office:value-type="float" office:value="0" calcext:value-type="float">
            <text:p>0</text:p>
          </table:table-cell>
          <table:table-cell table:formula="of:=COUNTIF([.AY$15:.AY$22];&quot;=&quot; &amp;[.$C38])" office:value-type="float" office:value="0" calcext:value-type="float">
            <text:p>0</text:p>
          </table:table-cell>
          <table:table-cell/>
          <table:table-cell table:formula="of:=[.BA37]+0.002" office:value-type="float" office:value="0.046" calcext:value-type="float">
            <text:p>0.046</text:p>
          </table:table-cell>
          <table:table-cell table:formula="of:=[.BA38]*[.$D$6]" office:value-type="float" office:value="2.31221219304209" calcext:value-type="float">
            <text:p>2.312</text:p>
          </table:table-cell>
          <table:table-cell table:formula="of:=[.D$25]*[.$Z$5]*MAGNET([.D$24]+[.BB38])+[.E$25]*[.$Z$5]*MAGNET([.E$24]+[.BB38])+[.F$25]*[.$Z$5]*MAGNET([.F$24]+[.BB38])+[.G$25]*[.$Z$5]*MAGNET([.G$24]+[.BB38])+[.H$25]*[.$Z$5]*MAGNET([.H$24]+[.BB38])+[.I$25]*[.$Z$5]*MAGNET([.I$24]+[.BB38])+[.J$25]*[.$Z$5]*MAGNET([.J$24]+[.BB38])+[.K$25]*[.$Z$5]*MAGNET([.K$24]+[.BB38])+[.L$25]*[.$Z$5]*MAGNET([.L$24]+[.BB38])+[.M$25]*[.$Z$5]*MAGNET([.M$24]+[.BB38])+[.N$25]*[.$Z$5]*MAGNET([.N$24]+[.BB38])+[.O$25]*[.$Z$5]*MAGNET([.O$24]+[.BB38])+[.P$25]*[.$Z$5]*MAGNET([.P$24]+[.BB38])+[.Q$25]*[.$Z$5]*MAGNET([.Q$24]+[.BB38])+[.R$25]*[.$Z$5]*MAGNET([.R$24]+[.BB38])+[.S$25]*[.$Z$5]*MAGNET([.S$24]+[.BB38])+[.T$25]*[.$Z$5]*MAGNET([.T$24]+[.BB38])+[.U$25]*[.$Z$5]*MAGNET([.U$24]+[.BB38])+[.V$25]*[.$Z$5]*MAGNET([.V$24]+[.BB38])+[.W$25]*[.$Z$5]*MAGNET([.W$24]+[.BB38])+[.X$25]*[.$Z$5]*MAGNET([.X$24]+[.BB38])+[.Y$25]*[.$Z$5]*MAGNET([.Y$24]+[.BB38])+[.Z$25]*[.$Z$5]*MAGNET([.Z$24]+[.BB38])+[.AA$25]*[.$Z$5]*MAGNET([.AA$24]+[.BB38])+[.AB$25]*[.$Z$5]*MAGNET([.AB$24]+[.BB38])+[.AC$25]*[.$Z$5]*MAGNET([.AC$24]+[.BB38])+[.AD$25]*[.$Z$5]*MAGNET([.AD$24]+[.BB38])+[.AE$25]*[.$Z$5]*MAGNET([.AE$24]+[.BB38])+[.AF$25]*[.$Z$5]*MAGNET([.AF$24]+[.BB38])+[.AG$25]*[.$Z$5]*MAGNET([.AG$24]+[.BB38])+[.AH$25]*[.$Z$5]*MAGNET([.AH$24]+[.BB38]) +[.AI$25]*[.$Z$5]*MAGNET([.AI$24]+[.BB38]) +[.AJ$25]*[.$Z$5]*MAGNET([.AJ$24]+[.BB38]) +[.AK$25]*[.$Z$5]*MAGNET([.AK$24]+[.BB38]) +[.AL$25]*[.$Z$5]*MAGNET([.AL$24]+[.BB38]) +[.AM$25]*[.$Z$5]*MAGNET([.AM$24]+[.BB38]) +[.AN$25]*[.$Z$5]*MAGNET([.AN$24]+[.BB38]) +[.AO$25]*[.$Z$5]*MAGNET([.AO$24]+[.BB38])+RAND()*[.$BC$13]+[.AP$25]*[.$Z$5]*MAGNET([.AP$24]+[.BB38])&#10;+[.AQ$25]*[.$Z$5]*MAGNET([.AQ$24]+[.BB38])&#10;+[.AR$25]*[.$Z$5]*MAGNET([.AR$24]+[.BB38])&#10;+[.AS$25]*[.$Z$5]*MAGNET([.AS$24]+[.BB38])&#10;+[.AT$25]*[.$Z$5]*MAGNET([.AT$24]+[.BB38])&#10;+[.AU$25]*[.$Z$5]*MAGNET([.AU$24]+[.BB38])&#10;+[.AV$25]*[.$Z$5]*MAGNET([.AV$24]+[.BB38])&#10;+[.AW$25]*[.$Z$5]*MAGNET([.AW$24]+[.BB38])&#10;+[.AX$25]*[.$Z$5]*MAGNET([.AX$24]+[.BB38])&#10;+[.AY$25]*[.$Z$5]*MAGNET([.AY$24]+[.BB38])" office:value-type="float" office:value="117.814044936369" calcext:value-type="float">
            <text:p>117.81</text:p>
          </table:table-cell>
          <table:table-cell table:style-name="ce70" table:formula="of:=[.E$26]*[.$Z$5]*MAGNET([.E$24]+[.$BB38])+[.F$26]*[.$Z$5]*MAGNET([.F$24]+[.$BB38])+[.G$26]*[.$Z$5]*MAGNET([.G$24]+[.$BB38])+[.H$26]*[.$Z$5]*MAGNET([.H$24]+[.$BB38])+[.I$26]*[.$Z$5]*MAGNET([.I$24]+[.$BB38])+[.J$26]*[.$Z$5]*MAGNET([.J$24]+[.$BB38])+[.K$26]*[.$Z$5]*MAGNET([.K$24]+[.$BB38])+[.L$26]*[.$Z$5]*MAGNET([.L$24]+[.$BB38])+[.M$26]*[.$Z$5]*MAGNET([.M$24]+[.$BB38])+[.N$26]*[.$Z$5]*MAGNET([.N$24]+[.$BB38])+[.O$26]*[.$Z$5]*MAGNET([.O$24]+[.$BB38])+[.P$26]*[.$Z$5]*MAGNET([.P$24]+[.$BB38])+[.Q$26]*[.$Z$5]*MAGNET([.Q$24]+[.$BB38])+[.R$26]*[.$Z$5]*MAGNET([.R$24]+[.$BB38])+[.S$26]*[.$Z$5]*MAGNET([.S$24]+[.$BB38])+[.T$26]*[.$Z$5]*MAGNET([.T$24]+[.$BB38])+[.U$26]*[.$Z$5]*MAGNET([.U$24]+[.$BB38])+[.V$26]*[.$Z$5]*MAGNET([.V$24]+[.$BB38])+[.W$26]*[.$Z$5]*MAGNET([.W$24]+[.$BB38])+[.X$26]*[.$Z$5]*MAGNET([.X$24]+[.$BB38])+[.Y$26]*[.$Z$5]*MAGNET([.Y$24]+[.$BB38])+[.Z$26]*[.$Z$5]*MAGNET([.Z$24]+[.$BB38])+[.AA$26]*[.$Z$5]*MAGNET([.AA$24]+[.$BB38])+[.AB$26]*[.$Z$5]*MAGNET([.AB$24]+[.$BB38])+[.AC$26]*[.$Z$5]*MAGNET([.AC$24]+[.$BB38])+[.AD$26]*[.$Z$5]*MAGNET([.AD$24]+[.$BB38])+[.AE$26]*[.$Z$5]*MAGNET([.AE$24]+[.$BB38])+[.AF$26]*[.$Z$5]*MAGNET([.AF$24]+[.$BB38])+[.AG$26]*[.$Z$5]*MAGNET([.AG$24]+[.$BB38])+[.D$26]*[.$Z$5]*MAGNET([.D$24]+[.$BB38])+[.AH$26]*[.$Z$5]*MAGNET([.AH$24]+[.BB38]) +[.AI$26]*[.$Z$5]*MAGNET([.AI$24]+[.BB38]) +[.AJ$26]*[.$Z$5]*MAGNET([.AJ$24]+[.BB38]) +[.AK$26]*[.$Z$5]*MAGNET([.AK$24]+[.BB38]) +[.AL$26]*[.$Z$5]*MAGNET([.AL$24]+[.BB38]) +[.AM$26]*[.$Z$5]*MAGNET([.AM$24]+[.BB38]) +[.AN$26]*[.$Z$5]*MAGNET([.AN$24]+[.BB38]) +[.AO$26]*[.$Z$5]*MAGNET([.AO$24]+[.BB38]) +[.AP$26]*[.$Z$5]*MAGNET([.AP$24]+[.$BB38])&#10;+[.AQ$26]*[.$Z$5]*MAGNET([.AQ$24]+[.$BB38])&#10;+[.AR$26]*[.$Z$5]*MAGNET([.AR$24]+[.$BB38])&#10;+[.AS$26]*[.$Z$5]*MAGNET([.AS$24]+[.$BB38])&#10;+[.AT$26]*[.$Z$5]*MAGNET([.AT$24]+[.$BB38])&#10;+[.AU$26]*[.$Z$5]*MAGNET([.AU$24]+[.$BB38])&#10;+[.AV$26]*[.$Z$5]*MAGNET([.AV$24]+[.$BB38])&#10;+[.AW$26]*[.$Z$5]*MAGNET([.AW$24]+[.$BB38])&#10;+[.AX$26]*[.$Z$5]*MAGNET([.AX$24]+[.$BB38])&#10;+[.AY$26]*[.$Z$5]*MAGNET([.AY$24]+[.$BB38]) +RAND()*[.$BD$13]" office:value-type="float" office:value="-74.1272942322033" calcext:value-type="float">
            <text:p>-74.13</text:p>
          </table:table-cell>
          <table:table-cell table:style-name="ce71" table:formula="of:=[.E$27]*[.$Z$5]*MAGNET([.E$24]+[.$BB38])+[.F$27]*[.$Z$5]*MAGNET([.F$24]+[.$BB38])+[.G$27]*[.$Z$5]*MAGNET([.G$24]+[.$BB38])+[.H$27]*[.$Z$5]*MAGNET([.H$24]+[.$BB38])+[.I$27]*[.$Z$5]*MAGNET([.I$24]+[.$BB38])+[.J$27]*[.$Z$5]*MAGNET([.J$24]+[.$BB38])+[.K$27]*[.$Z$5]*MAGNET([.K$24]+[.$BB38])+[.L$27]*[.$Z$5]*MAGNET([.L$24]+[.$BB38])+[.M$27]*[.$Z$5]*MAGNET([.M$24]+[.$BB38])+[.N$27]*[.$Z$5]*MAGNET([.N$24]+[.$BB38])+[.O$27]*[.$Z$5]*MAGNET([.O$24]+[.$BB38])+[.P$27]*[.$Z$5]*MAGNET([.P$24]+[.$BB38])+[.Q$27]*[.$Z$5]*MAGNET([.Q$24]+[.$BB38])+[.R$27]*[.$Z$5]*MAGNET([.R$24]+[.$BB38])+[.S$27]*[.$Z$5]*MAGNET([.S$24]+[.$BB38])+[.T$27]*[.$Z$5]*MAGNET([.T$24]+[.$BB38])+[.U$27]*[.$Z$5]*MAGNET([.U$24]+[.$BB38])+[.V$27]*[.$Z$5]*MAGNET([.V$24]+[.$BB38])+[.W$27]*[.$Z$5]*MAGNET([.W$24]+[.$BB38])+[.X$27]*[.$Z$5]*MAGNET([.X$24]+[.$BB38])+[.Y$27]*[.$Z$5]*MAGNET([.Y$24]+[.$BB38])+[.Z$27]*[.$Z$5]*MAGNET([.Z$24]+[.$BB38])+[.AA$27]*[.$Z$5]*MAGNET([.AA$24]+[.$BB38])+[.AB$27]*[.$Z$5]*MAGNET([.AB$24]+[.$BB38])+[.AC$27]*[.$Z$5]*MAGNET([.AC$24]+[.$BB38])+[.AD$27]*[.$Z$5]*MAGNET([.AD$24]+[.$BB38])+[.AE$27]*[.$Z$5]*MAGNET([.AE$24]+[.$BB38])+[.AF$27]*[.$Z$5]*MAGNET([.AF$24]+[.$BB38])+[.AG$27]*[.$Z$5]*MAGNET([.AG$24]+[.$BB38])+[.D$27]*[.$Z$5]*MAGNET([.D$24]+[.$BB38])+[.AH$27]*[.$Z$5]*MAGNET([.AH$24]+[.BB38]) +[.AI$27]*[.$Z$5]*MAGNET([.AI$24]+[.BB38]) +[.AJ$27]*[.$Z$5]*MAGNET([.AJ$24]+[.BB38]) +[.AK$27]*[.$Z$5]*MAGNET([.AK$24]+[.BB38]) +[.AL$27]*[.$Z$5]*MAGNET([.AL$24]+[.BB38]) +[.AM$27]*[.$Z$5]*MAGNET([.AM$24]+[.BB38]) +[.AN$27]*[.$Z$5]*MAGNET([.AN$24]+[.BB38]) +[.AO$27]*[.$Z$5]*MAGNET([.AO$24]+[.BB38]) +[.AP$27]*[.$Z$5]*MAGNET([.AP$24]+[.$BB38])&#10;+[.AQ$27]*[.$Z$5]*MAGNET([.AQ$24]+[.$BB38])&#10;+[.AR$27]*[.$Z$5]*MAGNET([.AR$24]+[.$BB38])&#10;+[.AS$27]*[.$Z$5]*MAGNET([.AS$24]+[.$BB38])&#10;+[.AT$27]*[.$Z$5]*MAGNET([.AT$24]+[.$BB38])&#10;+[.AU$27]*[.$Z$5]*MAGNET([.AU$24]+[.$BB38])&#10;+[.AV$27]*[.$Z$5]*MAGNET([.AV$24]+[.$BB38])&#10;+[.AW$27]*[.$Z$5]*MAGNET([.AW$24]+[.$BB38])&#10;+[.AX$27]*[.$Z$5]*MAGNET([.AX$24]+[.$BB38])&#10;+[.AY$27]*[.$Z$5]*MAGNET([.AY$24]+[.$BB38]) +RAND()*[.$BE$13]" office:value-type="float" office:value="-38.5686458406891" calcext:value-type="float">
            <text:p>-38.5686458406891</text:p>
          </table:table-cell>
          <table:table-cell table:style-name="ce71" table:formula="of:=[.E$28]*[.$Z$5]*MAGNET([.E$24]+[.$BB38])+[.F$28]*[.$Z$5]*MAGNET([.F$24]+[.$BB38])+[.G$28]*[.$Z$5]*MAGNET([.G$24]+[.$BB38])+[.H$28]*[.$Z$5]*MAGNET([.H$24]+[.$BB38])+[.I$28]*[.$Z$5]*MAGNET([.I$24]+[.$BB38])+[.J$28]*[.$Z$5]*MAGNET([.J$24]+[.$BB38])+[.K$28]*[.$Z$5]*MAGNET([.K$24]+[.$BB38])+[.L$28]*[.$Z$5]*MAGNET([.L$24]+[.$BB38])+[.M$28]*[.$Z$5]*MAGNET([.M$24]+[.$BB38])+[.N$28]*[.$Z$5]*MAGNET([.N$24]+[.$BB38])+[.O$28]*[.$Z$5]*MAGNET([.O$24]+[.$BB38])+[.P$28]*[.$Z$5]*MAGNET([.P$24]+[.$BB38])+[.Q$28]*[.$Z$5]*MAGNET([.Q$24]+[.$BB38])+[.R$28]*[.$Z$5]*MAGNET([.R$24]+[.$BB38])+[.S$28]*[.$Z$5]*MAGNET([.S$24]+[.$BB38])+[.T$28]*[.$Z$5]*MAGNET([.T$24]+[.$BB38])+[.U$28]*[.$Z$5]*MAGNET([.U$24]+[.$BB38])+[.V$28]*[.$Z$5]*MAGNET([.V$24]+[.$BB38])+[.W$28]*[.$Z$5]*MAGNET([.W$24]+[.$BB38])+[.X$28]*[.$Z$5]*MAGNET([.X$24]+[.$BB38])+[.Y$28]*[.$Z$5]*MAGNET([.Y$24]+[.$BB38])+[.Z$28]*[.$Z$5]*MAGNET([.Z$24]+[.$BB38])+[.AA$28]*[.$Z$5]*MAGNET([.AA$24]+[.$BB38])+[.AB$28]*[.$Z$5]*MAGNET([.AB$24]+[.$BB38])+[.AC$28]*[.$Z$5]*MAGNET([.AC$24]+[.$BB38])+[.AD$28]*[.$Z$5]*MAGNET([.AD$24]+[.$BB38])+[.AE$28]*[.$Z$5]*MAGNET([.AE$24]+[.$BB38])+[.AF$28]*[.$Z$5]*MAGNET([.AF$24]+[.$BB38])+[.AG$28]*[.$Z$5]*MAGNET([.AG$24]+[.$BB38])+[.D$28]*[.$Z$5]*MAGNET([.D$24]+[.$BB38])+[.AH$28]*[.$Z$5]*MAGNET([.AH$24]+[.BB38]) +[.AI$28]*[.$Z$5]*MAGNET([.AI$24]+[.BB38]) +[.AJ$28]*[.$Z$5]*MAGNET([.AJ$24]+[.BB38]) +[.AK$28]*[.$Z$5]*MAGNET([.AK$24]+[.BB38]) +[.AL$28]*[.$Z$5]*MAGNET([.AL$24]+[.BB38]) +[.AM$28]*[.$Z$5]*MAGNET([.AM$24]+[.BB38]) +[.AN$28]*[.$Z$5]*MAGNET([.AN$24]+[.BB38]) +[.AO$28]*[.$Z$5]*MAGNET([.AO$24]+[.BB38]) +[.AP$28]*[.$Z$5]*MAGNET([.AP$24]+[.$BB38])&#10;+[.AQ$28]*[.$Z$5]*MAGNET([.AQ$24]+[.$BB38])&#10;+[.AR$28]*[.$Z$5]*MAGNET([.AR$24]+[.$BB38])&#10;+[.AS$28]*[.$Z$5]*MAGNET([.AS$24]+[.$BB38])&#10;+[.AT$28]*[.$Z$5]*MAGNET([.AT$24]+[.$BB38])&#10;+[.AU$28]*[.$Z$5]*MAGNET([.AU$24]+[.$BB38])&#10;+[.AV$28]*[.$Z$5]*MAGNET([.AV$24]+[.$BB38])&#10;+[.AW$28]*[.$Z$5]*MAGNET([.AW$24]+[.$BB38])&#10;+[.AX$28]*[.$Z$5]*MAGNET([.AX$24]+[.$BB38])&#10;+[.AY$28]*[.$Z$5]*MAGNET([.AY$24]+[.$BB38]) +RAND()*[.$BF$13]" office:value-type="float" office:value="-2.08021307837335" calcext:value-type="float">
            <text:p>-2.08021307837335</text:p>
          </table:table-cell>
          <table:table-cell table:style-name="ce71" table:formula="of:=[.E$29]*[.$Z$5]*MAGNET([.E$24]+[.$BB38])+[.F$29]*[.$Z$5]*MAGNET([.F$24]+[.$BB38])+[.G$29]*[.$Z$5]*MAGNET([.G$24]+[.$BB38])+[.H$29]*[.$Z$5]*MAGNET([.H$24]+[.$BB38])+[.I$29]*[.$Z$5]*MAGNET([.I$24]+[.$BB38])+[.J$29]*[.$Z$5]*MAGNET([.J$24]+[.$BB38])+[.K$29]*[.$Z$5]*MAGNET([.K$24]+[.$BB38])+[.L$29]*[.$Z$5]*MAGNET([.L$24]+[.$BB38])+[.M$29]*[.$Z$5]*MAGNET([.M$24]+[.$BB38])+[.N$29]*[.$Z$5]*MAGNET([.N$24]+[.$BB38])+[.O$29]*[.$Z$5]*MAGNET([.O$24]+[.$BB38])+[.P$29]*[.$Z$5]*MAGNET([.P$24]+[.$BB38])+[.Q$29]*[.$Z$5]*MAGNET([.Q$24]+[.$BB38])+[.R$29]*[.$Z$5]*MAGNET([.R$24]+[.$BB38])+[.S$29]*[.$Z$5]*MAGNET([.S$24]+[.$BB38])+[.T$29]*[.$Z$5]*MAGNET([.T$24]+[.$BB38])+[.U$29]*[.$Z$5]*MAGNET([.U$24]+[.$BB38])+[.V$29]*[.$Z$5]*MAGNET([.V$24]+[.$BB38])+[.W$29]*[.$Z$5]*MAGNET([.W$24]+[.$BB38])+[.X$29]*[.$Z$5]*MAGNET([.X$24]+[.$BB38])+[.Y$29]*[.$Z$5]*MAGNET([.Y$24]+[.$BB38])+[.Z$29]*[.$Z$5]*MAGNET([.Z$24]+[.$BB38])+[.AA$29]*[.$Z$5]*MAGNET([.AA$24]+[.$BB38])+[.AB$29]*[.$Z$5]*MAGNET([.AB$24]+[.$BB38])+[.AC$29]*[.$Z$5]*MAGNET([.AC$24]+[.$BB38])+[.AD$29]*[.$Z$5]*MAGNET([.AD$24]+[.$BB38])+[.AE$29]*[.$Z$5]*MAGNET([.AE$24]+[.$BB38])+[.AF$29]*[.$Z$5]*MAGNET([.AF$24]+[.$BB38])+[.AG$29]*[.$Z$5]*MAGNET([.AG$24]+[.$BB38])+[.D$29]*[.$Z$5]*MAGNET([.D$24]+[.$BB38])+[.AH$29]*[.$Z$5]*MAGNET([.AH$24]+[.BB38]) +[.AI$29]*[.$Z$5]*MAGNET([.AI$24]+[.BB38]) +[.AJ$29]*[.$Z$5]*MAGNET([.AJ$24]+[.BB38]) +[.AK$29]*[.$Z$5]*MAGNET([.AK$24]+[.BB38]) +[.AL$29]*[.$Z$5]*MAGNET([.AL$24]+[.BB38]) +[.AM$29]*[.$Z$5]*MAGNET([.AM$24]+[.BB38]) +[.AN$29]*[.$Z$5]*MAGNET([.AN$24]+[.BB38]) +[.AO$29]*[.$Z$5]*MAGNET([.AO$24]+[.BB38]) +[.AP$29]*[.$Z$5]*MAGNET([.AP$24]+[.$BB38])&#10;+[.AQ$29]*[.$Z$5]*MAGNET([.AQ$24]+[.$BB38])&#10;+[.AR$29]*[.$Z$5]*MAGNET([.AR$24]+[.$BB38])&#10;+[.AS$29]*[.$Z$5]*MAGNET([.AS$24]+[.$BB38])&#10;+[.AT$29]*[.$Z$5]*MAGNET([.AT$24]+[.$BB38])&#10;+[.AU$29]*[.$Z$5]*MAGNET([.AU$24]+[.$BB38])&#10;+[.AV$29]*[.$Z$5]*MAGNET([.AV$24]+[.$BB38])&#10;+[.AW$29]*[.$Z$5]*MAGNET([.AW$24]+[.$BB38])&#10;+[.AX$29]*[.$Z$5]*MAGNET([.AX$24]+[.$BB38])&#10;+[.AY$29]*[.$Z$5]*MAGNET([.AY$24]+[.$BB38]) +RAND()*[.$BG$13]" office:value-type="float" office:value="13.5775131780133" calcext:value-type="float">
            <text:p>13.5775131780133</text:p>
          </table:table-cell>
          <table:table-cell table:style-name="ce71" table:formula="of:=[.E$30]*[.$Z$5]*MAGNET([.E$24]+[.$BB38])+[.F$30]*[.$Z$5]*MAGNET([.F$24]+[.$BB38])+[.G$30]*[.$Z$5]*MAGNET([.G$24]+[.$BB38])+[.H$30]*[.$Z$5]*MAGNET([.H$24]+[.$BB38])+[.I$30]*[.$Z$5]*MAGNET([.I$24]+[.$BB38])+[.J$30]*[.$Z$5]*MAGNET([.J$24]+[.$BB38])+[.K$30]*[.$Z$5]*MAGNET([.K$24]+[.$BB38])+[.L$30]*[.$Z$5]*MAGNET([.L$24]+[.$BB38])+[.M$30]*[.$Z$5]*MAGNET([.M$24]+[.$BB38])+[.N$30]*[.$Z$5]*MAGNET([.N$24]+[.$BB38])+[.O$30]*[.$Z$5]*MAGNET([.O$24]+[.$BB38])+[.P$30]*[.$Z$5]*MAGNET([.P$24]+[.$BB38])+[.Q$30]*[.$Z$5]*MAGNET([.Q$24]+[.$BB38])+[.R$30]*[.$Z$5]*MAGNET([.R$24]+[.$BB38])+[.S$30]*[.$Z$5]*MAGNET([.S$24]+[.$BB38])+[.T$30]*[.$Z$5]*MAGNET([.T$24]+[.$BB38])+[.U$30]*[.$Z$5]*MAGNET([.U$24]+[.$BB38])+[.V$30]*[.$Z$5]*MAGNET([.V$24]+[.$BB38])+[.W$30]*[.$Z$5]*MAGNET([.W$24]+[.$BB38])+[.X$30]*[.$Z$5]*MAGNET([.X$24]+[.$BB38])+[.Y$30]*[.$Z$5]*MAGNET([.Y$24]+[.$BB38])+[.Z$30]*[.$Z$5]*MAGNET([.Z$24]+[.$BB38])+[.AA$30]*[.$Z$5]*MAGNET([.AA$24]+[.$BB38])+[.AB$30]*[.$Z$5]*MAGNET([.AB$24]+[.$BB38])+[.AC$30]*[.$Z$5]*MAGNET([.AC$24]+[.$BB38])+[.AD$30]*[.$Z$5]*MAGNET([.AD$24]+[.$BB38])+[.AE$30]*[.$Z$5]*MAGNET([.AE$24]+[.$BB38])+[.AF$30]*[.$Z$5]*MAGNET([.AF$24]+[.$BB38])+[.AG$30]*[.$Z$5]*MAGNET([.AG$24]+[.$BB38])+[.D$30]*[.$Z$5]*MAGNET([.D$24]+[.$BB38])+[.AH$30]*[.$Z$5]*MAGNET([.AH$24]+[.BB38]) +[.AI$30]*[.$Z$5]*MAGNET([.AI$24]+[.BB38]) +[.AJ$30]*[.$Z$5]*MAGNET([.AJ$24]+[.BB38]) +[.AK$30]*[.$Z$5]*MAGNET([.AK$24]+[.BB38]) +[.AL$30]*[.$Z$5]*MAGNET([.AL$24]+[.BB38]) +[.AM$30]*[.$Z$5]*MAGNET([.AM$24]+[.BB38]) +[.AN$30]*[.$Z$5]*MAGNET([.AN$24]+[.BB38]) +[.AO$30]*[.$Z$5]*MAGNET([.AO$24]+[.BB38]) +[.AP$30]*[.$Z$5]*MAGNET([.AP$24]+[.$BB38])&#10;+[.AQ$30]*[.$Z$5]*MAGNET([.AQ$24]+[.$BB38])&#10;+[.AR$30]*[.$Z$5]*MAGNET([.AR$24]+[.$BB38])&#10;+[.AS$30]*[.$Z$5]*MAGNET([.AS$24]+[.$BB38])&#10;+[.AT$30]*[.$Z$5]*MAGNET([.AT$24]+[.$BB38])&#10;+[.AU$30]*[.$Z$5]*MAGNET([.AU$24]+[.$BB38])&#10;+[.AV$30]*[.$Z$5]*MAGNET([.AV$24]+[.$BB38])&#10;+[.AW$30]*[.$Z$5]*MAGNET([.AW$24]+[.$BB38])&#10;+[.AX$30]*[.$Z$5]*MAGNET([.AX$24]+[.$BB38])&#10;+[.AY$30]*[.$Z$5]*MAGNET([.AY$24]+[.$BB38]) +RAND()*[.$BH$13]" office:value-type="float" office:value="0" calcext:value-type="float">
            <text:p>0</text:p>
          </table:table-cell>
          <table:table-cell table:style-name="ce71" table:formula="of:=[.E$31]*[.$Z$5]*MAGNET([.E$24]+[.$BB38])+[.F$31]*[.$Z$5]*MAGNET([.F$24]+[.$BB38])+[.G$31]*[.$Z$5]*MAGNET([.G$24]+[.$BB38])+[.H$31]*[.$Z$5]*MAGNET([.H$24]+[.$BB38])+[.I$31]*[.$Z$5]*MAGNET([.I$24]+[.$BB38])+[.J$31]*[.$Z$5]*MAGNET([.J$24]+[.$BB38])+[.K$31]*[.$Z$5]*MAGNET([.K$24]+[.$BB38])+[.L$31]*[.$Z$5]*MAGNET([.L$24]+[.$BB38])+[.M$31]*[.$Z$5]*MAGNET([.M$24]+[.$BB38])+[.N$31]*[.$Z$5]*MAGNET([.N$24]+[.$BB38])+[.O$31]*[.$Z$5]*MAGNET([.O$24]+[.$BB38])+[.P$31]*[.$Z$5]*MAGNET([.P$24]+[.$BB38])+[.Q$31]*[.$Z$5]*MAGNET([.Q$24]+[.$BB38])+[.R$31]*[.$Z$5]*MAGNET([.R$24]+[.$BB38])+[.S$31]*[.$Z$5]*MAGNET([.S$24]+[.$BB38])+[.T$31]*[.$Z$5]*MAGNET([.T$24]+[.$BB38])+[.U$31]*[.$Z$5]*MAGNET([.U$24]+[.$BB38])+[.V$31]*[.$Z$5]*MAGNET([.V$24]+[.$BB38])+[.W$31]*[.$Z$5]*MAGNET([.W$24]+[.$BB38])+[.X$31]*[.$Z$5]*MAGNET([.X$24]+[.$BB38])+[.Y$31]*[.$Z$5]*MAGNET([.Y$24]+[.$BB38])+[.Z$31]*[.$Z$5]*MAGNET([.Z$24]+[.$BB38])+[.AA$31]*[.$Z$5]*MAGNET([.AA$24]+[.$BB38])+[.AB$31]*[.$Z$5]*MAGNET([.AB$24]+[.$BB38])+[.AC$31]*[.$Z$5]*MAGNET([.AC$24]+[.$BB38])+[.AD$31]*[.$Z$5]*MAGNET([.AD$24]+[.$BB38])+[.AE$31]*[.$Z$5]*MAGNET([.AE$24]+[.$BB38])+[.AF$31]*[.$Z$5]*MAGNET([.AF$24]+[.$BB38])+[.AG$31]*[.$Z$5]*MAGNET([.AG$24]+[.$BB38])+[.D$31]*[.$Z$5]*MAGNET([.D$24]+[.$BB38])+[.AH$31]*[.$Z$5]*MAGNET([.AH$24]+[.BB38]) +[.AI$31]*[.$Z$5]*MAGNET([.AI$24]+[.BB38]) +[.AJ$31]*[.$Z$5]*MAGNET([.AJ$24]+[.BB38]) +[.AK$31]*[.$Z$5]*MAGNET([.AK$24]+[.BB38]) +[.AL$31]*[.$Z$5]*MAGNET([.AL$24]+[.BB38]) +[.AM$31]*[.$Z$5]*MAGNET([.AM$24]+[.BB38]) +[.AN$31]*[.$Z$5]*MAGNET([.AN$24]+[.BB38]) +[.AO$31]*[.$Z$5]*MAGNET([.AO$24]+[.BB38]) +[.AP$31]*[.$Z$5]*MAGNET([.AP$24]+[.$BB38])&#10;+[.AQ$31]*[.$Z$5]*MAGNET([.AQ$24]+[.$BB38])&#10;+[.AR$31]*[.$Z$5]*MAGNET([.AR$24]+[.$BB38])&#10;+[.AS$31]*[.$Z$5]*MAGNET([.AS$24]+[.$BB38])&#10;+[.AT$31]*[.$Z$5]*MAGNET([.AT$24]+[.$BB38])&#10;+[.AU$31]*[.$Z$5]*MAGNET([.AU$24]+[.$BB38])&#10;+[.AV$31]*[.$Z$5]*MAGNET([.AV$24]+[.$BB38])&#10;+[.AW$31]*[.$Z$5]*MAGNET([.AW$24]+[.$BB38])&#10;+[.AX$31]*[.$Z$5]*MAGNET([.AX$24]+[.$BB38])&#10;+[.AY$31]*[.$Z$5]*MAGNET([.AY$24]+[.$BB38]) +RAND()*[.$BI$13]" office:value-type="float" office:value="0" calcext:value-type="float">
            <text:p>0</text:p>
          </table:table-cell>
          <table:table-cell table:style-name="ce71" table:formula="of:=[.E$32]*[.$Z$5]*MAGNET([.E$24]+[.$BB38])+[.F$32]*[.$Z$5]*MAGNET([.F$24]+[.$BB38])+[.G$32]*[.$Z$5]*MAGNET([.G$24]+[.$BB38])+[.H$32]*[.$Z$5]*MAGNET([.H$24]+[.$BB38])+[.I$32]*[.$Z$5]*MAGNET([.I$24]+[.$BB38])+[.J$32]*[.$Z$5]*MAGNET([.J$24]+[.$BB38])+[.K$32]*[.$Z$5]*MAGNET([.K$24]+[.$BB38])+[.L$32]*[.$Z$5]*MAGNET([.L$24]+[.$BB38])+[.M$32]*[.$Z$5]*MAGNET([.M$24]+[.$BB38])+[.N$32]*[.$Z$5]*MAGNET([.N$24]+[.$BB38])+[.O$32]*[.$Z$5]*MAGNET([.O$24]+[.$BB38])+[.P$32]*[.$Z$5]*MAGNET([.P$24]+[.$BB38])+[.Q$32]*[.$Z$5]*MAGNET([.Q$24]+[.$BB38])+[.R$32]*[.$Z$5]*MAGNET([.R$24]+[.$BB38])+[.S$32]*[.$Z$5]*MAGNET([.S$24]+[.$BB38])+[.T$32]*[.$Z$5]*MAGNET([.T$24]+[.$BB38])+[.U$32]*[.$Z$5]*MAGNET([.U$24]+[.$BB38])+[.V$32]*[.$Z$5]*MAGNET([.V$24]+[.$BB38])+[.W$32]*[.$Z$5]*MAGNET([.W$24]+[.$BB38])+[.X$32]*[.$Z$5]*MAGNET([.X$24]+[.$BB38])+[.Y$32]*[.$Z$5]*MAGNET([.Y$24]+[.$BB38])+[.Z$32]*[.$Z$5]*MAGNET([.Z$24]+[.$BB38])+[.AA$32]*[.$Z$5]*MAGNET([.AA$24]+[.$BB38])+[.AB$32]*[.$Z$5]*MAGNET([.AB$24]+[.$BB38])+[.AC$32]*[.$Z$5]*MAGNET([.AC$24]+[.$BB38])+[.AD$32]*[.$Z$5]*MAGNET([.AD$24]+[.$BB38])+[.AE$32]*[.$Z$5]*MAGNET([.AE$24]+[.$BB38])+[.AF$32]*[.$Z$5]*MAGNET([.AF$24]+[.$BB38])+[.AG$32]*[.$Z$5]*MAGNET([.AG$24]+[.$BB38])+[.D$32]*[.$Z$5]*MAGNET([.D$24]+[.$BB38])+[.AH$32]*[.$Z$5]*MAGNET([.AH$24]+[.BB38]) +[.AI$32]*[.$Z$5]*MAGNET([.AI$24]+[.BB38]) +[.AJ$32]*[.$Z$5]*MAGNET([.AJ$24]+[.BB38]) +[.AK$32]*[.$Z$5]*MAGNET([.AK$24]+[.BB38]) +[.AL$32]*[.$Z$5]*MAGNET([.AL$24]+[.BB38]) +[.AM$32]*[.$Z$5]*MAGNET([.AM$24]+[.BB38]) +[.AN$32]*[.$Z$5]*MAGNET([.AN$24]+[.BB38]) +[.AO$32]*[.$Z$5]*MAGNET([.AO$24]+[.BB38]) +[.AP$32]*[.$Z$5]*MAGNET([.AP$24]+[.$BB38])&#10;+[.AQ$32]*[.$Z$5]*MAGNET([.AQ$24]+[.$BB38])&#10;+[.AR$32]*[.$Z$5]*MAGNET([.AR$24]+[.$BB38])&#10;+[.AS$32]*[.$Z$5]*MAGNET([.AS$24]+[.$BB38])&#10;+[.AT$32]*[.$Z$5]*MAGNET([.AT$24]+[.$BB38])&#10;+[.AU$32]*[.$Z$5]*MAGNET([.AU$24]+[.$BB38])&#10;+[.AV$32]*[.$Z$5]*MAGNET([.AV$24]+[.$BB38])&#10;+[.AW$32]*[.$Z$5]*MAGNET([.AW$24]+[.$BB38])&#10;+[.AX$32]*[.$Z$5]*MAGNET([.AX$24]+[.$BB38])&#10;+[.AY$32]*[.$Z$5]*MAGNET([.AY$24]+[.$BB3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COUNTIF([.D$15:.D$22];&quot;=&quot; &amp;[.$C39])" office:value-type="float" office:value="0" calcext:value-type="float">
            <text:p>0</text:p>
          </table:table-cell>
          <table:table-cell table:formula="of:=COUNTIF([.E$15:.E$22];&quot;=&quot; &amp;[.$C39])" office:value-type="float" office:value="0" calcext:value-type="float">
            <text:p>0</text:p>
          </table:table-cell>
          <table:table-cell table:formula="of:=COUNTIF([.F$15:.F$22];&quot;=&quot; &amp;[.$C39])" office:value-type="float" office:value="0" calcext:value-type="float">
            <text:p>0</text:p>
          </table:table-cell>
          <table:table-cell table:formula="of:=COUNTIF([.G$15:.G$22];&quot;=&quot; &amp;[.$C39])" office:value-type="float" office:value="0" calcext:value-type="float">
            <text:p>0</text:p>
          </table:table-cell>
          <table:table-cell table:formula="of:=COUNTIF([.H$15:.H$22];&quot;=&quot; &amp;[.$C39])" office:value-type="float" office:value="0" calcext:value-type="float">
            <text:p>0</text:p>
          </table:table-cell>
          <table:table-cell table:formula="of:=COUNTIF([.I$15:.I$22];&quot;=&quot; &amp;[.$C39])" office:value-type="float" office:value="4" calcext:value-type="float">
            <text:p>4</text:p>
          </table:table-cell>
          <table:table-cell table:formula="of:=COUNTIF([.J$15:.J$22];&quot;=&quot; &amp;[.$C39])" office:value-type="float" office:value="4" calcext:value-type="float">
            <text:p>4</text:p>
          </table:table-cell>
          <table:table-cell table:formula="of:=COUNTIF([.K$15:.K$22];&quot;=&quot; &amp;[.$C39])" office:value-type="float" office:value="2" calcext:value-type="float">
            <text:p>2</text:p>
          </table:table-cell>
          <table:table-cell table:formula="of:=COUNTIF([.L$15:.L$22];&quot;=&quot; &amp;[.$C39])" office:value-type="float" office:value="0" calcext:value-type="float">
            <text:p>0</text:p>
          </table:table-cell>
          <table:table-cell table:formula="of:=COUNTIF([.M$15:.M$22];&quot;=&quot; &amp;[.$C39])" office:value-type="float" office:value="0" calcext:value-type="float">
            <text:p>0</text:p>
          </table:table-cell>
          <table:table-cell table:formula="of:=COUNTIF([.N$15:.N$22];&quot;=&quot; &amp;[.$C39])" office:value-type="float" office:value="0" calcext:value-type="float">
            <text:p>0</text:p>
          </table:table-cell>
          <table:table-cell table:formula="of:=COUNTIF([.O$15:.O$22];&quot;=&quot; &amp;[.$C39])" office:value-type="float" office:value="0" calcext:value-type="float">
            <text:p>0</text:p>
          </table:table-cell>
          <table:table-cell table:formula="of:=COUNTIF([.P$15:.P$22];&quot;=&quot; &amp;[.$C39])" office:value-type="float" office:value="0" calcext:value-type="float">
            <text:p>0</text:p>
          </table:table-cell>
          <table:table-cell table:formula="of:=COUNTIF([.Q$15:.Q$22];&quot;=&quot; &amp;[.$C39])" office:value-type="float" office:value="0" calcext:value-type="float">
            <text:p>0</text:p>
          </table:table-cell>
          <table:table-cell table:formula="of:=COUNTIF([.R$15:.R$22];&quot;=&quot; &amp;[.$C39])" office:value-type="float" office:value="0" calcext:value-type="float">
            <text:p>0</text:p>
          </table:table-cell>
          <table:table-cell table:formula="of:=COUNTIF([.S$15:.S$22];&quot;=&quot; &amp;[.$C39])" office:value-type="float" office:value="0" calcext:value-type="float">
            <text:p>0</text:p>
          </table:table-cell>
          <table:table-cell table:formula="of:=COUNTIF([.T$15:.T$22];&quot;=&quot; &amp;[.$C39])" office:value-type="float" office:value="0" calcext:value-type="float">
            <text:p>0</text:p>
          </table:table-cell>
          <table:table-cell table:formula="of:=COUNTIF([.U$15:.U$22];&quot;=&quot; &amp;[.$C39])" office:value-type="float" office:value="0" calcext:value-type="float">
            <text:p>0</text:p>
          </table:table-cell>
          <table:table-cell table:formula="of:=COUNTIF([.V$15:.V$22];&quot;=&quot; &amp;[.$C39])" office:value-type="float" office:value="0" calcext:value-type="float">
            <text:p>0</text:p>
          </table:table-cell>
          <table:table-cell table:formula="of:=COUNTIF([.W$15:.W$22];&quot;=&quot; &amp;[.$C39])" office:value-type="float" office:value="0" calcext:value-type="float">
            <text:p>0</text:p>
          </table:table-cell>
          <table:table-cell table:formula="of:=COUNTIF([.X$15:.X$22];&quot;=&quot; &amp;[.$C39])" office:value-type="float" office:value="0" calcext:value-type="float">
            <text:p>0</text:p>
          </table:table-cell>
          <table:table-cell table:formula="of:=COUNTIF([.Y$15:.Y$22];&quot;=&quot; &amp;[.$C39])" office:value-type="float" office:value="0" calcext:value-type="float">
            <text:p>0</text:p>
          </table:table-cell>
          <table:table-cell table:formula="of:=COUNTIF([.Z$15:.Z$22];&quot;=&quot; &amp;[.$C39])" office:value-type="float" office:value="2" calcext:value-type="float">
            <text:p>2</text:p>
          </table:table-cell>
          <table:table-cell table:formula="of:=COUNTIF([.AA$15:.AA$22];&quot;=&quot; &amp;[.$C39])" office:value-type="float" office:value="0" calcext:value-type="float">
            <text:p>0</text:p>
          </table:table-cell>
          <table:table-cell table:formula="of:=COUNTIF([.AB$15:.AB$22];&quot;=&quot; &amp;[.$C39])" office:value-type="float" office:value="0" calcext:value-type="float">
            <text:p>0</text:p>
          </table:table-cell>
          <table:table-cell table:formula="of:=COUNTIF([.AC$15:.AC$22];&quot;=&quot; &amp;[.$C39])" office:value-type="float" office:value="0" calcext:value-type="float">
            <text:p>0</text:p>
          </table:table-cell>
          <table:table-cell table:formula="of:=COUNTIF([.AD$15:.AD$22];&quot;=&quot; &amp;[.$C39])" office:value-type="float" office:value="0" calcext:value-type="float">
            <text:p>0</text:p>
          </table:table-cell>
          <table:table-cell table:formula="of:=COUNTIF([.AE$15:.AE$22];&quot;=&quot; &amp;[.$C39])" office:value-type="float" office:value="0" calcext:value-type="float">
            <text:p>0</text:p>
          </table:table-cell>
          <table:table-cell table:formula="of:=COUNTIF([.AF$15:.AF$22];&quot;=&quot; &amp;[.$C39])" office:value-type="float" office:value="0" calcext:value-type="float">
            <text:p>0</text:p>
          </table:table-cell>
          <table:table-cell table:formula="of:=COUNTIF([.AG$15:.AG$22];&quot;=&quot; &amp;[.$C39])" office:value-type="float" office:value="0" calcext:value-type="float">
            <text:p>0</text:p>
          </table:table-cell>
          <table:table-cell table:formula="of:=COUNTIF([.AH$15:.AH$22];&quot;=&quot; &amp;[.$C39])" office:value-type="float" office:value="0" calcext:value-type="float">
            <text:p>0</text:p>
          </table:table-cell>
          <table:table-cell table:formula="of:=COUNTIF([.AI$15:.AI$22];&quot;=&quot; &amp;[.$C39])" office:value-type="float" office:value="0" calcext:value-type="float">
            <text:p>0</text:p>
          </table:table-cell>
          <table:table-cell table:formula="of:=COUNTIF([.AJ$15:.AJ$22];&quot;=&quot; &amp;[.$C39])" office:value-type="float" office:value="0" calcext:value-type="float">
            <text:p>0</text:p>
          </table:table-cell>
          <table:table-cell table:formula="of:=COUNTIF([.AK$15:.AK$22];&quot;=&quot; &amp;[.$C39])" office:value-type="float" office:value="0" calcext:value-type="float">
            <text:p>0</text:p>
          </table:table-cell>
          <table:table-cell table:formula="of:=COUNTIF([.AL$15:.AL$22];&quot;=&quot; &amp;[.$C39])" office:value-type="float" office:value="0" calcext:value-type="float">
            <text:p>0</text:p>
          </table:table-cell>
          <table:table-cell table:formula="of:=COUNTIF([.AM$15:.AM$22];&quot;=&quot; &amp;[.$C39])" office:value-type="float" office:value="0" calcext:value-type="float">
            <text:p>0</text:p>
          </table:table-cell>
          <table:table-cell table:formula="of:=COUNTIF([.AN$15:.AN$22];&quot;=&quot; &amp;[.$C39])" office:value-type="float" office:value="0" calcext:value-type="float">
            <text:p>0</text:p>
          </table:table-cell>
          <table:table-cell table:formula="of:=COUNTIF([.AO$15:.AO$22];&quot;=&quot; &amp;[.$C39])" office:value-type="float" office:value="0" calcext:value-type="float">
            <text:p>0</text:p>
          </table:table-cell>
          <table:table-cell table:formula="of:=COUNTIF([.AP$15:.AP$22];&quot;=&quot; &amp;[.$C39])" office:value-type="float" office:value="0" calcext:value-type="float">
            <text:p>0</text:p>
          </table:table-cell>
          <table:table-cell table:formula="of:=COUNTIF([.AQ$15:.AQ$22];&quot;=&quot; &amp;[.$C39])" office:value-type="float" office:value="0" calcext:value-type="float">
            <text:p>0</text:p>
          </table:table-cell>
          <table:table-cell table:formula="of:=COUNTIF([.AR$15:.AR$22];&quot;=&quot; &amp;[.$C39])" office:value-type="float" office:value="0" calcext:value-type="float">
            <text:p>0</text:p>
          </table:table-cell>
          <table:table-cell table:formula="of:=COUNTIF([.AS$15:.AS$22];&quot;=&quot; &amp;[.$C39])" office:value-type="float" office:value="0" calcext:value-type="float">
            <text:p>0</text:p>
          </table:table-cell>
          <table:table-cell table:formula="of:=COUNTIF([.AT$15:.AT$22];&quot;=&quot; &amp;[.$C39])" office:value-type="float" office:value="0" calcext:value-type="float">
            <text:p>0</text:p>
          </table:table-cell>
          <table:table-cell table:formula="of:=COUNTIF([.AU$15:.AU$22];&quot;=&quot; &amp;[.$C39])" office:value-type="float" office:value="0" calcext:value-type="float">
            <text:p>0</text:p>
          </table:table-cell>
          <table:table-cell table:formula="of:=COUNTIF([.AV$15:.AV$22];&quot;=&quot; &amp;[.$C39])" office:value-type="float" office:value="0" calcext:value-type="float">
            <text:p>0</text:p>
          </table:table-cell>
          <table:table-cell table:formula="of:=COUNTIF([.AW$15:.AW$22];&quot;=&quot; &amp;[.$C39])" office:value-type="float" office:value="0" calcext:value-type="float">
            <text:p>0</text:p>
          </table:table-cell>
          <table:table-cell table:formula="of:=COUNTIF([.AX$15:.AX$22];&quot;=&quot; &amp;[.$C39])" office:value-type="float" office:value="0" calcext:value-type="float">
            <text:p>0</text:p>
          </table:table-cell>
          <table:table-cell table:formula="of:=COUNTIF([.AY$15:.AY$22];&quot;=&quot; &amp;[.$C39])" office:value-type="float" office:value="0" calcext:value-type="float">
            <text:p>0</text:p>
          </table:table-cell>
          <table:table-cell table:style-name="ce66"/>
          <table:table-cell table:formula="of:=[.BA38]+0.002" office:value-type="float" office:value="0.048" calcext:value-type="float">
            <text:p>0.048</text:p>
          </table:table-cell>
          <table:table-cell table:formula="of:=[.BA39]*[.$D$6]" office:value-type="float" office:value="2.41274315795696" calcext:value-type="float">
            <text:p>2.413</text:p>
          </table:table-cell>
          <table:table-cell table:formula="of:=[.D$25]*[.$Z$5]*MAGNET([.D$24]+[.BB39])+[.E$25]*[.$Z$5]*MAGNET([.E$24]+[.BB39])+[.F$25]*[.$Z$5]*MAGNET([.F$24]+[.BB39])+[.G$25]*[.$Z$5]*MAGNET([.G$24]+[.BB39])+[.H$25]*[.$Z$5]*MAGNET([.H$24]+[.BB39])+[.I$25]*[.$Z$5]*MAGNET([.I$24]+[.BB39])+[.J$25]*[.$Z$5]*MAGNET([.J$24]+[.BB39])+[.K$25]*[.$Z$5]*MAGNET([.K$24]+[.BB39])+[.L$25]*[.$Z$5]*MAGNET([.L$24]+[.BB39])+[.M$25]*[.$Z$5]*MAGNET([.M$24]+[.BB39])+[.N$25]*[.$Z$5]*MAGNET([.N$24]+[.BB39])+[.O$25]*[.$Z$5]*MAGNET([.O$24]+[.BB39])+[.P$25]*[.$Z$5]*MAGNET([.P$24]+[.BB39])+[.Q$25]*[.$Z$5]*MAGNET([.Q$24]+[.BB39])+[.R$25]*[.$Z$5]*MAGNET([.R$24]+[.BB39])+[.S$25]*[.$Z$5]*MAGNET([.S$24]+[.BB39])+[.T$25]*[.$Z$5]*MAGNET([.T$24]+[.BB39])+[.U$25]*[.$Z$5]*MAGNET([.U$24]+[.BB39])+[.V$25]*[.$Z$5]*MAGNET([.V$24]+[.BB39])+[.W$25]*[.$Z$5]*MAGNET([.W$24]+[.BB39])+[.X$25]*[.$Z$5]*MAGNET([.X$24]+[.BB39])+[.Y$25]*[.$Z$5]*MAGNET([.Y$24]+[.BB39])+[.Z$25]*[.$Z$5]*MAGNET([.Z$24]+[.BB39])+[.AA$25]*[.$Z$5]*MAGNET([.AA$24]+[.BB39])+[.AB$25]*[.$Z$5]*MAGNET([.AB$24]+[.BB39])+[.AC$25]*[.$Z$5]*MAGNET([.AC$24]+[.BB39])+[.AD$25]*[.$Z$5]*MAGNET([.AD$24]+[.BB39])+[.AE$25]*[.$Z$5]*MAGNET([.AE$24]+[.BB39])+[.AF$25]*[.$Z$5]*MAGNET([.AF$24]+[.BB39])+[.AG$25]*[.$Z$5]*MAGNET([.AG$24]+[.BB39])+[.AH$25]*[.$Z$5]*MAGNET([.AH$24]+[.BB39]) +[.AI$25]*[.$Z$5]*MAGNET([.AI$24]+[.BB39]) +[.AJ$25]*[.$Z$5]*MAGNET([.AJ$24]+[.BB39]) +[.AK$25]*[.$Z$5]*MAGNET([.AK$24]+[.BB39]) +[.AL$25]*[.$Z$5]*MAGNET([.AL$24]+[.BB39]) +[.AM$25]*[.$Z$5]*MAGNET([.AM$24]+[.BB39]) +[.AN$25]*[.$Z$5]*MAGNET([.AN$24]+[.BB39]) +[.AO$25]*[.$Z$5]*MAGNET([.AO$24]+[.BB39])+RAND()*[.$BC$13]+[.AP$25]*[.$Z$5]*MAGNET([.AP$24]+[.BB39])&#10;+[.AQ$25]*[.$Z$5]*MAGNET([.AQ$24]+[.BB39])&#10;+[.AR$25]*[.$Z$5]*MAGNET([.AR$24]+[.BB39])&#10;+[.AS$25]*[.$Z$5]*MAGNET([.AS$24]+[.BB39])&#10;+[.AT$25]*[.$Z$5]*MAGNET([.AT$24]+[.BB39])&#10;+[.AU$25]*[.$Z$5]*MAGNET([.AU$24]+[.BB39])&#10;+[.AV$25]*[.$Z$5]*MAGNET([.AV$24]+[.BB39])&#10;+[.AW$25]*[.$Z$5]*MAGNET([.AW$24]+[.BB39])&#10;+[.AX$25]*[.$Z$5]*MAGNET([.AX$24]+[.BB39])&#10;+[.AY$25]*[.$Z$5]*MAGNET([.AY$24]+[.BB39])" office:value-type="float" office:value="107.761760389728" calcext:value-type="float">
            <text:p>107.76</text:p>
          </table:table-cell>
          <table:table-cell table:style-name="ce70" table:formula="of:=[.E$26]*[.$Z$5]*MAGNET([.E$24]+[.$BB39])+[.F$26]*[.$Z$5]*MAGNET([.F$24]+[.$BB39])+[.G$26]*[.$Z$5]*MAGNET([.G$24]+[.$BB39])+[.H$26]*[.$Z$5]*MAGNET([.H$24]+[.$BB39])+[.I$26]*[.$Z$5]*MAGNET([.I$24]+[.$BB39])+[.J$26]*[.$Z$5]*MAGNET([.J$24]+[.$BB39])+[.K$26]*[.$Z$5]*MAGNET([.K$24]+[.$BB39])+[.L$26]*[.$Z$5]*MAGNET([.L$24]+[.$BB39])+[.M$26]*[.$Z$5]*MAGNET([.M$24]+[.$BB39])+[.N$26]*[.$Z$5]*MAGNET([.N$24]+[.$BB39])+[.O$26]*[.$Z$5]*MAGNET([.O$24]+[.$BB39])+[.P$26]*[.$Z$5]*MAGNET([.P$24]+[.$BB39])+[.Q$26]*[.$Z$5]*MAGNET([.Q$24]+[.$BB39])+[.R$26]*[.$Z$5]*MAGNET([.R$24]+[.$BB39])+[.S$26]*[.$Z$5]*MAGNET([.S$24]+[.$BB39])+[.T$26]*[.$Z$5]*MAGNET([.T$24]+[.$BB39])+[.U$26]*[.$Z$5]*MAGNET([.U$24]+[.$BB39])+[.V$26]*[.$Z$5]*MAGNET([.V$24]+[.$BB39])+[.W$26]*[.$Z$5]*MAGNET([.W$24]+[.$BB39])+[.X$26]*[.$Z$5]*MAGNET([.X$24]+[.$BB39])+[.Y$26]*[.$Z$5]*MAGNET([.Y$24]+[.$BB39])+[.Z$26]*[.$Z$5]*MAGNET([.Z$24]+[.$BB39])+[.AA$26]*[.$Z$5]*MAGNET([.AA$24]+[.$BB39])+[.AB$26]*[.$Z$5]*MAGNET([.AB$24]+[.$BB39])+[.AC$26]*[.$Z$5]*MAGNET([.AC$24]+[.$BB39])+[.AD$26]*[.$Z$5]*MAGNET([.AD$24]+[.$BB39])+[.AE$26]*[.$Z$5]*MAGNET([.AE$24]+[.$BB39])+[.AF$26]*[.$Z$5]*MAGNET([.AF$24]+[.$BB39])+[.AG$26]*[.$Z$5]*MAGNET([.AG$24]+[.$BB39])+[.D$26]*[.$Z$5]*MAGNET([.D$24]+[.$BB39])+[.AH$26]*[.$Z$5]*MAGNET([.AH$24]+[.BB39]) +[.AI$26]*[.$Z$5]*MAGNET([.AI$24]+[.BB39]) +[.AJ$26]*[.$Z$5]*MAGNET([.AJ$24]+[.BB39]) +[.AK$26]*[.$Z$5]*MAGNET([.AK$24]+[.BB39]) +[.AL$26]*[.$Z$5]*MAGNET([.AL$24]+[.BB39]) +[.AM$26]*[.$Z$5]*MAGNET([.AM$24]+[.BB39]) +[.AN$26]*[.$Z$5]*MAGNET([.AN$24]+[.BB39]) +[.AO$26]*[.$Z$5]*MAGNET([.AO$24]+[.BB39]) +[.AP$26]*[.$Z$5]*MAGNET([.AP$24]+[.$BB39])&#10;+[.AQ$26]*[.$Z$5]*MAGNET([.AQ$24]+[.$BB39])&#10;+[.AR$26]*[.$Z$5]*MAGNET([.AR$24]+[.$BB39])&#10;+[.AS$26]*[.$Z$5]*MAGNET([.AS$24]+[.$BB39])&#10;+[.AT$26]*[.$Z$5]*MAGNET([.AT$24]+[.$BB39])&#10;+[.AU$26]*[.$Z$5]*MAGNET([.AU$24]+[.$BB39])&#10;+[.AV$26]*[.$Z$5]*MAGNET([.AV$24]+[.$BB39])&#10;+[.AW$26]*[.$Z$5]*MAGNET([.AW$24]+[.$BB39])&#10;+[.AX$26]*[.$Z$5]*MAGNET([.AX$24]+[.$BB39])&#10;+[.AY$26]*[.$Z$5]*MAGNET([.AY$24]+[.$BB39]) +RAND()*[.$BD$13]" office:value-type="float" office:value="-77.0311241801426" calcext:value-type="float">
            <text:p>-77.03</text:p>
          </table:table-cell>
          <table:table-cell table:style-name="ce71" table:formula="of:=[.E$27]*[.$Z$5]*MAGNET([.E$24]+[.$BB39])+[.F$27]*[.$Z$5]*MAGNET([.F$24]+[.$BB39])+[.G$27]*[.$Z$5]*MAGNET([.G$24]+[.$BB39])+[.H$27]*[.$Z$5]*MAGNET([.H$24]+[.$BB39])+[.I$27]*[.$Z$5]*MAGNET([.I$24]+[.$BB39])+[.J$27]*[.$Z$5]*MAGNET([.J$24]+[.$BB39])+[.K$27]*[.$Z$5]*MAGNET([.K$24]+[.$BB39])+[.L$27]*[.$Z$5]*MAGNET([.L$24]+[.$BB39])+[.M$27]*[.$Z$5]*MAGNET([.M$24]+[.$BB39])+[.N$27]*[.$Z$5]*MAGNET([.N$24]+[.$BB39])+[.O$27]*[.$Z$5]*MAGNET([.O$24]+[.$BB39])+[.P$27]*[.$Z$5]*MAGNET([.P$24]+[.$BB39])+[.Q$27]*[.$Z$5]*MAGNET([.Q$24]+[.$BB39])+[.R$27]*[.$Z$5]*MAGNET([.R$24]+[.$BB39])+[.S$27]*[.$Z$5]*MAGNET([.S$24]+[.$BB39])+[.T$27]*[.$Z$5]*MAGNET([.T$24]+[.$BB39])+[.U$27]*[.$Z$5]*MAGNET([.U$24]+[.$BB39])+[.V$27]*[.$Z$5]*MAGNET([.V$24]+[.$BB39])+[.W$27]*[.$Z$5]*MAGNET([.W$24]+[.$BB39])+[.X$27]*[.$Z$5]*MAGNET([.X$24]+[.$BB39])+[.Y$27]*[.$Z$5]*MAGNET([.Y$24]+[.$BB39])+[.Z$27]*[.$Z$5]*MAGNET([.Z$24]+[.$BB39])+[.AA$27]*[.$Z$5]*MAGNET([.AA$24]+[.$BB39])+[.AB$27]*[.$Z$5]*MAGNET([.AB$24]+[.$BB39])+[.AC$27]*[.$Z$5]*MAGNET([.AC$24]+[.$BB39])+[.AD$27]*[.$Z$5]*MAGNET([.AD$24]+[.$BB39])+[.AE$27]*[.$Z$5]*MAGNET([.AE$24]+[.$BB39])+[.AF$27]*[.$Z$5]*MAGNET([.AF$24]+[.$BB39])+[.AG$27]*[.$Z$5]*MAGNET([.AG$24]+[.$BB39])+[.D$27]*[.$Z$5]*MAGNET([.D$24]+[.$BB39])+[.AH$27]*[.$Z$5]*MAGNET([.AH$24]+[.BB39]) +[.AI$27]*[.$Z$5]*MAGNET([.AI$24]+[.BB39]) +[.AJ$27]*[.$Z$5]*MAGNET([.AJ$24]+[.BB39]) +[.AK$27]*[.$Z$5]*MAGNET([.AK$24]+[.BB39]) +[.AL$27]*[.$Z$5]*MAGNET([.AL$24]+[.BB39]) +[.AM$27]*[.$Z$5]*MAGNET([.AM$24]+[.BB39]) +[.AN$27]*[.$Z$5]*MAGNET([.AN$24]+[.BB39]) +[.AO$27]*[.$Z$5]*MAGNET([.AO$24]+[.BB39]) +[.AP$27]*[.$Z$5]*MAGNET([.AP$24]+[.$BB39])&#10;+[.AQ$27]*[.$Z$5]*MAGNET([.AQ$24]+[.$BB39])&#10;+[.AR$27]*[.$Z$5]*MAGNET([.AR$24]+[.$BB39])&#10;+[.AS$27]*[.$Z$5]*MAGNET([.AS$24]+[.$BB39])&#10;+[.AT$27]*[.$Z$5]*MAGNET([.AT$24]+[.$BB39])&#10;+[.AU$27]*[.$Z$5]*MAGNET([.AU$24]+[.$BB39])&#10;+[.AV$27]*[.$Z$5]*MAGNET([.AV$24]+[.$BB39])&#10;+[.AW$27]*[.$Z$5]*MAGNET([.AW$24]+[.$BB39])&#10;+[.AX$27]*[.$Z$5]*MAGNET([.AX$24]+[.$BB39])&#10;+[.AY$27]*[.$Z$5]*MAGNET([.AY$24]+[.$BB39]) +RAND()*[.$BE$13]" office:value-type="float" office:value="-21.3310474978837" calcext:value-type="float">
            <text:p>-21.3310474978837</text:p>
          </table:table-cell>
          <table:table-cell table:style-name="ce71" table:formula="of:=[.E$28]*[.$Z$5]*MAGNET([.E$24]+[.$BB39])+[.F$28]*[.$Z$5]*MAGNET([.F$24]+[.$BB39])+[.G$28]*[.$Z$5]*MAGNET([.G$24]+[.$BB39])+[.H$28]*[.$Z$5]*MAGNET([.H$24]+[.$BB39])+[.I$28]*[.$Z$5]*MAGNET([.I$24]+[.$BB39])+[.J$28]*[.$Z$5]*MAGNET([.J$24]+[.$BB39])+[.K$28]*[.$Z$5]*MAGNET([.K$24]+[.$BB39])+[.L$28]*[.$Z$5]*MAGNET([.L$24]+[.$BB39])+[.M$28]*[.$Z$5]*MAGNET([.M$24]+[.$BB39])+[.N$28]*[.$Z$5]*MAGNET([.N$24]+[.$BB39])+[.O$28]*[.$Z$5]*MAGNET([.O$24]+[.$BB39])+[.P$28]*[.$Z$5]*MAGNET([.P$24]+[.$BB39])+[.Q$28]*[.$Z$5]*MAGNET([.Q$24]+[.$BB39])+[.R$28]*[.$Z$5]*MAGNET([.R$24]+[.$BB39])+[.S$28]*[.$Z$5]*MAGNET([.S$24]+[.$BB39])+[.T$28]*[.$Z$5]*MAGNET([.T$24]+[.$BB39])+[.U$28]*[.$Z$5]*MAGNET([.U$24]+[.$BB39])+[.V$28]*[.$Z$5]*MAGNET([.V$24]+[.$BB39])+[.W$28]*[.$Z$5]*MAGNET([.W$24]+[.$BB39])+[.X$28]*[.$Z$5]*MAGNET([.X$24]+[.$BB39])+[.Y$28]*[.$Z$5]*MAGNET([.Y$24]+[.$BB39])+[.Z$28]*[.$Z$5]*MAGNET([.Z$24]+[.$BB39])+[.AA$28]*[.$Z$5]*MAGNET([.AA$24]+[.$BB39])+[.AB$28]*[.$Z$5]*MAGNET([.AB$24]+[.$BB39])+[.AC$28]*[.$Z$5]*MAGNET([.AC$24]+[.$BB39])+[.AD$28]*[.$Z$5]*MAGNET([.AD$24]+[.$BB39])+[.AE$28]*[.$Z$5]*MAGNET([.AE$24]+[.$BB39])+[.AF$28]*[.$Z$5]*MAGNET([.AF$24]+[.$BB39])+[.AG$28]*[.$Z$5]*MAGNET([.AG$24]+[.$BB39])+[.D$28]*[.$Z$5]*MAGNET([.D$24]+[.$BB39])+[.AH$28]*[.$Z$5]*MAGNET([.AH$24]+[.BB39]) +[.AI$28]*[.$Z$5]*MAGNET([.AI$24]+[.BB39]) +[.AJ$28]*[.$Z$5]*MAGNET([.AJ$24]+[.BB39]) +[.AK$28]*[.$Z$5]*MAGNET([.AK$24]+[.BB39]) +[.AL$28]*[.$Z$5]*MAGNET([.AL$24]+[.BB39]) +[.AM$28]*[.$Z$5]*MAGNET([.AM$24]+[.BB39]) +[.AN$28]*[.$Z$5]*MAGNET([.AN$24]+[.BB39]) +[.AO$28]*[.$Z$5]*MAGNET([.AO$24]+[.BB39]) +[.AP$28]*[.$Z$5]*MAGNET([.AP$24]+[.$BB39])&#10;+[.AQ$28]*[.$Z$5]*MAGNET([.AQ$24]+[.$BB39])&#10;+[.AR$28]*[.$Z$5]*MAGNET([.AR$24]+[.$BB39])&#10;+[.AS$28]*[.$Z$5]*MAGNET([.AS$24]+[.$BB39])&#10;+[.AT$28]*[.$Z$5]*MAGNET([.AT$24]+[.$BB39])&#10;+[.AU$28]*[.$Z$5]*MAGNET([.AU$24]+[.$BB39])&#10;+[.AV$28]*[.$Z$5]*MAGNET([.AV$24]+[.$BB39])&#10;+[.AW$28]*[.$Z$5]*MAGNET([.AW$24]+[.$BB39])&#10;+[.AX$28]*[.$Z$5]*MAGNET([.AX$24]+[.$BB39])&#10;+[.AY$28]*[.$Z$5]*MAGNET([.AY$24]+[.$BB39]) +RAND()*[.$BF$13]" office:value-type="float" office:value="-0.490549499355546" calcext:value-type="float">
            <text:p>-0.490549499355546</text:p>
          </table:table-cell>
          <table:table-cell table:style-name="ce71" table:formula="of:=[.E$29]*[.$Z$5]*MAGNET([.E$24]+[.$BB39])+[.F$29]*[.$Z$5]*MAGNET([.F$24]+[.$BB39])+[.G$29]*[.$Z$5]*MAGNET([.G$24]+[.$BB39])+[.H$29]*[.$Z$5]*MAGNET([.H$24]+[.$BB39])+[.I$29]*[.$Z$5]*MAGNET([.I$24]+[.$BB39])+[.J$29]*[.$Z$5]*MAGNET([.J$24]+[.$BB39])+[.K$29]*[.$Z$5]*MAGNET([.K$24]+[.$BB39])+[.L$29]*[.$Z$5]*MAGNET([.L$24]+[.$BB39])+[.M$29]*[.$Z$5]*MAGNET([.M$24]+[.$BB39])+[.N$29]*[.$Z$5]*MAGNET([.N$24]+[.$BB39])+[.O$29]*[.$Z$5]*MAGNET([.O$24]+[.$BB39])+[.P$29]*[.$Z$5]*MAGNET([.P$24]+[.$BB39])+[.Q$29]*[.$Z$5]*MAGNET([.Q$24]+[.$BB39])+[.R$29]*[.$Z$5]*MAGNET([.R$24]+[.$BB39])+[.S$29]*[.$Z$5]*MAGNET([.S$24]+[.$BB39])+[.T$29]*[.$Z$5]*MAGNET([.T$24]+[.$BB39])+[.U$29]*[.$Z$5]*MAGNET([.U$24]+[.$BB39])+[.V$29]*[.$Z$5]*MAGNET([.V$24]+[.$BB39])+[.W$29]*[.$Z$5]*MAGNET([.W$24]+[.$BB39])+[.X$29]*[.$Z$5]*MAGNET([.X$24]+[.$BB39])+[.Y$29]*[.$Z$5]*MAGNET([.Y$24]+[.$BB39])+[.Z$29]*[.$Z$5]*MAGNET([.Z$24]+[.$BB39])+[.AA$29]*[.$Z$5]*MAGNET([.AA$24]+[.$BB39])+[.AB$29]*[.$Z$5]*MAGNET([.AB$24]+[.$BB39])+[.AC$29]*[.$Z$5]*MAGNET([.AC$24]+[.$BB39])+[.AD$29]*[.$Z$5]*MAGNET([.AD$24]+[.$BB39])+[.AE$29]*[.$Z$5]*MAGNET([.AE$24]+[.$BB39])+[.AF$29]*[.$Z$5]*MAGNET([.AF$24]+[.$BB39])+[.AG$29]*[.$Z$5]*MAGNET([.AG$24]+[.$BB39])+[.D$29]*[.$Z$5]*MAGNET([.D$24]+[.$BB39])+[.AH$29]*[.$Z$5]*MAGNET([.AH$24]+[.BB39]) +[.AI$29]*[.$Z$5]*MAGNET([.AI$24]+[.BB39]) +[.AJ$29]*[.$Z$5]*MAGNET([.AJ$24]+[.BB39]) +[.AK$29]*[.$Z$5]*MAGNET([.AK$24]+[.BB39]) +[.AL$29]*[.$Z$5]*MAGNET([.AL$24]+[.BB39]) +[.AM$29]*[.$Z$5]*MAGNET([.AM$24]+[.BB39]) +[.AN$29]*[.$Z$5]*MAGNET([.AN$24]+[.BB39]) +[.AO$29]*[.$Z$5]*MAGNET([.AO$24]+[.BB39]) +[.AP$29]*[.$Z$5]*MAGNET([.AP$24]+[.$BB39])&#10;+[.AQ$29]*[.$Z$5]*MAGNET([.AQ$24]+[.$BB39])&#10;+[.AR$29]*[.$Z$5]*MAGNET([.AR$24]+[.$BB39])&#10;+[.AS$29]*[.$Z$5]*MAGNET([.AS$24]+[.$BB39])&#10;+[.AT$29]*[.$Z$5]*MAGNET([.AT$24]+[.$BB39])&#10;+[.AU$29]*[.$Z$5]*MAGNET([.AU$24]+[.$BB39])&#10;+[.AV$29]*[.$Z$5]*MAGNET([.AV$24]+[.$BB39])&#10;+[.AW$29]*[.$Z$5]*MAGNET([.AW$24]+[.$BB39])&#10;+[.AX$29]*[.$Z$5]*MAGNET([.AX$24]+[.$BB39])&#10;+[.AY$29]*[.$Z$5]*MAGNET([.AY$24]+[.$BB39]) +RAND()*[.$BG$13]" office:value-type="float" office:value="9.95014274891474" calcext:value-type="float">
            <text:p>9.95014274891474</text:p>
          </table:table-cell>
          <table:table-cell table:style-name="ce71" table:formula="of:=[.E$30]*[.$Z$5]*MAGNET([.E$24]+[.$BB39])+[.F$30]*[.$Z$5]*MAGNET([.F$24]+[.$BB39])+[.G$30]*[.$Z$5]*MAGNET([.G$24]+[.$BB39])+[.H$30]*[.$Z$5]*MAGNET([.H$24]+[.$BB39])+[.I$30]*[.$Z$5]*MAGNET([.I$24]+[.$BB39])+[.J$30]*[.$Z$5]*MAGNET([.J$24]+[.$BB39])+[.K$30]*[.$Z$5]*MAGNET([.K$24]+[.$BB39])+[.L$30]*[.$Z$5]*MAGNET([.L$24]+[.$BB39])+[.M$30]*[.$Z$5]*MAGNET([.M$24]+[.$BB39])+[.N$30]*[.$Z$5]*MAGNET([.N$24]+[.$BB39])+[.O$30]*[.$Z$5]*MAGNET([.O$24]+[.$BB39])+[.P$30]*[.$Z$5]*MAGNET([.P$24]+[.$BB39])+[.Q$30]*[.$Z$5]*MAGNET([.Q$24]+[.$BB39])+[.R$30]*[.$Z$5]*MAGNET([.R$24]+[.$BB39])+[.S$30]*[.$Z$5]*MAGNET([.S$24]+[.$BB39])+[.T$30]*[.$Z$5]*MAGNET([.T$24]+[.$BB39])+[.U$30]*[.$Z$5]*MAGNET([.U$24]+[.$BB39])+[.V$30]*[.$Z$5]*MAGNET([.V$24]+[.$BB39])+[.W$30]*[.$Z$5]*MAGNET([.W$24]+[.$BB39])+[.X$30]*[.$Z$5]*MAGNET([.X$24]+[.$BB39])+[.Y$30]*[.$Z$5]*MAGNET([.Y$24]+[.$BB39])+[.Z$30]*[.$Z$5]*MAGNET([.Z$24]+[.$BB39])+[.AA$30]*[.$Z$5]*MAGNET([.AA$24]+[.$BB39])+[.AB$30]*[.$Z$5]*MAGNET([.AB$24]+[.$BB39])+[.AC$30]*[.$Z$5]*MAGNET([.AC$24]+[.$BB39])+[.AD$30]*[.$Z$5]*MAGNET([.AD$24]+[.$BB39])+[.AE$30]*[.$Z$5]*MAGNET([.AE$24]+[.$BB39])+[.AF$30]*[.$Z$5]*MAGNET([.AF$24]+[.$BB39])+[.AG$30]*[.$Z$5]*MAGNET([.AG$24]+[.$BB39])+[.D$30]*[.$Z$5]*MAGNET([.D$24]+[.$BB39])+[.AH$30]*[.$Z$5]*MAGNET([.AH$24]+[.BB39]) +[.AI$30]*[.$Z$5]*MAGNET([.AI$24]+[.BB39]) +[.AJ$30]*[.$Z$5]*MAGNET([.AJ$24]+[.BB39]) +[.AK$30]*[.$Z$5]*MAGNET([.AK$24]+[.BB39]) +[.AL$30]*[.$Z$5]*MAGNET([.AL$24]+[.BB39]) +[.AM$30]*[.$Z$5]*MAGNET([.AM$24]+[.BB39]) +[.AN$30]*[.$Z$5]*MAGNET([.AN$24]+[.BB39]) +[.AO$30]*[.$Z$5]*MAGNET([.AO$24]+[.BB39]) +[.AP$30]*[.$Z$5]*MAGNET([.AP$24]+[.$BB39])&#10;+[.AQ$30]*[.$Z$5]*MAGNET([.AQ$24]+[.$BB39])&#10;+[.AR$30]*[.$Z$5]*MAGNET([.AR$24]+[.$BB39])&#10;+[.AS$30]*[.$Z$5]*MAGNET([.AS$24]+[.$BB39])&#10;+[.AT$30]*[.$Z$5]*MAGNET([.AT$24]+[.$BB39])&#10;+[.AU$30]*[.$Z$5]*MAGNET([.AU$24]+[.$BB39])&#10;+[.AV$30]*[.$Z$5]*MAGNET([.AV$24]+[.$BB39])&#10;+[.AW$30]*[.$Z$5]*MAGNET([.AW$24]+[.$BB39])&#10;+[.AX$30]*[.$Z$5]*MAGNET([.AX$24]+[.$BB39])&#10;+[.AY$30]*[.$Z$5]*MAGNET([.AY$24]+[.$BB39]) +RAND()*[.$BH$13]" office:value-type="float" office:value="0" calcext:value-type="float">
            <text:p>0</text:p>
          </table:table-cell>
          <table:table-cell table:style-name="ce71" table:formula="of:=[.E$31]*[.$Z$5]*MAGNET([.E$24]+[.$BB39])+[.F$31]*[.$Z$5]*MAGNET([.F$24]+[.$BB39])+[.G$31]*[.$Z$5]*MAGNET([.G$24]+[.$BB39])+[.H$31]*[.$Z$5]*MAGNET([.H$24]+[.$BB39])+[.I$31]*[.$Z$5]*MAGNET([.I$24]+[.$BB39])+[.J$31]*[.$Z$5]*MAGNET([.J$24]+[.$BB39])+[.K$31]*[.$Z$5]*MAGNET([.K$24]+[.$BB39])+[.L$31]*[.$Z$5]*MAGNET([.L$24]+[.$BB39])+[.M$31]*[.$Z$5]*MAGNET([.M$24]+[.$BB39])+[.N$31]*[.$Z$5]*MAGNET([.N$24]+[.$BB39])+[.O$31]*[.$Z$5]*MAGNET([.O$24]+[.$BB39])+[.P$31]*[.$Z$5]*MAGNET([.P$24]+[.$BB39])+[.Q$31]*[.$Z$5]*MAGNET([.Q$24]+[.$BB39])+[.R$31]*[.$Z$5]*MAGNET([.R$24]+[.$BB39])+[.S$31]*[.$Z$5]*MAGNET([.S$24]+[.$BB39])+[.T$31]*[.$Z$5]*MAGNET([.T$24]+[.$BB39])+[.U$31]*[.$Z$5]*MAGNET([.U$24]+[.$BB39])+[.V$31]*[.$Z$5]*MAGNET([.V$24]+[.$BB39])+[.W$31]*[.$Z$5]*MAGNET([.W$24]+[.$BB39])+[.X$31]*[.$Z$5]*MAGNET([.X$24]+[.$BB39])+[.Y$31]*[.$Z$5]*MAGNET([.Y$24]+[.$BB39])+[.Z$31]*[.$Z$5]*MAGNET([.Z$24]+[.$BB39])+[.AA$31]*[.$Z$5]*MAGNET([.AA$24]+[.$BB39])+[.AB$31]*[.$Z$5]*MAGNET([.AB$24]+[.$BB39])+[.AC$31]*[.$Z$5]*MAGNET([.AC$24]+[.$BB39])+[.AD$31]*[.$Z$5]*MAGNET([.AD$24]+[.$BB39])+[.AE$31]*[.$Z$5]*MAGNET([.AE$24]+[.$BB39])+[.AF$31]*[.$Z$5]*MAGNET([.AF$24]+[.$BB39])+[.AG$31]*[.$Z$5]*MAGNET([.AG$24]+[.$BB39])+[.D$31]*[.$Z$5]*MAGNET([.D$24]+[.$BB39])+[.AH$31]*[.$Z$5]*MAGNET([.AH$24]+[.BB39]) +[.AI$31]*[.$Z$5]*MAGNET([.AI$24]+[.BB39]) +[.AJ$31]*[.$Z$5]*MAGNET([.AJ$24]+[.BB39]) +[.AK$31]*[.$Z$5]*MAGNET([.AK$24]+[.BB39]) +[.AL$31]*[.$Z$5]*MAGNET([.AL$24]+[.BB39]) +[.AM$31]*[.$Z$5]*MAGNET([.AM$24]+[.BB39]) +[.AN$31]*[.$Z$5]*MAGNET([.AN$24]+[.BB39]) +[.AO$31]*[.$Z$5]*MAGNET([.AO$24]+[.BB39]) +[.AP$31]*[.$Z$5]*MAGNET([.AP$24]+[.$BB39])&#10;+[.AQ$31]*[.$Z$5]*MAGNET([.AQ$24]+[.$BB39])&#10;+[.AR$31]*[.$Z$5]*MAGNET([.AR$24]+[.$BB39])&#10;+[.AS$31]*[.$Z$5]*MAGNET([.AS$24]+[.$BB39])&#10;+[.AT$31]*[.$Z$5]*MAGNET([.AT$24]+[.$BB39])&#10;+[.AU$31]*[.$Z$5]*MAGNET([.AU$24]+[.$BB39])&#10;+[.AV$31]*[.$Z$5]*MAGNET([.AV$24]+[.$BB39])&#10;+[.AW$31]*[.$Z$5]*MAGNET([.AW$24]+[.$BB39])&#10;+[.AX$31]*[.$Z$5]*MAGNET([.AX$24]+[.$BB39])&#10;+[.AY$31]*[.$Z$5]*MAGNET([.AY$24]+[.$BB39]) +RAND()*[.$BI$13]" office:value-type="float" office:value="0" calcext:value-type="float">
            <text:p>0</text:p>
          </table:table-cell>
          <table:table-cell table:style-name="ce71" table:formula="of:=[.E$32]*[.$Z$5]*MAGNET([.E$24]+[.$BB39])+[.F$32]*[.$Z$5]*MAGNET([.F$24]+[.$BB39])+[.G$32]*[.$Z$5]*MAGNET([.G$24]+[.$BB39])+[.H$32]*[.$Z$5]*MAGNET([.H$24]+[.$BB39])+[.I$32]*[.$Z$5]*MAGNET([.I$24]+[.$BB39])+[.J$32]*[.$Z$5]*MAGNET([.J$24]+[.$BB39])+[.K$32]*[.$Z$5]*MAGNET([.K$24]+[.$BB39])+[.L$32]*[.$Z$5]*MAGNET([.L$24]+[.$BB39])+[.M$32]*[.$Z$5]*MAGNET([.M$24]+[.$BB39])+[.N$32]*[.$Z$5]*MAGNET([.N$24]+[.$BB39])+[.O$32]*[.$Z$5]*MAGNET([.O$24]+[.$BB39])+[.P$32]*[.$Z$5]*MAGNET([.P$24]+[.$BB39])+[.Q$32]*[.$Z$5]*MAGNET([.Q$24]+[.$BB39])+[.R$32]*[.$Z$5]*MAGNET([.R$24]+[.$BB39])+[.S$32]*[.$Z$5]*MAGNET([.S$24]+[.$BB39])+[.T$32]*[.$Z$5]*MAGNET([.T$24]+[.$BB39])+[.U$32]*[.$Z$5]*MAGNET([.U$24]+[.$BB39])+[.V$32]*[.$Z$5]*MAGNET([.V$24]+[.$BB39])+[.W$32]*[.$Z$5]*MAGNET([.W$24]+[.$BB39])+[.X$32]*[.$Z$5]*MAGNET([.X$24]+[.$BB39])+[.Y$32]*[.$Z$5]*MAGNET([.Y$24]+[.$BB39])+[.Z$32]*[.$Z$5]*MAGNET([.Z$24]+[.$BB39])+[.AA$32]*[.$Z$5]*MAGNET([.AA$24]+[.$BB39])+[.AB$32]*[.$Z$5]*MAGNET([.AB$24]+[.$BB39])+[.AC$32]*[.$Z$5]*MAGNET([.AC$24]+[.$BB39])+[.AD$32]*[.$Z$5]*MAGNET([.AD$24]+[.$BB39])+[.AE$32]*[.$Z$5]*MAGNET([.AE$24]+[.$BB39])+[.AF$32]*[.$Z$5]*MAGNET([.AF$24]+[.$BB39])+[.AG$32]*[.$Z$5]*MAGNET([.AG$24]+[.$BB39])+[.D$32]*[.$Z$5]*MAGNET([.D$24]+[.$BB39])+[.AH$32]*[.$Z$5]*MAGNET([.AH$24]+[.BB39]) +[.AI$32]*[.$Z$5]*MAGNET([.AI$24]+[.BB39]) +[.AJ$32]*[.$Z$5]*MAGNET([.AJ$24]+[.BB39]) +[.AK$32]*[.$Z$5]*MAGNET([.AK$24]+[.BB39]) +[.AL$32]*[.$Z$5]*MAGNET([.AL$24]+[.BB39]) +[.AM$32]*[.$Z$5]*MAGNET([.AM$24]+[.BB39]) +[.AN$32]*[.$Z$5]*MAGNET([.AN$24]+[.BB39]) +[.AO$32]*[.$Z$5]*MAGNET([.AO$24]+[.BB39]) +[.AP$32]*[.$Z$5]*MAGNET([.AP$24]+[.$BB39])&#10;+[.AQ$32]*[.$Z$5]*MAGNET([.AQ$24]+[.$BB39])&#10;+[.AR$32]*[.$Z$5]*MAGNET([.AR$24]+[.$BB39])&#10;+[.AS$32]*[.$Z$5]*MAGNET([.AS$24]+[.$BB39])&#10;+[.AT$32]*[.$Z$5]*MAGNET([.AT$24]+[.$BB39])&#10;+[.AU$32]*[.$Z$5]*MAGNET([.AU$24]+[.$BB39])&#10;+[.AV$32]*[.$Z$5]*MAGNET([.AV$24]+[.$BB39])&#10;+[.AW$32]*[.$Z$5]*MAGNET([.AW$24]+[.$BB39])&#10;+[.AX$32]*[.$Z$5]*MAGNET([.AX$24]+[.$BB39])&#10;+[.AY$32]*[.$Z$5]*MAGNET([.AY$24]+[.$BB39]) +RAND()*[.$BJ$13]" office:value-type="float" office:value="0" calcext:value-type="float">
            <text:p>0</text:p>
          </table:table-cell>
          <table:table-cell table:number-columns-repeated="3"/>
          <table:table-cell table:formula="of:=[.AP$25]*[.$Z$5]*MAGNET([.AP$24]+[.BB15])&#10;+[.AQ$25]*[.$Z$5]*MAGNET([.AQ$24]+[.BB15])&#10;+[.AR$25]*[.$Z$5]*MAGNET([.AR$24]+[.BB15])&#10;+[.AS$25]*[.$Z$5]*MAGNET([.AS$24]+[.BB15])&#10;+[.AT$25]*[.$Z$5]*MAGNET([.AT$24]+[.BB15])&#10;+[.AU$25]*[.$Z$5]*MAGNET([.AU$24]+[.BB15])&#10;+[.AV$25]*[.$Z$5]*MAGNET([.AV$24]+[.BB15])&#10;+[.AW$25]*[.$Z$5]*MAGNET([.AW$24]+[.BB15])&#10;+[.AX$25]*[.$Z$5]*MAGNET([.AX$24]+[.BB15])&#10;+[.AY$25]*[.$Z$5]*MAGNET([.AY$24]+[.BB15])" office:value-type="float" office:value="0" calcext:value-type="float">
            <text:p>0</text:p>
          </table:table-cell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2" calcext:value-type="float">
            <text:p>-2</text:p>
          </table:table-cell>
          <table:table-cell table:formula="of:=COUNTIF([.D$15:.D$22];&quot;=&quot; &amp;[.$C40])" office:value-type="float" office:value="0" calcext:value-type="float">
            <text:p>0</text:p>
          </table:table-cell>
          <table:table-cell table:formula="of:=COUNTIF([.E$15:.E$22];&quot;=&quot; &amp;[.$C40])" office:value-type="float" office:value="0" calcext:value-type="float">
            <text:p>0</text:p>
          </table:table-cell>
          <table:table-cell table:formula="of:=COUNTIF([.F$15:.F$22];&quot;=&quot; &amp;[.$C40])" office:value-type="float" office:value="0" calcext:value-type="float">
            <text:p>0</text:p>
          </table:table-cell>
          <table:table-cell table:formula="of:=COUNTIF([.G$15:.G$22];&quot;=&quot; &amp;[.$C40])" office:value-type="float" office:value="0" calcext:value-type="float">
            <text:p>0</text:p>
          </table:table-cell>
          <table:table-cell table:formula="of:=COUNTIF([.H$15:.H$22];&quot;=&quot; &amp;[.$C40])" office:value-type="float" office:value="0" calcext:value-type="float">
            <text:p>0</text:p>
          </table:table-cell>
          <table:table-cell table:formula="of:=COUNTIF([.I$15:.I$22];&quot;=&quot; &amp;[.$C40])" office:value-type="float" office:value="0" calcext:value-type="float">
            <text:p>0</text:p>
          </table:table-cell>
          <table:table-cell table:formula="of:=COUNTIF([.J$15:.J$22];&quot;=&quot; &amp;[.$C40])" office:value-type="float" office:value="0" calcext:value-type="float">
            <text:p>0</text:p>
          </table:table-cell>
          <table:table-cell table:formula="of:=COUNTIF([.K$15:.K$22];&quot;=&quot; &amp;[.$C40])" office:value-type="float" office:value="0" calcext:value-type="float">
            <text:p>0</text:p>
          </table:table-cell>
          <table:table-cell table:formula="of:=COUNTIF([.L$15:.L$22];&quot;=&quot; &amp;[.$C40])" office:value-type="float" office:value="0" calcext:value-type="float">
            <text:p>0</text:p>
          </table:table-cell>
          <table:table-cell table:formula="of:=COUNTIF([.M$15:.M$22];&quot;=&quot; &amp;[.$C40])" office:value-type="float" office:value="0" calcext:value-type="float">
            <text:p>0</text:p>
          </table:table-cell>
          <table:table-cell table:formula="of:=COUNTIF([.N$15:.N$22];&quot;=&quot; &amp;[.$C40])" office:value-type="float" office:value="0" calcext:value-type="float">
            <text:p>0</text:p>
          </table:table-cell>
          <table:table-cell table:formula="of:=COUNTIF([.O$15:.O$22];&quot;=&quot; &amp;[.$C40])" office:value-type="float" office:value="0" calcext:value-type="float">
            <text:p>0</text:p>
          </table:table-cell>
          <table:table-cell table:formula="of:=COUNTIF([.P$15:.P$22];&quot;=&quot; &amp;[.$C40])" office:value-type="float" office:value="2" calcext:value-type="float">
            <text:p>2</text:p>
          </table:table-cell>
          <table:table-cell table:formula="of:=COUNTIF([.Q$15:.Q$22];&quot;=&quot; &amp;[.$C40])" office:value-type="float" office:value="4" calcext:value-type="float">
            <text:p>4</text:p>
          </table:table-cell>
          <table:table-cell table:formula="of:=COUNTIF([.R$15:.R$22];&quot;=&quot; &amp;[.$C40])" office:value-type="float" office:value="4" calcext:value-type="float">
            <text:p>4</text:p>
          </table:table-cell>
          <table:table-cell table:formula="of:=COUNTIF([.S$15:.S$22];&quot;=&quot; &amp;[.$C40])" office:value-type="float" office:value="0" calcext:value-type="float">
            <text:p>0</text:p>
          </table:table-cell>
          <table:table-cell table:formula="of:=COUNTIF([.T$15:.T$22];&quot;=&quot; &amp;[.$C40])" office:value-type="float" office:value="0" calcext:value-type="float">
            <text:p>0</text:p>
          </table:table-cell>
          <table:table-cell table:formula="of:=COUNTIF([.U$15:.U$22];&quot;=&quot; &amp;[.$C40])" office:value-type="float" office:value="0" calcext:value-type="float">
            <text:p>0</text:p>
          </table:table-cell>
          <table:table-cell table:formula="of:=COUNTIF([.V$15:.V$22];&quot;=&quot; &amp;[.$C40])" office:value-type="float" office:value="0" calcext:value-type="float">
            <text:p>0</text:p>
          </table:table-cell>
          <table:table-cell table:formula="of:=COUNTIF([.W$15:.W$22];&quot;=&quot; &amp;[.$C40])" office:value-type="float" office:value="0" calcext:value-type="float">
            <text:p>0</text:p>
          </table:table-cell>
          <table:table-cell table:formula="of:=COUNTIF([.X$15:.X$22];&quot;=&quot; &amp;[.$C40])" office:value-type="float" office:value="0" calcext:value-type="float">
            <text:p>0</text:p>
          </table:table-cell>
          <table:table-cell table:formula="of:=COUNTIF([.Y$15:.Y$22];&quot;=&quot; &amp;[.$C40])" office:value-type="float" office:value="0" calcext:value-type="float">
            <text:p>0</text:p>
          </table:table-cell>
          <table:table-cell table:formula="of:=COUNTIF([.Z$15:.Z$22];&quot;=&quot; &amp;[.$C40])" office:value-type="float" office:value="0" calcext:value-type="float">
            <text:p>0</text:p>
          </table:table-cell>
          <table:table-cell table:formula="of:=COUNTIF([.AA$15:.AA$22];&quot;=&quot; &amp;[.$C40])" office:value-type="float" office:value="0" calcext:value-type="float">
            <text:p>0</text:p>
          </table:table-cell>
          <table:table-cell table:formula="of:=COUNTIF([.AB$15:.AB$22];&quot;=&quot; &amp;[.$C40])" office:value-type="float" office:value="0" calcext:value-type="float">
            <text:p>0</text:p>
          </table:table-cell>
          <table:table-cell table:formula="of:=COUNTIF([.AC$15:.AC$22];&quot;=&quot; &amp;[.$C40])" office:value-type="float" office:value="0" calcext:value-type="float">
            <text:p>0</text:p>
          </table:table-cell>
          <table:table-cell table:formula="of:=COUNTIF([.AD$15:.AD$22];&quot;=&quot; &amp;[.$C40])" office:value-type="float" office:value="0" calcext:value-type="float">
            <text:p>0</text:p>
          </table:table-cell>
          <table:table-cell table:formula="of:=COUNTIF([.AE$15:.AE$22];&quot;=&quot; &amp;[.$C40])" office:value-type="float" office:value="2" calcext:value-type="float">
            <text:p>2</text:p>
          </table:table-cell>
          <table:table-cell table:formula="of:=COUNTIF([.AF$15:.AF$22];&quot;=&quot; &amp;[.$C40])" office:value-type="float" office:value="0" calcext:value-type="float">
            <text:p>0</text:p>
          </table:table-cell>
          <table:table-cell table:formula="of:=COUNTIF([.AG$15:.AG$22];&quot;=&quot; &amp;[.$C40])" office:value-type="float" office:value="1" calcext:value-type="float">
            <text:p>1</text:p>
          </table:table-cell>
          <table:table-cell table:formula="of:=COUNTIF([.AH$15:.AH$22];&quot;=&quot; &amp;[.$C40])" office:value-type="float" office:value="0" calcext:value-type="float">
            <text:p>0</text:p>
          </table:table-cell>
          <table:table-cell table:formula="of:=COUNTIF([.AI$15:.AI$22];&quot;=&quot; &amp;[.$C40])" office:value-type="float" office:value="0" calcext:value-type="float">
            <text:p>0</text:p>
          </table:table-cell>
          <table:table-cell table:formula="of:=COUNTIF([.AJ$15:.AJ$22];&quot;=&quot; &amp;[.$C40])" office:value-type="float" office:value="0" calcext:value-type="float">
            <text:p>0</text:p>
          </table:table-cell>
          <table:table-cell table:formula="of:=COUNTIF([.AK$15:.AK$22];&quot;=&quot; &amp;[.$C40])" office:value-type="float" office:value="4" calcext:value-type="float">
            <text:p>4</text:p>
          </table:table-cell>
          <table:table-cell table:formula="of:=COUNTIF([.AL$15:.AL$22];&quot;=&quot; &amp;[.$C40])" office:value-type="float" office:value="4" calcext:value-type="float">
            <text:p>4</text:p>
          </table:table-cell>
          <table:table-cell table:formula="of:=COUNTIF([.AM$15:.AM$22];&quot;=&quot; &amp;[.$C40])" office:value-type="float" office:value="0" calcext:value-type="float">
            <text:p>0</text:p>
          </table:table-cell>
          <table:table-cell table:formula="of:=COUNTIF([.AN$15:.AN$22];&quot;=&quot; &amp;[.$C40])" office:value-type="float" office:value="0" calcext:value-type="float">
            <text:p>0</text:p>
          </table:table-cell>
          <table:table-cell table:formula="of:=COUNTIF([.AO$15:.AO$22];&quot;=&quot; &amp;[.$C40])" office:value-type="float" office:value="0" calcext:value-type="float">
            <text:p>0</text:p>
          </table:table-cell>
          <table:table-cell table:formula="of:=COUNTIF([.AP$15:.AP$22];&quot;=&quot; &amp;[.$C40])" office:value-type="float" office:value="0" calcext:value-type="float">
            <text:p>0</text:p>
          </table:table-cell>
          <table:table-cell table:formula="of:=COUNTIF([.AQ$15:.AQ$22];&quot;=&quot; &amp;[.$C40])" office:value-type="float" office:value="0" calcext:value-type="float">
            <text:p>0</text:p>
          </table:table-cell>
          <table:table-cell table:formula="of:=COUNTIF([.AR$15:.AR$22];&quot;=&quot; &amp;[.$C40])" office:value-type="float" office:value="0" calcext:value-type="float">
            <text:p>0</text:p>
          </table:table-cell>
          <table:table-cell table:formula="of:=COUNTIF([.AS$15:.AS$22];&quot;=&quot; &amp;[.$C40])" office:value-type="float" office:value="0" calcext:value-type="float">
            <text:p>0</text:p>
          </table:table-cell>
          <table:table-cell table:formula="of:=COUNTIF([.AT$15:.AT$22];&quot;=&quot; &amp;[.$C40])" office:value-type="float" office:value="0" calcext:value-type="float">
            <text:p>0</text:p>
          </table:table-cell>
          <table:table-cell table:formula="of:=COUNTIF([.AU$15:.AU$22];&quot;=&quot; &amp;[.$C40])" office:value-type="float" office:value="0" calcext:value-type="float">
            <text:p>0</text:p>
          </table:table-cell>
          <table:table-cell table:formula="of:=COUNTIF([.AV$15:.AV$22];&quot;=&quot; &amp;[.$C40])" office:value-type="float" office:value="0" calcext:value-type="float">
            <text:p>0</text:p>
          </table:table-cell>
          <table:table-cell table:formula="of:=COUNTIF([.AW$15:.AW$22];&quot;=&quot; &amp;[.$C40])" office:value-type="float" office:value="0" calcext:value-type="float">
            <text:p>0</text:p>
          </table:table-cell>
          <table:table-cell table:formula="of:=COUNTIF([.AX$15:.AX$22];&quot;=&quot; &amp;[.$C40])" office:value-type="float" office:value="0" calcext:value-type="float">
            <text:p>0</text:p>
          </table:table-cell>
          <table:table-cell table:formula="of:=COUNTIF([.AY$15:.AY$22];&quot;=&quot; &amp;[.$C40])" office:value-type="float" office:value="0" calcext:value-type="float">
            <text:p>0</text:p>
          </table:table-cell>
          <table:table-cell/>
          <table:table-cell table:formula="of:=[.BA39]+0.002" office:value-type="float" office:value="0.05" calcext:value-type="float">
            <text:p>0.05</text:p>
          </table:table-cell>
          <table:table-cell table:formula="of:=[.BA40]*[.$D$6]" office:value-type="float" office:value="2.51327412287184" calcext:value-type="float">
            <text:p>2.513</text:p>
          </table:table-cell>
          <table:table-cell table:formula="of:=[.D$25]*[.$Z$5]*MAGNET([.D$24]+[.BB40])+[.E$25]*[.$Z$5]*MAGNET([.E$24]+[.BB40])+[.F$25]*[.$Z$5]*MAGNET([.F$24]+[.BB40])+[.G$25]*[.$Z$5]*MAGNET([.G$24]+[.BB40])+[.H$25]*[.$Z$5]*MAGNET([.H$24]+[.BB40])+[.I$25]*[.$Z$5]*MAGNET([.I$24]+[.BB40])+[.J$25]*[.$Z$5]*MAGNET([.J$24]+[.BB40])+[.K$25]*[.$Z$5]*MAGNET([.K$24]+[.BB40])+[.L$25]*[.$Z$5]*MAGNET([.L$24]+[.BB40])+[.M$25]*[.$Z$5]*MAGNET([.M$24]+[.BB40])+[.N$25]*[.$Z$5]*MAGNET([.N$24]+[.BB40])+[.O$25]*[.$Z$5]*MAGNET([.O$24]+[.BB40])+[.P$25]*[.$Z$5]*MAGNET([.P$24]+[.BB40])+[.Q$25]*[.$Z$5]*MAGNET([.Q$24]+[.BB40])+[.R$25]*[.$Z$5]*MAGNET([.R$24]+[.BB40])+[.S$25]*[.$Z$5]*MAGNET([.S$24]+[.BB40])+[.T$25]*[.$Z$5]*MAGNET([.T$24]+[.BB40])+[.U$25]*[.$Z$5]*MAGNET([.U$24]+[.BB40])+[.V$25]*[.$Z$5]*MAGNET([.V$24]+[.BB40])+[.W$25]*[.$Z$5]*MAGNET([.W$24]+[.BB40])+[.X$25]*[.$Z$5]*MAGNET([.X$24]+[.BB40])+[.Y$25]*[.$Z$5]*MAGNET([.Y$24]+[.BB40])+[.Z$25]*[.$Z$5]*MAGNET([.Z$24]+[.BB40])+[.AA$25]*[.$Z$5]*MAGNET([.AA$24]+[.BB40])+[.AB$25]*[.$Z$5]*MAGNET([.AB$24]+[.BB40])+[.AC$25]*[.$Z$5]*MAGNET([.AC$24]+[.BB40])+[.AD$25]*[.$Z$5]*MAGNET([.AD$24]+[.BB40])+[.AE$25]*[.$Z$5]*MAGNET([.AE$24]+[.BB40])+[.AF$25]*[.$Z$5]*MAGNET([.AF$24]+[.BB40])+[.AG$25]*[.$Z$5]*MAGNET([.AG$24]+[.BB40])+[.AH$25]*[.$Z$5]*MAGNET([.AH$24]+[.BB40]) +[.AI$25]*[.$Z$5]*MAGNET([.AI$24]+[.BB40]) +[.AJ$25]*[.$Z$5]*MAGNET([.AJ$24]+[.BB40]) +[.AK$25]*[.$Z$5]*MAGNET([.AK$24]+[.BB40]) +[.AL$25]*[.$Z$5]*MAGNET([.AL$24]+[.BB40]) +[.AM$25]*[.$Z$5]*MAGNET([.AM$24]+[.BB40]) +[.AN$25]*[.$Z$5]*MAGNET([.AN$24]+[.BB40]) +[.AO$25]*[.$Z$5]*MAGNET([.AO$24]+[.BB40])+RAND()*[.$BC$13]+[.AP$25]*[.$Z$5]*MAGNET([.AP$24]+[.BB40])&#10;+[.AQ$25]*[.$Z$5]*MAGNET([.AQ$24]+[.BB40])&#10;+[.AR$25]*[.$Z$5]*MAGNET([.AR$24]+[.BB40])&#10;+[.AS$25]*[.$Z$5]*MAGNET([.AS$24]+[.BB40])&#10;+[.AT$25]*[.$Z$5]*MAGNET([.AT$24]+[.BB40])&#10;+[.AU$25]*[.$Z$5]*MAGNET([.AU$24]+[.BB40])&#10;+[.AV$25]*[.$Z$5]*MAGNET([.AV$24]+[.BB40])&#10;+[.AW$25]*[.$Z$5]*MAGNET([.AW$24]+[.BB40])&#10;+[.AX$25]*[.$Z$5]*MAGNET([.AX$24]+[.BB40])&#10;+[.AY$25]*[.$Z$5]*MAGNET([.AY$24]+[.BB40])" office:value-type="float" office:value="104.826325778585" calcext:value-type="float">
            <text:p>104.83</text:p>
          </table:table-cell>
          <table:table-cell table:style-name="ce70" table:formula="of:=[.E$26]*[.$Z$5]*MAGNET([.E$24]+[.$BB40])+[.F$26]*[.$Z$5]*MAGNET([.F$24]+[.$BB40])+[.G$26]*[.$Z$5]*MAGNET([.G$24]+[.$BB40])+[.H$26]*[.$Z$5]*MAGNET([.H$24]+[.$BB40])+[.I$26]*[.$Z$5]*MAGNET([.I$24]+[.$BB40])+[.J$26]*[.$Z$5]*MAGNET([.J$24]+[.$BB40])+[.K$26]*[.$Z$5]*MAGNET([.K$24]+[.$BB40])+[.L$26]*[.$Z$5]*MAGNET([.L$24]+[.$BB40])+[.M$26]*[.$Z$5]*MAGNET([.M$24]+[.$BB40])+[.N$26]*[.$Z$5]*MAGNET([.N$24]+[.$BB40])+[.O$26]*[.$Z$5]*MAGNET([.O$24]+[.$BB40])+[.P$26]*[.$Z$5]*MAGNET([.P$24]+[.$BB40])+[.Q$26]*[.$Z$5]*MAGNET([.Q$24]+[.$BB40])+[.R$26]*[.$Z$5]*MAGNET([.R$24]+[.$BB40])+[.S$26]*[.$Z$5]*MAGNET([.S$24]+[.$BB40])+[.T$26]*[.$Z$5]*MAGNET([.T$24]+[.$BB40])+[.U$26]*[.$Z$5]*MAGNET([.U$24]+[.$BB40])+[.V$26]*[.$Z$5]*MAGNET([.V$24]+[.$BB40])+[.W$26]*[.$Z$5]*MAGNET([.W$24]+[.$BB40])+[.X$26]*[.$Z$5]*MAGNET([.X$24]+[.$BB40])+[.Y$26]*[.$Z$5]*MAGNET([.Y$24]+[.$BB40])+[.Z$26]*[.$Z$5]*MAGNET([.Z$24]+[.$BB40])+[.AA$26]*[.$Z$5]*MAGNET([.AA$24]+[.$BB40])+[.AB$26]*[.$Z$5]*MAGNET([.AB$24]+[.$BB40])+[.AC$26]*[.$Z$5]*MAGNET([.AC$24]+[.$BB40])+[.AD$26]*[.$Z$5]*MAGNET([.AD$24]+[.$BB40])+[.AE$26]*[.$Z$5]*MAGNET([.AE$24]+[.$BB40])+[.AF$26]*[.$Z$5]*MAGNET([.AF$24]+[.$BB40])+[.AG$26]*[.$Z$5]*MAGNET([.AG$24]+[.$BB40])+[.D$26]*[.$Z$5]*MAGNET([.D$24]+[.$BB40])+[.AH$26]*[.$Z$5]*MAGNET([.AH$24]+[.BB40]) +[.AI$26]*[.$Z$5]*MAGNET([.AI$24]+[.BB40]) +[.AJ$26]*[.$Z$5]*MAGNET([.AJ$24]+[.BB40]) +[.AK$26]*[.$Z$5]*MAGNET([.AK$24]+[.BB40]) +[.AL$26]*[.$Z$5]*MAGNET([.AL$24]+[.BB40]) +[.AM$26]*[.$Z$5]*MAGNET([.AM$24]+[.BB40]) +[.AN$26]*[.$Z$5]*MAGNET([.AN$24]+[.BB40]) +[.AO$26]*[.$Z$5]*MAGNET([.AO$24]+[.BB40]) +[.AP$26]*[.$Z$5]*MAGNET([.AP$24]+[.$BB40])&#10;+[.AQ$26]*[.$Z$5]*MAGNET([.AQ$24]+[.$BB40])&#10;+[.AR$26]*[.$Z$5]*MAGNET([.AR$24]+[.$BB40])&#10;+[.AS$26]*[.$Z$5]*MAGNET([.AS$24]+[.$BB40])&#10;+[.AT$26]*[.$Z$5]*MAGNET([.AT$24]+[.$BB40])&#10;+[.AU$26]*[.$Z$5]*MAGNET([.AU$24]+[.$BB40])&#10;+[.AV$26]*[.$Z$5]*MAGNET([.AV$24]+[.$BB40])&#10;+[.AW$26]*[.$Z$5]*MAGNET([.AW$24]+[.$BB40])&#10;+[.AX$26]*[.$Z$5]*MAGNET([.AX$24]+[.$BB40])&#10;+[.AY$26]*[.$Z$5]*MAGNET([.AY$24]+[.$BB40]) +RAND()*[.$BD$13]" office:value-type="float" office:value="-80.7505259362561" calcext:value-type="float">
            <text:p>-80.75</text:p>
          </table:table-cell>
          <table:table-cell table:style-name="ce71" table:formula="of:=[.E$27]*[.$Z$5]*MAGNET([.E$24]+[.$BB40])+[.F$27]*[.$Z$5]*MAGNET([.F$24]+[.$BB40])+[.G$27]*[.$Z$5]*MAGNET([.G$24]+[.$BB40])+[.H$27]*[.$Z$5]*MAGNET([.H$24]+[.$BB40])+[.I$27]*[.$Z$5]*MAGNET([.I$24]+[.$BB40])+[.J$27]*[.$Z$5]*MAGNET([.J$24]+[.$BB40])+[.K$27]*[.$Z$5]*MAGNET([.K$24]+[.$BB40])+[.L$27]*[.$Z$5]*MAGNET([.L$24]+[.$BB40])+[.M$27]*[.$Z$5]*MAGNET([.M$24]+[.$BB40])+[.N$27]*[.$Z$5]*MAGNET([.N$24]+[.$BB40])+[.O$27]*[.$Z$5]*MAGNET([.O$24]+[.$BB40])+[.P$27]*[.$Z$5]*MAGNET([.P$24]+[.$BB40])+[.Q$27]*[.$Z$5]*MAGNET([.Q$24]+[.$BB40])+[.R$27]*[.$Z$5]*MAGNET([.R$24]+[.$BB40])+[.S$27]*[.$Z$5]*MAGNET([.S$24]+[.$BB40])+[.T$27]*[.$Z$5]*MAGNET([.T$24]+[.$BB40])+[.U$27]*[.$Z$5]*MAGNET([.U$24]+[.$BB40])+[.V$27]*[.$Z$5]*MAGNET([.V$24]+[.$BB40])+[.W$27]*[.$Z$5]*MAGNET([.W$24]+[.$BB40])+[.X$27]*[.$Z$5]*MAGNET([.X$24]+[.$BB40])+[.Y$27]*[.$Z$5]*MAGNET([.Y$24]+[.$BB40])+[.Z$27]*[.$Z$5]*MAGNET([.Z$24]+[.$BB40])+[.AA$27]*[.$Z$5]*MAGNET([.AA$24]+[.$BB40])+[.AB$27]*[.$Z$5]*MAGNET([.AB$24]+[.$BB40])+[.AC$27]*[.$Z$5]*MAGNET([.AC$24]+[.$BB40])+[.AD$27]*[.$Z$5]*MAGNET([.AD$24]+[.$BB40])+[.AE$27]*[.$Z$5]*MAGNET([.AE$24]+[.$BB40])+[.AF$27]*[.$Z$5]*MAGNET([.AF$24]+[.$BB40])+[.AG$27]*[.$Z$5]*MAGNET([.AG$24]+[.$BB40])+[.D$27]*[.$Z$5]*MAGNET([.D$24]+[.$BB40])+[.AH$27]*[.$Z$5]*MAGNET([.AH$24]+[.BB40]) +[.AI$27]*[.$Z$5]*MAGNET([.AI$24]+[.BB40]) +[.AJ$27]*[.$Z$5]*MAGNET([.AJ$24]+[.BB40]) +[.AK$27]*[.$Z$5]*MAGNET([.AK$24]+[.BB40]) +[.AL$27]*[.$Z$5]*MAGNET([.AL$24]+[.BB40]) +[.AM$27]*[.$Z$5]*MAGNET([.AM$24]+[.BB40]) +[.AN$27]*[.$Z$5]*MAGNET([.AN$24]+[.BB40]) +[.AO$27]*[.$Z$5]*MAGNET([.AO$24]+[.BB40]) +[.AP$27]*[.$Z$5]*MAGNET([.AP$24]+[.$BB40])&#10;+[.AQ$27]*[.$Z$5]*MAGNET([.AQ$24]+[.$BB40])&#10;+[.AR$27]*[.$Z$5]*MAGNET([.AR$24]+[.$BB40])&#10;+[.AS$27]*[.$Z$5]*MAGNET([.AS$24]+[.$BB40])&#10;+[.AT$27]*[.$Z$5]*MAGNET([.AT$24]+[.$BB40])&#10;+[.AU$27]*[.$Z$5]*MAGNET([.AU$24]+[.$BB40])&#10;+[.AV$27]*[.$Z$5]*MAGNET([.AV$24]+[.$BB40])&#10;+[.AW$27]*[.$Z$5]*MAGNET([.AW$24]+[.$BB40])&#10;+[.AX$27]*[.$Z$5]*MAGNET([.AX$24]+[.$BB40])&#10;+[.AY$27]*[.$Z$5]*MAGNET([.AY$24]+[.$BB40]) +RAND()*[.$BE$13]" office:value-type="float" office:value="-6.59419246006816" calcext:value-type="float">
            <text:p>-6.59419246006816</text:p>
          </table:table-cell>
          <table:table-cell table:style-name="ce71" table:formula="of:=[.E$28]*[.$Z$5]*MAGNET([.E$24]+[.$BB40])+[.F$28]*[.$Z$5]*MAGNET([.F$24]+[.$BB40])+[.G$28]*[.$Z$5]*MAGNET([.G$24]+[.$BB40])+[.H$28]*[.$Z$5]*MAGNET([.H$24]+[.$BB40])+[.I$28]*[.$Z$5]*MAGNET([.I$24]+[.$BB40])+[.J$28]*[.$Z$5]*MAGNET([.J$24]+[.$BB40])+[.K$28]*[.$Z$5]*MAGNET([.K$24]+[.$BB40])+[.L$28]*[.$Z$5]*MAGNET([.L$24]+[.$BB40])+[.M$28]*[.$Z$5]*MAGNET([.M$24]+[.$BB40])+[.N$28]*[.$Z$5]*MAGNET([.N$24]+[.$BB40])+[.O$28]*[.$Z$5]*MAGNET([.O$24]+[.$BB40])+[.P$28]*[.$Z$5]*MAGNET([.P$24]+[.$BB40])+[.Q$28]*[.$Z$5]*MAGNET([.Q$24]+[.$BB40])+[.R$28]*[.$Z$5]*MAGNET([.R$24]+[.$BB40])+[.S$28]*[.$Z$5]*MAGNET([.S$24]+[.$BB40])+[.T$28]*[.$Z$5]*MAGNET([.T$24]+[.$BB40])+[.U$28]*[.$Z$5]*MAGNET([.U$24]+[.$BB40])+[.V$28]*[.$Z$5]*MAGNET([.V$24]+[.$BB40])+[.W$28]*[.$Z$5]*MAGNET([.W$24]+[.$BB40])+[.X$28]*[.$Z$5]*MAGNET([.X$24]+[.$BB40])+[.Y$28]*[.$Z$5]*MAGNET([.Y$24]+[.$BB40])+[.Z$28]*[.$Z$5]*MAGNET([.Z$24]+[.$BB40])+[.AA$28]*[.$Z$5]*MAGNET([.AA$24]+[.$BB40])+[.AB$28]*[.$Z$5]*MAGNET([.AB$24]+[.$BB40])+[.AC$28]*[.$Z$5]*MAGNET([.AC$24]+[.$BB40])+[.AD$28]*[.$Z$5]*MAGNET([.AD$24]+[.$BB40])+[.AE$28]*[.$Z$5]*MAGNET([.AE$24]+[.$BB40])+[.AF$28]*[.$Z$5]*MAGNET([.AF$24]+[.$BB40])+[.AG$28]*[.$Z$5]*MAGNET([.AG$24]+[.$BB40])+[.D$28]*[.$Z$5]*MAGNET([.D$24]+[.$BB40])+[.AH$28]*[.$Z$5]*MAGNET([.AH$24]+[.BB40]) +[.AI$28]*[.$Z$5]*MAGNET([.AI$24]+[.BB40]) +[.AJ$28]*[.$Z$5]*MAGNET([.AJ$24]+[.BB40]) +[.AK$28]*[.$Z$5]*MAGNET([.AK$24]+[.BB40]) +[.AL$28]*[.$Z$5]*MAGNET([.AL$24]+[.BB40]) +[.AM$28]*[.$Z$5]*MAGNET([.AM$24]+[.BB40]) +[.AN$28]*[.$Z$5]*MAGNET([.AN$24]+[.BB40]) +[.AO$28]*[.$Z$5]*MAGNET([.AO$24]+[.BB40]) +[.AP$28]*[.$Z$5]*MAGNET([.AP$24]+[.$BB40])&#10;+[.AQ$28]*[.$Z$5]*MAGNET([.AQ$24]+[.$BB40])&#10;+[.AR$28]*[.$Z$5]*MAGNET([.AR$24]+[.$BB40])&#10;+[.AS$28]*[.$Z$5]*MAGNET([.AS$24]+[.$BB40])&#10;+[.AT$28]*[.$Z$5]*MAGNET([.AT$24]+[.$BB40])&#10;+[.AU$28]*[.$Z$5]*MAGNET([.AU$24]+[.$BB40])&#10;+[.AV$28]*[.$Z$5]*MAGNET([.AV$24]+[.$BB40])&#10;+[.AW$28]*[.$Z$5]*MAGNET([.AW$24]+[.$BB40])&#10;+[.AX$28]*[.$Z$5]*MAGNET([.AX$24]+[.$BB40])&#10;+[.AY$28]*[.$Z$5]*MAGNET([.AY$24]+[.$BB40]) +RAND()*[.$BF$13]" office:value-type="float" office:value="0.110718424516972" calcext:value-type="float">
            <text:p>0.110718424516972</text:p>
          </table:table-cell>
          <table:table-cell table:style-name="ce71" table:formula="of:=[.E$29]*[.$Z$5]*MAGNET([.E$24]+[.$BB40])+[.F$29]*[.$Z$5]*MAGNET([.F$24]+[.$BB40])+[.G$29]*[.$Z$5]*MAGNET([.G$24]+[.$BB40])+[.H$29]*[.$Z$5]*MAGNET([.H$24]+[.$BB40])+[.I$29]*[.$Z$5]*MAGNET([.I$24]+[.$BB40])+[.J$29]*[.$Z$5]*MAGNET([.J$24]+[.$BB40])+[.K$29]*[.$Z$5]*MAGNET([.K$24]+[.$BB40])+[.L$29]*[.$Z$5]*MAGNET([.L$24]+[.$BB40])+[.M$29]*[.$Z$5]*MAGNET([.M$24]+[.$BB40])+[.N$29]*[.$Z$5]*MAGNET([.N$24]+[.$BB40])+[.O$29]*[.$Z$5]*MAGNET([.O$24]+[.$BB40])+[.P$29]*[.$Z$5]*MAGNET([.P$24]+[.$BB40])+[.Q$29]*[.$Z$5]*MAGNET([.Q$24]+[.$BB40])+[.R$29]*[.$Z$5]*MAGNET([.R$24]+[.$BB40])+[.S$29]*[.$Z$5]*MAGNET([.S$24]+[.$BB40])+[.T$29]*[.$Z$5]*MAGNET([.T$24]+[.$BB40])+[.U$29]*[.$Z$5]*MAGNET([.U$24]+[.$BB40])+[.V$29]*[.$Z$5]*MAGNET([.V$24]+[.$BB40])+[.W$29]*[.$Z$5]*MAGNET([.W$24]+[.$BB40])+[.X$29]*[.$Z$5]*MAGNET([.X$24]+[.$BB40])+[.Y$29]*[.$Z$5]*MAGNET([.Y$24]+[.$BB40])+[.Z$29]*[.$Z$5]*MAGNET([.Z$24]+[.$BB40])+[.AA$29]*[.$Z$5]*MAGNET([.AA$24]+[.$BB40])+[.AB$29]*[.$Z$5]*MAGNET([.AB$24]+[.$BB40])+[.AC$29]*[.$Z$5]*MAGNET([.AC$24]+[.$BB40])+[.AD$29]*[.$Z$5]*MAGNET([.AD$24]+[.$BB40])+[.AE$29]*[.$Z$5]*MAGNET([.AE$24]+[.$BB40])+[.AF$29]*[.$Z$5]*MAGNET([.AF$24]+[.$BB40])+[.AG$29]*[.$Z$5]*MAGNET([.AG$24]+[.$BB40])+[.D$29]*[.$Z$5]*MAGNET([.D$24]+[.$BB40])+[.AH$29]*[.$Z$5]*MAGNET([.AH$24]+[.BB40]) +[.AI$29]*[.$Z$5]*MAGNET([.AI$24]+[.BB40]) +[.AJ$29]*[.$Z$5]*MAGNET([.AJ$24]+[.BB40]) +[.AK$29]*[.$Z$5]*MAGNET([.AK$24]+[.BB40]) +[.AL$29]*[.$Z$5]*MAGNET([.AL$24]+[.BB40]) +[.AM$29]*[.$Z$5]*MAGNET([.AM$24]+[.BB40]) +[.AN$29]*[.$Z$5]*MAGNET([.AN$24]+[.BB40]) +[.AO$29]*[.$Z$5]*MAGNET([.AO$24]+[.BB40]) +[.AP$29]*[.$Z$5]*MAGNET([.AP$24]+[.$BB40])&#10;+[.AQ$29]*[.$Z$5]*MAGNET([.AQ$24]+[.$BB40])&#10;+[.AR$29]*[.$Z$5]*MAGNET([.AR$24]+[.$BB40])&#10;+[.AS$29]*[.$Z$5]*MAGNET([.AS$24]+[.$BB40])&#10;+[.AT$29]*[.$Z$5]*MAGNET([.AT$24]+[.$BB40])&#10;+[.AU$29]*[.$Z$5]*MAGNET([.AU$24]+[.$BB40])&#10;+[.AV$29]*[.$Z$5]*MAGNET([.AV$24]+[.$BB40])&#10;+[.AW$29]*[.$Z$5]*MAGNET([.AW$24]+[.$BB40])&#10;+[.AX$29]*[.$Z$5]*MAGNET([.AX$24]+[.$BB40])&#10;+[.AY$29]*[.$Z$5]*MAGNET([.AY$24]+[.$BB40]) +RAND()*[.$BG$13]" office:value-type="float" office:value="2.55888530614476" calcext:value-type="float">
            <text:p>2.55888530614476</text:p>
          </table:table-cell>
          <table:table-cell table:style-name="ce71" table:formula="of:=[.E$30]*[.$Z$5]*MAGNET([.E$24]+[.$BB40])+[.F$30]*[.$Z$5]*MAGNET([.F$24]+[.$BB40])+[.G$30]*[.$Z$5]*MAGNET([.G$24]+[.$BB40])+[.H$30]*[.$Z$5]*MAGNET([.H$24]+[.$BB40])+[.I$30]*[.$Z$5]*MAGNET([.I$24]+[.$BB40])+[.J$30]*[.$Z$5]*MAGNET([.J$24]+[.$BB40])+[.K$30]*[.$Z$5]*MAGNET([.K$24]+[.$BB40])+[.L$30]*[.$Z$5]*MAGNET([.L$24]+[.$BB40])+[.M$30]*[.$Z$5]*MAGNET([.M$24]+[.$BB40])+[.N$30]*[.$Z$5]*MAGNET([.N$24]+[.$BB40])+[.O$30]*[.$Z$5]*MAGNET([.O$24]+[.$BB40])+[.P$30]*[.$Z$5]*MAGNET([.P$24]+[.$BB40])+[.Q$30]*[.$Z$5]*MAGNET([.Q$24]+[.$BB40])+[.R$30]*[.$Z$5]*MAGNET([.R$24]+[.$BB40])+[.S$30]*[.$Z$5]*MAGNET([.S$24]+[.$BB40])+[.T$30]*[.$Z$5]*MAGNET([.T$24]+[.$BB40])+[.U$30]*[.$Z$5]*MAGNET([.U$24]+[.$BB40])+[.V$30]*[.$Z$5]*MAGNET([.V$24]+[.$BB40])+[.W$30]*[.$Z$5]*MAGNET([.W$24]+[.$BB40])+[.X$30]*[.$Z$5]*MAGNET([.X$24]+[.$BB40])+[.Y$30]*[.$Z$5]*MAGNET([.Y$24]+[.$BB40])+[.Z$30]*[.$Z$5]*MAGNET([.Z$24]+[.$BB40])+[.AA$30]*[.$Z$5]*MAGNET([.AA$24]+[.$BB40])+[.AB$30]*[.$Z$5]*MAGNET([.AB$24]+[.$BB40])+[.AC$30]*[.$Z$5]*MAGNET([.AC$24]+[.$BB40])+[.AD$30]*[.$Z$5]*MAGNET([.AD$24]+[.$BB40])+[.AE$30]*[.$Z$5]*MAGNET([.AE$24]+[.$BB40])+[.AF$30]*[.$Z$5]*MAGNET([.AF$24]+[.$BB40])+[.AG$30]*[.$Z$5]*MAGNET([.AG$24]+[.$BB40])+[.D$30]*[.$Z$5]*MAGNET([.D$24]+[.$BB40])+[.AH$30]*[.$Z$5]*MAGNET([.AH$24]+[.BB40]) +[.AI$30]*[.$Z$5]*MAGNET([.AI$24]+[.BB40]) +[.AJ$30]*[.$Z$5]*MAGNET([.AJ$24]+[.BB40]) +[.AK$30]*[.$Z$5]*MAGNET([.AK$24]+[.BB40]) +[.AL$30]*[.$Z$5]*MAGNET([.AL$24]+[.BB40]) +[.AM$30]*[.$Z$5]*MAGNET([.AM$24]+[.BB40]) +[.AN$30]*[.$Z$5]*MAGNET([.AN$24]+[.BB40]) +[.AO$30]*[.$Z$5]*MAGNET([.AO$24]+[.BB40]) +[.AP$30]*[.$Z$5]*MAGNET([.AP$24]+[.$BB40])&#10;+[.AQ$30]*[.$Z$5]*MAGNET([.AQ$24]+[.$BB40])&#10;+[.AR$30]*[.$Z$5]*MAGNET([.AR$24]+[.$BB40])&#10;+[.AS$30]*[.$Z$5]*MAGNET([.AS$24]+[.$BB40])&#10;+[.AT$30]*[.$Z$5]*MAGNET([.AT$24]+[.$BB40])&#10;+[.AU$30]*[.$Z$5]*MAGNET([.AU$24]+[.$BB40])&#10;+[.AV$30]*[.$Z$5]*MAGNET([.AV$24]+[.$BB40])&#10;+[.AW$30]*[.$Z$5]*MAGNET([.AW$24]+[.$BB40])&#10;+[.AX$30]*[.$Z$5]*MAGNET([.AX$24]+[.$BB40])&#10;+[.AY$30]*[.$Z$5]*MAGNET([.AY$24]+[.$BB40]) +RAND()*[.$BH$13]" office:value-type="float" office:value="0" calcext:value-type="float">
            <text:p>0</text:p>
          </table:table-cell>
          <table:table-cell table:style-name="ce71" table:formula="of:=[.E$31]*[.$Z$5]*MAGNET([.E$24]+[.$BB40])+[.F$31]*[.$Z$5]*MAGNET([.F$24]+[.$BB40])+[.G$31]*[.$Z$5]*MAGNET([.G$24]+[.$BB40])+[.H$31]*[.$Z$5]*MAGNET([.H$24]+[.$BB40])+[.I$31]*[.$Z$5]*MAGNET([.I$24]+[.$BB40])+[.J$31]*[.$Z$5]*MAGNET([.J$24]+[.$BB40])+[.K$31]*[.$Z$5]*MAGNET([.K$24]+[.$BB40])+[.L$31]*[.$Z$5]*MAGNET([.L$24]+[.$BB40])+[.M$31]*[.$Z$5]*MAGNET([.M$24]+[.$BB40])+[.N$31]*[.$Z$5]*MAGNET([.N$24]+[.$BB40])+[.O$31]*[.$Z$5]*MAGNET([.O$24]+[.$BB40])+[.P$31]*[.$Z$5]*MAGNET([.P$24]+[.$BB40])+[.Q$31]*[.$Z$5]*MAGNET([.Q$24]+[.$BB40])+[.R$31]*[.$Z$5]*MAGNET([.R$24]+[.$BB40])+[.S$31]*[.$Z$5]*MAGNET([.S$24]+[.$BB40])+[.T$31]*[.$Z$5]*MAGNET([.T$24]+[.$BB40])+[.U$31]*[.$Z$5]*MAGNET([.U$24]+[.$BB40])+[.V$31]*[.$Z$5]*MAGNET([.V$24]+[.$BB40])+[.W$31]*[.$Z$5]*MAGNET([.W$24]+[.$BB40])+[.X$31]*[.$Z$5]*MAGNET([.X$24]+[.$BB40])+[.Y$31]*[.$Z$5]*MAGNET([.Y$24]+[.$BB40])+[.Z$31]*[.$Z$5]*MAGNET([.Z$24]+[.$BB40])+[.AA$31]*[.$Z$5]*MAGNET([.AA$24]+[.$BB40])+[.AB$31]*[.$Z$5]*MAGNET([.AB$24]+[.$BB40])+[.AC$31]*[.$Z$5]*MAGNET([.AC$24]+[.$BB40])+[.AD$31]*[.$Z$5]*MAGNET([.AD$24]+[.$BB40])+[.AE$31]*[.$Z$5]*MAGNET([.AE$24]+[.$BB40])+[.AF$31]*[.$Z$5]*MAGNET([.AF$24]+[.$BB40])+[.AG$31]*[.$Z$5]*MAGNET([.AG$24]+[.$BB40])+[.D$31]*[.$Z$5]*MAGNET([.D$24]+[.$BB40])+[.AH$31]*[.$Z$5]*MAGNET([.AH$24]+[.BB40]) +[.AI$31]*[.$Z$5]*MAGNET([.AI$24]+[.BB40]) +[.AJ$31]*[.$Z$5]*MAGNET([.AJ$24]+[.BB40]) +[.AK$31]*[.$Z$5]*MAGNET([.AK$24]+[.BB40]) +[.AL$31]*[.$Z$5]*MAGNET([.AL$24]+[.BB40]) +[.AM$31]*[.$Z$5]*MAGNET([.AM$24]+[.BB40]) +[.AN$31]*[.$Z$5]*MAGNET([.AN$24]+[.BB40]) +[.AO$31]*[.$Z$5]*MAGNET([.AO$24]+[.BB40]) +[.AP$31]*[.$Z$5]*MAGNET([.AP$24]+[.$BB40])&#10;+[.AQ$31]*[.$Z$5]*MAGNET([.AQ$24]+[.$BB40])&#10;+[.AR$31]*[.$Z$5]*MAGNET([.AR$24]+[.$BB40])&#10;+[.AS$31]*[.$Z$5]*MAGNET([.AS$24]+[.$BB40])&#10;+[.AT$31]*[.$Z$5]*MAGNET([.AT$24]+[.$BB40])&#10;+[.AU$31]*[.$Z$5]*MAGNET([.AU$24]+[.$BB40])&#10;+[.AV$31]*[.$Z$5]*MAGNET([.AV$24]+[.$BB40])&#10;+[.AW$31]*[.$Z$5]*MAGNET([.AW$24]+[.$BB40])&#10;+[.AX$31]*[.$Z$5]*MAGNET([.AX$24]+[.$BB40])&#10;+[.AY$31]*[.$Z$5]*MAGNET([.AY$24]+[.$BB40]) +RAND()*[.$BI$13]" office:value-type="float" office:value="0" calcext:value-type="float">
            <text:p>0</text:p>
          </table:table-cell>
          <table:table-cell table:style-name="ce71" table:formula="of:=[.E$32]*[.$Z$5]*MAGNET([.E$24]+[.$BB40])+[.F$32]*[.$Z$5]*MAGNET([.F$24]+[.$BB40])+[.G$32]*[.$Z$5]*MAGNET([.G$24]+[.$BB40])+[.H$32]*[.$Z$5]*MAGNET([.H$24]+[.$BB40])+[.I$32]*[.$Z$5]*MAGNET([.I$24]+[.$BB40])+[.J$32]*[.$Z$5]*MAGNET([.J$24]+[.$BB40])+[.K$32]*[.$Z$5]*MAGNET([.K$24]+[.$BB40])+[.L$32]*[.$Z$5]*MAGNET([.L$24]+[.$BB40])+[.M$32]*[.$Z$5]*MAGNET([.M$24]+[.$BB40])+[.N$32]*[.$Z$5]*MAGNET([.N$24]+[.$BB40])+[.O$32]*[.$Z$5]*MAGNET([.O$24]+[.$BB40])+[.P$32]*[.$Z$5]*MAGNET([.P$24]+[.$BB40])+[.Q$32]*[.$Z$5]*MAGNET([.Q$24]+[.$BB40])+[.R$32]*[.$Z$5]*MAGNET([.R$24]+[.$BB40])+[.S$32]*[.$Z$5]*MAGNET([.S$24]+[.$BB40])+[.T$32]*[.$Z$5]*MAGNET([.T$24]+[.$BB40])+[.U$32]*[.$Z$5]*MAGNET([.U$24]+[.$BB40])+[.V$32]*[.$Z$5]*MAGNET([.V$24]+[.$BB40])+[.W$32]*[.$Z$5]*MAGNET([.W$24]+[.$BB40])+[.X$32]*[.$Z$5]*MAGNET([.X$24]+[.$BB40])+[.Y$32]*[.$Z$5]*MAGNET([.Y$24]+[.$BB40])+[.Z$32]*[.$Z$5]*MAGNET([.Z$24]+[.$BB40])+[.AA$32]*[.$Z$5]*MAGNET([.AA$24]+[.$BB40])+[.AB$32]*[.$Z$5]*MAGNET([.AB$24]+[.$BB40])+[.AC$32]*[.$Z$5]*MAGNET([.AC$24]+[.$BB40])+[.AD$32]*[.$Z$5]*MAGNET([.AD$24]+[.$BB40])+[.AE$32]*[.$Z$5]*MAGNET([.AE$24]+[.$BB40])+[.AF$32]*[.$Z$5]*MAGNET([.AF$24]+[.$BB40])+[.AG$32]*[.$Z$5]*MAGNET([.AG$24]+[.$BB40])+[.D$32]*[.$Z$5]*MAGNET([.D$24]+[.$BB40])+[.AH$32]*[.$Z$5]*MAGNET([.AH$24]+[.BB40]) +[.AI$32]*[.$Z$5]*MAGNET([.AI$24]+[.BB40]) +[.AJ$32]*[.$Z$5]*MAGNET([.AJ$24]+[.BB40]) +[.AK$32]*[.$Z$5]*MAGNET([.AK$24]+[.BB40]) +[.AL$32]*[.$Z$5]*MAGNET([.AL$24]+[.BB40]) +[.AM$32]*[.$Z$5]*MAGNET([.AM$24]+[.BB40]) +[.AN$32]*[.$Z$5]*MAGNET([.AN$24]+[.BB40]) +[.AO$32]*[.$Z$5]*MAGNET([.AO$24]+[.BB40]) +[.AP$32]*[.$Z$5]*MAGNET([.AP$24]+[.$BB40])&#10;+[.AQ$32]*[.$Z$5]*MAGNET([.AQ$24]+[.$BB40])&#10;+[.AR$32]*[.$Z$5]*MAGNET([.AR$24]+[.$BB40])&#10;+[.AS$32]*[.$Z$5]*MAGNET([.AS$24]+[.$BB40])&#10;+[.AT$32]*[.$Z$5]*MAGNET([.AT$24]+[.$BB40])&#10;+[.AU$32]*[.$Z$5]*MAGNET([.AU$24]+[.$BB40])&#10;+[.AV$32]*[.$Z$5]*MAGNET([.AV$24]+[.$BB40])&#10;+[.AW$32]*[.$Z$5]*MAGNET([.AW$24]+[.$BB40])&#10;+[.AX$32]*[.$Z$5]*MAGNET([.AX$24]+[.$BB40])&#10;+[.AY$32]*[.$Z$5]*MAGNET([.AY$24]+[.$BB4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formula="of:=COUNTIF([.D$15:.D$22];&quot;=&quot; &amp;[.$C41])" office:value-type="float" office:value="0" calcext:value-type="float">
            <text:p>0</text:p>
          </table:table-cell>
          <table:table-cell table:formula="of:=COUNTIF([.E$15:.E$22];&quot;=&quot; &amp;[.$C41])" office:value-type="float" office:value="0" calcext:value-type="float">
            <text:p>0</text:p>
          </table:table-cell>
          <table:table-cell table:formula="of:=COUNTIF([.F$15:.F$22];&quot;=&quot; &amp;[.$C41])" office:value-type="float" office:value="0" calcext:value-type="float">
            <text:p>0</text:p>
          </table:table-cell>
          <table:table-cell table:formula="of:=COUNTIF([.G$15:.G$22];&quot;=&quot; &amp;[.$C41])" office:value-type="float" office:value="0" calcext:value-type="float">
            <text:p>0</text:p>
          </table:table-cell>
          <table:table-cell table:formula="of:=COUNTIF([.H$15:.H$22];&quot;=&quot; &amp;[.$C41])" office:value-type="float" office:value="0" calcext:value-type="float">
            <text:p>0</text:p>
          </table:table-cell>
          <table:table-cell table:formula="of:=COUNTIF([.I$15:.I$22];&quot;=&quot; &amp;[.$C41])" office:value-type="float" office:value="0" calcext:value-type="float">
            <text:p>0</text:p>
          </table:table-cell>
          <table:table-cell table:formula="of:=COUNTIF([.J$15:.J$22];&quot;=&quot; &amp;[.$C41])" office:value-type="float" office:value="0" calcext:value-type="float">
            <text:p>0</text:p>
          </table:table-cell>
          <table:table-cell table:formula="of:=COUNTIF([.K$15:.K$22];&quot;=&quot; &amp;[.$C41])" office:value-type="float" office:value="0" calcext:value-type="float">
            <text:p>0</text:p>
          </table:table-cell>
          <table:table-cell table:formula="of:=COUNTIF([.L$15:.L$22];&quot;=&quot; &amp;[.$C41])" office:value-type="float" office:value="0" calcext:value-type="float">
            <text:p>0</text:p>
          </table:table-cell>
          <table:table-cell table:formula="of:=COUNTIF([.M$15:.M$22];&quot;=&quot; &amp;[.$C41])" office:value-type="float" office:value="0" calcext:value-type="float">
            <text:p>0</text:p>
          </table:table-cell>
          <table:table-cell table:formula="of:=COUNTIF([.N$15:.N$22];&quot;=&quot; &amp;[.$C41])" office:value-type="float" office:value="4" calcext:value-type="float">
            <text:p>4</text:p>
          </table:table-cell>
          <table:table-cell table:formula="of:=COUNTIF([.O$15:.O$22];&quot;=&quot; &amp;[.$C41])" office:value-type="float" office:value="4" calcext:value-type="float">
            <text:p>4</text:p>
          </table:table-cell>
          <table:table-cell table:formula="of:=COUNTIF([.P$15:.P$22];&quot;=&quot; &amp;[.$C41])" office:value-type="float" office:value="2" calcext:value-type="float">
            <text:p>2</text:p>
          </table:table-cell>
          <table:table-cell table:formula="of:=COUNTIF([.Q$15:.Q$22];&quot;=&quot; &amp;[.$C41])" office:value-type="float" office:value="0" calcext:value-type="float">
            <text:p>0</text:p>
          </table:table-cell>
          <table:table-cell table:formula="of:=COUNTIF([.R$15:.R$22];&quot;=&quot; &amp;[.$C41])" office:value-type="float" office:value="0" calcext:value-type="float">
            <text:p>0</text:p>
          </table:table-cell>
          <table:table-cell table:formula="of:=COUNTIF([.S$15:.S$22];&quot;=&quot; &amp;[.$C41])" office:value-type="float" office:value="0" calcext:value-type="float">
            <text:p>0</text:p>
          </table:table-cell>
          <table:table-cell table:formula="of:=COUNTIF([.T$15:.T$22];&quot;=&quot; &amp;[.$C41])" office:value-type="float" office:value="0" calcext:value-type="float">
            <text:p>0</text:p>
          </table:table-cell>
          <table:table-cell table:formula="of:=COUNTIF([.U$15:.U$22];&quot;=&quot; &amp;[.$C41])" office:value-type="float" office:value="0" calcext:value-type="float">
            <text:p>0</text:p>
          </table:table-cell>
          <table:table-cell table:formula="of:=COUNTIF([.V$15:.V$22];&quot;=&quot; &amp;[.$C41])" office:value-type="float" office:value="0" calcext:value-type="float">
            <text:p>0</text:p>
          </table:table-cell>
          <table:table-cell table:formula="of:=COUNTIF([.W$15:.W$22];&quot;=&quot; &amp;[.$C41])" office:value-type="float" office:value="0" calcext:value-type="float">
            <text:p>0</text:p>
          </table:table-cell>
          <table:table-cell table:formula="of:=COUNTIF([.X$15:.X$22];&quot;=&quot; &amp;[.$C41])" office:value-type="float" office:value="0" calcext:value-type="float">
            <text:p>0</text:p>
          </table:table-cell>
          <table:table-cell table:formula="of:=COUNTIF([.Y$15:.Y$22];&quot;=&quot; &amp;[.$C41])" office:value-type="float" office:value="0" calcext:value-type="float">
            <text:p>0</text:p>
          </table:table-cell>
          <table:table-cell table:formula="of:=COUNTIF([.Z$15:.Z$22];&quot;=&quot; &amp;[.$C41])" office:value-type="float" office:value="0" calcext:value-type="float">
            <text:p>0</text:p>
          </table:table-cell>
          <table:table-cell table:formula="of:=COUNTIF([.AA$15:.AA$22];&quot;=&quot; &amp;[.$C41])" office:value-type="float" office:value="0" calcext:value-type="float">
            <text:p>0</text:p>
          </table:table-cell>
          <table:table-cell table:formula="of:=COUNTIF([.AB$15:.AB$22];&quot;=&quot; &amp;[.$C41])" office:value-type="float" office:value="0" calcext:value-type="float">
            <text:p>0</text:p>
          </table:table-cell>
          <table:table-cell table:formula="of:=COUNTIF([.AC$15:.AC$22];&quot;=&quot; &amp;[.$C41])" office:value-type="float" office:value="4" calcext:value-type="float">
            <text:p>4</text:p>
          </table:table-cell>
          <table:table-cell table:formula="of:=COUNTIF([.AD$15:.AD$22];&quot;=&quot; &amp;[.$C41])" office:value-type="float" office:value="4" calcext:value-type="float">
            <text:p>4</text:p>
          </table:table-cell>
          <table:table-cell table:formula="of:=COUNTIF([.AE$15:.AE$22];&quot;=&quot; &amp;[.$C41])" office:value-type="float" office:value="2" calcext:value-type="float">
            <text:p>2</text:p>
          </table:table-cell>
          <table:table-cell table:formula="of:=COUNTIF([.AF$15:.AF$22];&quot;=&quot; &amp;[.$C41])" office:value-type="float" office:value="0" calcext:value-type="float">
            <text:p>0</text:p>
          </table:table-cell>
          <table:table-cell table:formula="of:=COUNTIF([.AG$15:.AG$22];&quot;=&quot; &amp;[.$C41])" office:value-type="float" office:value="0" calcext:value-type="float">
            <text:p>0</text:p>
          </table:table-cell>
          <table:table-cell table:formula="of:=COUNTIF([.AH$15:.AH$22];&quot;=&quot; &amp;[.$C41])" office:value-type="float" office:value="4" calcext:value-type="float">
            <text:p>4</text:p>
          </table:table-cell>
          <table:table-cell table:formula="of:=COUNTIF([.AI$15:.AI$22];&quot;=&quot; &amp;[.$C41])" office:value-type="float" office:value="4" calcext:value-type="float">
            <text:p>4</text:p>
          </table:table-cell>
          <table:table-cell table:formula="of:=COUNTIF([.AJ$15:.AJ$22];&quot;=&quot; &amp;[.$C41])" office:value-type="float" office:value="0" calcext:value-type="float">
            <text:p>0</text:p>
          </table:table-cell>
          <table:table-cell table:formula="of:=COUNTIF([.AK$15:.AK$22];&quot;=&quot; &amp;[.$C41])" office:value-type="float" office:value="0" calcext:value-type="float">
            <text:p>0</text:p>
          </table:table-cell>
          <table:table-cell table:formula="of:=COUNTIF([.AL$15:.AL$22];&quot;=&quot; &amp;[.$C41])" office:value-type="float" office:value="0" calcext:value-type="float">
            <text:p>0</text:p>
          </table:table-cell>
          <table:table-cell table:formula="of:=COUNTIF([.AM$15:.AM$22];&quot;=&quot; &amp;[.$C41])" office:value-type="float" office:value="0" calcext:value-type="float">
            <text:p>0</text:p>
          </table:table-cell>
          <table:table-cell table:formula="of:=COUNTIF([.AN$15:.AN$22];&quot;=&quot; &amp;[.$C41])" office:value-type="float" office:value="0" calcext:value-type="float">
            <text:p>0</text:p>
          </table:table-cell>
          <table:table-cell table:formula="of:=COUNTIF([.AO$15:.AO$22];&quot;=&quot; &amp;[.$C41])" office:value-type="float" office:value="0" calcext:value-type="float">
            <text:p>0</text:p>
          </table:table-cell>
          <table:table-cell table:formula="of:=COUNTIF([.AP$15:.AP$22];&quot;=&quot; &amp;[.$C41])" office:value-type="float" office:value="0" calcext:value-type="float">
            <text:p>0</text:p>
          </table:table-cell>
          <table:table-cell table:formula="of:=COUNTIF([.AQ$15:.AQ$22];&quot;=&quot; &amp;[.$C41])" office:value-type="float" office:value="0" calcext:value-type="float">
            <text:p>0</text:p>
          </table:table-cell>
          <table:table-cell table:formula="of:=COUNTIF([.AR$15:.AR$22];&quot;=&quot; &amp;[.$C41])" office:value-type="float" office:value="0" calcext:value-type="float">
            <text:p>0</text:p>
          </table:table-cell>
          <table:table-cell table:formula="of:=COUNTIF([.AS$15:.AS$22];&quot;=&quot; &amp;[.$C41])" office:value-type="float" office:value="0" calcext:value-type="float">
            <text:p>0</text:p>
          </table:table-cell>
          <table:table-cell table:formula="of:=COUNTIF([.AT$15:.AT$22];&quot;=&quot; &amp;[.$C41])" office:value-type="float" office:value="0" calcext:value-type="float">
            <text:p>0</text:p>
          </table:table-cell>
          <table:table-cell table:formula="of:=COUNTIF([.AU$15:.AU$22];&quot;=&quot; &amp;[.$C41])" office:value-type="float" office:value="0" calcext:value-type="float">
            <text:p>0</text:p>
          </table:table-cell>
          <table:table-cell table:formula="of:=COUNTIF([.AV$15:.AV$22];&quot;=&quot; &amp;[.$C41])" office:value-type="float" office:value="0" calcext:value-type="float">
            <text:p>0</text:p>
          </table:table-cell>
          <table:table-cell table:formula="of:=COUNTIF([.AW$15:.AW$22];&quot;=&quot; &amp;[.$C41])" office:value-type="float" office:value="0" calcext:value-type="float">
            <text:p>0</text:p>
          </table:table-cell>
          <table:table-cell table:formula="of:=COUNTIF([.AX$15:.AX$22];&quot;=&quot; &amp;[.$C41])" office:value-type="float" office:value="0" calcext:value-type="float">
            <text:p>0</text:p>
          </table:table-cell>
          <table:table-cell table:formula="of:=COUNTIF([.AY$15:.AY$22];&quot;=&quot; &amp;[.$C41])" office:value-type="float" office:value="0" calcext:value-type="float">
            <text:p>0</text:p>
          </table:table-cell>
          <table:table-cell table:style-name="ce66"/>
          <table:table-cell table:formula="of:=[.BA40]+0.002" office:value-type="float" office:value="0.052" calcext:value-type="float">
            <text:p>0.052</text:p>
          </table:table-cell>
          <table:table-cell table:formula="of:=[.BA41]*[.$D$6]" office:value-type="float" office:value="2.61380508778671" calcext:value-type="float">
            <text:p>2.614</text:p>
          </table:table-cell>
          <table:table-cell table:formula="of:=[.D$25]*[.$Z$5]*MAGNET([.D$24]+[.BB41])+[.E$25]*[.$Z$5]*MAGNET([.E$24]+[.BB41])+[.F$25]*[.$Z$5]*MAGNET([.F$24]+[.BB41])+[.G$25]*[.$Z$5]*MAGNET([.G$24]+[.BB41])+[.H$25]*[.$Z$5]*MAGNET([.H$24]+[.BB41])+[.I$25]*[.$Z$5]*MAGNET([.I$24]+[.BB41])+[.J$25]*[.$Z$5]*MAGNET([.J$24]+[.BB41])+[.K$25]*[.$Z$5]*MAGNET([.K$24]+[.BB41])+[.L$25]*[.$Z$5]*MAGNET([.L$24]+[.BB41])+[.M$25]*[.$Z$5]*MAGNET([.M$24]+[.BB41])+[.N$25]*[.$Z$5]*MAGNET([.N$24]+[.BB41])+[.O$25]*[.$Z$5]*MAGNET([.O$24]+[.BB41])+[.P$25]*[.$Z$5]*MAGNET([.P$24]+[.BB41])+[.Q$25]*[.$Z$5]*MAGNET([.Q$24]+[.BB41])+[.R$25]*[.$Z$5]*MAGNET([.R$24]+[.BB41])+[.S$25]*[.$Z$5]*MAGNET([.S$24]+[.BB41])+[.T$25]*[.$Z$5]*MAGNET([.T$24]+[.BB41])+[.U$25]*[.$Z$5]*MAGNET([.U$24]+[.BB41])+[.V$25]*[.$Z$5]*MAGNET([.V$24]+[.BB41])+[.W$25]*[.$Z$5]*MAGNET([.W$24]+[.BB41])+[.X$25]*[.$Z$5]*MAGNET([.X$24]+[.BB41])+[.Y$25]*[.$Z$5]*MAGNET([.Y$24]+[.BB41])+[.Z$25]*[.$Z$5]*MAGNET([.Z$24]+[.BB41])+[.AA$25]*[.$Z$5]*MAGNET([.AA$24]+[.BB41])+[.AB$25]*[.$Z$5]*MAGNET([.AB$24]+[.BB41])+[.AC$25]*[.$Z$5]*MAGNET([.AC$24]+[.BB41])+[.AD$25]*[.$Z$5]*MAGNET([.AD$24]+[.BB41])+[.AE$25]*[.$Z$5]*MAGNET([.AE$24]+[.BB41])+[.AF$25]*[.$Z$5]*MAGNET([.AF$24]+[.BB41])+[.AG$25]*[.$Z$5]*MAGNET([.AG$24]+[.BB41])+[.AH$25]*[.$Z$5]*MAGNET([.AH$24]+[.BB41]) +[.AI$25]*[.$Z$5]*MAGNET([.AI$24]+[.BB41]) +[.AJ$25]*[.$Z$5]*MAGNET([.AJ$24]+[.BB41]) +[.AK$25]*[.$Z$5]*MAGNET([.AK$24]+[.BB41]) +[.AL$25]*[.$Z$5]*MAGNET([.AL$24]+[.BB41]) +[.AM$25]*[.$Z$5]*MAGNET([.AM$24]+[.BB41]) +[.AN$25]*[.$Z$5]*MAGNET([.AN$24]+[.BB41]) +[.AO$25]*[.$Z$5]*MAGNET([.AO$24]+[.BB41])+RAND()*[.$BC$13]+[.AP$25]*[.$Z$5]*MAGNET([.AP$24]+[.BB41])&#10;+[.AQ$25]*[.$Z$5]*MAGNET([.AQ$24]+[.BB41])&#10;+[.AR$25]*[.$Z$5]*MAGNET([.AR$24]+[.BB41])&#10;+[.AS$25]*[.$Z$5]*MAGNET([.AS$24]+[.BB41])&#10;+[.AT$25]*[.$Z$5]*MAGNET([.AT$24]+[.BB41])&#10;+[.AU$25]*[.$Z$5]*MAGNET([.AU$24]+[.BB41])&#10;+[.AV$25]*[.$Z$5]*MAGNET([.AV$24]+[.BB41])&#10;+[.AW$25]*[.$Z$5]*MAGNET([.AW$24]+[.BB41])&#10;+[.AX$25]*[.$Z$5]*MAGNET([.AX$24]+[.BB41])&#10;+[.AY$25]*[.$Z$5]*MAGNET([.AY$24]+[.BB41])" office:value-type="float" office:value="98.6840591598926" calcext:value-type="float">
            <text:p>98.68</text:p>
          </table:table-cell>
          <table:table-cell table:style-name="ce70" table:formula="of:=[.E$26]*[.$Z$5]*MAGNET([.E$24]+[.$BB41])+[.F$26]*[.$Z$5]*MAGNET([.F$24]+[.$BB41])+[.G$26]*[.$Z$5]*MAGNET([.G$24]+[.$BB41])+[.H$26]*[.$Z$5]*MAGNET([.H$24]+[.$BB41])+[.I$26]*[.$Z$5]*MAGNET([.I$24]+[.$BB41])+[.J$26]*[.$Z$5]*MAGNET([.J$24]+[.$BB41])+[.K$26]*[.$Z$5]*MAGNET([.K$24]+[.$BB41])+[.L$26]*[.$Z$5]*MAGNET([.L$24]+[.$BB41])+[.M$26]*[.$Z$5]*MAGNET([.M$24]+[.$BB41])+[.N$26]*[.$Z$5]*MAGNET([.N$24]+[.$BB41])+[.O$26]*[.$Z$5]*MAGNET([.O$24]+[.$BB41])+[.P$26]*[.$Z$5]*MAGNET([.P$24]+[.$BB41])+[.Q$26]*[.$Z$5]*MAGNET([.Q$24]+[.$BB41])+[.R$26]*[.$Z$5]*MAGNET([.R$24]+[.$BB41])+[.S$26]*[.$Z$5]*MAGNET([.S$24]+[.$BB41])+[.T$26]*[.$Z$5]*MAGNET([.T$24]+[.$BB41])+[.U$26]*[.$Z$5]*MAGNET([.U$24]+[.$BB41])+[.V$26]*[.$Z$5]*MAGNET([.V$24]+[.$BB41])+[.W$26]*[.$Z$5]*MAGNET([.W$24]+[.$BB41])+[.X$26]*[.$Z$5]*MAGNET([.X$24]+[.$BB41])+[.Y$26]*[.$Z$5]*MAGNET([.Y$24]+[.$BB41])+[.Z$26]*[.$Z$5]*MAGNET([.Z$24]+[.$BB41])+[.AA$26]*[.$Z$5]*MAGNET([.AA$24]+[.$BB41])+[.AB$26]*[.$Z$5]*MAGNET([.AB$24]+[.$BB41])+[.AC$26]*[.$Z$5]*MAGNET([.AC$24]+[.$BB41])+[.AD$26]*[.$Z$5]*MAGNET([.AD$24]+[.$BB41])+[.AE$26]*[.$Z$5]*MAGNET([.AE$24]+[.$BB41])+[.AF$26]*[.$Z$5]*MAGNET([.AF$24]+[.$BB41])+[.AG$26]*[.$Z$5]*MAGNET([.AG$24]+[.$BB41])+[.D$26]*[.$Z$5]*MAGNET([.D$24]+[.$BB41])+[.AH$26]*[.$Z$5]*MAGNET([.AH$24]+[.BB41]) +[.AI$26]*[.$Z$5]*MAGNET([.AI$24]+[.BB41]) +[.AJ$26]*[.$Z$5]*MAGNET([.AJ$24]+[.BB41]) +[.AK$26]*[.$Z$5]*MAGNET([.AK$24]+[.BB41]) +[.AL$26]*[.$Z$5]*MAGNET([.AL$24]+[.BB41]) +[.AM$26]*[.$Z$5]*MAGNET([.AM$24]+[.BB41]) +[.AN$26]*[.$Z$5]*MAGNET([.AN$24]+[.BB41]) +[.AO$26]*[.$Z$5]*MAGNET([.AO$24]+[.BB41]) +[.AP$26]*[.$Z$5]*MAGNET([.AP$24]+[.$BB41])&#10;+[.AQ$26]*[.$Z$5]*MAGNET([.AQ$24]+[.$BB41])&#10;+[.AR$26]*[.$Z$5]*MAGNET([.AR$24]+[.$BB41])&#10;+[.AS$26]*[.$Z$5]*MAGNET([.AS$24]+[.$BB41])&#10;+[.AT$26]*[.$Z$5]*MAGNET([.AT$24]+[.$BB41])&#10;+[.AU$26]*[.$Z$5]*MAGNET([.AU$24]+[.$BB41])&#10;+[.AV$26]*[.$Z$5]*MAGNET([.AV$24]+[.$BB41])&#10;+[.AW$26]*[.$Z$5]*MAGNET([.AW$24]+[.$BB41])&#10;+[.AX$26]*[.$Z$5]*MAGNET([.AX$24]+[.$BB41])&#10;+[.AY$26]*[.$Z$5]*MAGNET([.AY$24]+[.$BB41]) +RAND()*[.$BD$13]" office:value-type="float" office:value="-80.6041633874343" calcext:value-type="float">
            <text:p>-80.60</text:p>
          </table:table-cell>
          <table:table-cell table:style-name="ce71" table:formula="of:=[.E$27]*[.$Z$5]*MAGNET([.E$24]+[.$BB41])+[.F$27]*[.$Z$5]*MAGNET([.F$24]+[.$BB41])+[.G$27]*[.$Z$5]*MAGNET([.G$24]+[.$BB41])+[.H$27]*[.$Z$5]*MAGNET([.H$24]+[.$BB41])+[.I$27]*[.$Z$5]*MAGNET([.I$24]+[.$BB41])+[.J$27]*[.$Z$5]*MAGNET([.J$24]+[.$BB41])+[.K$27]*[.$Z$5]*MAGNET([.K$24]+[.$BB41])+[.L$27]*[.$Z$5]*MAGNET([.L$24]+[.$BB41])+[.M$27]*[.$Z$5]*MAGNET([.M$24]+[.$BB41])+[.N$27]*[.$Z$5]*MAGNET([.N$24]+[.$BB41])+[.O$27]*[.$Z$5]*MAGNET([.O$24]+[.$BB41])+[.P$27]*[.$Z$5]*MAGNET([.P$24]+[.$BB41])+[.Q$27]*[.$Z$5]*MAGNET([.Q$24]+[.$BB41])+[.R$27]*[.$Z$5]*MAGNET([.R$24]+[.$BB41])+[.S$27]*[.$Z$5]*MAGNET([.S$24]+[.$BB41])+[.T$27]*[.$Z$5]*MAGNET([.T$24]+[.$BB41])+[.U$27]*[.$Z$5]*MAGNET([.U$24]+[.$BB41])+[.V$27]*[.$Z$5]*MAGNET([.V$24]+[.$BB41])+[.W$27]*[.$Z$5]*MAGNET([.W$24]+[.$BB41])+[.X$27]*[.$Z$5]*MAGNET([.X$24]+[.$BB41])+[.Y$27]*[.$Z$5]*MAGNET([.Y$24]+[.$BB41])+[.Z$27]*[.$Z$5]*MAGNET([.Z$24]+[.$BB41])+[.AA$27]*[.$Z$5]*MAGNET([.AA$24]+[.$BB41])+[.AB$27]*[.$Z$5]*MAGNET([.AB$24]+[.$BB41])+[.AC$27]*[.$Z$5]*MAGNET([.AC$24]+[.$BB41])+[.AD$27]*[.$Z$5]*MAGNET([.AD$24]+[.$BB41])+[.AE$27]*[.$Z$5]*MAGNET([.AE$24]+[.$BB41])+[.AF$27]*[.$Z$5]*MAGNET([.AF$24]+[.$BB41])+[.AG$27]*[.$Z$5]*MAGNET([.AG$24]+[.$BB41])+[.D$27]*[.$Z$5]*MAGNET([.D$24]+[.$BB41])+[.AH$27]*[.$Z$5]*MAGNET([.AH$24]+[.BB41]) +[.AI$27]*[.$Z$5]*MAGNET([.AI$24]+[.BB41]) +[.AJ$27]*[.$Z$5]*MAGNET([.AJ$24]+[.BB41]) +[.AK$27]*[.$Z$5]*MAGNET([.AK$24]+[.BB41]) +[.AL$27]*[.$Z$5]*MAGNET([.AL$24]+[.BB41]) +[.AM$27]*[.$Z$5]*MAGNET([.AM$24]+[.BB41]) +[.AN$27]*[.$Z$5]*MAGNET([.AN$24]+[.BB41]) +[.AO$27]*[.$Z$5]*MAGNET([.AO$24]+[.BB41]) +[.AP$27]*[.$Z$5]*MAGNET([.AP$24]+[.$BB41])&#10;+[.AQ$27]*[.$Z$5]*MAGNET([.AQ$24]+[.$BB41])&#10;+[.AR$27]*[.$Z$5]*MAGNET([.AR$24]+[.$BB41])&#10;+[.AS$27]*[.$Z$5]*MAGNET([.AS$24]+[.$BB41])&#10;+[.AT$27]*[.$Z$5]*MAGNET([.AT$24]+[.$BB41])&#10;+[.AU$27]*[.$Z$5]*MAGNET([.AU$24]+[.$BB41])&#10;+[.AV$27]*[.$Z$5]*MAGNET([.AV$24]+[.$BB41])&#10;+[.AW$27]*[.$Z$5]*MAGNET([.AW$24]+[.$BB41])&#10;+[.AX$27]*[.$Z$5]*MAGNET([.AX$24]+[.$BB41])&#10;+[.AY$27]*[.$Z$5]*MAGNET([.AY$24]+[.$BB41]) +RAND()*[.$BE$13]" office:value-type="float" office:value="0.572290062208847" calcext:value-type="float">
            <text:p>0.572290062208847</text:p>
          </table:table-cell>
          <table:table-cell table:style-name="ce71" table:formula="of:=[.E$28]*[.$Z$5]*MAGNET([.E$24]+[.$BB41])+[.F$28]*[.$Z$5]*MAGNET([.F$24]+[.$BB41])+[.G$28]*[.$Z$5]*MAGNET([.G$24]+[.$BB41])+[.H$28]*[.$Z$5]*MAGNET([.H$24]+[.$BB41])+[.I$28]*[.$Z$5]*MAGNET([.I$24]+[.$BB41])+[.J$28]*[.$Z$5]*MAGNET([.J$24]+[.$BB41])+[.K$28]*[.$Z$5]*MAGNET([.K$24]+[.$BB41])+[.L$28]*[.$Z$5]*MAGNET([.L$24]+[.$BB41])+[.M$28]*[.$Z$5]*MAGNET([.M$24]+[.$BB41])+[.N$28]*[.$Z$5]*MAGNET([.N$24]+[.$BB41])+[.O$28]*[.$Z$5]*MAGNET([.O$24]+[.$BB41])+[.P$28]*[.$Z$5]*MAGNET([.P$24]+[.$BB41])+[.Q$28]*[.$Z$5]*MAGNET([.Q$24]+[.$BB41])+[.R$28]*[.$Z$5]*MAGNET([.R$24]+[.$BB41])+[.S$28]*[.$Z$5]*MAGNET([.S$24]+[.$BB41])+[.T$28]*[.$Z$5]*MAGNET([.T$24]+[.$BB41])+[.U$28]*[.$Z$5]*MAGNET([.U$24]+[.$BB41])+[.V$28]*[.$Z$5]*MAGNET([.V$24]+[.$BB41])+[.W$28]*[.$Z$5]*MAGNET([.W$24]+[.$BB41])+[.X$28]*[.$Z$5]*MAGNET([.X$24]+[.$BB41])+[.Y$28]*[.$Z$5]*MAGNET([.Y$24]+[.$BB41])+[.Z$28]*[.$Z$5]*MAGNET([.Z$24]+[.$BB41])+[.AA$28]*[.$Z$5]*MAGNET([.AA$24]+[.$BB41])+[.AB$28]*[.$Z$5]*MAGNET([.AB$24]+[.$BB41])+[.AC$28]*[.$Z$5]*MAGNET([.AC$24]+[.$BB41])+[.AD$28]*[.$Z$5]*MAGNET([.AD$24]+[.$BB41])+[.AE$28]*[.$Z$5]*MAGNET([.AE$24]+[.$BB41])+[.AF$28]*[.$Z$5]*MAGNET([.AF$24]+[.$BB41])+[.AG$28]*[.$Z$5]*MAGNET([.AG$24]+[.$BB41])+[.D$28]*[.$Z$5]*MAGNET([.D$24]+[.$BB41])+[.AH$28]*[.$Z$5]*MAGNET([.AH$24]+[.BB41]) +[.AI$28]*[.$Z$5]*MAGNET([.AI$24]+[.BB41]) +[.AJ$28]*[.$Z$5]*MAGNET([.AJ$24]+[.BB41]) +[.AK$28]*[.$Z$5]*MAGNET([.AK$24]+[.BB41]) +[.AL$28]*[.$Z$5]*MAGNET([.AL$24]+[.BB41]) +[.AM$28]*[.$Z$5]*MAGNET([.AM$24]+[.BB41]) +[.AN$28]*[.$Z$5]*MAGNET([.AN$24]+[.BB41]) +[.AO$28]*[.$Z$5]*MAGNET([.AO$24]+[.BB41]) +[.AP$28]*[.$Z$5]*MAGNET([.AP$24]+[.$BB41])&#10;+[.AQ$28]*[.$Z$5]*MAGNET([.AQ$24]+[.$BB41])&#10;+[.AR$28]*[.$Z$5]*MAGNET([.AR$24]+[.$BB41])&#10;+[.AS$28]*[.$Z$5]*MAGNET([.AS$24]+[.$BB41])&#10;+[.AT$28]*[.$Z$5]*MAGNET([.AT$24]+[.$BB41])&#10;+[.AU$28]*[.$Z$5]*MAGNET([.AU$24]+[.$BB41])&#10;+[.AV$28]*[.$Z$5]*MAGNET([.AV$24]+[.$BB41])&#10;+[.AW$28]*[.$Z$5]*MAGNET([.AW$24]+[.$BB41])&#10;+[.AX$28]*[.$Z$5]*MAGNET([.AX$24]+[.$BB41])&#10;+[.AY$28]*[.$Z$5]*MAGNET([.AY$24]+[.$BB41]) +RAND()*[.$BF$13]" office:value-type="float" office:value="1.01719984671227" calcext:value-type="float">
            <text:p>1.01719984671227</text:p>
          </table:table-cell>
          <table:table-cell table:style-name="ce71" table:formula="of:=[.E$29]*[.$Z$5]*MAGNET([.E$24]+[.$BB41])+[.F$29]*[.$Z$5]*MAGNET([.F$24]+[.$BB41])+[.G$29]*[.$Z$5]*MAGNET([.G$24]+[.$BB41])+[.H$29]*[.$Z$5]*MAGNET([.H$24]+[.$BB41])+[.I$29]*[.$Z$5]*MAGNET([.I$24]+[.$BB41])+[.J$29]*[.$Z$5]*MAGNET([.J$24]+[.$BB41])+[.K$29]*[.$Z$5]*MAGNET([.K$24]+[.$BB41])+[.L$29]*[.$Z$5]*MAGNET([.L$24]+[.$BB41])+[.M$29]*[.$Z$5]*MAGNET([.M$24]+[.$BB41])+[.N$29]*[.$Z$5]*MAGNET([.N$24]+[.$BB41])+[.O$29]*[.$Z$5]*MAGNET([.O$24]+[.$BB41])+[.P$29]*[.$Z$5]*MAGNET([.P$24]+[.$BB41])+[.Q$29]*[.$Z$5]*MAGNET([.Q$24]+[.$BB41])+[.R$29]*[.$Z$5]*MAGNET([.R$24]+[.$BB41])+[.S$29]*[.$Z$5]*MAGNET([.S$24]+[.$BB41])+[.T$29]*[.$Z$5]*MAGNET([.T$24]+[.$BB41])+[.U$29]*[.$Z$5]*MAGNET([.U$24]+[.$BB41])+[.V$29]*[.$Z$5]*MAGNET([.V$24]+[.$BB41])+[.W$29]*[.$Z$5]*MAGNET([.W$24]+[.$BB41])+[.X$29]*[.$Z$5]*MAGNET([.X$24]+[.$BB41])+[.Y$29]*[.$Z$5]*MAGNET([.Y$24]+[.$BB41])+[.Z$29]*[.$Z$5]*MAGNET([.Z$24]+[.$BB41])+[.AA$29]*[.$Z$5]*MAGNET([.AA$24]+[.$BB41])+[.AB$29]*[.$Z$5]*MAGNET([.AB$24]+[.$BB41])+[.AC$29]*[.$Z$5]*MAGNET([.AC$24]+[.$BB41])+[.AD$29]*[.$Z$5]*MAGNET([.AD$24]+[.$BB41])+[.AE$29]*[.$Z$5]*MAGNET([.AE$24]+[.$BB41])+[.AF$29]*[.$Z$5]*MAGNET([.AF$24]+[.$BB41])+[.AG$29]*[.$Z$5]*MAGNET([.AG$24]+[.$BB41])+[.D$29]*[.$Z$5]*MAGNET([.D$24]+[.$BB41])+[.AH$29]*[.$Z$5]*MAGNET([.AH$24]+[.BB41]) +[.AI$29]*[.$Z$5]*MAGNET([.AI$24]+[.BB41]) +[.AJ$29]*[.$Z$5]*MAGNET([.AJ$24]+[.BB41]) +[.AK$29]*[.$Z$5]*MAGNET([.AK$24]+[.BB41]) +[.AL$29]*[.$Z$5]*MAGNET([.AL$24]+[.BB41]) +[.AM$29]*[.$Z$5]*MAGNET([.AM$24]+[.BB41]) +[.AN$29]*[.$Z$5]*MAGNET([.AN$24]+[.BB41]) +[.AO$29]*[.$Z$5]*MAGNET([.AO$24]+[.BB41]) +[.AP$29]*[.$Z$5]*MAGNET([.AP$24]+[.$BB41])&#10;+[.AQ$29]*[.$Z$5]*MAGNET([.AQ$24]+[.$BB41])&#10;+[.AR$29]*[.$Z$5]*MAGNET([.AR$24]+[.$BB41])&#10;+[.AS$29]*[.$Z$5]*MAGNET([.AS$24]+[.$BB41])&#10;+[.AT$29]*[.$Z$5]*MAGNET([.AT$24]+[.$BB41])&#10;+[.AU$29]*[.$Z$5]*MAGNET([.AU$24]+[.$BB41])&#10;+[.AV$29]*[.$Z$5]*MAGNET([.AV$24]+[.$BB41])&#10;+[.AW$29]*[.$Z$5]*MAGNET([.AW$24]+[.$BB41])&#10;+[.AX$29]*[.$Z$5]*MAGNET([.AX$24]+[.$BB41])&#10;+[.AY$29]*[.$Z$5]*MAGNET([.AY$24]+[.$BB41]) +RAND()*[.$BG$13]" office:value-type="float" office:value="-1.81615681953775" calcext:value-type="float">
            <text:p>-1.81615681953775</text:p>
          </table:table-cell>
          <table:table-cell table:style-name="ce71" table:formula="of:=[.E$30]*[.$Z$5]*MAGNET([.E$24]+[.$BB41])+[.F$30]*[.$Z$5]*MAGNET([.F$24]+[.$BB41])+[.G$30]*[.$Z$5]*MAGNET([.G$24]+[.$BB41])+[.H$30]*[.$Z$5]*MAGNET([.H$24]+[.$BB41])+[.I$30]*[.$Z$5]*MAGNET([.I$24]+[.$BB41])+[.J$30]*[.$Z$5]*MAGNET([.J$24]+[.$BB41])+[.K$30]*[.$Z$5]*MAGNET([.K$24]+[.$BB41])+[.L$30]*[.$Z$5]*MAGNET([.L$24]+[.$BB41])+[.M$30]*[.$Z$5]*MAGNET([.M$24]+[.$BB41])+[.N$30]*[.$Z$5]*MAGNET([.N$24]+[.$BB41])+[.O$30]*[.$Z$5]*MAGNET([.O$24]+[.$BB41])+[.P$30]*[.$Z$5]*MAGNET([.P$24]+[.$BB41])+[.Q$30]*[.$Z$5]*MAGNET([.Q$24]+[.$BB41])+[.R$30]*[.$Z$5]*MAGNET([.R$24]+[.$BB41])+[.S$30]*[.$Z$5]*MAGNET([.S$24]+[.$BB41])+[.T$30]*[.$Z$5]*MAGNET([.T$24]+[.$BB41])+[.U$30]*[.$Z$5]*MAGNET([.U$24]+[.$BB41])+[.V$30]*[.$Z$5]*MAGNET([.V$24]+[.$BB41])+[.W$30]*[.$Z$5]*MAGNET([.W$24]+[.$BB41])+[.X$30]*[.$Z$5]*MAGNET([.X$24]+[.$BB41])+[.Y$30]*[.$Z$5]*MAGNET([.Y$24]+[.$BB41])+[.Z$30]*[.$Z$5]*MAGNET([.Z$24]+[.$BB41])+[.AA$30]*[.$Z$5]*MAGNET([.AA$24]+[.$BB41])+[.AB$30]*[.$Z$5]*MAGNET([.AB$24]+[.$BB41])+[.AC$30]*[.$Z$5]*MAGNET([.AC$24]+[.$BB41])+[.AD$30]*[.$Z$5]*MAGNET([.AD$24]+[.$BB41])+[.AE$30]*[.$Z$5]*MAGNET([.AE$24]+[.$BB41])+[.AF$30]*[.$Z$5]*MAGNET([.AF$24]+[.$BB41])+[.AG$30]*[.$Z$5]*MAGNET([.AG$24]+[.$BB41])+[.D$30]*[.$Z$5]*MAGNET([.D$24]+[.$BB41])+[.AH$30]*[.$Z$5]*MAGNET([.AH$24]+[.BB41]) +[.AI$30]*[.$Z$5]*MAGNET([.AI$24]+[.BB41]) +[.AJ$30]*[.$Z$5]*MAGNET([.AJ$24]+[.BB41]) +[.AK$30]*[.$Z$5]*MAGNET([.AK$24]+[.BB41]) +[.AL$30]*[.$Z$5]*MAGNET([.AL$24]+[.BB41]) +[.AM$30]*[.$Z$5]*MAGNET([.AM$24]+[.BB41]) +[.AN$30]*[.$Z$5]*MAGNET([.AN$24]+[.BB41]) +[.AO$30]*[.$Z$5]*MAGNET([.AO$24]+[.BB41]) +[.AP$30]*[.$Z$5]*MAGNET([.AP$24]+[.$BB41])&#10;+[.AQ$30]*[.$Z$5]*MAGNET([.AQ$24]+[.$BB41])&#10;+[.AR$30]*[.$Z$5]*MAGNET([.AR$24]+[.$BB41])&#10;+[.AS$30]*[.$Z$5]*MAGNET([.AS$24]+[.$BB41])&#10;+[.AT$30]*[.$Z$5]*MAGNET([.AT$24]+[.$BB41])&#10;+[.AU$30]*[.$Z$5]*MAGNET([.AU$24]+[.$BB41])&#10;+[.AV$30]*[.$Z$5]*MAGNET([.AV$24]+[.$BB41])&#10;+[.AW$30]*[.$Z$5]*MAGNET([.AW$24]+[.$BB41])&#10;+[.AX$30]*[.$Z$5]*MAGNET([.AX$24]+[.$BB41])&#10;+[.AY$30]*[.$Z$5]*MAGNET([.AY$24]+[.$BB41]) +RAND()*[.$BH$13]" office:value-type="float" office:value="0" calcext:value-type="float">
            <text:p>0</text:p>
          </table:table-cell>
          <table:table-cell table:style-name="ce71" table:formula="of:=[.E$31]*[.$Z$5]*MAGNET([.E$24]+[.$BB41])+[.F$31]*[.$Z$5]*MAGNET([.F$24]+[.$BB41])+[.G$31]*[.$Z$5]*MAGNET([.G$24]+[.$BB41])+[.H$31]*[.$Z$5]*MAGNET([.H$24]+[.$BB41])+[.I$31]*[.$Z$5]*MAGNET([.I$24]+[.$BB41])+[.J$31]*[.$Z$5]*MAGNET([.J$24]+[.$BB41])+[.K$31]*[.$Z$5]*MAGNET([.K$24]+[.$BB41])+[.L$31]*[.$Z$5]*MAGNET([.L$24]+[.$BB41])+[.M$31]*[.$Z$5]*MAGNET([.M$24]+[.$BB41])+[.N$31]*[.$Z$5]*MAGNET([.N$24]+[.$BB41])+[.O$31]*[.$Z$5]*MAGNET([.O$24]+[.$BB41])+[.P$31]*[.$Z$5]*MAGNET([.P$24]+[.$BB41])+[.Q$31]*[.$Z$5]*MAGNET([.Q$24]+[.$BB41])+[.R$31]*[.$Z$5]*MAGNET([.R$24]+[.$BB41])+[.S$31]*[.$Z$5]*MAGNET([.S$24]+[.$BB41])+[.T$31]*[.$Z$5]*MAGNET([.T$24]+[.$BB41])+[.U$31]*[.$Z$5]*MAGNET([.U$24]+[.$BB41])+[.V$31]*[.$Z$5]*MAGNET([.V$24]+[.$BB41])+[.W$31]*[.$Z$5]*MAGNET([.W$24]+[.$BB41])+[.X$31]*[.$Z$5]*MAGNET([.X$24]+[.$BB41])+[.Y$31]*[.$Z$5]*MAGNET([.Y$24]+[.$BB41])+[.Z$31]*[.$Z$5]*MAGNET([.Z$24]+[.$BB41])+[.AA$31]*[.$Z$5]*MAGNET([.AA$24]+[.$BB41])+[.AB$31]*[.$Z$5]*MAGNET([.AB$24]+[.$BB41])+[.AC$31]*[.$Z$5]*MAGNET([.AC$24]+[.$BB41])+[.AD$31]*[.$Z$5]*MAGNET([.AD$24]+[.$BB41])+[.AE$31]*[.$Z$5]*MAGNET([.AE$24]+[.$BB41])+[.AF$31]*[.$Z$5]*MAGNET([.AF$24]+[.$BB41])+[.AG$31]*[.$Z$5]*MAGNET([.AG$24]+[.$BB41])+[.D$31]*[.$Z$5]*MAGNET([.D$24]+[.$BB41])+[.AH$31]*[.$Z$5]*MAGNET([.AH$24]+[.BB41]) +[.AI$31]*[.$Z$5]*MAGNET([.AI$24]+[.BB41]) +[.AJ$31]*[.$Z$5]*MAGNET([.AJ$24]+[.BB41]) +[.AK$31]*[.$Z$5]*MAGNET([.AK$24]+[.BB41]) +[.AL$31]*[.$Z$5]*MAGNET([.AL$24]+[.BB41]) +[.AM$31]*[.$Z$5]*MAGNET([.AM$24]+[.BB41]) +[.AN$31]*[.$Z$5]*MAGNET([.AN$24]+[.BB41]) +[.AO$31]*[.$Z$5]*MAGNET([.AO$24]+[.BB41]) +[.AP$31]*[.$Z$5]*MAGNET([.AP$24]+[.$BB41])&#10;+[.AQ$31]*[.$Z$5]*MAGNET([.AQ$24]+[.$BB41])&#10;+[.AR$31]*[.$Z$5]*MAGNET([.AR$24]+[.$BB41])&#10;+[.AS$31]*[.$Z$5]*MAGNET([.AS$24]+[.$BB41])&#10;+[.AT$31]*[.$Z$5]*MAGNET([.AT$24]+[.$BB41])&#10;+[.AU$31]*[.$Z$5]*MAGNET([.AU$24]+[.$BB41])&#10;+[.AV$31]*[.$Z$5]*MAGNET([.AV$24]+[.$BB41])&#10;+[.AW$31]*[.$Z$5]*MAGNET([.AW$24]+[.$BB41])&#10;+[.AX$31]*[.$Z$5]*MAGNET([.AX$24]+[.$BB41])&#10;+[.AY$31]*[.$Z$5]*MAGNET([.AY$24]+[.$BB41]) +RAND()*[.$BI$13]" office:value-type="float" office:value="0" calcext:value-type="float">
            <text:p>0</text:p>
          </table:table-cell>
          <table:table-cell table:style-name="ce71" table:formula="of:=[.E$32]*[.$Z$5]*MAGNET([.E$24]+[.$BB41])+[.F$32]*[.$Z$5]*MAGNET([.F$24]+[.$BB41])+[.G$32]*[.$Z$5]*MAGNET([.G$24]+[.$BB41])+[.H$32]*[.$Z$5]*MAGNET([.H$24]+[.$BB41])+[.I$32]*[.$Z$5]*MAGNET([.I$24]+[.$BB41])+[.J$32]*[.$Z$5]*MAGNET([.J$24]+[.$BB41])+[.K$32]*[.$Z$5]*MAGNET([.K$24]+[.$BB41])+[.L$32]*[.$Z$5]*MAGNET([.L$24]+[.$BB41])+[.M$32]*[.$Z$5]*MAGNET([.M$24]+[.$BB41])+[.N$32]*[.$Z$5]*MAGNET([.N$24]+[.$BB41])+[.O$32]*[.$Z$5]*MAGNET([.O$24]+[.$BB41])+[.P$32]*[.$Z$5]*MAGNET([.P$24]+[.$BB41])+[.Q$32]*[.$Z$5]*MAGNET([.Q$24]+[.$BB41])+[.R$32]*[.$Z$5]*MAGNET([.R$24]+[.$BB41])+[.S$32]*[.$Z$5]*MAGNET([.S$24]+[.$BB41])+[.T$32]*[.$Z$5]*MAGNET([.T$24]+[.$BB41])+[.U$32]*[.$Z$5]*MAGNET([.U$24]+[.$BB41])+[.V$32]*[.$Z$5]*MAGNET([.V$24]+[.$BB41])+[.W$32]*[.$Z$5]*MAGNET([.W$24]+[.$BB41])+[.X$32]*[.$Z$5]*MAGNET([.X$24]+[.$BB41])+[.Y$32]*[.$Z$5]*MAGNET([.Y$24]+[.$BB41])+[.Z$32]*[.$Z$5]*MAGNET([.Z$24]+[.$BB41])+[.AA$32]*[.$Z$5]*MAGNET([.AA$24]+[.$BB41])+[.AB$32]*[.$Z$5]*MAGNET([.AB$24]+[.$BB41])+[.AC$32]*[.$Z$5]*MAGNET([.AC$24]+[.$BB41])+[.AD$32]*[.$Z$5]*MAGNET([.AD$24]+[.$BB41])+[.AE$32]*[.$Z$5]*MAGNET([.AE$24]+[.$BB41])+[.AF$32]*[.$Z$5]*MAGNET([.AF$24]+[.$BB41])+[.AG$32]*[.$Z$5]*MAGNET([.AG$24]+[.$BB41])+[.D$32]*[.$Z$5]*MAGNET([.D$24]+[.$BB41])+[.AH$32]*[.$Z$5]*MAGNET([.AH$24]+[.BB41]) +[.AI$32]*[.$Z$5]*MAGNET([.AI$24]+[.BB41]) +[.AJ$32]*[.$Z$5]*MAGNET([.AJ$24]+[.BB41]) +[.AK$32]*[.$Z$5]*MAGNET([.AK$24]+[.BB41]) +[.AL$32]*[.$Z$5]*MAGNET([.AL$24]+[.BB41]) +[.AM$32]*[.$Z$5]*MAGNET([.AM$24]+[.BB41]) +[.AN$32]*[.$Z$5]*MAGNET([.AN$24]+[.BB41]) +[.AO$32]*[.$Z$5]*MAGNET([.AO$24]+[.BB41]) +[.AP$32]*[.$Z$5]*MAGNET([.AP$24]+[.$BB41])&#10;+[.AQ$32]*[.$Z$5]*MAGNET([.AQ$24]+[.$BB41])&#10;+[.AR$32]*[.$Z$5]*MAGNET([.AR$24]+[.$BB41])&#10;+[.AS$32]*[.$Z$5]*MAGNET([.AS$24]+[.$BB41])&#10;+[.AT$32]*[.$Z$5]*MAGNET([.AT$24]+[.$BB41])&#10;+[.AU$32]*[.$Z$5]*MAGNET([.AU$24]+[.$BB41])&#10;+[.AV$32]*[.$Z$5]*MAGNET([.AV$24]+[.$BB41])&#10;+[.AW$32]*[.$Z$5]*MAGNET([.AW$24]+[.$BB41])&#10;+[.AX$32]*[.$Z$5]*MAGNET([.AX$24]+[.$BB41])&#10;+[.AY$32]*[.$Z$5]*MAGNET([.AY$24]+[.$BB41]) +RAND()*[.$BJ$13]" office:value-type="float" office:value="0" calcext:value-type="float">
            <text:p>0</text:p>
          </table:table-cell>
          <table:table-cell table:number-columns-repeated="3"/>
          <table:table-cell table:formula="of:=[.D$25]*[.$Z$5]*MAGNET([.D$24]+[.BB15])+[.E$25]*[.$Z$5]*MAGNET([.E$24]+[.BB15])" office:value-type="float" office:value="14.2117403866272" calcext:value-type="float">
            <text:p>14.2117403866272</text:p>
          </table:table-cell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3" calcext:value-type="float">
            <text:p>-3</text:p>
          </table:table-cell>
          <table:table-cell table:formula="of:=COUNTIF([.D$15:.D$22];&quot;=&quot; &amp;[.$C42])" office:value-type="float" office:value="0" calcext:value-type="float">
            <text:p>0</text:p>
          </table:table-cell>
          <table:table-cell table:formula="of:=COUNTIF([.E$15:.E$22];&quot;=&quot; &amp;[.$C42])" office:value-type="float" office:value="0" calcext:value-type="float">
            <text:p>0</text:p>
          </table:table-cell>
          <table:table-cell table:formula="of:=COUNTIF([.F$15:.F$22];&quot;=&quot; &amp;[.$C42])" office:value-type="float" office:value="2" calcext:value-type="float">
            <text:p>2</text:p>
          </table:table-cell>
          <table:table-cell table:formula="of:=COUNTIF([.G$15:.G$22];&quot;=&quot; &amp;[.$C42])" office:value-type="float" office:value="4" calcext:value-type="float">
            <text:p>4</text:p>
          </table:table-cell>
          <table:table-cell table:formula="of:=COUNTIF([.H$15:.H$22];&quot;=&quot; &amp;[.$C42])" office:value-type="float" office:value="4" calcext:value-type="float">
            <text:p>4</text:p>
          </table:table-cell>
          <table:table-cell table:formula="of:=COUNTIF([.I$15:.I$22];&quot;=&quot; &amp;[.$C42])" office:value-type="float" office:value="0" calcext:value-type="float">
            <text:p>0</text:p>
          </table:table-cell>
          <table:table-cell table:formula="of:=COUNTIF([.J$15:.J$22];&quot;=&quot; &amp;[.$C42])" office:value-type="float" office:value="0" calcext:value-type="float">
            <text:p>0</text:p>
          </table:table-cell>
          <table:table-cell table:formula="of:=COUNTIF([.K$15:.K$22];&quot;=&quot; &amp;[.$C42])" office:value-type="float" office:value="0" calcext:value-type="float">
            <text:p>0</text:p>
          </table:table-cell>
          <table:table-cell table:formula="of:=COUNTIF([.L$15:.L$22];&quot;=&quot; &amp;[.$C42])" office:value-type="float" office:value="0" calcext:value-type="float">
            <text:p>0</text:p>
          </table:table-cell>
          <table:table-cell table:formula="of:=COUNTIF([.M$15:.M$22];&quot;=&quot; &amp;[.$C42])" office:value-type="float" office:value="0" calcext:value-type="float">
            <text:p>0</text:p>
          </table:table-cell>
          <table:table-cell table:formula="of:=COUNTIF([.N$15:.N$22];&quot;=&quot; &amp;[.$C42])" office:value-type="float" office:value="0" calcext:value-type="float">
            <text:p>0</text:p>
          </table:table-cell>
          <table:table-cell table:formula="of:=COUNTIF([.O$15:.O$22];&quot;=&quot; &amp;[.$C42])" office:value-type="float" office:value="0" calcext:value-type="float">
            <text:p>0</text:p>
          </table:table-cell>
          <table:table-cell table:formula="of:=COUNTIF([.P$15:.P$22];&quot;=&quot; &amp;[.$C42])" office:value-type="float" office:value="0" calcext:value-type="float">
            <text:p>0</text:p>
          </table:table-cell>
          <table:table-cell table:formula="of:=COUNTIF([.Q$15:.Q$22];&quot;=&quot; &amp;[.$C42])" office:value-type="float" office:value="0" calcext:value-type="float">
            <text:p>0</text:p>
          </table:table-cell>
          <table:table-cell table:formula="of:=COUNTIF([.R$15:.R$22];&quot;=&quot; &amp;[.$C42])" office:value-type="float" office:value="0" calcext:value-type="float">
            <text:p>0</text:p>
          </table:table-cell>
          <table:table-cell table:formula="of:=COUNTIF([.S$15:.S$22];&quot;=&quot; &amp;[.$C42])" office:value-type="float" office:value="0" calcext:value-type="float">
            <text:p>0</text:p>
          </table:table-cell>
          <table:table-cell table:formula="of:=COUNTIF([.T$15:.T$22];&quot;=&quot; &amp;[.$C42])" office:value-type="float" office:value="0" calcext:value-type="float">
            <text:p>0</text:p>
          </table:table-cell>
          <table:table-cell table:formula="of:=COUNTIF([.U$15:.U$22];&quot;=&quot; &amp;[.$C42])" office:value-type="float" office:value="2" calcext:value-type="float">
            <text:p>2</text:p>
          </table:table-cell>
          <table:table-cell table:formula="of:=COUNTIF([.V$15:.V$22];&quot;=&quot; &amp;[.$C42])" office:value-type="float" office:value="4" calcext:value-type="float">
            <text:p>4</text:p>
          </table:table-cell>
          <table:table-cell table:formula="of:=COUNTIF([.W$15:.W$22];&quot;=&quot; &amp;[.$C42])" office:value-type="float" office:value="4" calcext:value-type="float">
            <text:p>4</text:p>
          </table:table-cell>
          <table:table-cell table:formula="of:=COUNTIF([.X$15:.X$22];&quot;=&quot; &amp;[.$C42])" office:value-type="float" office:value="0" calcext:value-type="float">
            <text:p>0</text:p>
          </table:table-cell>
          <table:table-cell table:formula="of:=COUNTIF([.Y$15:.Y$22];&quot;=&quot; &amp;[.$C42])" office:value-type="float" office:value="0" calcext:value-type="float">
            <text:p>0</text:p>
          </table:table-cell>
          <table:table-cell table:formula="of:=COUNTIF([.Z$15:.Z$22];&quot;=&quot; &amp;[.$C42])" office:value-type="float" office:value="0" calcext:value-type="float">
            <text:p>0</text:p>
          </table:table-cell>
          <table:table-cell table:formula="of:=COUNTIF([.AA$15:.AA$22];&quot;=&quot; &amp;[.$C42])" office:value-type="float" office:value="0" calcext:value-type="float">
            <text:p>0</text:p>
          </table:table-cell>
          <table:table-cell table:formula="of:=COUNTIF([.AB$15:.AB$22];&quot;=&quot; &amp;[.$C42])" office:value-type="float" office:value="0" calcext:value-type="float">
            <text:p>0</text:p>
          </table:table-cell>
          <table:table-cell table:formula="of:=COUNTIF([.AC$15:.AC$22];&quot;=&quot; &amp;[.$C42])" office:value-type="float" office:value="0" calcext:value-type="float">
            <text:p>0</text:p>
          </table:table-cell>
          <table:table-cell table:formula="of:=COUNTIF([.AD$15:.AD$22];&quot;=&quot; &amp;[.$C42])" office:value-type="float" office:value="0" calcext:value-type="float">
            <text:p>0</text:p>
          </table:table-cell>
          <table:table-cell table:formula="of:=COUNTIF([.AE$15:.AE$22];&quot;=&quot; &amp;[.$C42])" office:value-type="float" office:value="0" calcext:value-type="float">
            <text:p>0</text:p>
          </table:table-cell>
          <table:table-cell table:formula="of:=COUNTIF([.AF$15:.AF$22];&quot;=&quot; &amp;[.$C42])" office:value-type="float" office:value="0" calcext:value-type="float">
            <text:p>0</text:p>
          </table:table-cell>
          <table:table-cell table:formula="of:=COUNTIF([.AG$15:.AG$22];&quot;=&quot; &amp;[.$C42])" office:value-type="float" office:value="0" calcext:value-type="float">
            <text:p>0</text:p>
          </table:table-cell>
          <table:table-cell table:formula="of:=COUNTIF([.AH$15:.AH$22];&quot;=&quot; &amp;[.$C42])" office:value-type="float" office:value="0" calcext:value-type="float">
            <text:p>0</text:p>
          </table:table-cell>
          <table:table-cell table:formula="of:=COUNTIF([.AI$15:.AI$22];&quot;=&quot; &amp;[.$C42])" office:value-type="float" office:value="0" calcext:value-type="float">
            <text:p>0</text:p>
          </table:table-cell>
          <table:table-cell table:formula="of:=COUNTIF([.AJ$15:.AJ$22];&quot;=&quot; &amp;[.$C42])" office:value-type="float" office:value="0" calcext:value-type="float">
            <text:p>0</text:p>
          </table:table-cell>
          <table:table-cell table:formula="of:=COUNTIF([.AK$15:.AK$22];&quot;=&quot; &amp;[.$C42])" office:value-type="float" office:value="0" calcext:value-type="float">
            <text:p>0</text:p>
          </table:table-cell>
          <table:table-cell table:formula="of:=COUNTIF([.AL$15:.AL$22];&quot;=&quot; &amp;[.$C42])" office:value-type="float" office:value="0" calcext:value-type="float">
            <text:p>0</text:p>
          </table:table-cell>
          <table:table-cell table:formula="of:=COUNTIF([.AM$15:.AM$22];&quot;=&quot; &amp;[.$C42])" office:value-type="float" office:value="0" calcext:value-type="float">
            <text:p>0</text:p>
          </table:table-cell>
          <table:table-cell table:formula="of:=COUNTIF([.AN$15:.AN$22];&quot;=&quot; &amp;[.$C42])" office:value-type="float" office:value="0" calcext:value-type="float">
            <text:p>0</text:p>
          </table:table-cell>
          <table:table-cell table:formula="of:=COUNTIF([.AO$15:.AO$22];&quot;=&quot; &amp;[.$C42])" office:value-type="float" office:value="2" calcext:value-type="float">
            <text:p>2</text:p>
          </table:table-cell>
          <table:table-cell table:formula="of:=COUNTIF([.AP$15:.AP$22];&quot;=&quot; &amp;[.$C42])" office:value-type="float" office:value="0" calcext:value-type="float">
            <text:p>0</text:p>
          </table:table-cell>
          <table:table-cell table:formula="of:=COUNTIF([.AQ$15:.AQ$22];&quot;=&quot; &amp;[.$C42])" office:value-type="float" office:value="0" calcext:value-type="float">
            <text:p>0</text:p>
          </table:table-cell>
          <table:table-cell table:formula="of:=COUNTIF([.AR$15:.AR$22];&quot;=&quot; &amp;[.$C42])" office:value-type="float" office:value="0" calcext:value-type="float">
            <text:p>0</text:p>
          </table:table-cell>
          <table:table-cell table:formula="of:=COUNTIF([.AS$15:.AS$22];&quot;=&quot; &amp;[.$C42])" office:value-type="float" office:value="0" calcext:value-type="float">
            <text:p>0</text:p>
          </table:table-cell>
          <table:table-cell table:formula="of:=COUNTIF([.AT$15:.AT$22];&quot;=&quot; &amp;[.$C42])" office:value-type="float" office:value="0" calcext:value-type="float">
            <text:p>0</text:p>
          </table:table-cell>
          <table:table-cell table:formula="of:=COUNTIF([.AU$15:.AU$22];&quot;=&quot; &amp;[.$C42])" office:value-type="float" office:value="0" calcext:value-type="float">
            <text:p>0</text:p>
          </table:table-cell>
          <table:table-cell table:formula="of:=COUNTIF([.AV$15:.AV$22];&quot;=&quot; &amp;[.$C42])" office:value-type="float" office:value="0" calcext:value-type="float">
            <text:p>0</text:p>
          </table:table-cell>
          <table:table-cell table:formula="of:=COUNTIF([.AW$15:.AW$22];&quot;=&quot; &amp;[.$C42])" office:value-type="float" office:value="0" calcext:value-type="float">
            <text:p>0</text:p>
          </table:table-cell>
          <table:table-cell table:formula="of:=COUNTIF([.AX$15:.AX$22];&quot;=&quot; &amp;[.$C42])" office:value-type="float" office:value="0" calcext:value-type="float">
            <text:p>0</text:p>
          </table:table-cell>
          <table:table-cell table:formula="of:=COUNTIF([.AY$15:.AY$22];&quot;=&quot; &amp;[.$C42])" office:value-type="float" office:value="0" calcext:value-type="float">
            <text:p>0</text:p>
          </table:table-cell>
          <table:table-cell/>
          <table:table-cell table:formula="of:=[.BA41]+0.002" office:value-type="float" office:value="0.054" calcext:value-type="float">
            <text:p>0.054</text:p>
          </table:table-cell>
          <table:table-cell table:formula="of:=[.BA42]*[.$D$6]" office:value-type="float" office:value="2.71433605270158" calcext:value-type="float">
            <text:p>2.714</text:p>
          </table:table-cell>
          <table:table-cell table:formula="of:=[.D$25]*[.$Z$5]*MAGNET([.D$24]+[.BB42])+[.E$25]*[.$Z$5]*MAGNET([.E$24]+[.BB42])+[.F$25]*[.$Z$5]*MAGNET([.F$24]+[.BB42])+[.G$25]*[.$Z$5]*MAGNET([.G$24]+[.BB42])+[.H$25]*[.$Z$5]*MAGNET([.H$24]+[.BB42])+[.I$25]*[.$Z$5]*MAGNET([.I$24]+[.BB42])+[.J$25]*[.$Z$5]*MAGNET([.J$24]+[.BB42])+[.K$25]*[.$Z$5]*MAGNET([.K$24]+[.BB42])+[.L$25]*[.$Z$5]*MAGNET([.L$24]+[.BB42])+[.M$25]*[.$Z$5]*MAGNET([.M$24]+[.BB42])+[.N$25]*[.$Z$5]*MAGNET([.N$24]+[.BB42])+[.O$25]*[.$Z$5]*MAGNET([.O$24]+[.BB42])+[.P$25]*[.$Z$5]*MAGNET([.P$24]+[.BB42])+[.Q$25]*[.$Z$5]*MAGNET([.Q$24]+[.BB42])+[.R$25]*[.$Z$5]*MAGNET([.R$24]+[.BB42])+[.S$25]*[.$Z$5]*MAGNET([.S$24]+[.BB42])+[.T$25]*[.$Z$5]*MAGNET([.T$24]+[.BB42])+[.U$25]*[.$Z$5]*MAGNET([.U$24]+[.BB42])+[.V$25]*[.$Z$5]*MAGNET([.V$24]+[.BB42])+[.W$25]*[.$Z$5]*MAGNET([.W$24]+[.BB42])+[.X$25]*[.$Z$5]*MAGNET([.X$24]+[.BB42])+[.Y$25]*[.$Z$5]*MAGNET([.Y$24]+[.BB42])+[.Z$25]*[.$Z$5]*MAGNET([.Z$24]+[.BB42])+[.AA$25]*[.$Z$5]*MAGNET([.AA$24]+[.BB42])+[.AB$25]*[.$Z$5]*MAGNET([.AB$24]+[.BB42])+[.AC$25]*[.$Z$5]*MAGNET([.AC$24]+[.BB42])+[.AD$25]*[.$Z$5]*MAGNET([.AD$24]+[.BB42])+[.AE$25]*[.$Z$5]*MAGNET([.AE$24]+[.BB42])+[.AF$25]*[.$Z$5]*MAGNET([.AF$24]+[.BB42])+[.AG$25]*[.$Z$5]*MAGNET([.AG$24]+[.BB42])+[.AH$25]*[.$Z$5]*MAGNET([.AH$24]+[.BB42]) +[.AI$25]*[.$Z$5]*MAGNET([.AI$24]+[.BB42]) +[.AJ$25]*[.$Z$5]*MAGNET([.AJ$24]+[.BB42]) +[.AK$25]*[.$Z$5]*MAGNET([.AK$24]+[.BB42]) +[.AL$25]*[.$Z$5]*MAGNET([.AL$24]+[.BB42]) +[.AM$25]*[.$Z$5]*MAGNET([.AM$24]+[.BB42]) +[.AN$25]*[.$Z$5]*MAGNET([.AN$24]+[.BB42]) +[.AO$25]*[.$Z$5]*MAGNET([.AO$24]+[.BB42])+RAND()*[.$BC$13]+[.AP$25]*[.$Z$5]*MAGNET([.AP$24]+[.BB42])&#10;+[.AQ$25]*[.$Z$5]*MAGNET([.AQ$24]+[.BB42])&#10;+[.AR$25]*[.$Z$5]*MAGNET([.AR$24]+[.BB42])&#10;+[.AS$25]*[.$Z$5]*MAGNET([.AS$24]+[.BB42])&#10;+[.AT$25]*[.$Z$5]*MAGNET([.AT$24]+[.BB42])&#10;+[.AU$25]*[.$Z$5]*MAGNET([.AU$24]+[.BB42])&#10;+[.AV$25]*[.$Z$5]*MAGNET([.AV$24]+[.BB42])&#10;+[.AW$25]*[.$Z$5]*MAGNET([.AW$24]+[.BB42])&#10;+[.AX$25]*[.$Z$5]*MAGNET([.AX$24]+[.BB42])&#10;+[.AY$25]*[.$Z$5]*MAGNET([.AY$24]+[.BB42])" office:value-type="float" office:value="89.6065175385571" calcext:value-type="float">
            <text:p>89.61</text:p>
          </table:table-cell>
          <table:table-cell table:style-name="ce70" table:formula="of:=[.E$26]*[.$Z$5]*MAGNET([.E$24]+[.$BB42])+[.F$26]*[.$Z$5]*MAGNET([.F$24]+[.$BB42])+[.G$26]*[.$Z$5]*MAGNET([.G$24]+[.$BB42])+[.H$26]*[.$Z$5]*MAGNET([.H$24]+[.$BB42])+[.I$26]*[.$Z$5]*MAGNET([.I$24]+[.$BB42])+[.J$26]*[.$Z$5]*MAGNET([.J$24]+[.$BB42])+[.K$26]*[.$Z$5]*MAGNET([.K$24]+[.$BB42])+[.L$26]*[.$Z$5]*MAGNET([.L$24]+[.$BB42])+[.M$26]*[.$Z$5]*MAGNET([.M$24]+[.$BB42])+[.N$26]*[.$Z$5]*MAGNET([.N$24]+[.$BB42])+[.O$26]*[.$Z$5]*MAGNET([.O$24]+[.$BB42])+[.P$26]*[.$Z$5]*MAGNET([.P$24]+[.$BB42])+[.Q$26]*[.$Z$5]*MAGNET([.Q$24]+[.$BB42])+[.R$26]*[.$Z$5]*MAGNET([.R$24]+[.$BB42])+[.S$26]*[.$Z$5]*MAGNET([.S$24]+[.$BB42])+[.T$26]*[.$Z$5]*MAGNET([.T$24]+[.$BB42])+[.U$26]*[.$Z$5]*MAGNET([.U$24]+[.$BB42])+[.V$26]*[.$Z$5]*MAGNET([.V$24]+[.$BB42])+[.W$26]*[.$Z$5]*MAGNET([.W$24]+[.$BB42])+[.X$26]*[.$Z$5]*MAGNET([.X$24]+[.$BB42])+[.Y$26]*[.$Z$5]*MAGNET([.Y$24]+[.$BB42])+[.Z$26]*[.$Z$5]*MAGNET([.Z$24]+[.$BB42])+[.AA$26]*[.$Z$5]*MAGNET([.AA$24]+[.$BB42])+[.AB$26]*[.$Z$5]*MAGNET([.AB$24]+[.$BB42])+[.AC$26]*[.$Z$5]*MAGNET([.AC$24]+[.$BB42])+[.AD$26]*[.$Z$5]*MAGNET([.AD$24]+[.$BB42])+[.AE$26]*[.$Z$5]*MAGNET([.AE$24]+[.$BB42])+[.AF$26]*[.$Z$5]*MAGNET([.AF$24]+[.$BB42])+[.AG$26]*[.$Z$5]*MAGNET([.AG$24]+[.$BB42])+[.D$26]*[.$Z$5]*MAGNET([.D$24]+[.$BB42])+[.AH$26]*[.$Z$5]*MAGNET([.AH$24]+[.BB42]) +[.AI$26]*[.$Z$5]*MAGNET([.AI$24]+[.BB42]) +[.AJ$26]*[.$Z$5]*MAGNET([.AJ$24]+[.BB42]) +[.AK$26]*[.$Z$5]*MAGNET([.AK$24]+[.BB42]) +[.AL$26]*[.$Z$5]*MAGNET([.AL$24]+[.BB42]) +[.AM$26]*[.$Z$5]*MAGNET([.AM$24]+[.BB42]) +[.AN$26]*[.$Z$5]*MAGNET([.AN$24]+[.BB42]) +[.AO$26]*[.$Z$5]*MAGNET([.AO$24]+[.BB42]) +[.AP$26]*[.$Z$5]*MAGNET([.AP$24]+[.$BB42])&#10;+[.AQ$26]*[.$Z$5]*MAGNET([.AQ$24]+[.$BB42])&#10;+[.AR$26]*[.$Z$5]*MAGNET([.AR$24]+[.$BB42])&#10;+[.AS$26]*[.$Z$5]*MAGNET([.AS$24]+[.$BB42])&#10;+[.AT$26]*[.$Z$5]*MAGNET([.AT$24]+[.$BB42])&#10;+[.AU$26]*[.$Z$5]*MAGNET([.AU$24]+[.$BB42])&#10;+[.AV$26]*[.$Z$5]*MAGNET([.AV$24]+[.$BB42])&#10;+[.AW$26]*[.$Z$5]*MAGNET([.AW$24]+[.$BB42])&#10;+[.AX$26]*[.$Z$5]*MAGNET([.AX$24]+[.$BB42])&#10;+[.AY$26]*[.$Z$5]*MAGNET([.AY$24]+[.$BB42]) +RAND()*[.$BD$13]" office:value-type="float" office:value="-86.6880680054275" calcext:value-type="float">
            <text:p>-86.69</text:p>
          </table:table-cell>
          <table:table-cell table:style-name="ce71" table:formula="of:=[.E$27]*[.$Z$5]*MAGNET([.E$24]+[.$BB42])+[.F$27]*[.$Z$5]*MAGNET([.F$24]+[.$BB42])+[.G$27]*[.$Z$5]*MAGNET([.G$24]+[.$BB42])+[.H$27]*[.$Z$5]*MAGNET([.H$24]+[.$BB42])+[.I$27]*[.$Z$5]*MAGNET([.I$24]+[.$BB42])+[.J$27]*[.$Z$5]*MAGNET([.J$24]+[.$BB42])+[.K$27]*[.$Z$5]*MAGNET([.K$24]+[.$BB42])+[.L$27]*[.$Z$5]*MAGNET([.L$24]+[.$BB42])+[.M$27]*[.$Z$5]*MAGNET([.M$24]+[.$BB42])+[.N$27]*[.$Z$5]*MAGNET([.N$24]+[.$BB42])+[.O$27]*[.$Z$5]*MAGNET([.O$24]+[.$BB42])+[.P$27]*[.$Z$5]*MAGNET([.P$24]+[.$BB42])+[.Q$27]*[.$Z$5]*MAGNET([.Q$24]+[.$BB42])+[.R$27]*[.$Z$5]*MAGNET([.R$24]+[.$BB42])+[.S$27]*[.$Z$5]*MAGNET([.S$24]+[.$BB42])+[.T$27]*[.$Z$5]*MAGNET([.T$24]+[.$BB42])+[.U$27]*[.$Z$5]*MAGNET([.U$24]+[.$BB42])+[.V$27]*[.$Z$5]*MAGNET([.V$24]+[.$BB42])+[.W$27]*[.$Z$5]*MAGNET([.W$24]+[.$BB42])+[.X$27]*[.$Z$5]*MAGNET([.X$24]+[.$BB42])+[.Y$27]*[.$Z$5]*MAGNET([.Y$24]+[.$BB42])+[.Z$27]*[.$Z$5]*MAGNET([.Z$24]+[.$BB42])+[.AA$27]*[.$Z$5]*MAGNET([.AA$24]+[.$BB42])+[.AB$27]*[.$Z$5]*MAGNET([.AB$24]+[.$BB42])+[.AC$27]*[.$Z$5]*MAGNET([.AC$24]+[.$BB42])+[.AD$27]*[.$Z$5]*MAGNET([.AD$24]+[.$BB42])+[.AE$27]*[.$Z$5]*MAGNET([.AE$24]+[.$BB42])+[.AF$27]*[.$Z$5]*MAGNET([.AF$24]+[.$BB42])+[.AG$27]*[.$Z$5]*MAGNET([.AG$24]+[.$BB42])+[.D$27]*[.$Z$5]*MAGNET([.D$24]+[.$BB42])+[.AH$27]*[.$Z$5]*MAGNET([.AH$24]+[.BB42]) +[.AI$27]*[.$Z$5]*MAGNET([.AI$24]+[.BB42]) +[.AJ$27]*[.$Z$5]*MAGNET([.AJ$24]+[.BB42]) +[.AK$27]*[.$Z$5]*MAGNET([.AK$24]+[.BB42]) +[.AL$27]*[.$Z$5]*MAGNET([.AL$24]+[.BB42]) +[.AM$27]*[.$Z$5]*MAGNET([.AM$24]+[.BB42]) +[.AN$27]*[.$Z$5]*MAGNET([.AN$24]+[.BB42]) +[.AO$27]*[.$Z$5]*MAGNET([.AO$24]+[.BB42]) +[.AP$27]*[.$Z$5]*MAGNET([.AP$24]+[.$BB42])&#10;+[.AQ$27]*[.$Z$5]*MAGNET([.AQ$24]+[.$BB42])&#10;+[.AR$27]*[.$Z$5]*MAGNET([.AR$24]+[.$BB42])&#10;+[.AS$27]*[.$Z$5]*MAGNET([.AS$24]+[.$BB42])&#10;+[.AT$27]*[.$Z$5]*MAGNET([.AT$24]+[.$BB42])&#10;+[.AU$27]*[.$Z$5]*MAGNET([.AU$24]+[.$BB42])&#10;+[.AV$27]*[.$Z$5]*MAGNET([.AV$24]+[.$BB42])&#10;+[.AW$27]*[.$Z$5]*MAGNET([.AW$24]+[.$BB42])&#10;+[.AX$27]*[.$Z$5]*MAGNET([.AX$24]+[.$BB42])&#10;+[.AY$27]*[.$Z$5]*MAGNET([.AY$24]+[.$BB42]) +RAND()*[.$BE$13]" office:value-type="float" office:value="14.0813728349952" calcext:value-type="float">
            <text:p>14.0813728349952</text:p>
          </table:table-cell>
          <table:table-cell table:style-name="ce71" table:formula="of:=[.E$28]*[.$Z$5]*MAGNET([.E$24]+[.$BB42])+[.F$28]*[.$Z$5]*MAGNET([.F$24]+[.$BB42])+[.G$28]*[.$Z$5]*MAGNET([.G$24]+[.$BB42])+[.H$28]*[.$Z$5]*MAGNET([.H$24]+[.$BB42])+[.I$28]*[.$Z$5]*MAGNET([.I$24]+[.$BB42])+[.J$28]*[.$Z$5]*MAGNET([.J$24]+[.$BB42])+[.K$28]*[.$Z$5]*MAGNET([.K$24]+[.$BB42])+[.L$28]*[.$Z$5]*MAGNET([.L$24]+[.$BB42])+[.M$28]*[.$Z$5]*MAGNET([.M$24]+[.$BB42])+[.N$28]*[.$Z$5]*MAGNET([.N$24]+[.$BB42])+[.O$28]*[.$Z$5]*MAGNET([.O$24]+[.$BB42])+[.P$28]*[.$Z$5]*MAGNET([.P$24]+[.$BB42])+[.Q$28]*[.$Z$5]*MAGNET([.Q$24]+[.$BB42])+[.R$28]*[.$Z$5]*MAGNET([.R$24]+[.$BB42])+[.S$28]*[.$Z$5]*MAGNET([.S$24]+[.$BB42])+[.T$28]*[.$Z$5]*MAGNET([.T$24]+[.$BB42])+[.U$28]*[.$Z$5]*MAGNET([.U$24]+[.$BB42])+[.V$28]*[.$Z$5]*MAGNET([.V$24]+[.$BB42])+[.W$28]*[.$Z$5]*MAGNET([.W$24]+[.$BB42])+[.X$28]*[.$Z$5]*MAGNET([.X$24]+[.$BB42])+[.Y$28]*[.$Z$5]*MAGNET([.Y$24]+[.$BB42])+[.Z$28]*[.$Z$5]*MAGNET([.Z$24]+[.$BB42])+[.AA$28]*[.$Z$5]*MAGNET([.AA$24]+[.$BB42])+[.AB$28]*[.$Z$5]*MAGNET([.AB$24]+[.$BB42])+[.AC$28]*[.$Z$5]*MAGNET([.AC$24]+[.$BB42])+[.AD$28]*[.$Z$5]*MAGNET([.AD$24]+[.$BB42])+[.AE$28]*[.$Z$5]*MAGNET([.AE$24]+[.$BB42])+[.AF$28]*[.$Z$5]*MAGNET([.AF$24]+[.$BB42])+[.AG$28]*[.$Z$5]*MAGNET([.AG$24]+[.$BB42])+[.D$28]*[.$Z$5]*MAGNET([.D$24]+[.$BB42])+[.AH$28]*[.$Z$5]*MAGNET([.AH$24]+[.BB42]) +[.AI$28]*[.$Z$5]*MAGNET([.AI$24]+[.BB42]) +[.AJ$28]*[.$Z$5]*MAGNET([.AJ$24]+[.BB42]) +[.AK$28]*[.$Z$5]*MAGNET([.AK$24]+[.BB42]) +[.AL$28]*[.$Z$5]*MAGNET([.AL$24]+[.BB42]) +[.AM$28]*[.$Z$5]*MAGNET([.AM$24]+[.BB42]) +[.AN$28]*[.$Z$5]*MAGNET([.AN$24]+[.BB42]) +[.AO$28]*[.$Z$5]*MAGNET([.AO$24]+[.BB42]) +[.AP$28]*[.$Z$5]*MAGNET([.AP$24]+[.$BB42])&#10;+[.AQ$28]*[.$Z$5]*MAGNET([.AQ$24]+[.$BB42])&#10;+[.AR$28]*[.$Z$5]*MAGNET([.AR$24]+[.$BB42])&#10;+[.AS$28]*[.$Z$5]*MAGNET([.AS$24]+[.$BB42])&#10;+[.AT$28]*[.$Z$5]*MAGNET([.AT$24]+[.$BB42])&#10;+[.AU$28]*[.$Z$5]*MAGNET([.AU$24]+[.$BB42])&#10;+[.AV$28]*[.$Z$5]*MAGNET([.AV$24]+[.$BB42])&#10;+[.AW$28]*[.$Z$5]*MAGNET([.AW$24]+[.$BB42])&#10;+[.AX$28]*[.$Z$5]*MAGNET([.AX$24]+[.$BB42])&#10;+[.AY$28]*[.$Z$5]*MAGNET([.AY$24]+[.$BB42]) +RAND()*[.$BF$13]" office:value-type="float" office:value="2.65257623220727" calcext:value-type="float">
            <text:p>2.65257623220727</text:p>
          </table:table-cell>
          <table:table-cell table:style-name="ce71" table:formula="of:=[.E$29]*[.$Z$5]*MAGNET([.E$24]+[.$BB42])+[.F$29]*[.$Z$5]*MAGNET([.F$24]+[.$BB42])+[.G$29]*[.$Z$5]*MAGNET([.G$24]+[.$BB42])+[.H$29]*[.$Z$5]*MAGNET([.H$24]+[.$BB42])+[.I$29]*[.$Z$5]*MAGNET([.I$24]+[.$BB42])+[.J$29]*[.$Z$5]*MAGNET([.J$24]+[.$BB42])+[.K$29]*[.$Z$5]*MAGNET([.K$24]+[.$BB42])+[.L$29]*[.$Z$5]*MAGNET([.L$24]+[.$BB42])+[.M$29]*[.$Z$5]*MAGNET([.M$24]+[.$BB42])+[.N$29]*[.$Z$5]*MAGNET([.N$24]+[.$BB42])+[.O$29]*[.$Z$5]*MAGNET([.O$24]+[.$BB42])+[.P$29]*[.$Z$5]*MAGNET([.P$24]+[.$BB42])+[.Q$29]*[.$Z$5]*MAGNET([.Q$24]+[.$BB42])+[.R$29]*[.$Z$5]*MAGNET([.R$24]+[.$BB42])+[.S$29]*[.$Z$5]*MAGNET([.S$24]+[.$BB42])+[.T$29]*[.$Z$5]*MAGNET([.T$24]+[.$BB42])+[.U$29]*[.$Z$5]*MAGNET([.U$24]+[.$BB42])+[.V$29]*[.$Z$5]*MAGNET([.V$24]+[.$BB42])+[.W$29]*[.$Z$5]*MAGNET([.W$24]+[.$BB42])+[.X$29]*[.$Z$5]*MAGNET([.X$24]+[.$BB42])+[.Y$29]*[.$Z$5]*MAGNET([.Y$24]+[.$BB42])+[.Z$29]*[.$Z$5]*MAGNET([.Z$24]+[.$BB42])+[.AA$29]*[.$Z$5]*MAGNET([.AA$24]+[.$BB42])+[.AB$29]*[.$Z$5]*MAGNET([.AB$24]+[.$BB42])+[.AC$29]*[.$Z$5]*MAGNET([.AC$24]+[.$BB42])+[.AD$29]*[.$Z$5]*MAGNET([.AD$24]+[.$BB42])+[.AE$29]*[.$Z$5]*MAGNET([.AE$24]+[.$BB42])+[.AF$29]*[.$Z$5]*MAGNET([.AF$24]+[.$BB42])+[.AG$29]*[.$Z$5]*MAGNET([.AG$24]+[.$BB42])+[.D$29]*[.$Z$5]*MAGNET([.D$24]+[.$BB42])+[.AH$29]*[.$Z$5]*MAGNET([.AH$24]+[.BB42]) +[.AI$29]*[.$Z$5]*MAGNET([.AI$24]+[.BB42]) +[.AJ$29]*[.$Z$5]*MAGNET([.AJ$24]+[.BB42]) +[.AK$29]*[.$Z$5]*MAGNET([.AK$24]+[.BB42]) +[.AL$29]*[.$Z$5]*MAGNET([.AL$24]+[.BB42]) +[.AM$29]*[.$Z$5]*MAGNET([.AM$24]+[.BB42]) +[.AN$29]*[.$Z$5]*MAGNET([.AN$24]+[.BB42]) +[.AO$29]*[.$Z$5]*MAGNET([.AO$24]+[.BB42]) +[.AP$29]*[.$Z$5]*MAGNET([.AP$24]+[.$BB42])&#10;+[.AQ$29]*[.$Z$5]*MAGNET([.AQ$24]+[.$BB42])&#10;+[.AR$29]*[.$Z$5]*MAGNET([.AR$24]+[.$BB42])&#10;+[.AS$29]*[.$Z$5]*MAGNET([.AS$24]+[.$BB42])&#10;+[.AT$29]*[.$Z$5]*MAGNET([.AT$24]+[.$BB42])&#10;+[.AU$29]*[.$Z$5]*MAGNET([.AU$24]+[.$BB42])&#10;+[.AV$29]*[.$Z$5]*MAGNET([.AV$24]+[.$BB42])&#10;+[.AW$29]*[.$Z$5]*MAGNET([.AW$24]+[.$BB42])&#10;+[.AX$29]*[.$Z$5]*MAGNET([.AX$24]+[.$BB42])&#10;+[.AY$29]*[.$Z$5]*MAGNET([.AY$24]+[.$BB42]) +RAND()*[.$BG$13]" office:value-type="float" office:value="-7.09399808907968" calcext:value-type="float">
            <text:p>-7.09399808907968</text:p>
          </table:table-cell>
          <table:table-cell table:style-name="ce71" table:formula="of:=[.E$30]*[.$Z$5]*MAGNET([.E$24]+[.$BB42])+[.F$30]*[.$Z$5]*MAGNET([.F$24]+[.$BB42])+[.G$30]*[.$Z$5]*MAGNET([.G$24]+[.$BB42])+[.H$30]*[.$Z$5]*MAGNET([.H$24]+[.$BB42])+[.I$30]*[.$Z$5]*MAGNET([.I$24]+[.$BB42])+[.J$30]*[.$Z$5]*MAGNET([.J$24]+[.$BB42])+[.K$30]*[.$Z$5]*MAGNET([.K$24]+[.$BB42])+[.L$30]*[.$Z$5]*MAGNET([.L$24]+[.$BB42])+[.M$30]*[.$Z$5]*MAGNET([.M$24]+[.$BB42])+[.N$30]*[.$Z$5]*MAGNET([.N$24]+[.$BB42])+[.O$30]*[.$Z$5]*MAGNET([.O$24]+[.$BB42])+[.P$30]*[.$Z$5]*MAGNET([.P$24]+[.$BB42])+[.Q$30]*[.$Z$5]*MAGNET([.Q$24]+[.$BB42])+[.R$30]*[.$Z$5]*MAGNET([.R$24]+[.$BB42])+[.S$30]*[.$Z$5]*MAGNET([.S$24]+[.$BB42])+[.T$30]*[.$Z$5]*MAGNET([.T$24]+[.$BB42])+[.U$30]*[.$Z$5]*MAGNET([.U$24]+[.$BB42])+[.V$30]*[.$Z$5]*MAGNET([.V$24]+[.$BB42])+[.W$30]*[.$Z$5]*MAGNET([.W$24]+[.$BB42])+[.X$30]*[.$Z$5]*MAGNET([.X$24]+[.$BB42])+[.Y$30]*[.$Z$5]*MAGNET([.Y$24]+[.$BB42])+[.Z$30]*[.$Z$5]*MAGNET([.Z$24]+[.$BB42])+[.AA$30]*[.$Z$5]*MAGNET([.AA$24]+[.$BB42])+[.AB$30]*[.$Z$5]*MAGNET([.AB$24]+[.$BB42])+[.AC$30]*[.$Z$5]*MAGNET([.AC$24]+[.$BB42])+[.AD$30]*[.$Z$5]*MAGNET([.AD$24]+[.$BB42])+[.AE$30]*[.$Z$5]*MAGNET([.AE$24]+[.$BB42])+[.AF$30]*[.$Z$5]*MAGNET([.AF$24]+[.$BB42])+[.AG$30]*[.$Z$5]*MAGNET([.AG$24]+[.$BB42])+[.D$30]*[.$Z$5]*MAGNET([.D$24]+[.$BB42])+[.AH$30]*[.$Z$5]*MAGNET([.AH$24]+[.BB42]) +[.AI$30]*[.$Z$5]*MAGNET([.AI$24]+[.BB42]) +[.AJ$30]*[.$Z$5]*MAGNET([.AJ$24]+[.BB42]) +[.AK$30]*[.$Z$5]*MAGNET([.AK$24]+[.BB42]) +[.AL$30]*[.$Z$5]*MAGNET([.AL$24]+[.BB42]) +[.AM$30]*[.$Z$5]*MAGNET([.AM$24]+[.BB42]) +[.AN$30]*[.$Z$5]*MAGNET([.AN$24]+[.BB42]) +[.AO$30]*[.$Z$5]*MAGNET([.AO$24]+[.BB42]) +[.AP$30]*[.$Z$5]*MAGNET([.AP$24]+[.$BB42])&#10;+[.AQ$30]*[.$Z$5]*MAGNET([.AQ$24]+[.$BB42])&#10;+[.AR$30]*[.$Z$5]*MAGNET([.AR$24]+[.$BB42])&#10;+[.AS$30]*[.$Z$5]*MAGNET([.AS$24]+[.$BB42])&#10;+[.AT$30]*[.$Z$5]*MAGNET([.AT$24]+[.$BB42])&#10;+[.AU$30]*[.$Z$5]*MAGNET([.AU$24]+[.$BB42])&#10;+[.AV$30]*[.$Z$5]*MAGNET([.AV$24]+[.$BB42])&#10;+[.AW$30]*[.$Z$5]*MAGNET([.AW$24]+[.$BB42])&#10;+[.AX$30]*[.$Z$5]*MAGNET([.AX$24]+[.$BB42])&#10;+[.AY$30]*[.$Z$5]*MAGNET([.AY$24]+[.$BB42]) +RAND()*[.$BH$13]" office:value-type="float" office:value="0" calcext:value-type="float">
            <text:p>0</text:p>
          </table:table-cell>
          <table:table-cell table:style-name="ce71" table:formula="of:=[.E$31]*[.$Z$5]*MAGNET([.E$24]+[.$BB42])+[.F$31]*[.$Z$5]*MAGNET([.F$24]+[.$BB42])+[.G$31]*[.$Z$5]*MAGNET([.G$24]+[.$BB42])+[.H$31]*[.$Z$5]*MAGNET([.H$24]+[.$BB42])+[.I$31]*[.$Z$5]*MAGNET([.I$24]+[.$BB42])+[.J$31]*[.$Z$5]*MAGNET([.J$24]+[.$BB42])+[.K$31]*[.$Z$5]*MAGNET([.K$24]+[.$BB42])+[.L$31]*[.$Z$5]*MAGNET([.L$24]+[.$BB42])+[.M$31]*[.$Z$5]*MAGNET([.M$24]+[.$BB42])+[.N$31]*[.$Z$5]*MAGNET([.N$24]+[.$BB42])+[.O$31]*[.$Z$5]*MAGNET([.O$24]+[.$BB42])+[.P$31]*[.$Z$5]*MAGNET([.P$24]+[.$BB42])+[.Q$31]*[.$Z$5]*MAGNET([.Q$24]+[.$BB42])+[.R$31]*[.$Z$5]*MAGNET([.R$24]+[.$BB42])+[.S$31]*[.$Z$5]*MAGNET([.S$24]+[.$BB42])+[.T$31]*[.$Z$5]*MAGNET([.T$24]+[.$BB42])+[.U$31]*[.$Z$5]*MAGNET([.U$24]+[.$BB42])+[.V$31]*[.$Z$5]*MAGNET([.V$24]+[.$BB42])+[.W$31]*[.$Z$5]*MAGNET([.W$24]+[.$BB42])+[.X$31]*[.$Z$5]*MAGNET([.X$24]+[.$BB42])+[.Y$31]*[.$Z$5]*MAGNET([.Y$24]+[.$BB42])+[.Z$31]*[.$Z$5]*MAGNET([.Z$24]+[.$BB42])+[.AA$31]*[.$Z$5]*MAGNET([.AA$24]+[.$BB42])+[.AB$31]*[.$Z$5]*MAGNET([.AB$24]+[.$BB42])+[.AC$31]*[.$Z$5]*MAGNET([.AC$24]+[.$BB42])+[.AD$31]*[.$Z$5]*MAGNET([.AD$24]+[.$BB42])+[.AE$31]*[.$Z$5]*MAGNET([.AE$24]+[.$BB42])+[.AF$31]*[.$Z$5]*MAGNET([.AF$24]+[.$BB42])+[.AG$31]*[.$Z$5]*MAGNET([.AG$24]+[.$BB42])+[.D$31]*[.$Z$5]*MAGNET([.D$24]+[.$BB42])+[.AH$31]*[.$Z$5]*MAGNET([.AH$24]+[.BB42]) +[.AI$31]*[.$Z$5]*MAGNET([.AI$24]+[.BB42]) +[.AJ$31]*[.$Z$5]*MAGNET([.AJ$24]+[.BB42]) +[.AK$31]*[.$Z$5]*MAGNET([.AK$24]+[.BB42]) +[.AL$31]*[.$Z$5]*MAGNET([.AL$24]+[.BB42]) +[.AM$31]*[.$Z$5]*MAGNET([.AM$24]+[.BB42]) +[.AN$31]*[.$Z$5]*MAGNET([.AN$24]+[.BB42]) +[.AO$31]*[.$Z$5]*MAGNET([.AO$24]+[.BB42]) +[.AP$31]*[.$Z$5]*MAGNET([.AP$24]+[.$BB42])&#10;+[.AQ$31]*[.$Z$5]*MAGNET([.AQ$24]+[.$BB42])&#10;+[.AR$31]*[.$Z$5]*MAGNET([.AR$24]+[.$BB42])&#10;+[.AS$31]*[.$Z$5]*MAGNET([.AS$24]+[.$BB42])&#10;+[.AT$31]*[.$Z$5]*MAGNET([.AT$24]+[.$BB42])&#10;+[.AU$31]*[.$Z$5]*MAGNET([.AU$24]+[.$BB42])&#10;+[.AV$31]*[.$Z$5]*MAGNET([.AV$24]+[.$BB42])&#10;+[.AW$31]*[.$Z$5]*MAGNET([.AW$24]+[.$BB42])&#10;+[.AX$31]*[.$Z$5]*MAGNET([.AX$24]+[.$BB42])&#10;+[.AY$31]*[.$Z$5]*MAGNET([.AY$24]+[.$BB42]) +RAND()*[.$BI$13]" office:value-type="float" office:value="0" calcext:value-type="float">
            <text:p>0</text:p>
          </table:table-cell>
          <table:table-cell table:style-name="ce71" table:formula="of:=[.E$32]*[.$Z$5]*MAGNET([.E$24]+[.$BB42])+[.F$32]*[.$Z$5]*MAGNET([.F$24]+[.$BB42])+[.G$32]*[.$Z$5]*MAGNET([.G$24]+[.$BB42])+[.H$32]*[.$Z$5]*MAGNET([.H$24]+[.$BB42])+[.I$32]*[.$Z$5]*MAGNET([.I$24]+[.$BB42])+[.J$32]*[.$Z$5]*MAGNET([.J$24]+[.$BB42])+[.K$32]*[.$Z$5]*MAGNET([.K$24]+[.$BB42])+[.L$32]*[.$Z$5]*MAGNET([.L$24]+[.$BB42])+[.M$32]*[.$Z$5]*MAGNET([.M$24]+[.$BB42])+[.N$32]*[.$Z$5]*MAGNET([.N$24]+[.$BB42])+[.O$32]*[.$Z$5]*MAGNET([.O$24]+[.$BB42])+[.P$32]*[.$Z$5]*MAGNET([.P$24]+[.$BB42])+[.Q$32]*[.$Z$5]*MAGNET([.Q$24]+[.$BB42])+[.R$32]*[.$Z$5]*MAGNET([.R$24]+[.$BB42])+[.S$32]*[.$Z$5]*MAGNET([.S$24]+[.$BB42])+[.T$32]*[.$Z$5]*MAGNET([.T$24]+[.$BB42])+[.U$32]*[.$Z$5]*MAGNET([.U$24]+[.$BB42])+[.V$32]*[.$Z$5]*MAGNET([.V$24]+[.$BB42])+[.W$32]*[.$Z$5]*MAGNET([.W$24]+[.$BB42])+[.X$32]*[.$Z$5]*MAGNET([.X$24]+[.$BB42])+[.Y$32]*[.$Z$5]*MAGNET([.Y$24]+[.$BB42])+[.Z$32]*[.$Z$5]*MAGNET([.Z$24]+[.$BB42])+[.AA$32]*[.$Z$5]*MAGNET([.AA$24]+[.$BB42])+[.AB$32]*[.$Z$5]*MAGNET([.AB$24]+[.$BB42])+[.AC$32]*[.$Z$5]*MAGNET([.AC$24]+[.$BB42])+[.AD$32]*[.$Z$5]*MAGNET([.AD$24]+[.$BB42])+[.AE$32]*[.$Z$5]*MAGNET([.AE$24]+[.$BB42])+[.AF$32]*[.$Z$5]*MAGNET([.AF$24]+[.$BB42])+[.AG$32]*[.$Z$5]*MAGNET([.AG$24]+[.$BB42])+[.D$32]*[.$Z$5]*MAGNET([.D$24]+[.$BB42])+[.AH$32]*[.$Z$5]*MAGNET([.AH$24]+[.BB42]) +[.AI$32]*[.$Z$5]*MAGNET([.AI$24]+[.BB42]) +[.AJ$32]*[.$Z$5]*MAGNET([.AJ$24]+[.BB42]) +[.AK$32]*[.$Z$5]*MAGNET([.AK$24]+[.BB42]) +[.AL$32]*[.$Z$5]*MAGNET([.AL$24]+[.BB42]) +[.AM$32]*[.$Z$5]*MAGNET([.AM$24]+[.BB42]) +[.AN$32]*[.$Z$5]*MAGNET([.AN$24]+[.BB42]) +[.AO$32]*[.$Z$5]*MAGNET([.AO$24]+[.BB42]) +[.AP$32]*[.$Z$5]*MAGNET([.AP$24]+[.$BB42])&#10;+[.AQ$32]*[.$Z$5]*MAGNET([.AQ$24]+[.$BB42])&#10;+[.AR$32]*[.$Z$5]*MAGNET([.AR$24]+[.$BB42])&#10;+[.AS$32]*[.$Z$5]*MAGNET([.AS$24]+[.$BB42])&#10;+[.AT$32]*[.$Z$5]*MAGNET([.AT$24]+[.$BB42])&#10;+[.AU$32]*[.$Z$5]*MAGNET([.AU$24]+[.$BB42])&#10;+[.AV$32]*[.$Z$5]*MAGNET([.AV$24]+[.$BB42])&#10;+[.AW$32]*[.$Z$5]*MAGNET([.AW$24]+[.$BB42])&#10;+[.AX$32]*[.$Z$5]*MAGNET([.AX$24]+[.$BB42])&#10;+[.AY$32]*[.$Z$5]*MAGNET([.AY$24]+[.$BB4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formula="of:=COUNTIF([.D$15:.D$22];&quot;=&quot; &amp;[.$C43])" office:value-type="float" office:value="0" calcext:value-type="float">
            <text:p>0</text:p>
          </table:table-cell>
          <table:table-cell table:formula="of:=COUNTIF([.E$15:.E$22];&quot;=&quot; &amp;[.$C43])" office:value-type="float" office:value="0" calcext:value-type="float">
            <text:p>0</text:p>
          </table:table-cell>
          <table:table-cell table:formula="of:=COUNTIF([.F$15:.F$22];&quot;=&quot; &amp;[.$C43])" office:value-type="float" office:value="0" calcext:value-type="float">
            <text:p>0</text:p>
          </table:table-cell>
          <table:table-cell table:formula="of:=COUNTIF([.G$15:.G$22];&quot;=&quot; &amp;[.$C43])" office:value-type="float" office:value="0" calcext:value-type="float">
            <text:p>0</text:p>
          </table:table-cell>
          <table:table-cell table:formula="of:=COUNTIF([.H$15:.H$22];&quot;=&quot; &amp;[.$C43])" office:value-type="float" office:value="0" calcext:value-type="float">
            <text:p>0</text:p>
          </table:table-cell>
          <table:table-cell table:formula="of:=COUNTIF([.I$15:.I$22];&quot;=&quot; &amp;[.$C43])" office:value-type="float" office:value="0" calcext:value-type="float">
            <text:p>0</text:p>
          </table:table-cell>
          <table:table-cell table:formula="of:=COUNTIF([.J$15:.J$22];&quot;=&quot; &amp;[.$C43])" office:value-type="float" office:value="0" calcext:value-type="float">
            <text:p>0</text:p>
          </table:table-cell>
          <table:table-cell table:formula="of:=COUNTIF([.K$15:.K$22];&quot;=&quot; &amp;[.$C43])" office:value-type="float" office:value="0" calcext:value-type="float">
            <text:p>0</text:p>
          </table:table-cell>
          <table:table-cell table:formula="of:=COUNTIF([.L$15:.L$22];&quot;=&quot; &amp;[.$C43])" office:value-type="float" office:value="0" calcext:value-type="float">
            <text:p>0</text:p>
          </table:table-cell>
          <table:table-cell table:formula="of:=COUNTIF([.M$15:.M$22];&quot;=&quot; &amp;[.$C43])" office:value-type="float" office:value="0" calcext:value-type="float">
            <text:p>0</text:p>
          </table:table-cell>
          <table:table-cell table:formula="of:=COUNTIF([.N$15:.N$22];&quot;=&quot; &amp;[.$C43])" office:value-type="float" office:value="0" calcext:value-type="float">
            <text:p>0</text:p>
          </table:table-cell>
          <table:table-cell table:formula="of:=COUNTIF([.O$15:.O$22];&quot;=&quot; &amp;[.$C43])" office:value-type="float" office:value="0" calcext:value-type="float">
            <text:p>0</text:p>
          </table:table-cell>
          <table:table-cell table:formula="of:=COUNTIF([.P$15:.P$22];&quot;=&quot; &amp;[.$C43])" office:value-type="float" office:value="0" calcext:value-type="float">
            <text:p>0</text:p>
          </table:table-cell>
          <table:table-cell table:formula="of:=COUNTIF([.Q$15:.Q$22];&quot;=&quot; &amp;[.$C43])" office:value-type="float" office:value="0" calcext:value-type="float">
            <text:p>0</text:p>
          </table:table-cell>
          <table:table-cell table:formula="of:=COUNTIF([.R$15:.R$22];&quot;=&quot; &amp;[.$C43])" office:value-type="float" office:value="0" calcext:value-type="float">
            <text:p>0</text:p>
          </table:table-cell>
          <table:table-cell table:formula="of:=COUNTIF([.S$15:.S$22];&quot;=&quot; &amp;[.$C43])" office:value-type="float" office:value="0" calcext:value-type="float">
            <text:p>0</text:p>
          </table:table-cell>
          <table:table-cell table:formula="of:=COUNTIF([.T$15:.T$22];&quot;=&quot; &amp;[.$C43])" office:value-type="float" office:value="0" calcext:value-type="float">
            <text:p>0</text:p>
          </table:table-cell>
          <table:table-cell table:formula="of:=COUNTIF([.U$15:.U$22];&quot;=&quot; &amp;[.$C43])" office:value-type="float" office:value="0" calcext:value-type="float">
            <text:p>0</text:p>
          </table:table-cell>
          <table:table-cell table:formula="of:=COUNTIF([.V$15:.V$22];&quot;=&quot; &amp;[.$C43])" office:value-type="float" office:value="0" calcext:value-type="float">
            <text:p>0</text:p>
          </table:table-cell>
          <table:table-cell table:formula="of:=COUNTIF([.W$15:.W$22];&quot;=&quot; &amp;[.$C43])" office:value-type="float" office:value="0" calcext:value-type="float">
            <text:p>0</text:p>
          </table:table-cell>
          <table:table-cell table:formula="of:=COUNTIF([.X$15:.X$22];&quot;=&quot; &amp;[.$C43])" office:value-type="float" office:value="0" calcext:value-type="float">
            <text:p>0</text:p>
          </table:table-cell>
          <table:table-cell table:formula="of:=COUNTIF([.Y$15:.Y$22];&quot;=&quot; &amp;[.$C43])" office:value-type="float" office:value="0" calcext:value-type="float">
            <text:p>0</text:p>
          </table:table-cell>
          <table:table-cell table:formula="of:=COUNTIF([.Z$15:.Z$22];&quot;=&quot; &amp;[.$C43])" office:value-type="float" office:value="0" calcext:value-type="float">
            <text:p>0</text:p>
          </table:table-cell>
          <table:table-cell table:formula="of:=COUNTIF([.AA$15:.AA$22];&quot;=&quot; &amp;[.$C43])" office:value-type="float" office:value="0" calcext:value-type="float">
            <text:p>0</text:p>
          </table:table-cell>
          <table:table-cell table:formula="of:=COUNTIF([.AB$15:.AB$22];&quot;=&quot; &amp;[.$C43])" office:value-type="float" office:value="0" calcext:value-type="float">
            <text:p>0</text:p>
          </table:table-cell>
          <table:table-cell table:formula="of:=COUNTIF([.AC$15:.AC$22];&quot;=&quot; &amp;[.$C43])" office:value-type="float" office:value="0" calcext:value-type="float">
            <text:p>0</text:p>
          </table:table-cell>
          <table:table-cell table:formula="of:=COUNTIF([.AD$15:.AD$22];&quot;=&quot; &amp;[.$C43])" office:value-type="float" office:value="0" calcext:value-type="float">
            <text:p>0</text:p>
          </table:table-cell>
          <table:table-cell table:formula="of:=COUNTIF([.AE$15:.AE$22];&quot;=&quot; &amp;[.$C43])" office:value-type="float" office:value="0" calcext:value-type="float">
            <text:p>0</text:p>
          </table:table-cell>
          <table:table-cell table:formula="of:=COUNTIF([.AF$15:.AF$22];&quot;=&quot; &amp;[.$C43])" office:value-type="float" office:value="0" calcext:value-type="float">
            <text:p>0</text:p>
          </table:table-cell>
          <table:table-cell table:formula="of:=COUNTIF([.AG$15:.AG$22];&quot;=&quot; &amp;[.$C43])" office:value-type="float" office:value="0" calcext:value-type="float">
            <text:p>0</text:p>
          </table:table-cell>
          <table:table-cell table:formula="of:=COUNTIF([.AH$15:.AH$22];&quot;=&quot; &amp;[.$C43])" office:value-type="float" office:value="0" calcext:value-type="float">
            <text:p>0</text:p>
          </table:table-cell>
          <table:table-cell table:formula="of:=COUNTIF([.AI$15:.AI$22];&quot;=&quot; &amp;[.$C43])" office:value-type="float" office:value="0" calcext:value-type="float">
            <text:p>0</text:p>
          </table:table-cell>
          <table:table-cell table:formula="of:=COUNTIF([.AJ$15:.AJ$22];&quot;=&quot; &amp;[.$C43])" office:value-type="float" office:value="4" calcext:value-type="float">
            <text:p>4</text:p>
          </table:table-cell>
          <table:table-cell table:formula="of:=COUNTIF([.AK$15:.AK$22];&quot;=&quot; &amp;[.$C43])" office:value-type="float" office:value="0" calcext:value-type="float">
            <text:p>0</text:p>
          </table:table-cell>
          <table:table-cell table:formula="of:=COUNTIF([.AL$15:.AL$22];&quot;=&quot; &amp;[.$C43])" office:value-type="float" office:value="0" calcext:value-type="float">
            <text:p>0</text:p>
          </table:table-cell>
          <table:table-cell table:formula="of:=COUNTIF([.AM$15:.AM$22];&quot;=&quot; &amp;[.$C43])" office:value-type="float" office:value="0" calcext:value-type="float">
            <text:p>0</text:p>
          </table:table-cell>
          <table:table-cell table:formula="of:=COUNTIF([.AN$15:.AN$22];&quot;=&quot; &amp;[.$C43])" office:value-type="float" office:value="0" calcext:value-type="float">
            <text:p>0</text:p>
          </table:table-cell>
          <table:table-cell table:formula="of:=COUNTIF([.AO$15:.AO$22];&quot;=&quot; &amp;[.$C43])" office:value-type="float" office:value="0" calcext:value-type="float">
            <text:p>0</text:p>
          </table:table-cell>
          <table:table-cell table:formula="of:=COUNTIF([.AP$15:.AP$22];&quot;=&quot; &amp;[.$C43])" office:value-type="float" office:value="0" calcext:value-type="float">
            <text:p>0</text:p>
          </table:table-cell>
          <table:table-cell table:formula="of:=COUNTIF([.AQ$15:.AQ$22];&quot;=&quot; &amp;[.$C43])" office:value-type="float" office:value="0" calcext:value-type="float">
            <text:p>0</text:p>
          </table:table-cell>
          <table:table-cell table:formula="of:=COUNTIF([.AR$15:.AR$22];&quot;=&quot; &amp;[.$C43])" office:value-type="float" office:value="0" calcext:value-type="float">
            <text:p>0</text:p>
          </table:table-cell>
          <table:table-cell table:formula="of:=COUNTIF([.AS$15:.AS$22];&quot;=&quot; &amp;[.$C43])" office:value-type="float" office:value="0" calcext:value-type="float">
            <text:p>0</text:p>
          </table:table-cell>
          <table:table-cell table:formula="of:=COUNTIF([.AT$15:.AT$22];&quot;=&quot; &amp;[.$C43])" office:value-type="float" office:value="0" calcext:value-type="float">
            <text:p>0</text:p>
          </table:table-cell>
          <table:table-cell table:formula="of:=COUNTIF([.AU$15:.AU$22];&quot;=&quot; &amp;[.$C43])" office:value-type="float" office:value="0" calcext:value-type="float">
            <text:p>0</text:p>
          </table:table-cell>
          <table:table-cell table:formula="of:=COUNTIF([.AV$15:.AV$22];&quot;=&quot; &amp;[.$C43])" office:value-type="float" office:value="0" calcext:value-type="float">
            <text:p>0</text:p>
          </table:table-cell>
          <table:table-cell table:formula="of:=COUNTIF([.AW$15:.AW$22];&quot;=&quot; &amp;[.$C43])" office:value-type="float" office:value="0" calcext:value-type="float">
            <text:p>0</text:p>
          </table:table-cell>
          <table:table-cell table:formula="of:=COUNTIF([.AX$15:.AX$22];&quot;=&quot; &amp;[.$C43])" office:value-type="float" office:value="0" calcext:value-type="float">
            <text:p>0</text:p>
          </table:table-cell>
          <table:table-cell table:formula="of:=COUNTIF([.AY$15:.AY$22];&quot;=&quot; &amp;[.$C43])" office:value-type="float" office:value="0" calcext:value-type="float">
            <text:p>0</text:p>
          </table:table-cell>
          <table:table-cell table:style-name="ce66"/>
          <table:table-cell table:formula="of:=[.BA42]+0.002" office:value-type="float" office:value="0.056" calcext:value-type="float">
            <text:p>0.056</text:p>
          </table:table-cell>
          <table:table-cell table:formula="of:=[.BA43]*[.$D$6]" office:value-type="float" office:value="2.81486701761646" calcext:value-type="float">
            <text:p>2.815</text:p>
          </table:table-cell>
          <table:table-cell table:formula="of:=[.D$25]*[.$Z$5]*MAGNET([.D$24]+[.BB43])+[.E$25]*[.$Z$5]*MAGNET([.E$24]+[.BB43])+[.F$25]*[.$Z$5]*MAGNET([.F$24]+[.BB43])+[.G$25]*[.$Z$5]*MAGNET([.G$24]+[.BB43])+[.H$25]*[.$Z$5]*MAGNET([.H$24]+[.BB43])+[.I$25]*[.$Z$5]*MAGNET([.I$24]+[.BB43])+[.J$25]*[.$Z$5]*MAGNET([.J$24]+[.BB43])+[.K$25]*[.$Z$5]*MAGNET([.K$24]+[.BB43])+[.L$25]*[.$Z$5]*MAGNET([.L$24]+[.BB43])+[.M$25]*[.$Z$5]*MAGNET([.M$24]+[.BB43])+[.N$25]*[.$Z$5]*MAGNET([.N$24]+[.BB43])+[.O$25]*[.$Z$5]*MAGNET([.O$24]+[.BB43])+[.P$25]*[.$Z$5]*MAGNET([.P$24]+[.BB43])+[.Q$25]*[.$Z$5]*MAGNET([.Q$24]+[.BB43])+[.R$25]*[.$Z$5]*MAGNET([.R$24]+[.BB43])+[.S$25]*[.$Z$5]*MAGNET([.S$24]+[.BB43])+[.T$25]*[.$Z$5]*MAGNET([.T$24]+[.BB43])+[.U$25]*[.$Z$5]*MAGNET([.U$24]+[.BB43])+[.V$25]*[.$Z$5]*MAGNET([.V$24]+[.BB43])+[.W$25]*[.$Z$5]*MAGNET([.W$24]+[.BB43])+[.X$25]*[.$Z$5]*MAGNET([.X$24]+[.BB43])+[.Y$25]*[.$Z$5]*MAGNET([.Y$24]+[.BB43])+[.Z$25]*[.$Z$5]*MAGNET([.Z$24]+[.BB43])+[.AA$25]*[.$Z$5]*MAGNET([.AA$24]+[.BB43])+[.AB$25]*[.$Z$5]*MAGNET([.AB$24]+[.BB43])+[.AC$25]*[.$Z$5]*MAGNET([.AC$24]+[.BB43])+[.AD$25]*[.$Z$5]*MAGNET([.AD$24]+[.BB43])+[.AE$25]*[.$Z$5]*MAGNET([.AE$24]+[.BB43])+[.AF$25]*[.$Z$5]*MAGNET([.AF$24]+[.BB43])+[.AG$25]*[.$Z$5]*MAGNET([.AG$24]+[.BB43])+[.AH$25]*[.$Z$5]*MAGNET([.AH$24]+[.BB43]) +[.AI$25]*[.$Z$5]*MAGNET([.AI$24]+[.BB43]) +[.AJ$25]*[.$Z$5]*MAGNET([.AJ$24]+[.BB43]) +[.AK$25]*[.$Z$5]*MAGNET([.AK$24]+[.BB43]) +[.AL$25]*[.$Z$5]*MAGNET([.AL$24]+[.BB43]) +[.AM$25]*[.$Z$5]*MAGNET([.AM$24]+[.BB43]) +[.AN$25]*[.$Z$5]*MAGNET([.AN$24]+[.BB43]) +[.AO$25]*[.$Z$5]*MAGNET([.AO$24]+[.BB43])+RAND()*[.$BC$13]+[.AP$25]*[.$Z$5]*MAGNET([.AP$24]+[.BB43])&#10;+[.AQ$25]*[.$Z$5]*MAGNET([.AQ$24]+[.BB43])&#10;+[.AR$25]*[.$Z$5]*MAGNET([.AR$24]+[.BB43])&#10;+[.AS$25]*[.$Z$5]*MAGNET([.AS$24]+[.BB43])&#10;+[.AT$25]*[.$Z$5]*MAGNET([.AT$24]+[.BB43])&#10;+[.AU$25]*[.$Z$5]*MAGNET([.AU$24]+[.BB43])&#10;+[.AV$25]*[.$Z$5]*MAGNET([.AV$24]+[.BB43])&#10;+[.AW$25]*[.$Z$5]*MAGNET([.AW$24]+[.BB43])&#10;+[.AX$25]*[.$Z$5]*MAGNET([.AX$24]+[.BB43])&#10;+[.AY$25]*[.$Z$5]*MAGNET([.AY$24]+[.BB43])" office:value-type="float" office:value="79.4833693955055" calcext:value-type="float">
            <text:p>79.48</text:p>
          </table:table-cell>
          <table:table-cell table:style-name="ce70" table:formula="of:=[.E$26]*[.$Z$5]*MAGNET([.E$24]+[.$BB43])+[.F$26]*[.$Z$5]*MAGNET([.F$24]+[.$BB43])+[.G$26]*[.$Z$5]*MAGNET([.G$24]+[.$BB43])+[.H$26]*[.$Z$5]*MAGNET([.H$24]+[.$BB43])+[.I$26]*[.$Z$5]*MAGNET([.I$24]+[.$BB43])+[.J$26]*[.$Z$5]*MAGNET([.J$24]+[.$BB43])+[.K$26]*[.$Z$5]*MAGNET([.K$24]+[.$BB43])+[.L$26]*[.$Z$5]*MAGNET([.L$24]+[.$BB43])+[.M$26]*[.$Z$5]*MAGNET([.M$24]+[.$BB43])+[.N$26]*[.$Z$5]*MAGNET([.N$24]+[.$BB43])+[.O$26]*[.$Z$5]*MAGNET([.O$24]+[.$BB43])+[.P$26]*[.$Z$5]*MAGNET([.P$24]+[.$BB43])+[.Q$26]*[.$Z$5]*MAGNET([.Q$24]+[.$BB43])+[.R$26]*[.$Z$5]*MAGNET([.R$24]+[.$BB43])+[.S$26]*[.$Z$5]*MAGNET([.S$24]+[.$BB43])+[.T$26]*[.$Z$5]*MAGNET([.T$24]+[.$BB43])+[.U$26]*[.$Z$5]*MAGNET([.U$24]+[.$BB43])+[.V$26]*[.$Z$5]*MAGNET([.V$24]+[.$BB43])+[.W$26]*[.$Z$5]*MAGNET([.W$24]+[.$BB43])+[.X$26]*[.$Z$5]*MAGNET([.X$24]+[.$BB43])+[.Y$26]*[.$Z$5]*MAGNET([.Y$24]+[.$BB43])+[.Z$26]*[.$Z$5]*MAGNET([.Z$24]+[.$BB43])+[.AA$26]*[.$Z$5]*MAGNET([.AA$24]+[.$BB43])+[.AB$26]*[.$Z$5]*MAGNET([.AB$24]+[.$BB43])+[.AC$26]*[.$Z$5]*MAGNET([.AC$24]+[.$BB43])+[.AD$26]*[.$Z$5]*MAGNET([.AD$24]+[.$BB43])+[.AE$26]*[.$Z$5]*MAGNET([.AE$24]+[.$BB43])+[.AF$26]*[.$Z$5]*MAGNET([.AF$24]+[.$BB43])+[.AG$26]*[.$Z$5]*MAGNET([.AG$24]+[.$BB43])+[.D$26]*[.$Z$5]*MAGNET([.D$24]+[.$BB43])+[.AH$26]*[.$Z$5]*MAGNET([.AH$24]+[.BB43]) +[.AI$26]*[.$Z$5]*MAGNET([.AI$24]+[.BB43]) +[.AJ$26]*[.$Z$5]*MAGNET([.AJ$24]+[.BB43]) +[.AK$26]*[.$Z$5]*MAGNET([.AK$24]+[.BB43]) +[.AL$26]*[.$Z$5]*MAGNET([.AL$24]+[.BB43]) +[.AM$26]*[.$Z$5]*MAGNET([.AM$24]+[.BB43]) +[.AN$26]*[.$Z$5]*MAGNET([.AN$24]+[.BB43]) +[.AO$26]*[.$Z$5]*MAGNET([.AO$24]+[.BB43]) +[.AP$26]*[.$Z$5]*MAGNET([.AP$24]+[.$BB43])&#10;+[.AQ$26]*[.$Z$5]*MAGNET([.AQ$24]+[.$BB43])&#10;+[.AR$26]*[.$Z$5]*MAGNET([.AR$24]+[.$BB43])&#10;+[.AS$26]*[.$Z$5]*MAGNET([.AS$24]+[.$BB43])&#10;+[.AT$26]*[.$Z$5]*MAGNET([.AT$24]+[.$BB43])&#10;+[.AU$26]*[.$Z$5]*MAGNET([.AU$24]+[.$BB43])&#10;+[.AV$26]*[.$Z$5]*MAGNET([.AV$24]+[.$BB43])&#10;+[.AW$26]*[.$Z$5]*MAGNET([.AW$24]+[.$BB43])&#10;+[.AX$26]*[.$Z$5]*MAGNET([.AX$24]+[.$BB43])&#10;+[.AY$26]*[.$Z$5]*MAGNET([.AY$24]+[.$BB43]) +RAND()*[.$BD$13]" office:value-type="float" office:value="-86.1238071402754" calcext:value-type="float">
            <text:p>-86.12</text:p>
          </table:table-cell>
          <table:table-cell table:style-name="ce71" table:formula="of:=[.E$27]*[.$Z$5]*MAGNET([.E$24]+[.$BB43])+[.F$27]*[.$Z$5]*MAGNET([.F$24]+[.$BB43])+[.G$27]*[.$Z$5]*MAGNET([.G$24]+[.$BB43])+[.H$27]*[.$Z$5]*MAGNET([.H$24]+[.$BB43])+[.I$27]*[.$Z$5]*MAGNET([.I$24]+[.$BB43])+[.J$27]*[.$Z$5]*MAGNET([.J$24]+[.$BB43])+[.K$27]*[.$Z$5]*MAGNET([.K$24]+[.$BB43])+[.L$27]*[.$Z$5]*MAGNET([.L$24]+[.$BB43])+[.M$27]*[.$Z$5]*MAGNET([.M$24]+[.$BB43])+[.N$27]*[.$Z$5]*MAGNET([.N$24]+[.$BB43])+[.O$27]*[.$Z$5]*MAGNET([.O$24]+[.$BB43])+[.P$27]*[.$Z$5]*MAGNET([.P$24]+[.$BB43])+[.Q$27]*[.$Z$5]*MAGNET([.Q$24]+[.$BB43])+[.R$27]*[.$Z$5]*MAGNET([.R$24]+[.$BB43])+[.S$27]*[.$Z$5]*MAGNET([.S$24]+[.$BB43])+[.T$27]*[.$Z$5]*MAGNET([.T$24]+[.$BB43])+[.U$27]*[.$Z$5]*MAGNET([.U$24]+[.$BB43])+[.V$27]*[.$Z$5]*MAGNET([.V$24]+[.$BB43])+[.W$27]*[.$Z$5]*MAGNET([.W$24]+[.$BB43])+[.X$27]*[.$Z$5]*MAGNET([.X$24]+[.$BB43])+[.Y$27]*[.$Z$5]*MAGNET([.Y$24]+[.$BB43])+[.Z$27]*[.$Z$5]*MAGNET([.Z$24]+[.$BB43])+[.AA$27]*[.$Z$5]*MAGNET([.AA$24]+[.$BB43])+[.AB$27]*[.$Z$5]*MAGNET([.AB$24]+[.$BB43])+[.AC$27]*[.$Z$5]*MAGNET([.AC$24]+[.$BB43])+[.AD$27]*[.$Z$5]*MAGNET([.AD$24]+[.$BB43])+[.AE$27]*[.$Z$5]*MAGNET([.AE$24]+[.$BB43])+[.AF$27]*[.$Z$5]*MAGNET([.AF$24]+[.$BB43])+[.AG$27]*[.$Z$5]*MAGNET([.AG$24]+[.$BB43])+[.D$27]*[.$Z$5]*MAGNET([.D$24]+[.$BB43])+[.AH$27]*[.$Z$5]*MAGNET([.AH$24]+[.BB43]) +[.AI$27]*[.$Z$5]*MAGNET([.AI$24]+[.BB43]) +[.AJ$27]*[.$Z$5]*MAGNET([.AJ$24]+[.BB43]) +[.AK$27]*[.$Z$5]*MAGNET([.AK$24]+[.BB43]) +[.AL$27]*[.$Z$5]*MAGNET([.AL$24]+[.BB43]) +[.AM$27]*[.$Z$5]*MAGNET([.AM$24]+[.BB43]) +[.AN$27]*[.$Z$5]*MAGNET([.AN$24]+[.BB43]) +[.AO$27]*[.$Z$5]*MAGNET([.AO$24]+[.BB43]) +[.AP$27]*[.$Z$5]*MAGNET([.AP$24]+[.$BB43])&#10;+[.AQ$27]*[.$Z$5]*MAGNET([.AQ$24]+[.$BB43])&#10;+[.AR$27]*[.$Z$5]*MAGNET([.AR$24]+[.$BB43])&#10;+[.AS$27]*[.$Z$5]*MAGNET([.AS$24]+[.$BB43])&#10;+[.AT$27]*[.$Z$5]*MAGNET([.AT$24]+[.$BB43])&#10;+[.AU$27]*[.$Z$5]*MAGNET([.AU$24]+[.$BB43])&#10;+[.AV$27]*[.$Z$5]*MAGNET([.AV$24]+[.$BB43])&#10;+[.AW$27]*[.$Z$5]*MAGNET([.AW$24]+[.$BB43])&#10;+[.AX$27]*[.$Z$5]*MAGNET([.AX$24]+[.$BB43])&#10;+[.AY$27]*[.$Z$5]*MAGNET([.AY$24]+[.$BB43]) +RAND()*[.$BE$13]" office:value-type="float" office:value="24.4610321001719" calcext:value-type="float">
            <text:p>24.4610321001719</text:p>
          </table:table-cell>
          <table:table-cell table:style-name="ce71" table:formula="of:=[.E$28]*[.$Z$5]*MAGNET([.E$24]+[.$BB43])+[.F$28]*[.$Z$5]*MAGNET([.F$24]+[.$BB43])+[.G$28]*[.$Z$5]*MAGNET([.G$24]+[.$BB43])+[.H$28]*[.$Z$5]*MAGNET([.H$24]+[.$BB43])+[.I$28]*[.$Z$5]*MAGNET([.I$24]+[.$BB43])+[.J$28]*[.$Z$5]*MAGNET([.J$24]+[.$BB43])+[.K$28]*[.$Z$5]*MAGNET([.K$24]+[.$BB43])+[.L$28]*[.$Z$5]*MAGNET([.L$24]+[.$BB43])+[.M$28]*[.$Z$5]*MAGNET([.M$24]+[.$BB43])+[.N$28]*[.$Z$5]*MAGNET([.N$24]+[.$BB43])+[.O$28]*[.$Z$5]*MAGNET([.O$24]+[.$BB43])+[.P$28]*[.$Z$5]*MAGNET([.P$24]+[.$BB43])+[.Q$28]*[.$Z$5]*MAGNET([.Q$24]+[.$BB43])+[.R$28]*[.$Z$5]*MAGNET([.R$24]+[.$BB43])+[.S$28]*[.$Z$5]*MAGNET([.S$24]+[.$BB43])+[.T$28]*[.$Z$5]*MAGNET([.T$24]+[.$BB43])+[.U$28]*[.$Z$5]*MAGNET([.U$24]+[.$BB43])+[.V$28]*[.$Z$5]*MAGNET([.V$24]+[.$BB43])+[.W$28]*[.$Z$5]*MAGNET([.W$24]+[.$BB43])+[.X$28]*[.$Z$5]*MAGNET([.X$24]+[.$BB43])+[.Y$28]*[.$Z$5]*MAGNET([.Y$24]+[.$BB43])+[.Z$28]*[.$Z$5]*MAGNET([.Z$24]+[.$BB43])+[.AA$28]*[.$Z$5]*MAGNET([.AA$24]+[.$BB43])+[.AB$28]*[.$Z$5]*MAGNET([.AB$24]+[.$BB43])+[.AC$28]*[.$Z$5]*MAGNET([.AC$24]+[.$BB43])+[.AD$28]*[.$Z$5]*MAGNET([.AD$24]+[.$BB43])+[.AE$28]*[.$Z$5]*MAGNET([.AE$24]+[.$BB43])+[.AF$28]*[.$Z$5]*MAGNET([.AF$24]+[.$BB43])+[.AG$28]*[.$Z$5]*MAGNET([.AG$24]+[.$BB43])+[.D$28]*[.$Z$5]*MAGNET([.D$24]+[.$BB43])+[.AH$28]*[.$Z$5]*MAGNET([.AH$24]+[.BB43]) +[.AI$28]*[.$Z$5]*MAGNET([.AI$24]+[.BB43]) +[.AJ$28]*[.$Z$5]*MAGNET([.AJ$24]+[.BB43]) +[.AK$28]*[.$Z$5]*MAGNET([.AK$24]+[.BB43]) +[.AL$28]*[.$Z$5]*MAGNET([.AL$24]+[.BB43]) +[.AM$28]*[.$Z$5]*MAGNET([.AM$24]+[.BB43]) +[.AN$28]*[.$Z$5]*MAGNET([.AN$24]+[.BB43]) +[.AO$28]*[.$Z$5]*MAGNET([.AO$24]+[.BB43]) +[.AP$28]*[.$Z$5]*MAGNET([.AP$24]+[.$BB43])&#10;+[.AQ$28]*[.$Z$5]*MAGNET([.AQ$24]+[.$BB43])&#10;+[.AR$28]*[.$Z$5]*MAGNET([.AR$24]+[.$BB43])&#10;+[.AS$28]*[.$Z$5]*MAGNET([.AS$24]+[.$BB43])&#10;+[.AT$28]*[.$Z$5]*MAGNET([.AT$24]+[.$BB43])&#10;+[.AU$28]*[.$Z$5]*MAGNET([.AU$24]+[.$BB43])&#10;+[.AV$28]*[.$Z$5]*MAGNET([.AV$24]+[.$BB43])&#10;+[.AW$28]*[.$Z$5]*MAGNET([.AW$24]+[.$BB43])&#10;+[.AX$28]*[.$Z$5]*MAGNET([.AX$24]+[.$BB43])&#10;+[.AY$28]*[.$Z$5]*MAGNET([.AY$24]+[.$BB43]) +RAND()*[.$BF$13]" office:value-type="float" office:value="3.62200540929153" calcext:value-type="float">
            <text:p>3.62200540929153</text:p>
          </table:table-cell>
          <table:table-cell table:style-name="ce71" table:formula="of:=[.E$29]*[.$Z$5]*MAGNET([.E$24]+[.$BB43])+[.F$29]*[.$Z$5]*MAGNET([.F$24]+[.$BB43])+[.G$29]*[.$Z$5]*MAGNET([.G$24]+[.$BB43])+[.H$29]*[.$Z$5]*MAGNET([.H$24]+[.$BB43])+[.I$29]*[.$Z$5]*MAGNET([.I$24]+[.$BB43])+[.J$29]*[.$Z$5]*MAGNET([.J$24]+[.$BB43])+[.K$29]*[.$Z$5]*MAGNET([.K$24]+[.$BB43])+[.L$29]*[.$Z$5]*MAGNET([.L$24]+[.$BB43])+[.M$29]*[.$Z$5]*MAGNET([.M$24]+[.$BB43])+[.N$29]*[.$Z$5]*MAGNET([.N$24]+[.$BB43])+[.O$29]*[.$Z$5]*MAGNET([.O$24]+[.$BB43])+[.P$29]*[.$Z$5]*MAGNET([.P$24]+[.$BB43])+[.Q$29]*[.$Z$5]*MAGNET([.Q$24]+[.$BB43])+[.R$29]*[.$Z$5]*MAGNET([.R$24]+[.$BB43])+[.S$29]*[.$Z$5]*MAGNET([.S$24]+[.$BB43])+[.T$29]*[.$Z$5]*MAGNET([.T$24]+[.$BB43])+[.U$29]*[.$Z$5]*MAGNET([.U$24]+[.$BB43])+[.V$29]*[.$Z$5]*MAGNET([.V$24]+[.$BB43])+[.W$29]*[.$Z$5]*MAGNET([.W$24]+[.$BB43])+[.X$29]*[.$Z$5]*MAGNET([.X$24]+[.$BB43])+[.Y$29]*[.$Z$5]*MAGNET([.Y$24]+[.$BB43])+[.Z$29]*[.$Z$5]*MAGNET([.Z$24]+[.$BB43])+[.AA$29]*[.$Z$5]*MAGNET([.AA$24]+[.$BB43])+[.AB$29]*[.$Z$5]*MAGNET([.AB$24]+[.$BB43])+[.AC$29]*[.$Z$5]*MAGNET([.AC$24]+[.$BB43])+[.AD$29]*[.$Z$5]*MAGNET([.AD$24]+[.$BB43])+[.AE$29]*[.$Z$5]*MAGNET([.AE$24]+[.$BB43])+[.AF$29]*[.$Z$5]*MAGNET([.AF$24]+[.$BB43])+[.AG$29]*[.$Z$5]*MAGNET([.AG$24]+[.$BB43])+[.D$29]*[.$Z$5]*MAGNET([.D$24]+[.$BB43])+[.AH$29]*[.$Z$5]*MAGNET([.AH$24]+[.BB43]) +[.AI$29]*[.$Z$5]*MAGNET([.AI$24]+[.BB43]) +[.AJ$29]*[.$Z$5]*MAGNET([.AJ$24]+[.BB43]) +[.AK$29]*[.$Z$5]*MAGNET([.AK$24]+[.BB43]) +[.AL$29]*[.$Z$5]*MAGNET([.AL$24]+[.BB43]) +[.AM$29]*[.$Z$5]*MAGNET([.AM$24]+[.BB43]) +[.AN$29]*[.$Z$5]*MAGNET([.AN$24]+[.BB43]) +[.AO$29]*[.$Z$5]*MAGNET([.AO$24]+[.BB43]) +[.AP$29]*[.$Z$5]*MAGNET([.AP$24]+[.$BB43])&#10;+[.AQ$29]*[.$Z$5]*MAGNET([.AQ$24]+[.$BB43])&#10;+[.AR$29]*[.$Z$5]*MAGNET([.AR$24]+[.$BB43])&#10;+[.AS$29]*[.$Z$5]*MAGNET([.AS$24]+[.$BB43])&#10;+[.AT$29]*[.$Z$5]*MAGNET([.AT$24]+[.$BB43])&#10;+[.AU$29]*[.$Z$5]*MAGNET([.AU$24]+[.$BB43])&#10;+[.AV$29]*[.$Z$5]*MAGNET([.AV$24]+[.$BB43])&#10;+[.AW$29]*[.$Z$5]*MAGNET([.AW$24]+[.$BB43])&#10;+[.AX$29]*[.$Z$5]*MAGNET([.AX$24]+[.$BB43])&#10;+[.AY$29]*[.$Z$5]*MAGNET([.AY$24]+[.$BB43]) +RAND()*[.$BG$13]" office:value-type="float" office:value="-13.7494651644681" calcext:value-type="float">
            <text:p>-13.7494651644681</text:p>
          </table:table-cell>
          <table:table-cell table:style-name="ce71" table:formula="of:=[.E$30]*[.$Z$5]*MAGNET([.E$24]+[.$BB43])+[.F$30]*[.$Z$5]*MAGNET([.F$24]+[.$BB43])+[.G$30]*[.$Z$5]*MAGNET([.G$24]+[.$BB43])+[.H$30]*[.$Z$5]*MAGNET([.H$24]+[.$BB43])+[.I$30]*[.$Z$5]*MAGNET([.I$24]+[.$BB43])+[.J$30]*[.$Z$5]*MAGNET([.J$24]+[.$BB43])+[.K$30]*[.$Z$5]*MAGNET([.K$24]+[.$BB43])+[.L$30]*[.$Z$5]*MAGNET([.L$24]+[.$BB43])+[.M$30]*[.$Z$5]*MAGNET([.M$24]+[.$BB43])+[.N$30]*[.$Z$5]*MAGNET([.N$24]+[.$BB43])+[.O$30]*[.$Z$5]*MAGNET([.O$24]+[.$BB43])+[.P$30]*[.$Z$5]*MAGNET([.P$24]+[.$BB43])+[.Q$30]*[.$Z$5]*MAGNET([.Q$24]+[.$BB43])+[.R$30]*[.$Z$5]*MAGNET([.R$24]+[.$BB43])+[.S$30]*[.$Z$5]*MAGNET([.S$24]+[.$BB43])+[.T$30]*[.$Z$5]*MAGNET([.T$24]+[.$BB43])+[.U$30]*[.$Z$5]*MAGNET([.U$24]+[.$BB43])+[.V$30]*[.$Z$5]*MAGNET([.V$24]+[.$BB43])+[.W$30]*[.$Z$5]*MAGNET([.W$24]+[.$BB43])+[.X$30]*[.$Z$5]*MAGNET([.X$24]+[.$BB43])+[.Y$30]*[.$Z$5]*MAGNET([.Y$24]+[.$BB43])+[.Z$30]*[.$Z$5]*MAGNET([.Z$24]+[.$BB43])+[.AA$30]*[.$Z$5]*MAGNET([.AA$24]+[.$BB43])+[.AB$30]*[.$Z$5]*MAGNET([.AB$24]+[.$BB43])+[.AC$30]*[.$Z$5]*MAGNET([.AC$24]+[.$BB43])+[.AD$30]*[.$Z$5]*MAGNET([.AD$24]+[.$BB43])+[.AE$30]*[.$Z$5]*MAGNET([.AE$24]+[.$BB43])+[.AF$30]*[.$Z$5]*MAGNET([.AF$24]+[.$BB43])+[.AG$30]*[.$Z$5]*MAGNET([.AG$24]+[.$BB43])+[.D$30]*[.$Z$5]*MAGNET([.D$24]+[.$BB43])+[.AH$30]*[.$Z$5]*MAGNET([.AH$24]+[.BB43]) +[.AI$30]*[.$Z$5]*MAGNET([.AI$24]+[.BB43]) +[.AJ$30]*[.$Z$5]*MAGNET([.AJ$24]+[.BB43]) +[.AK$30]*[.$Z$5]*MAGNET([.AK$24]+[.BB43]) +[.AL$30]*[.$Z$5]*MAGNET([.AL$24]+[.BB43]) +[.AM$30]*[.$Z$5]*MAGNET([.AM$24]+[.BB43]) +[.AN$30]*[.$Z$5]*MAGNET([.AN$24]+[.BB43]) +[.AO$30]*[.$Z$5]*MAGNET([.AO$24]+[.BB43]) +[.AP$30]*[.$Z$5]*MAGNET([.AP$24]+[.$BB43])&#10;+[.AQ$30]*[.$Z$5]*MAGNET([.AQ$24]+[.$BB43])&#10;+[.AR$30]*[.$Z$5]*MAGNET([.AR$24]+[.$BB43])&#10;+[.AS$30]*[.$Z$5]*MAGNET([.AS$24]+[.$BB43])&#10;+[.AT$30]*[.$Z$5]*MAGNET([.AT$24]+[.$BB43])&#10;+[.AU$30]*[.$Z$5]*MAGNET([.AU$24]+[.$BB43])&#10;+[.AV$30]*[.$Z$5]*MAGNET([.AV$24]+[.$BB43])&#10;+[.AW$30]*[.$Z$5]*MAGNET([.AW$24]+[.$BB43])&#10;+[.AX$30]*[.$Z$5]*MAGNET([.AX$24]+[.$BB43])&#10;+[.AY$30]*[.$Z$5]*MAGNET([.AY$24]+[.$BB43]) +RAND()*[.$BH$13]" office:value-type="float" office:value="0" calcext:value-type="float">
            <text:p>0</text:p>
          </table:table-cell>
          <table:table-cell table:style-name="ce71" table:formula="of:=[.E$31]*[.$Z$5]*MAGNET([.E$24]+[.$BB43])+[.F$31]*[.$Z$5]*MAGNET([.F$24]+[.$BB43])+[.G$31]*[.$Z$5]*MAGNET([.G$24]+[.$BB43])+[.H$31]*[.$Z$5]*MAGNET([.H$24]+[.$BB43])+[.I$31]*[.$Z$5]*MAGNET([.I$24]+[.$BB43])+[.J$31]*[.$Z$5]*MAGNET([.J$24]+[.$BB43])+[.K$31]*[.$Z$5]*MAGNET([.K$24]+[.$BB43])+[.L$31]*[.$Z$5]*MAGNET([.L$24]+[.$BB43])+[.M$31]*[.$Z$5]*MAGNET([.M$24]+[.$BB43])+[.N$31]*[.$Z$5]*MAGNET([.N$24]+[.$BB43])+[.O$31]*[.$Z$5]*MAGNET([.O$24]+[.$BB43])+[.P$31]*[.$Z$5]*MAGNET([.P$24]+[.$BB43])+[.Q$31]*[.$Z$5]*MAGNET([.Q$24]+[.$BB43])+[.R$31]*[.$Z$5]*MAGNET([.R$24]+[.$BB43])+[.S$31]*[.$Z$5]*MAGNET([.S$24]+[.$BB43])+[.T$31]*[.$Z$5]*MAGNET([.T$24]+[.$BB43])+[.U$31]*[.$Z$5]*MAGNET([.U$24]+[.$BB43])+[.V$31]*[.$Z$5]*MAGNET([.V$24]+[.$BB43])+[.W$31]*[.$Z$5]*MAGNET([.W$24]+[.$BB43])+[.X$31]*[.$Z$5]*MAGNET([.X$24]+[.$BB43])+[.Y$31]*[.$Z$5]*MAGNET([.Y$24]+[.$BB43])+[.Z$31]*[.$Z$5]*MAGNET([.Z$24]+[.$BB43])+[.AA$31]*[.$Z$5]*MAGNET([.AA$24]+[.$BB43])+[.AB$31]*[.$Z$5]*MAGNET([.AB$24]+[.$BB43])+[.AC$31]*[.$Z$5]*MAGNET([.AC$24]+[.$BB43])+[.AD$31]*[.$Z$5]*MAGNET([.AD$24]+[.$BB43])+[.AE$31]*[.$Z$5]*MAGNET([.AE$24]+[.$BB43])+[.AF$31]*[.$Z$5]*MAGNET([.AF$24]+[.$BB43])+[.AG$31]*[.$Z$5]*MAGNET([.AG$24]+[.$BB43])+[.D$31]*[.$Z$5]*MAGNET([.D$24]+[.$BB43])+[.AH$31]*[.$Z$5]*MAGNET([.AH$24]+[.BB43]) +[.AI$31]*[.$Z$5]*MAGNET([.AI$24]+[.BB43]) +[.AJ$31]*[.$Z$5]*MAGNET([.AJ$24]+[.BB43]) +[.AK$31]*[.$Z$5]*MAGNET([.AK$24]+[.BB43]) +[.AL$31]*[.$Z$5]*MAGNET([.AL$24]+[.BB43]) +[.AM$31]*[.$Z$5]*MAGNET([.AM$24]+[.BB43]) +[.AN$31]*[.$Z$5]*MAGNET([.AN$24]+[.BB43]) +[.AO$31]*[.$Z$5]*MAGNET([.AO$24]+[.BB43]) +[.AP$31]*[.$Z$5]*MAGNET([.AP$24]+[.$BB43])&#10;+[.AQ$31]*[.$Z$5]*MAGNET([.AQ$24]+[.$BB43])&#10;+[.AR$31]*[.$Z$5]*MAGNET([.AR$24]+[.$BB43])&#10;+[.AS$31]*[.$Z$5]*MAGNET([.AS$24]+[.$BB43])&#10;+[.AT$31]*[.$Z$5]*MAGNET([.AT$24]+[.$BB43])&#10;+[.AU$31]*[.$Z$5]*MAGNET([.AU$24]+[.$BB43])&#10;+[.AV$31]*[.$Z$5]*MAGNET([.AV$24]+[.$BB43])&#10;+[.AW$31]*[.$Z$5]*MAGNET([.AW$24]+[.$BB43])&#10;+[.AX$31]*[.$Z$5]*MAGNET([.AX$24]+[.$BB43])&#10;+[.AY$31]*[.$Z$5]*MAGNET([.AY$24]+[.$BB43]) +RAND()*[.$BI$13]" office:value-type="float" office:value="0" calcext:value-type="float">
            <text:p>0</text:p>
          </table:table-cell>
          <table:table-cell table:style-name="ce71" table:formula="of:=[.E$32]*[.$Z$5]*MAGNET([.E$24]+[.$BB43])+[.F$32]*[.$Z$5]*MAGNET([.F$24]+[.$BB43])+[.G$32]*[.$Z$5]*MAGNET([.G$24]+[.$BB43])+[.H$32]*[.$Z$5]*MAGNET([.H$24]+[.$BB43])+[.I$32]*[.$Z$5]*MAGNET([.I$24]+[.$BB43])+[.J$32]*[.$Z$5]*MAGNET([.J$24]+[.$BB43])+[.K$32]*[.$Z$5]*MAGNET([.K$24]+[.$BB43])+[.L$32]*[.$Z$5]*MAGNET([.L$24]+[.$BB43])+[.M$32]*[.$Z$5]*MAGNET([.M$24]+[.$BB43])+[.N$32]*[.$Z$5]*MAGNET([.N$24]+[.$BB43])+[.O$32]*[.$Z$5]*MAGNET([.O$24]+[.$BB43])+[.P$32]*[.$Z$5]*MAGNET([.P$24]+[.$BB43])+[.Q$32]*[.$Z$5]*MAGNET([.Q$24]+[.$BB43])+[.R$32]*[.$Z$5]*MAGNET([.R$24]+[.$BB43])+[.S$32]*[.$Z$5]*MAGNET([.S$24]+[.$BB43])+[.T$32]*[.$Z$5]*MAGNET([.T$24]+[.$BB43])+[.U$32]*[.$Z$5]*MAGNET([.U$24]+[.$BB43])+[.V$32]*[.$Z$5]*MAGNET([.V$24]+[.$BB43])+[.W$32]*[.$Z$5]*MAGNET([.W$24]+[.$BB43])+[.X$32]*[.$Z$5]*MAGNET([.X$24]+[.$BB43])+[.Y$32]*[.$Z$5]*MAGNET([.Y$24]+[.$BB43])+[.Z$32]*[.$Z$5]*MAGNET([.Z$24]+[.$BB43])+[.AA$32]*[.$Z$5]*MAGNET([.AA$24]+[.$BB43])+[.AB$32]*[.$Z$5]*MAGNET([.AB$24]+[.$BB43])+[.AC$32]*[.$Z$5]*MAGNET([.AC$24]+[.$BB43])+[.AD$32]*[.$Z$5]*MAGNET([.AD$24]+[.$BB43])+[.AE$32]*[.$Z$5]*MAGNET([.AE$24]+[.$BB43])+[.AF$32]*[.$Z$5]*MAGNET([.AF$24]+[.$BB43])+[.AG$32]*[.$Z$5]*MAGNET([.AG$24]+[.$BB43])+[.D$32]*[.$Z$5]*MAGNET([.D$24]+[.$BB43])+[.AH$32]*[.$Z$5]*MAGNET([.AH$24]+[.BB43]) +[.AI$32]*[.$Z$5]*MAGNET([.AI$24]+[.BB43]) +[.AJ$32]*[.$Z$5]*MAGNET([.AJ$24]+[.BB43]) +[.AK$32]*[.$Z$5]*MAGNET([.AK$24]+[.BB43]) +[.AL$32]*[.$Z$5]*MAGNET([.AL$24]+[.BB43]) +[.AM$32]*[.$Z$5]*MAGNET([.AM$24]+[.BB43]) +[.AN$32]*[.$Z$5]*MAGNET([.AN$24]+[.BB43]) +[.AO$32]*[.$Z$5]*MAGNET([.AO$24]+[.BB43]) +[.AP$32]*[.$Z$5]*MAGNET([.AP$24]+[.$BB43])&#10;+[.AQ$32]*[.$Z$5]*MAGNET([.AQ$24]+[.$BB43])&#10;+[.AR$32]*[.$Z$5]*MAGNET([.AR$24]+[.$BB43])&#10;+[.AS$32]*[.$Z$5]*MAGNET([.AS$24]+[.$BB43])&#10;+[.AT$32]*[.$Z$5]*MAGNET([.AT$24]+[.$BB43])&#10;+[.AU$32]*[.$Z$5]*MAGNET([.AU$24]+[.$BB43])&#10;+[.AV$32]*[.$Z$5]*MAGNET([.AV$24]+[.$BB43])&#10;+[.AW$32]*[.$Z$5]*MAGNET([.AW$24]+[.$BB43])&#10;+[.AX$32]*[.$Z$5]*MAGNET([.AX$24]+[.$BB43])&#10;+[.AY$32]*[.$Z$5]*MAGNET([.AY$24]+[.$BB4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4" calcext:value-type="float">
            <text:p>-4</text:p>
          </table:table-cell>
          <table:table-cell table:formula="of:=COUNTIF([.D$15:.D$22];&quot;=&quot; &amp;[.$C44])" office:value-type="float" office:value="0" calcext:value-type="float">
            <text:p>0</text:p>
          </table:table-cell>
          <table:table-cell table:formula="of:=COUNTIF([.E$15:.E$22];&quot;=&quot; &amp;[.$C44])" office:value-type="float" office:value="0" calcext:value-type="float">
            <text:p>0</text:p>
          </table:table-cell>
          <table:table-cell table:formula="of:=COUNTIF([.F$15:.F$22];&quot;=&quot; &amp;[.$C44])" office:value-type="float" office:value="0" calcext:value-type="float">
            <text:p>0</text:p>
          </table:table-cell>
          <table:table-cell table:formula="of:=COUNTIF([.G$15:.G$22];&quot;=&quot; &amp;[.$C44])" office:value-type="float" office:value="0" calcext:value-type="float">
            <text:p>0</text:p>
          </table:table-cell>
          <table:table-cell table:formula="of:=COUNTIF([.H$15:.H$22];&quot;=&quot; &amp;[.$C44])" office:value-type="float" office:value="0" calcext:value-type="float">
            <text:p>0</text:p>
          </table:table-cell>
          <table:table-cell table:formula="of:=COUNTIF([.I$15:.I$22];&quot;=&quot; &amp;[.$C44])" office:value-type="float" office:value="0" calcext:value-type="float">
            <text:p>0</text:p>
          </table:table-cell>
          <table:table-cell table:formula="of:=COUNTIF([.J$15:.J$22];&quot;=&quot; &amp;[.$C44])" office:value-type="float" office:value="0" calcext:value-type="float">
            <text:p>0</text:p>
          </table:table-cell>
          <table:table-cell table:formula="of:=COUNTIF([.K$15:.K$22];&quot;=&quot; &amp;[.$C44])" office:value-type="float" office:value="0" calcext:value-type="float">
            <text:p>0</text:p>
          </table:table-cell>
          <table:table-cell table:formula="of:=COUNTIF([.L$15:.L$22];&quot;=&quot; &amp;[.$C44])" office:value-type="float" office:value="0" calcext:value-type="float">
            <text:p>0</text:p>
          </table:table-cell>
          <table:table-cell table:formula="of:=COUNTIF([.M$15:.M$22];&quot;=&quot; &amp;[.$C44])" office:value-type="float" office:value="0" calcext:value-type="float">
            <text:p>0</text:p>
          </table:table-cell>
          <table:table-cell table:formula="of:=COUNTIF([.N$15:.N$22];&quot;=&quot; &amp;[.$C44])" office:value-type="float" office:value="0" calcext:value-type="float">
            <text:p>0</text:p>
          </table:table-cell>
          <table:table-cell table:formula="of:=COUNTIF([.O$15:.O$22];&quot;=&quot; &amp;[.$C44])" office:value-type="float" office:value="0" calcext:value-type="float">
            <text:p>0</text:p>
          </table:table-cell>
          <table:table-cell table:formula="of:=COUNTIF([.P$15:.P$22];&quot;=&quot; &amp;[.$C44])" office:value-type="float" office:value="0" calcext:value-type="float">
            <text:p>0</text:p>
          </table:table-cell>
          <table:table-cell table:formula="of:=COUNTIF([.Q$15:.Q$22];&quot;=&quot; &amp;[.$C44])" office:value-type="float" office:value="0" calcext:value-type="float">
            <text:p>0</text:p>
          </table:table-cell>
          <table:table-cell table:formula="of:=COUNTIF([.R$15:.R$22];&quot;=&quot; &amp;[.$C44])" office:value-type="float" office:value="0" calcext:value-type="float">
            <text:p>0</text:p>
          </table:table-cell>
          <table:table-cell table:formula="of:=COUNTIF([.S$15:.S$22];&quot;=&quot; &amp;[.$C44])" office:value-type="float" office:value="0" calcext:value-type="float">
            <text:p>0</text:p>
          </table:table-cell>
          <table:table-cell table:formula="of:=COUNTIF([.T$15:.T$22];&quot;=&quot; &amp;[.$C44])" office:value-type="float" office:value="0" calcext:value-type="float">
            <text:p>0</text:p>
          </table:table-cell>
          <table:table-cell table:formula="of:=COUNTIF([.U$15:.U$22];&quot;=&quot; &amp;[.$C44])" office:value-type="float" office:value="0" calcext:value-type="float">
            <text:p>0</text:p>
          </table:table-cell>
          <table:table-cell table:formula="of:=COUNTIF([.V$15:.V$22];&quot;=&quot; &amp;[.$C44])" office:value-type="float" office:value="0" calcext:value-type="float">
            <text:p>0</text:p>
          </table:table-cell>
          <table:table-cell table:formula="of:=COUNTIF([.W$15:.W$22];&quot;=&quot; &amp;[.$C44])" office:value-type="float" office:value="0" calcext:value-type="float">
            <text:p>0</text:p>
          </table:table-cell>
          <table:table-cell table:formula="of:=COUNTIF([.X$15:.X$22];&quot;=&quot; &amp;[.$C44])" office:value-type="float" office:value="0" calcext:value-type="float">
            <text:p>0</text:p>
          </table:table-cell>
          <table:table-cell table:formula="of:=COUNTIF([.Y$15:.Y$22];&quot;=&quot; &amp;[.$C44])" office:value-type="float" office:value="0" calcext:value-type="float">
            <text:p>0</text:p>
          </table:table-cell>
          <table:table-cell table:formula="of:=COUNTIF([.Z$15:.Z$22];&quot;=&quot; &amp;[.$C44])" office:value-type="float" office:value="0" calcext:value-type="float">
            <text:p>0</text:p>
          </table:table-cell>
          <table:table-cell table:formula="of:=COUNTIF([.AA$15:.AA$22];&quot;=&quot; &amp;[.$C44])" office:value-type="float" office:value="0" calcext:value-type="float">
            <text:p>0</text:p>
          </table:table-cell>
          <table:table-cell table:formula="of:=COUNTIF([.AB$15:.AB$22];&quot;=&quot; &amp;[.$C44])" office:value-type="float" office:value="0" calcext:value-type="float">
            <text:p>0</text:p>
          </table:table-cell>
          <table:table-cell table:formula="of:=COUNTIF([.AC$15:.AC$22];&quot;=&quot; &amp;[.$C44])" office:value-type="float" office:value="0" calcext:value-type="float">
            <text:p>0</text:p>
          </table:table-cell>
          <table:table-cell table:formula="of:=COUNTIF([.AD$15:.AD$22];&quot;=&quot; &amp;[.$C44])" office:value-type="float" office:value="0" calcext:value-type="float">
            <text:p>0</text:p>
          </table:table-cell>
          <table:table-cell table:formula="of:=COUNTIF([.AE$15:.AE$22];&quot;=&quot; &amp;[.$C44])" office:value-type="float" office:value="0" calcext:value-type="float">
            <text:p>0</text:p>
          </table:table-cell>
          <table:table-cell table:formula="of:=COUNTIF([.AF$15:.AF$22];&quot;=&quot; &amp;[.$C44])" office:value-type="float" office:value="0" calcext:value-type="float">
            <text:p>0</text:p>
          </table:table-cell>
          <table:table-cell table:formula="of:=COUNTIF([.AG$15:.AG$22];&quot;=&quot; &amp;[.$C44])" office:value-type="float" office:value="0" calcext:value-type="float">
            <text:p>0</text:p>
          </table:table-cell>
          <table:table-cell table:formula="of:=COUNTIF([.AH$15:.AH$22];&quot;=&quot; &amp;[.$C44])" office:value-type="float" office:value="0" calcext:value-type="float">
            <text:p>0</text:p>
          </table:table-cell>
          <table:table-cell table:formula="of:=COUNTIF([.AI$15:.AI$22];&quot;=&quot; &amp;[.$C44])" office:value-type="float" office:value="0" calcext:value-type="float">
            <text:p>0</text:p>
          </table:table-cell>
          <table:table-cell table:formula="of:=COUNTIF([.AJ$15:.AJ$22];&quot;=&quot; &amp;[.$C44])" office:value-type="float" office:value="0" calcext:value-type="float">
            <text:p>0</text:p>
          </table:table-cell>
          <table:table-cell table:formula="of:=COUNTIF([.AK$15:.AK$22];&quot;=&quot; &amp;[.$C44])" office:value-type="float" office:value="0" calcext:value-type="float">
            <text:p>0</text:p>
          </table:table-cell>
          <table:table-cell table:formula="of:=COUNTIF([.AL$15:.AL$22];&quot;=&quot; &amp;[.$C44])" office:value-type="float" office:value="0" calcext:value-type="float">
            <text:p>0</text:p>
          </table:table-cell>
          <table:table-cell table:formula="of:=COUNTIF([.AM$15:.AM$22];&quot;=&quot; &amp;[.$C44])" office:value-type="float" office:value="0" calcext:value-type="float">
            <text:p>0</text:p>
          </table:table-cell>
          <table:table-cell table:formula="of:=COUNTIF([.AN$15:.AN$22];&quot;=&quot; &amp;[.$C44])" office:value-type="float" office:value="4" calcext:value-type="float">
            <text:p>4</text:p>
          </table:table-cell>
          <table:table-cell table:formula="of:=COUNTIF([.AO$15:.AO$22];&quot;=&quot; &amp;[.$C44])" office:value-type="float" office:value="0" calcext:value-type="float">
            <text:p>0</text:p>
          </table:table-cell>
          <table:table-cell table:formula="of:=COUNTIF([.AP$15:.AP$22];&quot;=&quot; &amp;[.$C44])" office:value-type="float" office:value="0" calcext:value-type="float">
            <text:p>0</text:p>
          </table:table-cell>
          <table:table-cell table:formula="of:=COUNTIF([.AQ$15:.AQ$22];&quot;=&quot; &amp;[.$C44])" office:value-type="float" office:value="0" calcext:value-type="float">
            <text:p>0</text:p>
          </table:table-cell>
          <table:table-cell table:formula="of:=COUNTIF([.AR$15:.AR$22];&quot;=&quot; &amp;[.$C44])" office:value-type="float" office:value="0" calcext:value-type="float">
            <text:p>0</text:p>
          </table:table-cell>
          <table:table-cell table:formula="of:=COUNTIF([.AS$15:.AS$22];&quot;=&quot; &amp;[.$C44])" office:value-type="float" office:value="0" calcext:value-type="float">
            <text:p>0</text:p>
          </table:table-cell>
          <table:table-cell table:formula="of:=COUNTIF([.AT$15:.AT$22];&quot;=&quot; &amp;[.$C44])" office:value-type="float" office:value="0" calcext:value-type="float">
            <text:p>0</text:p>
          </table:table-cell>
          <table:table-cell table:formula="of:=COUNTIF([.AU$15:.AU$22];&quot;=&quot; &amp;[.$C44])" office:value-type="float" office:value="0" calcext:value-type="float">
            <text:p>0</text:p>
          </table:table-cell>
          <table:table-cell table:formula="of:=COUNTIF([.AV$15:.AV$22];&quot;=&quot; &amp;[.$C44])" office:value-type="float" office:value="0" calcext:value-type="float">
            <text:p>0</text:p>
          </table:table-cell>
          <table:table-cell table:formula="of:=COUNTIF([.AW$15:.AW$22];&quot;=&quot; &amp;[.$C44])" office:value-type="float" office:value="0" calcext:value-type="float">
            <text:p>0</text:p>
          </table:table-cell>
          <table:table-cell table:formula="of:=COUNTIF([.AX$15:.AX$22];&quot;=&quot; &amp;[.$C44])" office:value-type="float" office:value="0" calcext:value-type="float">
            <text:p>0</text:p>
          </table:table-cell>
          <table:table-cell table:formula="of:=COUNTIF([.AY$15:.AY$22];&quot;=&quot; &amp;[.$C44])" office:value-type="float" office:value="0" calcext:value-type="float">
            <text:p>0</text:p>
          </table:table-cell>
          <table:table-cell/>
          <table:table-cell table:formula="of:=[.BA43]+0.002" office:value-type="float" office:value="0.058" calcext:value-type="float">
            <text:p>0.058</text:p>
          </table:table-cell>
          <table:table-cell table:formula="of:=[.BA44]*[.$D$6]" office:value-type="float" office:value="2.91539798253133" calcext:value-type="float">
            <text:p>2.915</text:p>
          </table:table-cell>
          <table:table-cell table:formula="of:=[.D$25]*[.$Z$5]*MAGNET([.D$24]+[.BB44])+[.E$25]*[.$Z$5]*MAGNET([.E$24]+[.BB44])+[.F$25]*[.$Z$5]*MAGNET([.F$24]+[.BB44])+[.G$25]*[.$Z$5]*MAGNET([.G$24]+[.BB44])+[.H$25]*[.$Z$5]*MAGNET([.H$24]+[.BB44])+[.I$25]*[.$Z$5]*MAGNET([.I$24]+[.BB44])+[.J$25]*[.$Z$5]*MAGNET([.J$24]+[.BB44])+[.K$25]*[.$Z$5]*MAGNET([.K$24]+[.BB44])+[.L$25]*[.$Z$5]*MAGNET([.L$24]+[.BB44])+[.M$25]*[.$Z$5]*MAGNET([.M$24]+[.BB44])+[.N$25]*[.$Z$5]*MAGNET([.N$24]+[.BB44])+[.O$25]*[.$Z$5]*MAGNET([.O$24]+[.BB44])+[.P$25]*[.$Z$5]*MAGNET([.P$24]+[.BB44])+[.Q$25]*[.$Z$5]*MAGNET([.Q$24]+[.BB44])+[.R$25]*[.$Z$5]*MAGNET([.R$24]+[.BB44])+[.S$25]*[.$Z$5]*MAGNET([.S$24]+[.BB44])+[.T$25]*[.$Z$5]*MAGNET([.T$24]+[.BB44])+[.U$25]*[.$Z$5]*MAGNET([.U$24]+[.BB44])+[.V$25]*[.$Z$5]*MAGNET([.V$24]+[.BB44])+[.W$25]*[.$Z$5]*MAGNET([.W$24]+[.BB44])+[.X$25]*[.$Z$5]*MAGNET([.X$24]+[.BB44])+[.Y$25]*[.$Z$5]*MAGNET([.Y$24]+[.BB44])+[.Z$25]*[.$Z$5]*MAGNET([.Z$24]+[.BB44])+[.AA$25]*[.$Z$5]*MAGNET([.AA$24]+[.BB44])+[.AB$25]*[.$Z$5]*MAGNET([.AB$24]+[.BB44])+[.AC$25]*[.$Z$5]*MAGNET([.AC$24]+[.BB44])+[.AD$25]*[.$Z$5]*MAGNET([.AD$24]+[.BB44])+[.AE$25]*[.$Z$5]*MAGNET([.AE$24]+[.BB44])+[.AF$25]*[.$Z$5]*MAGNET([.AF$24]+[.BB44])+[.AG$25]*[.$Z$5]*MAGNET([.AG$24]+[.BB44])+[.AH$25]*[.$Z$5]*MAGNET([.AH$24]+[.BB44]) +[.AI$25]*[.$Z$5]*MAGNET([.AI$24]+[.BB44]) +[.AJ$25]*[.$Z$5]*MAGNET([.AJ$24]+[.BB44]) +[.AK$25]*[.$Z$5]*MAGNET([.AK$24]+[.BB44]) +[.AL$25]*[.$Z$5]*MAGNET([.AL$24]+[.BB44]) +[.AM$25]*[.$Z$5]*MAGNET([.AM$24]+[.BB44]) +[.AN$25]*[.$Z$5]*MAGNET([.AN$24]+[.BB44]) +[.AO$25]*[.$Z$5]*MAGNET([.AO$24]+[.BB44])+RAND()*[.$BC$13]+[.AP$25]*[.$Z$5]*MAGNET([.AP$24]+[.BB44])&#10;+[.AQ$25]*[.$Z$5]*MAGNET([.AQ$24]+[.BB44])&#10;+[.AR$25]*[.$Z$5]*MAGNET([.AR$24]+[.BB44])&#10;+[.AS$25]*[.$Z$5]*MAGNET([.AS$24]+[.BB44])&#10;+[.AT$25]*[.$Z$5]*MAGNET([.AT$24]+[.BB44])&#10;+[.AU$25]*[.$Z$5]*MAGNET([.AU$24]+[.BB44])&#10;+[.AV$25]*[.$Z$5]*MAGNET([.AV$24]+[.BB44])&#10;+[.AW$25]*[.$Z$5]*MAGNET([.AW$24]+[.BB44])&#10;+[.AX$25]*[.$Z$5]*MAGNET([.AX$24]+[.BB44])&#10;+[.AY$25]*[.$Z$5]*MAGNET([.AY$24]+[.BB44])" office:value-type="float" office:value="70.5054000563254" calcext:value-type="float">
            <text:p>70.51</text:p>
          </table:table-cell>
          <table:table-cell table:style-name="ce70" table:formula="of:=[.E$26]*[.$Z$5]*MAGNET([.E$24]+[.$BB44])+[.F$26]*[.$Z$5]*MAGNET([.F$24]+[.$BB44])+[.G$26]*[.$Z$5]*MAGNET([.G$24]+[.$BB44])+[.H$26]*[.$Z$5]*MAGNET([.H$24]+[.$BB44])+[.I$26]*[.$Z$5]*MAGNET([.I$24]+[.$BB44])+[.J$26]*[.$Z$5]*MAGNET([.J$24]+[.$BB44])+[.K$26]*[.$Z$5]*MAGNET([.K$24]+[.$BB44])+[.L$26]*[.$Z$5]*MAGNET([.L$24]+[.$BB44])+[.M$26]*[.$Z$5]*MAGNET([.M$24]+[.$BB44])+[.N$26]*[.$Z$5]*MAGNET([.N$24]+[.$BB44])+[.O$26]*[.$Z$5]*MAGNET([.O$24]+[.$BB44])+[.P$26]*[.$Z$5]*MAGNET([.P$24]+[.$BB44])+[.Q$26]*[.$Z$5]*MAGNET([.Q$24]+[.$BB44])+[.R$26]*[.$Z$5]*MAGNET([.R$24]+[.$BB44])+[.S$26]*[.$Z$5]*MAGNET([.S$24]+[.$BB44])+[.T$26]*[.$Z$5]*MAGNET([.T$24]+[.$BB44])+[.U$26]*[.$Z$5]*MAGNET([.U$24]+[.$BB44])+[.V$26]*[.$Z$5]*MAGNET([.V$24]+[.$BB44])+[.W$26]*[.$Z$5]*MAGNET([.W$24]+[.$BB44])+[.X$26]*[.$Z$5]*MAGNET([.X$24]+[.$BB44])+[.Y$26]*[.$Z$5]*MAGNET([.Y$24]+[.$BB44])+[.Z$26]*[.$Z$5]*MAGNET([.Z$24]+[.$BB44])+[.AA$26]*[.$Z$5]*MAGNET([.AA$24]+[.$BB44])+[.AB$26]*[.$Z$5]*MAGNET([.AB$24]+[.$BB44])+[.AC$26]*[.$Z$5]*MAGNET([.AC$24]+[.$BB44])+[.AD$26]*[.$Z$5]*MAGNET([.AD$24]+[.$BB44])+[.AE$26]*[.$Z$5]*MAGNET([.AE$24]+[.$BB44])+[.AF$26]*[.$Z$5]*MAGNET([.AF$24]+[.$BB44])+[.AG$26]*[.$Z$5]*MAGNET([.AG$24]+[.$BB44])+[.D$26]*[.$Z$5]*MAGNET([.D$24]+[.$BB44])+[.AH$26]*[.$Z$5]*MAGNET([.AH$24]+[.BB44]) +[.AI$26]*[.$Z$5]*MAGNET([.AI$24]+[.BB44]) +[.AJ$26]*[.$Z$5]*MAGNET([.AJ$24]+[.BB44]) +[.AK$26]*[.$Z$5]*MAGNET([.AK$24]+[.BB44]) +[.AL$26]*[.$Z$5]*MAGNET([.AL$24]+[.BB44]) +[.AM$26]*[.$Z$5]*MAGNET([.AM$24]+[.BB44]) +[.AN$26]*[.$Z$5]*MAGNET([.AN$24]+[.BB44]) +[.AO$26]*[.$Z$5]*MAGNET([.AO$24]+[.BB44]) +[.AP$26]*[.$Z$5]*MAGNET([.AP$24]+[.$BB44])&#10;+[.AQ$26]*[.$Z$5]*MAGNET([.AQ$24]+[.$BB44])&#10;+[.AR$26]*[.$Z$5]*MAGNET([.AR$24]+[.$BB44])&#10;+[.AS$26]*[.$Z$5]*MAGNET([.AS$24]+[.$BB44])&#10;+[.AT$26]*[.$Z$5]*MAGNET([.AT$24]+[.$BB44])&#10;+[.AU$26]*[.$Z$5]*MAGNET([.AU$24]+[.$BB44])&#10;+[.AV$26]*[.$Z$5]*MAGNET([.AV$24]+[.$BB44])&#10;+[.AW$26]*[.$Z$5]*MAGNET([.AW$24]+[.$BB44])&#10;+[.AX$26]*[.$Z$5]*MAGNET([.AX$24]+[.$BB44])&#10;+[.AY$26]*[.$Z$5]*MAGNET([.AY$24]+[.$BB44]) +RAND()*[.$BD$13]" office:value-type="float" office:value="-84.7429741001387" calcext:value-type="float">
            <text:p>-84.74</text:p>
          </table:table-cell>
          <table:table-cell table:style-name="ce71" table:formula="of:=[.E$27]*[.$Z$5]*MAGNET([.E$24]+[.$BB44])+[.F$27]*[.$Z$5]*MAGNET([.F$24]+[.$BB44])+[.G$27]*[.$Z$5]*MAGNET([.G$24]+[.$BB44])+[.H$27]*[.$Z$5]*MAGNET([.H$24]+[.$BB44])+[.I$27]*[.$Z$5]*MAGNET([.I$24]+[.$BB44])+[.J$27]*[.$Z$5]*MAGNET([.J$24]+[.$BB44])+[.K$27]*[.$Z$5]*MAGNET([.K$24]+[.$BB44])+[.L$27]*[.$Z$5]*MAGNET([.L$24]+[.$BB44])+[.M$27]*[.$Z$5]*MAGNET([.M$24]+[.$BB44])+[.N$27]*[.$Z$5]*MAGNET([.N$24]+[.$BB44])+[.O$27]*[.$Z$5]*MAGNET([.O$24]+[.$BB44])+[.P$27]*[.$Z$5]*MAGNET([.P$24]+[.$BB44])+[.Q$27]*[.$Z$5]*MAGNET([.Q$24]+[.$BB44])+[.R$27]*[.$Z$5]*MAGNET([.R$24]+[.$BB44])+[.S$27]*[.$Z$5]*MAGNET([.S$24]+[.$BB44])+[.T$27]*[.$Z$5]*MAGNET([.T$24]+[.$BB44])+[.U$27]*[.$Z$5]*MAGNET([.U$24]+[.$BB44])+[.V$27]*[.$Z$5]*MAGNET([.V$24]+[.$BB44])+[.W$27]*[.$Z$5]*MAGNET([.W$24]+[.$BB44])+[.X$27]*[.$Z$5]*MAGNET([.X$24]+[.$BB44])+[.Y$27]*[.$Z$5]*MAGNET([.Y$24]+[.$BB44])+[.Z$27]*[.$Z$5]*MAGNET([.Z$24]+[.$BB44])+[.AA$27]*[.$Z$5]*MAGNET([.AA$24]+[.$BB44])+[.AB$27]*[.$Z$5]*MAGNET([.AB$24]+[.$BB44])+[.AC$27]*[.$Z$5]*MAGNET([.AC$24]+[.$BB44])+[.AD$27]*[.$Z$5]*MAGNET([.AD$24]+[.$BB44])+[.AE$27]*[.$Z$5]*MAGNET([.AE$24]+[.$BB44])+[.AF$27]*[.$Z$5]*MAGNET([.AF$24]+[.$BB44])+[.AG$27]*[.$Z$5]*MAGNET([.AG$24]+[.$BB44])+[.D$27]*[.$Z$5]*MAGNET([.D$24]+[.$BB44])+[.AH$27]*[.$Z$5]*MAGNET([.AH$24]+[.BB44]) +[.AI$27]*[.$Z$5]*MAGNET([.AI$24]+[.BB44]) +[.AJ$27]*[.$Z$5]*MAGNET([.AJ$24]+[.BB44]) +[.AK$27]*[.$Z$5]*MAGNET([.AK$24]+[.BB44]) +[.AL$27]*[.$Z$5]*MAGNET([.AL$24]+[.BB44]) +[.AM$27]*[.$Z$5]*MAGNET([.AM$24]+[.BB44]) +[.AN$27]*[.$Z$5]*MAGNET([.AN$24]+[.BB44]) +[.AO$27]*[.$Z$5]*MAGNET([.AO$24]+[.BB44]) +[.AP$27]*[.$Z$5]*MAGNET([.AP$24]+[.$BB44])&#10;+[.AQ$27]*[.$Z$5]*MAGNET([.AQ$24]+[.$BB44])&#10;+[.AR$27]*[.$Z$5]*MAGNET([.AR$24]+[.$BB44])&#10;+[.AS$27]*[.$Z$5]*MAGNET([.AS$24]+[.$BB44])&#10;+[.AT$27]*[.$Z$5]*MAGNET([.AT$24]+[.$BB44])&#10;+[.AU$27]*[.$Z$5]*MAGNET([.AU$24]+[.$BB44])&#10;+[.AV$27]*[.$Z$5]*MAGNET([.AV$24]+[.$BB44])&#10;+[.AW$27]*[.$Z$5]*MAGNET([.AW$24]+[.$BB44])&#10;+[.AX$27]*[.$Z$5]*MAGNET([.AX$24]+[.$BB44])&#10;+[.AY$27]*[.$Z$5]*MAGNET([.AY$24]+[.$BB44]) +RAND()*[.$BE$13]" office:value-type="float" office:value="40.748578072482" calcext:value-type="float">
            <text:p>40.748578072482</text:p>
          </table:table-cell>
          <table:table-cell table:style-name="ce71" table:formula="of:=[.E$28]*[.$Z$5]*MAGNET([.E$24]+[.$BB44])+[.F$28]*[.$Z$5]*MAGNET([.F$24]+[.$BB44])+[.G$28]*[.$Z$5]*MAGNET([.G$24]+[.$BB44])+[.H$28]*[.$Z$5]*MAGNET([.H$24]+[.$BB44])+[.I$28]*[.$Z$5]*MAGNET([.I$24]+[.$BB44])+[.J$28]*[.$Z$5]*MAGNET([.J$24]+[.$BB44])+[.K$28]*[.$Z$5]*MAGNET([.K$24]+[.$BB44])+[.L$28]*[.$Z$5]*MAGNET([.L$24]+[.$BB44])+[.M$28]*[.$Z$5]*MAGNET([.M$24]+[.$BB44])+[.N$28]*[.$Z$5]*MAGNET([.N$24]+[.$BB44])+[.O$28]*[.$Z$5]*MAGNET([.O$24]+[.$BB44])+[.P$28]*[.$Z$5]*MAGNET([.P$24]+[.$BB44])+[.Q$28]*[.$Z$5]*MAGNET([.Q$24]+[.$BB44])+[.R$28]*[.$Z$5]*MAGNET([.R$24]+[.$BB44])+[.S$28]*[.$Z$5]*MAGNET([.S$24]+[.$BB44])+[.T$28]*[.$Z$5]*MAGNET([.T$24]+[.$BB44])+[.U$28]*[.$Z$5]*MAGNET([.U$24]+[.$BB44])+[.V$28]*[.$Z$5]*MAGNET([.V$24]+[.$BB44])+[.W$28]*[.$Z$5]*MAGNET([.W$24]+[.$BB44])+[.X$28]*[.$Z$5]*MAGNET([.X$24]+[.$BB44])+[.Y$28]*[.$Z$5]*MAGNET([.Y$24]+[.$BB44])+[.Z$28]*[.$Z$5]*MAGNET([.Z$24]+[.$BB44])+[.AA$28]*[.$Z$5]*MAGNET([.AA$24]+[.$BB44])+[.AB$28]*[.$Z$5]*MAGNET([.AB$24]+[.$BB44])+[.AC$28]*[.$Z$5]*MAGNET([.AC$24]+[.$BB44])+[.AD$28]*[.$Z$5]*MAGNET([.AD$24]+[.$BB44])+[.AE$28]*[.$Z$5]*MAGNET([.AE$24]+[.$BB44])+[.AF$28]*[.$Z$5]*MAGNET([.AF$24]+[.$BB44])+[.AG$28]*[.$Z$5]*MAGNET([.AG$24]+[.$BB44])+[.D$28]*[.$Z$5]*MAGNET([.D$24]+[.$BB44])+[.AH$28]*[.$Z$5]*MAGNET([.AH$24]+[.BB44]) +[.AI$28]*[.$Z$5]*MAGNET([.AI$24]+[.BB44]) +[.AJ$28]*[.$Z$5]*MAGNET([.AJ$24]+[.BB44]) +[.AK$28]*[.$Z$5]*MAGNET([.AK$24]+[.BB44]) +[.AL$28]*[.$Z$5]*MAGNET([.AL$24]+[.BB44]) +[.AM$28]*[.$Z$5]*MAGNET([.AM$24]+[.BB44]) +[.AN$28]*[.$Z$5]*MAGNET([.AN$24]+[.BB44]) +[.AO$28]*[.$Z$5]*MAGNET([.AO$24]+[.BB44]) +[.AP$28]*[.$Z$5]*MAGNET([.AP$24]+[.$BB44])&#10;+[.AQ$28]*[.$Z$5]*MAGNET([.AQ$24]+[.$BB44])&#10;+[.AR$28]*[.$Z$5]*MAGNET([.AR$24]+[.$BB44])&#10;+[.AS$28]*[.$Z$5]*MAGNET([.AS$24]+[.$BB44])&#10;+[.AT$28]*[.$Z$5]*MAGNET([.AT$24]+[.$BB44])&#10;+[.AU$28]*[.$Z$5]*MAGNET([.AU$24]+[.$BB44])&#10;+[.AV$28]*[.$Z$5]*MAGNET([.AV$24]+[.$BB44])&#10;+[.AW$28]*[.$Z$5]*MAGNET([.AW$24]+[.$BB44])&#10;+[.AX$28]*[.$Z$5]*MAGNET([.AX$24]+[.$BB44])&#10;+[.AY$28]*[.$Z$5]*MAGNET([.AY$24]+[.$BB44]) +RAND()*[.$BF$13]" office:value-type="float" office:value="5.25728907640678" calcext:value-type="float">
            <text:p>5.25728907640678</text:p>
          </table:table-cell>
          <table:table-cell table:style-name="ce71" table:formula="of:=[.E$29]*[.$Z$5]*MAGNET([.E$24]+[.$BB44])+[.F$29]*[.$Z$5]*MAGNET([.F$24]+[.$BB44])+[.G$29]*[.$Z$5]*MAGNET([.G$24]+[.$BB44])+[.H$29]*[.$Z$5]*MAGNET([.H$24]+[.$BB44])+[.I$29]*[.$Z$5]*MAGNET([.I$24]+[.$BB44])+[.J$29]*[.$Z$5]*MAGNET([.J$24]+[.$BB44])+[.K$29]*[.$Z$5]*MAGNET([.K$24]+[.$BB44])+[.L$29]*[.$Z$5]*MAGNET([.L$24]+[.$BB44])+[.M$29]*[.$Z$5]*MAGNET([.M$24]+[.$BB44])+[.N$29]*[.$Z$5]*MAGNET([.N$24]+[.$BB44])+[.O$29]*[.$Z$5]*MAGNET([.O$24]+[.$BB44])+[.P$29]*[.$Z$5]*MAGNET([.P$24]+[.$BB44])+[.Q$29]*[.$Z$5]*MAGNET([.Q$24]+[.$BB44])+[.R$29]*[.$Z$5]*MAGNET([.R$24]+[.$BB44])+[.S$29]*[.$Z$5]*MAGNET([.S$24]+[.$BB44])+[.T$29]*[.$Z$5]*MAGNET([.T$24]+[.$BB44])+[.U$29]*[.$Z$5]*MAGNET([.U$24]+[.$BB44])+[.V$29]*[.$Z$5]*MAGNET([.V$24]+[.$BB44])+[.W$29]*[.$Z$5]*MAGNET([.W$24]+[.$BB44])+[.X$29]*[.$Z$5]*MAGNET([.X$24]+[.$BB44])+[.Y$29]*[.$Z$5]*MAGNET([.Y$24]+[.$BB44])+[.Z$29]*[.$Z$5]*MAGNET([.Z$24]+[.$BB44])+[.AA$29]*[.$Z$5]*MAGNET([.AA$24]+[.$BB44])+[.AB$29]*[.$Z$5]*MAGNET([.AB$24]+[.$BB44])+[.AC$29]*[.$Z$5]*MAGNET([.AC$24]+[.$BB44])+[.AD$29]*[.$Z$5]*MAGNET([.AD$24]+[.$BB44])+[.AE$29]*[.$Z$5]*MAGNET([.AE$24]+[.$BB44])+[.AF$29]*[.$Z$5]*MAGNET([.AF$24]+[.$BB44])+[.AG$29]*[.$Z$5]*MAGNET([.AG$24]+[.$BB44])+[.D$29]*[.$Z$5]*MAGNET([.D$24]+[.$BB44])+[.AH$29]*[.$Z$5]*MAGNET([.AH$24]+[.BB44]) +[.AI$29]*[.$Z$5]*MAGNET([.AI$24]+[.BB44]) +[.AJ$29]*[.$Z$5]*MAGNET([.AJ$24]+[.BB44]) +[.AK$29]*[.$Z$5]*MAGNET([.AK$24]+[.BB44]) +[.AL$29]*[.$Z$5]*MAGNET([.AL$24]+[.BB44]) +[.AM$29]*[.$Z$5]*MAGNET([.AM$24]+[.BB44]) +[.AN$29]*[.$Z$5]*MAGNET([.AN$24]+[.BB44]) +[.AO$29]*[.$Z$5]*MAGNET([.AO$24]+[.BB44]) +[.AP$29]*[.$Z$5]*MAGNET([.AP$24]+[.$BB44])&#10;+[.AQ$29]*[.$Z$5]*MAGNET([.AQ$24]+[.$BB44])&#10;+[.AR$29]*[.$Z$5]*MAGNET([.AR$24]+[.$BB44])&#10;+[.AS$29]*[.$Z$5]*MAGNET([.AS$24]+[.$BB44])&#10;+[.AT$29]*[.$Z$5]*MAGNET([.AT$24]+[.$BB44])&#10;+[.AU$29]*[.$Z$5]*MAGNET([.AU$24]+[.$BB44])&#10;+[.AV$29]*[.$Z$5]*MAGNET([.AV$24]+[.$BB44])&#10;+[.AW$29]*[.$Z$5]*MAGNET([.AW$24]+[.$BB44])&#10;+[.AX$29]*[.$Z$5]*MAGNET([.AX$24]+[.$BB44])&#10;+[.AY$29]*[.$Z$5]*MAGNET([.AY$24]+[.$BB44]) +RAND()*[.$BG$13]" office:value-type="float" office:value="-18.4249312891233" calcext:value-type="float">
            <text:p>-18.4249312891233</text:p>
          </table:table-cell>
          <table:table-cell table:style-name="ce71" table:formula="of:=[.E$30]*[.$Z$5]*MAGNET([.E$24]+[.$BB44])+[.F$30]*[.$Z$5]*MAGNET([.F$24]+[.$BB44])+[.G$30]*[.$Z$5]*MAGNET([.G$24]+[.$BB44])+[.H$30]*[.$Z$5]*MAGNET([.H$24]+[.$BB44])+[.I$30]*[.$Z$5]*MAGNET([.I$24]+[.$BB44])+[.J$30]*[.$Z$5]*MAGNET([.J$24]+[.$BB44])+[.K$30]*[.$Z$5]*MAGNET([.K$24]+[.$BB44])+[.L$30]*[.$Z$5]*MAGNET([.L$24]+[.$BB44])+[.M$30]*[.$Z$5]*MAGNET([.M$24]+[.$BB44])+[.N$30]*[.$Z$5]*MAGNET([.N$24]+[.$BB44])+[.O$30]*[.$Z$5]*MAGNET([.O$24]+[.$BB44])+[.P$30]*[.$Z$5]*MAGNET([.P$24]+[.$BB44])+[.Q$30]*[.$Z$5]*MAGNET([.Q$24]+[.$BB44])+[.R$30]*[.$Z$5]*MAGNET([.R$24]+[.$BB44])+[.S$30]*[.$Z$5]*MAGNET([.S$24]+[.$BB44])+[.T$30]*[.$Z$5]*MAGNET([.T$24]+[.$BB44])+[.U$30]*[.$Z$5]*MAGNET([.U$24]+[.$BB44])+[.V$30]*[.$Z$5]*MAGNET([.V$24]+[.$BB44])+[.W$30]*[.$Z$5]*MAGNET([.W$24]+[.$BB44])+[.X$30]*[.$Z$5]*MAGNET([.X$24]+[.$BB44])+[.Y$30]*[.$Z$5]*MAGNET([.Y$24]+[.$BB44])+[.Z$30]*[.$Z$5]*MAGNET([.Z$24]+[.$BB44])+[.AA$30]*[.$Z$5]*MAGNET([.AA$24]+[.$BB44])+[.AB$30]*[.$Z$5]*MAGNET([.AB$24]+[.$BB44])+[.AC$30]*[.$Z$5]*MAGNET([.AC$24]+[.$BB44])+[.AD$30]*[.$Z$5]*MAGNET([.AD$24]+[.$BB44])+[.AE$30]*[.$Z$5]*MAGNET([.AE$24]+[.$BB44])+[.AF$30]*[.$Z$5]*MAGNET([.AF$24]+[.$BB44])+[.AG$30]*[.$Z$5]*MAGNET([.AG$24]+[.$BB44])+[.D$30]*[.$Z$5]*MAGNET([.D$24]+[.$BB44])+[.AH$30]*[.$Z$5]*MAGNET([.AH$24]+[.BB44]) +[.AI$30]*[.$Z$5]*MAGNET([.AI$24]+[.BB44]) +[.AJ$30]*[.$Z$5]*MAGNET([.AJ$24]+[.BB44]) +[.AK$30]*[.$Z$5]*MAGNET([.AK$24]+[.BB44]) +[.AL$30]*[.$Z$5]*MAGNET([.AL$24]+[.BB44]) +[.AM$30]*[.$Z$5]*MAGNET([.AM$24]+[.BB44]) +[.AN$30]*[.$Z$5]*MAGNET([.AN$24]+[.BB44]) +[.AO$30]*[.$Z$5]*MAGNET([.AO$24]+[.BB44]) +[.AP$30]*[.$Z$5]*MAGNET([.AP$24]+[.$BB44])&#10;+[.AQ$30]*[.$Z$5]*MAGNET([.AQ$24]+[.$BB44])&#10;+[.AR$30]*[.$Z$5]*MAGNET([.AR$24]+[.$BB44])&#10;+[.AS$30]*[.$Z$5]*MAGNET([.AS$24]+[.$BB44])&#10;+[.AT$30]*[.$Z$5]*MAGNET([.AT$24]+[.$BB44])&#10;+[.AU$30]*[.$Z$5]*MAGNET([.AU$24]+[.$BB44])&#10;+[.AV$30]*[.$Z$5]*MAGNET([.AV$24]+[.$BB44])&#10;+[.AW$30]*[.$Z$5]*MAGNET([.AW$24]+[.$BB44])&#10;+[.AX$30]*[.$Z$5]*MAGNET([.AX$24]+[.$BB44])&#10;+[.AY$30]*[.$Z$5]*MAGNET([.AY$24]+[.$BB44]) +RAND()*[.$BH$13]" office:value-type="float" office:value="0" calcext:value-type="float">
            <text:p>0</text:p>
          </table:table-cell>
          <table:table-cell table:style-name="ce71" table:formula="of:=[.E$31]*[.$Z$5]*MAGNET([.E$24]+[.$BB44])+[.F$31]*[.$Z$5]*MAGNET([.F$24]+[.$BB44])+[.G$31]*[.$Z$5]*MAGNET([.G$24]+[.$BB44])+[.H$31]*[.$Z$5]*MAGNET([.H$24]+[.$BB44])+[.I$31]*[.$Z$5]*MAGNET([.I$24]+[.$BB44])+[.J$31]*[.$Z$5]*MAGNET([.J$24]+[.$BB44])+[.K$31]*[.$Z$5]*MAGNET([.K$24]+[.$BB44])+[.L$31]*[.$Z$5]*MAGNET([.L$24]+[.$BB44])+[.M$31]*[.$Z$5]*MAGNET([.M$24]+[.$BB44])+[.N$31]*[.$Z$5]*MAGNET([.N$24]+[.$BB44])+[.O$31]*[.$Z$5]*MAGNET([.O$24]+[.$BB44])+[.P$31]*[.$Z$5]*MAGNET([.P$24]+[.$BB44])+[.Q$31]*[.$Z$5]*MAGNET([.Q$24]+[.$BB44])+[.R$31]*[.$Z$5]*MAGNET([.R$24]+[.$BB44])+[.S$31]*[.$Z$5]*MAGNET([.S$24]+[.$BB44])+[.T$31]*[.$Z$5]*MAGNET([.T$24]+[.$BB44])+[.U$31]*[.$Z$5]*MAGNET([.U$24]+[.$BB44])+[.V$31]*[.$Z$5]*MAGNET([.V$24]+[.$BB44])+[.W$31]*[.$Z$5]*MAGNET([.W$24]+[.$BB44])+[.X$31]*[.$Z$5]*MAGNET([.X$24]+[.$BB44])+[.Y$31]*[.$Z$5]*MAGNET([.Y$24]+[.$BB44])+[.Z$31]*[.$Z$5]*MAGNET([.Z$24]+[.$BB44])+[.AA$31]*[.$Z$5]*MAGNET([.AA$24]+[.$BB44])+[.AB$31]*[.$Z$5]*MAGNET([.AB$24]+[.$BB44])+[.AC$31]*[.$Z$5]*MAGNET([.AC$24]+[.$BB44])+[.AD$31]*[.$Z$5]*MAGNET([.AD$24]+[.$BB44])+[.AE$31]*[.$Z$5]*MAGNET([.AE$24]+[.$BB44])+[.AF$31]*[.$Z$5]*MAGNET([.AF$24]+[.$BB44])+[.AG$31]*[.$Z$5]*MAGNET([.AG$24]+[.$BB44])+[.D$31]*[.$Z$5]*MAGNET([.D$24]+[.$BB44])+[.AH$31]*[.$Z$5]*MAGNET([.AH$24]+[.BB44]) +[.AI$31]*[.$Z$5]*MAGNET([.AI$24]+[.BB44]) +[.AJ$31]*[.$Z$5]*MAGNET([.AJ$24]+[.BB44]) +[.AK$31]*[.$Z$5]*MAGNET([.AK$24]+[.BB44]) +[.AL$31]*[.$Z$5]*MAGNET([.AL$24]+[.BB44]) +[.AM$31]*[.$Z$5]*MAGNET([.AM$24]+[.BB44]) +[.AN$31]*[.$Z$5]*MAGNET([.AN$24]+[.BB44]) +[.AO$31]*[.$Z$5]*MAGNET([.AO$24]+[.BB44]) +[.AP$31]*[.$Z$5]*MAGNET([.AP$24]+[.$BB44])&#10;+[.AQ$31]*[.$Z$5]*MAGNET([.AQ$24]+[.$BB44])&#10;+[.AR$31]*[.$Z$5]*MAGNET([.AR$24]+[.$BB44])&#10;+[.AS$31]*[.$Z$5]*MAGNET([.AS$24]+[.$BB44])&#10;+[.AT$31]*[.$Z$5]*MAGNET([.AT$24]+[.$BB44])&#10;+[.AU$31]*[.$Z$5]*MAGNET([.AU$24]+[.$BB44])&#10;+[.AV$31]*[.$Z$5]*MAGNET([.AV$24]+[.$BB44])&#10;+[.AW$31]*[.$Z$5]*MAGNET([.AW$24]+[.$BB44])&#10;+[.AX$31]*[.$Z$5]*MAGNET([.AX$24]+[.$BB44])&#10;+[.AY$31]*[.$Z$5]*MAGNET([.AY$24]+[.$BB44]) +RAND()*[.$BI$13]" office:value-type="float" office:value="0" calcext:value-type="float">
            <text:p>0</text:p>
          </table:table-cell>
          <table:table-cell table:style-name="ce71" table:formula="of:=[.E$32]*[.$Z$5]*MAGNET([.E$24]+[.$BB44])+[.F$32]*[.$Z$5]*MAGNET([.F$24]+[.$BB44])+[.G$32]*[.$Z$5]*MAGNET([.G$24]+[.$BB44])+[.H$32]*[.$Z$5]*MAGNET([.H$24]+[.$BB44])+[.I$32]*[.$Z$5]*MAGNET([.I$24]+[.$BB44])+[.J$32]*[.$Z$5]*MAGNET([.J$24]+[.$BB44])+[.K$32]*[.$Z$5]*MAGNET([.K$24]+[.$BB44])+[.L$32]*[.$Z$5]*MAGNET([.L$24]+[.$BB44])+[.M$32]*[.$Z$5]*MAGNET([.M$24]+[.$BB44])+[.N$32]*[.$Z$5]*MAGNET([.N$24]+[.$BB44])+[.O$32]*[.$Z$5]*MAGNET([.O$24]+[.$BB44])+[.P$32]*[.$Z$5]*MAGNET([.P$24]+[.$BB44])+[.Q$32]*[.$Z$5]*MAGNET([.Q$24]+[.$BB44])+[.R$32]*[.$Z$5]*MAGNET([.R$24]+[.$BB44])+[.S$32]*[.$Z$5]*MAGNET([.S$24]+[.$BB44])+[.T$32]*[.$Z$5]*MAGNET([.T$24]+[.$BB44])+[.U$32]*[.$Z$5]*MAGNET([.U$24]+[.$BB44])+[.V$32]*[.$Z$5]*MAGNET([.V$24]+[.$BB44])+[.W$32]*[.$Z$5]*MAGNET([.W$24]+[.$BB44])+[.X$32]*[.$Z$5]*MAGNET([.X$24]+[.$BB44])+[.Y$32]*[.$Z$5]*MAGNET([.Y$24]+[.$BB44])+[.Z$32]*[.$Z$5]*MAGNET([.Z$24]+[.$BB44])+[.AA$32]*[.$Z$5]*MAGNET([.AA$24]+[.$BB44])+[.AB$32]*[.$Z$5]*MAGNET([.AB$24]+[.$BB44])+[.AC$32]*[.$Z$5]*MAGNET([.AC$24]+[.$BB44])+[.AD$32]*[.$Z$5]*MAGNET([.AD$24]+[.$BB44])+[.AE$32]*[.$Z$5]*MAGNET([.AE$24]+[.$BB44])+[.AF$32]*[.$Z$5]*MAGNET([.AF$24]+[.$BB44])+[.AG$32]*[.$Z$5]*MAGNET([.AG$24]+[.$BB44])+[.D$32]*[.$Z$5]*MAGNET([.D$24]+[.$BB44])+[.AH$32]*[.$Z$5]*MAGNET([.AH$24]+[.BB44]) +[.AI$32]*[.$Z$5]*MAGNET([.AI$24]+[.BB44]) +[.AJ$32]*[.$Z$5]*MAGNET([.AJ$24]+[.BB44]) +[.AK$32]*[.$Z$5]*MAGNET([.AK$24]+[.BB44]) +[.AL$32]*[.$Z$5]*MAGNET([.AL$24]+[.BB44]) +[.AM$32]*[.$Z$5]*MAGNET([.AM$24]+[.BB44]) +[.AN$32]*[.$Z$5]*MAGNET([.AN$24]+[.BB44]) +[.AO$32]*[.$Z$5]*MAGNET([.AO$24]+[.BB44]) +[.AP$32]*[.$Z$5]*MAGNET([.AP$24]+[.$BB44])&#10;+[.AQ$32]*[.$Z$5]*MAGNET([.AQ$24]+[.$BB44])&#10;+[.AR$32]*[.$Z$5]*MAGNET([.AR$24]+[.$BB44])&#10;+[.AS$32]*[.$Z$5]*MAGNET([.AS$24]+[.$BB44])&#10;+[.AT$32]*[.$Z$5]*MAGNET([.AT$24]+[.$BB44])&#10;+[.AU$32]*[.$Z$5]*MAGNET([.AU$24]+[.$BB44])&#10;+[.AV$32]*[.$Z$5]*MAGNET([.AV$24]+[.$BB44])&#10;+[.AW$32]*[.$Z$5]*MAGNET([.AW$24]+[.$BB44])&#10;+[.AX$32]*[.$Z$5]*MAGNET([.AX$24]+[.$BB44])&#10;+[.AY$32]*[.$Z$5]*MAGNET([.AY$24]+[.$BB4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formula="of:=COUNTIF([.D$15:.D$22];&quot;=&quot; &amp;[.$C45])" office:value-type="float" office:value="0" calcext:value-type="float">
            <text:p>0</text:p>
          </table:table-cell>
          <table:table-cell table:formula="of:=COUNTIF([.E$15:.E$22];&quot;=&quot; &amp;[.$C45])" office:value-type="float" office:value="0" calcext:value-type="float">
            <text:p>0</text:p>
          </table:table-cell>
          <table:table-cell table:formula="of:=COUNTIF([.F$15:.F$22];&quot;=&quot; &amp;[.$C45])" office:value-type="float" office:value="0" calcext:value-type="float">
            <text:p>0</text:p>
          </table:table-cell>
          <table:table-cell table:formula="of:=COUNTIF([.G$15:.G$22];&quot;=&quot; &amp;[.$C45])" office:value-type="float" office:value="0" calcext:value-type="float">
            <text:p>0</text:p>
          </table:table-cell>
          <table:table-cell table:formula="of:=COUNTIF([.H$15:.H$22];&quot;=&quot; &amp;[.$C45])" office:value-type="float" office:value="0" calcext:value-type="float">
            <text:p>0</text:p>
          </table:table-cell>
          <table:table-cell table:formula="of:=COUNTIF([.I$15:.I$22];&quot;=&quot; &amp;[.$C45])" office:value-type="float" office:value="0" calcext:value-type="float">
            <text:p>0</text:p>
          </table:table-cell>
          <table:table-cell table:formula="of:=COUNTIF([.J$15:.J$22];&quot;=&quot; &amp;[.$C45])" office:value-type="float" office:value="0" calcext:value-type="float">
            <text:p>0</text:p>
          </table:table-cell>
          <table:table-cell table:formula="of:=COUNTIF([.K$15:.K$22];&quot;=&quot; &amp;[.$C45])" office:value-type="float" office:value="0" calcext:value-type="float">
            <text:p>0</text:p>
          </table:table-cell>
          <table:table-cell table:formula="of:=COUNTIF([.L$15:.L$22];&quot;=&quot; &amp;[.$C45])" office:value-type="float" office:value="0" calcext:value-type="float">
            <text:p>0</text:p>
          </table:table-cell>
          <table:table-cell table:formula="of:=COUNTIF([.M$15:.M$22];&quot;=&quot; &amp;[.$C45])" office:value-type="float" office:value="0" calcext:value-type="float">
            <text:p>0</text:p>
          </table:table-cell>
          <table:table-cell table:formula="of:=COUNTIF([.N$15:.N$22];&quot;=&quot; &amp;[.$C45])" office:value-type="float" office:value="0" calcext:value-type="float">
            <text:p>0</text:p>
          </table:table-cell>
          <table:table-cell table:formula="of:=COUNTIF([.O$15:.O$22];&quot;=&quot; &amp;[.$C45])" office:value-type="float" office:value="0" calcext:value-type="float">
            <text:p>0</text:p>
          </table:table-cell>
          <table:table-cell table:formula="of:=COUNTIF([.P$15:.P$22];&quot;=&quot; &amp;[.$C45])" office:value-type="float" office:value="0" calcext:value-type="float">
            <text:p>0</text:p>
          </table:table-cell>
          <table:table-cell table:formula="of:=COUNTIF([.Q$15:.Q$22];&quot;=&quot; &amp;[.$C45])" office:value-type="float" office:value="0" calcext:value-type="float">
            <text:p>0</text:p>
          </table:table-cell>
          <table:table-cell table:formula="of:=COUNTIF([.R$15:.R$22];&quot;=&quot; &amp;[.$C45])" office:value-type="float" office:value="0" calcext:value-type="float">
            <text:p>0</text:p>
          </table:table-cell>
          <table:table-cell table:formula="of:=COUNTIF([.S$15:.S$22];&quot;=&quot; &amp;[.$C45])" office:value-type="float" office:value="0" calcext:value-type="float">
            <text:p>0</text:p>
          </table:table-cell>
          <table:table-cell table:formula="of:=COUNTIF([.T$15:.T$22];&quot;=&quot; &amp;[.$C45])" office:value-type="float" office:value="0" calcext:value-type="float">
            <text:p>0</text:p>
          </table:table-cell>
          <table:table-cell table:formula="of:=COUNTIF([.U$15:.U$22];&quot;=&quot; &amp;[.$C45])" office:value-type="float" office:value="0" calcext:value-type="float">
            <text:p>0</text:p>
          </table:table-cell>
          <table:table-cell table:formula="of:=COUNTIF([.V$15:.V$22];&quot;=&quot; &amp;[.$C45])" office:value-type="float" office:value="0" calcext:value-type="float">
            <text:p>0</text:p>
          </table:table-cell>
          <table:table-cell table:formula="of:=COUNTIF([.W$15:.W$22];&quot;=&quot; &amp;[.$C45])" office:value-type="float" office:value="0" calcext:value-type="float">
            <text:p>0</text:p>
          </table:table-cell>
          <table:table-cell table:formula="of:=COUNTIF([.X$15:.X$22];&quot;=&quot; &amp;[.$C45])" office:value-type="float" office:value="4" calcext:value-type="float">
            <text:p>4</text:p>
          </table:table-cell>
          <table:table-cell table:formula="of:=COUNTIF([.Y$15:.Y$22];&quot;=&quot; &amp;[.$C45])" office:value-type="float" office:value="4" calcext:value-type="float">
            <text:p>4</text:p>
          </table:table-cell>
          <table:table-cell table:formula="of:=COUNTIF([.Z$15:.Z$22];&quot;=&quot; &amp;[.$C45])" office:value-type="float" office:value="0" calcext:value-type="float">
            <text:p>0</text:p>
          </table:table-cell>
          <table:table-cell table:formula="of:=COUNTIF([.AA$15:.AA$22];&quot;=&quot; &amp;[.$C45])" office:value-type="float" office:value="0" calcext:value-type="float">
            <text:p>0</text:p>
          </table:table-cell>
          <table:table-cell table:formula="of:=COUNTIF([.AB$15:.AB$22];&quot;=&quot; &amp;[.$C45])" office:value-type="float" office:value="0" calcext:value-type="float">
            <text:p>0</text:p>
          </table:table-cell>
          <table:table-cell table:formula="of:=COUNTIF([.AC$15:.AC$22];&quot;=&quot; &amp;[.$C45])" office:value-type="float" office:value="0" calcext:value-type="float">
            <text:p>0</text:p>
          </table:table-cell>
          <table:table-cell table:formula="of:=COUNTIF([.AD$15:.AD$22];&quot;=&quot; &amp;[.$C45])" office:value-type="float" office:value="0" calcext:value-type="float">
            <text:p>0</text:p>
          </table:table-cell>
          <table:table-cell table:formula="of:=COUNTIF([.AE$15:.AE$22];&quot;=&quot; &amp;[.$C45])" office:value-type="float" office:value="0" calcext:value-type="float">
            <text:p>0</text:p>
          </table:table-cell>
          <table:table-cell table:formula="of:=COUNTIF([.AF$15:.AF$22];&quot;=&quot; &amp;[.$C45])" office:value-type="float" office:value="0" calcext:value-type="float">
            <text:p>0</text:p>
          </table:table-cell>
          <table:table-cell table:formula="of:=COUNTIF([.AG$15:.AG$22];&quot;=&quot; &amp;[.$C45])" office:value-type="float" office:value="0" calcext:value-type="float">
            <text:p>0</text:p>
          </table:table-cell>
          <table:table-cell table:formula="of:=COUNTIF([.AH$15:.AH$22];&quot;=&quot; &amp;[.$C45])" office:value-type="float" office:value="0" calcext:value-type="float">
            <text:p>0</text:p>
          </table:table-cell>
          <table:table-cell table:formula="of:=COUNTIF([.AI$15:.AI$22];&quot;=&quot; &amp;[.$C45])" office:value-type="float" office:value="0" calcext:value-type="float">
            <text:p>0</text:p>
          </table:table-cell>
          <table:table-cell table:formula="of:=COUNTIF([.AJ$15:.AJ$22];&quot;=&quot; &amp;[.$C45])" office:value-type="float" office:value="0" calcext:value-type="float">
            <text:p>0</text:p>
          </table:table-cell>
          <table:table-cell table:formula="of:=COUNTIF([.AK$15:.AK$22];&quot;=&quot; &amp;[.$C45])" office:value-type="float" office:value="0" calcext:value-type="float">
            <text:p>0</text:p>
          </table:table-cell>
          <table:table-cell table:formula="of:=COUNTIF([.AL$15:.AL$22];&quot;=&quot; &amp;[.$C45])" office:value-type="float" office:value="0" calcext:value-type="float">
            <text:p>0</text:p>
          </table:table-cell>
          <table:table-cell table:formula="of:=COUNTIF([.AM$15:.AM$22];&quot;=&quot; &amp;[.$C45])" office:value-type="float" office:value="0" calcext:value-type="float">
            <text:p>0</text:p>
          </table:table-cell>
          <table:table-cell table:formula="of:=COUNTIF([.AN$15:.AN$22];&quot;=&quot; &amp;[.$C45])" office:value-type="float" office:value="0" calcext:value-type="float">
            <text:p>0</text:p>
          </table:table-cell>
          <table:table-cell table:formula="of:=COUNTIF([.AO$15:.AO$22];&quot;=&quot; &amp;[.$C45])" office:value-type="float" office:value="0" calcext:value-type="float">
            <text:p>0</text:p>
          </table:table-cell>
          <table:table-cell table:formula="of:=COUNTIF([.AP$15:.AP$22];&quot;=&quot; &amp;[.$C45])" office:value-type="float" office:value="0" calcext:value-type="float">
            <text:p>0</text:p>
          </table:table-cell>
          <table:table-cell table:formula="of:=COUNTIF([.AQ$15:.AQ$22];&quot;=&quot; &amp;[.$C45])" office:value-type="float" office:value="0" calcext:value-type="float">
            <text:p>0</text:p>
          </table:table-cell>
          <table:table-cell table:formula="of:=COUNTIF([.AR$15:.AR$22];&quot;=&quot; &amp;[.$C45])" office:value-type="float" office:value="0" calcext:value-type="float">
            <text:p>0</text:p>
          </table:table-cell>
          <table:table-cell table:formula="of:=COUNTIF([.AS$15:.AS$22];&quot;=&quot; &amp;[.$C45])" office:value-type="float" office:value="0" calcext:value-type="float">
            <text:p>0</text:p>
          </table:table-cell>
          <table:table-cell table:formula="of:=COUNTIF([.AT$15:.AT$22];&quot;=&quot; &amp;[.$C45])" office:value-type="float" office:value="0" calcext:value-type="float">
            <text:p>0</text:p>
          </table:table-cell>
          <table:table-cell table:formula="of:=COUNTIF([.AU$15:.AU$22];&quot;=&quot; &amp;[.$C45])" office:value-type="float" office:value="0" calcext:value-type="float">
            <text:p>0</text:p>
          </table:table-cell>
          <table:table-cell table:formula="of:=COUNTIF([.AV$15:.AV$22];&quot;=&quot; &amp;[.$C45])" office:value-type="float" office:value="0" calcext:value-type="float">
            <text:p>0</text:p>
          </table:table-cell>
          <table:table-cell table:formula="of:=COUNTIF([.AW$15:.AW$22];&quot;=&quot; &amp;[.$C45])" office:value-type="float" office:value="0" calcext:value-type="float">
            <text:p>0</text:p>
          </table:table-cell>
          <table:table-cell table:formula="of:=COUNTIF([.AX$15:.AX$22];&quot;=&quot; &amp;[.$C45])" office:value-type="float" office:value="0" calcext:value-type="float">
            <text:p>0</text:p>
          </table:table-cell>
          <table:table-cell table:formula="of:=COUNTIF([.AY$15:.AY$22];&quot;=&quot; &amp;[.$C45])" office:value-type="float" office:value="0" calcext:value-type="float">
            <text:p>0</text:p>
          </table:table-cell>
          <table:table-cell table:style-name="ce66"/>
          <table:table-cell table:formula="of:=[.BA44]+0.002" office:value-type="float" office:value="0.06" calcext:value-type="float">
            <text:p>0.06</text:p>
          </table:table-cell>
          <table:table-cell table:formula="of:=[.BA45]*[.$D$6]" office:value-type="float" office:value="3.0159289474462" calcext:value-type="float">
            <text:p>3.016</text:p>
          </table:table-cell>
          <table:table-cell table:formula="of:=[.D$25]*[.$Z$5]*MAGNET([.D$24]+[.BB45])+[.E$25]*[.$Z$5]*MAGNET([.E$24]+[.BB45])+[.F$25]*[.$Z$5]*MAGNET([.F$24]+[.BB45])+[.G$25]*[.$Z$5]*MAGNET([.G$24]+[.BB45])+[.H$25]*[.$Z$5]*MAGNET([.H$24]+[.BB45])+[.I$25]*[.$Z$5]*MAGNET([.I$24]+[.BB45])+[.J$25]*[.$Z$5]*MAGNET([.J$24]+[.BB45])+[.K$25]*[.$Z$5]*MAGNET([.K$24]+[.BB45])+[.L$25]*[.$Z$5]*MAGNET([.L$24]+[.BB45])+[.M$25]*[.$Z$5]*MAGNET([.M$24]+[.BB45])+[.N$25]*[.$Z$5]*MAGNET([.N$24]+[.BB45])+[.O$25]*[.$Z$5]*MAGNET([.O$24]+[.BB45])+[.P$25]*[.$Z$5]*MAGNET([.P$24]+[.BB45])+[.Q$25]*[.$Z$5]*MAGNET([.Q$24]+[.BB45])+[.R$25]*[.$Z$5]*MAGNET([.R$24]+[.BB45])+[.S$25]*[.$Z$5]*MAGNET([.S$24]+[.BB45])+[.T$25]*[.$Z$5]*MAGNET([.T$24]+[.BB45])+[.U$25]*[.$Z$5]*MAGNET([.U$24]+[.BB45])+[.V$25]*[.$Z$5]*MAGNET([.V$24]+[.BB45])+[.W$25]*[.$Z$5]*MAGNET([.W$24]+[.BB45])+[.X$25]*[.$Z$5]*MAGNET([.X$24]+[.BB45])+[.Y$25]*[.$Z$5]*MAGNET([.Y$24]+[.BB45])+[.Z$25]*[.$Z$5]*MAGNET([.Z$24]+[.BB45])+[.AA$25]*[.$Z$5]*MAGNET([.AA$24]+[.BB45])+[.AB$25]*[.$Z$5]*MAGNET([.AB$24]+[.BB45])+[.AC$25]*[.$Z$5]*MAGNET([.AC$24]+[.BB45])+[.AD$25]*[.$Z$5]*MAGNET([.AD$24]+[.BB45])+[.AE$25]*[.$Z$5]*MAGNET([.AE$24]+[.BB45])+[.AF$25]*[.$Z$5]*MAGNET([.AF$24]+[.BB45])+[.AG$25]*[.$Z$5]*MAGNET([.AG$24]+[.BB45])+[.AH$25]*[.$Z$5]*MAGNET([.AH$24]+[.BB45]) +[.AI$25]*[.$Z$5]*MAGNET([.AI$24]+[.BB45]) +[.AJ$25]*[.$Z$5]*MAGNET([.AJ$24]+[.BB45]) +[.AK$25]*[.$Z$5]*MAGNET([.AK$24]+[.BB45]) +[.AL$25]*[.$Z$5]*MAGNET([.AL$24]+[.BB45]) +[.AM$25]*[.$Z$5]*MAGNET([.AM$24]+[.BB45]) +[.AN$25]*[.$Z$5]*MAGNET([.AN$24]+[.BB45]) +[.AO$25]*[.$Z$5]*MAGNET([.AO$24]+[.BB45])+RAND()*[.$BC$13]+[.AP$25]*[.$Z$5]*MAGNET([.AP$24]+[.BB45])&#10;+[.AQ$25]*[.$Z$5]*MAGNET([.AQ$24]+[.BB45])&#10;+[.AR$25]*[.$Z$5]*MAGNET([.AR$24]+[.BB45])&#10;+[.AS$25]*[.$Z$5]*MAGNET([.AS$24]+[.BB45])&#10;+[.AT$25]*[.$Z$5]*MAGNET([.AT$24]+[.BB45])&#10;+[.AU$25]*[.$Z$5]*MAGNET([.AU$24]+[.BB45])&#10;+[.AV$25]*[.$Z$5]*MAGNET([.AV$24]+[.BB45])&#10;+[.AW$25]*[.$Z$5]*MAGNET([.AW$24]+[.BB45])&#10;+[.AX$25]*[.$Z$5]*MAGNET([.AX$24]+[.BB45])&#10;+[.AY$25]*[.$Z$5]*MAGNET([.AY$24]+[.BB45])" office:value-type="float" office:value="64.217184424556" calcext:value-type="float">
            <text:p>64.22</text:p>
          </table:table-cell>
          <table:table-cell table:style-name="ce70" table:formula="of:=[.E$26]*[.$Z$5]*MAGNET([.E$24]+[.$BB45])+[.F$26]*[.$Z$5]*MAGNET([.F$24]+[.$BB45])+[.G$26]*[.$Z$5]*MAGNET([.G$24]+[.$BB45])+[.H$26]*[.$Z$5]*MAGNET([.H$24]+[.$BB45])+[.I$26]*[.$Z$5]*MAGNET([.I$24]+[.$BB45])+[.J$26]*[.$Z$5]*MAGNET([.J$24]+[.$BB45])+[.K$26]*[.$Z$5]*MAGNET([.K$24]+[.$BB45])+[.L$26]*[.$Z$5]*MAGNET([.L$24]+[.$BB45])+[.M$26]*[.$Z$5]*MAGNET([.M$24]+[.$BB45])+[.N$26]*[.$Z$5]*MAGNET([.N$24]+[.$BB45])+[.O$26]*[.$Z$5]*MAGNET([.O$24]+[.$BB45])+[.P$26]*[.$Z$5]*MAGNET([.P$24]+[.$BB45])+[.Q$26]*[.$Z$5]*MAGNET([.Q$24]+[.$BB45])+[.R$26]*[.$Z$5]*MAGNET([.R$24]+[.$BB45])+[.S$26]*[.$Z$5]*MAGNET([.S$24]+[.$BB45])+[.T$26]*[.$Z$5]*MAGNET([.T$24]+[.$BB45])+[.U$26]*[.$Z$5]*MAGNET([.U$24]+[.$BB45])+[.V$26]*[.$Z$5]*MAGNET([.V$24]+[.$BB45])+[.W$26]*[.$Z$5]*MAGNET([.W$24]+[.$BB45])+[.X$26]*[.$Z$5]*MAGNET([.X$24]+[.$BB45])+[.Y$26]*[.$Z$5]*MAGNET([.Y$24]+[.$BB45])+[.Z$26]*[.$Z$5]*MAGNET([.Z$24]+[.$BB45])+[.AA$26]*[.$Z$5]*MAGNET([.AA$24]+[.$BB45])+[.AB$26]*[.$Z$5]*MAGNET([.AB$24]+[.$BB45])+[.AC$26]*[.$Z$5]*MAGNET([.AC$24]+[.$BB45])+[.AD$26]*[.$Z$5]*MAGNET([.AD$24]+[.$BB45])+[.AE$26]*[.$Z$5]*MAGNET([.AE$24]+[.$BB45])+[.AF$26]*[.$Z$5]*MAGNET([.AF$24]+[.$BB45])+[.AG$26]*[.$Z$5]*MAGNET([.AG$24]+[.$BB45])+[.D$26]*[.$Z$5]*MAGNET([.D$24]+[.$BB45])+[.AH$26]*[.$Z$5]*MAGNET([.AH$24]+[.BB45]) +[.AI$26]*[.$Z$5]*MAGNET([.AI$24]+[.BB45]) +[.AJ$26]*[.$Z$5]*MAGNET([.AJ$24]+[.BB45]) +[.AK$26]*[.$Z$5]*MAGNET([.AK$24]+[.BB45]) +[.AL$26]*[.$Z$5]*MAGNET([.AL$24]+[.BB45]) +[.AM$26]*[.$Z$5]*MAGNET([.AM$24]+[.BB45]) +[.AN$26]*[.$Z$5]*MAGNET([.AN$24]+[.BB45]) +[.AO$26]*[.$Z$5]*MAGNET([.AO$24]+[.BB45]) +[.AP$26]*[.$Z$5]*MAGNET([.AP$24]+[.$BB45])&#10;+[.AQ$26]*[.$Z$5]*MAGNET([.AQ$24]+[.$BB45])&#10;+[.AR$26]*[.$Z$5]*MAGNET([.AR$24]+[.$BB45])&#10;+[.AS$26]*[.$Z$5]*MAGNET([.AS$24]+[.$BB45])&#10;+[.AT$26]*[.$Z$5]*MAGNET([.AT$24]+[.$BB45])&#10;+[.AU$26]*[.$Z$5]*MAGNET([.AU$24]+[.$BB45])&#10;+[.AV$26]*[.$Z$5]*MAGNET([.AV$24]+[.$BB45])&#10;+[.AW$26]*[.$Z$5]*MAGNET([.AW$24]+[.$BB45])&#10;+[.AX$26]*[.$Z$5]*MAGNET([.AX$24]+[.$BB45])&#10;+[.AY$26]*[.$Z$5]*MAGNET([.AY$24]+[.$BB45]) +RAND()*[.$BD$13]" office:value-type="float" office:value="-85.9783631401577" calcext:value-type="float">
            <text:p>-85.98</text:p>
          </table:table-cell>
          <table:table-cell table:style-name="ce71" table:formula="of:=[.E$27]*[.$Z$5]*MAGNET([.E$24]+[.$BB45])+[.F$27]*[.$Z$5]*MAGNET([.F$24]+[.$BB45])+[.G$27]*[.$Z$5]*MAGNET([.G$24]+[.$BB45])+[.H$27]*[.$Z$5]*MAGNET([.H$24]+[.$BB45])+[.I$27]*[.$Z$5]*MAGNET([.I$24]+[.$BB45])+[.J$27]*[.$Z$5]*MAGNET([.J$24]+[.$BB45])+[.K$27]*[.$Z$5]*MAGNET([.K$24]+[.$BB45])+[.L$27]*[.$Z$5]*MAGNET([.L$24]+[.$BB45])+[.M$27]*[.$Z$5]*MAGNET([.M$24]+[.$BB45])+[.N$27]*[.$Z$5]*MAGNET([.N$24]+[.$BB45])+[.O$27]*[.$Z$5]*MAGNET([.O$24]+[.$BB45])+[.P$27]*[.$Z$5]*MAGNET([.P$24]+[.$BB45])+[.Q$27]*[.$Z$5]*MAGNET([.Q$24]+[.$BB45])+[.R$27]*[.$Z$5]*MAGNET([.R$24]+[.$BB45])+[.S$27]*[.$Z$5]*MAGNET([.S$24]+[.$BB45])+[.T$27]*[.$Z$5]*MAGNET([.T$24]+[.$BB45])+[.U$27]*[.$Z$5]*MAGNET([.U$24]+[.$BB45])+[.V$27]*[.$Z$5]*MAGNET([.V$24]+[.$BB45])+[.W$27]*[.$Z$5]*MAGNET([.W$24]+[.$BB45])+[.X$27]*[.$Z$5]*MAGNET([.X$24]+[.$BB45])+[.Y$27]*[.$Z$5]*MAGNET([.Y$24]+[.$BB45])+[.Z$27]*[.$Z$5]*MAGNET([.Z$24]+[.$BB45])+[.AA$27]*[.$Z$5]*MAGNET([.AA$24]+[.$BB45])+[.AB$27]*[.$Z$5]*MAGNET([.AB$24]+[.$BB45])+[.AC$27]*[.$Z$5]*MAGNET([.AC$24]+[.$BB45])+[.AD$27]*[.$Z$5]*MAGNET([.AD$24]+[.$BB45])+[.AE$27]*[.$Z$5]*MAGNET([.AE$24]+[.$BB45])+[.AF$27]*[.$Z$5]*MAGNET([.AF$24]+[.$BB45])+[.AG$27]*[.$Z$5]*MAGNET([.AG$24]+[.$BB45])+[.D$27]*[.$Z$5]*MAGNET([.D$24]+[.$BB45])+[.AH$27]*[.$Z$5]*MAGNET([.AH$24]+[.BB45]) +[.AI$27]*[.$Z$5]*MAGNET([.AI$24]+[.BB45]) +[.AJ$27]*[.$Z$5]*MAGNET([.AJ$24]+[.BB45]) +[.AK$27]*[.$Z$5]*MAGNET([.AK$24]+[.BB45]) +[.AL$27]*[.$Z$5]*MAGNET([.AL$24]+[.BB45]) +[.AM$27]*[.$Z$5]*MAGNET([.AM$24]+[.BB45]) +[.AN$27]*[.$Z$5]*MAGNET([.AN$24]+[.BB45]) +[.AO$27]*[.$Z$5]*MAGNET([.AO$24]+[.BB45]) +[.AP$27]*[.$Z$5]*MAGNET([.AP$24]+[.$BB45])&#10;+[.AQ$27]*[.$Z$5]*MAGNET([.AQ$24]+[.$BB45])&#10;+[.AR$27]*[.$Z$5]*MAGNET([.AR$24]+[.$BB45])&#10;+[.AS$27]*[.$Z$5]*MAGNET([.AS$24]+[.$BB45])&#10;+[.AT$27]*[.$Z$5]*MAGNET([.AT$24]+[.$BB45])&#10;+[.AU$27]*[.$Z$5]*MAGNET([.AU$24]+[.$BB45])&#10;+[.AV$27]*[.$Z$5]*MAGNET([.AV$24]+[.$BB45])&#10;+[.AW$27]*[.$Z$5]*MAGNET([.AW$24]+[.$BB45])&#10;+[.AX$27]*[.$Z$5]*MAGNET([.AX$24]+[.$BB45])&#10;+[.AY$27]*[.$Z$5]*MAGNET([.AY$24]+[.$BB45]) +RAND()*[.$BE$13]" office:value-type="float" office:value="51.7359623331647" calcext:value-type="float">
            <text:p>51.7359623331647</text:p>
          </table:table-cell>
          <table:table-cell table:style-name="ce71" table:formula="of:=[.E$28]*[.$Z$5]*MAGNET([.E$24]+[.$BB45])+[.F$28]*[.$Z$5]*MAGNET([.F$24]+[.$BB45])+[.G$28]*[.$Z$5]*MAGNET([.G$24]+[.$BB45])+[.H$28]*[.$Z$5]*MAGNET([.H$24]+[.$BB45])+[.I$28]*[.$Z$5]*MAGNET([.I$24]+[.$BB45])+[.J$28]*[.$Z$5]*MAGNET([.J$24]+[.$BB45])+[.K$28]*[.$Z$5]*MAGNET([.K$24]+[.$BB45])+[.L$28]*[.$Z$5]*MAGNET([.L$24]+[.$BB45])+[.M$28]*[.$Z$5]*MAGNET([.M$24]+[.$BB45])+[.N$28]*[.$Z$5]*MAGNET([.N$24]+[.$BB45])+[.O$28]*[.$Z$5]*MAGNET([.O$24]+[.$BB45])+[.P$28]*[.$Z$5]*MAGNET([.P$24]+[.$BB45])+[.Q$28]*[.$Z$5]*MAGNET([.Q$24]+[.$BB45])+[.R$28]*[.$Z$5]*MAGNET([.R$24]+[.$BB45])+[.S$28]*[.$Z$5]*MAGNET([.S$24]+[.$BB45])+[.T$28]*[.$Z$5]*MAGNET([.T$24]+[.$BB45])+[.U$28]*[.$Z$5]*MAGNET([.U$24]+[.$BB45])+[.V$28]*[.$Z$5]*MAGNET([.V$24]+[.$BB45])+[.W$28]*[.$Z$5]*MAGNET([.W$24]+[.$BB45])+[.X$28]*[.$Z$5]*MAGNET([.X$24]+[.$BB45])+[.Y$28]*[.$Z$5]*MAGNET([.Y$24]+[.$BB45])+[.Z$28]*[.$Z$5]*MAGNET([.Z$24]+[.$BB45])+[.AA$28]*[.$Z$5]*MAGNET([.AA$24]+[.$BB45])+[.AB$28]*[.$Z$5]*MAGNET([.AB$24]+[.$BB45])+[.AC$28]*[.$Z$5]*MAGNET([.AC$24]+[.$BB45])+[.AD$28]*[.$Z$5]*MAGNET([.AD$24]+[.$BB45])+[.AE$28]*[.$Z$5]*MAGNET([.AE$24]+[.$BB45])+[.AF$28]*[.$Z$5]*MAGNET([.AF$24]+[.$BB45])+[.AG$28]*[.$Z$5]*MAGNET([.AG$24]+[.$BB45])+[.D$28]*[.$Z$5]*MAGNET([.D$24]+[.$BB45])+[.AH$28]*[.$Z$5]*MAGNET([.AH$24]+[.BB45]) +[.AI$28]*[.$Z$5]*MAGNET([.AI$24]+[.BB45]) +[.AJ$28]*[.$Z$5]*MAGNET([.AJ$24]+[.BB45]) +[.AK$28]*[.$Z$5]*MAGNET([.AK$24]+[.BB45]) +[.AL$28]*[.$Z$5]*MAGNET([.AL$24]+[.BB45]) +[.AM$28]*[.$Z$5]*MAGNET([.AM$24]+[.BB45]) +[.AN$28]*[.$Z$5]*MAGNET([.AN$24]+[.BB45]) +[.AO$28]*[.$Z$5]*MAGNET([.AO$24]+[.BB45]) +[.AP$28]*[.$Z$5]*MAGNET([.AP$24]+[.$BB45])&#10;+[.AQ$28]*[.$Z$5]*MAGNET([.AQ$24]+[.$BB45])&#10;+[.AR$28]*[.$Z$5]*MAGNET([.AR$24]+[.$BB45])&#10;+[.AS$28]*[.$Z$5]*MAGNET([.AS$24]+[.$BB45])&#10;+[.AT$28]*[.$Z$5]*MAGNET([.AT$24]+[.$BB45])&#10;+[.AU$28]*[.$Z$5]*MAGNET([.AU$24]+[.$BB45])&#10;+[.AV$28]*[.$Z$5]*MAGNET([.AV$24]+[.$BB45])&#10;+[.AW$28]*[.$Z$5]*MAGNET([.AW$24]+[.$BB45])&#10;+[.AX$28]*[.$Z$5]*MAGNET([.AX$24]+[.$BB45])&#10;+[.AY$28]*[.$Z$5]*MAGNET([.AY$24]+[.$BB45]) +RAND()*[.$BF$13]" office:value-type="float" office:value="6.27780772748024" calcext:value-type="float">
            <text:p>6.27780772748024</text:p>
          </table:table-cell>
          <table:table-cell table:style-name="ce71" table:formula="of:=[.E$29]*[.$Z$5]*MAGNET([.E$24]+[.$BB45])+[.F$29]*[.$Z$5]*MAGNET([.F$24]+[.$BB45])+[.G$29]*[.$Z$5]*MAGNET([.G$24]+[.$BB45])+[.H$29]*[.$Z$5]*MAGNET([.H$24]+[.$BB45])+[.I$29]*[.$Z$5]*MAGNET([.I$24]+[.$BB45])+[.J$29]*[.$Z$5]*MAGNET([.J$24]+[.$BB45])+[.K$29]*[.$Z$5]*MAGNET([.K$24]+[.$BB45])+[.L$29]*[.$Z$5]*MAGNET([.L$24]+[.$BB45])+[.M$29]*[.$Z$5]*MAGNET([.M$24]+[.$BB45])+[.N$29]*[.$Z$5]*MAGNET([.N$24]+[.$BB45])+[.O$29]*[.$Z$5]*MAGNET([.O$24]+[.$BB45])+[.P$29]*[.$Z$5]*MAGNET([.P$24]+[.$BB45])+[.Q$29]*[.$Z$5]*MAGNET([.Q$24]+[.$BB45])+[.R$29]*[.$Z$5]*MAGNET([.R$24]+[.$BB45])+[.S$29]*[.$Z$5]*MAGNET([.S$24]+[.$BB45])+[.T$29]*[.$Z$5]*MAGNET([.T$24]+[.$BB45])+[.U$29]*[.$Z$5]*MAGNET([.U$24]+[.$BB45])+[.V$29]*[.$Z$5]*MAGNET([.V$24]+[.$BB45])+[.W$29]*[.$Z$5]*MAGNET([.W$24]+[.$BB45])+[.X$29]*[.$Z$5]*MAGNET([.X$24]+[.$BB45])+[.Y$29]*[.$Z$5]*MAGNET([.Y$24]+[.$BB45])+[.Z$29]*[.$Z$5]*MAGNET([.Z$24]+[.$BB45])+[.AA$29]*[.$Z$5]*MAGNET([.AA$24]+[.$BB45])+[.AB$29]*[.$Z$5]*MAGNET([.AB$24]+[.$BB45])+[.AC$29]*[.$Z$5]*MAGNET([.AC$24]+[.$BB45])+[.AD$29]*[.$Z$5]*MAGNET([.AD$24]+[.$BB45])+[.AE$29]*[.$Z$5]*MAGNET([.AE$24]+[.$BB45])+[.AF$29]*[.$Z$5]*MAGNET([.AF$24]+[.$BB45])+[.AG$29]*[.$Z$5]*MAGNET([.AG$24]+[.$BB45])+[.D$29]*[.$Z$5]*MAGNET([.D$24]+[.$BB45])+[.AH$29]*[.$Z$5]*MAGNET([.AH$24]+[.BB45]) +[.AI$29]*[.$Z$5]*MAGNET([.AI$24]+[.BB45]) +[.AJ$29]*[.$Z$5]*MAGNET([.AJ$24]+[.BB45]) +[.AK$29]*[.$Z$5]*MAGNET([.AK$24]+[.BB45]) +[.AL$29]*[.$Z$5]*MAGNET([.AL$24]+[.BB45]) +[.AM$29]*[.$Z$5]*MAGNET([.AM$24]+[.BB45]) +[.AN$29]*[.$Z$5]*MAGNET([.AN$24]+[.BB45]) +[.AO$29]*[.$Z$5]*MAGNET([.AO$24]+[.BB45]) +[.AP$29]*[.$Z$5]*MAGNET([.AP$24]+[.$BB45])&#10;+[.AQ$29]*[.$Z$5]*MAGNET([.AQ$24]+[.$BB45])&#10;+[.AR$29]*[.$Z$5]*MAGNET([.AR$24]+[.$BB45])&#10;+[.AS$29]*[.$Z$5]*MAGNET([.AS$24]+[.$BB45])&#10;+[.AT$29]*[.$Z$5]*MAGNET([.AT$24]+[.$BB45])&#10;+[.AU$29]*[.$Z$5]*MAGNET([.AU$24]+[.$BB45])&#10;+[.AV$29]*[.$Z$5]*MAGNET([.AV$24]+[.$BB45])&#10;+[.AW$29]*[.$Z$5]*MAGNET([.AW$24]+[.$BB45])&#10;+[.AX$29]*[.$Z$5]*MAGNET([.AX$24]+[.$BB45])&#10;+[.AY$29]*[.$Z$5]*MAGNET([.AY$24]+[.$BB45]) +RAND()*[.$BG$13]" office:value-type="float" office:value="-22.1924403601246" calcext:value-type="float">
            <text:p>-22.1924403601246</text:p>
          </table:table-cell>
          <table:table-cell table:style-name="ce71" table:formula="of:=[.E$30]*[.$Z$5]*MAGNET([.E$24]+[.$BB45])+[.F$30]*[.$Z$5]*MAGNET([.F$24]+[.$BB45])+[.G$30]*[.$Z$5]*MAGNET([.G$24]+[.$BB45])+[.H$30]*[.$Z$5]*MAGNET([.H$24]+[.$BB45])+[.I$30]*[.$Z$5]*MAGNET([.I$24]+[.$BB45])+[.J$30]*[.$Z$5]*MAGNET([.J$24]+[.$BB45])+[.K$30]*[.$Z$5]*MAGNET([.K$24]+[.$BB45])+[.L$30]*[.$Z$5]*MAGNET([.L$24]+[.$BB45])+[.M$30]*[.$Z$5]*MAGNET([.M$24]+[.$BB45])+[.N$30]*[.$Z$5]*MAGNET([.N$24]+[.$BB45])+[.O$30]*[.$Z$5]*MAGNET([.O$24]+[.$BB45])+[.P$30]*[.$Z$5]*MAGNET([.P$24]+[.$BB45])+[.Q$30]*[.$Z$5]*MAGNET([.Q$24]+[.$BB45])+[.R$30]*[.$Z$5]*MAGNET([.R$24]+[.$BB45])+[.S$30]*[.$Z$5]*MAGNET([.S$24]+[.$BB45])+[.T$30]*[.$Z$5]*MAGNET([.T$24]+[.$BB45])+[.U$30]*[.$Z$5]*MAGNET([.U$24]+[.$BB45])+[.V$30]*[.$Z$5]*MAGNET([.V$24]+[.$BB45])+[.W$30]*[.$Z$5]*MAGNET([.W$24]+[.$BB45])+[.X$30]*[.$Z$5]*MAGNET([.X$24]+[.$BB45])+[.Y$30]*[.$Z$5]*MAGNET([.Y$24]+[.$BB45])+[.Z$30]*[.$Z$5]*MAGNET([.Z$24]+[.$BB45])+[.AA$30]*[.$Z$5]*MAGNET([.AA$24]+[.$BB45])+[.AB$30]*[.$Z$5]*MAGNET([.AB$24]+[.$BB45])+[.AC$30]*[.$Z$5]*MAGNET([.AC$24]+[.$BB45])+[.AD$30]*[.$Z$5]*MAGNET([.AD$24]+[.$BB45])+[.AE$30]*[.$Z$5]*MAGNET([.AE$24]+[.$BB45])+[.AF$30]*[.$Z$5]*MAGNET([.AF$24]+[.$BB45])+[.AG$30]*[.$Z$5]*MAGNET([.AG$24]+[.$BB45])+[.D$30]*[.$Z$5]*MAGNET([.D$24]+[.$BB45])+[.AH$30]*[.$Z$5]*MAGNET([.AH$24]+[.BB45]) +[.AI$30]*[.$Z$5]*MAGNET([.AI$24]+[.BB45]) +[.AJ$30]*[.$Z$5]*MAGNET([.AJ$24]+[.BB45]) +[.AK$30]*[.$Z$5]*MAGNET([.AK$24]+[.BB45]) +[.AL$30]*[.$Z$5]*MAGNET([.AL$24]+[.BB45]) +[.AM$30]*[.$Z$5]*MAGNET([.AM$24]+[.BB45]) +[.AN$30]*[.$Z$5]*MAGNET([.AN$24]+[.BB45]) +[.AO$30]*[.$Z$5]*MAGNET([.AO$24]+[.BB45]) +[.AP$30]*[.$Z$5]*MAGNET([.AP$24]+[.$BB45])&#10;+[.AQ$30]*[.$Z$5]*MAGNET([.AQ$24]+[.$BB45])&#10;+[.AR$30]*[.$Z$5]*MAGNET([.AR$24]+[.$BB45])&#10;+[.AS$30]*[.$Z$5]*MAGNET([.AS$24]+[.$BB45])&#10;+[.AT$30]*[.$Z$5]*MAGNET([.AT$24]+[.$BB45])&#10;+[.AU$30]*[.$Z$5]*MAGNET([.AU$24]+[.$BB45])&#10;+[.AV$30]*[.$Z$5]*MAGNET([.AV$24]+[.$BB45])&#10;+[.AW$30]*[.$Z$5]*MAGNET([.AW$24]+[.$BB45])&#10;+[.AX$30]*[.$Z$5]*MAGNET([.AX$24]+[.$BB45])&#10;+[.AY$30]*[.$Z$5]*MAGNET([.AY$24]+[.$BB45]) +RAND()*[.$BH$13]" office:value-type="float" office:value="0" calcext:value-type="float">
            <text:p>0</text:p>
          </table:table-cell>
          <table:table-cell table:style-name="ce71" table:formula="of:=[.E$31]*[.$Z$5]*MAGNET([.E$24]+[.$BB45])+[.F$31]*[.$Z$5]*MAGNET([.F$24]+[.$BB45])+[.G$31]*[.$Z$5]*MAGNET([.G$24]+[.$BB45])+[.H$31]*[.$Z$5]*MAGNET([.H$24]+[.$BB45])+[.I$31]*[.$Z$5]*MAGNET([.I$24]+[.$BB45])+[.J$31]*[.$Z$5]*MAGNET([.J$24]+[.$BB45])+[.K$31]*[.$Z$5]*MAGNET([.K$24]+[.$BB45])+[.L$31]*[.$Z$5]*MAGNET([.L$24]+[.$BB45])+[.M$31]*[.$Z$5]*MAGNET([.M$24]+[.$BB45])+[.N$31]*[.$Z$5]*MAGNET([.N$24]+[.$BB45])+[.O$31]*[.$Z$5]*MAGNET([.O$24]+[.$BB45])+[.P$31]*[.$Z$5]*MAGNET([.P$24]+[.$BB45])+[.Q$31]*[.$Z$5]*MAGNET([.Q$24]+[.$BB45])+[.R$31]*[.$Z$5]*MAGNET([.R$24]+[.$BB45])+[.S$31]*[.$Z$5]*MAGNET([.S$24]+[.$BB45])+[.T$31]*[.$Z$5]*MAGNET([.T$24]+[.$BB45])+[.U$31]*[.$Z$5]*MAGNET([.U$24]+[.$BB45])+[.V$31]*[.$Z$5]*MAGNET([.V$24]+[.$BB45])+[.W$31]*[.$Z$5]*MAGNET([.W$24]+[.$BB45])+[.X$31]*[.$Z$5]*MAGNET([.X$24]+[.$BB45])+[.Y$31]*[.$Z$5]*MAGNET([.Y$24]+[.$BB45])+[.Z$31]*[.$Z$5]*MAGNET([.Z$24]+[.$BB45])+[.AA$31]*[.$Z$5]*MAGNET([.AA$24]+[.$BB45])+[.AB$31]*[.$Z$5]*MAGNET([.AB$24]+[.$BB45])+[.AC$31]*[.$Z$5]*MAGNET([.AC$24]+[.$BB45])+[.AD$31]*[.$Z$5]*MAGNET([.AD$24]+[.$BB45])+[.AE$31]*[.$Z$5]*MAGNET([.AE$24]+[.$BB45])+[.AF$31]*[.$Z$5]*MAGNET([.AF$24]+[.$BB45])+[.AG$31]*[.$Z$5]*MAGNET([.AG$24]+[.$BB45])+[.D$31]*[.$Z$5]*MAGNET([.D$24]+[.$BB45])+[.AH$31]*[.$Z$5]*MAGNET([.AH$24]+[.BB45]) +[.AI$31]*[.$Z$5]*MAGNET([.AI$24]+[.BB45]) +[.AJ$31]*[.$Z$5]*MAGNET([.AJ$24]+[.BB45]) +[.AK$31]*[.$Z$5]*MAGNET([.AK$24]+[.BB45]) +[.AL$31]*[.$Z$5]*MAGNET([.AL$24]+[.BB45]) +[.AM$31]*[.$Z$5]*MAGNET([.AM$24]+[.BB45]) +[.AN$31]*[.$Z$5]*MAGNET([.AN$24]+[.BB45]) +[.AO$31]*[.$Z$5]*MAGNET([.AO$24]+[.BB45]) +[.AP$31]*[.$Z$5]*MAGNET([.AP$24]+[.$BB45])&#10;+[.AQ$31]*[.$Z$5]*MAGNET([.AQ$24]+[.$BB45])&#10;+[.AR$31]*[.$Z$5]*MAGNET([.AR$24]+[.$BB45])&#10;+[.AS$31]*[.$Z$5]*MAGNET([.AS$24]+[.$BB45])&#10;+[.AT$31]*[.$Z$5]*MAGNET([.AT$24]+[.$BB45])&#10;+[.AU$31]*[.$Z$5]*MAGNET([.AU$24]+[.$BB45])&#10;+[.AV$31]*[.$Z$5]*MAGNET([.AV$24]+[.$BB45])&#10;+[.AW$31]*[.$Z$5]*MAGNET([.AW$24]+[.$BB45])&#10;+[.AX$31]*[.$Z$5]*MAGNET([.AX$24]+[.$BB45])&#10;+[.AY$31]*[.$Z$5]*MAGNET([.AY$24]+[.$BB45]) +RAND()*[.$BI$13]" office:value-type="float" office:value="0" calcext:value-type="float">
            <text:p>0</text:p>
          </table:table-cell>
          <table:table-cell table:style-name="ce71" table:formula="of:=[.E$32]*[.$Z$5]*MAGNET([.E$24]+[.$BB45])+[.F$32]*[.$Z$5]*MAGNET([.F$24]+[.$BB45])+[.G$32]*[.$Z$5]*MAGNET([.G$24]+[.$BB45])+[.H$32]*[.$Z$5]*MAGNET([.H$24]+[.$BB45])+[.I$32]*[.$Z$5]*MAGNET([.I$24]+[.$BB45])+[.J$32]*[.$Z$5]*MAGNET([.J$24]+[.$BB45])+[.K$32]*[.$Z$5]*MAGNET([.K$24]+[.$BB45])+[.L$32]*[.$Z$5]*MAGNET([.L$24]+[.$BB45])+[.M$32]*[.$Z$5]*MAGNET([.M$24]+[.$BB45])+[.N$32]*[.$Z$5]*MAGNET([.N$24]+[.$BB45])+[.O$32]*[.$Z$5]*MAGNET([.O$24]+[.$BB45])+[.P$32]*[.$Z$5]*MAGNET([.P$24]+[.$BB45])+[.Q$32]*[.$Z$5]*MAGNET([.Q$24]+[.$BB45])+[.R$32]*[.$Z$5]*MAGNET([.R$24]+[.$BB45])+[.S$32]*[.$Z$5]*MAGNET([.S$24]+[.$BB45])+[.T$32]*[.$Z$5]*MAGNET([.T$24]+[.$BB45])+[.U$32]*[.$Z$5]*MAGNET([.U$24]+[.$BB45])+[.V$32]*[.$Z$5]*MAGNET([.V$24]+[.$BB45])+[.W$32]*[.$Z$5]*MAGNET([.W$24]+[.$BB45])+[.X$32]*[.$Z$5]*MAGNET([.X$24]+[.$BB45])+[.Y$32]*[.$Z$5]*MAGNET([.Y$24]+[.$BB45])+[.Z$32]*[.$Z$5]*MAGNET([.Z$24]+[.$BB45])+[.AA$32]*[.$Z$5]*MAGNET([.AA$24]+[.$BB45])+[.AB$32]*[.$Z$5]*MAGNET([.AB$24]+[.$BB45])+[.AC$32]*[.$Z$5]*MAGNET([.AC$24]+[.$BB45])+[.AD$32]*[.$Z$5]*MAGNET([.AD$24]+[.$BB45])+[.AE$32]*[.$Z$5]*MAGNET([.AE$24]+[.$BB45])+[.AF$32]*[.$Z$5]*MAGNET([.AF$24]+[.$BB45])+[.AG$32]*[.$Z$5]*MAGNET([.AG$24]+[.$BB45])+[.D$32]*[.$Z$5]*MAGNET([.D$24]+[.$BB45])+[.AH$32]*[.$Z$5]*MAGNET([.AH$24]+[.BB45]) +[.AI$32]*[.$Z$5]*MAGNET([.AI$24]+[.BB45]) +[.AJ$32]*[.$Z$5]*MAGNET([.AJ$24]+[.BB45]) +[.AK$32]*[.$Z$5]*MAGNET([.AK$24]+[.BB45]) +[.AL$32]*[.$Z$5]*MAGNET([.AL$24]+[.BB45]) +[.AM$32]*[.$Z$5]*MAGNET([.AM$24]+[.BB45]) +[.AN$32]*[.$Z$5]*MAGNET([.AN$24]+[.BB45]) +[.AO$32]*[.$Z$5]*MAGNET([.AO$24]+[.BB45]) +[.AP$32]*[.$Z$5]*MAGNET([.AP$24]+[.$BB45])&#10;+[.AQ$32]*[.$Z$5]*MAGNET([.AQ$24]+[.$BB45])&#10;+[.AR$32]*[.$Z$5]*MAGNET([.AR$24]+[.$BB45])&#10;+[.AS$32]*[.$Z$5]*MAGNET([.AS$24]+[.$BB45])&#10;+[.AT$32]*[.$Z$5]*MAGNET([.AT$24]+[.$BB45])&#10;+[.AU$32]*[.$Z$5]*MAGNET([.AU$24]+[.$BB45])&#10;+[.AV$32]*[.$Z$5]*MAGNET([.AV$24]+[.$BB45])&#10;+[.AW$32]*[.$Z$5]*MAGNET([.AW$24]+[.$BB45])&#10;+[.AX$32]*[.$Z$5]*MAGNET([.AX$24]+[.$BB45])&#10;+[.AY$32]*[.$Z$5]*MAGNET([.AY$24]+[.$BB4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5" calcext:value-type="float">
            <text:p>-5</text:p>
          </table:table-cell>
          <table:table-cell table:formula="of:=COUNTIF([.D$15:.D$22];&quot;=&quot; &amp;[.$C46])" office:value-type="float" office:value="0" calcext:value-type="float">
            <text:p>0</text:p>
          </table:table-cell>
          <table:table-cell table:formula="of:=COUNTIF([.E$15:.E$22];&quot;=&quot; &amp;[.$C46])" office:value-type="float" office:value="0" calcext:value-type="float">
            <text:p>0</text:p>
          </table:table-cell>
          <table:table-cell table:formula="of:=COUNTIF([.F$15:.F$22];&quot;=&quot; &amp;[.$C46])" office:value-type="float" office:value="0" calcext:value-type="float">
            <text:p>0</text:p>
          </table:table-cell>
          <table:table-cell table:formula="of:=COUNTIF([.G$15:.G$22];&quot;=&quot; &amp;[.$C46])" office:value-type="float" office:value="0" calcext:value-type="float">
            <text:p>0</text:p>
          </table:table-cell>
          <table:table-cell table:formula="of:=COUNTIF([.H$15:.H$22];&quot;=&quot; &amp;[.$C46])" office:value-type="float" office:value="0" calcext:value-type="float">
            <text:p>0</text:p>
          </table:table-cell>
          <table:table-cell table:formula="of:=COUNTIF([.I$15:.I$22];&quot;=&quot; &amp;[.$C46])" office:value-type="float" office:value="0" calcext:value-type="float">
            <text:p>0</text:p>
          </table:table-cell>
          <table:table-cell table:formula="of:=COUNTIF([.J$15:.J$22];&quot;=&quot; &amp;[.$C46])" office:value-type="float" office:value="0" calcext:value-type="float">
            <text:p>0</text:p>
          </table:table-cell>
          <table:table-cell table:formula="of:=COUNTIF([.K$15:.K$22];&quot;=&quot; &amp;[.$C46])" office:value-type="float" office:value="0" calcext:value-type="float">
            <text:p>0</text:p>
          </table:table-cell>
          <table:table-cell table:formula="of:=COUNTIF([.L$15:.L$22];&quot;=&quot; &amp;[.$C46])" office:value-type="float" office:value="0" calcext:value-type="float">
            <text:p>0</text:p>
          </table:table-cell>
          <table:table-cell table:formula="of:=COUNTIF([.M$15:.M$22];&quot;=&quot; &amp;[.$C46])" office:value-type="float" office:value="0" calcext:value-type="float">
            <text:p>0</text:p>
          </table:table-cell>
          <table:table-cell table:formula="of:=COUNTIF([.N$15:.N$22];&quot;=&quot; &amp;[.$C46])" office:value-type="float" office:value="0" calcext:value-type="float">
            <text:p>0</text:p>
          </table:table-cell>
          <table:table-cell table:formula="of:=COUNTIF([.O$15:.O$22];&quot;=&quot; &amp;[.$C46])" office:value-type="float" office:value="0" calcext:value-type="float">
            <text:p>0</text:p>
          </table:table-cell>
          <table:table-cell table:formula="of:=COUNTIF([.P$15:.P$22];&quot;=&quot; &amp;[.$C46])" office:value-type="float" office:value="0" calcext:value-type="float">
            <text:p>0</text:p>
          </table:table-cell>
          <table:table-cell table:formula="of:=COUNTIF([.Q$15:.Q$22];&quot;=&quot; &amp;[.$C46])" office:value-type="float" office:value="0" calcext:value-type="float">
            <text:p>0</text:p>
          </table:table-cell>
          <table:table-cell table:formula="of:=COUNTIF([.R$15:.R$22];&quot;=&quot; &amp;[.$C46])" office:value-type="float" office:value="0" calcext:value-type="float">
            <text:p>0</text:p>
          </table:table-cell>
          <table:table-cell table:formula="of:=COUNTIF([.S$15:.S$22];&quot;=&quot; &amp;[.$C46])" office:value-type="float" office:value="0" calcext:value-type="float">
            <text:p>0</text:p>
          </table:table-cell>
          <table:table-cell table:formula="of:=COUNTIF([.T$15:.T$22];&quot;=&quot; &amp;[.$C46])" office:value-type="float" office:value="0" calcext:value-type="float">
            <text:p>0</text:p>
          </table:table-cell>
          <table:table-cell table:formula="of:=COUNTIF([.U$15:.U$22];&quot;=&quot; &amp;[.$C46])" office:value-type="float" office:value="0" calcext:value-type="float">
            <text:p>0</text:p>
          </table:table-cell>
          <table:table-cell table:formula="of:=COUNTIF([.V$15:.V$22];&quot;=&quot; &amp;[.$C46])" office:value-type="float" office:value="0" calcext:value-type="float">
            <text:p>0</text:p>
          </table:table-cell>
          <table:table-cell table:formula="of:=COUNTIF([.W$15:.W$22];&quot;=&quot; &amp;[.$C46])" office:value-type="float" office:value="0" calcext:value-type="float">
            <text:p>0</text:p>
          </table:table-cell>
          <table:table-cell table:formula="of:=COUNTIF([.X$15:.X$22];&quot;=&quot; &amp;[.$C46])" office:value-type="float" office:value="0" calcext:value-type="float">
            <text:p>0</text:p>
          </table:table-cell>
          <table:table-cell table:formula="of:=COUNTIF([.Y$15:.Y$22];&quot;=&quot; &amp;[.$C46])" office:value-type="float" office:value="0" calcext:value-type="float">
            <text:p>0</text:p>
          </table:table-cell>
          <table:table-cell table:formula="of:=COUNTIF([.Z$15:.Z$22];&quot;=&quot; &amp;[.$C46])" office:value-type="float" office:value="0" calcext:value-type="float">
            <text:p>0</text:p>
          </table:table-cell>
          <table:table-cell table:formula="of:=COUNTIF([.AA$15:.AA$22];&quot;=&quot; &amp;[.$C46])" office:value-type="float" office:value="0" calcext:value-type="float">
            <text:p>0</text:p>
          </table:table-cell>
          <table:table-cell table:formula="of:=COUNTIF([.AB$15:.AB$22];&quot;=&quot; &amp;[.$C46])" office:value-type="float" office:value="0" calcext:value-type="float">
            <text:p>0</text:p>
          </table:table-cell>
          <table:table-cell table:formula="of:=COUNTIF([.AC$15:.AC$22];&quot;=&quot; &amp;[.$C46])" office:value-type="float" office:value="0" calcext:value-type="float">
            <text:p>0</text:p>
          </table:table-cell>
          <table:table-cell table:formula="of:=COUNTIF([.AD$15:.AD$22];&quot;=&quot; &amp;[.$C46])" office:value-type="float" office:value="0" calcext:value-type="float">
            <text:p>0</text:p>
          </table:table-cell>
          <table:table-cell table:formula="of:=COUNTIF([.AE$15:.AE$22];&quot;=&quot; &amp;[.$C46])" office:value-type="float" office:value="0" calcext:value-type="float">
            <text:p>0</text:p>
          </table:table-cell>
          <table:table-cell table:formula="of:=COUNTIF([.AF$15:.AF$22];&quot;=&quot; &amp;[.$C46])" office:value-type="float" office:value="4" calcext:value-type="float">
            <text:p>4</text:p>
          </table:table-cell>
          <table:table-cell table:formula="of:=COUNTIF([.AG$15:.AG$22];&quot;=&quot; &amp;[.$C46])" office:value-type="float" office:value="3" calcext:value-type="float">
            <text:p>3</text:p>
          </table:table-cell>
          <table:table-cell table:formula="of:=COUNTIF([.AH$15:.AH$22];&quot;=&quot; &amp;[.$C46])" office:value-type="float" office:value="0" calcext:value-type="float">
            <text:p>0</text:p>
          </table:table-cell>
          <table:table-cell table:formula="of:=COUNTIF([.AI$15:.AI$22];&quot;=&quot; &amp;[.$C46])" office:value-type="float" office:value="0" calcext:value-type="float">
            <text:p>0</text:p>
          </table:table-cell>
          <table:table-cell table:formula="of:=COUNTIF([.AJ$15:.AJ$22];&quot;=&quot; &amp;[.$C46])" office:value-type="float" office:value="0" calcext:value-type="float">
            <text:p>0</text:p>
          </table:table-cell>
          <table:table-cell table:formula="of:=COUNTIF([.AK$15:.AK$22];&quot;=&quot; &amp;[.$C46])" office:value-type="float" office:value="0" calcext:value-type="float">
            <text:p>0</text:p>
          </table:table-cell>
          <table:table-cell table:formula="of:=COUNTIF([.AL$15:.AL$22];&quot;=&quot; &amp;[.$C46])" office:value-type="float" office:value="0" calcext:value-type="float">
            <text:p>0</text:p>
          </table:table-cell>
          <table:table-cell table:formula="of:=COUNTIF([.AM$15:.AM$22];&quot;=&quot; &amp;[.$C46])" office:value-type="float" office:value="0" calcext:value-type="float">
            <text:p>0</text:p>
          </table:table-cell>
          <table:table-cell table:formula="of:=COUNTIF([.AN$15:.AN$22];&quot;=&quot; &amp;[.$C46])" office:value-type="float" office:value="0" calcext:value-type="float">
            <text:p>0</text:p>
          </table:table-cell>
          <table:table-cell table:formula="of:=COUNTIF([.AO$15:.AO$22];&quot;=&quot; &amp;[.$C46])" office:value-type="float" office:value="0" calcext:value-type="float">
            <text:p>0</text:p>
          </table:table-cell>
          <table:table-cell table:formula="of:=COUNTIF([.AP$15:.AP$22];&quot;=&quot; &amp;[.$C46])" office:value-type="float" office:value="0" calcext:value-type="float">
            <text:p>0</text:p>
          </table:table-cell>
          <table:table-cell table:formula="of:=COUNTIF([.AQ$15:.AQ$22];&quot;=&quot; &amp;[.$C46])" office:value-type="float" office:value="0" calcext:value-type="float">
            <text:p>0</text:p>
          </table:table-cell>
          <table:table-cell table:formula="of:=COUNTIF([.AR$15:.AR$22];&quot;=&quot; &amp;[.$C46])" office:value-type="float" office:value="0" calcext:value-type="float">
            <text:p>0</text:p>
          </table:table-cell>
          <table:table-cell table:formula="of:=COUNTIF([.AS$15:.AS$22];&quot;=&quot; &amp;[.$C46])" office:value-type="float" office:value="0" calcext:value-type="float">
            <text:p>0</text:p>
          </table:table-cell>
          <table:table-cell table:formula="of:=COUNTIF([.AT$15:.AT$22];&quot;=&quot; &amp;[.$C46])" office:value-type="float" office:value="0" calcext:value-type="float">
            <text:p>0</text:p>
          </table:table-cell>
          <table:table-cell table:formula="of:=COUNTIF([.AU$15:.AU$22];&quot;=&quot; &amp;[.$C46])" office:value-type="float" office:value="0" calcext:value-type="float">
            <text:p>0</text:p>
          </table:table-cell>
          <table:table-cell table:formula="of:=COUNTIF([.AV$15:.AV$22];&quot;=&quot; &amp;[.$C46])" office:value-type="float" office:value="0" calcext:value-type="float">
            <text:p>0</text:p>
          </table:table-cell>
          <table:table-cell table:formula="of:=COUNTIF([.AW$15:.AW$22];&quot;=&quot; &amp;[.$C46])" office:value-type="float" office:value="0" calcext:value-type="float">
            <text:p>0</text:p>
          </table:table-cell>
          <table:table-cell table:formula="of:=COUNTIF([.AX$15:.AX$22];&quot;=&quot; &amp;[.$C46])" office:value-type="float" office:value="0" calcext:value-type="float">
            <text:p>0</text:p>
          </table:table-cell>
          <table:table-cell table:formula="of:=COUNTIF([.AY$15:.AY$22];&quot;=&quot; &amp;[.$C46])" office:value-type="float" office:value="0" calcext:value-type="float">
            <text:p>0</text:p>
          </table:table-cell>
          <table:table-cell/>
          <table:table-cell table:formula="of:=[.BA45]+0.002" office:value-type="float" office:value="0.062" calcext:value-type="float">
            <text:p>0.062</text:p>
          </table:table-cell>
          <table:table-cell table:formula="of:=[.BA46]*[.$D$6]" office:value-type="float" office:value="3.11645991236108" calcext:value-type="float">
            <text:p>3.116</text:p>
          </table:table-cell>
          <table:table-cell table:formula="of:=[.D$25]*[.$Z$5]*MAGNET([.D$24]+[.BB46])+[.E$25]*[.$Z$5]*MAGNET([.E$24]+[.BB46])+[.F$25]*[.$Z$5]*MAGNET([.F$24]+[.BB46])+[.G$25]*[.$Z$5]*MAGNET([.G$24]+[.BB46])+[.H$25]*[.$Z$5]*MAGNET([.H$24]+[.BB46])+[.I$25]*[.$Z$5]*MAGNET([.I$24]+[.BB46])+[.J$25]*[.$Z$5]*MAGNET([.J$24]+[.BB46])+[.K$25]*[.$Z$5]*MAGNET([.K$24]+[.BB46])+[.L$25]*[.$Z$5]*MAGNET([.L$24]+[.BB46])+[.M$25]*[.$Z$5]*MAGNET([.M$24]+[.BB46])+[.N$25]*[.$Z$5]*MAGNET([.N$24]+[.BB46])+[.O$25]*[.$Z$5]*MAGNET([.O$24]+[.BB46])+[.P$25]*[.$Z$5]*MAGNET([.P$24]+[.BB46])+[.Q$25]*[.$Z$5]*MAGNET([.Q$24]+[.BB46])+[.R$25]*[.$Z$5]*MAGNET([.R$24]+[.BB46])+[.S$25]*[.$Z$5]*MAGNET([.S$24]+[.BB46])+[.T$25]*[.$Z$5]*MAGNET([.T$24]+[.BB46])+[.U$25]*[.$Z$5]*MAGNET([.U$24]+[.BB46])+[.V$25]*[.$Z$5]*MAGNET([.V$24]+[.BB46])+[.W$25]*[.$Z$5]*MAGNET([.W$24]+[.BB46])+[.X$25]*[.$Z$5]*MAGNET([.X$24]+[.BB46])+[.Y$25]*[.$Z$5]*MAGNET([.Y$24]+[.BB46])+[.Z$25]*[.$Z$5]*MAGNET([.Z$24]+[.BB46])+[.AA$25]*[.$Z$5]*MAGNET([.AA$24]+[.BB46])+[.AB$25]*[.$Z$5]*MAGNET([.AB$24]+[.BB46])+[.AC$25]*[.$Z$5]*MAGNET([.AC$24]+[.BB46])+[.AD$25]*[.$Z$5]*MAGNET([.AD$24]+[.BB46])+[.AE$25]*[.$Z$5]*MAGNET([.AE$24]+[.BB46])+[.AF$25]*[.$Z$5]*MAGNET([.AF$24]+[.BB46])+[.AG$25]*[.$Z$5]*MAGNET([.AG$24]+[.BB46])+[.AH$25]*[.$Z$5]*MAGNET([.AH$24]+[.BB46]) +[.AI$25]*[.$Z$5]*MAGNET([.AI$24]+[.BB46]) +[.AJ$25]*[.$Z$5]*MAGNET([.AJ$24]+[.BB46]) +[.AK$25]*[.$Z$5]*MAGNET([.AK$24]+[.BB46]) +[.AL$25]*[.$Z$5]*MAGNET([.AL$24]+[.BB46]) +[.AM$25]*[.$Z$5]*MAGNET([.AM$24]+[.BB46]) +[.AN$25]*[.$Z$5]*MAGNET([.AN$24]+[.BB46]) +[.AO$25]*[.$Z$5]*MAGNET([.AO$24]+[.BB46])+RAND()*[.$BC$13]+[.AP$25]*[.$Z$5]*MAGNET([.AP$24]+[.BB46])&#10;+[.AQ$25]*[.$Z$5]*MAGNET([.AQ$24]+[.BB46])&#10;+[.AR$25]*[.$Z$5]*MAGNET([.AR$24]+[.BB46])&#10;+[.AS$25]*[.$Z$5]*MAGNET([.AS$24]+[.BB46])&#10;+[.AT$25]*[.$Z$5]*MAGNET([.AT$24]+[.BB46])&#10;+[.AU$25]*[.$Z$5]*MAGNET([.AU$24]+[.BB46])&#10;+[.AV$25]*[.$Z$5]*MAGNET([.AV$24]+[.BB46])&#10;+[.AW$25]*[.$Z$5]*MAGNET([.AW$24]+[.BB46])&#10;+[.AX$25]*[.$Z$5]*MAGNET([.AX$24]+[.BB46])&#10;+[.AY$25]*[.$Z$5]*MAGNET([.AY$24]+[.BB46])" office:value-type="float" office:value="55.4536933738756" calcext:value-type="float">
            <text:p>55.45</text:p>
          </table:table-cell>
          <table:table-cell table:style-name="ce70" table:formula="of:=[.E$26]*[.$Z$5]*MAGNET([.E$24]+[.$BB46])+[.F$26]*[.$Z$5]*MAGNET([.F$24]+[.$BB46])+[.G$26]*[.$Z$5]*MAGNET([.G$24]+[.$BB46])+[.H$26]*[.$Z$5]*MAGNET([.H$24]+[.$BB46])+[.I$26]*[.$Z$5]*MAGNET([.I$24]+[.$BB46])+[.J$26]*[.$Z$5]*MAGNET([.J$24]+[.$BB46])+[.K$26]*[.$Z$5]*MAGNET([.K$24]+[.$BB46])+[.L$26]*[.$Z$5]*MAGNET([.L$24]+[.$BB46])+[.M$26]*[.$Z$5]*MAGNET([.M$24]+[.$BB46])+[.N$26]*[.$Z$5]*MAGNET([.N$24]+[.$BB46])+[.O$26]*[.$Z$5]*MAGNET([.O$24]+[.$BB46])+[.P$26]*[.$Z$5]*MAGNET([.P$24]+[.$BB46])+[.Q$26]*[.$Z$5]*MAGNET([.Q$24]+[.$BB46])+[.R$26]*[.$Z$5]*MAGNET([.R$24]+[.$BB46])+[.S$26]*[.$Z$5]*MAGNET([.S$24]+[.$BB46])+[.T$26]*[.$Z$5]*MAGNET([.T$24]+[.$BB46])+[.U$26]*[.$Z$5]*MAGNET([.U$24]+[.$BB46])+[.V$26]*[.$Z$5]*MAGNET([.V$24]+[.$BB46])+[.W$26]*[.$Z$5]*MAGNET([.W$24]+[.$BB46])+[.X$26]*[.$Z$5]*MAGNET([.X$24]+[.$BB46])+[.Y$26]*[.$Z$5]*MAGNET([.Y$24]+[.$BB46])+[.Z$26]*[.$Z$5]*MAGNET([.Z$24]+[.$BB46])+[.AA$26]*[.$Z$5]*MAGNET([.AA$24]+[.$BB46])+[.AB$26]*[.$Z$5]*MAGNET([.AB$24]+[.$BB46])+[.AC$26]*[.$Z$5]*MAGNET([.AC$24]+[.$BB46])+[.AD$26]*[.$Z$5]*MAGNET([.AD$24]+[.$BB46])+[.AE$26]*[.$Z$5]*MAGNET([.AE$24]+[.$BB46])+[.AF$26]*[.$Z$5]*MAGNET([.AF$24]+[.$BB46])+[.AG$26]*[.$Z$5]*MAGNET([.AG$24]+[.$BB46])+[.D$26]*[.$Z$5]*MAGNET([.D$24]+[.$BB46])+[.AH$26]*[.$Z$5]*MAGNET([.AH$24]+[.BB46]) +[.AI$26]*[.$Z$5]*MAGNET([.AI$24]+[.BB46]) +[.AJ$26]*[.$Z$5]*MAGNET([.AJ$24]+[.BB46]) +[.AK$26]*[.$Z$5]*MAGNET([.AK$24]+[.BB46]) +[.AL$26]*[.$Z$5]*MAGNET([.AL$24]+[.BB46]) +[.AM$26]*[.$Z$5]*MAGNET([.AM$24]+[.BB46]) +[.AN$26]*[.$Z$5]*MAGNET([.AN$24]+[.BB46]) +[.AO$26]*[.$Z$5]*MAGNET([.AO$24]+[.BB46]) +[.AP$26]*[.$Z$5]*MAGNET([.AP$24]+[.$BB46])&#10;+[.AQ$26]*[.$Z$5]*MAGNET([.AQ$24]+[.$BB46])&#10;+[.AR$26]*[.$Z$5]*MAGNET([.AR$24]+[.$BB46])&#10;+[.AS$26]*[.$Z$5]*MAGNET([.AS$24]+[.$BB46])&#10;+[.AT$26]*[.$Z$5]*MAGNET([.AT$24]+[.$BB46])&#10;+[.AU$26]*[.$Z$5]*MAGNET([.AU$24]+[.$BB46])&#10;+[.AV$26]*[.$Z$5]*MAGNET([.AV$24]+[.$BB46])&#10;+[.AW$26]*[.$Z$5]*MAGNET([.AW$24]+[.$BB46])&#10;+[.AX$26]*[.$Z$5]*MAGNET([.AX$24]+[.$BB46])&#10;+[.AY$26]*[.$Z$5]*MAGNET([.AY$24]+[.$BB46]) +RAND()*[.$BD$13]" office:value-type="float" office:value="-87.8882142492885" calcext:value-type="float">
            <text:p>-87.89</text:p>
          </table:table-cell>
          <table:table-cell table:style-name="ce71" table:formula="of:=[.E$27]*[.$Z$5]*MAGNET([.E$24]+[.$BB46])+[.F$27]*[.$Z$5]*MAGNET([.F$24]+[.$BB46])+[.G$27]*[.$Z$5]*MAGNET([.G$24]+[.$BB46])+[.H$27]*[.$Z$5]*MAGNET([.H$24]+[.$BB46])+[.I$27]*[.$Z$5]*MAGNET([.I$24]+[.$BB46])+[.J$27]*[.$Z$5]*MAGNET([.J$24]+[.$BB46])+[.K$27]*[.$Z$5]*MAGNET([.K$24]+[.$BB46])+[.L$27]*[.$Z$5]*MAGNET([.L$24]+[.$BB46])+[.M$27]*[.$Z$5]*MAGNET([.M$24]+[.$BB46])+[.N$27]*[.$Z$5]*MAGNET([.N$24]+[.$BB46])+[.O$27]*[.$Z$5]*MAGNET([.O$24]+[.$BB46])+[.P$27]*[.$Z$5]*MAGNET([.P$24]+[.$BB46])+[.Q$27]*[.$Z$5]*MAGNET([.Q$24]+[.$BB46])+[.R$27]*[.$Z$5]*MAGNET([.R$24]+[.$BB46])+[.S$27]*[.$Z$5]*MAGNET([.S$24]+[.$BB46])+[.T$27]*[.$Z$5]*MAGNET([.T$24]+[.$BB46])+[.U$27]*[.$Z$5]*MAGNET([.U$24]+[.$BB46])+[.V$27]*[.$Z$5]*MAGNET([.V$24]+[.$BB46])+[.W$27]*[.$Z$5]*MAGNET([.W$24]+[.$BB46])+[.X$27]*[.$Z$5]*MAGNET([.X$24]+[.$BB46])+[.Y$27]*[.$Z$5]*MAGNET([.Y$24]+[.$BB46])+[.Z$27]*[.$Z$5]*MAGNET([.Z$24]+[.$BB46])+[.AA$27]*[.$Z$5]*MAGNET([.AA$24]+[.$BB46])+[.AB$27]*[.$Z$5]*MAGNET([.AB$24]+[.$BB46])+[.AC$27]*[.$Z$5]*MAGNET([.AC$24]+[.$BB46])+[.AD$27]*[.$Z$5]*MAGNET([.AD$24]+[.$BB46])+[.AE$27]*[.$Z$5]*MAGNET([.AE$24]+[.$BB46])+[.AF$27]*[.$Z$5]*MAGNET([.AF$24]+[.$BB46])+[.AG$27]*[.$Z$5]*MAGNET([.AG$24]+[.$BB46])+[.D$27]*[.$Z$5]*MAGNET([.D$24]+[.$BB46])+[.AH$27]*[.$Z$5]*MAGNET([.AH$24]+[.BB46]) +[.AI$27]*[.$Z$5]*MAGNET([.AI$24]+[.BB46]) +[.AJ$27]*[.$Z$5]*MAGNET([.AJ$24]+[.BB46]) +[.AK$27]*[.$Z$5]*MAGNET([.AK$24]+[.BB46]) +[.AL$27]*[.$Z$5]*MAGNET([.AL$24]+[.BB46]) +[.AM$27]*[.$Z$5]*MAGNET([.AM$24]+[.BB46]) +[.AN$27]*[.$Z$5]*MAGNET([.AN$24]+[.BB46]) +[.AO$27]*[.$Z$5]*MAGNET([.AO$24]+[.BB46]) +[.AP$27]*[.$Z$5]*MAGNET([.AP$24]+[.$BB46])&#10;+[.AQ$27]*[.$Z$5]*MAGNET([.AQ$24]+[.$BB46])&#10;+[.AR$27]*[.$Z$5]*MAGNET([.AR$24]+[.$BB46])&#10;+[.AS$27]*[.$Z$5]*MAGNET([.AS$24]+[.$BB46])&#10;+[.AT$27]*[.$Z$5]*MAGNET([.AT$24]+[.$BB46])&#10;+[.AU$27]*[.$Z$5]*MAGNET([.AU$24]+[.$BB46])&#10;+[.AV$27]*[.$Z$5]*MAGNET([.AV$24]+[.$BB46])&#10;+[.AW$27]*[.$Z$5]*MAGNET([.AW$24]+[.$BB46])&#10;+[.AX$27]*[.$Z$5]*MAGNET([.AX$24]+[.$BB46])&#10;+[.AY$27]*[.$Z$5]*MAGNET([.AY$24]+[.$BB46]) +RAND()*[.$BE$13]" office:value-type="float" office:value="60.8170618378073" calcext:value-type="float">
            <text:p>60.8170618378073</text:p>
          </table:table-cell>
          <table:table-cell table:style-name="ce71" table:formula="of:=[.E$28]*[.$Z$5]*MAGNET([.E$24]+[.$BB46])+[.F$28]*[.$Z$5]*MAGNET([.F$24]+[.$BB46])+[.G$28]*[.$Z$5]*MAGNET([.G$24]+[.$BB46])+[.H$28]*[.$Z$5]*MAGNET([.H$24]+[.$BB46])+[.I$28]*[.$Z$5]*MAGNET([.I$24]+[.$BB46])+[.J$28]*[.$Z$5]*MAGNET([.J$24]+[.$BB46])+[.K$28]*[.$Z$5]*MAGNET([.K$24]+[.$BB46])+[.L$28]*[.$Z$5]*MAGNET([.L$24]+[.$BB46])+[.M$28]*[.$Z$5]*MAGNET([.M$24]+[.$BB46])+[.N$28]*[.$Z$5]*MAGNET([.N$24]+[.$BB46])+[.O$28]*[.$Z$5]*MAGNET([.O$24]+[.$BB46])+[.P$28]*[.$Z$5]*MAGNET([.P$24]+[.$BB46])+[.Q$28]*[.$Z$5]*MAGNET([.Q$24]+[.$BB46])+[.R$28]*[.$Z$5]*MAGNET([.R$24]+[.$BB46])+[.S$28]*[.$Z$5]*MAGNET([.S$24]+[.$BB46])+[.T$28]*[.$Z$5]*MAGNET([.T$24]+[.$BB46])+[.U$28]*[.$Z$5]*MAGNET([.U$24]+[.$BB46])+[.V$28]*[.$Z$5]*MAGNET([.V$24]+[.$BB46])+[.W$28]*[.$Z$5]*MAGNET([.W$24]+[.$BB46])+[.X$28]*[.$Z$5]*MAGNET([.X$24]+[.$BB46])+[.Y$28]*[.$Z$5]*MAGNET([.Y$24]+[.$BB46])+[.Z$28]*[.$Z$5]*MAGNET([.Z$24]+[.$BB46])+[.AA$28]*[.$Z$5]*MAGNET([.AA$24]+[.$BB46])+[.AB$28]*[.$Z$5]*MAGNET([.AB$24]+[.$BB46])+[.AC$28]*[.$Z$5]*MAGNET([.AC$24]+[.$BB46])+[.AD$28]*[.$Z$5]*MAGNET([.AD$24]+[.$BB46])+[.AE$28]*[.$Z$5]*MAGNET([.AE$24]+[.$BB46])+[.AF$28]*[.$Z$5]*MAGNET([.AF$24]+[.$BB46])+[.AG$28]*[.$Z$5]*MAGNET([.AG$24]+[.$BB46])+[.D$28]*[.$Z$5]*MAGNET([.D$24]+[.$BB46])+[.AH$28]*[.$Z$5]*MAGNET([.AH$24]+[.BB46]) +[.AI$28]*[.$Z$5]*MAGNET([.AI$24]+[.BB46]) +[.AJ$28]*[.$Z$5]*MAGNET([.AJ$24]+[.BB46]) +[.AK$28]*[.$Z$5]*MAGNET([.AK$24]+[.BB46]) +[.AL$28]*[.$Z$5]*MAGNET([.AL$24]+[.BB46]) +[.AM$28]*[.$Z$5]*MAGNET([.AM$24]+[.BB46]) +[.AN$28]*[.$Z$5]*MAGNET([.AN$24]+[.BB46]) +[.AO$28]*[.$Z$5]*MAGNET([.AO$24]+[.BB46]) +[.AP$28]*[.$Z$5]*MAGNET([.AP$24]+[.$BB46])&#10;+[.AQ$28]*[.$Z$5]*MAGNET([.AQ$24]+[.$BB46])&#10;+[.AR$28]*[.$Z$5]*MAGNET([.AR$24]+[.$BB46])&#10;+[.AS$28]*[.$Z$5]*MAGNET([.AS$24]+[.$BB46])&#10;+[.AT$28]*[.$Z$5]*MAGNET([.AT$24]+[.$BB46])&#10;+[.AU$28]*[.$Z$5]*MAGNET([.AU$24]+[.$BB46])&#10;+[.AV$28]*[.$Z$5]*MAGNET([.AV$24]+[.$BB46])&#10;+[.AW$28]*[.$Z$5]*MAGNET([.AW$24]+[.$BB46])&#10;+[.AX$28]*[.$Z$5]*MAGNET([.AX$24]+[.$BB46])&#10;+[.AY$28]*[.$Z$5]*MAGNET([.AY$24]+[.$BB46]) +RAND()*[.$BF$13]" office:value-type="float" office:value="7.5294441408473" calcext:value-type="float">
            <text:p>7.5294441408473</text:p>
          </table:table-cell>
          <table:table-cell table:style-name="ce71" table:formula="of:=[.E$29]*[.$Z$5]*MAGNET([.E$24]+[.$BB46])+[.F$29]*[.$Z$5]*MAGNET([.F$24]+[.$BB46])+[.G$29]*[.$Z$5]*MAGNET([.G$24]+[.$BB46])+[.H$29]*[.$Z$5]*MAGNET([.H$24]+[.$BB46])+[.I$29]*[.$Z$5]*MAGNET([.I$24]+[.$BB46])+[.J$29]*[.$Z$5]*MAGNET([.J$24]+[.$BB46])+[.K$29]*[.$Z$5]*MAGNET([.K$24]+[.$BB46])+[.L$29]*[.$Z$5]*MAGNET([.L$24]+[.$BB46])+[.M$29]*[.$Z$5]*MAGNET([.M$24]+[.$BB46])+[.N$29]*[.$Z$5]*MAGNET([.N$24]+[.$BB46])+[.O$29]*[.$Z$5]*MAGNET([.O$24]+[.$BB46])+[.P$29]*[.$Z$5]*MAGNET([.P$24]+[.$BB46])+[.Q$29]*[.$Z$5]*MAGNET([.Q$24]+[.$BB46])+[.R$29]*[.$Z$5]*MAGNET([.R$24]+[.$BB46])+[.S$29]*[.$Z$5]*MAGNET([.S$24]+[.$BB46])+[.T$29]*[.$Z$5]*MAGNET([.T$24]+[.$BB46])+[.U$29]*[.$Z$5]*MAGNET([.U$24]+[.$BB46])+[.V$29]*[.$Z$5]*MAGNET([.V$24]+[.$BB46])+[.W$29]*[.$Z$5]*MAGNET([.W$24]+[.$BB46])+[.X$29]*[.$Z$5]*MAGNET([.X$24]+[.$BB46])+[.Y$29]*[.$Z$5]*MAGNET([.Y$24]+[.$BB46])+[.Z$29]*[.$Z$5]*MAGNET([.Z$24]+[.$BB46])+[.AA$29]*[.$Z$5]*MAGNET([.AA$24]+[.$BB46])+[.AB$29]*[.$Z$5]*MAGNET([.AB$24]+[.$BB46])+[.AC$29]*[.$Z$5]*MAGNET([.AC$24]+[.$BB46])+[.AD$29]*[.$Z$5]*MAGNET([.AD$24]+[.$BB46])+[.AE$29]*[.$Z$5]*MAGNET([.AE$24]+[.$BB46])+[.AF$29]*[.$Z$5]*MAGNET([.AF$24]+[.$BB46])+[.AG$29]*[.$Z$5]*MAGNET([.AG$24]+[.$BB46])+[.D$29]*[.$Z$5]*MAGNET([.D$24]+[.$BB46])+[.AH$29]*[.$Z$5]*MAGNET([.AH$24]+[.BB46]) +[.AI$29]*[.$Z$5]*MAGNET([.AI$24]+[.BB46]) +[.AJ$29]*[.$Z$5]*MAGNET([.AJ$24]+[.BB46]) +[.AK$29]*[.$Z$5]*MAGNET([.AK$24]+[.BB46]) +[.AL$29]*[.$Z$5]*MAGNET([.AL$24]+[.BB46]) +[.AM$29]*[.$Z$5]*MAGNET([.AM$24]+[.BB46]) +[.AN$29]*[.$Z$5]*MAGNET([.AN$24]+[.BB46]) +[.AO$29]*[.$Z$5]*MAGNET([.AO$24]+[.BB46]) +[.AP$29]*[.$Z$5]*MAGNET([.AP$24]+[.$BB46])&#10;+[.AQ$29]*[.$Z$5]*MAGNET([.AQ$24]+[.$BB46])&#10;+[.AR$29]*[.$Z$5]*MAGNET([.AR$24]+[.$BB46])&#10;+[.AS$29]*[.$Z$5]*MAGNET([.AS$24]+[.$BB46])&#10;+[.AT$29]*[.$Z$5]*MAGNET([.AT$24]+[.$BB46])&#10;+[.AU$29]*[.$Z$5]*MAGNET([.AU$24]+[.$BB46])&#10;+[.AV$29]*[.$Z$5]*MAGNET([.AV$24]+[.$BB46])&#10;+[.AW$29]*[.$Z$5]*MAGNET([.AW$24]+[.$BB46])&#10;+[.AX$29]*[.$Z$5]*MAGNET([.AX$24]+[.$BB46])&#10;+[.AY$29]*[.$Z$5]*MAGNET([.AY$24]+[.$BB46]) +RAND()*[.$BG$13]" office:value-type="float" office:value="-26.9695767553391" calcext:value-type="float">
            <text:p>-26.9695767553391</text:p>
          </table:table-cell>
          <table:table-cell table:style-name="ce71" table:formula="of:=[.E$30]*[.$Z$5]*MAGNET([.E$24]+[.$BB46])+[.F$30]*[.$Z$5]*MAGNET([.F$24]+[.$BB46])+[.G$30]*[.$Z$5]*MAGNET([.G$24]+[.$BB46])+[.H$30]*[.$Z$5]*MAGNET([.H$24]+[.$BB46])+[.I$30]*[.$Z$5]*MAGNET([.I$24]+[.$BB46])+[.J$30]*[.$Z$5]*MAGNET([.J$24]+[.$BB46])+[.K$30]*[.$Z$5]*MAGNET([.K$24]+[.$BB46])+[.L$30]*[.$Z$5]*MAGNET([.L$24]+[.$BB46])+[.M$30]*[.$Z$5]*MAGNET([.M$24]+[.$BB46])+[.N$30]*[.$Z$5]*MAGNET([.N$24]+[.$BB46])+[.O$30]*[.$Z$5]*MAGNET([.O$24]+[.$BB46])+[.P$30]*[.$Z$5]*MAGNET([.P$24]+[.$BB46])+[.Q$30]*[.$Z$5]*MAGNET([.Q$24]+[.$BB46])+[.R$30]*[.$Z$5]*MAGNET([.R$24]+[.$BB46])+[.S$30]*[.$Z$5]*MAGNET([.S$24]+[.$BB46])+[.T$30]*[.$Z$5]*MAGNET([.T$24]+[.$BB46])+[.U$30]*[.$Z$5]*MAGNET([.U$24]+[.$BB46])+[.V$30]*[.$Z$5]*MAGNET([.V$24]+[.$BB46])+[.W$30]*[.$Z$5]*MAGNET([.W$24]+[.$BB46])+[.X$30]*[.$Z$5]*MAGNET([.X$24]+[.$BB46])+[.Y$30]*[.$Z$5]*MAGNET([.Y$24]+[.$BB46])+[.Z$30]*[.$Z$5]*MAGNET([.Z$24]+[.$BB46])+[.AA$30]*[.$Z$5]*MAGNET([.AA$24]+[.$BB46])+[.AB$30]*[.$Z$5]*MAGNET([.AB$24]+[.$BB46])+[.AC$30]*[.$Z$5]*MAGNET([.AC$24]+[.$BB46])+[.AD$30]*[.$Z$5]*MAGNET([.AD$24]+[.$BB46])+[.AE$30]*[.$Z$5]*MAGNET([.AE$24]+[.$BB46])+[.AF$30]*[.$Z$5]*MAGNET([.AF$24]+[.$BB46])+[.AG$30]*[.$Z$5]*MAGNET([.AG$24]+[.$BB46])+[.D$30]*[.$Z$5]*MAGNET([.D$24]+[.$BB46])+[.AH$30]*[.$Z$5]*MAGNET([.AH$24]+[.BB46]) +[.AI$30]*[.$Z$5]*MAGNET([.AI$24]+[.BB46]) +[.AJ$30]*[.$Z$5]*MAGNET([.AJ$24]+[.BB46]) +[.AK$30]*[.$Z$5]*MAGNET([.AK$24]+[.BB46]) +[.AL$30]*[.$Z$5]*MAGNET([.AL$24]+[.BB46]) +[.AM$30]*[.$Z$5]*MAGNET([.AM$24]+[.BB46]) +[.AN$30]*[.$Z$5]*MAGNET([.AN$24]+[.BB46]) +[.AO$30]*[.$Z$5]*MAGNET([.AO$24]+[.BB46]) +[.AP$30]*[.$Z$5]*MAGNET([.AP$24]+[.$BB46])&#10;+[.AQ$30]*[.$Z$5]*MAGNET([.AQ$24]+[.$BB46])&#10;+[.AR$30]*[.$Z$5]*MAGNET([.AR$24]+[.$BB46])&#10;+[.AS$30]*[.$Z$5]*MAGNET([.AS$24]+[.$BB46])&#10;+[.AT$30]*[.$Z$5]*MAGNET([.AT$24]+[.$BB46])&#10;+[.AU$30]*[.$Z$5]*MAGNET([.AU$24]+[.$BB46])&#10;+[.AV$30]*[.$Z$5]*MAGNET([.AV$24]+[.$BB46])&#10;+[.AW$30]*[.$Z$5]*MAGNET([.AW$24]+[.$BB46])&#10;+[.AX$30]*[.$Z$5]*MAGNET([.AX$24]+[.$BB46])&#10;+[.AY$30]*[.$Z$5]*MAGNET([.AY$24]+[.$BB46]) +RAND()*[.$BH$13]" office:value-type="float" office:value="0" calcext:value-type="float">
            <text:p>0</text:p>
          </table:table-cell>
          <table:table-cell table:style-name="ce71" table:formula="of:=[.E$31]*[.$Z$5]*MAGNET([.E$24]+[.$BB46])+[.F$31]*[.$Z$5]*MAGNET([.F$24]+[.$BB46])+[.G$31]*[.$Z$5]*MAGNET([.G$24]+[.$BB46])+[.H$31]*[.$Z$5]*MAGNET([.H$24]+[.$BB46])+[.I$31]*[.$Z$5]*MAGNET([.I$24]+[.$BB46])+[.J$31]*[.$Z$5]*MAGNET([.J$24]+[.$BB46])+[.K$31]*[.$Z$5]*MAGNET([.K$24]+[.$BB46])+[.L$31]*[.$Z$5]*MAGNET([.L$24]+[.$BB46])+[.M$31]*[.$Z$5]*MAGNET([.M$24]+[.$BB46])+[.N$31]*[.$Z$5]*MAGNET([.N$24]+[.$BB46])+[.O$31]*[.$Z$5]*MAGNET([.O$24]+[.$BB46])+[.P$31]*[.$Z$5]*MAGNET([.P$24]+[.$BB46])+[.Q$31]*[.$Z$5]*MAGNET([.Q$24]+[.$BB46])+[.R$31]*[.$Z$5]*MAGNET([.R$24]+[.$BB46])+[.S$31]*[.$Z$5]*MAGNET([.S$24]+[.$BB46])+[.T$31]*[.$Z$5]*MAGNET([.T$24]+[.$BB46])+[.U$31]*[.$Z$5]*MAGNET([.U$24]+[.$BB46])+[.V$31]*[.$Z$5]*MAGNET([.V$24]+[.$BB46])+[.W$31]*[.$Z$5]*MAGNET([.W$24]+[.$BB46])+[.X$31]*[.$Z$5]*MAGNET([.X$24]+[.$BB46])+[.Y$31]*[.$Z$5]*MAGNET([.Y$24]+[.$BB46])+[.Z$31]*[.$Z$5]*MAGNET([.Z$24]+[.$BB46])+[.AA$31]*[.$Z$5]*MAGNET([.AA$24]+[.$BB46])+[.AB$31]*[.$Z$5]*MAGNET([.AB$24]+[.$BB46])+[.AC$31]*[.$Z$5]*MAGNET([.AC$24]+[.$BB46])+[.AD$31]*[.$Z$5]*MAGNET([.AD$24]+[.$BB46])+[.AE$31]*[.$Z$5]*MAGNET([.AE$24]+[.$BB46])+[.AF$31]*[.$Z$5]*MAGNET([.AF$24]+[.$BB46])+[.AG$31]*[.$Z$5]*MAGNET([.AG$24]+[.$BB46])+[.D$31]*[.$Z$5]*MAGNET([.D$24]+[.$BB46])+[.AH$31]*[.$Z$5]*MAGNET([.AH$24]+[.BB46]) +[.AI$31]*[.$Z$5]*MAGNET([.AI$24]+[.BB46]) +[.AJ$31]*[.$Z$5]*MAGNET([.AJ$24]+[.BB46]) +[.AK$31]*[.$Z$5]*MAGNET([.AK$24]+[.BB46]) +[.AL$31]*[.$Z$5]*MAGNET([.AL$24]+[.BB46]) +[.AM$31]*[.$Z$5]*MAGNET([.AM$24]+[.BB46]) +[.AN$31]*[.$Z$5]*MAGNET([.AN$24]+[.BB46]) +[.AO$31]*[.$Z$5]*MAGNET([.AO$24]+[.BB46]) +[.AP$31]*[.$Z$5]*MAGNET([.AP$24]+[.$BB46])&#10;+[.AQ$31]*[.$Z$5]*MAGNET([.AQ$24]+[.$BB46])&#10;+[.AR$31]*[.$Z$5]*MAGNET([.AR$24]+[.$BB46])&#10;+[.AS$31]*[.$Z$5]*MAGNET([.AS$24]+[.$BB46])&#10;+[.AT$31]*[.$Z$5]*MAGNET([.AT$24]+[.$BB46])&#10;+[.AU$31]*[.$Z$5]*MAGNET([.AU$24]+[.$BB46])&#10;+[.AV$31]*[.$Z$5]*MAGNET([.AV$24]+[.$BB46])&#10;+[.AW$31]*[.$Z$5]*MAGNET([.AW$24]+[.$BB46])&#10;+[.AX$31]*[.$Z$5]*MAGNET([.AX$24]+[.$BB46])&#10;+[.AY$31]*[.$Z$5]*MAGNET([.AY$24]+[.$BB46]) +RAND()*[.$BI$13]" office:value-type="float" office:value="0" calcext:value-type="float">
            <text:p>0</text:p>
          </table:table-cell>
          <table:table-cell table:style-name="ce71" table:formula="of:=[.E$32]*[.$Z$5]*MAGNET([.E$24]+[.$BB46])+[.F$32]*[.$Z$5]*MAGNET([.F$24]+[.$BB46])+[.G$32]*[.$Z$5]*MAGNET([.G$24]+[.$BB46])+[.H$32]*[.$Z$5]*MAGNET([.H$24]+[.$BB46])+[.I$32]*[.$Z$5]*MAGNET([.I$24]+[.$BB46])+[.J$32]*[.$Z$5]*MAGNET([.J$24]+[.$BB46])+[.K$32]*[.$Z$5]*MAGNET([.K$24]+[.$BB46])+[.L$32]*[.$Z$5]*MAGNET([.L$24]+[.$BB46])+[.M$32]*[.$Z$5]*MAGNET([.M$24]+[.$BB46])+[.N$32]*[.$Z$5]*MAGNET([.N$24]+[.$BB46])+[.O$32]*[.$Z$5]*MAGNET([.O$24]+[.$BB46])+[.P$32]*[.$Z$5]*MAGNET([.P$24]+[.$BB46])+[.Q$32]*[.$Z$5]*MAGNET([.Q$24]+[.$BB46])+[.R$32]*[.$Z$5]*MAGNET([.R$24]+[.$BB46])+[.S$32]*[.$Z$5]*MAGNET([.S$24]+[.$BB46])+[.T$32]*[.$Z$5]*MAGNET([.T$24]+[.$BB46])+[.U$32]*[.$Z$5]*MAGNET([.U$24]+[.$BB46])+[.V$32]*[.$Z$5]*MAGNET([.V$24]+[.$BB46])+[.W$32]*[.$Z$5]*MAGNET([.W$24]+[.$BB46])+[.X$32]*[.$Z$5]*MAGNET([.X$24]+[.$BB46])+[.Y$32]*[.$Z$5]*MAGNET([.Y$24]+[.$BB46])+[.Z$32]*[.$Z$5]*MAGNET([.Z$24]+[.$BB46])+[.AA$32]*[.$Z$5]*MAGNET([.AA$24]+[.$BB46])+[.AB$32]*[.$Z$5]*MAGNET([.AB$24]+[.$BB46])+[.AC$32]*[.$Z$5]*MAGNET([.AC$24]+[.$BB46])+[.AD$32]*[.$Z$5]*MAGNET([.AD$24]+[.$BB46])+[.AE$32]*[.$Z$5]*MAGNET([.AE$24]+[.$BB46])+[.AF$32]*[.$Z$5]*MAGNET([.AF$24]+[.$BB46])+[.AG$32]*[.$Z$5]*MAGNET([.AG$24]+[.$BB46])+[.D$32]*[.$Z$5]*MAGNET([.D$24]+[.$BB46])+[.AH$32]*[.$Z$5]*MAGNET([.AH$24]+[.BB46]) +[.AI$32]*[.$Z$5]*MAGNET([.AI$24]+[.BB46]) +[.AJ$32]*[.$Z$5]*MAGNET([.AJ$24]+[.BB46]) +[.AK$32]*[.$Z$5]*MAGNET([.AK$24]+[.BB46]) +[.AL$32]*[.$Z$5]*MAGNET([.AL$24]+[.BB46]) +[.AM$32]*[.$Z$5]*MAGNET([.AM$24]+[.BB46]) +[.AN$32]*[.$Z$5]*MAGNET([.AN$24]+[.BB46]) +[.AO$32]*[.$Z$5]*MAGNET([.AO$24]+[.BB46]) +[.AP$32]*[.$Z$5]*MAGNET([.AP$24]+[.$BB46])&#10;+[.AQ$32]*[.$Z$5]*MAGNET([.AQ$24]+[.$BB46])&#10;+[.AR$32]*[.$Z$5]*MAGNET([.AR$24]+[.$BB46])&#10;+[.AS$32]*[.$Z$5]*MAGNET([.AS$24]+[.$BB46])&#10;+[.AT$32]*[.$Z$5]*MAGNET([.AT$24]+[.$BB46])&#10;+[.AU$32]*[.$Z$5]*MAGNET([.AU$24]+[.$BB46])&#10;+[.AV$32]*[.$Z$5]*MAGNET([.AV$24]+[.$BB46])&#10;+[.AW$32]*[.$Z$5]*MAGNET([.AW$24]+[.$BB46])&#10;+[.AX$32]*[.$Z$5]*MAGNET([.AX$24]+[.$BB46])&#10;+[.AY$32]*[.$Z$5]*MAGNET([.AY$24]+[.$BB4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formula="of:=COUNTIF([.D$15:.D$22];&quot;=&quot; &amp;[.$C47])" office:value-type="float" office:value="0" calcext:value-type="float">
            <text:p>0</text:p>
          </table:table-cell>
          <table:table-cell table:formula="of:=COUNTIF([.E$15:.E$22];&quot;=&quot; &amp;[.$C47])" office:value-type="float" office:value="0" calcext:value-type="float">
            <text:p>0</text:p>
          </table:table-cell>
          <table:table-cell table:formula="of:=COUNTIF([.F$15:.F$22];&quot;=&quot; &amp;[.$C47])" office:value-type="float" office:value="0" calcext:value-type="float">
            <text:p>0</text:p>
          </table:table-cell>
          <table:table-cell table:formula="of:=COUNTIF([.G$15:.G$22];&quot;=&quot; &amp;[.$C47])" office:value-type="float" office:value="0" calcext:value-type="float">
            <text:p>0</text:p>
          </table:table-cell>
          <table:table-cell table:formula="of:=COUNTIF([.H$15:.H$22];&quot;=&quot; &amp;[.$C47])" office:value-type="float" office:value="0" calcext:value-type="float">
            <text:p>0</text:p>
          </table:table-cell>
          <table:table-cell table:formula="of:=COUNTIF([.I$15:.I$22];&quot;=&quot; &amp;[.$C47])" office:value-type="float" office:value="0" calcext:value-type="float">
            <text:p>0</text:p>
          </table:table-cell>
          <table:table-cell table:formula="of:=COUNTIF([.J$15:.J$22];&quot;=&quot; &amp;[.$C47])" office:value-type="float" office:value="0" calcext:value-type="float">
            <text:p>0</text:p>
          </table:table-cell>
          <table:table-cell table:formula="of:=COUNTIF([.K$15:.K$22];&quot;=&quot; &amp;[.$C47])" office:value-type="float" office:value="0" calcext:value-type="float">
            <text:p>0</text:p>
          </table:table-cell>
          <table:table-cell table:formula="of:=COUNTIF([.L$15:.L$22];&quot;=&quot; &amp;[.$C47])" office:value-type="float" office:value="0" calcext:value-type="float">
            <text:p>0</text:p>
          </table:table-cell>
          <table:table-cell table:formula="of:=COUNTIF([.M$15:.M$22];&quot;=&quot; &amp;[.$C47])" office:value-type="float" office:value="0" calcext:value-type="float">
            <text:p>0</text:p>
          </table:table-cell>
          <table:table-cell table:formula="of:=COUNTIF([.N$15:.N$22];&quot;=&quot; &amp;[.$C47])" office:value-type="float" office:value="0" calcext:value-type="float">
            <text:p>0</text:p>
          </table:table-cell>
          <table:table-cell table:formula="of:=COUNTIF([.O$15:.O$22];&quot;=&quot; &amp;[.$C47])" office:value-type="float" office:value="0" calcext:value-type="float">
            <text:p>0</text:p>
          </table:table-cell>
          <table:table-cell table:formula="of:=COUNTIF([.P$15:.P$22];&quot;=&quot; &amp;[.$C47])" office:value-type="float" office:value="0" calcext:value-type="float">
            <text:p>0</text:p>
          </table:table-cell>
          <table:table-cell table:formula="of:=COUNTIF([.Q$15:.Q$22];&quot;=&quot; &amp;[.$C47])" office:value-type="float" office:value="0" calcext:value-type="float">
            <text:p>0</text:p>
          </table:table-cell>
          <table:table-cell table:formula="of:=COUNTIF([.R$15:.R$22];&quot;=&quot; &amp;[.$C47])" office:value-type="float" office:value="0" calcext:value-type="float">
            <text:p>0</text:p>
          </table:table-cell>
          <table:table-cell table:formula="of:=COUNTIF([.S$15:.S$22];&quot;=&quot; &amp;[.$C47])" office:value-type="float" office:value="0" calcext:value-type="float">
            <text:p>0</text:p>
          </table:table-cell>
          <table:table-cell table:formula="of:=COUNTIF([.T$15:.T$22];&quot;=&quot; &amp;[.$C47])" office:value-type="float" office:value="0" calcext:value-type="float">
            <text:p>0</text:p>
          </table:table-cell>
          <table:table-cell table:formula="of:=COUNTIF([.U$15:.U$22];&quot;=&quot; &amp;[.$C47])" office:value-type="float" office:value="0" calcext:value-type="float">
            <text:p>0</text:p>
          </table:table-cell>
          <table:table-cell table:formula="of:=COUNTIF([.V$15:.V$22];&quot;=&quot; &amp;[.$C47])" office:value-type="float" office:value="0" calcext:value-type="float">
            <text:p>0</text:p>
          </table:table-cell>
          <table:table-cell table:formula="of:=COUNTIF([.W$15:.W$22];&quot;=&quot; &amp;[.$C47])" office:value-type="float" office:value="0" calcext:value-type="float">
            <text:p>0</text:p>
          </table:table-cell>
          <table:table-cell table:formula="of:=COUNTIF([.X$15:.X$22];&quot;=&quot; &amp;[.$C47])" office:value-type="float" office:value="0" calcext:value-type="float">
            <text:p>0</text:p>
          </table:table-cell>
          <table:table-cell table:formula="of:=COUNTIF([.Y$15:.Y$22];&quot;=&quot; &amp;[.$C47])" office:value-type="float" office:value="0" calcext:value-type="float">
            <text:p>0</text:p>
          </table:table-cell>
          <table:table-cell table:formula="of:=COUNTIF([.Z$15:.Z$22];&quot;=&quot; &amp;[.$C47])" office:value-type="float" office:value="0" calcext:value-type="float">
            <text:p>0</text:p>
          </table:table-cell>
          <table:table-cell table:formula="of:=COUNTIF([.AA$15:.AA$22];&quot;=&quot; &amp;[.$C47])" office:value-type="float" office:value="0" calcext:value-type="float">
            <text:p>0</text:p>
          </table:table-cell>
          <table:table-cell table:formula="of:=COUNTIF([.AB$15:.AB$22];&quot;=&quot; &amp;[.$C47])" office:value-type="float" office:value="0" calcext:value-type="float">
            <text:p>0</text:p>
          </table:table-cell>
          <table:table-cell table:formula="of:=COUNTIF([.AC$15:.AC$22];&quot;=&quot; &amp;[.$C47])" office:value-type="float" office:value="0" calcext:value-type="float">
            <text:p>0</text:p>
          </table:table-cell>
          <table:table-cell table:formula="of:=COUNTIF([.AD$15:.AD$22];&quot;=&quot; &amp;[.$C47])" office:value-type="float" office:value="0" calcext:value-type="float">
            <text:p>0</text:p>
          </table:table-cell>
          <table:table-cell table:formula="of:=COUNTIF([.AE$15:.AE$22];&quot;=&quot; &amp;[.$C47])" office:value-type="float" office:value="0" calcext:value-type="float">
            <text:p>0</text:p>
          </table:table-cell>
          <table:table-cell table:formula="of:=COUNTIF([.AF$15:.AF$22];&quot;=&quot; &amp;[.$C47])" office:value-type="float" office:value="0" calcext:value-type="float">
            <text:p>0</text:p>
          </table:table-cell>
          <table:table-cell table:formula="of:=COUNTIF([.AG$15:.AG$22];&quot;=&quot; &amp;[.$C47])" office:value-type="float" office:value="0" calcext:value-type="float">
            <text:p>0</text:p>
          </table:table-cell>
          <table:table-cell table:formula="of:=COUNTIF([.AH$15:.AH$22];&quot;=&quot; &amp;[.$C47])" office:value-type="float" office:value="0" calcext:value-type="float">
            <text:p>0</text:p>
          </table:table-cell>
          <table:table-cell table:formula="of:=COUNTIF([.AI$15:.AI$22];&quot;=&quot; &amp;[.$C47])" office:value-type="float" office:value="0" calcext:value-type="float">
            <text:p>0</text:p>
          </table:table-cell>
          <table:table-cell table:formula="of:=COUNTIF([.AJ$15:.AJ$22];&quot;=&quot; &amp;[.$C47])" office:value-type="float" office:value="0" calcext:value-type="float">
            <text:p>0</text:p>
          </table:table-cell>
          <table:table-cell table:formula="of:=COUNTIF([.AK$15:.AK$22];&quot;=&quot; &amp;[.$C47])" office:value-type="float" office:value="0" calcext:value-type="float">
            <text:p>0</text:p>
          </table:table-cell>
          <table:table-cell table:formula="of:=COUNTIF([.AL$15:.AL$22];&quot;=&quot; &amp;[.$C47])" office:value-type="float" office:value="0" calcext:value-type="float">
            <text:p>0</text:p>
          </table:table-cell>
          <table:table-cell table:formula="of:=COUNTIF([.AM$15:.AM$22];&quot;=&quot; &amp;[.$C47])" office:value-type="float" office:value="0" calcext:value-type="float">
            <text:p>0</text:p>
          </table:table-cell>
          <table:table-cell table:formula="of:=COUNTIF([.AN$15:.AN$22];&quot;=&quot; &amp;[.$C47])" office:value-type="float" office:value="0" calcext:value-type="float">
            <text:p>0</text:p>
          </table:table-cell>
          <table:table-cell table:formula="of:=COUNTIF([.AO$15:.AO$22];&quot;=&quot; &amp;[.$C47])" office:value-type="float" office:value="0" calcext:value-type="float">
            <text:p>0</text:p>
          </table:table-cell>
          <table:table-cell table:formula="of:=COUNTIF([.AP$15:.AP$22];&quot;=&quot; &amp;[.$C47])" office:value-type="float" office:value="0" calcext:value-type="float">
            <text:p>0</text:p>
          </table:table-cell>
          <table:table-cell table:formula="of:=COUNTIF([.AQ$15:.AQ$22];&quot;=&quot; &amp;[.$C47])" office:value-type="float" office:value="0" calcext:value-type="float">
            <text:p>0</text:p>
          </table:table-cell>
          <table:table-cell table:formula="of:=COUNTIF([.AR$15:.AR$22];&quot;=&quot; &amp;[.$C47])" office:value-type="float" office:value="0" calcext:value-type="float">
            <text:p>0</text:p>
          </table:table-cell>
          <table:table-cell table:formula="of:=COUNTIF([.AS$15:.AS$22];&quot;=&quot; &amp;[.$C47])" office:value-type="float" office:value="0" calcext:value-type="float">
            <text:p>0</text:p>
          </table:table-cell>
          <table:table-cell table:formula="of:=COUNTIF([.AT$15:.AT$22];&quot;=&quot; &amp;[.$C47])" office:value-type="float" office:value="0" calcext:value-type="float">
            <text:p>0</text:p>
          </table:table-cell>
          <table:table-cell table:formula="of:=COUNTIF([.AU$15:.AU$22];&quot;=&quot; &amp;[.$C47])" office:value-type="float" office:value="0" calcext:value-type="float">
            <text:p>0</text:p>
          </table:table-cell>
          <table:table-cell table:formula="of:=COUNTIF([.AV$15:.AV$22];&quot;=&quot; &amp;[.$C47])" office:value-type="float" office:value="0" calcext:value-type="float">
            <text:p>0</text:p>
          </table:table-cell>
          <table:table-cell table:formula="of:=COUNTIF([.AW$15:.AW$22];&quot;=&quot; &amp;[.$C47])" office:value-type="float" office:value="0" calcext:value-type="float">
            <text:p>0</text:p>
          </table:table-cell>
          <table:table-cell table:formula="of:=COUNTIF([.AX$15:.AX$22];&quot;=&quot; &amp;[.$C47])" office:value-type="float" office:value="0" calcext:value-type="float">
            <text:p>0</text:p>
          </table:table-cell>
          <table:table-cell table:formula="of:=COUNTIF([.AY$15:.AY$22];&quot;=&quot; &amp;[.$C47])" office:value-type="float" office:value="0" calcext:value-type="float">
            <text:p>0</text:p>
          </table:table-cell>
          <table:table-cell table:style-name="ce66"/>
          <table:table-cell table:formula="of:=[.BA46]+0.002" office:value-type="float" office:value="0.064" calcext:value-type="float">
            <text:p>0.064</text:p>
          </table:table-cell>
          <table:table-cell table:formula="of:=[.BA47]*[.$D$6]" office:value-type="float" office:value="3.21699087727595" calcext:value-type="float">
            <text:p>3.217</text:p>
          </table:table-cell>
          <table:table-cell table:formula="of:=[.D$25]*[.$Z$5]*MAGNET([.D$24]+[.BB47])+[.E$25]*[.$Z$5]*MAGNET([.E$24]+[.BB47])+[.F$25]*[.$Z$5]*MAGNET([.F$24]+[.BB47])+[.G$25]*[.$Z$5]*MAGNET([.G$24]+[.BB47])+[.H$25]*[.$Z$5]*MAGNET([.H$24]+[.BB47])+[.I$25]*[.$Z$5]*MAGNET([.I$24]+[.BB47])+[.J$25]*[.$Z$5]*MAGNET([.J$24]+[.BB47])+[.K$25]*[.$Z$5]*MAGNET([.K$24]+[.BB47])+[.L$25]*[.$Z$5]*MAGNET([.L$24]+[.BB47])+[.M$25]*[.$Z$5]*MAGNET([.M$24]+[.BB47])+[.N$25]*[.$Z$5]*MAGNET([.N$24]+[.BB47])+[.O$25]*[.$Z$5]*MAGNET([.O$24]+[.BB47])+[.P$25]*[.$Z$5]*MAGNET([.P$24]+[.BB47])+[.Q$25]*[.$Z$5]*MAGNET([.Q$24]+[.BB47])+[.R$25]*[.$Z$5]*MAGNET([.R$24]+[.BB47])+[.S$25]*[.$Z$5]*MAGNET([.S$24]+[.BB47])+[.T$25]*[.$Z$5]*MAGNET([.T$24]+[.BB47])+[.U$25]*[.$Z$5]*MAGNET([.U$24]+[.BB47])+[.V$25]*[.$Z$5]*MAGNET([.V$24]+[.BB47])+[.W$25]*[.$Z$5]*MAGNET([.W$24]+[.BB47])+[.X$25]*[.$Z$5]*MAGNET([.X$24]+[.BB47])+[.Y$25]*[.$Z$5]*MAGNET([.Y$24]+[.BB47])+[.Z$25]*[.$Z$5]*MAGNET([.Z$24]+[.BB47])+[.AA$25]*[.$Z$5]*MAGNET([.AA$24]+[.BB47])+[.AB$25]*[.$Z$5]*MAGNET([.AB$24]+[.BB47])+[.AC$25]*[.$Z$5]*MAGNET([.AC$24]+[.BB47])+[.AD$25]*[.$Z$5]*MAGNET([.AD$24]+[.BB47])+[.AE$25]*[.$Z$5]*MAGNET([.AE$24]+[.BB47])+[.AF$25]*[.$Z$5]*MAGNET([.AF$24]+[.BB47])+[.AG$25]*[.$Z$5]*MAGNET([.AG$24]+[.BB47])+[.AH$25]*[.$Z$5]*MAGNET([.AH$24]+[.BB47]) +[.AI$25]*[.$Z$5]*MAGNET([.AI$24]+[.BB47]) +[.AJ$25]*[.$Z$5]*MAGNET([.AJ$24]+[.BB47]) +[.AK$25]*[.$Z$5]*MAGNET([.AK$24]+[.BB47]) +[.AL$25]*[.$Z$5]*MAGNET([.AL$24]+[.BB47]) +[.AM$25]*[.$Z$5]*MAGNET([.AM$24]+[.BB47]) +[.AN$25]*[.$Z$5]*MAGNET([.AN$24]+[.BB47]) +[.AO$25]*[.$Z$5]*MAGNET([.AO$24]+[.BB47])+RAND()*[.$BC$13]+[.AP$25]*[.$Z$5]*MAGNET([.AP$24]+[.BB47])&#10;+[.AQ$25]*[.$Z$5]*MAGNET([.AQ$24]+[.BB47])&#10;+[.AR$25]*[.$Z$5]*MAGNET([.AR$24]+[.BB47])&#10;+[.AS$25]*[.$Z$5]*MAGNET([.AS$24]+[.BB47])&#10;+[.AT$25]*[.$Z$5]*MAGNET([.AT$24]+[.BB47])&#10;+[.AU$25]*[.$Z$5]*MAGNET([.AU$24]+[.BB47])&#10;+[.AV$25]*[.$Z$5]*MAGNET([.AV$24]+[.BB47])&#10;+[.AW$25]*[.$Z$5]*MAGNET([.AW$24]+[.BB47])&#10;+[.AX$25]*[.$Z$5]*MAGNET([.AX$24]+[.BB47])&#10;+[.AY$25]*[.$Z$5]*MAGNET([.AY$24]+[.BB47])" office:value-type="float" office:value="46.1926117983998" calcext:value-type="float">
            <text:p>46.19</text:p>
          </table:table-cell>
          <table:table-cell table:style-name="ce70" table:formula="of:=[.E$26]*[.$Z$5]*MAGNET([.E$24]+[.$BB47])+[.F$26]*[.$Z$5]*MAGNET([.F$24]+[.$BB47])+[.G$26]*[.$Z$5]*MAGNET([.G$24]+[.$BB47])+[.H$26]*[.$Z$5]*MAGNET([.H$24]+[.$BB47])+[.I$26]*[.$Z$5]*MAGNET([.I$24]+[.$BB47])+[.J$26]*[.$Z$5]*MAGNET([.J$24]+[.$BB47])+[.K$26]*[.$Z$5]*MAGNET([.K$24]+[.$BB47])+[.L$26]*[.$Z$5]*MAGNET([.L$24]+[.$BB47])+[.M$26]*[.$Z$5]*MAGNET([.M$24]+[.$BB47])+[.N$26]*[.$Z$5]*MAGNET([.N$24]+[.$BB47])+[.O$26]*[.$Z$5]*MAGNET([.O$24]+[.$BB47])+[.P$26]*[.$Z$5]*MAGNET([.P$24]+[.$BB47])+[.Q$26]*[.$Z$5]*MAGNET([.Q$24]+[.$BB47])+[.R$26]*[.$Z$5]*MAGNET([.R$24]+[.$BB47])+[.S$26]*[.$Z$5]*MAGNET([.S$24]+[.$BB47])+[.T$26]*[.$Z$5]*MAGNET([.T$24]+[.$BB47])+[.U$26]*[.$Z$5]*MAGNET([.U$24]+[.$BB47])+[.V$26]*[.$Z$5]*MAGNET([.V$24]+[.$BB47])+[.W$26]*[.$Z$5]*MAGNET([.W$24]+[.$BB47])+[.X$26]*[.$Z$5]*MAGNET([.X$24]+[.$BB47])+[.Y$26]*[.$Z$5]*MAGNET([.Y$24]+[.$BB47])+[.Z$26]*[.$Z$5]*MAGNET([.Z$24]+[.$BB47])+[.AA$26]*[.$Z$5]*MAGNET([.AA$24]+[.$BB47])+[.AB$26]*[.$Z$5]*MAGNET([.AB$24]+[.$BB47])+[.AC$26]*[.$Z$5]*MAGNET([.AC$24]+[.$BB47])+[.AD$26]*[.$Z$5]*MAGNET([.AD$24]+[.$BB47])+[.AE$26]*[.$Z$5]*MAGNET([.AE$24]+[.$BB47])+[.AF$26]*[.$Z$5]*MAGNET([.AF$24]+[.$BB47])+[.AG$26]*[.$Z$5]*MAGNET([.AG$24]+[.$BB47])+[.D$26]*[.$Z$5]*MAGNET([.D$24]+[.$BB47])+[.AH$26]*[.$Z$5]*MAGNET([.AH$24]+[.BB47]) +[.AI$26]*[.$Z$5]*MAGNET([.AI$24]+[.BB47]) +[.AJ$26]*[.$Z$5]*MAGNET([.AJ$24]+[.BB47]) +[.AK$26]*[.$Z$5]*MAGNET([.AK$24]+[.BB47]) +[.AL$26]*[.$Z$5]*MAGNET([.AL$24]+[.BB47]) +[.AM$26]*[.$Z$5]*MAGNET([.AM$24]+[.BB47]) +[.AN$26]*[.$Z$5]*MAGNET([.AN$24]+[.BB47]) +[.AO$26]*[.$Z$5]*MAGNET([.AO$24]+[.BB47]) +[.AP$26]*[.$Z$5]*MAGNET([.AP$24]+[.$BB47])&#10;+[.AQ$26]*[.$Z$5]*MAGNET([.AQ$24]+[.$BB47])&#10;+[.AR$26]*[.$Z$5]*MAGNET([.AR$24]+[.$BB47])&#10;+[.AS$26]*[.$Z$5]*MAGNET([.AS$24]+[.$BB47])&#10;+[.AT$26]*[.$Z$5]*MAGNET([.AT$24]+[.$BB47])&#10;+[.AU$26]*[.$Z$5]*MAGNET([.AU$24]+[.$BB47])&#10;+[.AV$26]*[.$Z$5]*MAGNET([.AV$24]+[.$BB47])&#10;+[.AW$26]*[.$Z$5]*MAGNET([.AW$24]+[.$BB47])&#10;+[.AX$26]*[.$Z$5]*MAGNET([.AX$24]+[.$BB47])&#10;+[.AY$26]*[.$Z$5]*MAGNET([.AY$24]+[.$BB47]) +RAND()*[.$BD$13]" office:value-type="float" office:value="-83.5944994157884" calcext:value-type="float">
            <text:p>-83.59</text:p>
          </table:table-cell>
          <table:table-cell table:style-name="ce71" table:formula="of:=[.E$27]*[.$Z$5]*MAGNET([.E$24]+[.$BB47])+[.F$27]*[.$Z$5]*MAGNET([.F$24]+[.$BB47])+[.G$27]*[.$Z$5]*MAGNET([.G$24]+[.$BB47])+[.H$27]*[.$Z$5]*MAGNET([.H$24]+[.$BB47])+[.I$27]*[.$Z$5]*MAGNET([.I$24]+[.$BB47])+[.J$27]*[.$Z$5]*MAGNET([.J$24]+[.$BB47])+[.K$27]*[.$Z$5]*MAGNET([.K$24]+[.$BB47])+[.L$27]*[.$Z$5]*MAGNET([.L$24]+[.$BB47])+[.M$27]*[.$Z$5]*MAGNET([.M$24]+[.$BB47])+[.N$27]*[.$Z$5]*MAGNET([.N$24]+[.$BB47])+[.O$27]*[.$Z$5]*MAGNET([.O$24]+[.$BB47])+[.P$27]*[.$Z$5]*MAGNET([.P$24]+[.$BB47])+[.Q$27]*[.$Z$5]*MAGNET([.Q$24]+[.$BB47])+[.R$27]*[.$Z$5]*MAGNET([.R$24]+[.$BB47])+[.S$27]*[.$Z$5]*MAGNET([.S$24]+[.$BB47])+[.T$27]*[.$Z$5]*MAGNET([.T$24]+[.$BB47])+[.U$27]*[.$Z$5]*MAGNET([.U$24]+[.$BB47])+[.V$27]*[.$Z$5]*MAGNET([.V$24]+[.$BB47])+[.W$27]*[.$Z$5]*MAGNET([.W$24]+[.$BB47])+[.X$27]*[.$Z$5]*MAGNET([.X$24]+[.$BB47])+[.Y$27]*[.$Z$5]*MAGNET([.Y$24]+[.$BB47])+[.Z$27]*[.$Z$5]*MAGNET([.Z$24]+[.$BB47])+[.AA$27]*[.$Z$5]*MAGNET([.AA$24]+[.$BB47])+[.AB$27]*[.$Z$5]*MAGNET([.AB$24]+[.$BB47])+[.AC$27]*[.$Z$5]*MAGNET([.AC$24]+[.$BB47])+[.AD$27]*[.$Z$5]*MAGNET([.AD$24]+[.$BB47])+[.AE$27]*[.$Z$5]*MAGNET([.AE$24]+[.$BB47])+[.AF$27]*[.$Z$5]*MAGNET([.AF$24]+[.$BB47])+[.AG$27]*[.$Z$5]*MAGNET([.AG$24]+[.$BB47])+[.D$27]*[.$Z$5]*MAGNET([.D$24]+[.$BB47])+[.AH$27]*[.$Z$5]*MAGNET([.AH$24]+[.BB47]) +[.AI$27]*[.$Z$5]*MAGNET([.AI$24]+[.BB47]) +[.AJ$27]*[.$Z$5]*MAGNET([.AJ$24]+[.BB47]) +[.AK$27]*[.$Z$5]*MAGNET([.AK$24]+[.BB47]) +[.AL$27]*[.$Z$5]*MAGNET([.AL$24]+[.BB47]) +[.AM$27]*[.$Z$5]*MAGNET([.AM$24]+[.BB47]) +[.AN$27]*[.$Z$5]*MAGNET([.AN$24]+[.BB47]) +[.AO$27]*[.$Z$5]*MAGNET([.AO$24]+[.BB47]) +[.AP$27]*[.$Z$5]*MAGNET([.AP$24]+[.$BB47])&#10;+[.AQ$27]*[.$Z$5]*MAGNET([.AQ$24]+[.$BB47])&#10;+[.AR$27]*[.$Z$5]*MAGNET([.AR$24]+[.$BB47])&#10;+[.AS$27]*[.$Z$5]*MAGNET([.AS$24]+[.$BB47])&#10;+[.AT$27]*[.$Z$5]*MAGNET([.AT$24]+[.$BB47])&#10;+[.AU$27]*[.$Z$5]*MAGNET([.AU$24]+[.$BB47])&#10;+[.AV$27]*[.$Z$5]*MAGNET([.AV$24]+[.$BB47])&#10;+[.AW$27]*[.$Z$5]*MAGNET([.AW$24]+[.$BB47])&#10;+[.AX$27]*[.$Z$5]*MAGNET([.AX$24]+[.$BB47])&#10;+[.AY$27]*[.$Z$5]*MAGNET([.AY$24]+[.$BB47]) +RAND()*[.$BE$13]" office:value-type="float" office:value="72.4789498369999" calcext:value-type="float">
            <text:p>72.4789498369999</text:p>
          </table:table-cell>
          <table:table-cell table:style-name="ce71" table:formula="of:=[.E$28]*[.$Z$5]*MAGNET([.E$24]+[.$BB47])+[.F$28]*[.$Z$5]*MAGNET([.F$24]+[.$BB47])+[.G$28]*[.$Z$5]*MAGNET([.G$24]+[.$BB47])+[.H$28]*[.$Z$5]*MAGNET([.H$24]+[.$BB47])+[.I$28]*[.$Z$5]*MAGNET([.I$24]+[.$BB47])+[.J$28]*[.$Z$5]*MAGNET([.J$24]+[.$BB47])+[.K$28]*[.$Z$5]*MAGNET([.K$24]+[.$BB47])+[.L$28]*[.$Z$5]*MAGNET([.L$24]+[.$BB47])+[.M$28]*[.$Z$5]*MAGNET([.M$24]+[.$BB47])+[.N$28]*[.$Z$5]*MAGNET([.N$24]+[.$BB47])+[.O$28]*[.$Z$5]*MAGNET([.O$24]+[.$BB47])+[.P$28]*[.$Z$5]*MAGNET([.P$24]+[.$BB47])+[.Q$28]*[.$Z$5]*MAGNET([.Q$24]+[.$BB47])+[.R$28]*[.$Z$5]*MAGNET([.R$24]+[.$BB47])+[.S$28]*[.$Z$5]*MAGNET([.S$24]+[.$BB47])+[.T$28]*[.$Z$5]*MAGNET([.T$24]+[.$BB47])+[.U$28]*[.$Z$5]*MAGNET([.U$24]+[.$BB47])+[.V$28]*[.$Z$5]*MAGNET([.V$24]+[.$BB47])+[.W$28]*[.$Z$5]*MAGNET([.W$24]+[.$BB47])+[.X$28]*[.$Z$5]*MAGNET([.X$24]+[.$BB47])+[.Y$28]*[.$Z$5]*MAGNET([.Y$24]+[.$BB47])+[.Z$28]*[.$Z$5]*MAGNET([.Z$24]+[.$BB47])+[.AA$28]*[.$Z$5]*MAGNET([.AA$24]+[.$BB47])+[.AB$28]*[.$Z$5]*MAGNET([.AB$24]+[.$BB47])+[.AC$28]*[.$Z$5]*MAGNET([.AC$24]+[.$BB47])+[.AD$28]*[.$Z$5]*MAGNET([.AD$24]+[.$BB47])+[.AE$28]*[.$Z$5]*MAGNET([.AE$24]+[.$BB47])+[.AF$28]*[.$Z$5]*MAGNET([.AF$24]+[.$BB47])+[.AG$28]*[.$Z$5]*MAGNET([.AG$24]+[.$BB47])+[.D$28]*[.$Z$5]*MAGNET([.D$24]+[.$BB47])+[.AH$28]*[.$Z$5]*MAGNET([.AH$24]+[.BB47]) +[.AI$28]*[.$Z$5]*MAGNET([.AI$24]+[.BB47]) +[.AJ$28]*[.$Z$5]*MAGNET([.AJ$24]+[.BB47]) +[.AK$28]*[.$Z$5]*MAGNET([.AK$24]+[.BB47]) +[.AL$28]*[.$Z$5]*MAGNET([.AL$24]+[.BB47]) +[.AM$28]*[.$Z$5]*MAGNET([.AM$24]+[.BB47]) +[.AN$28]*[.$Z$5]*MAGNET([.AN$24]+[.BB47]) +[.AO$28]*[.$Z$5]*MAGNET([.AO$24]+[.BB47]) +[.AP$28]*[.$Z$5]*MAGNET([.AP$24]+[.$BB47])&#10;+[.AQ$28]*[.$Z$5]*MAGNET([.AQ$24]+[.$BB47])&#10;+[.AR$28]*[.$Z$5]*MAGNET([.AR$24]+[.$BB47])&#10;+[.AS$28]*[.$Z$5]*MAGNET([.AS$24]+[.$BB47])&#10;+[.AT$28]*[.$Z$5]*MAGNET([.AT$24]+[.$BB47])&#10;+[.AU$28]*[.$Z$5]*MAGNET([.AU$24]+[.$BB47])&#10;+[.AV$28]*[.$Z$5]*MAGNET([.AV$24]+[.$BB47])&#10;+[.AW$28]*[.$Z$5]*MAGNET([.AW$24]+[.$BB47])&#10;+[.AX$28]*[.$Z$5]*MAGNET([.AX$24]+[.$BB47])&#10;+[.AY$28]*[.$Z$5]*MAGNET([.AY$24]+[.$BB47]) +RAND()*[.$BF$13]" office:value-type="float" office:value="9.79994224938386" calcext:value-type="float">
            <text:p>9.79994224938386</text:p>
          </table:table-cell>
          <table:table-cell table:style-name="ce71" table:formula="of:=[.E$29]*[.$Z$5]*MAGNET([.E$24]+[.$BB47])+[.F$29]*[.$Z$5]*MAGNET([.F$24]+[.$BB47])+[.G$29]*[.$Z$5]*MAGNET([.G$24]+[.$BB47])+[.H$29]*[.$Z$5]*MAGNET([.H$24]+[.$BB47])+[.I$29]*[.$Z$5]*MAGNET([.I$24]+[.$BB47])+[.J$29]*[.$Z$5]*MAGNET([.J$24]+[.$BB47])+[.K$29]*[.$Z$5]*MAGNET([.K$24]+[.$BB47])+[.L$29]*[.$Z$5]*MAGNET([.L$24]+[.$BB47])+[.M$29]*[.$Z$5]*MAGNET([.M$24]+[.$BB47])+[.N$29]*[.$Z$5]*MAGNET([.N$24]+[.$BB47])+[.O$29]*[.$Z$5]*MAGNET([.O$24]+[.$BB47])+[.P$29]*[.$Z$5]*MAGNET([.P$24]+[.$BB47])+[.Q$29]*[.$Z$5]*MAGNET([.Q$24]+[.$BB47])+[.R$29]*[.$Z$5]*MAGNET([.R$24]+[.$BB47])+[.S$29]*[.$Z$5]*MAGNET([.S$24]+[.$BB47])+[.T$29]*[.$Z$5]*MAGNET([.T$24]+[.$BB47])+[.U$29]*[.$Z$5]*MAGNET([.U$24]+[.$BB47])+[.V$29]*[.$Z$5]*MAGNET([.V$24]+[.$BB47])+[.W$29]*[.$Z$5]*MAGNET([.W$24]+[.$BB47])+[.X$29]*[.$Z$5]*MAGNET([.X$24]+[.$BB47])+[.Y$29]*[.$Z$5]*MAGNET([.Y$24]+[.$BB47])+[.Z$29]*[.$Z$5]*MAGNET([.Z$24]+[.$BB47])+[.AA$29]*[.$Z$5]*MAGNET([.AA$24]+[.$BB47])+[.AB$29]*[.$Z$5]*MAGNET([.AB$24]+[.$BB47])+[.AC$29]*[.$Z$5]*MAGNET([.AC$24]+[.$BB47])+[.AD$29]*[.$Z$5]*MAGNET([.AD$24]+[.$BB47])+[.AE$29]*[.$Z$5]*MAGNET([.AE$24]+[.$BB47])+[.AF$29]*[.$Z$5]*MAGNET([.AF$24]+[.$BB47])+[.AG$29]*[.$Z$5]*MAGNET([.AG$24]+[.$BB47])+[.D$29]*[.$Z$5]*MAGNET([.D$24]+[.$BB47])+[.AH$29]*[.$Z$5]*MAGNET([.AH$24]+[.BB47]) +[.AI$29]*[.$Z$5]*MAGNET([.AI$24]+[.BB47]) +[.AJ$29]*[.$Z$5]*MAGNET([.AJ$24]+[.BB47]) +[.AK$29]*[.$Z$5]*MAGNET([.AK$24]+[.BB47]) +[.AL$29]*[.$Z$5]*MAGNET([.AL$24]+[.BB47]) +[.AM$29]*[.$Z$5]*MAGNET([.AM$24]+[.BB47]) +[.AN$29]*[.$Z$5]*MAGNET([.AN$24]+[.BB47]) +[.AO$29]*[.$Z$5]*MAGNET([.AO$24]+[.BB47]) +[.AP$29]*[.$Z$5]*MAGNET([.AP$24]+[.$BB47])&#10;+[.AQ$29]*[.$Z$5]*MAGNET([.AQ$24]+[.$BB47])&#10;+[.AR$29]*[.$Z$5]*MAGNET([.AR$24]+[.$BB47])&#10;+[.AS$29]*[.$Z$5]*MAGNET([.AS$24]+[.$BB47])&#10;+[.AT$29]*[.$Z$5]*MAGNET([.AT$24]+[.$BB47])&#10;+[.AU$29]*[.$Z$5]*MAGNET([.AU$24]+[.$BB47])&#10;+[.AV$29]*[.$Z$5]*MAGNET([.AV$24]+[.$BB47])&#10;+[.AW$29]*[.$Z$5]*MAGNET([.AW$24]+[.$BB47])&#10;+[.AX$29]*[.$Z$5]*MAGNET([.AX$24]+[.$BB47])&#10;+[.AY$29]*[.$Z$5]*MAGNET([.AY$24]+[.$BB47]) +RAND()*[.$BG$13]" office:value-type="float" office:value="-31.6214432484305" calcext:value-type="float">
            <text:p>-31.6214432484305</text:p>
          </table:table-cell>
          <table:table-cell table:style-name="ce71" table:formula="of:=[.E$30]*[.$Z$5]*MAGNET([.E$24]+[.$BB47])+[.F$30]*[.$Z$5]*MAGNET([.F$24]+[.$BB47])+[.G$30]*[.$Z$5]*MAGNET([.G$24]+[.$BB47])+[.H$30]*[.$Z$5]*MAGNET([.H$24]+[.$BB47])+[.I$30]*[.$Z$5]*MAGNET([.I$24]+[.$BB47])+[.J$30]*[.$Z$5]*MAGNET([.J$24]+[.$BB47])+[.K$30]*[.$Z$5]*MAGNET([.K$24]+[.$BB47])+[.L$30]*[.$Z$5]*MAGNET([.L$24]+[.$BB47])+[.M$30]*[.$Z$5]*MAGNET([.M$24]+[.$BB47])+[.N$30]*[.$Z$5]*MAGNET([.N$24]+[.$BB47])+[.O$30]*[.$Z$5]*MAGNET([.O$24]+[.$BB47])+[.P$30]*[.$Z$5]*MAGNET([.P$24]+[.$BB47])+[.Q$30]*[.$Z$5]*MAGNET([.Q$24]+[.$BB47])+[.R$30]*[.$Z$5]*MAGNET([.R$24]+[.$BB47])+[.S$30]*[.$Z$5]*MAGNET([.S$24]+[.$BB47])+[.T$30]*[.$Z$5]*MAGNET([.T$24]+[.$BB47])+[.U$30]*[.$Z$5]*MAGNET([.U$24]+[.$BB47])+[.V$30]*[.$Z$5]*MAGNET([.V$24]+[.$BB47])+[.W$30]*[.$Z$5]*MAGNET([.W$24]+[.$BB47])+[.X$30]*[.$Z$5]*MAGNET([.X$24]+[.$BB47])+[.Y$30]*[.$Z$5]*MAGNET([.Y$24]+[.$BB47])+[.Z$30]*[.$Z$5]*MAGNET([.Z$24]+[.$BB47])+[.AA$30]*[.$Z$5]*MAGNET([.AA$24]+[.$BB47])+[.AB$30]*[.$Z$5]*MAGNET([.AB$24]+[.$BB47])+[.AC$30]*[.$Z$5]*MAGNET([.AC$24]+[.$BB47])+[.AD$30]*[.$Z$5]*MAGNET([.AD$24]+[.$BB47])+[.AE$30]*[.$Z$5]*MAGNET([.AE$24]+[.$BB47])+[.AF$30]*[.$Z$5]*MAGNET([.AF$24]+[.$BB47])+[.AG$30]*[.$Z$5]*MAGNET([.AG$24]+[.$BB47])+[.D$30]*[.$Z$5]*MAGNET([.D$24]+[.$BB47])+[.AH$30]*[.$Z$5]*MAGNET([.AH$24]+[.BB47]) +[.AI$30]*[.$Z$5]*MAGNET([.AI$24]+[.BB47]) +[.AJ$30]*[.$Z$5]*MAGNET([.AJ$24]+[.BB47]) +[.AK$30]*[.$Z$5]*MAGNET([.AK$24]+[.BB47]) +[.AL$30]*[.$Z$5]*MAGNET([.AL$24]+[.BB47]) +[.AM$30]*[.$Z$5]*MAGNET([.AM$24]+[.BB47]) +[.AN$30]*[.$Z$5]*MAGNET([.AN$24]+[.BB47]) +[.AO$30]*[.$Z$5]*MAGNET([.AO$24]+[.BB47]) +[.AP$30]*[.$Z$5]*MAGNET([.AP$24]+[.$BB47])&#10;+[.AQ$30]*[.$Z$5]*MAGNET([.AQ$24]+[.$BB47])&#10;+[.AR$30]*[.$Z$5]*MAGNET([.AR$24]+[.$BB47])&#10;+[.AS$30]*[.$Z$5]*MAGNET([.AS$24]+[.$BB47])&#10;+[.AT$30]*[.$Z$5]*MAGNET([.AT$24]+[.$BB47])&#10;+[.AU$30]*[.$Z$5]*MAGNET([.AU$24]+[.$BB47])&#10;+[.AV$30]*[.$Z$5]*MAGNET([.AV$24]+[.$BB47])&#10;+[.AW$30]*[.$Z$5]*MAGNET([.AW$24]+[.$BB47])&#10;+[.AX$30]*[.$Z$5]*MAGNET([.AX$24]+[.$BB47])&#10;+[.AY$30]*[.$Z$5]*MAGNET([.AY$24]+[.$BB47]) +RAND()*[.$BH$13]" office:value-type="float" office:value="0" calcext:value-type="float">
            <text:p>0</text:p>
          </table:table-cell>
          <table:table-cell table:style-name="ce71" table:formula="of:=[.E$31]*[.$Z$5]*MAGNET([.E$24]+[.$BB47])+[.F$31]*[.$Z$5]*MAGNET([.F$24]+[.$BB47])+[.G$31]*[.$Z$5]*MAGNET([.G$24]+[.$BB47])+[.H$31]*[.$Z$5]*MAGNET([.H$24]+[.$BB47])+[.I$31]*[.$Z$5]*MAGNET([.I$24]+[.$BB47])+[.J$31]*[.$Z$5]*MAGNET([.J$24]+[.$BB47])+[.K$31]*[.$Z$5]*MAGNET([.K$24]+[.$BB47])+[.L$31]*[.$Z$5]*MAGNET([.L$24]+[.$BB47])+[.M$31]*[.$Z$5]*MAGNET([.M$24]+[.$BB47])+[.N$31]*[.$Z$5]*MAGNET([.N$24]+[.$BB47])+[.O$31]*[.$Z$5]*MAGNET([.O$24]+[.$BB47])+[.P$31]*[.$Z$5]*MAGNET([.P$24]+[.$BB47])+[.Q$31]*[.$Z$5]*MAGNET([.Q$24]+[.$BB47])+[.R$31]*[.$Z$5]*MAGNET([.R$24]+[.$BB47])+[.S$31]*[.$Z$5]*MAGNET([.S$24]+[.$BB47])+[.T$31]*[.$Z$5]*MAGNET([.T$24]+[.$BB47])+[.U$31]*[.$Z$5]*MAGNET([.U$24]+[.$BB47])+[.V$31]*[.$Z$5]*MAGNET([.V$24]+[.$BB47])+[.W$31]*[.$Z$5]*MAGNET([.W$24]+[.$BB47])+[.X$31]*[.$Z$5]*MAGNET([.X$24]+[.$BB47])+[.Y$31]*[.$Z$5]*MAGNET([.Y$24]+[.$BB47])+[.Z$31]*[.$Z$5]*MAGNET([.Z$24]+[.$BB47])+[.AA$31]*[.$Z$5]*MAGNET([.AA$24]+[.$BB47])+[.AB$31]*[.$Z$5]*MAGNET([.AB$24]+[.$BB47])+[.AC$31]*[.$Z$5]*MAGNET([.AC$24]+[.$BB47])+[.AD$31]*[.$Z$5]*MAGNET([.AD$24]+[.$BB47])+[.AE$31]*[.$Z$5]*MAGNET([.AE$24]+[.$BB47])+[.AF$31]*[.$Z$5]*MAGNET([.AF$24]+[.$BB47])+[.AG$31]*[.$Z$5]*MAGNET([.AG$24]+[.$BB47])+[.D$31]*[.$Z$5]*MAGNET([.D$24]+[.$BB47])+[.AH$31]*[.$Z$5]*MAGNET([.AH$24]+[.BB47]) +[.AI$31]*[.$Z$5]*MAGNET([.AI$24]+[.BB47]) +[.AJ$31]*[.$Z$5]*MAGNET([.AJ$24]+[.BB47]) +[.AK$31]*[.$Z$5]*MAGNET([.AK$24]+[.BB47]) +[.AL$31]*[.$Z$5]*MAGNET([.AL$24]+[.BB47]) +[.AM$31]*[.$Z$5]*MAGNET([.AM$24]+[.BB47]) +[.AN$31]*[.$Z$5]*MAGNET([.AN$24]+[.BB47]) +[.AO$31]*[.$Z$5]*MAGNET([.AO$24]+[.BB47]) +[.AP$31]*[.$Z$5]*MAGNET([.AP$24]+[.$BB47])&#10;+[.AQ$31]*[.$Z$5]*MAGNET([.AQ$24]+[.$BB47])&#10;+[.AR$31]*[.$Z$5]*MAGNET([.AR$24]+[.$BB47])&#10;+[.AS$31]*[.$Z$5]*MAGNET([.AS$24]+[.$BB47])&#10;+[.AT$31]*[.$Z$5]*MAGNET([.AT$24]+[.$BB47])&#10;+[.AU$31]*[.$Z$5]*MAGNET([.AU$24]+[.$BB47])&#10;+[.AV$31]*[.$Z$5]*MAGNET([.AV$24]+[.$BB47])&#10;+[.AW$31]*[.$Z$5]*MAGNET([.AW$24]+[.$BB47])&#10;+[.AX$31]*[.$Z$5]*MAGNET([.AX$24]+[.$BB47])&#10;+[.AY$31]*[.$Z$5]*MAGNET([.AY$24]+[.$BB47]) +RAND()*[.$BI$13]" office:value-type="float" office:value="0" calcext:value-type="float">
            <text:p>0</text:p>
          </table:table-cell>
          <table:table-cell table:style-name="ce71" table:formula="of:=[.E$32]*[.$Z$5]*MAGNET([.E$24]+[.$BB47])+[.F$32]*[.$Z$5]*MAGNET([.F$24]+[.$BB47])+[.G$32]*[.$Z$5]*MAGNET([.G$24]+[.$BB47])+[.H$32]*[.$Z$5]*MAGNET([.H$24]+[.$BB47])+[.I$32]*[.$Z$5]*MAGNET([.I$24]+[.$BB47])+[.J$32]*[.$Z$5]*MAGNET([.J$24]+[.$BB47])+[.K$32]*[.$Z$5]*MAGNET([.K$24]+[.$BB47])+[.L$32]*[.$Z$5]*MAGNET([.L$24]+[.$BB47])+[.M$32]*[.$Z$5]*MAGNET([.M$24]+[.$BB47])+[.N$32]*[.$Z$5]*MAGNET([.N$24]+[.$BB47])+[.O$32]*[.$Z$5]*MAGNET([.O$24]+[.$BB47])+[.P$32]*[.$Z$5]*MAGNET([.P$24]+[.$BB47])+[.Q$32]*[.$Z$5]*MAGNET([.Q$24]+[.$BB47])+[.R$32]*[.$Z$5]*MAGNET([.R$24]+[.$BB47])+[.S$32]*[.$Z$5]*MAGNET([.S$24]+[.$BB47])+[.T$32]*[.$Z$5]*MAGNET([.T$24]+[.$BB47])+[.U$32]*[.$Z$5]*MAGNET([.U$24]+[.$BB47])+[.V$32]*[.$Z$5]*MAGNET([.V$24]+[.$BB47])+[.W$32]*[.$Z$5]*MAGNET([.W$24]+[.$BB47])+[.X$32]*[.$Z$5]*MAGNET([.X$24]+[.$BB47])+[.Y$32]*[.$Z$5]*MAGNET([.Y$24]+[.$BB47])+[.Z$32]*[.$Z$5]*MAGNET([.Z$24]+[.$BB47])+[.AA$32]*[.$Z$5]*MAGNET([.AA$24]+[.$BB47])+[.AB$32]*[.$Z$5]*MAGNET([.AB$24]+[.$BB47])+[.AC$32]*[.$Z$5]*MAGNET([.AC$24]+[.$BB47])+[.AD$32]*[.$Z$5]*MAGNET([.AD$24]+[.$BB47])+[.AE$32]*[.$Z$5]*MAGNET([.AE$24]+[.$BB47])+[.AF$32]*[.$Z$5]*MAGNET([.AF$24]+[.$BB47])+[.AG$32]*[.$Z$5]*MAGNET([.AG$24]+[.$BB47])+[.D$32]*[.$Z$5]*MAGNET([.D$24]+[.$BB47])+[.AH$32]*[.$Z$5]*MAGNET([.AH$24]+[.BB47]) +[.AI$32]*[.$Z$5]*MAGNET([.AI$24]+[.BB47]) +[.AJ$32]*[.$Z$5]*MAGNET([.AJ$24]+[.BB47]) +[.AK$32]*[.$Z$5]*MAGNET([.AK$24]+[.BB47]) +[.AL$32]*[.$Z$5]*MAGNET([.AL$24]+[.BB47]) +[.AM$32]*[.$Z$5]*MAGNET([.AM$24]+[.BB47]) +[.AN$32]*[.$Z$5]*MAGNET([.AN$24]+[.BB47]) +[.AO$32]*[.$Z$5]*MAGNET([.AO$24]+[.BB47]) +[.AP$32]*[.$Z$5]*MAGNET([.AP$24]+[.$BB47])&#10;+[.AQ$32]*[.$Z$5]*MAGNET([.AQ$24]+[.$BB47])&#10;+[.AR$32]*[.$Z$5]*MAGNET([.AR$24]+[.$BB47])&#10;+[.AS$32]*[.$Z$5]*MAGNET([.AS$24]+[.$BB47])&#10;+[.AT$32]*[.$Z$5]*MAGNET([.AT$24]+[.$BB47])&#10;+[.AU$32]*[.$Z$5]*MAGNET([.AU$24]+[.$BB47])&#10;+[.AV$32]*[.$Z$5]*MAGNET([.AV$24]+[.$BB47])&#10;+[.AW$32]*[.$Z$5]*MAGNET([.AW$24]+[.$BB47])&#10;+[.AX$32]*[.$Z$5]*MAGNET([.AX$24]+[.$BB47])&#10;+[.AY$32]*[.$Z$5]*MAGNET([.AY$24]+[.$BB4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6" calcext:value-type="float">
            <text:p>-6</text:p>
          </table:table-cell>
          <table:table-cell table:formula="of:=COUNTIF([.D$15:.D$22];&quot;=&quot; &amp;[.$C48])" office:value-type="float" office:value="0" calcext:value-type="float">
            <text:p>0</text:p>
          </table:table-cell>
          <table:table-cell table:formula="of:=COUNTIF([.E$15:.E$22];&quot;=&quot; &amp;[.$C48])" office:value-type="float" office:value="0" calcext:value-type="float">
            <text:p>0</text:p>
          </table:table-cell>
          <table:table-cell table:formula="of:=COUNTIF([.F$15:.F$22];&quot;=&quot; &amp;[.$C48])" office:value-type="float" office:value="0" calcext:value-type="float">
            <text:p>0</text:p>
          </table:table-cell>
          <table:table-cell table:formula="of:=COUNTIF([.G$15:.G$22];&quot;=&quot; &amp;[.$C48])" office:value-type="float" office:value="0" calcext:value-type="float">
            <text:p>0</text:p>
          </table:table-cell>
          <table:table-cell table:formula="of:=COUNTIF([.H$15:.H$22];&quot;=&quot; &amp;[.$C48])" office:value-type="float" office:value="0" calcext:value-type="float">
            <text:p>0</text:p>
          </table:table-cell>
          <table:table-cell table:formula="of:=COUNTIF([.I$15:.I$22];&quot;=&quot; &amp;[.$C48])" office:value-type="float" office:value="0" calcext:value-type="float">
            <text:p>0</text:p>
          </table:table-cell>
          <table:table-cell table:formula="of:=COUNTIF([.J$15:.J$22];&quot;=&quot; &amp;[.$C48])" office:value-type="float" office:value="0" calcext:value-type="float">
            <text:p>0</text:p>
          </table:table-cell>
          <table:table-cell table:formula="of:=COUNTIF([.K$15:.K$22];&quot;=&quot; &amp;[.$C48])" office:value-type="float" office:value="0" calcext:value-type="float">
            <text:p>0</text:p>
          </table:table-cell>
          <table:table-cell table:formula="of:=COUNTIF([.L$15:.L$22];&quot;=&quot; &amp;[.$C48])" office:value-type="float" office:value="0" calcext:value-type="float">
            <text:p>0</text:p>
          </table:table-cell>
          <table:table-cell table:formula="of:=COUNTIF([.M$15:.M$22];&quot;=&quot; &amp;[.$C48])" office:value-type="float" office:value="0" calcext:value-type="float">
            <text:p>0</text:p>
          </table:table-cell>
          <table:table-cell table:formula="of:=COUNTIF([.N$15:.N$22];&quot;=&quot; &amp;[.$C48])" office:value-type="float" office:value="0" calcext:value-type="float">
            <text:p>0</text:p>
          </table:table-cell>
          <table:table-cell table:formula="of:=COUNTIF([.O$15:.O$22];&quot;=&quot; &amp;[.$C48])" office:value-type="float" office:value="0" calcext:value-type="float">
            <text:p>0</text:p>
          </table:table-cell>
          <table:table-cell table:formula="of:=COUNTIF([.P$15:.P$22];&quot;=&quot; &amp;[.$C48])" office:value-type="float" office:value="0" calcext:value-type="float">
            <text:p>0</text:p>
          </table:table-cell>
          <table:table-cell table:formula="of:=COUNTIF([.Q$15:.Q$22];&quot;=&quot; &amp;[.$C48])" office:value-type="float" office:value="0" calcext:value-type="float">
            <text:p>0</text:p>
          </table:table-cell>
          <table:table-cell table:formula="of:=COUNTIF([.R$15:.R$22];&quot;=&quot; &amp;[.$C48])" office:value-type="float" office:value="0" calcext:value-type="float">
            <text:p>0</text:p>
          </table:table-cell>
          <table:table-cell table:formula="of:=COUNTIF([.S$15:.S$22];&quot;=&quot; &amp;[.$C48])" office:value-type="float" office:value="0" calcext:value-type="float">
            <text:p>0</text:p>
          </table:table-cell>
          <table:table-cell table:formula="of:=COUNTIF([.T$15:.T$22];&quot;=&quot; &amp;[.$C48])" office:value-type="float" office:value="0" calcext:value-type="float">
            <text:p>0</text:p>
          </table:table-cell>
          <table:table-cell table:formula="of:=COUNTIF([.U$15:.U$22];&quot;=&quot; &amp;[.$C48])" office:value-type="float" office:value="0" calcext:value-type="float">
            <text:p>0</text:p>
          </table:table-cell>
          <table:table-cell table:formula="of:=COUNTIF([.V$15:.V$22];&quot;=&quot; &amp;[.$C48])" office:value-type="float" office:value="0" calcext:value-type="float">
            <text:p>0</text:p>
          </table:table-cell>
          <table:table-cell table:formula="of:=COUNTIF([.W$15:.W$22];&quot;=&quot; &amp;[.$C48])" office:value-type="float" office:value="0" calcext:value-type="float">
            <text:p>0</text:p>
          </table:table-cell>
          <table:table-cell table:formula="of:=COUNTIF([.X$15:.X$22];&quot;=&quot; &amp;[.$C48])" office:value-type="float" office:value="0" calcext:value-type="float">
            <text:p>0</text:p>
          </table:table-cell>
          <table:table-cell table:formula="of:=COUNTIF([.Y$15:.Y$22];&quot;=&quot; &amp;[.$C48])" office:value-type="float" office:value="0" calcext:value-type="float">
            <text:p>0</text:p>
          </table:table-cell>
          <table:table-cell table:formula="of:=COUNTIF([.Z$15:.Z$22];&quot;=&quot; &amp;[.$C48])" office:value-type="float" office:value="0" calcext:value-type="float">
            <text:p>0</text:p>
          </table:table-cell>
          <table:table-cell table:formula="of:=COUNTIF([.AA$15:.AA$22];&quot;=&quot; &amp;[.$C48])" office:value-type="float" office:value="0" calcext:value-type="float">
            <text:p>0</text:p>
          </table:table-cell>
          <table:table-cell table:formula="of:=COUNTIF([.AB$15:.AB$22];&quot;=&quot; &amp;[.$C48])" office:value-type="float" office:value="0" calcext:value-type="float">
            <text:p>0</text:p>
          </table:table-cell>
          <table:table-cell table:formula="of:=COUNTIF([.AC$15:.AC$22];&quot;=&quot; &amp;[.$C48])" office:value-type="float" office:value="0" calcext:value-type="float">
            <text:p>0</text:p>
          </table:table-cell>
          <table:table-cell table:formula="of:=COUNTIF([.AD$15:.AD$22];&quot;=&quot; &amp;[.$C48])" office:value-type="float" office:value="0" calcext:value-type="float">
            <text:p>0</text:p>
          </table:table-cell>
          <table:table-cell table:formula="of:=COUNTIF([.AE$15:.AE$22];&quot;=&quot; &amp;[.$C48])" office:value-type="float" office:value="0" calcext:value-type="float">
            <text:p>0</text:p>
          </table:table-cell>
          <table:table-cell table:formula="of:=COUNTIF([.AF$15:.AF$22];&quot;=&quot; &amp;[.$C48])" office:value-type="float" office:value="0" calcext:value-type="float">
            <text:p>0</text:p>
          </table:table-cell>
          <table:table-cell table:formula="of:=COUNTIF([.AG$15:.AG$22];&quot;=&quot; &amp;[.$C48])" office:value-type="float" office:value="0" calcext:value-type="float">
            <text:p>0</text:p>
          </table:table-cell>
          <table:table-cell table:formula="of:=COUNTIF([.AH$15:.AH$22];&quot;=&quot; &amp;[.$C48])" office:value-type="float" office:value="0" calcext:value-type="float">
            <text:p>0</text:p>
          </table:table-cell>
          <table:table-cell table:formula="of:=COUNTIF([.AI$15:.AI$22];&quot;=&quot; &amp;[.$C48])" office:value-type="float" office:value="0" calcext:value-type="float">
            <text:p>0</text:p>
          </table:table-cell>
          <table:table-cell table:formula="of:=COUNTIF([.AJ$15:.AJ$22];&quot;=&quot; &amp;[.$C48])" office:value-type="float" office:value="0" calcext:value-type="float">
            <text:p>0</text:p>
          </table:table-cell>
          <table:table-cell table:formula="of:=COUNTIF([.AK$15:.AK$22];&quot;=&quot; &amp;[.$C48])" office:value-type="float" office:value="0" calcext:value-type="float">
            <text:p>0</text:p>
          </table:table-cell>
          <table:table-cell table:formula="of:=COUNTIF([.AL$15:.AL$22];&quot;=&quot; &amp;[.$C48])" office:value-type="float" office:value="0" calcext:value-type="float">
            <text:p>0</text:p>
          </table:table-cell>
          <table:table-cell table:formula="of:=COUNTIF([.AM$15:.AM$22];&quot;=&quot; &amp;[.$C48])" office:value-type="float" office:value="0" calcext:value-type="float">
            <text:p>0</text:p>
          </table:table-cell>
          <table:table-cell table:formula="of:=COUNTIF([.AN$15:.AN$22];&quot;=&quot; &amp;[.$C48])" office:value-type="float" office:value="0" calcext:value-type="float">
            <text:p>0</text:p>
          </table:table-cell>
          <table:table-cell table:formula="of:=COUNTIF([.AO$15:.AO$22];&quot;=&quot; &amp;[.$C48])" office:value-type="float" office:value="0" calcext:value-type="float">
            <text:p>0</text:p>
          </table:table-cell>
          <table:table-cell table:formula="of:=COUNTIF([.AP$15:.AP$22];&quot;=&quot; &amp;[.$C48])" office:value-type="float" office:value="0" calcext:value-type="float">
            <text:p>0</text:p>
          </table:table-cell>
          <table:table-cell table:formula="of:=COUNTIF([.AQ$15:.AQ$22];&quot;=&quot; &amp;[.$C48])" office:value-type="float" office:value="0" calcext:value-type="float">
            <text:p>0</text:p>
          </table:table-cell>
          <table:table-cell table:formula="of:=COUNTIF([.AR$15:.AR$22];&quot;=&quot; &amp;[.$C48])" office:value-type="float" office:value="0" calcext:value-type="float">
            <text:p>0</text:p>
          </table:table-cell>
          <table:table-cell table:formula="of:=COUNTIF([.AS$15:.AS$22];&quot;=&quot; &amp;[.$C48])" office:value-type="float" office:value="0" calcext:value-type="float">
            <text:p>0</text:p>
          </table:table-cell>
          <table:table-cell table:formula="of:=COUNTIF([.AT$15:.AT$22];&quot;=&quot; &amp;[.$C48])" office:value-type="float" office:value="0" calcext:value-type="float">
            <text:p>0</text:p>
          </table:table-cell>
          <table:table-cell table:formula="of:=COUNTIF([.AU$15:.AU$22];&quot;=&quot; &amp;[.$C48])" office:value-type="float" office:value="0" calcext:value-type="float">
            <text:p>0</text:p>
          </table:table-cell>
          <table:table-cell table:formula="of:=COUNTIF([.AV$15:.AV$22];&quot;=&quot; &amp;[.$C48])" office:value-type="float" office:value="0" calcext:value-type="float">
            <text:p>0</text:p>
          </table:table-cell>
          <table:table-cell table:formula="of:=COUNTIF([.AW$15:.AW$22];&quot;=&quot; &amp;[.$C48])" office:value-type="float" office:value="0" calcext:value-type="float">
            <text:p>0</text:p>
          </table:table-cell>
          <table:table-cell table:formula="of:=COUNTIF([.AX$15:.AX$22];&quot;=&quot; &amp;[.$C48])" office:value-type="float" office:value="0" calcext:value-type="float">
            <text:p>0</text:p>
          </table:table-cell>
          <table:table-cell table:formula="of:=COUNTIF([.AY$15:.AY$22];&quot;=&quot; &amp;[.$C48])" office:value-type="float" office:value="0" calcext:value-type="float">
            <text:p>0</text:p>
          </table:table-cell>
          <table:table-cell/>
          <table:table-cell table:formula="of:=[.BA47]+0.002" office:value-type="float" office:value="0.066" calcext:value-type="float">
            <text:p>0.066</text:p>
          </table:table-cell>
          <table:table-cell table:formula="of:=[.BA48]*[.$D$6]" office:value-type="float" office:value="3.31752184219082" calcext:value-type="float">
            <text:p>3.318</text:p>
          </table:table-cell>
          <table:table-cell table:formula="of:=[.D$25]*[.$Z$5]*MAGNET([.D$24]+[.BB48])+[.E$25]*[.$Z$5]*MAGNET([.E$24]+[.BB48])+[.F$25]*[.$Z$5]*MAGNET([.F$24]+[.BB48])+[.G$25]*[.$Z$5]*MAGNET([.G$24]+[.BB48])+[.H$25]*[.$Z$5]*MAGNET([.H$24]+[.BB48])+[.I$25]*[.$Z$5]*MAGNET([.I$24]+[.BB48])+[.J$25]*[.$Z$5]*MAGNET([.J$24]+[.BB48])+[.K$25]*[.$Z$5]*MAGNET([.K$24]+[.BB48])+[.L$25]*[.$Z$5]*MAGNET([.L$24]+[.BB48])+[.M$25]*[.$Z$5]*MAGNET([.M$24]+[.BB48])+[.N$25]*[.$Z$5]*MAGNET([.N$24]+[.BB48])+[.O$25]*[.$Z$5]*MAGNET([.O$24]+[.BB48])+[.P$25]*[.$Z$5]*MAGNET([.P$24]+[.BB48])+[.Q$25]*[.$Z$5]*MAGNET([.Q$24]+[.BB48])+[.R$25]*[.$Z$5]*MAGNET([.R$24]+[.BB48])+[.S$25]*[.$Z$5]*MAGNET([.S$24]+[.BB48])+[.T$25]*[.$Z$5]*MAGNET([.T$24]+[.BB48])+[.U$25]*[.$Z$5]*MAGNET([.U$24]+[.BB48])+[.V$25]*[.$Z$5]*MAGNET([.V$24]+[.BB48])+[.W$25]*[.$Z$5]*MAGNET([.W$24]+[.BB48])+[.X$25]*[.$Z$5]*MAGNET([.X$24]+[.BB48])+[.Y$25]*[.$Z$5]*MAGNET([.Y$24]+[.BB48])+[.Z$25]*[.$Z$5]*MAGNET([.Z$24]+[.BB48])+[.AA$25]*[.$Z$5]*MAGNET([.AA$24]+[.BB48])+[.AB$25]*[.$Z$5]*MAGNET([.AB$24]+[.BB48])+[.AC$25]*[.$Z$5]*MAGNET([.AC$24]+[.BB48])+[.AD$25]*[.$Z$5]*MAGNET([.AD$24]+[.BB48])+[.AE$25]*[.$Z$5]*MAGNET([.AE$24]+[.BB48])+[.AF$25]*[.$Z$5]*MAGNET([.AF$24]+[.BB48])+[.AG$25]*[.$Z$5]*MAGNET([.AG$24]+[.BB48])+[.AH$25]*[.$Z$5]*MAGNET([.AH$24]+[.BB48]) +[.AI$25]*[.$Z$5]*MAGNET([.AI$24]+[.BB48]) +[.AJ$25]*[.$Z$5]*MAGNET([.AJ$24]+[.BB48]) +[.AK$25]*[.$Z$5]*MAGNET([.AK$24]+[.BB48]) +[.AL$25]*[.$Z$5]*MAGNET([.AL$24]+[.BB48]) +[.AM$25]*[.$Z$5]*MAGNET([.AM$24]+[.BB48]) +[.AN$25]*[.$Z$5]*MAGNET([.AN$24]+[.BB48]) +[.AO$25]*[.$Z$5]*MAGNET([.AO$24]+[.BB48])+RAND()*[.$BC$13]+[.AP$25]*[.$Z$5]*MAGNET([.AP$24]+[.BB48])&#10;+[.AQ$25]*[.$Z$5]*MAGNET([.AQ$24]+[.BB48])&#10;+[.AR$25]*[.$Z$5]*MAGNET([.AR$24]+[.BB48])&#10;+[.AS$25]*[.$Z$5]*MAGNET([.AS$24]+[.BB48])&#10;+[.AT$25]*[.$Z$5]*MAGNET([.AT$24]+[.BB48])&#10;+[.AU$25]*[.$Z$5]*MAGNET([.AU$24]+[.BB48])&#10;+[.AV$25]*[.$Z$5]*MAGNET([.AV$24]+[.BB48])&#10;+[.AW$25]*[.$Z$5]*MAGNET([.AW$24]+[.BB48])&#10;+[.AX$25]*[.$Z$5]*MAGNET([.AX$24]+[.BB48])&#10;+[.AY$25]*[.$Z$5]*MAGNET([.AY$24]+[.BB48])" office:value-type="float" office:value="34.1862561901962" calcext:value-type="float">
            <text:p>34.19</text:p>
          </table:table-cell>
          <table:table-cell table:style-name="ce70" table:formula="of:=[.E$26]*[.$Z$5]*MAGNET([.E$24]+[.$BB48])+[.F$26]*[.$Z$5]*MAGNET([.F$24]+[.$BB48])+[.G$26]*[.$Z$5]*MAGNET([.G$24]+[.$BB48])+[.H$26]*[.$Z$5]*MAGNET([.H$24]+[.$BB48])+[.I$26]*[.$Z$5]*MAGNET([.I$24]+[.$BB48])+[.J$26]*[.$Z$5]*MAGNET([.J$24]+[.$BB48])+[.K$26]*[.$Z$5]*MAGNET([.K$24]+[.$BB48])+[.L$26]*[.$Z$5]*MAGNET([.L$24]+[.$BB48])+[.M$26]*[.$Z$5]*MAGNET([.M$24]+[.$BB48])+[.N$26]*[.$Z$5]*MAGNET([.N$24]+[.$BB48])+[.O$26]*[.$Z$5]*MAGNET([.O$24]+[.$BB48])+[.P$26]*[.$Z$5]*MAGNET([.P$24]+[.$BB48])+[.Q$26]*[.$Z$5]*MAGNET([.Q$24]+[.$BB48])+[.R$26]*[.$Z$5]*MAGNET([.R$24]+[.$BB48])+[.S$26]*[.$Z$5]*MAGNET([.S$24]+[.$BB48])+[.T$26]*[.$Z$5]*MAGNET([.T$24]+[.$BB48])+[.U$26]*[.$Z$5]*MAGNET([.U$24]+[.$BB48])+[.V$26]*[.$Z$5]*MAGNET([.V$24]+[.$BB48])+[.W$26]*[.$Z$5]*MAGNET([.W$24]+[.$BB48])+[.X$26]*[.$Z$5]*MAGNET([.X$24]+[.$BB48])+[.Y$26]*[.$Z$5]*MAGNET([.Y$24]+[.$BB48])+[.Z$26]*[.$Z$5]*MAGNET([.Z$24]+[.$BB48])+[.AA$26]*[.$Z$5]*MAGNET([.AA$24]+[.$BB48])+[.AB$26]*[.$Z$5]*MAGNET([.AB$24]+[.$BB48])+[.AC$26]*[.$Z$5]*MAGNET([.AC$24]+[.$BB48])+[.AD$26]*[.$Z$5]*MAGNET([.AD$24]+[.$BB48])+[.AE$26]*[.$Z$5]*MAGNET([.AE$24]+[.$BB48])+[.AF$26]*[.$Z$5]*MAGNET([.AF$24]+[.$BB48])+[.AG$26]*[.$Z$5]*MAGNET([.AG$24]+[.$BB48])+[.D$26]*[.$Z$5]*MAGNET([.D$24]+[.$BB48])+[.AH$26]*[.$Z$5]*MAGNET([.AH$24]+[.BB48]) +[.AI$26]*[.$Z$5]*MAGNET([.AI$24]+[.BB48]) +[.AJ$26]*[.$Z$5]*MAGNET([.AJ$24]+[.BB48]) +[.AK$26]*[.$Z$5]*MAGNET([.AK$24]+[.BB48]) +[.AL$26]*[.$Z$5]*MAGNET([.AL$24]+[.BB48]) +[.AM$26]*[.$Z$5]*MAGNET([.AM$24]+[.BB48]) +[.AN$26]*[.$Z$5]*MAGNET([.AN$24]+[.BB48]) +[.AO$26]*[.$Z$5]*MAGNET([.AO$24]+[.BB48]) +[.AP$26]*[.$Z$5]*MAGNET([.AP$24]+[.$BB48])&#10;+[.AQ$26]*[.$Z$5]*MAGNET([.AQ$24]+[.$BB48])&#10;+[.AR$26]*[.$Z$5]*MAGNET([.AR$24]+[.$BB48])&#10;+[.AS$26]*[.$Z$5]*MAGNET([.AS$24]+[.$BB48])&#10;+[.AT$26]*[.$Z$5]*MAGNET([.AT$24]+[.$BB48])&#10;+[.AU$26]*[.$Z$5]*MAGNET([.AU$24]+[.$BB48])&#10;+[.AV$26]*[.$Z$5]*MAGNET([.AV$24]+[.$BB48])&#10;+[.AW$26]*[.$Z$5]*MAGNET([.AW$24]+[.$BB48])&#10;+[.AX$26]*[.$Z$5]*MAGNET([.AX$24]+[.$BB48])&#10;+[.AY$26]*[.$Z$5]*MAGNET([.AY$24]+[.$BB48]) +RAND()*[.$BD$13]" office:value-type="float" office:value="-82.5102209438114" calcext:value-type="float">
            <text:p>-82.51</text:p>
          </table:table-cell>
          <table:table-cell table:style-name="ce71" table:formula="of:=[.E$27]*[.$Z$5]*MAGNET([.E$24]+[.$BB48])+[.F$27]*[.$Z$5]*MAGNET([.F$24]+[.$BB48])+[.G$27]*[.$Z$5]*MAGNET([.G$24]+[.$BB48])+[.H$27]*[.$Z$5]*MAGNET([.H$24]+[.$BB48])+[.I$27]*[.$Z$5]*MAGNET([.I$24]+[.$BB48])+[.J$27]*[.$Z$5]*MAGNET([.J$24]+[.$BB48])+[.K$27]*[.$Z$5]*MAGNET([.K$24]+[.$BB48])+[.L$27]*[.$Z$5]*MAGNET([.L$24]+[.$BB48])+[.M$27]*[.$Z$5]*MAGNET([.M$24]+[.$BB48])+[.N$27]*[.$Z$5]*MAGNET([.N$24]+[.$BB48])+[.O$27]*[.$Z$5]*MAGNET([.O$24]+[.$BB48])+[.P$27]*[.$Z$5]*MAGNET([.P$24]+[.$BB48])+[.Q$27]*[.$Z$5]*MAGNET([.Q$24]+[.$BB48])+[.R$27]*[.$Z$5]*MAGNET([.R$24]+[.$BB48])+[.S$27]*[.$Z$5]*MAGNET([.S$24]+[.$BB48])+[.T$27]*[.$Z$5]*MAGNET([.T$24]+[.$BB48])+[.U$27]*[.$Z$5]*MAGNET([.U$24]+[.$BB48])+[.V$27]*[.$Z$5]*MAGNET([.V$24]+[.$BB48])+[.W$27]*[.$Z$5]*MAGNET([.W$24]+[.$BB48])+[.X$27]*[.$Z$5]*MAGNET([.X$24]+[.$BB48])+[.Y$27]*[.$Z$5]*MAGNET([.Y$24]+[.$BB48])+[.Z$27]*[.$Z$5]*MAGNET([.Z$24]+[.$BB48])+[.AA$27]*[.$Z$5]*MAGNET([.AA$24]+[.$BB48])+[.AB$27]*[.$Z$5]*MAGNET([.AB$24]+[.$BB48])+[.AC$27]*[.$Z$5]*MAGNET([.AC$24]+[.$BB48])+[.AD$27]*[.$Z$5]*MAGNET([.AD$24]+[.$BB48])+[.AE$27]*[.$Z$5]*MAGNET([.AE$24]+[.$BB48])+[.AF$27]*[.$Z$5]*MAGNET([.AF$24]+[.$BB48])+[.AG$27]*[.$Z$5]*MAGNET([.AG$24]+[.$BB48])+[.D$27]*[.$Z$5]*MAGNET([.D$24]+[.$BB48])+[.AH$27]*[.$Z$5]*MAGNET([.AH$24]+[.BB48]) +[.AI$27]*[.$Z$5]*MAGNET([.AI$24]+[.BB48]) +[.AJ$27]*[.$Z$5]*MAGNET([.AJ$24]+[.BB48]) +[.AK$27]*[.$Z$5]*MAGNET([.AK$24]+[.BB48]) +[.AL$27]*[.$Z$5]*MAGNET([.AL$24]+[.BB48]) +[.AM$27]*[.$Z$5]*MAGNET([.AM$24]+[.BB48]) +[.AN$27]*[.$Z$5]*MAGNET([.AN$24]+[.BB48]) +[.AO$27]*[.$Z$5]*MAGNET([.AO$24]+[.BB48]) +[.AP$27]*[.$Z$5]*MAGNET([.AP$24]+[.$BB48])&#10;+[.AQ$27]*[.$Z$5]*MAGNET([.AQ$24]+[.$BB48])&#10;+[.AR$27]*[.$Z$5]*MAGNET([.AR$24]+[.$BB48])&#10;+[.AS$27]*[.$Z$5]*MAGNET([.AS$24]+[.$BB48])&#10;+[.AT$27]*[.$Z$5]*MAGNET([.AT$24]+[.$BB48])&#10;+[.AU$27]*[.$Z$5]*MAGNET([.AU$24]+[.$BB48])&#10;+[.AV$27]*[.$Z$5]*MAGNET([.AV$24]+[.$BB48])&#10;+[.AW$27]*[.$Z$5]*MAGNET([.AW$24]+[.$BB48])&#10;+[.AX$27]*[.$Z$5]*MAGNET([.AX$24]+[.$BB48])&#10;+[.AY$27]*[.$Z$5]*MAGNET([.AY$24]+[.$BB48]) +RAND()*[.$BE$13]" office:value-type="float" office:value="79.7664403615221" calcext:value-type="float">
            <text:p>79.7664403615221</text:p>
          </table:table-cell>
          <table:table-cell table:style-name="ce71" table:formula="of:=[.E$28]*[.$Z$5]*MAGNET([.E$24]+[.$BB48])+[.F$28]*[.$Z$5]*MAGNET([.F$24]+[.$BB48])+[.G$28]*[.$Z$5]*MAGNET([.G$24]+[.$BB48])+[.H$28]*[.$Z$5]*MAGNET([.H$24]+[.$BB48])+[.I$28]*[.$Z$5]*MAGNET([.I$24]+[.$BB48])+[.J$28]*[.$Z$5]*MAGNET([.J$24]+[.$BB48])+[.K$28]*[.$Z$5]*MAGNET([.K$24]+[.$BB48])+[.L$28]*[.$Z$5]*MAGNET([.L$24]+[.$BB48])+[.M$28]*[.$Z$5]*MAGNET([.M$24]+[.$BB48])+[.N$28]*[.$Z$5]*MAGNET([.N$24]+[.$BB48])+[.O$28]*[.$Z$5]*MAGNET([.O$24]+[.$BB48])+[.P$28]*[.$Z$5]*MAGNET([.P$24]+[.$BB48])+[.Q$28]*[.$Z$5]*MAGNET([.Q$24]+[.$BB48])+[.R$28]*[.$Z$5]*MAGNET([.R$24]+[.$BB48])+[.S$28]*[.$Z$5]*MAGNET([.S$24]+[.$BB48])+[.T$28]*[.$Z$5]*MAGNET([.T$24]+[.$BB48])+[.U$28]*[.$Z$5]*MAGNET([.U$24]+[.$BB48])+[.V$28]*[.$Z$5]*MAGNET([.V$24]+[.$BB48])+[.W$28]*[.$Z$5]*MAGNET([.W$24]+[.$BB48])+[.X$28]*[.$Z$5]*MAGNET([.X$24]+[.$BB48])+[.Y$28]*[.$Z$5]*MAGNET([.Y$24]+[.$BB48])+[.Z$28]*[.$Z$5]*MAGNET([.Z$24]+[.$BB48])+[.AA$28]*[.$Z$5]*MAGNET([.AA$24]+[.$BB48])+[.AB$28]*[.$Z$5]*MAGNET([.AB$24]+[.$BB48])+[.AC$28]*[.$Z$5]*MAGNET([.AC$24]+[.$BB48])+[.AD$28]*[.$Z$5]*MAGNET([.AD$24]+[.$BB48])+[.AE$28]*[.$Z$5]*MAGNET([.AE$24]+[.$BB48])+[.AF$28]*[.$Z$5]*MAGNET([.AF$24]+[.$BB48])+[.AG$28]*[.$Z$5]*MAGNET([.AG$24]+[.$BB48])+[.D$28]*[.$Z$5]*MAGNET([.D$24]+[.$BB48])+[.AH$28]*[.$Z$5]*MAGNET([.AH$24]+[.BB48]) +[.AI$28]*[.$Z$5]*MAGNET([.AI$24]+[.BB48]) +[.AJ$28]*[.$Z$5]*MAGNET([.AJ$24]+[.BB48]) +[.AK$28]*[.$Z$5]*MAGNET([.AK$24]+[.BB48]) +[.AL$28]*[.$Z$5]*MAGNET([.AL$24]+[.BB48]) +[.AM$28]*[.$Z$5]*MAGNET([.AM$24]+[.BB48]) +[.AN$28]*[.$Z$5]*MAGNET([.AN$24]+[.BB48]) +[.AO$28]*[.$Z$5]*MAGNET([.AO$24]+[.BB48]) +[.AP$28]*[.$Z$5]*MAGNET([.AP$24]+[.$BB48])&#10;+[.AQ$28]*[.$Z$5]*MAGNET([.AQ$24]+[.$BB48])&#10;+[.AR$28]*[.$Z$5]*MAGNET([.AR$24]+[.$BB48])&#10;+[.AS$28]*[.$Z$5]*MAGNET([.AS$24]+[.$BB48])&#10;+[.AT$28]*[.$Z$5]*MAGNET([.AT$24]+[.$BB48])&#10;+[.AU$28]*[.$Z$5]*MAGNET([.AU$24]+[.$BB48])&#10;+[.AV$28]*[.$Z$5]*MAGNET([.AV$24]+[.$BB48])&#10;+[.AW$28]*[.$Z$5]*MAGNET([.AW$24]+[.$BB48])&#10;+[.AX$28]*[.$Z$5]*MAGNET([.AX$24]+[.$BB48])&#10;+[.AY$28]*[.$Z$5]*MAGNET([.AY$24]+[.$BB48]) +RAND()*[.$BF$13]" office:value-type="float" office:value="11.3869133461545" calcext:value-type="float">
            <text:p>11.3869133461545</text:p>
          </table:table-cell>
          <table:table-cell table:style-name="ce71" table:formula="of:=[.E$29]*[.$Z$5]*MAGNET([.E$24]+[.$BB48])+[.F$29]*[.$Z$5]*MAGNET([.F$24]+[.$BB48])+[.G$29]*[.$Z$5]*MAGNET([.G$24]+[.$BB48])+[.H$29]*[.$Z$5]*MAGNET([.H$24]+[.$BB48])+[.I$29]*[.$Z$5]*MAGNET([.I$24]+[.$BB48])+[.J$29]*[.$Z$5]*MAGNET([.J$24]+[.$BB48])+[.K$29]*[.$Z$5]*MAGNET([.K$24]+[.$BB48])+[.L$29]*[.$Z$5]*MAGNET([.L$24]+[.$BB48])+[.M$29]*[.$Z$5]*MAGNET([.M$24]+[.$BB48])+[.N$29]*[.$Z$5]*MAGNET([.N$24]+[.$BB48])+[.O$29]*[.$Z$5]*MAGNET([.O$24]+[.$BB48])+[.P$29]*[.$Z$5]*MAGNET([.P$24]+[.$BB48])+[.Q$29]*[.$Z$5]*MAGNET([.Q$24]+[.$BB48])+[.R$29]*[.$Z$5]*MAGNET([.R$24]+[.$BB48])+[.S$29]*[.$Z$5]*MAGNET([.S$24]+[.$BB48])+[.T$29]*[.$Z$5]*MAGNET([.T$24]+[.$BB48])+[.U$29]*[.$Z$5]*MAGNET([.U$24]+[.$BB48])+[.V$29]*[.$Z$5]*MAGNET([.V$24]+[.$BB48])+[.W$29]*[.$Z$5]*MAGNET([.W$24]+[.$BB48])+[.X$29]*[.$Z$5]*MAGNET([.X$24]+[.$BB48])+[.Y$29]*[.$Z$5]*MAGNET([.Y$24]+[.$BB48])+[.Z$29]*[.$Z$5]*MAGNET([.Z$24]+[.$BB48])+[.AA$29]*[.$Z$5]*MAGNET([.AA$24]+[.$BB48])+[.AB$29]*[.$Z$5]*MAGNET([.AB$24]+[.$BB48])+[.AC$29]*[.$Z$5]*MAGNET([.AC$24]+[.$BB48])+[.AD$29]*[.$Z$5]*MAGNET([.AD$24]+[.$BB48])+[.AE$29]*[.$Z$5]*MAGNET([.AE$24]+[.$BB48])+[.AF$29]*[.$Z$5]*MAGNET([.AF$24]+[.$BB48])+[.AG$29]*[.$Z$5]*MAGNET([.AG$24]+[.$BB48])+[.D$29]*[.$Z$5]*MAGNET([.D$24]+[.$BB48])+[.AH$29]*[.$Z$5]*MAGNET([.AH$24]+[.BB48]) +[.AI$29]*[.$Z$5]*MAGNET([.AI$24]+[.BB48]) +[.AJ$29]*[.$Z$5]*MAGNET([.AJ$24]+[.BB48]) +[.AK$29]*[.$Z$5]*MAGNET([.AK$24]+[.BB48]) +[.AL$29]*[.$Z$5]*MAGNET([.AL$24]+[.BB48]) +[.AM$29]*[.$Z$5]*MAGNET([.AM$24]+[.BB48]) +[.AN$29]*[.$Z$5]*MAGNET([.AN$24]+[.BB48]) +[.AO$29]*[.$Z$5]*MAGNET([.AO$24]+[.BB48]) +[.AP$29]*[.$Z$5]*MAGNET([.AP$24]+[.$BB48])&#10;+[.AQ$29]*[.$Z$5]*MAGNET([.AQ$24]+[.$BB48])&#10;+[.AR$29]*[.$Z$5]*MAGNET([.AR$24]+[.$BB48])&#10;+[.AS$29]*[.$Z$5]*MAGNET([.AS$24]+[.$BB48])&#10;+[.AT$29]*[.$Z$5]*MAGNET([.AT$24]+[.$BB48])&#10;+[.AU$29]*[.$Z$5]*MAGNET([.AU$24]+[.$BB48])&#10;+[.AV$29]*[.$Z$5]*MAGNET([.AV$24]+[.$BB48])&#10;+[.AW$29]*[.$Z$5]*MAGNET([.AW$24]+[.$BB48])&#10;+[.AX$29]*[.$Z$5]*MAGNET([.AX$24]+[.$BB48])&#10;+[.AY$29]*[.$Z$5]*MAGNET([.AY$24]+[.$BB48]) +RAND()*[.$BG$13]" office:value-type="float" office:value="-35.3381453271657" calcext:value-type="float">
            <text:p>-35.3381453271657</text:p>
          </table:table-cell>
          <table:table-cell table:style-name="ce71" table:formula="of:=[.E$30]*[.$Z$5]*MAGNET([.E$24]+[.$BB48])+[.F$30]*[.$Z$5]*MAGNET([.F$24]+[.$BB48])+[.G$30]*[.$Z$5]*MAGNET([.G$24]+[.$BB48])+[.H$30]*[.$Z$5]*MAGNET([.H$24]+[.$BB48])+[.I$30]*[.$Z$5]*MAGNET([.I$24]+[.$BB48])+[.J$30]*[.$Z$5]*MAGNET([.J$24]+[.$BB48])+[.K$30]*[.$Z$5]*MAGNET([.K$24]+[.$BB48])+[.L$30]*[.$Z$5]*MAGNET([.L$24]+[.$BB48])+[.M$30]*[.$Z$5]*MAGNET([.M$24]+[.$BB48])+[.N$30]*[.$Z$5]*MAGNET([.N$24]+[.$BB48])+[.O$30]*[.$Z$5]*MAGNET([.O$24]+[.$BB48])+[.P$30]*[.$Z$5]*MAGNET([.P$24]+[.$BB48])+[.Q$30]*[.$Z$5]*MAGNET([.Q$24]+[.$BB48])+[.R$30]*[.$Z$5]*MAGNET([.R$24]+[.$BB48])+[.S$30]*[.$Z$5]*MAGNET([.S$24]+[.$BB48])+[.T$30]*[.$Z$5]*MAGNET([.T$24]+[.$BB48])+[.U$30]*[.$Z$5]*MAGNET([.U$24]+[.$BB48])+[.V$30]*[.$Z$5]*MAGNET([.V$24]+[.$BB48])+[.W$30]*[.$Z$5]*MAGNET([.W$24]+[.$BB48])+[.X$30]*[.$Z$5]*MAGNET([.X$24]+[.$BB48])+[.Y$30]*[.$Z$5]*MAGNET([.Y$24]+[.$BB48])+[.Z$30]*[.$Z$5]*MAGNET([.Z$24]+[.$BB48])+[.AA$30]*[.$Z$5]*MAGNET([.AA$24]+[.$BB48])+[.AB$30]*[.$Z$5]*MAGNET([.AB$24]+[.$BB48])+[.AC$30]*[.$Z$5]*MAGNET([.AC$24]+[.$BB48])+[.AD$30]*[.$Z$5]*MAGNET([.AD$24]+[.$BB48])+[.AE$30]*[.$Z$5]*MAGNET([.AE$24]+[.$BB48])+[.AF$30]*[.$Z$5]*MAGNET([.AF$24]+[.$BB48])+[.AG$30]*[.$Z$5]*MAGNET([.AG$24]+[.$BB48])+[.D$30]*[.$Z$5]*MAGNET([.D$24]+[.$BB48])+[.AH$30]*[.$Z$5]*MAGNET([.AH$24]+[.BB48]) +[.AI$30]*[.$Z$5]*MAGNET([.AI$24]+[.BB48]) +[.AJ$30]*[.$Z$5]*MAGNET([.AJ$24]+[.BB48]) +[.AK$30]*[.$Z$5]*MAGNET([.AK$24]+[.BB48]) +[.AL$30]*[.$Z$5]*MAGNET([.AL$24]+[.BB48]) +[.AM$30]*[.$Z$5]*MAGNET([.AM$24]+[.BB48]) +[.AN$30]*[.$Z$5]*MAGNET([.AN$24]+[.BB48]) +[.AO$30]*[.$Z$5]*MAGNET([.AO$24]+[.BB48]) +[.AP$30]*[.$Z$5]*MAGNET([.AP$24]+[.$BB48])&#10;+[.AQ$30]*[.$Z$5]*MAGNET([.AQ$24]+[.$BB48])&#10;+[.AR$30]*[.$Z$5]*MAGNET([.AR$24]+[.$BB48])&#10;+[.AS$30]*[.$Z$5]*MAGNET([.AS$24]+[.$BB48])&#10;+[.AT$30]*[.$Z$5]*MAGNET([.AT$24]+[.$BB48])&#10;+[.AU$30]*[.$Z$5]*MAGNET([.AU$24]+[.$BB48])&#10;+[.AV$30]*[.$Z$5]*MAGNET([.AV$24]+[.$BB48])&#10;+[.AW$30]*[.$Z$5]*MAGNET([.AW$24]+[.$BB48])&#10;+[.AX$30]*[.$Z$5]*MAGNET([.AX$24]+[.$BB48])&#10;+[.AY$30]*[.$Z$5]*MAGNET([.AY$24]+[.$BB48]) +RAND()*[.$BH$13]" office:value-type="float" office:value="0" calcext:value-type="float">
            <text:p>0</text:p>
          </table:table-cell>
          <table:table-cell table:style-name="ce71" table:formula="of:=[.E$31]*[.$Z$5]*MAGNET([.E$24]+[.$BB48])+[.F$31]*[.$Z$5]*MAGNET([.F$24]+[.$BB48])+[.G$31]*[.$Z$5]*MAGNET([.G$24]+[.$BB48])+[.H$31]*[.$Z$5]*MAGNET([.H$24]+[.$BB48])+[.I$31]*[.$Z$5]*MAGNET([.I$24]+[.$BB48])+[.J$31]*[.$Z$5]*MAGNET([.J$24]+[.$BB48])+[.K$31]*[.$Z$5]*MAGNET([.K$24]+[.$BB48])+[.L$31]*[.$Z$5]*MAGNET([.L$24]+[.$BB48])+[.M$31]*[.$Z$5]*MAGNET([.M$24]+[.$BB48])+[.N$31]*[.$Z$5]*MAGNET([.N$24]+[.$BB48])+[.O$31]*[.$Z$5]*MAGNET([.O$24]+[.$BB48])+[.P$31]*[.$Z$5]*MAGNET([.P$24]+[.$BB48])+[.Q$31]*[.$Z$5]*MAGNET([.Q$24]+[.$BB48])+[.R$31]*[.$Z$5]*MAGNET([.R$24]+[.$BB48])+[.S$31]*[.$Z$5]*MAGNET([.S$24]+[.$BB48])+[.T$31]*[.$Z$5]*MAGNET([.T$24]+[.$BB48])+[.U$31]*[.$Z$5]*MAGNET([.U$24]+[.$BB48])+[.V$31]*[.$Z$5]*MAGNET([.V$24]+[.$BB48])+[.W$31]*[.$Z$5]*MAGNET([.W$24]+[.$BB48])+[.X$31]*[.$Z$5]*MAGNET([.X$24]+[.$BB48])+[.Y$31]*[.$Z$5]*MAGNET([.Y$24]+[.$BB48])+[.Z$31]*[.$Z$5]*MAGNET([.Z$24]+[.$BB48])+[.AA$31]*[.$Z$5]*MAGNET([.AA$24]+[.$BB48])+[.AB$31]*[.$Z$5]*MAGNET([.AB$24]+[.$BB48])+[.AC$31]*[.$Z$5]*MAGNET([.AC$24]+[.$BB48])+[.AD$31]*[.$Z$5]*MAGNET([.AD$24]+[.$BB48])+[.AE$31]*[.$Z$5]*MAGNET([.AE$24]+[.$BB48])+[.AF$31]*[.$Z$5]*MAGNET([.AF$24]+[.$BB48])+[.AG$31]*[.$Z$5]*MAGNET([.AG$24]+[.$BB48])+[.D$31]*[.$Z$5]*MAGNET([.D$24]+[.$BB48])+[.AH$31]*[.$Z$5]*MAGNET([.AH$24]+[.BB48]) +[.AI$31]*[.$Z$5]*MAGNET([.AI$24]+[.BB48]) +[.AJ$31]*[.$Z$5]*MAGNET([.AJ$24]+[.BB48]) +[.AK$31]*[.$Z$5]*MAGNET([.AK$24]+[.BB48]) +[.AL$31]*[.$Z$5]*MAGNET([.AL$24]+[.BB48]) +[.AM$31]*[.$Z$5]*MAGNET([.AM$24]+[.BB48]) +[.AN$31]*[.$Z$5]*MAGNET([.AN$24]+[.BB48]) +[.AO$31]*[.$Z$5]*MAGNET([.AO$24]+[.BB48]) +[.AP$31]*[.$Z$5]*MAGNET([.AP$24]+[.$BB48])&#10;+[.AQ$31]*[.$Z$5]*MAGNET([.AQ$24]+[.$BB48])&#10;+[.AR$31]*[.$Z$5]*MAGNET([.AR$24]+[.$BB48])&#10;+[.AS$31]*[.$Z$5]*MAGNET([.AS$24]+[.$BB48])&#10;+[.AT$31]*[.$Z$5]*MAGNET([.AT$24]+[.$BB48])&#10;+[.AU$31]*[.$Z$5]*MAGNET([.AU$24]+[.$BB48])&#10;+[.AV$31]*[.$Z$5]*MAGNET([.AV$24]+[.$BB48])&#10;+[.AW$31]*[.$Z$5]*MAGNET([.AW$24]+[.$BB48])&#10;+[.AX$31]*[.$Z$5]*MAGNET([.AX$24]+[.$BB48])&#10;+[.AY$31]*[.$Z$5]*MAGNET([.AY$24]+[.$BB48]) +RAND()*[.$BI$13]" office:value-type="float" office:value="0" calcext:value-type="float">
            <text:p>0</text:p>
          </table:table-cell>
          <table:table-cell table:style-name="ce71" table:formula="of:=[.E$32]*[.$Z$5]*MAGNET([.E$24]+[.$BB48])+[.F$32]*[.$Z$5]*MAGNET([.F$24]+[.$BB48])+[.G$32]*[.$Z$5]*MAGNET([.G$24]+[.$BB48])+[.H$32]*[.$Z$5]*MAGNET([.H$24]+[.$BB48])+[.I$32]*[.$Z$5]*MAGNET([.I$24]+[.$BB48])+[.J$32]*[.$Z$5]*MAGNET([.J$24]+[.$BB48])+[.K$32]*[.$Z$5]*MAGNET([.K$24]+[.$BB48])+[.L$32]*[.$Z$5]*MAGNET([.L$24]+[.$BB48])+[.M$32]*[.$Z$5]*MAGNET([.M$24]+[.$BB48])+[.N$32]*[.$Z$5]*MAGNET([.N$24]+[.$BB48])+[.O$32]*[.$Z$5]*MAGNET([.O$24]+[.$BB48])+[.P$32]*[.$Z$5]*MAGNET([.P$24]+[.$BB48])+[.Q$32]*[.$Z$5]*MAGNET([.Q$24]+[.$BB48])+[.R$32]*[.$Z$5]*MAGNET([.R$24]+[.$BB48])+[.S$32]*[.$Z$5]*MAGNET([.S$24]+[.$BB48])+[.T$32]*[.$Z$5]*MAGNET([.T$24]+[.$BB48])+[.U$32]*[.$Z$5]*MAGNET([.U$24]+[.$BB48])+[.V$32]*[.$Z$5]*MAGNET([.V$24]+[.$BB48])+[.W$32]*[.$Z$5]*MAGNET([.W$24]+[.$BB48])+[.X$32]*[.$Z$5]*MAGNET([.X$24]+[.$BB48])+[.Y$32]*[.$Z$5]*MAGNET([.Y$24]+[.$BB48])+[.Z$32]*[.$Z$5]*MAGNET([.Z$24]+[.$BB48])+[.AA$32]*[.$Z$5]*MAGNET([.AA$24]+[.$BB48])+[.AB$32]*[.$Z$5]*MAGNET([.AB$24]+[.$BB48])+[.AC$32]*[.$Z$5]*MAGNET([.AC$24]+[.$BB48])+[.AD$32]*[.$Z$5]*MAGNET([.AD$24]+[.$BB48])+[.AE$32]*[.$Z$5]*MAGNET([.AE$24]+[.$BB48])+[.AF$32]*[.$Z$5]*MAGNET([.AF$24]+[.$BB48])+[.AG$32]*[.$Z$5]*MAGNET([.AG$24]+[.$BB48])+[.D$32]*[.$Z$5]*MAGNET([.D$24]+[.$BB48])+[.AH$32]*[.$Z$5]*MAGNET([.AH$24]+[.BB48]) +[.AI$32]*[.$Z$5]*MAGNET([.AI$24]+[.BB48]) +[.AJ$32]*[.$Z$5]*MAGNET([.AJ$24]+[.BB48]) +[.AK$32]*[.$Z$5]*MAGNET([.AK$24]+[.BB48]) +[.AL$32]*[.$Z$5]*MAGNET([.AL$24]+[.BB48]) +[.AM$32]*[.$Z$5]*MAGNET([.AM$24]+[.BB48]) +[.AN$32]*[.$Z$5]*MAGNET([.AN$24]+[.BB48]) +[.AO$32]*[.$Z$5]*MAGNET([.AO$24]+[.BB48]) +[.AP$32]*[.$Z$5]*MAGNET([.AP$24]+[.$BB48])&#10;+[.AQ$32]*[.$Z$5]*MAGNET([.AQ$24]+[.$BB48])&#10;+[.AR$32]*[.$Z$5]*MAGNET([.AR$24]+[.$BB48])&#10;+[.AS$32]*[.$Z$5]*MAGNET([.AS$24]+[.$BB48])&#10;+[.AT$32]*[.$Z$5]*MAGNET([.AT$24]+[.$BB48])&#10;+[.AU$32]*[.$Z$5]*MAGNET([.AU$24]+[.$BB48])&#10;+[.AV$32]*[.$Z$5]*MAGNET([.AV$24]+[.$BB48])&#10;+[.AW$32]*[.$Z$5]*MAGNET([.AW$24]+[.$BB48])&#10;+[.AX$32]*[.$Z$5]*MAGNET([.AX$24]+[.$BB48])&#10;+[.AY$32]*[.$Z$5]*MAGNET([.AY$24]+[.$BB4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formula="of:=COUNTIF([.D$15:.D$22];&quot;=&quot; &amp;[.$C49])" office:value-type="float" office:value="0" calcext:value-type="float">
            <text:p>0</text:p>
          </table:table-cell>
          <table:table-cell table:formula="of:=COUNTIF([.E$15:.E$22];&quot;=&quot; &amp;[.$C49])" office:value-type="float" office:value="0" calcext:value-type="float">
            <text:p>0</text:p>
          </table:table-cell>
          <table:table-cell table:formula="of:=COUNTIF([.F$15:.F$22];&quot;=&quot; &amp;[.$C49])" office:value-type="float" office:value="0" calcext:value-type="float">
            <text:p>0</text:p>
          </table:table-cell>
          <table:table-cell table:formula="of:=COUNTIF([.G$15:.G$22];&quot;=&quot; &amp;[.$C49])" office:value-type="float" office:value="0" calcext:value-type="float">
            <text:p>0</text:p>
          </table:table-cell>
          <table:table-cell table:formula="of:=COUNTIF([.H$15:.H$22];&quot;=&quot; &amp;[.$C49])" office:value-type="float" office:value="0" calcext:value-type="float">
            <text:p>0</text:p>
          </table:table-cell>
          <table:table-cell table:formula="of:=COUNTIF([.I$15:.I$22];&quot;=&quot; &amp;[.$C49])" office:value-type="float" office:value="0" calcext:value-type="float">
            <text:p>0</text:p>
          </table:table-cell>
          <table:table-cell table:formula="of:=COUNTIF([.J$15:.J$22];&quot;=&quot; &amp;[.$C49])" office:value-type="float" office:value="0" calcext:value-type="float">
            <text:p>0</text:p>
          </table:table-cell>
          <table:table-cell table:formula="of:=COUNTIF([.K$15:.K$22];&quot;=&quot; &amp;[.$C49])" office:value-type="float" office:value="0" calcext:value-type="float">
            <text:p>0</text:p>
          </table:table-cell>
          <table:table-cell table:formula="of:=COUNTIF([.L$15:.L$22];&quot;=&quot; &amp;[.$C49])" office:value-type="float" office:value="0" calcext:value-type="float">
            <text:p>0</text:p>
          </table:table-cell>
          <table:table-cell table:formula="of:=COUNTIF([.M$15:.M$22];&quot;=&quot; &amp;[.$C49])" office:value-type="float" office:value="0" calcext:value-type="float">
            <text:p>0</text:p>
          </table:table-cell>
          <table:table-cell table:formula="of:=COUNTIF([.N$15:.N$22];&quot;=&quot; &amp;[.$C49])" office:value-type="float" office:value="0" calcext:value-type="float">
            <text:p>0</text:p>
          </table:table-cell>
          <table:table-cell table:formula="of:=COUNTIF([.O$15:.O$22];&quot;=&quot; &amp;[.$C49])" office:value-type="float" office:value="0" calcext:value-type="float">
            <text:p>0</text:p>
          </table:table-cell>
          <table:table-cell table:formula="of:=COUNTIF([.P$15:.P$22];&quot;=&quot; &amp;[.$C49])" office:value-type="float" office:value="0" calcext:value-type="float">
            <text:p>0</text:p>
          </table:table-cell>
          <table:table-cell table:formula="of:=COUNTIF([.Q$15:.Q$22];&quot;=&quot; &amp;[.$C49])" office:value-type="float" office:value="0" calcext:value-type="float">
            <text:p>0</text:p>
          </table:table-cell>
          <table:table-cell table:formula="of:=COUNTIF([.R$15:.R$22];&quot;=&quot; &amp;[.$C49])" office:value-type="float" office:value="0" calcext:value-type="float">
            <text:p>0</text:p>
          </table:table-cell>
          <table:table-cell table:formula="of:=COUNTIF([.S$15:.S$22];&quot;=&quot; &amp;[.$C49])" office:value-type="float" office:value="0" calcext:value-type="float">
            <text:p>0</text:p>
          </table:table-cell>
          <table:table-cell table:formula="of:=COUNTIF([.T$15:.T$22];&quot;=&quot; &amp;[.$C49])" office:value-type="float" office:value="0" calcext:value-type="float">
            <text:p>0</text:p>
          </table:table-cell>
          <table:table-cell table:formula="of:=COUNTIF([.U$15:.U$22];&quot;=&quot; &amp;[.$C49])" office:value-type="float" office:value="0" calcext:value-type="float">
            <text:p>0</text:p>
          </table:table-cell>
          <table:table-cell table:formula="of:=COUNTIF([.V$15:.V$22];&quot;=&quot; &amp;[.$C49])" office:value-type="float" office:value="0" calcext:value-type="float">
            <text:p>0</text:p>
          </table:table-cell>
          <table:table-cell table:formula="of:=COUNTIF([.W$15:.W$22];&quot;=&quot; &amp;[.$C49])" office:value-type="float" office:value="0" calcext:value-type="float">
            <text:p>0</text:p>
          </table:table-cell>
          <table:table-cell table:formula="of:=COUNTIF([.X$15:.X$22];&quot;=&quot; &amp;[.$C49])" office:value-type="float" office:value="0" calcext:value-type="float">
            <text:p>0</text:p>
          </table:table-cell>
          <table:table-cell table:formula="of:=COUNTIF([.Y$15:.Y$22];&quot;=&quot; &amp;[.$C49])" office:value-type="float" office:value="0" calcext:value-type="float">
            <text:p>0</text:p>
          </table:table-cell>
          <table:table-cell table:formula="of:=COUNTIF([.Z$15:.Z$22];&quot;=&quot; &amp;[.$C49])" office:value-type="float" office:value="0" calcext:value-type="float">
            <text:p>0</text:p>
          </table:table-cell>
          <table:table-cell table:formula="of:=COUNTIF([.AA$15:.AA$22];&quot;=&quot; &amp;[.$C49])" office:value-type="float" office:value="0" calcext:value-type="float">
            <text:p>0</text:p>
          </table:table-cell>
          <table:table-cell table:formula="of:=COUNTIF([.AB$15:.AB$22];&quot;=&quot; &amp;[.$C49])" office:value-type="float" office:value="0" calcext:value-type="float">
            <text:p>0</text:p>
          </table:table-cell>
          <table:table-cell table:formula="of:=COUNTIF([.AC$15:.AC$22];&quot;=&quot; &amp;[.$C49])" office:value-type="float" office:value="0" calcext:value-type="float">
            <text:p>0</text:p>
          </table:table-cell>
          <table:table-cell table:formula="of:=COUNTIF([.AD$15:.AD$22];&quot;=&quot; &amp;[.$C49])" office:value-type="float" office:value="0" calcext:value-type="float">
            <text:p>0</text:p>
          </table:table-cell>
          <table:table-cell table:formula="of:=COUNTIF([.AE$15:.AE$22];&quot;=&quot; &amp;[.$C49])" office:value-type="float" office:value="0" calcext:value-type="float">
            <text:p>0</text:p>
          </table:table-cell>
          <table:table-cell table:formula="of:=COUNTIF([.AF$15:.AF$22];&quot;=&quot; &amp;[.$C49])" office:value-type="float" office:value="0" calcext:value-type="float">
            <text:p>0</text:p>
          </table:table-cell>
          <table:table-cell table:formula="of:=COUNTIF([.AG$15:.AG$22];&quot;=&quot; &amp;[.$C49])" office:value-type="float" office:value="0" calcext:value-type="float">
            <text:p>0</text:p>
          </table:table-cell>
          <table:table-cell table:formula="of:=COUNTIF([.AH$15:.AH$22];&quot;=&quot; &amp;[.$C49])" office:value-type="float" office:value="0" calcext:value-type="float">
            <text:p>0</text:p>
          </table:table-cell>
          <table:table-cell table:formula="of:=COUNTIF([.AI$15:.AI$22];&quot;=&quot; &amp;[.$C49])" office:value-type="float" office:value="0" calcext:value-type="float">
            <text:p>0</text:p>
          </table:table-cell>
          <table:table-cell table:formula="of:=COUNTIF([.AJ$15:.AJ$22];&quot;=&quot; &amp;[.$C49])" office:value-type="float" office:value="0" calcext:value-type="float">
            <text:p>0</text:p>
          </table:table-cell>
          <table:table-cell table:formula="of:=COUNTIF([.AK$15:.AK$22];&quot;=&quot; &amp;[.$C49])" office:value-type="float" office:value="0" calcext:value-type="float">
            <text:p>0</text:p>
          </table:table-cell>
          <table:table-cell table:formula="of:=COUNTIF([.AL$15:.AL$22];&quot;=&quot; &amp;[.$C49])" office:value-type="float" office:value="0" calcext:value-type="float">
            <text:p>0</text:p>
          </table:table-cell>
          <table:table-cell table:formula="of:=COUNTIF([.AM$15:.AM$22];&quot;=&quot; &amp;[.$C49])" office:value-type="float" office:value="0" calcext:value-type="float">
            <text:p>0</text:p>
          </table:table-cell>
          <table:table-cell table:formula="of:=COUNTIF([.AN$15:.AN$22];&quot;=&quot; &amp;[.$C49])" office:value-type="float" office:value="0" calcext:value-type="float">
            <text:p>0</text:p>
          </table:table-cell>
          <table:table-cell table:formula="of:=COUNTIF([.AO$15:.AO$22];&quot;=&quot; &amp;[.$C49])" office:value-type="float" office:value="0" calcext:value-type="float">
            <text:p>0</text:p>
          </table:table-cell>
          <table:table-cell table:formula="of:=COUNTIF([.AP$15:.AP$22];&quot;=&quot; &amp;[.$C49])" office:value-type="float" office:value="0" calcext:value-type="float">
            <text:p>0</text:p>
          </table:table-cell>
          <table:table-cell table:formula="of:=COUNTIF([.AQ$15:.AQ$22];&quot;=&quot; &amp;[.$C49])" office:value-type="float" office:value="0" calcext:value-type="float">
            <text:p>0</text:p>
          </table:table-cell>
          <table:table-cell table:formula="of:=COUNTIF([.AR$15:.AR$22];&quot;=&quot; &amp;[.$C49])" office:value-type="float" office:value="0" calcext:value-type="float">
            <text:p>0</text:p>
          </table:table-cell>
          <table:table-cell table:formula="of:=COUNTIF([.AS$15:.AS$22];&quot;=&quot; &amp;[.$C49])" office:value-type="float" office:value="0" calcext:value-type="float">
            <text:p>0</text:p>
          </table:table-cell>
          <table:table-cell table:formula="of:=COUNTIF([.AT$15:.AT$22];&quot;=&quot; &amp;[.$C49])" office:value-type="float" office:value="0" calcext:value-type="float">
            <text:p>0</text:p>
          </table:table-cell>
          <table:table-cell table:formula="of:=COUNTIF([.AU$15:.AU$22];&quot;=&quot; &amp;[.$C49])" office:value-type="float" office:value="0" calcext:value-type="float">
            <text:p>0</text:p>
          </table:table-cell>
          <table:table-cell table:formula="of:=COUNTIF([.AV$15:.AV$22];&quot;=&quot; &amp;[.$C49])" office:value-type="float" office:value="0" calcext:value-type="float">
            <text:p>0</text:p>
          </table:table-cell>
          <table:table-cell table:formula="of:=COUNTIF([.AW$15:.AW$22];&quot;=&quot; &amp;[.$C49])" office:value-type="float" office:value="0" calcext:value-type="float">
            <text:p>0</text:p>
          </table:table-cell>
          <table:table-cell table:formula="of:=COUNTIF([.AX$15:.AX$22];&quot;=&quot; &amp;[.$C49])" office:value-type="float" office:value="0" calcext:value-type="float">
            <text:p>0</text:p>
          </table:table-cell>
          <table:table-cell table:formula="of:=COUNTIF([.AY$15:.AY$22];&quot;=&quot; &amp;[.$C49])" office:value-type="float" office:value="0" calcext:value-type="float">
            <text:p>0</text:p>
          </table:table-cell>
          <table:table-cell table:style-name="ce66"/>
          <table:table-cell table:formula="of:=[.BA48]+0.002" office:value-type="float" office:value="0.0680000000000001" calcext:value-type="float">
            <text:p>0.0680000000000001</text:p>
          </table:table-cell>
          <table:table-cell table:formula="of:=[.BA49]*[.$D$6]" office:value-type="float" office:value="3.4180528071057" calcext:value-type="float">
            <text:p>3.418</text:p>
          </table:table-cell>
          <table:table-cell table:formula="of:=[.D$25]*[.$Z$5]*MAGNET([.D$24]+[.BB49])+[.E$25]*[.$Z$5]*MAGNET([.E$24]+[.BB49])+[.F$25]*[.$Z$5]*MAGNET([.F$24]+[.BB49])+[.G$25]*[.$Z$5]*MAGNET([.G$24]+[.BB49])+[.H$25]*[.$Z$5]*MAGNET([.H$24]+[.BB49])+[.I$25]*[.$Z$5]*MAGNET([.I$24]+[.BB49])+[.J$25]*[.$Z$5]*MAGNET([.J$24]+[.BB49])+[.K$25]*[.$Z$5]*MAGNET([.K$24]+[.BB49])+[.L$25]*[.$Z$5]*MAGNET([.L$24]+[.BB49])+[.M$25]*[.$Z$5]*MAGNET([.M$24]+[.BB49])+[.N$25]*[.$Z$5]*MAGNET([.N$24]+[.BB49])+[.O$25]*[.$Z$5]*MAGNET([.O$24]+[.BB49])+[.P$25]*[.$Z$5]*MAGNET([.P$24]+[.BB49])+[.Q$25]*[.$Z$5]*MAGNET([.Q$24]+[.BB49])+[.R$25]*[.$Z$5]*MAGNET([.R$24]+[.BB49])+[.S$25]*[.$Z$5]*MAGNET([.S$24]+[.BB49])+[.T$25]*[.$Z$5]*MAGNET([.T$24]+[.BB49])+[.U$25]*[.$Z$5]*MAGNET([.U$24]+[.BB49])+[.V$25]*[.$Z$5]*MAGNET([.V$24]+[.BB49])+[.W$25]*[.$Z$5]*MAGNET([.W$24]+[.BB49])+[.X$25]*[.$Z$5]*MAGNET([.X$24]+[.BB49])+[.Y$25]*[.$Z$5]*MAGNET([.Y$24]+[.BB49])+[.Z$25]*[.$Z$5]*MAGNET([.Z$24]+[.BB49])+[.AA$25]*[.$Z$5]*MAGNET([.AA$24]+[.BB49])+[.AB$25]*[.$Z$5]*MAGNET([.AB$24]+[.BB49])+[.AC$25]*[.$Z$5]*MAGNET([.AC$24]+[.BB49])+[.AD$25]*[.$Z$5]*MAGNET([.AD$24]+[.BB49])+[.AE$25]*[.$Z$5]*MAGNET([.AE$24]+[.BB49])+[.AF$25]*[.$Z$5]*MAGNET([.AF$24]+[.BB49])+[.AG$25]*[.$Z$5]*MAGNET([.AG$24]+[.BB49])+[.AH$25]*[.$Z$5]*MAGNET([.AH$24]+[.BB49]) +[.AI$25]*[.$Z$5]*MAGNET([.AI$24]+[.BB49]) +[.AJ$25]*[.$Z$5]*MAGNET([.AJ$24]+[.BB49]) +[.AK$25]*[.$Z$5]*MAGNET([.AK$24]+[.BB49]) +[.AL$25]*[.$Z$5]*MAGNET([.AL$24]+[.BB49]) +[.AM$25]*[.$Z$5]*MAGNET([.AM$24]+[.BB49]) +[.AN$25]*[.$Z$5]*MAGNET([.AN$24]+[.BB49]) +[.AO$25]*[.$Z$5]*MAGNET([.AO$24]+[.BB49])+RAND()*[.$BC$13]+[.AP$25]*[.$Z$5]*MAGNET([.AP$24]+[.BB49])&#10;+[.AQ$25]*[.$Z$5]*MAGNET([.AQ$24]+[.BB49])&#10;+[.AR$25]*[.$Z$5]*MAGNET([.AR$24]+[.BB49])&#10;+[.AS$25]*[.$Z$5]*MAGNET([.AS$24]+[.BB49])&#10;+[.AT$25]*[.$Z$5]*MAGNET([.AT$24]+[.BB49])&#10;+[.AU$25]*[.$Z$5]*MAGNET([.AU$24]+[.BB49])&#10;+[.AV$25]*[.$Z$5]*MAGNET([.AV$24]+[.BB49])&#10;+[.AW$25]*[.$Z$5]*MAGNET([.AW$24]+[.BB49])&#10;+[.AX$25]*[.$Z$5]*MAGNET([.AX$24]+[.BB49])&#10;+[.AY$25]*[.$Z$5]*MAGNET([.AY$24]+[.BB49])" office:value-type="float" office:value="22.5615792537996" calcext:value-type="float">
            <text:p>22.56</text:p>
          </table:table-cell>
          <table:table-cell table:style-name="ce70" table:formula="of:=[.E$26]*[.$Z$5]*MAGNET([.E$24]+[.$BB49])+[.F$26]*[.$Z$5]*MAGNET([.F$24]+[.$BB49])+[.G$26]*[.$Z$5]*MAGNET([.G$24]+[.$BB49])+[.H$26]*[.$Z$5]*MAGNET([.H$24]+[.$BB49])+[.I$26]*[.$Z$5]*MAGNET([.I$24]+[.$BB49])+[.J$26]*[.$Z$5]*MAGNET([.J$24]+[.$BB49])+[.K$26]*[.$Z$5]*MAGNET([.K$24]+[.$BB49])+[.L$26]*[.$Z$5]*MAGNET([.L$24]+[.$BB49])+[.M$26]*[.$Z$5]*MAGNET([.M$24]+[.$BB49])+[.N$26]*[.$Z$5]*MAGNET([.N$24]+[.$BB49])+[.O$26]*[.$Z$5]*MAGNET([.O$24]+[.$BB49])+[.P$26]*[.$Z$5]*MAGNET([.P$24]+[.$BB49])+[.Q$26]*[.$Z$5]*MAGNET([.Q$24]+[.$BB49])+[.R$26]*[.$Z$5]*MAGNET([.R$24]+[.$BB49])+[.S$26]*[.$Z$5]*MAGNET([.S$24]+[.$BB49])+[.T$26]*[.$Z$5]*MAGNET([.T$24]+[.$BB49])+[.U$26]*[.$Z$5]*MAGNET([.U$24]+[.$BB49])+[.V$26]*[.$Z$5]*MAGNET([.V$24]+[.$BB49])+[.W$26]*[.$Z$5]*MAGNET([.W$24]+[.$BB49])+[.X$26]*[.$Z$5]*MAGNET([.X$24]+[.$BB49])+[.Y$26]*[.$Z$5]*MAGNET([.Y$24]+[.$BB49])+[.Z$26]*[.$Z$5]*MAGNET([.Z$24]+[.$BB49])+[.AA$26]*[.$Z$5]*MAGNET([.AA$24]+[.$BB49])+[.AB$26]*[.$Z$5]*MAGNET([.AB$24]+[.$BB49])+[.AC$26]*[.$Z$5]*MAGNET([.AC$24]+[.$BB49])+[.AD$26]*[.$Z$5]*MAGNET([.AD$24]+[.$BB49])+[.AE$26]*[.$Z$5]*MAGNET([.AE$24]+[.$BB49])+[.AF$26]*[.$Z$5]*MAGNET([.AF$24]+[.$BB49])+[.AG$26]*[.$Z$5]*MAGNET([.AG$24]+[.$BB49])+[.D$26]*[.$Z$5]*MAGNET([.D$24]+[.$BB49])+[.AH$26]*[.$Z$5]*MAGNET([.AH$24]+[.BB49]) +[.AI$26]*[.$Z$5]*MAGNET([.AI$24]+[.BB49]) +[.AJ$26]*[.$Z$5]*MAGNET([.AJ$24]+[.BB49]) +[.AK$26]*[.$Z$5]*MAGNET([.AK$24]+[.BB49]) +[.AL$26]*[.$Z$5]*MAGNET([.AL$24]+[.BB49]) +[.AM$26]*[.$Z$5]*MAGNET([.AM$24]+[.BB49]) +[.AN$26]*[.$Z$5]*MAGNET([.AN$24]+[.BB49]) +[.AO$26]*[.$Z$5]*MAGNET([.AO$24]+[.BB49]) +[.AP$26]*[.$Z$5]*MAGNET([.AP$24]+[.$BB49])&#10;+[.AQ$26]*[.$Z$5]*MAGNET([.AQ$24]+[.$BB49])&#10;+[.AR$26]*[.$Z$5]*MAGNET([.AR$24]+[.$BB49])&#10;+[.AS$26]*[.$Z$5]*MAGNET([.AS$24]+[.$BB49])&#10;+[.AT$26]*[.$Z$5]*MAGNET([.AT$24]+[.$BB49])&#10;+[.AU$26]*[.$Z$5]*MAGNET([.AU$24]+[.$BB49])&#10;+[.AV$26]*[.$Z$5]*MAGNET([.AV$24]+[.$BB49])&#10;+[.AW$26]*[.$Z$5]*MAGNET([.AW$24]+[.$BB49])&#10;+[.AX$26]*[.$Z$5]*MAGNET([.AX$24]+[.$BB49])&#10;+[.AY$26]*[.$Z$5]*MAGNET([.AY$24]+[.$BB49]) +RAND()*[.$BD$13]" office:value-type="float" office:value="-78.5854377083574" calcext:value-type="float">
            <text:p>-78.59</text:p>
          </table:table-cell>
          <table:table-cell table:style-name="ce71" table:formula="of:=[.E$27]*[.$Z$5]*MAGNET([.E$24]+[.$BB49])+[.F$27]*[.$Z$5]*MAGNET([.F$24]+[.$BB49])+[.G$27]*[.$Z$5]*MAGNET([.G$24]+[.$BB49])+[.H$27]*[.$Z$5]*MAGNET([.H$24]+[.$BB49])+[.I$27]*[.$Z$5]*MAGNET([.I$24]+[.$BB49])+[.J$27]*[.$Z$5]*MAGNET([.J$24]+[.$BB49])+[.K$27]*[.$Z$5]*MAGNET([.K$24]+[.$BB49])+[.L$27]*[.$Z$5]*MAGNET([.L$24]+[.$BB49])+[.M$27]*[.$Z$5]*MAGNET([.M$24]+[.$BB49])+[.N$27]*[.$Z$5]*MAGNET([.N$24]+[.$BB49])+[.O$27]*[.$Z$5]*MAGNET([.O$24]+[.$BB49])+[.P$27]*[.$Z$5]*MAGNET([.P$24]+[.$BB49])+[.Q$27]*[.$Z$5]*MAGNET([.Q$24]+[.$BB49])+[.R$27]*[.$Z$5]*MAGNET([.R$24]+[.$BB49])+[.S$27]*[.$Z$5]*MAGNET([.S$24]+[.$BB49])+[.T$27]*[.$Z$5]*MAGNET([.T$24]+[.$BB49])+[.U$27]*[.$Z$5]*MAGNET([.U$24]+[.$BB49])+[.V$27]*[.$Z$5]*MAGNET([.V$24]+[.$BB49])+[.W$27]*[.$Z$5]*MAGNET([.W$24]+[.$BB49])+[.X$27]*[.$Z$5]*MAGNET([.X$24]+[.$BB49])+[.Y$27]*[.$Z$5]*MAGNET([.Y$24]+[.$BB49])+[.Z$27]*[.$Z$5]*MAGNET([.Z$24]+[.$BB49])+[.AA$27]*[.$Z$5]*MAGNET([.AA$24]+[.$BB49])+[.AB$27]*[.$Z$5]*MAGNET([.AB$24]+[.$BB49])+[.AC$27]*[.$Z$5]*MAGNET([.AC$24]+[.$BB49])+[.AD$27]*[.$Z$5]*MAGNET([.AD$24]+[.$BB49])+[.AE$27]*[.$Z$5]*MAGNET([.AE$24]+[.$BB49])+[.AF$27]*[.$Z$5]*MAGNET([.AF$24]+[.$BB49])+[.AG$27]*[.$Z$5]*MAGNET([.AG$24]+[.$BB49])+[.D$27]*[.$Z$5]*MAGNET([.D$24]+[.$BB49])+[.AH$27]*[.$Z$5]*MAGNET([.AH$24]+[.BB49]) +[.AI$27]*[.$Z$5]*MAGNET([.AI$24]+[.BB49]) +[.AJ$27]*[.$Z$5]*MAGNET([.AJ$24]+[.BB49]) +[.AK$27]*[.$Z$5]*MAGNET([.AK$24]+[.BB49]) +[.AL$27]*[.$Z$5]*MAGNET([.AL$24]+[.BB49]) +[.AM$27]*[.$Z$5]*MAGNET([.AM$24]+[.BB49]) +[.AN$27]*[.$Z$5]*MAGNET([.AN$24]+[.BB49]) +[.AO$27]*[.$Z$5]*MAGNET([.AO$24]+[.BB49]) +[.AP$27]*[.$Z$5]*MAGNET([.AP$24]+[.$BB49])&#10;+[.AQ$27]*[.$Z$5]*MAGNET([.AQ$24]+[.$BB49])&#10;+[.AR$27]*[.$Z$5]*MAGNET([.AR$24]+[.$BB49])&#10;+[.AS$27]*[.$Z$5]*MAGNET([.AS$24]+[.$BB49])&#10;+[.AT$27]*[.$Z$5]*MAGNET([.AT$24]+[.$BB49])&#10;+[.AU$27]*[.$Z$5]*MAGNET([.AU$24]+[.$BB49])&#10;+[.AV$27]*[.$Z$5]*MAGNET([.AV$24]+[.$BB49])&#10;+[.AW$27]*[.$Z$5]*MAGNET([.AW$24]+[.$BB49])&#10;+[.AX$27]*[.$Z$5]*MAGNET([.AX$24]+[.$BB49])&#10;+[.AY$27]*[.$Z$5]*MAGNET([.AY$24]+[.$BB49]) +RAND()*[.$BE$13]" office:value-type="float" office:value="93.8484557941285" calcext:value-type="float">
            <text:p>93.8484557941285</text:p>
          </table:table-cell>
          <table:table-cell table:style-name="ce71" table:formula="of:=[.E$28]*[.$Z$5]*MAGNET([.E$24]+[.$BB49])+[.F$28]*[.$Z$5]*MAGNET([.F$24]+[.$BB49])+[.G$28]*[.$Z$5]*MAGNET([.G$24]+[.$BB49])+[.H$28]*[.$Z$5]*MAGNET([.H$24]+[.$BB49])+[.I$28]*[.$Z$5]*MAGNET([.I$24]+[.$BB49])+[.J$28]*[.$Z$5]*MAGNET([.J$24]+[.$BB49])+[.K$28]*[.$Z$5]*MAGNET([.K$24]+[.$BB49])+[.L$28]*[.$Z$5]*MAGNET([.L$24]+[.$BB49])+[.M$28]*[.$Z$5]*MAGNET([.M$24]+[.$BB49])+[.N$28]*[.$Z$5]*MAGNET([.N$24]+[.$BB49])+[.O$28]*[.$Z$5]*MAGNET([.O$24]+[.$BB49])+[.P$28]*[.$Z$5]*MAGNET([.P$24]+[.$BB49])+[.Q$28]*[.$Z$5]*MAGNET([.Q$24]+[.$BB49])+[.R$28]*[.$Z$5]*MAGNET([.R$24]+[.$BB49])+[.S$28]*[.$Z$5]*MAGNET([.S$24]+[.$BB49])+[.T$28]*[.$Z$5]*MAGNET([.T$24]+[.$BB49])+[.U$28]*[.$Z$5]*MAGNET([.U$24]+[.$BB49])+[.V$28]*[.$Z$5]*MAGNET([.V$24]+[.$BB49])+[.W$28]*[.$Z$5]*MAGNET([.W$24]+[.$BB49])+[.X$28]*[.$Z$5]*MAGNET([.X$24]+[.$BB49])+[.Y$28]*[.$Z$5]*MAGNET([.Y$24]+[.$BB49])+[.Z$28]*[.$Z$5]*MAGNET([.Z$24]+[.$BB49])+[.AA$28]*[.$Z$5]*MAGNET([.AA$24]+[.$BB49])+[.AB$28]*[.$Z$5]*MAGNET([.AB$24]+[.$BB49])+[.AC$28]*[.$Z$5]*MAGNET([.AC$24]+[.$BB49])+[.AD$28]*[.$Z$5]*MAGNET([.AD$24]+[.$BB49])+[.AE$28]*[.$Z$5]*MAGNET([.AE$24]+[.$BB49])+[.AF$28]*[.$Z$5]*MAGNET([.AF$24]+[.$BB49])+[.AG$28]*[.$Z$5]*MAGNET([.AG$24]+[.$BB49])+[.D$28]*[.$Z$5]*MAGNET([.D$24]+[.$BB49])+[.AH$28]*[.$Z$5]*MAGNET([.AH$24]+[.BB49]) +[.AI$28]*[.$Z$5]*MAGNET([.AI$24]+[.BB49]) +[.AJ$28]*[.$Z$5]*MAGNET([.AJ$24]+[.BB49]) +[.AK$28]*[.$Z$5]*MAGNET([.AK$24]+[.BB49]) +[.AL$28]*[.$Z$5]*MAGNET([.AL$24]+[.BB49]) +[.AM$28]*[.$Z$5]*MAGNET([.AM$24]+[.BB49]) +[.AN$28]*[.$Z$5]*MAGNET([.AN$24]+[.BB49]) +[.AO$28]*[.$Z$5]*MAGNET([.AO$24]+[.BB49]) +[.AP$28]*[.$Z$5]*MAGNET([.AP$24]+[.$BB49])&#10;+[.AQ$28]*[.$Z$5]*MAGNET([.AQ$24]+[.$BB49])&#10;+[.AR$28]*[.$Z$5]*MAGNET([.AR$24]+[.$BB49])&#10;+[.AS$28]*[.$Z$5]*MAGNET([.AS$24]+[.$BB49])&#10;+[.AT$28]*[.$Z$5]*MAGNET([.AT$24]+[.$BB49])&#10;+[.AU$28]*[.$Z$5]*MAGNET([.AU$24]+[.$BB49])&#10;+[.AV$28]*[.$Z$5]*MAGNET([.AV$24]+[.$BB49])&#10;+[.AW$28]*[.$Z$5]*MAGNET([.AW$24]+[.$BB49])&#10;+[.AX$28]*[.$Z$5]*MAGNET([.AX$24]+[.$BB49])&#10;+[.AY$28]*[.$Z$5]*MAGNET([.AY$24]+[.$BB49]) +RAND()*[.$BF$13]" office:value-type="float" office:value="12.0835882529794" calcext:value-type="float">
            <text:p>12.0835882529794</text:p>
          </table:table-cell>
          <table:table-cell table:style-name="ce71" table:formula="of:=[.E$29]*[.$Z$5]*MAGNET([.E$24]+[.$BB49])+[.F$29]*[.$Z$5]*MAGNET([.F$24]+[.$BB49])+[.G$29]*[.$Z$5]*MAGNET([.G$24]+[.$BB49])+[.H$29]*[.$Z$5]*MAGNET([.H$24]+[.$BB49])+[.I$29]*[.$Z$5]*MAGNET([.I$24]+[.$BB49])+[.J$29]*[.$Z$5]*MAGNET([.J$24]+[.$BB49])+[.K$29]*[.$Z$5]*MAGNET([.K$24]+[.$BB49])+[.L$29]*[.$Z$5]*MAGNET([.L$24]+[.$BB49])+[.M$29]*[.$Z$5]*MAGNET([.M$24]+[.$BB49])+[.N$29]*[.$Z$5]*MAGNET([.N$24]+[.$BB49])+[.O$29]*[.$Z$5]*MAGNET([.O$24]+[.$BB49])+[.P$29]*[.$Z$5]*MAGNET([.P$24]+[.$BB49])+[.Q$29]*[.$Z$5]*MAGNET([.Q$24]+[.$BB49])+[.R$29]*[.$Z$5]*MAGNET([.R$24]+[.$BB49])+[.S$29]*[.$Z$5]*MAGNET([.S$24]+[.$BB49])+[.T$29]*[.$Z$5]*MAGNET([.T$24]+[.$BB49])+[.U$29]*[.$Z$5]*MAGNET([.U$24]+[.$BB49])+[.V$29]*[.$Z$5]*MAGNET([.V$24]+[.$BB49])+[.W$29]*[.$Z$5]*MAGNET([.W$24]+[.$BB49])+[.X$29]*[.$Z$5]*MAGNET([.X$24]+[.$BB49])+[.Y$29]*[.$Z$5]*MAGNET([.Y$24]+[.$BB49])+[.Z$29]*[.$Z$5]*MAGNET([.Z$24]+[.$BB49])+[.AA$29]*[.$Z$5]*MAGNET([.AA$24]+[.$BB49])+[.AB$29]*[.$Z$5]*MAGNET([.AB$24]+[.$BB49])+[.AC$29]*[.$Z$5]*MAGNET([.AC$24]+[.$BB49])+[.AD$29]*[.$Z$5]*MAGNET([.AD$24]+[.$BB49])+[.AE$29]*[.$Z$5]*MAGNET([.AE$24]+[.$BB49])+[.AF$29]*[.$Z$5]*MAGNET([.AF$24]+[.$BB49])+[.AG$29]*[.$Z$5]*MAGNET([.AG$24]+[.$BB49])+[.D$29]*[.$Z$5]*MAGNET([.D$24]+[.$BB49])+[.AH$29]*[.$Z$5]*MAGNET([.AH$24]+[.BB49]) +[.AI$29]*[.$Z$5]*MAGNET([.AI$24]+[.BB49]) +[.AJ$29]*[.$Z$5]*MAGNET([.AJ$24]+[.BB49]) +[.AK$29]*[.$Z$5]*MAGNET([.AK$24]+[.BB49]) +[.AL$29]*[.$Z$5]*MAGNET([.AL$24]+[.BB49]) +[.AM$29]*[.$Z$5]*MAGNET([.AM$24]+[.BB49]) +[.AN$29]*[.$Z$5]*MAGNET([.AN$24]+[.BB49]) +[.AO$29]*[.$Z$5]*MAGNET([.AO$24]+[.BB49]) +[.AP$29]*[.$Z$5]*MAGNET([.AP$24]+[.$BB49])&#10;+[.AQ$29]*[.$Z$5]*MAGNET([.AQ$24]+[.$BB49])&#10;+[.AR$29]*[.$Z$5]*MAGNET([.AR$24]+[.$BB49])&#10;+[.AS$29]*[.$Z$5]*MAGNET([.AS$24]+[.$BB49])&#10;+[.AT$29]*[.$Z$5]*MAGNET([.AT$24]+[.$BB49])&#10;+[.AU$29]*[.$Z$5]*MAGNET([.AU$24]+[.$BB49])&#10;+[.AV$29]*[.$Z$5]*MAGNET([.AV$24]+[.$BB49])&#10;+[.AW$29]*[.$Z$5]*MAGNET([.AW$24]+[.$BB49])&#10;+[.AX$29]*[.$Z$5]*MAGNET([.AX$24]+[.$BB49])&#10;+[.AY$29]*[.$Z$5]*MAGNET([.AY$24]+[.$BB49]) +RAND()*[.$BG$13]" office:value-type="float" office:value="-37.2697951637917" calcext:value-type="float">
            <text:p>-37.2697951637917</text:p>
          </table:table-cell>
          <table:table-cell table:style-name="ce71" table:formula="of:=[.E$30]*[.$Z$5]*MAGNET([.E$24]+[.$BB49])+[.F$30]*[.$Z$5]*MAGNET([.F$24]+[.$BB49])+[.G$30]*[.$Z$5]*MAGNET([.G$24]+[.$BB49])+[.H$30]*[.$Z$5]*MAGNET([.H$24]+[.$BB49])+[.I$30]*[.$Z$5]*MAGNET([.I$24]+[.$BB49])+[.J$30]*[.$Z$5]*MAGNET([.J$24]+[.$BB49])+[.K$30]*[.$Z$5]*MAGNET([.K$24]+[.$BB49])+[.L$30]*[.$Z$5]*MAGNET([.L$24]+[.$BB49])+[.M$30]*[.$Z$5]*MAGNET([.M$24]+[.$BB49])+[.N$30]*[.$Z$5]*MAGNET([.N$24]+[.$BB49])+[.O$30]*[.$Z$5]*MAGNET([.O$24]+[.$BB49])+[.P$30]*[.$Z$5]*MAGNET([.P$24]+[.$BB49])+[.Q$30]*[.$Z$5]*MAGNET([.Q$24]+[.$BB49])+[.R$30]*[.$Z$5]*MAGNET([.R$24]+[.$BB49])+[.S$30]*[.$Z$5]*MAGNET([.S$24]+[.$BB49])+[.T$30]*[.$Z$5]*MAGNET([.T$24]+[.$BB49])+[.U$30]*[.$Z$5]*MAGNET([.U$24]+[.$BB49])+[.V$30]*[.$Z$5]*MAGNET([.V$24]+[.$BB49])+[.W$30]*[.$Z$5]*MAGNET([.W$24]+[.$BB49])+[.X$30]*[.$Z$5]*MAGNET([.X$24]+[.$BB49])+[.Y$30]*[.$Z$5]*MAGNET([.Y$24]+[.$BB49])+[.Z$30]*[.$Z$5]*MAGNET([.Z$24]+[.$BB49])+[.AA$30]*[.$Z$5]*MAGNET([.AA$24]+[.$BB49])+[.AB$30]*[.$Z$5]*MAGNET([.AB$24]+[.$BB49])+[.AC$30]*[.$Z$5]*MAGNET([.AC$24]+[.$BB49])+[.AD$30]*[.$Z$5]*MAGNET([.AD$24]+[.$BB49])+[.AE$30]*[.$Z$5]*MAGNET([.AE$24]+[.$BB49])+[.AF$30]*[.$Z$5]*MAGNET([.AF$24]+[.$BB49])+[.AG$30]*[.$Z$5]*MAGNET([.AG$24]+[.$BB49])+[.D$30]*[.$Z$5]*MAGNET([.D$24]+[.$BB49])+[.AH$30]*[.$Z$5]*MAGNET([.AH$24]+[.BB49]) +[.AI$30]*[.$Z$5]*MAGNET([.AI$24]+[.BB49]) +[.AJ$30]*[.$Z$5]*MAGNET([.AJ$24]+[.BB49]) +[.AK$30]*[.$Z$5]*MAGNET([.AK$24]+[.BB49]) +[.AL$30]*[.$Z$5]*MAGNET([.AL$24]+[.BB49]) +[.AM$30]*[.$Z$5]*MAGNET([.AM$24]+[.BB49]) +[.AN$30]*[.$Z$5]*MAGNET([.AN$24]+[.BB49]) +[.AO$30]*[.$Z$5]*MAGNET([.AO$24]+[.BB49]) +[.AP$30]*[.$Z$5]*MAGNET([.AP$24]+[.$BB49])&#10;+[.AQ$30]*[.$Z$5]*MAGNET([.AQ$24]+[.$BB49])&#10;+[.AR$30]*[.$Z$5]*MAGNET([.AR$24]+[.$BB49])&#10;+[.AS$30]*[.$Z$5]*MAGNET([.AS$24]+[.$BB49])&#10;+[.AT$30]*[.$Z$5]*MAGNET([.AT$24]+[.$BB49])&#10;+[.AU$30]*[.$Z$5]*MAGNET([.AU$24]+[.$BB49])&#10;+[.AV$30]*[.$Z$5]*MAGNET([.AV$24]+[.$BB49])&#10;+[.AW$30]*[.$Z$5]*MAGNET([.AW$24]+[.$BB49])&#10;+[.AX$30]*[.$Z$5]*MAGNET([.AX$24]+[.$BB49])&#10;+[.AY$30]*[.$Z$5]*MAGNET([.AY$24]+[.$BB49]) +RAND()*[.$BH$13]" office:value-type="float" office:value="0" calcext:value-type="float">
            <text:p>0</text:p>
          </table:table-cell>
          <table:table-cell table:style-name="ce71" table:formula="of:=[.E$31]*[.$Z$5]*MAGNET([.E$24]+[.$BB49])+[.F$31]*[.$Z$5]*MAGNET([.F$24]+[.$BB49])+[.G$31]*[.$Z$5]*MAGNET([.G$24]+[.$BB49])+[.H$31]*[.$Z$5]*MAGNET([.H$24]+[.$BB49])+[.I$31]*[.$Z$5]*MAGNET([.I$24]+[.$BB49])+[.J$31]*[.$Z$5]*MAGNET([.J$24]+[.$BB49])+[.K$31]*[.$Z$5]*MAGNET([.K$24]+[.$BB49])+[.L$31]*[.$Z$5]*MAGNET([.L$24]+[.$BB49])+[.M$31]*[.$Z$5]*MAGNET([.M$24]+[.$BB49])+[.N$31]*[.$Z$5]*MAGNET([.N$24]+[.$BB49])+[.O$31]*[.$Z$5]*MAGNET([.O$24]+[.$BB49])+[.P$31]*[.$Z$5]*MAGNET([.P$24]+[.$BB49])+[.Q$31]*[.$Z$5]*MAGNET([.Q$24]+[.$BB49])+[.R$31]*[.$Z$5]*MAGNET([.R$24]+[.$BB49])+[.S$31]*[.$Z$5]*MAGNET([.S$24]+[.$BB49])+[.T$31]*[.$Z$5]*MAGNET([.T$24]+[.$BB49])+[.U$31]*[.$Z$5]*MAGNET([.U$24]+[.$BB49])+[.V$31]*[.$Z$5]*MAGNET([.V$24]+[.$BB49])+[.W$31]*[.$Z$5]*MAGNET([.W$24]+[.$BB49])+[.X$31]*[.$Z$5]*MAGNET([.X$24]+[.$BB49])+[.Y$31]*[.$Z$5]*MAGNET([.Y$24]+[.$BB49])+[.Z$31]*[.$Z$5]*MAGNET([.Z$24]+[.$BB49])+[.AA$31]*[.$Z$5]*MAGNET([.AA$24]+[.$BB49])+[.AB$31]*[.$Z$5]*MAGNET([.AB$24]+[.$BB49])+[.AC$31]*[.$Z$5]*MAGNET([.AC$24]+[.$BB49])+[.AD$31]*[.$Z$5]*MAGNET([.AD$24]+[.$BB49])+[.AE$31]*[.$Z$5]*MAGNET([.AE$24]+[.$BB49])+[.AF$31]*[.$Z$5]*MAGNET([.AF$24]+[.$BB49])+[.AG$31]*[.$Z$5]*MAGNET([.AG$24]+[.$BB49])+[.D$31]*[.$Z$5]*MAGNET([.D$24]+[.$BB49])+[.AH$31]*[.$Z$5]*MAGNET([.AH$24]+[.BB49]) +[.AI$31]*[.$Z$5]*MAGNET([.AI$24]+[.BB49]) +[.AJ$31]*[.$Z$5]*MAGNET([.AJ$24]+[.BB49]) +[.AK$31]*[.$Z$5]*MAGNET([.AK$24]+[.BB49]) +[.AL$31]*[.$Z$5]*MAGNET([.AL$24]+[.BB49]) +[.AM$31]*[.$Z$5]*MAGNET([.AM$24]+[.BB49]) +[.AN$31]*[.$Z$5]*MAGNET([.AN$24]+[.BB49]) +[.AO$31]*[.$Z$5]*MAGNET([.AO$24]+[.BB49]) +[.AP$31]*[.$Z$5]*MAGNET([.AP$24]+[.$BB49])&#10;+[.AQ$31]*[.$Z$5]*MAGNET([.AQ$24]+[.$BB49])&#10;+[.AR$31]*[.$Z$5]*MAGNET([.AR$24]+[.$BB49])&#10;+[.AS$31]*[.$Z$5]*MAGNET([.AS$24]+[.$BB49])&#10;+[.AT$31]*[.$Z$5]*MAGNET([.AT$24]+[.$BB49])&#10;+[.AU$31]*[.$Z$5]*MAGNET([.AU$24]+[.$BB49])&#10;+[.AV$31]*[.$Z$5]*MAGNET([.AV$24]+[.$BB49])&#10;+[.AW$31]*[.$Z$5]*MAGNET([.AW$24]+[.$BB49])&#10;+[.AX$31]*[.$Z$5]*MAGNET([.AX$24]+[.$BB49])&#10;+[.AY$31]*[.$Z$5]*MAGNET([.AY$24]+[.$BB49]) +RAND()*[.$BI$13]" office:value-type="float" office:value="0" calcext:value-type="float">
            <text:p>0</text:p>
          </table:table-cell>
          <table:table-cell table:style-name="ce71" table:formula="of:=[.E$32]*[.$Z$5]*MAGNET([.E$24]+[.$BB49])+[.F$32]*[.$Z$5]*MAGNET([.F$24]+[.$BB49])+[.G$32]*[.$Z$5]*MAGNET([.G$24]+[.$BB49])+[.H$32]*[.$Z$5]*MAGNET([.H$24]+[.$BB49])+[.I$32]*[.$Z$5]*MAGNET([.I$24]+[.$BB49])+[.J$32]*[.$Z$5]*MAGNET([.J$24]+[.$BB49])+[.K$32]*[.$Z$5]*MAGNET([.K$24]+[.$BB49])+[.L$32]*[.$Z$5]*MAGNET([.L$24]+[.$BB49])+[.M$32]*[.$Z$5]*MAGNET([.M$24]+[.$BB49])+[.N$32]*[.$Z$5]*MAGNET([.N$24]+[.$BB49])+[.O$32]*[.$Z$5]*MAGNET([.O$24]+[.$BB49])+[.P$32]*[.$Z$5]*MAGNET([.P$24]+[.$BB49])+[.Q$32]*[.$Z$5]*MAGNET([.Q$24]+[.$BB49])+[.R$32]*[.$Z$5]*MAGNET([.R$24]+[.$BB49])+[.S$32]*[.$Z$5]*MAGNET([.S$24]+[.$BB49])+[.T$32]*[.$Z$5]*MAGNET([.T$24]+[.$BB49])+[.U$32]*[.$Z$5]*MAGNET([.U$24]+[.$BB49])+[.V$32]*[.$Z$5]*MAGNET([.V$24]+[.$BB49])+[.W$32]*[.$Z$5]*MAGNET([.W$24]+[.$BB49])+[.X$32]*[.$Z$5]*MAGNET([.X$24]+[.$BB49])+[.Y$32]*[.$Z$5]*MAGNET([.Y$24]+[.$BB49])+[.Z$32]*[.$Z$5]*MAGNET([.Z$24]+[.$BB49])+[.AA$32]*[.$Z$5]*MAGNET([.AA$24]+[.$BB49])+[.AB$32]*[.$Z$5]*MAGNET([.AB$24]+[.$BB49])+[.AC$32]*[.$Z$5]*MAGNET([.AC$24]+[.$BB49])+[.AD$32]*[.$Z$5]*MAGNET([.AD$24]+[.$BB49])+[.AE$32]*[.$Z$5]*MAGNET([.AE$24]+[.$BB49])+[.AF$32]*[.$Z$5]*MAGNET([.AF$24]+[.$BB49])+[.AG$32]*[.$Z$5]*MAGNET([.AG$24]+[.$BB49])+[.D$32]*[.$Z$5]*MAGNET([.D$24]+[.$BB49])+[.AH$32]*[.$Z$5]*MAGNET([.AH$24]+[.BB49]) +[.AI$32]*[.$Z$5]*MAGNET([.AI$24]+[.BB49]) +[.AJ$32]*[.$Z$5]*MAGNET([.AJ$24]+[.BB49]) +[.AK$32]*[.$Z$5]*MAGNET([.AK$24]+[.BB49]) +[.AL$32]*[.$Z$5]*MAGNET([.AL$24]+[.BB49]) +[.AM$32]*[.$Z$5]*MAGNET([.AM$24]+[.BB49]) +[.AN$32]*[.$Z$5]*MAGNET([.AN$24]+[.BB49]) +[.AO$32]*[.$Z$5]*MAGNET([.AO$24]+[.BB49]) +[.AP$32]*[.$Z$5]*MAGNET([.AP$24]+[.$BB49])&#10;+[.AQ$32]*[.$Z$5]*MAGNET([.AQ$24]+[.$BB49])&#10;+[.AR$32]*[.$Z$5]*MAGNET([.AR$24]+[.$BB49])&#10;+[.AS$32]*[.$Z$5]*MAGNET([.AS$24]+[.$BB49])&#10;+[.AT$32]*[.$Z$5]*MAGNET([.AT$24]+[.$BB49])&#10;+[.AU$32]*[.$Z$5]*MAGNET([.AU$24]+[.$BB49])&#10;+[.AV$32]*[.$Z$5]*MAGNET([.AV$24]+[.$BB49])&#10;+[.AW$32]*[.$Z$5]*MAGNET([.AW$24]+[.$BB49])&#10;+[.AX$32]*[.$Z$5]*MAGNET([.AX$24]+[.$BB49])&#10;+[.AY$32]*[.$Z$5]*MAGNET([.AY$24]+[.$BB4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7" calcext:value-type="float">
            <text:p>-7</text:p>
          </table:table-cell>
          <table:table-cell table:formula="of:=COUNTIF([.D$15:.D$22];&quot;=&quot; &amp;[.$C50])" office:value-type="float" office:value="0" calcext:value-type="float">
            <text:p>0</text:p>
          </table:table-cell>
          <table:table-cell table:formula="of:=COUNTIF([.E$15:.E$22];&quot;=&quot; &amp;[.$C50])" office:value-type="float" office:value="0" calcext:value-type="float">
            <text:p>0</text:p>
          </table:table-cell>
          <table:table-cell table:formula="of:=COUNTIF([.F$15:.F$22];&quot;=&quot; &amp;[.$C50])" office:value-type="float" office:value="0" calcext:value-type="float">
            <text:p>0</text:p>
          </table:table-cell>
          <table:table-cell table:formula="of:=COUNTIF([.G$15:.G$22];&quot;=&quot; &amp;[.$C50])" office:value-type="float" office:value="0" calcext:value-type="float">
            <text:p>0</text:p>
          </table:table-cell>
          <table:table-cell table:formula="of:=COUNTIF([.H$15:.H$22];&quot;=&quot; &amp;[.$C50])" office:value-type="float" office:value="0" calcext:value-type="float">
            <text:p>0</text:p>
          </table:table-cell>
          <table:table-cell table:formula="of:=COUNTIF([.I$15:.I$22];&quot;=&quot; &amp;[.$C50])" office:value-type="float" office:value="0" calcext:value-type="float">
            <text:p>0</text:p>
          </table:table-cell>
          <table:table-cell table:formula="of:=COUNTIF([.J$15:.J$22];&quot;=&quot; &amp;[.$C50])" office:value-type="float" office:value="0" calcext:value-type="float">
            <text:p>0</text:p>
          </table:table-cell>
          <table:table-cell table:formula="of:=COUNTIF([.K$15:.K$22];&quot;=&quot; &amp;[.$C50])" office:value-type="float" office:value="0" calcext:value-type="float">
            <text:p>0</text:p>
          </table:table-cell>
          <table:table-cell table:formula="of:=COUNTIF([.L$15:.L$22];&quot;=&quot; &amp;[.$C50])" office:value-type="float" office:value="0" calcext:value-type="float">
            <text:p>0</text:p>
          </table:table-cell>
          <table:table-cell table:formula="of:=COUNTIF([.M$15:.M$22];&quot;=&quot; &amp;[.$C50])" office:value-type="float" office:value="0" calcext:value-type="float">
            <text:p>0</text:p>
          </table:table-cell>
          <table:table-cell table:formula="of:=COUNTIF([.N$15:.N$22];&quot;=&quot; &amp;[.$C50])" office:value-type="float" office:value="0" calcext:value-type="float">
            <text:p>0</text:p>
          </table:table-cell>
          <table:table-cell table:formula="of:=COUNTIF([.O$15:.O$22];&quot;=&quot; &amp;[.$C50])" office:value-type="float" office:value="0" calcext:value-type="float">
            <text:p>0</text:p>
          </table:table-cell>
          <table:table-cell table:formula="of:=COUNTIF([.P$15:.P$22];&quot;=&quot; &amp;[.$C50])" office:value-type="float" office:value="0" calcext:value-type="float">
            <text:p>0</text:p>
          </table:table-cell>
          <table:table-cell table:formula="of:=COUNTIF([.Q$15:.Q$22];&quot;=&quot; &amp;[.$C50])" office:value-type="float" office:value="0" calcext:value-type="float">
            <text:p>0</text:p>
          </table:table-cell>
          <table:table-cell table:formula="of:=COUNTIF([.R$15:.R$22];&quot;=&quot; &amp;[.$C50])" office:value-type="float" office:value="0" calcext:value-type="float">
            <text:p>0</text:p>
          </table:table-cell>
          <table:table-cell table:formula="of:=COUNTIF([.S$15:.S$22];&quot;=&quot; &amp;[.$C50])" office:value-type="float" office:value="0" calcext:value-type="float">
            <text:p>0</text:p>
          </table:table-cell>
          <table:table-cell table:formula="of:=COUNTIF([.T$15:.T$22];&quot;=&quot; &amp;[.$C50])" office:value-type="float" office:value="0" calcext:value-type="float">
            <text:p>0</text:p>
          </table:table-cell>
          <table:table-cell table:formula="of:=COUNTIF([.U$15:.U$22];&quot;=&quot; &amp;[.$C50])" office:value-type="float" office:value="0" calcext:value-type="float">
            <text:p>0</text:p>
          </table:table-cell>
          <table:table-cell table:formula="of:=COUNTIF([.V$15:.V$22];&quot;=&quot; &amp;[.$C50])" office:value-type="float" office:value="0" calcext:value-type="float">
            <text:p>0</text:p>
          </table:table-cell>
          <table:table-cell table:formula="of:=COUNTIF([.W$15:.W$22];&quot;=&quot; &amp;[.$C50])" office:value-type="float" office:value="0" calcext:value-type="float">
            <text:p>0</text:p>
          </table:table-cell>
          <table:table-cell table:formula="of:=COUNTIF([.X$15:.X$22];&quot;=&quot; &amp;[.$C50])" office:value-type="float" office:value="0" calcext:value-type="float">
            <text:p>0</text:p>
          </table:table-cell>
          <table:table-cell table:formula="of:=COUNTIF([.Y$15:.Y$22];&quot;=&quot; &amp;[.$C50])" office:value-type="float" office:value="0" calcext:value-type="float">
            <text:p>0</text:p>
          </table:table-cell>
          <table:table-cell table:formula="of:=COUNTIF([.Z$15:.Z$22];&quot;=&quot; &amp;[.$C50])" office:value-type="float" office:value="0" calcext:value-type="float">
            <text:p>0</text:p>
          </table:table-cell>
          <table:table-cell table:formula="of:=COUNTIF([.AA$15:.AA$22];&quot;=&quot; &amp;[.$C50])" office:value-type="float" office:value="0" calcext:value-type="float">
            <text:p>0</text:p>
          </table:table-cell>
          <table:table-cell table:formula="of:=COUNTIF([.AB$15:.AB$22];&quot;=&quot; &amp;[.$C50])" office:value-type="float" office:value="0" calcext:value-type="float">
            <text:p>0</text:p>
          </table:table-cell>
          <table:table-cell table:formula="of:=COUNTIF([.AC$15:.AC$22];&quot;=&quot; &amp;[.$C50])" office:value-type="float" office:value="0" calcext:value-type="float">
            <text:p>0</text:p>
          </table:table-cell>
          <table:table-cell table:formula="of:=COUNTIF([.AD$15:.AD$22];&quot;=&quot; &amp;[.$C50])" office:value-type="float" office:value="0" calcext:value-type="float">
            <text:p>0</text:p>
          </table:table-cell>
          <table:table-cell table:formula="of:=COUNTIF([.AE$15:.AE$22];&quot;=&quot; &amp;[.$C50])" office:value-type="float" office:value="0" calcext:value-type="float">
            <text:p>0</text:p>
          </table:table-cell>
          <table:table-cell table:formula="of:=COUNTIF([.AF$15:.AF$22];&quot;=&quot; &amp;[.$C50])" office:value-type="float" office:value="0" calcext:value-type="float">
            <text:p>0</text:p>
          </table:table-cell>
          <table:table-cell table:formula="of:=COUNTIF([.AG$15:.AG$22];&quot;=&quot; &amp;[.$C50])" office:value-type="float" office:value="0" calcext:value-type="float">
            <text:p>0</text:p>
          </table:table-cell>
          <table:table-cell table:formula="of:=COUNTIF([.AH$15:.AH$22];&quot;=&quot; &amp;[.$C50])" office:value-type="float" office:value="0" calcext:value-type="float">
            <text:p>0</text:p>
          </table:table-cell>
          <table:table-cell table:formula="of:=COUNTIF([.AI$15:.AI$22];&quot;=&quot; &amp;[.$C50])" office:value-type="float" office:value="0" calcext:value-type="float">
            <text:p>0</text:p>
          </table:table-cell>
          <table:table-cell table:formula="of:=COUNTIF([.AJ$15:.AJ$22];&quot;=&quot; &amp;[.$C50])" office:value-type="float" office:value="0" calcext:value-type="float">
            <text:p>0</text:p>
          </table:table-cell>
          <table:table-cell table:formula="of:=COUNTIF([.AK$15:.AK$22];&quot;=&quot; &amp;[.$C50])" office:value-type="float" office:value="0" calcext:value-type="float">
            <text:p>0</text:p>
          </table:table-cell>
          <table:table-cell table:formula="of:=COUNTIF([.AL$15:.AL$22];&quot;=&quot; &amp;[.$C50])" office:value-type="float" office:value="0" calcext:value-type="float">
            <text:p>0</text:p>
          </table:table-cell>
          <table:table-cell table:formula="of:=COUNTIF([.AM$15:.AM$22];&quot;=&quot; &amp;[.$C50])" office:value-type="float" office:value="0" calcext:value-type="float">
            <text:p>0</text:p>
          </table:table-cell>
          <table:table-cell table:formula="of:=COUNTIF([.AN$15:.AN$22];&quot;=&quot; &amp;[.$C50])" office:value-type="float" office:value="0" calcext:value-type="float">
            <text:p>0</text:p>
          </table:table-cell>
          <table:table-cell table:formula="of:=COUNTIF([.AO$15:.AO$22];&quot;=&quot; &amp;[.$C50])" office:value-type="float" office:value="0" calcext:value-type="float">
            <text:p>0</text:p>
          </table:table-cell>
          <table:table-cell table:formula="of:=COUNTIF([.AP$15:.AP$22];&quot;=&quot; &amp;[.$C50])" office:value-type="float" office:value="0" calcext:value-type="float">
            <text:p>0</text:p>
          </table:table-cell>
          <table:table-cell table:formula="of:=COUNTIF([.AQ$15:.AQ$22];&quot;=&quot; &amp;[.$C50])" office:value-type="float" office:value="0" calcext:value-type="float">
            <text:p>0</text:p>
          </table:table-cell>
          <table:table-cell table:formula="of:=COUNTIF([.AR$15:.AR$22];&quot;=&quot; &amp;[.$C50])" office:value-type="float" office:value="0" calcext:value-type="float">
            <text:p>0</text:p>
          </table:table-cell>
          <table:table-cell table:formula="of:=COUNTIF([.AS$15:.AS$22];&quot;=&quot; &amp;[.$C50])" office:value-type="float" office:value="0" calcext:value-type="float">
            <text:p>0</text:p>
          </table:table-cell>
          <table:table-cell table:formula="of:=COUNTIF([.AT$15:.AT$22];&quot;=&quot; &amp;[.$C50])" office:value-type="float" office:value="0" calcext:value-type="float">
            <text:p>0</text:p>
          </table:table-cell>
          <table:table-cell table:formula="of:=COUNTIF([.AU$15:.AU$22];&quot;=&quot; &amp;[.$C50])" office:value-type="float" office:value="0" calcext:value-type="float">
            <text:p>0</text:p>
          </table:table-cell>
          <table:table-cell table:formula="of:=COUNTIF([.AV$15:.AV$22];&quot;=&quot; &amp;[.$C50])" office:value-type="float" office:value="0" calcext:value-type="float">
            <text:p>0</text:p>
          </table:table-cell>
          <table:table-cell table:formula="of:=COUNTIF([.AW$15:.AW$22];&quot;=&quot; &amp;[.$C50])" office:value-type="float" office:value="0" calcext:value-type="float">
            <text:p>0</text:p>
          </table:table-cell>
          <table:table-cell table:formula="of:=COUNTIF([.AX$15:.AX$22];&quot;=&quot; &amp;[.$C50])" office:value-type="float" office:value="0" calcext:value-type="float">
            <text:p>0</text:p>
          </table:table-cell>
          <table:table-cell table:formula="of:=COUNTIF([.AY$15:.AY$22];&quot;=&quot; &amp;[.$C50])" office:value-type="float" office:value="0" calcext:value-type="float">
            <text:p>0</text:p>
          </table:table-cell>
          <table:table-cell/>
          <table:table-cell table:formula="of:=[.BA49]+0.002" office:value-type="float" office:value="0.0700000000000001" calcext:value-type="float">
            <text:p>0.0700000000000001</text:p>
          </table:table-cell>
          <table:table-cell table:formula="of:=[.BA50]*[.$D$6]" office:value-type="float" office:value="3.51858377202057" calcext:value-type="float">
            <text:p>3.519</text:p>
          </table:table-cell>
          <table:table-cell table:formula="of:=[.D$25]*[.$Z$5]*MAGNET([.D$24]+[.BB50])+[.E$25]*[.$Z$5]*MAGNET([.E$24]+[.BB50])+[.F$25]*[.$Z$5]*MAGNET([.F$24]+[.BB50])+[.G$25]*[.$Z$5]*MAGNET([.G$24]+[.BB50])+[.H$25]*[.$Z$5]*MAGNET([.H$24]+[.BB50])+[.I$25]*[.$Z$5]*MAGNET([.I$24]+[.BB50])+[.J$25]*[.$Z$5]*MAGNET([.J$24]+[.BB50])+[.K$25]*[.$Z$5]*MAGNET([.K$24]+[.BB50])+[.L$25]*[.$Z$5]*MAGNET([.L$24]+[.BB50])+[.M$25]*[.$Z$5]*MAGNET([.M$24]+[.BB50])+[.N$25]*[.$Z$5]*MAGNET([.N$24]+[.BB50])+[.O$25]*[.$Z$5]*MAGNET([.O$24]+[.BB50])+[.P$25]*[.$Z$5]*MAGNET([.P$24]+[.BB50])+[.Q$25]*[.$Z$5]*MAGNET([.Q$24]+[.BB50])+[.R$25]*[.$Z$5]*MAGNET([.R$24]+[.BB50])+[.S$25]*[.$Z$5]*MAGNET([.S$24]+[.BB50])+[.T$25]*[.$Z$5]*MAGNET([.T$24]+[.BB50])+[.U$25]*[.$Z$5]*MAGNET([.U$24]+[.BB50])+[.V$25]*[.$Z$5]*MAGNET([.V$24]+[.BB50])+[.W$25]*[.$Z$5]*MAGNET([.W$24]+[.BB50])+[.X$25]*[.$Z$5]*MAGNET([.X$24]+[.BB50])+[.Y$25]*[.$Z$5]*MAGNET([.Y$24]+[.BB50])+[.Z$25]*[.$Z$5]*MAGNET([.Z$24]+[.BB50])+[.AA$25]*[.$Z$5]*MAGNET([.AA$24]+[.BB50])+[.AB$25]*[.$Z$5]*MAGNET([.AB$24]+[.BB50])+[.AC$25]*[.$Z$5]*MAGNET([.AC$24]+[.BB50])+[.AD$25]*[.$Z$5]*MAGNET([.AD$24]+[.BB50])+[.AE$25]*[.$Z$5]*MAGNET([.AE$24]+[.BB50])+[.AF$25]*[.$Z$5]*MAGNET([.AF$24]+[.BB50])+[.AG$25]*[.$Z$5]*MAGNET([.AG$24]+[.BB50])+[.AH$25]*[.$Z$5]*MAGNET([.AH$24]+[.BB50]) +[.AI$25]*[.$Z$5]*MAGNET([.AI$24]+[.BB50]) +[.AJ$25]*[.$Z$5]*MAGNET([.AJ$24]+[.BB50]) +[.AK$25]*[.$Z$5]*MAGNET([.AK$24]+[.BB50]) +[.AL$25]*[.$Z$5]*MAGNET([.AL$24]+[.BB50]) +[.AM$25]*[.$Z$5]*MAGNET([.AM$24]+[.BB50]) +[.AN$25]*[.$Z$5]*MAGNET([.AN$24]+[.BB50]) +[.AO$25]*[.$Z$5]*MAGNET([.AO$24]+[.BB50])+RAND()*[.$BC$13]+[.AP$25]*[.$Z$5]*MAGNET([.AP$24]+[.BB50])&#10;+[.AQ$25]*[.$Z$5]*MAGNET([.AQ$24]+[.BB50])&#10;+[.AR$25]*[.$Z$5]*MAGNET([.AR$24]+[.BB50])&#10;+[.AS$25]*[.$Z$5]*MAGNET([.AS$24]+[.BB50])&#10;+[.AT$25]*[.$Z$5]*MAGNET([.AT$24]+[.BB50])&#10;+[.AU$25]*[.$Z$5]*MAGNET([.AU$24]+[.BB50])&#10;+[.AV$25]*[.$Z$5]*MAGNET([.AV$24]+[.BB50])&#10;+[.AW$25]*[.$Z$5]*MAGNET([.AW$24]+[.BB50])&#10;+[.AX$25]*[.$Z$5]*MAGNET([.AX$24]+[.BB50])&#10;+[.AY$25]*[.$Z$5]*MAGNET([.AY$24]+[.BB50])" office:value-type="float" office:value="9.74386697245553" calcext:value-type="float">
            <text:p>9.74</text:p>
          </table:table-cell>
          <table:table-cell table:style-name="ce70" table:formula="of:=[.E$26]*[.$Z$5]*MAGNET([.E$24]+[.$BB50])+[.F$26]*[.$Z$5]*MAGNET([.F$24]+[.$BB50])+[.G$26]*[.$Z$5]*MAGNET([.G$24]+[.$BB50])+[.H$26]*[.$Z$5]*MAGNET([.H$24]+[.$BB50])+[.I$26]*[.$Z$5]*MAGNET([.I$24]+[.$BB50])+[.J$26]*[.$Z$5]*MAGNET([.J$24]+[.$BB50])+[.K$26]*[.$Z$5]*MAGNET([.K$24]+[.$BB50])+[.L$26]*[.$Z$5]*MAGNET([.L$24]+[.$BB50])+[.M$26]*[.$Z$5]*MAGNET([.M$24]+[.$BB50])+[.N$26]*[.$Z$5]*MAGNET([.N$24]+[.$BB50])+[.O$26]*[.$Z$5]*MAGNET([.O$24]+[.$BB50])+[.P$26]*[.$Z$5]*MAGNET([.P$24]+[.$BB50])+[.Q$26]*[.$Z$5]*MAGNET([.Q$24]+[.$BB50])+[.R$26]*[.$Z$5]*MAGNET([.R$24]+[.$BB50])+[.S$26]*[.$Z$5]*MAGNET([.S$24]+[.$BB50])+[.T$26]*[.$Z$5]*MAGNET([.T$24]+[.$BB50])+[.U$26]*[.$Z$5]*MAGNET([.U$24]+[.$BB50])+[.V$26]*[.$Z$5]*MAGNET([.V$24]+[.$BB50])+[.W$26]*[.$Z$5]*MAGNET([.W$24]+[.$BB50])+[.X$26]*[.$Z$5]*MAGNET([.X$24]+[.$BB50])+[.Y$26]*[.$Z$5]*MAGNET([.Y$24]+[.$BB50])+[.Z$26]*[.$Z$5]*MAGNET([.Z$24]+[.$BB50])+[.AA$26]*[.$Z$5]*MAGNET([.AA$24]+[.$BB50])+[.AB$26]*[.$Z$5]*MAGNET([.AB$24]+[.$BB50])+[.AC$26]*[.$Z$5]*MAGNET([.AC$24]+[.$BB50])+[.AD$26]*[.$Z$5]*MAGNET([.AD$24]+[.$BB50])+[.AE$26]*[.$Z$5]*MAGNET([.AE$24]+[.$BB50])+[.AF$26]*[.$Z$5]*MAGNET([.AF$24]+[.$BB50])+[.AG$26]*[.$Z$5]*MAGNET([.AG$24]+[.$BB50])+[.D$26]*[.$Z$5]*MAGNET([.D$24]+[.$BB50])+[.AH$26]*[.$Z$5]*MAGNET([.AH$24]+[.BB50]) +[.AI$26]*[.$Z$5]*MAGNET([.AI$24]+[.BB50]) +[.AJ$26]*[.$Z$5]*MAGNET([.AJ$24]+[.BB50]) +[.AK$26]*[.$Z$5]*MAGNET([.AK$24]+[.BB50]) +[.AL$26]*[.$Z$5]*MAGNET([.AL$24]+[.BB50]) +[.AM$26]*[.$Z$5]*MAGNET([.AM$24]+[.BB50]) +[.AN$26]*[.$Z$5]*MAGNET([.AN$24]+[.BB50]) +[.AO$26]*[.$Z$5]*MAGNET([.AO$24]+[.BB50]) +[.AP$26]*[.$Z$5]*MAGNET([.AP$24]+[.$BB50])&#10;+[.AQ$26]*[.$Z$5]*MAGNET([.AQ$24]+[.$BB50])&#10;+[.AR$26]*[.$Z$5]*MAGNET([.AR$24]+[.$BB50])&#10;+[.AS$26]*[.$Z$5]*MAGNET([.AS$24]+[.$BB50])&#10;+[.AT$26]*[.$Z$5]*MAGNET([.AT$24]+[.$BB50])&#10;+[.AU$26]*[.$Z$5]*MAGNET([.AU$24]+[.$BB50])&#10;+[.AV$26]*[.$Z$5]*MAGNET([.AV$24]+[.$BB50])&#10;+[.AW$26]*[.$Z$5]*MAGNET([.AW$24]+[.$BB50])&#10;+[.AX$26]*[.$Z$5]*MAGNET([.AX$24]+[.$BB50])&#10;+[.AY$26]*[.$Z$5]*MAGNET([.AY$24]+[.$BB50]) +RAND()*[.$BD$13]" office:value-type="float" office:value="-76.3588711775844" calcext:value-type="float">
            <text:p>-76.36</text:p>
          </table:table-cell>
          <table:table-cell table:style-name="ce71" table:formula="of:=[.E$27]*[.$Z$5]*MAGNET([.E$24]+[.$BB50])+[.F$27]*[.$Z$5]*MAGNET([.F$24]+[.$BB50])+[.G$27]*[.$Z$5]*MAGNET([.G$24]+[.$BB50])+[.H$27]*[.$Z$5]*MAGNET([.H$24]+[.$BB50])+[.I$27]*[.$Z$5]*MAGNET([.I$24]+[.$BB50])+[.J$27]*[.$Z$5]*MAGNET([.J$24]+[.$BB50])+[.K$27]*[.$Z$5]*MAGNET([.K$24]+[.$BB50])+[.L$27]*[.$Z$5]*MAGNET([.L$24]+[.$BB50])+[.M$27]*[.$Z$5]*MAGNET([.M$24]+[.$BB50])+[.N$27]*[.$Z$5]*MAGNET([.N$24]+[.$BB50])+[.O$27]*[.$Z$5]*MAGNET([.O$24]+[.$BB50])+[.P$27]*[.$Z$5]*MAGNET([.P$24]+[.$BB50])+[.Q$27]*[.$Z$5]*MAGNET([.Q$24]+[.$BB50])+[.R$27]*[.$Z$5]*MAGNET([.R$24]+[.$BB50])+[.S$27]*[.$Z$5]*MAGNET([.S$24]+[.$BB50])+[.T$27]*[.$Z$5]*MAGNET([.T$24]+[.$BB50])+[.U$27]*[.$Z$5]*MAGNET([.U$24]+[.$BB50])+[.V$27]*[.$Z$5]*MAGNET([.V$24]+[.$BB50])+[.W$27]*[.$Z$5]*MAGNET([.W$24]+[.$BB50])+[.X$27]*[.$Z$5]*MAGNET([.X$24]+[.$BB50])+[.Y$27]*[.$Z$5]*MAGNET([.Y$24]+[.$BB50])+[.Z$27]*[.$Z$5]*MAGNET([.Z$24]+[.$BB50])+[.AA$27]*[.$Z$5]*MAGNET([.AA$24]+[.$BB50])+[.AB$27]*[.$Z$5]*MAGNET([.AB$24]+[.$BB50])+[.AC$27]*[.$Z$5]*MAGNET([.AC$24]+[.$BB50])+[.AD$27]*[.$Z$5]*MAGNET([.AD$24]+[.$BB50])+[.AE$27]*[.$Z$5]*MAGNET([.AE$24]+[.$BB50])+[.AF$27]*[.$Z$5]*MAGNET([.AF$24]+[.$BB50])+[.AG$27]*[.$Z$5]*MAGNET([.AG$24]+[.$BB50])+[.D$27]*[.$Z$5]*MAGNET([.D$24]+[.$BB50])+[.AH$27]*[.$Z$5]*MAGNET([.AH$24]+[.BB50]) +[.AI$27]*[.$Z$5]*MAGNET([.AI$24]+[.BB50]) +[.AJ$27]*[.$Z$5]*MAGNET([.AJ$24]+[.BB50]) +[.AK$27]*[.$Z$5]*MAGNET([.AK$24]+[.BB50]) +[.AL$27]*[.$Z$5]*MAGNET([.AL$24]+[.BB50]) +[.AM$27]*[.$Z$5]*MAGNET([.AM$24]+[.BB50]) +[.AN$27]*[.$Z$5]*MAGNET([.AN$24]+[.BB50]) +[.AO$27]*[.$Z$5]*MAGNET([.AO$24]+[.BB50]) +[.AP$27]*[.$Z$5]*MAGNET([.AP$24]+[.$BB50])&#10;+[.AQ$27]*[.$Z$5]*MAGNET([.AQ$24]+[.$BB50])&#10;+[.AR$27]*[.$Z$5]*MAGNET([.AR$24]+[.$BB50])&#10;+[.AS$27]*[.$Z$5]*MAGNET([.AS$24]+[.$BB50])&#10;+[.AT$27]*[.$Z$5]*MAGNET([.AT$24]+[.$BB50])&#10;+[.AU$27]*[.$Z$5]*MAGNET([.AU$24]+[.$BB50])&#10;+[.AV$27]*[.$Z$5]*MAGNET([.AV$24]+[.$BB50])&#10;+[.AW$27]*[.$Z$5]*MAGNET([.AW$24]+[.$BB50])&#10;+[.AX$27]*[.$Z$5]*MAGNET([.AX$24]+[.$BB50])&#10;+[.AY$27]*[.$Z$5]*MAGNET([.AY$24]+[.$BB50]) +RAND()*[.$BE$13]" office:value-type="float" office:value="98.575049382006" calcext:value-type="float">
            <text:p>98.575049382006</text:p>
          </table:table-cell>
          <table:table-cell table:style-name="ce71" table:formula="of:=[.E$28]*[.$Z$5]*MAGNET([.E$24]+[.$BB50])+[.F$28]*[.$Z$5]*MAGNET([.F$24]+[.$BB50])+[.G$28]*[.$Z$5]*MAGNET([.G$24]+[.$BB50])+[.H$28]*[.$Z$5]*MAGNET([.H$24]+[.$BB50])+[.I$28]*[.$Z$5]*MAGNET([.I$24]+[.$BB50])+[.J$28]*[.$Z$5]*MAGNET([.J$24]+[.$BB50])+[.K$28]*[.$Z$5]*MAGNET([.K$24]+[.$BB50])+[.L$28]*[.$Z$5]*MAGNET([.L$24]+[.$BB50])+[.M$28]*[.$Z$5]*MAGNET([.M$24]+[.$BB50])+[.N$28]*[.$Z$5]*MAGNET([.N$24]+[.$BB50])+[.O$28]*[.$Z$5]*MAGNET([.O$24]+[.$BB50])+[.P$28]*[.$Z$5]*MAGNET([.P$24]+[.$BB50])+[.Q$28]*[.$Z$5]*MAGNET([.Q$24]+[.$BB50])+[.R$28]*[.$Z$5]*MAGNET([.R$24]+[.$BB50])+[.S$28]*[.$Z$5]*MAGNET([.S$24]+[.$BB50])+[.T$28]*[.$Z$5]*MAGNET([.T$24]+[.$BB50])+[.U$28]*[.$Z$5]*MAGNET([.U$24]+[.$BB50])+[.V$28]*[.$Z$5]*MAGNET([.V$24]+[.$BB50])+[.W$28]*[.$Z$5]*MAGNET([.W$24]+[.$BB50])+[.X$28]*[.$Z$5]*MAGNET([.X$24]+[.$BB50])+[.Y$28]*[.$Z$5]*MAGNET([.Y$24]+[.$BB50])+[.Z$28]*[.$Z$5]*MAGNET([.Z$24]+[.$BB50])+[.AA$28]*[.$Z$5]*MAGNET([.AA$24]+[.$BB50])+[.AB$28]*[.$Z$5]*MAGNET([.AB$24]+[.$BB50])+[.AC$28]*[.$Z$5]*MAGNET([.AC$24]+[.$BB50])+[.AD$28]*[.$Z$5]*MAGNET([.AD$24]+[.$BB50])+[.AE$28]*[.$Z$5]*MAGNET([.AE$24]+[.$BB50])+[.AF$28]*[.$Z$5]*MAGNET([.AF$24]+[.$BB50])+[.AG$28]*[.$Z$5]*MAGNET([.AG$24]+[.$BB50])+[.D$28]*[.$Z$5]*MAGNET([.D$24]+[.$BB50])+[.AH$28]*[.$Z$5]*MAGNET([.AH$24]+[.BB50]) +[.AI$28]*[.$Z$5]*MAGNET([.AI$24]+[.BB50]) +[.AJ$28]*[.$Z$5]*MAGNET([.AJ$24]+[.BB50]) +[.AK$28]*[.$Z$5]*MAGNET([.AK$24]+[.BB50]) +[.AL$28]*[.$Z$5]*MAGNET([.AL$24]+[.BB50]) +[.AM$28]*[.$Z$5]*MAGNET([.AM$24]+[.BB50]) +[.AN$28]*[.$Z$5]*MAGNET([.AN$24]+[.BB50]) +[.AO$28]*[.$Z$5]*MAGNET([.AO$24]+[.BB50]) +[.AP$28]*[.$Z$5]*MAGNET([.AP$24]+[.$BB50])&#10;+[.AQ$28]*[.$Z$5]*MAGNET([.AQ$24]+[.$BB50])&#10;+[.AR$28]*[.$Z$5]*MAGNET([.AR$24]+[.$BB50])&#10;+[.AS$28]*[.$Z$5]*MAGNET([.AS$24]+[.$BB50])&#10;+[.AT$28]*[.$Z$5]*MAGNET([.AT$24]+[.$BB50])&#10;+[.AU$28]*[.$Z$5]*MAGNET([.AU$24]+[.$BB50])&#10;+[.AV$28]*[.$Z$5]*MAGNET([.AV$24]+[.$BB50])&#10;+[.AW$28]*[.$Z$5]*MAGNET([.AW$24]+[.$BB50])&#10;+[.AX$28]*[.$Z$5]*MAGNET([.AX$24]+[.$BB50])&#10;+[.AY$28]*[.$Z$5]*MAGNET([.AY$24]+[.$BB50]) +RAND()*[.$BF$13]" office:value-type="float" office:value="12.9752668533343" calcext:value-type="float">
            <text:p>12.9752668533343</text:p>
          </table:table-cell>
          <table:table-cell table:style-name="ce71" table:formula="of:=[.E$29]*[.$Z$5]*MAGNET([.E$24]+[.$BB50])+[.F$29]*[.$Z$5]*MAGNET([.F$24]+[.$BB50])+[.G$29]*[.$Z$5]*MAGNET([.G$24]+[.$BB50])+[.H$29]*[.$Z$5]*MAGNET([.H$24]+[.$BB50])+[.I$29]*[.$Z$5]*MAGNET([.I$24]+[.$BB50])+[.J$29]*[.$Z$5]*MAGNET([.J$24]+[.$BB50])+[.K$29]*[.$Z$5]*MAGNET([.K$24]+[.$BB50])+[.L$29]*[.$Z$5]*MAGNET([.L$24]+[.$BB50])+[.M$29]*[.$Z$5]*MAGNET([.M$24]+[.$BB50])+[.N$29]*[.$Z$5]*MAGNET([.N$24]+[.$BB50])+[.O$29]*[.$Z$5]*MAGNET([.O$24]+[.$BB50])+[.P$29]*[.$Z$5]*MAGNET([.P$24]+[.$BB50])+[.Q$29]*[.$Z$5]*MAGNET([.Q$24]+[.$BB50])+[.R$29]*[.$Z$5]*MAGNET([.R$24]+[.$BB50])+[.S$29]*[.$Z$5]*MAGNET([.S$24]+[.$BB50])+[.T$29]*[.$Z$5]*MAGNET([.T$24]+[.$BB50])+[.U$29]*[.$Z$5]*MAGNET([.U$24]+[.$BB50])+[.V$29]*[.$Z$5]*MAGNET([.V$24]+[.$BB50])+[.W$29]*[.$Z$5]*MAGNET([.W$24]+[.$BB50])+[.X$29]*[.$Z$5]*MAGNET([.X$24]+[.$BB50])+[.Y$29]*[.$Z$5]*MAGNET([.Y$24]+[.$BB50])+[.Z$29]*[.$Z$5]*MAGNET([.Z$24]+[.$BB50])+[.AA$29]*[.$Z$5]*MAGNET([.AA$24]+[.$BB50])+[.AB$29]*[.$Z$5]*MAGNET([.AB$24]+[.$BB50])+[.AC$29]*[.$Z$5]*MAGNET([.AC$24]+[.$BB50])+[.AD$29]*[.$Z$5]*MAGNET([.AD$24]+[.$BB50])+[.AE$29]*[.$Z$5]*MAGNET([.AE$24]+[.$BB50])+[.AF$29]*[.$Z$5]*MAGNET([.AF$24]+[.$BB50])+[.AG$29]*[.$Z$5]*MAGNET([.AG$24]+[.$BB50])+[.D$29]*[.$Z$5]*MAGNET([.D$24]+[.$BB50])+[.AH$29]*[.$Z$5]*MAGNET([.AH$24]+[.BB50]) +[.AI$29]*[.$Z$5]*MAGNET([.AI$24]+[.BB50]) +[.AJ$29]*[.$Z$5]*MAGNET([.AJ$24]+[.BB50]) +[.AK$29]*[.$Z$5]*MAGNET([.AK$24]+[.BB50]) +[.AL$29]*[.$Z$5]*MAGNET([.AL$24]+[.BB50]) +[.AM$29]*[.$Z$5]*MAGNET([.AM$24]+[.BB50]) +[.AN$29]*[.$Z$5]*MAGNET([.AN$24]+[.BB50]) +[.AO$29]*[.$Z$5]*MAGNET([.AO$24]+[.BB50]) +[.AP$29]*[.$Z$5]*MAGNET([.AP$24]+[.$BB50])&#10;+[.AQ$29]*[.$Z$5]*MAGNET([.AQ$24]+[.$BB50])&#10;+[.AR$29]*[.$Z$5]*MAGNET([.AR$24]+[.$BB50])&#10;+[.AS$29]*[.$Z$5]*MAGNET([.AS$24]+[.$BB50])&#10;+[.AT$29]*[.$Z$5]*MAGNET([.AT$24]+[.$BB50])&#10;+[.AU$29]*[.$Z$5]*MAGNET([.AU$24]+[.$BB50])&#10;+[.AV$29]*[.$Z$5]*MAGNET([.AV$24]+[.$BB50])&#10;+[.AW$29]*[.$Z$5]*MAGNET([.AW$24]+[.$BB50])&#10;+[.AX$29]*[.$Z$5]*MAGNET([.AX$24]+[.$BB50])&#10;+[.AY$29]*[.$Z$5]*MAGNET([.AY$24]+[.$BB50]) +RAND()*[.$BG$13]" office:value-type="float" office:value="-39.4277576552847" calcext:value-type="float">
            <text:p>-39.4277576552847</text:p>
          </table:table-cell>
          <table:table-cell table:style-name="ce71" table:formula="of:=[.E$30]*[.$Z$5]*MAGNET([.E$24]+[.$BB50])+[.F$30]*[.$Z$5]*MAGNET([.F$24]+[.$BB50])+[.G$30]*[.$Z$5]*MAGNET([.G$24]+[.$BB50])+[.H$30]*[.$Z$5]*MAGNET([.H$24]+[.$BB50])+[.I$30]*[.$Z$5]*MAGNET([.I$24]+[.$BB50])+[.J$30]*[.$Z$5]*MAGNET([.J$24]+[.$BB50])+[.K$30]*[.$Z$5]*MAGNET([.K$24]+[.$BB50])+[.L$30]*[.$Z$5]*MAGNET([.L$24]+[.$BB50])+[.M$30]*[.$Z$5]*MAGNET([.M$24]+[.$BB50])+[.N$30]*[.$Z$5]*MAGNET([.N$24]+[.$BB50])+[.O$30]*[.$Z$5]*MAGNET([.O$24]+[.$BB50])+[.P$30]*[.$Z$5]*MAGNET([.P$24]+[.$BB50])+[.Q$30]*[.$Z$5]*MAGNET([.Q$24]+[.$BB50])+[.R$30]*[.$Z$5]*MAGNET([.R$24]+[.$BB50])+[.S$30]*[.$Z$5]*MAGNET([.S$24]+[.$BB50])+[.T$30]*[.$Z$5]*MAGNET([.T$24]+[.$BB50])+[.U$30]*[.$Z$5]*MAGNET([.U$24]+[.$BB50])+[.V$30]*[.$Z$5]*MAGNET([.V$24]+[.$BB50])+[.W$30]*[.$Z$5]*MAGNET([.W$24]+[.$BB50])+[.X$30]*[.$Z$5]*MAGNET([.X$24]+[.$BB50])+[.Y$30]*[.$Z$5]*MAGNET([.Y$24]+[.$BB50])+[.Z$30]*[.$Z$5]*MAGNET([.Z$24]+[.$BB50])+[.AA$30]*[.$Z$5]*MAGNET([.AA$24]+[.$BB50])+[.AB$30]*[.$Z$5]*MAGNET([.AB$24]+[.$BB50])+[.AC$30]*[.$Z$5]*MAGNET([.AC$24]+[.$BB50])+[.AD$30]*[.$Z$5]*MAGNET([.AD$24]+[.$BB50])+[.AE$30]*[.$Z$5]*MAGNET([.AE$24]+[.$BB50])+[.AF$30]*[.$Z$5]*MAGNET([.AF$24]+[.$BB50])+[.AG$30]*[.$Z$5]*MAGNET([.AG$24]+[.$BB50])+[.D$30]*[.$Z$5]*MAGNET([.D$24]+[.$BB50])+[.AH$30]*[.$Z$5]*MAGNET([.AH$24]+[.BB50]) +[.AI$30]*[.$Z$5]*MAGNET([.AI$24]+[.BB50]) +[.AJ$30]*[.$Z$5]*MAGNET([.AJ$24]+[.BB50]) +[.AK$30]*[.$Z$5]*MAGNET([.AK$24]+[.BB50]) +[.AL$30]*[.$Z$5]*MAGNET([.AL$24]+[.BB50]) +[.AM$30]*[.$Z$5]*MAGNET([.AM$24]+[.BB50]) +[.AN$30]*[.$Z$5]*MAGNET([.AN$24]+[.BB50]) +[.AO$30]*[.$Z$5]*MAGNET([.AO$24]+[.BB50]) +[.AP$30]*[.$Z$5]*MAGNET([.AP$24]+[.$BB50])&#10;+[.AQ$30]*[.$Z$5]*MAGNET([.AQ$24]+[.$BB50])&#10;+[.AR$30]*[.$Z$5]*MAGNET([.AR$24]+[.$BB50])&#10;+[.AS$30]*[.$Z$5]*MAGNET([.AS$24]+[.$BB50])&#10;+[.AT$30]*[.$Z$5]*MAGNET([.AT$24]+[.$BB50])&#10;+[.AU$30]*[.$Z$5]*MAGNET([.AU$24]+[.$BB50])&#10;+[.AV$30]*[.$Z$5]*MAGNET([.AV$24]+[.$BB50])&#10;+[.AW$30]*[.$Z$5]*MAGNET([.AW$24]+[.$BB50])&#10;+[.AX$30]*[.$Z$5]*MAGNET([.AX$24]+[.$BB50])&#10;+[.AY$30]*[.$Z$5]*MAGNET([.AY$24]+[.$BB50]) +RAND()*[.$BH$13]" office:value-type="float" office:value="0" calcext:value-type="float">
            <text:p>0</text:p>
          </table:table-cell>
          <table:table-cell table:style-name="ce71" table:formula="of:=[.E$31]*[.$Z$5]*MAGNET([.E$24]+[.$BB50])+[.F$31]*[.$Z$5]*MAGNET([.F$24]+[.$BB50])+[.G$31]*[.$Z$5]*MAGNET([.G$24]+[.$BB50])+[.H$31]*[.$Z$5]*MAGNET([.H$24]+[.$BB50])+[.I$31]*[.$Z$5]*MAGNET([.I$24]+[.$BB50])+[.J$31]*[.$Z$5]*MAGNET([.J$24]+[.$BB50])+[.K$31]*[.$Z$5]*MAGNET([.K$24]+[.$BB50])+[.L$31]*[.$Z$5]*MAGNET([.L$24]+[.$BB50])+[.M$31]*[.$Z$5]*MAGNET([.M$24]+[.$BB50])+[.N$31]*[.$Z$5]*MAGNET([.N$24]+[.$BB50])+[.O$31]*[.$Z$5]*MAGNET([.O$24]+[.$BB50])+[.P$31]*[.$Z$5]*MAGNET([.P$24]+[.$BB50])+[.Q$31]*[.$Z$5]*MAGNET([.Q$24]+[.$BB50])+[.R$31]*[.$Z$5]*MAGNET([.R$24]+[.$BB50])+[.S$31]*[.$Z$5]*MAGNET([.S$24]+[.$BB50])+[.T$31]*[.$Z$5]*MAGNET([.T$24]+[.$BB50])+[.U$31]*[.$Z$5]*MAGNET([.U$24]+[.$BB50])+[.V$31]*[.$Z$5]*MAGNET([.V$24]+[.$BB50])+[.W$31]*[.$Z$5]*MAGNET([.W$24]+[.$BB50])+[.X$31]*[.$Z$5]*MAGNET([.X$24]+[.$BB50])+[.Y$31]*[.$Z$5]*MAGNET([.Y$24]+[.$BB50])+[.Z$31]*[.$Z$5]*MAGNET([.Z$24]+[.$BB50])+[.AA$31]*[.$Z$5]*MAGNET([.AA$24]+[.$BB50])+[.AB$31]*[.$Z$5]*MAGNET([.AB$24]+[.$BB50])+[.AC$31]*[.$Z$5]*MAGNET([.AC$24]+[.$BB50])+[.AD$31]*[.$Z$5]*MAGNET([.AD$24]+[.$BB50])+[.AE$31]*[.$Z$5]*MAGNET([.AE$24]+[.$BB50])+[.AF$31]*[.$Z$5]*MAGNET([.AF$24]+[.$BB50])+[.AG$31]*[.$Z$5]*MAGNET([.AG$24]+[.$BB50])+[.D$31]*[.$Z$5]*MAGNET([.D$24]+[.$BB50])+[.AH$31]*[.$Z$5]*MAGNET([.AH$24]+[.BB50]) +[.AI$31]*[.$Z$5]*MAGNET([.AI$24]+[.BB50]) +[.AJ$31]*[.$Z$5]*MAGNET([.AJ$24]+[.BB50]) +[.AK$31]*[.$Z$5]*MAGNET([.AK$24]+[.BB50]) +[.AL$31]*[.$Z$5]*MAGNET([.AL$24]+[.BB50]) +[.AM$31]*[.$Z$5]*MAGNET([.AM$24]+[.BB50]) +[.AN$31]*[.$Z$5]*MAGNET([.AN$24]+[.BB50]) +[.AO$31]*[.$Z$5]*MAGNET([.AO$24]+[.BB50]) +[.AP$31]*[.$Z$5]*MAGNET([.AP$24]+[.$BB50])&#10;+[.AQ$31]*[.$Z$5]*MAGNET([.AQ$24]+[.$BB50])&#10;+[.AR$31]*[.$Z$5]*MAGNET([.AR$24]+[.$BB50])&#10;+[.AS$31]*[.$Z$5]*MAGNET([.AS$24]+[.$BB50])&#10;+[.AT$31]*[.$Z$5]*MAGNET([.AT$24]+[.$BB50])&#10;+[.AU$31]*[.$Z$5]*MAGNET([.AU$24]+[.$BB50])&#10;+[.AV$31]*[.$Z$5]*MAGNET([.AV$24]+[.$BB50])&#10;+[.AW$31]*[.$Z$5]*MAGNET([.AW$24]+[.$BB50])&#10;+[.AX$31]*[.$Z$5]*MAGNET([.AX$24]+[.$BB50])&#10;+[.AY$31]*[.$Z$5]*MAGNET([.AY$24]+[.$BB50]) +RAND()*[.$BI$13]" office:value-type="float" office:value="0" calcext:value-type="float">
            <text:p>0</text:p>
          </table:table-cell>
          <table:table-cell table:style-name="ce71" table:formula="of:=[.E$32]*[.$Z$5]*MAGNET([.E$24]+[.$BB50])+[.F$32]*[.$Z$5]*MAGNET([.F$24]+[.$BB50])+[.G$32]*[.$Z$5]*MAGNET([.G$24]+[.$BB50])+[.H$32]*[.$Z$5]*MAGNET([.H$24]+[.$BB50])+[.I$32]*[.$Z$5]*MAGNET([.I$24]+[.$BB50])+[.J$32]*[.$Z$5]*MAGNET([.J$24]+[.$BB50])+[.K$32]*[.$Z$5]*MAGNET([.K$24]+[.$BB50])+[.L$32]*[.$Z$5]*MAGNET([.L$24]+[.$BB50])+[.M$32]*[.$Z$5]*MAGNET([.M$24]+[.$BB50])+[.N$32]*[.$Z$5]*MAGNET([.N$24]+[.$BB50])+[.O$32]*[.$Z$5]*MAGNET([.O$24]+[.$BB50])+[.P$32]*[.$Z$5]*MAGNET([.P$24]+[.$BB50])+[.Q$32]*[.$Z$5]*MAGNET([.Q$24]+[.$BB50])+[.R$32]*[.$Z$5]*MAGNET([.R$24]+[.$BB50])+[.S$32]*[.$Z$5]*MAGNET([.S$24]+[.$BB50])+[.T$32]*[.$Z$5]*MAGNET([.T$24]+[.$BB50])+[.U$32]*[.$Z$5]*MAGNET([.U$24]+[.$BB50])+[.V$32]*[.$Z$5]*MAGNET([.V$24]+[.$BB50])+[.W$32]*[.$Z$5]*MAGNET([.W$24]+[.$BB50])+[.X$32]*[.$Z$5]*MAGNET([.X$24]+[.$BB50])+[.Y$32]*[.$Z$5]*MAGNET([.Y$24]+[.$BB50])+[.Z$32]*[.$Z$5]*MAGNET([.Z$24]+[.$BB50])+[.AA$32]*[.$Z$5]*MAGNET([.AA$24]+[.$BB50])+[.AB$32]*[.$Z$5]*MAGNET([.AB$24]+[.$BB50])+[.AC$32]*[.$Z$5]*MAGNET([.AC$24]+[.$BB50])+[.AD$32]*[.$Z$5]*MAGNET([.AD$24]+[.$BB50])+[.AE$32]*[.$Z$5]*MAGNET([.AE$24]+[.$BB50])+[.AF$32]*[.$Z$5]*MAGNET([.AF$24]+[.$BB50])+[.AG$32]*[.$Z$5]*MAGNET([.AG$24]+[.$BB50])+[.D$32]*[.$Z$5]*MAGNET([.D$24]+[.$BB50])+[.AH$32]*[.$Z$5]*MAGNET([.AH$24]+[.BB50]) +[.AI$32]*[.$Z$5]*MAGNET([.AI$24]+[.BB50]) +[.AJ$32]*[.$Z$5]*MAGNET([.AJ$24]+[.BB50]) +[.AK$32]*[.$Z$5]*MAGNET([.AK$24]+[.BB50]) +[.AL$32]*[.$Z$5]*MAGNET([.AL$24]+[.BB50]) +[.AM$32]*[.$Z$5]*MAGNET([.AM$24]+[.BB50]) +[.AN$32]*[.$Z$5]*MAGNET([.AN$24]+[.BB50]) +[.AO$32]*[.$Z$5]*MAGNET([.AO$24]+[.BB50]) +[.AP$32]*[.$Z$5]*MAGNET([.AP$24]+[.$BB50])&#10;+[.AQ$32]*[.$Z$5]*MAGNET([.AQ$24]+[.$BB50])&#10;+[.AR$32]*[.$Z$5]*MAGNET([.AR$24]+[.$BB50])&#10;+[.AS$32]*[.$Z$5]*MAGNET([.AS$24]+[.$BB50])&#10;+[.AT$32]*[.$Z$5]*MAGNET([.AT$24]+[.$BB50])&#10;+[.AU$32]*[.$Z$5]*MAGNET([.AU$24]+[.$BB50])&#10;+[.AV$32]*[.$Z$5]*MAGNET([.AV$24]+[.$BB50])&#10;+[.AW$32]*[.$Z$5]*MAGNET([.AW$24]+[.$BB50])&#10;+[.AX$32]*[.$Z$5]*MAGNET([.AX$24]+[.$BB50])&#10;+[.AY$32]*[.$Z$5]*MAGNET([.AY$24]+[.$BB5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formula="of:=COUNTIF([.D$15:.D$22];&quot;=&quot; &amp;[.$C51])" office:value-type="float" office:value="0" calcext:value-type="float">
            <text:p>0</text:p>
          </table:table-cell>
          <table:table-cell table:formula="of:=COUNTIF([.E$15:.E$22];&quot;=&quot; &amp;[.$C51])" office:value-type="float" office:value="0" calcext:value-type="float">
            <text:p>0</text:p>
          </table:table-cell>
          <table:table-cell table:formula="of:=COUNTIF([.F$15:.F$22];&quot;=&quot; &amp;[.$C51])" office:value-type="float" office:value="0" calcext:value-type="float">
            <text:p>0</text:p>
          </table:table-cell>
          <table:table-cell table:formula="of:=COUNTIF([.G$15:.G$22];&quot;=&quot; &amp;[.$C51])" office:value-type="float" office:value="0" calcext:value-type="float">
            <text:p>0</text:p>
          </table:table-cell>
          <table:table-cell table:formula="of:=COUNTIF([.H$15:.H$22];&quot;=&quot; &amp;[.$C51])" office:value-type="float" office:value="0" calcext:value-type="float">
            <text:p>0</text:p>
          </table:table-cell>
          <table:table-cell table:formula="of:=COUNTIF([.I$15:.I$22];&quot;=&quot; &amp;[.$C51])" office:value-type="float" office:value="0" calcext:value-type="float">
            <text:p>0</text:p>
          </table:table-cell>
          <table:table-cell table:formula="of:=COUNTIF([.J$15:.J$22];&quot;=&quot; &amp;[.$C51])" office:value-type="float" office:value="0" calcext:value-type="float">
            <text:p>0</text:p>
          </table:table-cell>
          <table:table-cell table:formula="of:=COUNTIF([.K$15:.K$22];&quot;=&quot; &amp;[.$C51])" office:value-type="float" office:value="0" calcext:value-type="float">
            <text:p>0</text:p>
          </table:table-cell>
          <table:table-cell table:formula="of:=COUNTIF([.L$15:.L$22];&quot;=&quot; &amp;[.$C51])" office:value-type="float" office:value="0" calcext:value-type="float">
            <text:p>0</text:p>
          </table:table-cell>
          <table:table-cell table:formula="of:=COUNTIF([.M$15:.M$22];&quot;=&quot; &amp;[.$C51])" office:value-type="float" office:value="0" calcext:value-type="float">
            <text:p>0</text:p>
          </table:table-cell>
          <table:table-cell table:formula="of:=COUNTIF([.N$15:.N$22];&quot;=&quot; &amp;[.$C51])" office:value-type="float" office:value="0" calcext:value-type="float">
            <text:p>0</text:p>
          </table:table-cell>
          <table:table-cell table:formula="of:=COUNTIF([.O$15:.O$22];&quot;=&quot; &amp;[.$C51])" office:value-type="float" office:value="0" calcext:value-type="float">
            <text:p>0</text:p>
          </table:table-cell>
          <table:table-cell table:formula="of:=COUNTIF([.P$15:.P$22];&quot;=&quot; &amp;[.$C51])" office:value-type="float" office:value="0" calcext:value-type="float">
            <text:p>0</text:p>
          </table:table-cell>
          <table:table-cell table:formula="of:=COUNTIF([.Q$15:.Q$22];&quot;=&quot; &amp;[.$C51])" office:value-type="float" office:value="0" calcext:value-type="float">
            <text:p>0</text:p>
          </table:table-cell>
          <table:table-cell table:formula="of:=COUNTIF([.R$15:.R$22];&quot;=&quot; &amp;[.$C51])" office:value-type="float" office:value="0" calcext:value-type="float">
            <text:p>0</text:p>
          </table:table-cell>
          <table:table-cell table:formula="of:=COUNTIF([.S$15:.S$22];&quot;=&quot; &amp;[.$C51])" office:value-type="float" office:value="0" calcext:value-type="float">
            <text:p>0</text:p>
          </table:table-cell>
          <table:table-cell table:formula="of:=COUNTIF([.T$15:.T$22];&quot;=&quot; &amp;[.$C51])" office:value-type="float" office:value="0" calcext:value-type="float">
            <text:p>0</text:p>
          </table:table-cell>
          <table:table-cell table:formula="of:=COUNTIF([.U$15:.U$22];&quot;=&quot; &amp;[.$C51])" office:value-type="float" office:value="0" calcext:value-type="float">
            <text:p>0</text:p>
          </table:table-cell>
          <table:table-cell table:formula="of:=COUNTIF([.V$15:.V$22];&quot;=&quot; &amp;[.$C51])" office:value-type="float" office:value="0" calcext:value-type="float">
            <text:p>0</text:p>
          </table:table-cell>
          <table:table-cell table:formula="of:=COUNTIF([.W$15:.W$22];&quot;=&quot; &amp;[.$C51])" office:value-type="float" office:value="0" calcext:value-type="float">
            <text:p>0</text:p>
          </table:table-cell>
          <table:table-cell table:formula="of:=COUNTIF([.X$15:.X$22];&quot;=&quot; &amp;[.$C51])" office:value-type="float" office:value="0" calcext:value-type="float">
            <text:p>0</text:p>
          </table:table-cell>
          <table:table-cell table:formula="of:=COUNTIF([.Y$15:.Y$22];&quot;=&quot; &amp;[.$C51])" office:value-type="float" office:value="0" calcext:value-type="float">
            <text:p>0</text:p>
          </table:table-cell>
          <table:table-cell table:formula="of:=COUNTIF([.Z$15:.Z$22];&quot;=&quot; &amp;[.$C51])" office:value-type="float" office:value="0" calcext:value-type="float">
            <text:p>0</text:p>
          </table:table-cell>
          <table:table-cell table:formula="of:=COUNTIF([.AA$15:.AA$22];&quot;=&quot; &amp;[.$C51])" office:value-type="float" office:value="0" calcext:value-type="float">
            <text:p>0</text:p>
          </table:table-cell>
          <table:table-cell table:formula="of:=COUNTIF([.AB$15:.AB$22];&quot;=&quot; &amp;[.$C51])" office:value-type="float" office:value="0" calcext:value-type="float">
            <text:p>0</text:p>
          </table:table-cell>
          <table:table-cell table:formula="of:=COUNTIF([.AC$15:.AC$22];&quot;=&quot; &amp;[.$C51])" office:value-type="float" office:value="0" calcext:value-type="float">
            <text:p>0</text:p>
          </table:table-cell>
          <table:table-cell table:formula="of:=COUNTIF([.AD$15:.AD$22];&quot;=&quot; &amp;[.$C51])" office:value-type="float" office:value="0" calcext:value-type="float">
            <text:p>0</text:p>
          </table:table-cell>
          <table:table-cell table:formula="of:=COUNTIF([.AE$15:.AE$22];&quot;=&quot; &amp;[.$C51])" office:value-type="float" office:value="0" calcext:value-type="float">
            <text:p>0</text:p>
          </table:table-cell>
          <table:table-cell table:formula="of:=COUNTIF([.AF$15:.AF$22];&quot;=&quot; &amp;[.$C51])" office:value-type="float" office:value="0" calcext:value-type="float">
            <text:p>0</text:p>
          </table:table-cell>
          <table:table-cell table:formula="of:=COUNTIF([.AG$15:.AG$22];&quot;=&quot; &amp;[.$C51])" office:value-type="float" office:value="0" calcext:value-type="float">
            <text:p>0</text:p>
          </table:table-cell>
          <table:table-cell table:formula="of:=COUNTIF([.AH$15:.AH$22];&quot;=&quot; &amp;[.$C51])" office:value-type="float" office:value="0" calcext:value-type="float">
            <text:p>0</text:p>
          </table:table-cell>
          <table:table-cell table:formula="of:=COUNTIF([.AI$15:.AI$22];&quot;=&quot; &amp;[.$C51])" office:value-type="float" office:value="0" calcext:value-type="float">
            <text:p>0</text:p>
          </table:table-cell>
          <table:table-cell table:formula="of:=COUNTIF([.AJ$15:.AJ$22];&quot;=&quot; &amp;[.$C51])" office:value-type="float" office:value="0" calcext:value-type="float">
            <text:p>0</text:p>
          </table:table-cell>
          <table:table-cell table:formula="of:=COUNTIF([.AK$15:.AK$22];&quot;=&quot; &amp;[.$C51])" office:value-type="float" office:value="0" calcext:value-type="float">
            <text:p>0</text:p>
          </table:table-cell>
          <table:table-cell table:formula="of:=COUNTIF([.AL$15:.AL$22];&quot;=&quot; &amp;[.$C51])" office:value-type="float" office:value="0" calcext:value-type="float">
            <text:p>0</text:p>
          </table:table-cell>
          <table:table-cell table:formula="of:=COUNTIF([.AM$15:.AM$22];&quot;=&quot; &amp;[.$C51])" office:value-type="float" office:value="0" calcext:value-type="float">
            <text:p>0</text:p>
          </table:table-cell>
          <table:table-cell table:formula="of:=COUNTIF([.AN$15:.AN$22];&quot;=&quot; &amp;[.$C51])" office:value-type="float" office:value="0" calcext:value-type="float">
            <text:p>0</text:p>
          </table:table-cell>
          <table:table-cell table:formula="of:=COUNTIF([.AO$15:.AO$22];&quot;=&quot; &amp;[.$C51])" office:value-type="float" office:value="0" calcext:value-type="float">
            <text:p>0</text:p>
          </table:table-cell>
          <table:table-cell table:formula="of:=COUNTIF([.AP$15:.AP$22];&quot;=&quot; &amp;[.$C51])" office:value-type="float" office:value="0" calcext:value-type="float">
            <text:p>0</text:p>
          </table:table-cell>
          <table:table-cell table:formula="of:=COUNTIF([.AQ$15:.AQ$22];&quot;=&quot; &amp;[.$C51])" office:value-type="float" office:value="0" calcext:value-type="float">
            <text:p>0</text:p>
          </table:table-cell>
          <table:table-cell table:formula="of:=COUNTIF([.AR$15:.AR$22];&quot;=&quot; &amp;[.$C51])" office:value-type="float" office:value="0" calcext:value-type="float">
            <text:p>0</text:p>
          </table:table-cell>
          <table:table-cell table:formula="of:=COUNTIF([.AS$15:.AS$22];&quot;=&quot; &amp;[.$C51])" office:value-type="float" office:value="0" calcext:value-type="float">
            <text:p>0</text:p>
          </table:table-cell>
          <table:table-cell table:formula="of:=COUNTIF([.AT$15:.AT$22];&quot;=&quot; &amp;[.$C51])" office:value-type="float" office:value="0" calcext:value-type="float">
            <text:p>0</text:p>
          </table:table-cell>
          <table:table-cell table:formula="of:=COUNTIF([.AU$15:.AU$22];&quot;=&quot; &amp;[.$C51])" office:value-type="float" office:value="0" calcext:value-type="float">
            <text:p>0</text:p>
          </table:table-cell>
          <table:table-cell table:formula="of:=COUNTIF([.AV$15:.AV$22];&quot;=&quot; &amp;[.$C51])" office:value-type="float" office:value="0" calcext:value-type="float">
            <text:p>0</text:p>
          </table:table-cell>
          <table:table-cell table:formula="of:=COUNTIF([.AW$15:.AW$22];&quot;=&quot; &amp;[.$C51])" office:value-type="float" office:value="0" calcext:value-type="float">
            <text:p>0</text:p>
          </table:table-cell>
          <table:table-cell table:formula="of:=COUNTIF([.AX$15:.AX$22];&quot;=&quot; &amp;[.$C51])" office:value-type="float" office:value="0" calcext:value-type="float">
            <text:p>0</text:p>
          </table:table-cell>
          <table:table-cell table:formula="of:=COUNTIF([.AY$15:.AY$22];&quot;=&quot; &amp;[.$C51])" office:value-type="float" office:value="0" calcext:value-type="float">
            <text:p>0</text:p>
          </table:table-cell>
          <table:table-cell table:style-name="ce66"/>
          <table:table-cell table:formula="of:=[.BA50]+0.002" office:value-type="float" office:value="0.0720000000000001" calcext:value-type="float">
            <text:p>0.0720000000000001</text:p>
          </table:table-cell>
          <table:table-cell table:formula="of:=[.BA51]*[.$D$6]" office:value-type="float" office:value="3.61911473693544" calcext:value-type="float">
            <text:p>3.619</text:p>
          </table:table-cell>
          <table:table-cell table:formula="of:=[.D$25]*[.$Z$5]*MAGNET([.D$24]+[.BB51])+[.E$25]*[.$Z$5]*MAGNET([.E$24]+[.BB51])+[.F$25]*[.$Z$5]*MAGNET([.F$24]+[.BB51])+[.G$25]*[.$Z$5]*MAGNET([.G$24]+[.BB51])+[.H$25]*[.$Z$5]*MAGNET([.H$24]+[.BB51])+[.I$25]*[.$Z$5]*MAGNET([.I$24]+[.BB51])+[.J$25]*[.$Z$5]*MAGNET([.J$24]+[.BB51])+[.K$25]*[.$Z$5]*MAGNET([.K$24]+[.BB51])+[.L$25]*[.$Z$5]*MAGNET([.L$24]+[.BB51])+[.M$25]*[.$Z$5]*MAGNET([.M$24]+[.BB51])+[.N$25]*[.$Z$5]*MAGNET([.N$24]+[.BB51])+[.O$25]*[.$Z$5]*MAGNET([.O$24]+[.BB51])+[.P$25]*[.$Z$5]*MAGNET([.P$24]+[.BB51])+[.Q$25]*[.$Z$5]*MAGNET([.Q$24]+[.BB51])+[.R$25]*[.$Z$5]*MAGNET([.R$24]+[.BB51])+[.S$25]*[.$Z$5]*MAGNET([.S$24]+[.BB51])+[.T$25]*[.$Z$5]*MAGNET([.T$24]+[.BB51])+[.U$25]*[.$Z$5]*MAGNET([.U$24]+[.BB51])+[.V$25]*[.$Z$5]*MAGNET([.V$24]+[.BB51])+[.W$25]*[.$Z$5]*MAGNET([.W$24]+[.BB51])+[.X$25]*[.$Z$5]*MAGNET([.X$24]+[.BB51])+[.Y$25]*[.$Z$5]*MAGNET([.Y$24]+[.BB51])+[.Z$25]*[.$Z$5]*MAGNET([.Z$24]+[.BB51])+[.AA$25]*[.$Z$5]*MAGNET([.AA$24]+[.BB51])+[.AB$25]*[.$Z$5]*MAGNET([.AB$24]+[.BB51])+[.AC$25]*[.$Z$5]*MAGNET([.AC$24]+[.BB51])+[.AD$25]*[.$Z$5]*MAGNET([.AD$24]+[.BB51])+[.AE$25]*[.$Z$5]*MAGNET([.AE$24]+[.BB51])+[.AF$25]*[.$Z$5]*MAGNET([.AF$24]+[.BB51])+[.AG$25]*[.$Z$5]*MAGNET([.AG$24]+[.BB51])+[.AH$25]*[.$Z$5]*MAGNET([.AH$24]+[.BB51]) +[.AI$25]*[.$Z$5]*MAGNET([.AI$24]+[.BB51]) +[.AJ$25]*[.$Z$5]*MAGNET([.AJ$24]+[.BB51]) +[.AK$25]*[.$Z$5]*MAGNET([.AK$24]+[.BB51]) +[.AL$25]*[.$Z$5]*MAGNET([.AL$24]+[.BB51]) +[.AM$25]*[.$Z$5]*MAGNET([.AM$24]+[.BB51]) +[.AN$25]*[.$Z$5]*MAGNET([.AN$24]+[.BB51]) +[.AO$25]*[.$Z$5]*MAGNET([.AO$24]+[.BB51])+RAND()*[.$BC$13]+[.AP$25]*[.$Z$5]*MAGNET([.AP$24]+[.BB51])&#10;+[.AQ$25]*[.$Z$5]*MAGNET([.AQ$24]+[.BB51])&#10;+[.AR$25]*[.$Z$5]*MAGNET([.AR$24]+[.BB51])&#10;+[.AS$25]*[.$Z$5]*MAGNET([.AS$24]+[.BB51])&#10;+[.AT$25]*[.$Z$5]*MAGNET([.AT$24]+[.BB51])&#10;+[.AU$25]*[.$Z$5]*MAGNET([.AU$24]+[.BB51])&#10;+[.AV$25]*[.$Z$5]*MAGNET([.AV$24]+[.BB51])&#10;+[.AW$25]*[.$Z$5]*MAGNET([.AW$24]+[.BB51])&#10;+[.AX$25]*[.$Z$5]*MAGNET([.AX$24]+[.BB51])&#10;+[.AY$25]*[.$Z$5]*MAGNET([.AY$24]+[.BB51])" office:value-type="float" office:value="-6.11059861832954" calcext:value-type="float">
            <text:p>-6.11</text:p>
          </table:table-cell>
          <table:table-cell table:style-name="ce70" table:formula="of:=[.E$26]*[.$Z$5]*MAGNET([.E$24]+[.$BB51])+[.F$26]*[.$Z$5]*MAGNET([.F$24]+[.$BB51])+[.G$26]*[.$Z$5]*MAGNET([.G$24]+[.$BB51])+[.H$26]*[.$Z$5]*MAGNET([.H$24]+[.$BB51])+[.I$26]*[.$Z$5]*MAGNET([.I$24]+[.$BB51])+[.J$26]*[.$Z$5]*MAGNET([.J$24]+[.$BB51])+[.K$26]*[.$Z$5]*MAGNET([.K$24]+[.$BB51])+[.L$26]*[.$Z$5]*MAGNET([.L$24]+[.$BB51])+[.M$26]*[.$Z$5]*MAGNET([.M$24]+[.$BB51])+[.N$26]*[.$Z$5]*MAGNET([.N$24]+[.$BB51])+[.O$26]*[.$Z$5]*MAGNET([.O$24]+[.$BB51])+[.P$26]*[.$Z$5]*MAGNET([.P$24]+[.$BB51])+[.Q$26]*[.$Z$5]*MAGNET([.Q$24]+[.$BB51])+[.R$26]*[.$Z$5]*MAGNET([.R$24]+[.$BB51])+[.S$26]*[.$Z$5]*MAGNET([.S$24]+[.$BB51])+[.T$26]*[.$Z$5]*MAGNET([.T$24]+[.$BB51])+[.U$26]*[.$Z$5]*MAGNET([.U$24]+[.$BB51])+[.V$26]*[.$Z$5]*MAGNET([.V$24]+[.$BB51])+[.W$26]*[.$Z$5]*MAGNET([.W$24]+[.$BB51])+[.X$26]*[.$Z$5]*MAGNET([.X$24]+[.$BB51])+[.Y$26]*[.$Z$5]*MAGNET([.Y$24]+[.$BB51])+[.Z$26]*[.$Z$5]*MAGNET([.Z$24]+[.$BB51])+[.AA$26]*[.$Z$5]*MAGNET([.AA$24]+[.$BB51])+[.AB$26]*[.$Z$5]*MAGNET([.AB$24]+[.$BB51])+[.AC$26]*[.$Z$5]*MAGNET([.AC$24]+[.$BB51])+[.AD$26]*[.$Z$5]*MAGNET([.AD$24]+[.$BB51])+[.AE$26]*[.$Z$5]*MAGNET([.AE$24]+[.$BB51])+[.AF$26]*[.$Z$5]*MAGNET([.AF$24]+[.$BB51])+[.AG$26]*[.$Z$5]*MAGNET([.AG$24]+[.$BB51])+[.D$26]*[.$Z$5]*MAGNET([.D$24]+[.$BB51])+[.AH$26]*[.$Z$5]*MAGNET([.AH$24]+[.BB51]) +[.AI$26]*[.$Z$5]*MAGNET([.AI$24]+[.BB51]) +[.AJ$26]*[.$Z$5]*MAGNET([.AJ$24]+[.BB51]) +[.AK$26]*[.$Z$5]*MAGNET([.AK$24]+[.BB51]) +[.AL$26]*[.$Z$5]*MAGNET([.AL$24]+[.BB51]) +[.AM$26]*[.$Z$5]*MAGNET([.AM$24]+[.BB51]) +[.AN$26]*[.$Z$5]*MAGNET([.AN$24]+[.BB51]) +[.AO$26]*[.$Z$5]*MAGNET([.AO$24]+[.BB51]) +[.AP$26]*[.$Z$5]*MAGNET([.AP$24]+[.$BB51])&#10;+[.AQ$26]*[.$Z$5]*MAGNET([.AQ$24]+[.$BB51])&#10;+[.AR$26]*[.$Z$5]*MAGNET([.AR$24]+[.$BB51])&#10;+[.AS$26]*[.$Z$5]*MAGNET([.AS$24]+[.$BB51])&#10;+[.AT$26]*[.$Z$5]*MAGNET([.AT$24]+[.$BB51])&#10;+[.AU$26]*[.$Z$5]*MAGNET([.AU$24]+[.$BB51])&#10;+[.AV$26]*[.$Z$5]*MAGNET([.AV$24]+[.$BB51])&#10;+[.AW$26]*[.$Z$5]*MAGNET([.AW$24]+[.$BB51])&#10;+[.AX$26]*[.$Z$5]*MAGNET([.AX$24]+[.$BB51])&#10;+[.AY$26]*[.$Z$5]*MAGNET([.AY$24]+[.$BB51]) +RAND()*[.$BD$13]" office:value-type="float" office:value="-70.0166603036871" calcext:value-type="float">
            <text:p>-70.02</text:p>
          </table:table-cell>
          <table:table-cell table:style-name="ce71" table:formula="of:=[.E$27]*[.$Z$5]*MAGNET([.E$24]+[.$BB51])+[.F$27]*[.$Z$5]*MAGNET([.F$24]+[.$BB51])+[.G$27]*[.$Z$5]*MAGNET([.G$24]+[.$BB51])+[.H$27]*[.$Z$5]*MAGNET([.H$24]+[.$BB51])+[.I$27]*[.$Z$5]*MAGNET([.I$24]+[.$BB51])+[.J$27]*[.$Z$5]*MAGNET([.J$24]+[.$BB51])+[.K$27]*[.$Z$5]*MAGNET([.K$24]+[.$BB51])+[.L$27]*[.$Z$5]*MAGNET([.L$24]+[.$BB51])+[.M$27]*[.$Z$5]*MAGNET([.M$24]+[.$BB51])+[.N$27]*[.$Z$5]*MAGNET([.N$24]+[.$BB51])+[.O$27]*[.$Z$5]*MAGNET([.O$24]+[.$BB51])+[.P$27]*[.$Z$5]*MAGNET([.P$24]+[.$BB51])+[.Q$27]*[.$Z$5]*MAGNET([.Q$24]+[.$BB51])+[.R$27]*[.$Z$5]*MAGNET([.R$24]+[.$BB51])+[.S$27]*[.$Z$5]*MAGNET([.S$24]+[.$BB51])+[.T$27]*[.$Z$5]*MAGNET([.T$24]+[.$BB51])+[.U$27]*[.$Z$5]*MAGNET([.U$24]+[.$BB51])+[.V$27]*[.$Z$5]*MAGNET([.V$24]+[.$BB51])+[.W$27]*[.$Z$5]*MAGNET([.W$24]+[.$BB51])+[.X$27]*[.$Z$5]*MAGNET([.X$24]+[.$BB51])+[.Y$27]*[.$Z$5]*MAGNET([.Y$24]+[.$BB51])+[.Z$27]*[.$Z$5]*MAGNET([.Z$24]+[.$BB51])+[.AA$27]*[.$Z$5]*MAGNET([.AA$24]+[.$BB51])+[.AB$27]*[.$Z$5]*MAGNET([.AB$24]+[.$BB51])+[.AC$27]*[.$Z$5]*MAGNET([.AC$24]+[.$BB51])+[.AD$27]*[.$Z$5]*MAGNET([.AD$24]+[.$BB51])+[.AE$27]*[.$Z$5]*MAGNET([.AE$24]+[.$BB51])+[.AF$27]*[.$Z$5]*MAGNET([.AF$24]+[.$BB51])+[.AG$27]*[.$Z$5]*MAGNET([.AG$24]+[.$BB51])+[.D$27]*[.$Z$5]*MAGNET([.D$24]+[.$BB51])+[.AH$27]*[.$Z$5]*MAGNET([.AH$24]+[.BB51]) +[.AI$27]*[.$Z$5]*MAGNET([.AI$24]+[.BB51]) +[.AJ$27]*[.$Z$5]*MAGNET([.AJ$24]+[.BB51]) +[.AK$27]*[.$Z$5]*MAGNET([.AK$24]+[.BB51]) +[.AL$27]*[.$Z$5]*MAGNET([.AL$24]+[.BB51]) +[.AM$27]*[.$Z$5]*MAGNET([.AM$24]+[.BB51]) +[.AN$27]*[.$Z$5]*MAGNET([.AN$24]+[.BB51]) +[.AO$27]*[.$Z$5]*MAGNET([.AO$24]+[.BB51]) +[.AP$27]*[.$Z$5]*MAGNET([.AP$24]+[.$BB51])&#10;+[.AQ$27]*[.$Z$5]*MAGNET([.AQ$24]+[.$BB51])&#10;+[.AR$27]*[.$Z$5]*MAGNET([.AR$24]+[.$BB51])&#10;+[.AS$27]*[.$Z$5]*MAGNET([.AS$24]+[.$BB51])&#10;+[.AT$27]*[.$Z$5]*MAGNET([.AT$24]+[.$BB51])&#10;+[.AU$27]*[.$Z$5]*MAGNET([.AU$24]+[.$BB51])&#10;+[.AV$27]*[.$Z$5]*MAGNET([.AV$24]+[.$BB51])&#10;+[.AW$27]*[.$Z$5]*MAGNET([.AW$24]+[.$BB51])&#10;+[.AX$27]*[.$Z$5]*MAGNET([.AX$24]+[.$BB51])&#10;+[.AY$27]*[.$Z$5]*MAGNET([.AY$24]+[.$BB51]) +RAND()*[.$BE$13]" office:value-type="float" office:value="105.735467302678" calcext:value-type="float">
            <text:p>105.735467302678</text:p>
          </table:table-cell>
          <table:table-cell table:style-name="ce71" table:formula="of:=[.E$28]*[.$Z$5]*MAGNET([.E$24]+[.$BB51])+[.F$28]*[.$Z$5]*MAGNET([.F$24]+[.$BB51])+[.G$28]*[.$Z$5]*MAGNET([.G$24]+[.$BB51])+[.H$28]*[.$Z$5]*MAGNET([.H$24]+[.$BB51])+[.I$28]*[.$Z$5]*MAGNET([.I$24]+[.$BB51])+[.J$28]*[.$Z$5]*MAGNET([.J$24]+[.$BB51])+[.K$28]*[.$Z$5]*MAGNET([.K$24]+[.$BB51])+[.L$28]*[.$Z$5]*MAGNET([.L$24]+[.$BB51])+[.M$28]*[.$Z$5]*MAGNET([.M$24]+[.$BB51])+[.N$28]*[.$Z$5]*MAGNET([.N$24]+[.$BB51])+[.O$28]*[.$Z$5]*MAGNET([.O$24]+[.$BB51])+[.P$28]*[.$Z$5]*MAGNET([.P$24]+[.$BB51])+[.Q$28]*[.$Z$5]*MAGNET([.Q$24]+[.$BB51])+[.R$28]*[.$Z$5]*MAGNET([.R$24]+[.$BB51])+[.S$28]*[.$Z$5]*MAGNET([.S$24]+[.$BB51])+[.T$28]*[.$Z$5]*MAGNET([.T$24]+[.$BB51])+[.U$28]*[.$Z$5]*MAGNET([.U$24]+[.$BB51])+[.V$28]*[.$Z$5]*MAGNET([.V$24]+[.$BB51])+[.W$28]*[.$Z$5]*MAGNET([.W$24]+[.$BB51])+[.X$28]*[.$Z$5]*MAGNET([.X$24]+[.$BB51])+[.Y$28]*[.$Z$5]*MAGNET([.Y$24]+[.$BB51])+[.Z$28]*[.$Z$5]*MAGNET([.Z$24]+[.$BB51])+[.AA$28]*[.$Z$5]*MAGNET([.AA$24]+[.$BB51])+[.AB$28]*[.$Z$5]*MAGNET([.AB$24]+[.$BB51])+[.AC$28]*[.$Z$5]*MAGNET([.AC$24]+[.$BB51])+[.AD$28]*[.$Z$5]*MAGNET([.AD$24]+[.$BB51])+[.AE$28]*[.$Z$5]*MAGNET([.AE$24]+[.$BB51])+[.AF$28]*[.$Z$5]*MAGNET([.AF$24]+[.$BB51])+[.AG$28]*[.$Z$5]*MAGNET([.AG$24]+[.$BB51])+[.D$28]*[.$Z$5]*MAGNET([.D$24]+[.$BB51])+[.AH$28]*[.$Z$5]*MAGNET([.AH$24]+[.BB51]) +[.AI$28]*[.$Z$5]*MAGNET([.AI$24]+[.BB51]) +[.AJ$28]*[.$Z$5]*MAGNET([.AJ$24]+[.BB51]) +[.AK$28]*[.$Z$5]*MAGNET([.AK$24]+[.BB51]) +[.AL$28]*[.$Z$5]*MAGNET([.AL$24]+[.BB51]) +[.AM$28]*[.$Z$5]*MAGNET([.AM$24]+[.BB51]) +[.AN$28]*[.$Z$5]*MAGNET([.AN$24]+[.BB51]) +[.AO$28]*[.$Z$5]*MAGNET([.AO$24]+[.BB51]) +[.AP$28]*[.$Z$5]*MAGNET([.AP$24]+[.$BB51])&#10;+[.AQ$28]*[.$Z$5]*MAGNET([.AQ$24]+[.$BB51])&#10;+[.AR$28]*[.$Z$5]*MAGNET([.AR$24]+[.$BB51])&#10;+[.AS$28]*[.$Z$5]*MAGNET([.AS$24]+[.$BB51])&#10;+[.AT$28]*[.$Z$5]*MAGNET([.AT$24]+[.$BB51])&#10;+[.AU$28]*[.$Z$5]*MAGNET([.AU$24]+[.$BB51])&#10;+[.AV$28]*[.$Z$5]*MAGNET([.AV$24]+[.$BB51])&#10;+[.AW$28]*[.$Z$5]*MAGNET([.AW$24]+[.$BB51])&#10;+[.AX$28]*[.$Z$5]*MAGNET([.AX$24]+[.$BB51])&#10;+[.AY$28]*[.$Z$5]*MAGNET([.AY$24]+[.$BB51]) +RAND()*[.$BF$13]" office:value-type="float" office:value="15.4719578053948" calcext:value-type="float">
            <text:p>15.4719578053948</text:p>
          </table:table-cell>
          <table:table-cell table:style-name="ce71" table:formula="of:=[.E$29]*[.$Z$5]*MAGNET([.E$24]+[.$BB51])+[.F$29]*[.$Z$5]*MAGNET([.F$24]+[.$BB51])+[.G$29]*[.$Z$5]*MAGNET([.G$24]+[.$BB51])+[.H$29]*[.$Z$5]*MAGNET([.H$24]+[.$BB51])+[.I$29]*[.$Z$5]*MAGNET([.I$24]+[.$BB51])+[.J$29]*[.$Z$5]*MAGNET([.J$24]+[.$BB51])+[.K$29]*[.$Z$5]*MAGNET([.K$24]+[.$BB51])+[.L$29]*[.$Z$5]*MAGNET([.L$24]+[.$BB51])+[.M$29]*[.$Z$5]*MAGNET([.M$24]+[.$BB51])+[.N$29]*[.$Z$5]*MAGNET([.N$24]+[.$BB51])+[.O$29]*[.$Z$5]*MAGNET([.O$24]+[.$BB51])+[.P$29]*[.$Z$5]*MAGNET([.P$24]+[.$BB51])+[.Q$29]*[.$Z$5]*MAGNET([.Q$24]+[.$BB51])+[.R$29]*[.$Z$5]*MAGNET([.R$24]+[.$BB51])+[.S$29]*[.$Z$5]*MAGNET([.S$24]+[.$BB51])+[.T$29]*[.$Z$5]*MAGNET([.T$24]+[.$BB51])+[.U$29]*[.$Z$5]*MAGNET([.U$24]+[.$BB51])+[.V$29]*[.$Z$5]*MAGNET([.V$24]+[.$BB51])+[.W$29]*[.$Z$5]*MAGNET([.W$24]+[.$BB51])+[.X$29]*[.$Z$5]*MAGNET([.X$24]+[.$BB51])+[.Y$29]*[.$Z$5]*MAGNET([.Y$24]+[.$BB51])+[.Z$29]*[.$Z$5]*MAGNET([.Z$24]+[.$BB51])+[.AA$29]*[.$Z$5]*MAGNET([.AA$24]+[.$BB51])+[.AB$29]*[.$Z$5]*MAGNET([.AB$24]+[.$BB51])+[.AC$29]*[.$Z$5]*MAGNET([.AC$24]+[.$BB51])+[.AD$29]*[.$Z$5]*MAGNET([.AD$24]+[.$BB51])+[.AE$29]*[.$Z$5]*MAGNET([.AE$24]+[.$BB51])+[.AF$29]*[.$Z$5]*MAGNET([.AF$24]+[.$BB51])+[.AG$29]*[.$Z$5]*MAGNET([.AG$24]+[.$BB51])+[.D$29]*[.$Z$5]*MAGNET([.D$24]+[.$BB51])+[.AH$29]*[.$Z$5]*MAGNET([.AH$24]+[.BB51]) +[.AI$29]*[.$Z$5]*MAGNET([.AI$24]+[.BB51]) +[.AJ$29]*[.$Z$5]*MAGNET([.AJ$24]+[.BB51]) +[.AK$29]*[.$Z$5]*MAGNET([.AK$24]+[.BB51]) +[.AL$29]*[.$Z$5]*MAGNET([.AL$24]+[.BB51]) +[.AM$29]*[.$Z$5]*MAGNET([.AM$24]+[.BB51]) +[.AN$29]*[.$Z$5]*MAGNET([.AN$24]+[.BB51]) +[.AO$29]*[.$Z$5]*MAGNET([.AO$24]+[.BB51]) +[.AP$29]*[.$Z$5]*MAGNET([.AP$24]+[.$BB51])&#10;+[.AQ$29]*[.$Z$5]*MAGNET([.AQ$24]+[.$BB51])&#10;+[.AR$29]*[.$Z$5]*MAGNET([.AR$24]+[.$BB51])&#10;+[.AS$29]*[.$Z$5]*MAGNET([.AS$24]+[.$BB51])&#10;+[.AT$29]*[.$Z$5]*MAGNET([.AT$24]+[.$BB51])&#10;+[.AU$29]*[.$Z$5]*MAGNET([.AU$24]+[.$BB51])&#10;+[.AV$29]*[.$Z$5]*MAGNET([.AV$24]+[.$BB51])&#10;+[.AW$29]*[.$Z$5]*MAGNET([.AW$24]+[.$BB51])&#10;+[.AX$29]*[.$Z$5]*MAGNET([.AX$24]+[.$BB51])&#10;+[.AY$29]*[.$Z$5]*MAGNET([.AY$24]+[.$BB51]) +RAND()*[.$BG$13]" office:value-type="float" office:value="-41.6500173127648" calcext:value-type="float">
            <text:p>-41.6500173127648</text:p>
          </table:table-cell>
          <table:table-cell table:style-name="ce71" table:formula="of:=[.E$30]*[.$Z$5]*MAGNET([.E$24]+[.$BB51])+[.F$30]*[.$Z$5]*MAGNET([.F$24]+[.$BB51])+[.G$30]*[.$Z$5]*MAGNET([.G$24]+[.$BB51])+[.H$30]*[.$Z$5]*MAGNET([.H$24]+[.$BB51])+[.I$30]*[.$Z$5]*MAGNET([.I$24]+[.$BB51])+[.J$30]*[.$Z$5]*MAGNET([.J$24]+[.$BB51])+[.K$30]*[.$Z$5]*MAGNET([.K$24]+[.$BB51])+[.L$30]*[.$Z$5]*MAGNET([.L$24]+[.$BB51])+[.M$30]*[.$Z$5]*MAGNET([.M$24]+[.$BB51])+[.N$30]*[.$Z$5]*MAGNET([.N$24]+[.$BB51])+[.O$30]*[.$Z$5]*MAGNET([.O$24]+[.$BB51])+[.P$30]*[.$Z$5]*MAGNET([.P$24]+[.$BB51])+[.Q$30]*[.$Z$5]*MAGNET([.Q$24]+[.$BB51])+[.R$30]*[.$Z$5]*MAGNET([.R$24]+[.$BB51])+[.S$30]*[.$Z$5]*MAGNET([.S$24]+[.$BB51])+[.T$30]*[.$Z$5]*MAGNET([.T$24]+[.$BB51])+[.U$30]*[.$Z$5]*MAGNET([.U$24]+[.$BB51])+[.V$30]*[.$Z$5]*MAGNET([.V$24]+[.$BB51])+[.W$30]*[.$Z$5]*MAGNET([.W$24]+[.$BB51])+[.X$30]*[.$Z$5]*MAGNET([.X$24]+[.$BB51])+[.Y$30]*[.$Z$5]*MAGNET([.Y$24]+[.$BB51])+[.Z$30]*[.$Z$5]*MAGNET([.Z$24]+[.$BB51])+[.AA$30]*[.$Z$5]*MAGNET([.AA$24]+[.$BB51])+[.AB$30]*[.$Z$5]*MAGNET([.AB$24]+[.$BB51])+[.AC$30]*[.$Z$5]*MAGNET([.AC$24]+[.$BB51])+[.AD$30]*[.$Z$5]*MAGNET([.AD$24]+[.$BB51])+[.AE$30]*[.$Z$5]*MAGNET([.AE$24]+[.$BB51])+[.AF$30]*[.$Z$5]*MAGNET([.AF$24]+[.$BB51])+[.AG$30]*[.$Z$5]*MAGNET([.AG$24]+[.$BB51])+[.D$30]*[.$Z$5]*MAGNET([.D$24]+[.$BB51])+[.AH$30]*[.$Z$5]*MAGNET([.AH$24]+[.BB51]) +[.AI$30]*[.$Z$5]*MAGNET([.AI$24]+[.BB51]) +[.AJ$30]*[.$Z$5]*MAGNET([.AJ$24]+[.BB51]) +[.AK$30]*[.$Z$5]*MAGNET([.AK$24]+[.BB51]) +[.AL$30]*[.$Z$5]*MAGNET([.AL$24]+[.BB51]) +[.AM$30]*[.$Z$5]*MAGNET([.AM$24]+[.BB51]) +[.AN$30]*[.$Z$5]*MAGNET([.AN$24]+[.BB51]) +[.AO$30]*[.$Z$5]*MAGNET([.AO$24]+[.BB51]) +[.AP$30]*[.$Z$5]*MAGNET([.AP$24]+[.$BB51])&#10;+[.AQ$30]*[.$Z$5]*MAGNET([.AQ$24]+[.$BB51])&#10;+[.AR$30]*[.$Z$5]*MAGNET([.AR$24]+[.$BB51])&#10;+[.AS$30]*[.$Z$5]*MAGNET([.AS$24]+[.$BB51])&#10;+[.AT$30]*[.$Z$5]*MAGNET([.AT$24]+[.$BB51])&#10;+[.AU$30]*[.$Z$5]*MAGNET([.AU$24]+[.$BB51])&#10;+[.AV$30]*[.$Z$5]*MAGNET([.AV$24]+[.$BB51])&#10;+[.AW$30]*[.$Z$5]*MAGNET([.AW$24]+[.$BB51])&#10;+[.AX$30]*[.$Z$5]*MAGNET([.AX$24]+[.$BB51])&#10;+[.AY$30]*[.$Z$5]*MAGNET([.AY$24]+[.$BB51]) +RAND()*[.$BH$13]" office:value-type="float" office:value="0" calcext:value-type="float">
            <text:p>0</text:p>
          </table:table-cell>
          <table:table-cell table:style-name="ce71" table:formula="of:=[.E$31]*[.$Z$5]*MAGNET([.E$24]+[.$BB51])+[.F$31]*[.$Z$5]*MAGNET([.F$24]+[.$BB51])+[.G$31]*[.$Z$5]*MAGNET([.G$24]+[.$BB51])+[.H$31]*[.$Z$5]*MAGNET([.H$24]+[.$BB51])+[.I$31]*[.$Z$5]*MAGNET([.I$24]+[.$BB51])+[.J$31]*[.$Z$5]*MAGNET([.J$24]+[.$BB51])+[.K$31]*[.$Z$5]*MAGNET([.K$24]+[.$BB51])+[.L$31]*[.$Z$5]*MAGNET([.L$24]+[.$BB51])+[.M$31]*[.$Z$5]*MAGNET([.M$24]+[.$BB51])+[.N$31]*[.$Z$5]*MAGNET([.N$24]+[.$BB51])+[.O$31]*[.$Z$5]*MAGNET([.O$24]+[.$BB51])+[.P$31]*[.$Z$5]*MAGNET([.P$24]+[.$BB51])+[.Q$31]*[.$Z$5]*MAGNET([.Q$24]+[.$BB51])+[.R$31]*[.$Z$5]*MAGNET([.R$24]+[.$BB51])+[.S$31]*[.$Z$5]*MAGNET([.S$24]+[.$BB51])+[.T$31]*[.$Z$5]*MAGNET([.T$24]+[.$BB51])+[.U$31]*[.$Z$5]*MAGNET([.U$24]+[.$BB51])+[.V$31]*[.$Z$5]*MAGNET([.V$24]+[.$BB51])+[.W$31]*[.$Z$5]*MAGNET([.W$24]+[.$BB51])+[.X$31]*[.$Z$5]*MAGNET([.X$24]+[.$BB51])+[.Y$31]*[.$Z$5]*MAGNET([.Y$24]+[.$BB51])+[.Z$31]*[.$Z$5]*MAGNET([.Z$24]+[.$BB51])+[.AA$31]*[.$Z$5]*MAGNET([.AA$24]+[.$BB51])+[.AB$31]*[.$Z$5]*MAGNET([.AB$24]+[.$BB51])+[.AC$31]*[.$Z$5]*MAGNET([.AC$24]+[.$BB51])+[.AD$31]*[.$Z$5]*MAGNET([.AD$24]+[.$BB51])+[.AE$31]*[.$Z$5]*MAGNET([.AE$24]+[.$BB51])+[.AF$31]*[.$Z$5]*MAGNET([.AF$24]+[.$BB51])+[.AG$31]*[.$Z$5]*MAGNET([.AG$24]+[.$BB51])+[.D$31]*[.$Z$5]*MAGNET([.D$24]+[.$BB51])+[.AH$31]*[.$Z$5]*MAGNET([.AH$24]+[.BB51]) +[.AI$31]*[.$Z$5]*MAGNET([.AI$24]+[.BB51]) +[.AJ$31]*[.$Z$5]*MAGNET([.AJ$24]+[.BB51]) +[.AK$31]*[.$Z$5]*MAGNET([.AK$24]+[.BB51]) +[.AL$31]*[.$Z$5]*MAGNET([.AL$24]+[.BB51]) +[.AM$31]*[.$Z$5]*MAGNET([.AM$24]+[.BB51]) +[.AN$31]*[.$Z$5]*MAGNET([.AN$24]+[.BB51]) +[.AO$31]*[.$Z$5]*MAGNET([.AO$24]+[.BB51]) +[.AP$31]*[.$Z$5]*MAGNET([.AP$24]+[.$BB51])&#10;+[.AQ$31]*[.$Z$5]*MAGNET([.AQ$24]+[.$BB51])&#10;+[.AR$31]*[.$Z$5]*MAGNET([.AR$24]+[.$BB51])&#10;+[.AS$31]*[.$Z$5]*MAGNET([.AS$24]+[.$BB51])&#10;+[.AT$31]*[.$Z$5]*MAGNET([.AT$24]+[.$BB51])&#10;+[.AU$31]*[.$Z$5]*MAGNET([.AU$24]+[.$BB51])&#10;+[.AV$31]*[.$Z$5]*MAGNET([.AV$24]+[.$BB51])&#10;+[.AW$31]*[.$Z$5]*MAGNET([.AW$24]+[.$BB51])&#10;+[.AX$31]*[.$Z$5]*MAGNET([.AX$24]+[.$BB51])&#10;+[.AY$31]*[.$Z$5]*MAGNET([.AY$24]+[.$BB51]) +RAND()*[.$BI$13]" office:value-type="float" office:value="0" calcext:value-type="float">
            <text:p>0</text:p>
          </table:table-cell>
          <table:table-cell table:style-name="ce71" table:formula="of:=[.E$32]*[.$Z$5]*MAGNET([.E$24]+[.$BB51])+[.F$32]*[.$Z$5]*MAGNET([.F$24]+[.$BB51])+[.G$32]*[.$Z$5]*MAGNET([.G$24]+[.$BB51])+[.H$32]*[.$Z$5]*MAGNET([.H$24]+[.$BB51])+[.I$32]*[.$Z$5]*MAGNET([.I$24]+[.$BB51])+[.J$32]*[.$Z$5]*MAGNET([.J$24]+[.$BB51])+[.K$32]*[.$Z$5]*MAGNET([.K$24]+[.$BB51])+[.L$32]*[.$Z$5]*MAGNET([.L$24]+[.$BB51])+[.M$32]*[.$Z$5]*MAGNET([.M$24]+[.$BB51])+[.N$32]*[.$Z$5]*MAGNET([.N$24]+[.$BB51])+[.O$32]*[.$Z$5]*MAGNET([.O$24]+[.$BB51])+[.P$32]*[.$Z$5]*MAGNET([.P$24]+[.$BB51])+[.Q$32]*[.$Z$5]*MAGNET([.Q$24]+[.$BB51])+[.R$32]*[.$Z$5]*MAGNET([.R$24]+[.$BB51])+[.S$32]*[.$Z$5]*MAGNET([.S$24]+[.$BB51])+[.T$32]*[.$Z$5]*MAGNET([.T$24]+[.$BB51])+[.U$32]*[.$Z$5]*MAGNET([.U$24]+[.$BB51])+[.V$32]*[.$Z$5]*MAGNET([.V$24]+[.$BB51])+[.W$32]*[.$Z$5]*MAGNET([.W$24]+[.$BB51])+[.X$32]*[.$Z$5]*MAGNET([.X$24]+[.$BB51])+[.Y$32]*[.$Z$5]*MAGNET([.Y$24]+[.$BB51])+[.Z$32]*[.$Z$5]*MAGNET([.Z$24]+[.$BB51])+[.AA$32]*[.$Z$5]*MAGNET([.AA$24]+[.$BB51])+[.AB$32]*[.$Z$5]*MAGNET([.AB$24]+[.$BB51])+[.AC$32]*[.$Z$5]*MAGNET([.AC$24]+[.$BB51])+[.AD$32]*[.$Z$5]*MAGNET([.AD$24]+[.$BB51])+[.AE$32]*[.$Z$5]*MAGNET([.AE$24]+[.$BB51])+[.AF$32]*[.$Z$5]*MAGNET([.AF$24]+[.$BB51])+[.AG$32]*[.$Z$5]*MAGNET([.AG$24]+[.$BB51])+[.D$32]*[.$Z$5]*MAGNET([.D$24]+[.$BB51])+[.AH$32]*[.$Z$5]*MAGNET([.AH$24]+[.BB51]) +[.AI$32]*[.$Z$5]*MAGNET([.AI$24]+[.BB51]) +[.AJ$32]*[.$Z$5]*MAGNET([.AJ$24]+[.BB51]) +[.AK$32]*[.$Z$5]*MAGNET([.AK$24]+[.BB51]) +[.AL$32]*[.$Z$5]*MAGNET([.AL$24]+[.BB51]) +[.AM$32]*[.$Z$5]*MAGNET([.AM$24]+[.BB51]) +[.AN$32]*[.$Z$5]*MAGNET([.AN$24]+[.BB51]) +[.AO$32]*[.$Z$5]*MAGNET([.AO$24]+[.BB51]) +[.AP$32]*[.$Z$5]*MAGNET([.AP$24]+[.$BB51])&#10;+[.AQ$32]*[.$Z$5]*MAGNET([.AQ$24]+[.$BB51])&#10;+[.AR$32]*[.$Z$5]*MAGNET([.AR$24]+[.$BB51])&#10;+[.AS$32]*[.$Z$5]*MAGNET([.AS$24]+[.$BB51])&#10;+[.AT$32]*[.$Z$5]*MAGNET([.AT$24]+[.$BB51])&#10;+[.AU$32]*[.$Z$5]*MAGNET([.AU$24]+[.$BB51])&#10;+[.AV$32]*[.$Z$5]*MAGNET([.AV$24]+[.$BB51])&#10;+[.AW$32]*[.$Z$5]*MAGNET([.AW$24]+[.$BB51])&#10;+[.AX$32]*[.$Z$5]*MAGNET([.AX$24]+[.$BB51])&#10;+[.AY$32]*[.$Z$5]*MAGNET([.AY$24]+[.$BB5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 office:value-type="float" office:value="-8" calcext:value-type="float">
            <text:p>-8</text:p>
          </table:table-cell>
          <table:table-cell table:formula="of:=COUNTIF([.D$15:.D$22];&quot;=&quot; &amp;[.$C52])" office:value-type="float" office:value="0" calcext:value-type="float">
            <text:p>0</text:p>
          </table:table-cell>
          <table:table-cell table:formula="of:=COUNTIF([.E$15:.E$22];&quot;=&quot; &amp;[.$C52])" office:value-type="float" office:value="0" calcext:value-type="float">
            <text:p>0</text:p>
          </table:table-cell>
          <table:table-cell table:formula="of:=COUNTIF([.F$15:.F$22];&quot;=&quot; &amp;[.$C52])" office:value-type="float" office:value="0" calcext:value-type="float">
            <text:p>0</text:p>
          </table:table-cell>
          <table:table-cell table:formula="of:=COUNTIF([.G$15:.G$22];&quot;=&quot; &amp;[.$C52])" office:value-type="float" office:value="0" calcext:value-type="float">
            <text:p>0</text:p>
          </table:table-cell>
          <table:table-cell table:formula="of:=COUNTIF([.H$15:.H$22];&quot;=&quot; &amp;[.$C52])" office:value-type="float" office:value="0" calcext:value-type="float">
            <text:p>0</text:p>
          </table:table-cell>
          <table:table-cell table:formula="of:=COUNTIF([.I$15:.I$22];&quot;=&quot; &amp;[.$C52])" office:value-type="float" office:value="0" calcext:value-type="float">
            <text:p>0</text:p>
          </table:table-cell>
          <table:table-cell table:formula="of:=COUNTIF([.J$15:.J$22];&quot;=&quot; &amp;[.$C52])" office:value-type="float" office:value="0" calcext:value-type="float">
            <text:p>0</text:p>
          </table:table-cell>
          <table:table-cell table:formula="of:=COUNTIF([.K$15:.K$22];&quot;=&quot; &amp;[.$C52])" office:value-type="float" office:value="0" calcext:value-type="float">
            <text:p>0</text:p>
          </table:table-cell>
          <table:table-cell table:formula="of:=COUNTIF([.L$15:.L$22];&quot;=&quot; &amp;[.$C52])" office:value-type="float" office:value="0" calcext:value-type="float">
            <text:p>0</text:p>
          </table:table-cell>
          <table:table-cell table:formula="of:=COUNTIF([.M$15:.M$22];&quot;=&quot; &amp;[.$C52])" office:value-type="float" office:value="0" calcext:value-type="float">
            <text:p>0</text:p>
          </table:table-cell>
          <table:table-cell table:formula="of:=COUNTIF([.N$15:.N$22];&quot;=&quot; &amp;[.$C52])" office:value-type="float" office:value="0" calcext:value-type="float">
            <text:p>0</text:p>
          </table:table-cell>
          <table:table-cell table:formula="of:=COUNTIF([.O$15:.O$22];&quot;=&quot; &amp;[.$C52])" office:value-type="float" office:value="0" calcext:value-type="float">
            <text:p>0</text:p>
          </table:table-cell>
          <table:table-cell table:formula="of:=COUNTIF([.P$15:.P$22];&quot;=&quot; &amp;[.$C52])" office:value-type="float" office:value="0" calcext:value-type="float">
            <text:p>0</text:p>
          </table:table-cell>
          <table:table-cell table:formula="of:=COUNTIF([.Q$15:.Q$22];&quot;=&quot; &amp;[.$C52])" office:value-type="float" office:value="0" calcext:value-type="float">
            <text:p>0</text:p>
          </table:table-cell>
          <table:table-cell table:formula="of:=COUNTIF([.R$15:.R$22];&quot;=&quot; &amp;[.$C52])" office:value-type="float" office:value="0" calcext:value-type="float">
            <text:p>0</text:p>
          </table:table-cell>
          <table:table-cell table:formula="of:=COUNTIF([.S$15:.S$22];&quot;=&quot; &amp;[.$C52])" office:value-type="float" office:value="0" calcext:value-type="float">
            <text:p>0</text:p>
          </table:table-cell>
          <table:table-cell table:formula="of:=COUNTIF([.T$15:.T$22];&quot;=&quot; &amp;[.$C52])" office:value-type="float" office:value="0" calcext:value-type="float">
            <text:p>0</text:p>
          </table:table-cell>
          <table:table-cell table:formula="of:=COUNTIF([.U$15:.U$22];&quot;=&quot; &amp;[.$C52])" office:value-type="float" office:value="0" calcext:value-type="float">
            <text:p>0</text:p>
          </table:table-cell>
          <table:table-cell table:formula="of:=COUNTIF([.V$15:.V$22];&quot;=&quot; &amp;[.$C52])" office:value-type="float" office:value="0" calcext:value-type="float">
            <text:p>0</text:p>
          </table:table-cell>
          <table:table-cell table:formula="of:=COUNTIF([.W$15:.W$22];&quot;=&quot; &amp;[.$C52])" office:value-type="float" office:value="0" calcext:value-type="float">
            <text:p>0</text:p>
          </table:table-cell>
          <table:table-cell table:formula="of:=COUNTIF([.X$15:.X$22];&quot;=&quot; &amp;[.$C52])" office:value-type="float" office:value="0" calcext:value-type="float">
            <text:p>0</text:p>
          </table:table-cell>
          <table:table-cell table:formula="of:=COUNTIF([.Y$15:.Y$22];&quot;=&quot; &amp;[.$C52])" office:value-type="float" office:value="0" calcext:value-type="float">
            <text:p>0</text:p>
          </table:table-cell>
          <table:table-cell table:formula="of:=COUNTIF([.Z$15:.Z$22];&quot;=&quot; &amp;[.$C52])" office:value-type="float" office:value="0" calcext:value-type="float">
            <text:p>0</text:p>
          </table:table-cell>
          <table:table-cell table:formula="of:=COUNTIF([.AA$15:.AA$22];&quot;=&quot; &amp;[.$C52])" office:value-type="float" office:value="0" calcext:value-type="float">
            <text:p>0</text:p>
          </table:table-cell>
          <table:table-cell table:formula="of:=COUNTIF([.AB$15:.AB$22];&quot;=&quot; &amp;[.$C52])" office:value-type="float" office:value="0" calcext:value-type="float">
            <text:p>0</text:p>
          </table:table-cell>
          <table:table-cell table:formula="of:=COUNTIF([.AC$15:.AC$22];&quot;=&quot; &amp;[.$C52])" office:value-type="float" office:value="0" calcext:value-type="float">
            <text:p>0</text:p>
          </table:table-cell>
          <table:table-cell table:formula="of:=COUNTIF([.AD$15:.AD$22];&quot;=&quot; &amp;[.$C52])" office:value-type="float" office:value="0" calcext:value-type="float">
            <text:p>0</text:p>
          </table:table-cell>
          <table:table-cell table:formula="of:=COUNTIF([.AE$15:.AE$22];&quot;=&quot; &amp;[.$C52])" office:value-type="float" office:value="0" calcext:value-type="float">
            <text:p>0</text:p>
          </table:table-cell>
          <table:table-cell table:formula="of:=COUNTIF([.AF$15:.AF$22];&quot;=&quot; &amp;[.$C52])" office:value-type="float" office:value="0" calcext:value-type="float">
            <text:p>0</text:p>
          </table:table-cell>
          <table:table-cell table:formula="of:=COUNTIF([.AG$15:.AG$22];&quot;=&quot; &amp;[.$C52])" office:value-type="float" office:value="0" calcext:value-type="float">
            <text:p>0</text:p>
          </table:table-cell>
          <table:table-cell table:formula="of:=COUNTIF([.AH$15:.AH$22];&quot;=&quot; &amp;[.$C52])" office:value-type="float" office:value="0" calcext:value-type="float">
            <text:p>0</text:p>
          </table:table-cell>
          <table:table-cell table:formula="of:=COUNTIF([.AI$15:.AI$22];&quot;=&quot; &amp;[.$C52])" office:value-type="float" office:value="0" calcext:value-type="float">
            <text:p>0</text:p>
          </table:table-cell>
          <table:table-cell table:formula="of:=COUNTIF([.AJ$15:.AJ$22];&quot;=&quot; &amp;[.$C52])" office:value-type="float" office:value="0" calcext:value-type="float">
            <text:p>0</text:p>
          </table:table-cell>
          <table:table-cell table:formula="of:=COUNTIF([.AK$15:.AK$22];&quot;=&quot; &amp;[.$C52])" office:value-type="float" office:value="0" calcext:value-type="float">
            <text:p>0</text:p>
          </table:table-cell>
          <table:table-cell table:formula="of:=COUNTIF([.AL$15:.AL$22];&quot;=&quot; &amp;[.$C52])" office:value-type="float" office:value="0" calcext:value-type="float">
            <text:p>0</text:p>
          </table:table-cell>
          <table:table-cell table:formula="of:=COUNTIF([.AM$15:.AM$22];&quot;=&quot; &amp;[.$C52])" office:value-type="float" office:value="0" calcext:value-type="float">
            <text:p>0</text:p>
          </table:table-cell>
          <table:table-cell table:formula="of:=COUNTIF([.AN$15:.AN$22];&quot;=&quot; &amp;[.$C52])" office:value-type="float" office:value="0" calcext:value-type="float">
            <text:p>0</text:p>
          </table:table-cell>
          <table:table-cell table:formula="of:=COUNTIF([.AO$15:.AO$22];&quot;=&quot; &amp;[.$C52])" office:value-type="float" office:value="0" calcext:value-type="float">
            <text:p>0</text:p>
          </table:table-cell>
          <table:table-cell table:formula="of:=COUNTIF([.AP$15:.AP$22];&quot;=&quot; &amp;[.$C52])" office:value-type="float" office:value="0" calcext:value-type="float">
            <text:p>0</text:p>
          </table:table-cell>
          <table:table-cell table:formula="of:=COUNTIF([.AQ$15:.AQ$22];&quot;=&quot; &amp;[.$C52])" office:value-type="float" office:value="0" calcext:value-type="float">
            <text:p>0</text:p>
          </table:table-cell>
          <table:table-cell table:formula="of:=COUNTIF([.AR$15:.AR$22];&quot;=&quot; &amp;[.$C52])" office:value-type="float" office:value="0" calcext:value-type="float">
            <text:p>0</text:p>
          </table:table-cell>
          <table:table-cell table:formula="of:=COUNTIF([.AS$15:.AS$22];&quot;=&quot; &amp;[.$C52])" office:value-type="float" office:value="0" calcext:value-type="float">
            <text:p>0</text:p>
          </table:table-cell>
          <table:table-cell table:formula="of:=COUNTIF([.AT$15:.AT$22];&quot;=&quot; &amp;[.$C52])" office:value-type="float" office:value="0" calcext:value-type="float">
            <text:p>0</text:p>
          </table:table-cell>
          <table:table-cell table:formula="of:=COUNTIF([.AU$15:.AU$22];&quot;=&quot; &amp;[.$C52])" office:value-type="float" office:value="0" calcext:value-type="float">
            <text:p>0</text:p>
          </table:table-cell>
          <table:table-cell table:formula="of:=COUNTIF([.AV$15:.AV$22];&quot;=&quot; &amp;[.$C52])" office:value-type="float" office:value="0" calcext:value-type="float">
            <text:p>0</text:p>
          </table:table-cell>
          <table:table-cell table:formula="of:=COUNTIF([.AW$15:.AW$22];&quot;=&quot; &amp;[.$C52])" office:value-type="float" office:value="0" calcext:value-type="float">
            <text:p>0</text:p>
          </table:table-cell>
          <table:table-cell table:formula="of:=COUNTIF([.AX$15:.AX$22];&quot;=&quot; &amp;[.$C52])" office:value-type="float" office:value="0" calcext:value-type="float">
            <text:p>0</text:p>
          </table:table-cell>
          <table:table-cell table:formula="of:=COUNTIF([.AY$15:.AY$22];&quot;=&quot; &amp;[.$C52])" office:value-type="float" office:value="0" calcext:value-type="float">
            <text:p>0</text:p>
          </table:table-cell>
          <table:table-cell/>
          <table:table-cell table:formula="of:=[.BA51]+0.002" office:value-type="float" office:value="0.0740000000000001" calcext:value-type="float">
            <text:p>0.0740000000000001</text:p>
          </table:table-cell>
          <table:table-cell table:formula="of:=[.BA52]*[.$D$6]" office:value-type="float" office:value="3.71964570185032" calcext:value-type="float">
            <text:p>3.720</text:p>
          </table:table-cell>
          <table:table-cell table:formula="of:=[.D$25]*[.$Z$5]*MAGNET([.D$24]+[.BB52])+[.E$25]*[.$Z$5]*MAGNET([.E$24]+[.BB52])+[.F$25]*[.$Z$5]*MAGNET([.F$24]+[.BB52])+[.G$25]*[.$Z$5]*MAGNET([.G$24]+[.BB52])+[.H$25]*[.$Z$5]*MAGNET([.H$24]+[.BB52])+[.I$25]*[.$Z$5]*MAGNET([.I$24]+[.BB52])+[.J$25]*[.$Z$5]*MAGNET([.J$24]+[.BB52])+[.K$25]*[.$Z$5]*MAGNET([.K$24]+[.BB52])+[.L$25]*[.$Z$5]*MAGNET([.L$24]+[.BB52])+[.M$25]*[.$Z$5]*MAGNET([.M$24]+[.BB52])+[.N$25]*[.$Z$5]*MAGNET([.N$24]+[.BB52])+[.O$25]*[.$Z$5]*MAGNET([.O$24]+[.BB52])+[.P$25]*[.$Z$5]*MAGNET([.P$24]+[.BB52])+[.Q$25]*[.$Z$5]*MAGNET([.Q$24]+[.BB52])+[.R$25]*[.$Z$5]*MAGNET([.R$24]+[.BB52])+[.S$25]*[.$Z$5]*MAGNET([.S$24]+[.BB52])+[.T$25]*[.$Z$5]*MAGNET([.T$24]+[.BB52])+[.U$25]*[.$Z$5]*MAGNET([.U$24]+[.BB52])+[.V$25]*[.$Z$5]*MAGNET([.V$24]+[.BB52])+[.W$25]*[.$Z$5]*MAGNET([.W$24]+[.BB52])+[.X$25]*[.$Z$5]*MAGNET([.X$24]+[.BB52])+[.Y$25]*[.$Z$5]*MAGNET([.Y$24]+[.BB52])+[.Z$25]*[.$Z$5]*MAGNET([.Z$24]+[.BB52])+[.AA$25]*[.$Z$5]*MAGNET([.AA$24]+[.BB52])+[.AB$25]*[.$Z$5]*MAGNET([.AB$24]+[.BB52])+[.AC$25]*[.$Z$5]*MAGNET([.AC$24]+[.BB52])+[.AD$25]*[.$Z$5]*MAGNET([.AD$24]+[.BB52])+[.AE$25]*[.$Z$5]*MAGNET([.AE$24]+[.BB52])+[.AF$25]*[.$Z$5]*MAGNET([.AF$24]+[.BB52])+[.AG$25]*[.$Z$5]*MAGNET([.AG$24]+[.BB52])+[.AH$25]*[.$Z$5]*MAGNET([.AH$24]+[.BB52]) +[.AI$25]*[.$Z$5]*MAGNET([.AI$24]+[.BB52]) +[.AJ$25]*[.$Z$5]*MAGNET([.AJ$24]+[.BB52]) +[.AK$25]*[.$Z$5]*MAGNET([.AK$24]+[.BB52]) +[.AL$25]*[.$Z$5]*MAGNET([.AL$24]+[.BB52]) +[.AM$25]*[.$Z$5]*MAGNET([.AM$24]+[.BB52]) +[.AN$25]*[.$Z$5]*MAGNET([.AN$24]+[.BB52]) +[.AO$25]*[.$Z$5]*MAGNET([.AO$24]+[.BB52])+RAND()*[.$BC$13]+[.AP$25]*[.$Z$5]*MAGNET([.AP$24]+[.BB52])&#10;+[.AQ$25]*[.$Z$5]*MAGNET([.AQ$24]+[.BB52])&#10;+[.AR$25]*[.$Z$5]*MAGNET([.AR$24]+[.BB52])&#10;+[.AS$25]*[.$Z$5]*MAGNET([.AS$24]+[.BB52])&#10;+[.AT$25]*[.$Z$5]*MAGNET([.AT$24]+[.BB52])&#10;+[.AU$25]*[.$Z$5]*MAGNET([.AU$24]+[.BB52])&#10;+[.AV$25]*[.$Z$5]*MAGNET([.AV$24]+[.BB52])&#10;+[.AW$25]*[.$Z$5]*MAGNET([.AW$24]+[.BB52])&#10;+[.AX$25]*[.$Z$5]*MAGNET([.AX$24]+[.BB52])&#10;+[.AY$25]*[.$Z$5]*MAGNET([.AY$24]+[.BB52])" office:value-type="float" office:value="-14.415203406265" calcext:value-type="float">
            <text:p>-14.42</text:p>
          </table:table-cell>
          <table:table-cell table:style-name="ce70" table:formula="of:=[.E$26]*[.$Z$5]*MAGNET([.E$24]+[.$BB52])+[.F$26]*[.$Z$5]*MAGNET([.F$24]+[.$BB52])+[.G$26]*[.$Z$5]*MAGNET([.G$24]+[.$BB52])+[.H$26]*[.$Z$5]*MAGNET([.H$24]+[.$BB52])+[.I$26]*[.$Z$5]*MAGNET([.I$24]+[.$BB52])+[.J$26]*[.$Z$5]*MAGNET([.J$24]+[.$BB52])+[.K$26]*[.$Z$5]*MAGNET([.K$24]+[.$BB52])+[.L$26]*[.$Z$5]*MAGNET([.L$24]+[.$BB52])+[.M$26]*[.$Z$5]*MAGNET([.M$24]+[.$BB52])+[.N$26]*[.$Z$5]*MAGNET([.N$24]+[.$BB52])+[.O$26]*[.$Z$5]*MAGNET([.O$24]+[.$BB52])+[.P$26]*[.$Z$5]*MAGNET([.P$24]+[.$BB52])+[.Q$26]*[.$Z$5]*MAGNET([.Q$24]+[.$BB52])+[.R$26]*[.$Z$5]*MAGNET([.R$24]+[.$BB52])+[.S$26]*[.$Z$5]*MAGNET([.S$24]+[.$BB52])+[.T$26]*[.$Z$5]*MAGNET([.T$24]+[.$BB52])+[.U$26]*[.$Z$5]*MAGNET([.U$24]+[.$BB52])+[.V$26]*[.$Z$5]*MAGNET([.V$24]+[.$BB52])+[.W$26]*[.$Z$5]*MAGNET([.W$24]+[.$BB52])+[.X$26]*[.$Z$5]*MAGNET([.X$24]+[.$BB52])+[.Y$26]*[.$Z$5]*MAGNET([.Y$24]+[.$BB52])+[.Z$26]*[.$Z$5]*MAGNET([.Z$24]+[.$BB52])+[.AA$26]*[.$Z$5]*MAGNET([.AA$24]+[.$BB52])+[.AB$26]*[.$Z$5]*MAGNET([.AB$24]+[.$BB52])+[.AC$26]*[.$Z$5]*MAGNET([.AC$24]+[.$BB52])+[.AD$26]*[.$Z$5]*MAGNET([.AD$24]+[.$BB52])+[.AE$26]*[.$Z$5]*MAGNET([.AE$24]+[.$BB52])+[.AF$26]*[.$Z$5]*MAGNET([.AF$24]+[.$BB52])+[.AG$26]*[.$Z$5]*MAGNET([.AG$24]+[.$BB52])+[.D$26]*[.$Z$5]*MAGNET([.D$24]+[.$BB52])+[.AH$26]*[.$Z$5]*MAGNET([.AH$24]+[.BB52]) +[.AI$26]*[.$Z$5]*MAGNET([.AI$24]+[.BB52]) +[.AJ$26]*[.$Z$5]*MAGNET([.AJ$24]+[.BB52]) +[.AK$26]*[.$Z$5]*MAGNET([.AK$24]+[.BB52]) +[.AL$26]*[.$Z$5]*MAGNET([.AL$24]+[.BB52]) +[.AM$26]*[.$Z$5]*MAGNET([.AM$24]+[.BB52]) +[.AN$26]*[.$Z$5]*MAGNET([.AN$24]+[.BB52]) +[.AO$26]*[.$Z$5]*MAGNET([.AO$24]+[.BB52]) +[.AP$26]*[.$Z$5]*MAGNET([.AP$24]+[.$BB52])&#10;+[.AQ$26]*[.$Z$5]*MAGNET([.AQ$24]+[.$BB52])&#10;+[.AR$26]*[.$Z$5]*MAGNET([.AR$24]+[.$BB52])&#10;+[.AS$26]*[.$Z$5]*MAGNET([.AS$24]+[.$BB52])&#10;+[.AT$26]*[.$Z$5]*MAGNET([.AT$24]+[.$BB52])&#10;+[.AU$26]*[.$Z$5]*MAGNET([.AU$24]+[.$BB52])&#10;+[.AV$26]*[.$Z$5]*MAGNET([.AV$24]+[.$BB52])&#10;+[.AW$26]*[.$Z$5]*MAGNET([.AW$24]+[.$BB52])&#10;+[.AX$26]*[.$Z$5]*MAGNET([.AX$24]+[.$BB52])&#10;+[.AY$26]*[.$Z$5]*MAGNET([.AY$24]+[.$BB52]) +RAND()*[.$BD$13]" office:value-type="float" office:value="-65.8342468039199" calcext:value-type="float">
            <text:p>-65.83</text:p>
          </table:table-cell>
          <table:table-cell table:style-name="ce71" table:formula="of:=[.E$27]*[.$Z$5]*MAGNET([.E$24]+[.$BB52])+[.F$27]*[.$Z$5]*MAGNET([.F$24]+[.$BB52])+[.G$27]*[.$Z$5]*MAGNET([.G$24]+[.$BB52])+[.H$27]*[.$Z$5]*MAGNET([.H$24]+[.$BB52])+[.I$27]*[.$Z$5]*MAGNET([.I$24]+[.$BB52])+[.J$27]*[.$Z$5]*MAGNET([.J$24]+[.$BB52])+[.K$27]*[.$Z$5]*MAGNET([.K$24]+[.$BB52])+[.L$27]*[.$Z$5]*MAGNET([.L$24]+[.$BB52])+[.M$27]*[.$Z$5]*MAGNET([.M$24]+[.$BB52])+[.N$27]*[.$Z$5]*MAGNET([.N$24]+[.$BB52])+[.O$27]*[.$Z$5]*MAGNET([.O$24]+[.$BB52])+[.P$27]*[.$Z$5]*MAGNET([.P$24]+[.$BB52])+[.Q$27]*[.$Z$5]*MAGNET([.Q$24]+[.$BB52])+[.R$27]*[.$Z$5]*MAGNET([.R$24]+[.$BB52])+[.S$27]*[.$Z$5]*MAGNET([.S$24]+[.$BB52])+[.T$27]*[.$Z$5]*MAGNET([.T$24]+[.$BB52])+[.U$27]*[.$Z$5]*MAGNET([.U$24]+[.$BB52])+[.V$27]*[.$Z$5]*MAGNET([.V$24]+[.$BB52])+[.W$27]*[.$Z$5]*MAGNET([.W$24]+[.$BB52])+[.X$27]*[.$Z$5]*MAGNET([.X$24]+[.$BB52])+[.Y$27]*[.$Z$5]*MAGNET([.Y$24]+[.$BB52])+[.Z$27]*[.$Z$5]*MAGNET([.Z$24]+[.$BB52])+[.AA$27]*[.$Z$5]*MAGNET([.AA$24]+[.$BB52])+[.AB$27]*[.$Z$5]*MAGNET([.AB$24]+[.$BB52])+[.AC$27]*[.$Z$5]*MAGNET([.AC$24]+[.$BB52])+[.AD$27]*[.$Z$5]*MAGNET([.AD$24]+[.$BB52])+[.AE$27]*[.$Z$5]*MAGNET([.AE$24]+[.$BB52])+[.AF$27]*[.$Z$5]*MAGNET([.AF$24]+[.$BB52])+[.AG$27]*[.$Z$5]*MAGNET([.AG$24]+[.$BB52])+[.D$27]*[.$Z$5]*MAGNET([.D$24]+[.$BB52])+[.AH$27]*[.$Z$5]*MAGNET([.AH$24]+[.BB52]) +[.AI$27]*[.$Z$5]*MAGNET([.AI$24]+[.BB52]) +[.AJ$27]*[.$Z$5]*MAGNET([.AJ$24]+[.BB52]) +[.AK$27]*[.$Z$5]*MAGNET([.AK$24]+[.BB52]) +[.AL$27]*[.$Z$5]*MAGNET([.AL$24]+[.BB52]) +[.AM$27]*[.$Z$5]*MAGNET([.AM$24]+[.BB52]) +[.AN$27]*[.$Z$5]*MAGNET([.AN$24]+[.BB52]) +[.AO$27]*[.$Z$5]*MAGNET([.AO$24]+[.BB52]) +[.AP$27]*[.$Z$5]*MAGNET([.AP$24]+[.$BB52])&#10;+[.AQ$27]*[.$Z$5]*MAGNET([.AQ$24]+[.$BB52])&#10;+[.AR$27]*[.$Z$5]*MAGNET([.AR$24]+[.$BB52])&#10;+[.AS$27]*[.$Z$5]*MAGNET([.AS$24]+[.$BB52])&#10;+[.AT$27]*[.$Z$5]*MAGNET([.AT$24]+[.$BB52])&#10;+[.AU$27]*[.$Z$5]*MAGNET([.AU$24]+[.$BB52])&#10;+[.AV$27]*[.$Z$5]*MAGNET([.AV$24]+[.$BB52])&#10;+[.AW$27]*[.$Z$5]*MAGNET([.AW$24]+[.$BB52])&#10;+[.AX$27]*[.$Z$5]*MAGNET([.AX$24]+[.$BB52])&#10;+[.AY$27]*[.$Z$5]*MAGNET([.AY$24]+[.$BB52]) +RAND()*[.$BE$13]" office:value-type="float" office:value="116.754263316394" calcext:value-type="float">
            <text:p>116.754263316394</text:p>
          </table:table-cell>
          <table:table-cell table:style-name="ce71" table:formula="of:=[.E$28]*[.$Z$5]*MAGNET([.E$24]+[.$BB52])+[.F$28]*[.$Z$5]*MAGNET([.F$24]+[.$BB52])+[.G$28]*[.$Z$5]*MAGNET([.G$24]+[.$BB52])+[.H$28]*[.$Z$5]*MAGNET([.H$24]+[.$BB52])+[.I$28]*[.$Z$5]*MAGNET([.I$24]+[.$BB52])+[.J$28]*[.$Z$5]*MAGNET([.J$24]+[.$BB52])+[.K$28]*[.$Z$5]*MAGNET([.K$24]+[.$BB52])+[.L$28]*[.$Z$5]*MAGNET([.L$24]+[.$BB52])+[.M$28]*[.$Z$5]*MAGNET([.M$24]+[.$BB52])+[.N$28]*[.$Z$5]*MAGNET([.N$24]+[.$BB52])+[.O$28]*[.$Z$5]*MAGNET([.O$24]+[.$BB52])+[.P$28]*[.$Z$5]*MAGNET([.P$24]+[.$BB52])+[.Q$28]*[.$Z$5]*MAGNET([.Q$24]+[.$BB52])+[.R$28]*[.$Z$5]*MAGNET([.R$24]+[.$BB52])+[.S$28]*[.$Z$5]*MAGNET([.S$24]+[.$BB52])+[.T$28]*[.$Z$5]*MAGNET([.T$24]+[.$BB52])+[.U$28]*[.$Z$5]*MAGNET([.U$24]+[.$BB52])+[.V$28]*[.$Z$5]*MAGNET([.V$24]+[.$BB52])+[.W$28]*[.$Z$5]*MAGNET([.W$24]+[.$BB52])+[.X$28]*[.$Z$5]*MAGNET([.X$24]+[.$BB52])+[.Y$28]*[.$Z$5]*MAGNET([.Y$24]+[.$BB52])+[.Z$28]*[.$Z$5]*MAGNET([.Z$24]+[.$BB52])+[.AA$28]*[.$Z$5]*MAGNET([.AA$24]+[.$BB52])+[.AB$28]*[.$Z$5]*MAGNET([.AB$24]+[.$BB52])+[.AC$28]*[.$Z$5]*MAGNET([.AC$24]+[.$BB52])+[.AD$28]*[.$Z$5]*MAGNET([.AD$24]+[.$BB52])+[.AE$28]*[.$Z$5]*MAGNET([.AE$24]+[.$BB52])+[.AF$28]*[.$Z$5]*MAGNET([.AF$24]+[.$BB52])+[.AG$28]*[.$Z$5]*MAGNET([.AG$24]+[.$BB52])+[.D$28]*[.$Z$5]*MAGNET([.D$24]+[.$BB52])+[.AH$28]*[.$Z$5]*MAGNET([.AH$24]+[.BB52]) +[.AI$28]*[.$Z$5]*MAGNET([.AI$24]+[.BB52]) +[.AJ$28]*[.$Z$5]*MAGNET([.AJ$24]+[.BB52]) +[.AK$28]*[.$Z$5]*MAGNET([.AK$24]+[.BB52]) +[.AL$28]*[.$Z$5]*MAGNET([.AL$24]+[.BB52]) +[.AM$28]*[.$Z$5]*MAGNET([.AM$24]+[.BB52]) +[.AN$28]*[.$Z$5]*MAGNET([.AN$24]+[.BB52]) +[.AO$28]*[.$Z$5]*MAGNET([.AO$24]+[.BB52]) +[.AP$28]*[.$Z$5]*MAGNET([.AP$24]+[.$BB52])&#10;+[.AQ$28]*[.$Z$5]*MAGNET([.AQ$24]+[.$BB52])&#10;+[.AR$28]*[.$Z$5]*MAGNET([.AR$24]+[.$BB52])&#10;+[.AS$28]*[.$Z$5]*MAGNET([.AS$24]+[.$BB52])&#10;+[.AT$28]*[.$Z$5]*MAGNET([.AT$24]+[.$BB52])&#10;+[.AU$28]*[.$Z$5]*MAGNET([.AU$24]+[.$BB52])&#10;+[.AV$28]*[.$Z$5]*MAGNET([.AV$24]+[.$BB52])&#10;+[.AW$28]*[.$Z$5]*MAGNET([.AW$24]+[.$BB52])&#10;+[.AX$28]*[.$Z$5]*MAGNET([.AX$24]+[.$BB52])&#10;+[.AY$28]*[.$Z$5]*MAGNET([.AY$24]+[.$BB52]) +RAND()*[.$BF$13]" office:value-type="float" office:value="15.6620263510802" calcext:value-type="float">
            <text:p>15.6620263510802</text:p>
          </table:table-cell>
          <table:table-cell table:style-name="ce71" table:formula="of:=[.E$29]*[.$Z$5]*MAGNET([.E$24]+[.$BB52])+[.F$29]*[.$Z$5]*MAGNET([.F$24]+[.$BB52])+[.G$29]*[.$Z$5]*MAGNET([.G$24]+[.$BB52])+[.H$29]*[.$Z$5]*MAGNET([.H$24]+[.$BB52])+[.I$29]*[.$Z$5]*MAGNET([.I$24]+[.$BB52])+[.J$29]*[.$Z$5]*MAGNET([.J$24]+[.$BB52])+[.K$29]*[.$Z$5]*MAGNET([.K$24]+[.$BB52])+[.L$29]*[.$Z$5]*MAGNET([.L$24]+[.$BB52])+[.M$29]*[.$Z$5]*MAGNET([.M$24]+[.$BB52])+[.N$29]*[.$Z$5]*MAGNET([.N$24]+[.$BB52])+[.O$29]*[.$Z$5]*MAGNET([.O$24]+[.$BB52])+[.P$29]*[.$Z$5]*MAGNET([.P$24]+[.$BB52])+[.Q$29]*[.$Z$5]*MAGNET([.Q$24]+[.$BB52])+[.R$29]*[.$Z$5]*MAGNET([.R$24]+[.$BB52])+[.S$29]*[.$Z$5]*MAGNET([.S$24]+[.$BB52])+[.T$29]*[.$Z$5]*MAGNET([.T$24]+[.$BB52])+[.U$29]*[.$Z$5]*MAGNET([.U$24]+[.$BB52])+[.V$29]*[.$Z$5]*MAGNET([.V$24]+[.$BB52])+[.W$29]*[.$Z$5]*MAGNET([.W$24]+[.$BB52])+[.X$29]*[.$Z$5]*MAGNET([.X$24]+[.$BB52])+[.Y$29]*[.$Z$5]*MAGNET([.Y$24]+[.$BB52])+[.Z$29]*[.$Z$5]*MAGNET([.Z$24]+[.$BB52])+[.AA$29]*[.$Z$5]*MAGNET([.AA$24]+[.$BB52])+[.AB$29]*[.$Z$5]*MAGNET([.AB$24]+[.$BB52])+[.AC$29]*[.$Z$5]*MAGNET([.AC$24]+[.$BB52])+[.AD$29]*[.$Z$5]*MAGNET([.AD$24]+[.$BB52])+[.AE$29]*[.$Z$5]*MAGNET([.AE$24]+[.$BB52])+[.AF$29]*[.$Z$5]*MAGNET([.AF$24]+[.$BB52])+[.AG$29]*[.$Z$5]*MAGNET([.AG$24]+[.$BB52])+[.D$29]*[.$Z$5]*MAGNET([.D$24]+[.$BB52])+[.AH$29]*[.$Z$5]*MAGNET([.AH$24]+[.BB52]) +[.AI$29]*[.$Z$5]*MAGNET([.AI$24]+[.BB52]) +[.AJ$29]*[.$Z$5]*MAGNET([.AJ$24]+[.BB52]) +[.AK$29]*[.$Z$5]*MAGNET([.AK$24]+[.BB52]) +[.AL$29]*[.$Z$5]*MAGNET([.AL$24]+[.BB52]) +[.AM$29]*[.$Z$5]*MAGNET([.AM$24]+[.BB52]) +[.AN$29]*[.$Z$5]*MAGNET([.AN$24]+[.BB52]) +[.AO$29]*[.$Z$5]*MAGNET([.AO$24]+[.BB52]) +[.AP$29]*[.$Z$5]*MAGNET([.AP$24]+[.$BB52])&#10;+[.AQ$29]*[.$Z$5]*MAGNET([.AQ$24]+[.$BB52])&#10;+[.AR$29]*[.$Z$5]*MAGNET([.AR$24]+[.$BB52])&#10;+[.AS$29]*[.$Z$5]*MAGNET([.AS$24]+[.$BB52])&#10;+[.AT$29]*[.$Z$5]*MAGNET([.AT$24]+[.$BB52])&#10;+[.AU$29]*[.$Z$5]*MAGNET([.AU$24]+[.$BB52])&#10;+[.AV$29]*[.$Z$5]*MAGNET([.AV$24]+[.$BB52])&#10;+[.AW$29]*[.$Z$5]*MAGNET([.AW$24]+[.$BB52])&#10;+[.AX$29]*[.$Z$5]*MAGNET([.AX$24]+[.$BB52])&#10;+[.AY$29]*[.$Z$5]*MAGNET([.AY$24]+[.$BB52]) +RAND()*[.$BG$13]" office:value-type="float" office:value="-42.6492703303957" calcext:value-type="float">
            <text:p>-42.6492703303957</text:p>
          </table:table-cell>
          <table:table-cell table:style-name="ce71" table:formula="of:=[.E$30]*[.$Z$5]*MAGNET([.E$24]+[.$BB52])+[.F$30]*[.$Z$5]*MAGNET([.F$24]+[.$BB52])+[.G$30]*[.$Z$5]*MAGNET([.G$24]+[.$BB52])+[.H$30]*[.$Z$5]*MAGNET([.H$24]+[.$BB52])+[.I$30]*[.$Z$5]*MAGNET([.I$24]+[.$BB52])+[.J$30]*[.$Z$5]*MAGNET([.J$24]+[.$BB52])+[.K$30]*[.$Z$5]*MAGNET([.K$24]+[.$BB52])+[.L$30]*[.$Z$5]*MAGNET([.L$24]+[.$BB52])+[.M$30]*[.$Z$5]*MAGNET([.M$24]+[.$BB52])+[.N$30]*[.$Z$5]*MAGNET([.N$24]+[.$BB52])+[.O$30]*[.$Z$5]*MAGNET([.O$24]+[.$BB52])+[.P$30]*[.$Z$5]*MAGNET([.P$24]+[.$BB52])+[.Q$30]*[.$Z$5]*MAGNET([.Q$24]+[.$BB52])+[.R$30]*[.$Z$5]*MAGNET([.R$24]+[.$BB52])+[.S$30]*[.$Z$5]*MAGNET([.S$24]+[.$BB52])+[.T$30]*[.$Z$5]*MAGNET([.T$24]+[.$BB52])+[.U$30]*[.$Z$5]*MAGNET([.U$24]+[.$BB52])+[.V$30]*[.$Z$5]*MAGNET([.V$24]+[.$BB52])+[.W$30]*[.$Z$5]*MAGNET([.W$24]+[.$BB52])+[.X$30]*[.$Z$5]*MAGNET([.X$24]+[.$BB52])+[.Y$30]*[.$Z$5]*MAGNET([.Y$24]+[.$BB52])+[.Z$30]*[.$Z$5]*MAGNET([.Z$24]+[.$BB52])+[.AA$30]*[.$Z$5]*MAGNET([.AA$24]+[.$BB52])+[.AB$30]*[.$Z$5]*MAGNET([.AB$24]+[.$BB52])+[.AC$30]*[.$Z$5]*MAGNET([.AC$24]+[.$BB52])+[.AD$30]*[.$Z$5]*MAGNET([.AD$24]+[.$BB52])+[.AE$30]*[.$Z$5]*MAGNET([.AE$24]+[.$BB52])+[.AF$30]*[.$Z$5]*MAGNET([.AF$24]+[.$BB52])+[.AG$30]*[.$Z$5]*MAGNET([.AG$24]+[.$BB52])+[.D$30]*[.$Z$5]*MAGNET([.D$24]+[.$BB52])+[.AH$30]*[.$Z$5]*MAGNET([.AH$24]+[.BB52]) +[.AI$30]*[.$Z$5]*MAGNET([.AI$24]+[.BB52]) +[.AJ$30]*[.$Z$5]*MAGNET([.AJ$24]+[.BB52]) +[.AK$30]*[.$Z$5]*MAGNET([.AK$24]+[.BB52]) +[.AL$30]*[.$Z$5]*MAGNET([.AL$24]+[.BB52]) +[.AM$30]*[.$Z$5]*MAGNET([.AM$24]+[.BB52]) +[.AN$30]*[.$Z$5]*MAGNET([.AN$24]+[.BB52]) +[.AO$30]*[.$Z$5]*MAGNET([.AO$24]+[.BB52]) +[.AP$30]*[.$Z$5]*MAGNET([.AP$24]+[.$BB52])&#10;+[.AQ$30]*[.$Z$5]*MAGNET([.AQ$24]+[.$BB52])&#10;+[.AR$30]*[.$Z$5]*MAGNET([.AR$24]+[.$BB52])&#10;+[.AS$30]*[.$Z$5]*MAGNET([.AS$24]+[.$BB52])&#10;+[.AT$30]*[.$Z$5]*MAGNET([.AT$24]+[.$BB52])&#10;+[.AU$30]*[.$Z$5]*MAGNET([.AU$24]+[.$BB52])&#10;+[.AV$30]*[.$Z$5]*MAGNET([.AV$24]+[.$BB52])&#10;+[.AW$30]*[.$Z$5]*MAGNET([.AW$24]+[.$BB52])&#10;+[.AX$30]*[.$Z$5]*MAGNET([.AX$24]+[.$BB52])&#10;+[.AY$30]*[.$Z$5]*MAGNET([.AY$24]+[.$BB52]) +RAND()*[.$BH$13]" office:value-type="float" office:value="0" calcext:value-type="float">
            <text:p>0</text:p>
          </table:table-cell>
          <table:table-cell table:style-name="ce71" table:formula="of:=[.E$31]*[.$Z$5]*MAGNET([.E$24]+[.$BB52])+[.F$31]*[.$Z$5]*MAGNET([.F$24]+[.$BB52])+[.G$31]*[.$Z$5]*MAGNET([.G$24]+[.$BB52])+[.H$31]*[.$Z$5]*MAGNET([.H$24]+[.$BB52])+[.I$31]*[.$Z$5]*MAGNET([.I$24]+[.$BB52])+[.J$31]*[.$Z$5]*MAGNET([.J$24]+[.$BB52])+[.K$31]*[.$Z$5]*MAGNET([.K$24]+[.$BB52])+[.L$31]*[.$Z$5]*MAGNET([.L$24]+[.$BB52])+[.M$31]*[.$Z$5]*MAGNET([.M$24]+[.$BB52])+[.N$31]*[.$Z$5]*MAGNET([.N$24]+[.$BB52])+[.O$31]*[.$Z$5]*MAGNET([.O$24]+[.$BB52])+[.P$31]*[.$Z$5]*MAGNET([.P$24]+[.$BB52])+[.Q$31]*[.$Z$5]*MAGNET([.Q$24]+[.$BB52])+[.R$31]*[.$Z$5]*MAGNET([.R$24]+[.$BB52])+[.S$31]*[.$Z$5]*MAGNET([.S$24]+[.$BB52])+[.T$31]*[.$Z$5]*MAGNET([.T$24]+[.$BB52])+[.U$31]*[.$Z$5]*MAGNET([.U$24]+[.$BB52])+[.V$31]*[.$Z$5]*MAGNET([.V$24]+[.$BB52])+[.W$31]*[.$Z$5]*MAGNET([.W$24]+[.$BB52])+[.X$31]*[.$Z$5]*MAGNET([.X$24]+[.$BB52])+[.Y$31]*[.$Z$5]*MAGNET([.Y$24]+[.$BB52])+[.Z$31]*[.$Z$5]*MAGNET([.Z$24]+[.$BB52])+[.AA$31]*[.$Z$5]*MAGNET([.AA$24]+[.$BB52])+[.AB$31]*[.$Z$5]*MAGNET([.AB$24]+[.$BB52])+[.AC$31]*[.$Z$5]*MAGNET([.AC$24]+[.$BB52])+[.AD$31]*[.$Z$5]*MAGNET([.AD$24]+[.$BB52])+[.AE$31]*[.$Z$5]*MAGNET([.AE$24]+[.$BB52])+[.AF$31]*[.$Z$5]*MAGNET([.AF$24]+[.$BB52])+[.AG$31]*[.$Z$5]*MAGNET([.AG$24]+[.$BB52])+[.D$31]*[.$Z$5]*MAGNET([.D$24]+[.$BB52])+[.AH$31]*[.$Z$5]*MAGNET([.AH$24]+[.BB52]) +[.AI$31]*[.$Z$5]*MAGNET([.AI$24]+[.BB52]) +[.AJ$31]*[.$Z$5]*MAGNET([.AJ$24]+[.BB52]) +[.AK$31]*[.$Z$5]*MAGNET([.AK$24]+[.BB52]) +[.AL$31]*[.$Z$5]*MAGNET([.AL$24]+[.BB52]) +[.AM$31]*[.$Z$5]*MAGNET([.AM$24]+[.BB52]) +[.AN$31]*[.$Z$5]*MAGNET([.AN$24]+[.BB52]) +[.AO$31]*[.$Z$5]*MAGNET([.AO$24]+[.BB52]) +[.AP$31]*[.$Z$5]*MAGNET([.AP$24]+[.$BB52])&#10;+[.AQ$31]*[.$Z$5]*MAGNET([.AQ$24]+[.$BB52])&#10;+[.AR$31]*[.$Z$5]*MAGNET([.AR$24]+[.$BB52])&#10;+[.AS$31]*[.$Z$5]*MAGNET([.AS$24]+[.$BB52])&#10;+[.AT$31]*[.$Z$5]*MAGNET([.AT$24]+[.$BB52])&#10;+[.AU$31]*[.$Z$5]*MAGNET([.AU$24]+[.$BB52])&#10;+[.AV$31]*[.$Z$5]*MAGNET([.AV$24]+[.$BB52])&#10;+[.AW$31]*[.$Z$5]*MAGNET([.AW$24]+[.$BB52])&#10;+[.AX$31]*[.$Z$5]*MAGNET([.AX$24]+[.$BB52])&#10;+[.AY$31]*[.$Z$5]*MAGNET([.AY$24]+[.$BB52]) +RAND()*[.$BI$13]" office:value-type="float" office:value="0" calcext:value-type="float">
            <text:p>0</text:p>
          </table:table-cell>
          <table:table-cell table:style-name="ce71" table:formula="of:=[.E$32]*[.$Z$5]*MAGNET([.E$24]+[.$BB52])+[.F$32]*[.$Z$5]*MAGNET([.F$24]+[.$BB52])+[.G$32]*[.$Z$5]*MAGNET([.G$24]+[.$BB52])+[.H$32]*[.$Z$5]*MAGNET([.H$24]+[.$BB52])+[.I$32]*[.$Z$5]*MAGNET([.I$24]+[.$BB52])+[.J$32]*[.$Z$5]*MAGNET([.J$24]+[.$BB52])+[.K$32]*[.$Z$5]*MAGNET([.K$24]+[.$BB52])+[.L$32]*[.$Z$5]*MAGNET([.L$24]+[.$BB52])+[.M$32]*[.$Z$5]*MAGNET([.M$24]+[.$BB52])+[.N$32]*[.$Z$5]*MAGNET([.N$24]+[.$BB52])+[.O$32]*[.$Z$5]*MAGNET([.O$24]+[.$BB52])+[.P$32]*[.$Z$5]*MAGNET([.P$24]+[.$BB52])+[.Q$32]*[.$Z$5]*MAGNET([.Q$24]+[.$BB52])+[.R$32]*[.$Z$5]*MAGNET([.R$24]+[.$BB52])+[.S$32]*[.$Z$5]*MAGNET([.S$24]+[.$BB52])+[.T$32]*[.$Z$5]*MAGNET([.T$24]+[.$BB52])+[.U$32]*[.$Z$5]*MAGNET([.U$24]+[.$BB52])+[.V$32]*[.$Z$5]*MAGNET([.V$24]+[.$BB52])+[.W$32]*[.$Z$5]*MAGNET([.W$24]+[.$BB52])+[.X$32]*[.$Z$5]*MAGNET([.X$24]+[.$BB52])+[.Y$32]*[.$Z$5]*MAGNET([.Y$24]+[.$BB52])+[.Z$32]*[.$Z$5]*MAGNET([.Z$24]+[.$BB52])+[.AA$32]*[.$Z$5]*MAGNET([.AA$24]+[.$BB52])+[.AB$32]*[.$Z$5]*MAGNET([.AB$24]+[.$BB52])+[.AC$32]*[.$Z$5]*MAGNET([.AC$24]+[.$BB52])+[.AD$32]*[.$Z$5]*MAGNET([.AD$24]+[.$BB52])+[.AE$32]*[.$Z$5]*MAGNET([.AE$24]+[.$BB52])+[.AF$32]*[.$Z$5]*MAGNET([.AF$24]+[.$BB52])+[.AG$32]*[.$Z$5]*MAGNET([.AG$24]+[.$BB52])+[.D$32]*[.$Z$5]*MAGNET([.D$24]+[.$BB52])+[.AH$32]*[.$Z$5]*MAGNET([.AH$24]+[.BB52]) +[.AI$32]*[.$Z$5]*MAGNET([.AI$24]+[.BB52]) +[.AJ$32]*[.$Z$5]*MAGNET([.AJ$24]+[.BB52]) +[.AK$32]*[.$Z$5]*MAGNET([.AK$24]+[.BB52]) +[.AL$32]*[.$Z$5]*MAGNET([.AL$24]+[.BB52]) +[.AM$32]*[.$Z$5]*MAGNET([.AM$24]+[.BB52]) +[.AN$32]*[.$Z$5]*MAGNET([.AN$24]+[.BB52]) +[.AO$32]*[.$Z$5]*MAGNET([.AO$24]+[.BB52]) +[.AP$32]*[.$Z$5]*MAGNET([.AP$24]+[.$BB52])&#10;+[.AQ$32]*[.$Z$5]*MAGNET([.AQ$24]+[.$BB52])&#10;+[.AR$32]*[.$Z$5]*MAGNET([.AR$24]+[.$BB52])&#10;+[.AS$32]*[.$Z$5]*MAGNET([.AS$24]+[.$BB52])&#10;+[.AT$32]*[.$Z$5]*MAGNET([.AT$24]+[.$BB52])&#10;+[.AU$32]*[.$Z$5]*MAGNET([.AU$24]+[.$BB52])&#10;+[.AV$32]*[.$Z$5]*MAGNET([.AV$24]+[.$BB52])&#10;+[.AW$32]*[.$Z$5]*MAGNET([.AW$24]+[.$BB52])&#10;+[.AX$32]*[.$Z$5]*MAGNET([.AX$24]+[.$BB52])&#10;+[.AY$32]*[.$Z$5]*MAGNET([.AY$24]+[.$BB5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/>
          <table:table-cell table:number-columns-repeated="48"/>
          <table:table-cell table:style-name="ce66"/>
          <table:table-cell table:formula="of:=[.BA52]+0.002" office:value-type="float" office:value="0.0760000000000001" calcext:value-type="float">
            <text:p>0.0760000000000001</text:p>
          </table:table-cell>
          <table:table-cell table:formula="of:=[.BA53]*[.$D$6]" office:value-type="float" office:value="3.82017666676519" calcext:value-type="float">
            <text:p>3.820</text:p>
          </table:table-cell>
          <table:table-cell table:formula="of:=[.D$25]*[.$Z$5]*MAGNET([.D$24]+[.BB53])+[.E$25]*[.$Z$5]*MAGNET([.E$24]+[.BB53])+[.F$25]*[.$Z$5]*MAGNET([.F$24]+[.BB53])+[.G$25]*[.$Z$5]*MAGNET([.G$24]+[.BB53])+[.H$25]*[.$Z$5]*MAGNET([.H$24]+[.BB53])+[.I$25]*[.$Z$5]*MAGNET([.I$24]+[.BB53])+[.J$25]*[.$Z$5]*MAGNET([.J$24]+[.BB53])+[.K$25]*[.$Z$5]*MAGNET([.K$24]+[.BB53])+[.L$25]*[.$Z$5]*MAGNET([.L$24]+[.BB53])+[.M$25]*[.$Z$5]*MAGNET([.M$24]+[.BB53])+[.N$25]*[.$Z$5]*MAGNET([.N$24]+[.BB53])+[.O$25]*[.$Z$5]*MAGNET([.O$24]+[.BB53])+[.P$25]*[.$Z$5]*MAGNET([.P$24]+[.BB53])+[.Q$25]*[.$Z$5]*MAGNET([.Q$24]+[.BB53])+[.R$25]*[.$Z$5]*MAGNET([.R$24]+[.BB53])+[.S$25]*[.$Z$5]*MAGNET([.S$24]+[.BB53])+[.T$25]*[.$Z$5]*MAGNET([.T$24]+[.BB53])+[.U$25]*[.$Z$5]*MAGNET([.U$24]+[.BB53])+[.V$25]*[.$Z$5]*MAGNET([.V$24]+[.BB53])+[.W$25]*[.$Z$5]*MAGNET([.W$24]+[.BB53])+[.X$25]*[.$Z$5]*MAGNET([.X$24]+[.BB53])+[.Y$25]*[.$Z$5]*MAGNET([.Y$24]+[.BB53])+[.Z$25]*[.$Z$5]*MAGNET([.Z$24]+[.BB53])+[.AA$25]*[.$Z$5]*MAGNET([.AA$24]+[.BB53])+[.AB$25]*[.$Z$5]*MAGNET([.AB$24]+[.BB53])+[.AC$25]*[.$Z$5]*MAGNET([.AC$24]+[.BB53])+[.AD$25]*[.$Z$5]*MAGNET([.AD$24]+[.BB53])+[.AE$25]*[.$Z$5]*MAGNET([.AE$24]+[.BB53])+[.AF$25]*[.$Z$5]*MAGNET([.AF$24]+[.BB53])+[.AG$25]*[.$Z$5]*MAGNET([.AG$24]+[.BB53])+[.AH$25]*[.$Z$5]*MAGNET([.AH$24]+[.BB53]) +[.AI$25]*[.$Z$5]*MAGNET([.AI$24]+[.BB53]) +[.AJ$25]*[.$Z$5]*MAGNET([.AJ$24]+[.BB53]) +[.AK$25]*[.$Z$5]*MAGNET([.AK$24]+[.BB53]) +[.AL$25]*[.$Z$5]*MAGNET([.AL$24]+[.BB53]) +[.AM$25]*[.$Z$5]*MAGNET([.AM$24]+[.BB53]) +[.AN$25]*[.$Z$5]*MAGNET([.AN$24]+[.BB53]) +[.AO$25]*[.$Z$5]*MAGNET([.AO$24]+[.BB53])+RAND()*[.$BC$13]+[.AP$25]*[.$Z$5]*MAGNET([.AP$24]+[.BB53])&#10;+[.AQ$25]*[.$Z$5]*MAGNET([.AQ$24]+[.BB53])&#10;+[.AR$25]*[.$Z$5]*MAGNET([.AR$24]+[.BB53])&#10;+[.AS$25]*[.$Z$5]*MAGNET([.AS$24]+[.BB53])&#10;+[.AT$25]*[.$Z$5]*MAGNET([.AT$24]+[.BB53])&#10;+[.AU$25]*[.$Z$5]*MAGNET([.AU$24]+[.BB53])&#10;+[.AV$25]*[.$Z$5]*MAGNET([.AV$24]+[.BB53])&#10;+[.AW$25]*[.$Z$5]*MAGNET([.AW$24]+[.BB53])&#10;+[.AX$25]*[.$Z$5]*MAGNET([.AX$24]+[.BB53])&#10;+[.AY$25]*[.$Z$5]*MAGNET([.AY$24]+[.BB53])" office:value-type="float" office:value="-29.5231397739022" calcext:value-type="float">
            <text:p>-29.52</text:p>
          </table:table-cell>
          <table:table-cell table:style-name="ce70" table:formula="of:=[.E$26]*[.$Z$5]*MAGNET([.E$24]+[.$BB53])+[.F$26]*[.$Z$5]*MAGNET([.F$24]+[.$BB53])+[.G$26]*[.$Z$5]*MAGNET([.G$24]+[.$BB53])+[.H$26]*[.$Z$5]*MAGNET([.H$24]+[.$BB53])+[.I$26]*[.$Z$5]*MAGNET([.I$24]+[.$BB53])+[.J$26]*[.$Z$5]*MAGNET([.J$24]+[.$BB53])+[.K$26]*[.$Z$5]*MAGNET([.K$24]+[.$BB53])+[.L$26]*[.$Z$5]*MAGNET([.L$24]+[.$BB53])+[.M$26]*[.$Z$5]*MAGNET([.M$24]+[.$BB53])+[.N$26]*[.$Z$5]*MAGNET([.N$24]+[.$BB53])+[.O$26]*[.$Z$5]*MAGNET([.O$24]+[.$BB53])+[.P$26]*[.$Z$5]*MAGNET([.P$24]+[.$BB53])+[.Q$26]*[.$Z$5]*MAGNET([.Q$24]+[.$BB53])+[.R$26]*[.$Z$5]*MAGNET([.R$24]+[.$BB53])+[.S$26]*[.$Z$5]*MAGNET([.S$24]+[.$BB53])+[.T$26]*[.$Z$5]*MAGNET([.T$24]+[.$BB53])+[.U$26]*[.$Z$5]*MAGNET([.U$24]+[.$BB53])+[.V$26]*[.$Z$5]*MAGNET([.V$24]+[.$BB53])+[.W$26]*[.$Z$5]*MAGNET([.W$24]+[.$BB53])+[.X$26]*[.$Z$5]*MAGNET([.X$24]+[.$BB53])+[.Y$26]*[.$Z$5]*MAGNET([.Y$24]+[.$BB53])+[.Z$26]*[.$Z$5]*MAGNET([.Z$24]+[.$BB53])+[.AA$26]*[.$Z$5]*MAGNET([.AA$24]+[.$BB53])+[.AB$26]*[.$Z$5]*MAGNET([.AB$24]+[.$BB53])+[.AC$26]*[.$Z$5]*MAGNET([.AC$24]+[.$BB53])+[.AD$26]*[.$Z$5]*MAGNET([.AD$24]+[.$BB53])+[.AE$26]*[.$Z$5]*MAGNET([.AE$24]+[.$BB53])+[.AF$26]*[.$Z$5]*MAGNET([.AF$24]+[.$BB53])+[.AG$26]*[.$Z$5]*MAGNET([.AG$24]+[.$BB53])+[.D$26]*[.$Z$5]*MAGNET([.D$24]+[.$BB53])+[.AH$26]*[.$Z$5]*MAGNET([.AH$24]+[.BB53]) +[.AI$26]*[.$Z$5]*MAGNET([.AI$24]+[.BB53]) +[.AJ$26]*[.$Z$5]*MAGNET([.AJ$24]+[.BB53]) +[.AK$26]*[.$Z$5]*MAGNET([.AK$24]+[.BB53]) +[.AL$26]*[.$Z$5]*MAGNET([.AL$24]+[.BB53]) +[.AM$26]*[.$Z$5]*MAGNET([.AM$24]+[.BB53]) +[.AN$26]*[.$Z$5]*MAGNET([.AN$24]+[.BB53]) +[.AO$26]*[.$Z$5]*MAGNET([.AO$24]+[.BB53]) +[.AP$26]*[.$Z$5]*MAGNET([.AP$24]+[.$BB53])&#10;+[.AQ$26]*[.$Z$5]*MAGNET([.AQ$24]+[.$BB53])&#10;+[.AR$26]*[.$Z$5]*MAGNET([.AR$24]+[.$BB53])&#10;+[.AS$26]*[.$Z$5]*MAGNET([.AS$24]+[.$BB53])&#10;+[.AT$26]*[.$Z$5]*MAGNET([.AT$24]+[.$BB53])&#10;+[.AU$26]*[.$Z$5]*MAGNET([.AU$24]+[.$BB53])&#10;+[.AV$26]*[.$Z$5]*MAGNET([.AV$24]+[.$BB53])&#10;+[.AW$26]*[.$Z$5]*MAGNET([.AW$24]+[.$BB53])&#10;+[.AX$26]*[.$Z$5]*MAGNET([.AX$24]+[.$BB53])&#10;+[.AY$26]*[.$Z$5]*MAGNET([.AY$24]+[.$BB53]) +RAND()*[.$BD$13]" office:value-type="float" office:value="-56.7547632336259" calcext:value-type="float">
            <text:p>-56.75</text:p>
          </table:table-cell>
          <table:table-cell table:style-name="ce71" table:formula="of:=[.E$27]*[.$Z$5]*MAGNET([.E$24]+[.$BB53])+[.F$27]*[.$Z$5]*MAGNET([.F$24]+[.$BB53])+[.G$27]*[.$Z$5]*MAGNET([.G$24]+[.$BB53])+[.H$27]*[.$Z$5]*MAGNET([.H$24]+[.$BB53])+[.I$27]*[.$Z$5]*MAGNET([.I$24]+[.$BB53])+[.J$27]*[.$Z$5]*MAGNET([.J$24]+[.$BB53])+[.K$27]*[.$Z$5]*MAGNET([.K$24]+[.$BB53])+[.L$27]*[.$Z$5]*MAGNET([.L$24]+[.$BB53])+[.M$27]*[.$Z$5]*MAGNET([.M$24]+[.$BB53])+[.N$27]*[.$Z$5]*MAGNET([.N$24]+[.$BB53])+[.O$27]*[.$Z$5]*MAGNET([.O$24]+[.$BB53])+[.P$27]*[.$Z$5]*MAGNET([.P$24]+[.$BB53])+[.Q$27]*[.$Z$5]*MAGNET([.Q$24]+[.$BB53])+[.R$27]*[.$Z$5]*MAGNET([.R$24]+[.$BB53])+[.S$27]*[.$Z$5]*MAGNET([.S$24]+[.$BB53])+[.T$27]*[.$Z$5]*MAGNET([.T$24]+[.$BB53])+[.U$27]*[.$Z$5]*MAGNET([.U$24]+[.$BB53])+[.V$27]*[.$Z$5]*MAGNET([.V$24]+[.$BB53])+[.W$27]*[.$Z$5]*MAGNET([.W$24]+[.$BB53])+[.X$27]*[.$Z$5]*MAGNET([.X$24]+[.$BB53])+[.Y$27]*[.$Z$5]*MAGNET([.Y$24]+[.$BB53])+[.Z$27]*[.$Z$5]*MAGNET([.Z$24]+[.$BB53])+[.AA$27]*[.$Z$5]*MAGNET([.AA$24]+[.$BB53])+[.AB$27]*[.$Z$5]*MAGNET([.AB$24]+[.$BB53])+[.AC$27]*[.$Z$5]*MAGNET([.AC$24]+[.$BB53])+[.AD$27]*[.$Z$5]*MAGNET([.AD$24]+[.$BB53])+[.AE$27]*[.$Z$5]*MAGNET([.AE$24]+[.$BB53])+[.AF$27]*[.$Z$5]*MAGNET([.AF$24]+[.$BB53])+[.AG$27]*[.$Z$5]*MAGNET([.AG$24]+[.$BB53])+[.D$27]*[.$Z$5]*MAGNET([.D$24]+[.$BB53])+[.AH$27]*[.$Z$5]*MAGNET([.AH$24]+[.BB53]) +[.AI$27]*[.$Z$5]*MAGNET([.AI$24]+[.BB53]) +[.AJ$27]*[.$Z$5]*MAGNET([.AJ$24]+[.BB53]) +[.AK$27]*[.$Z$5]*MAGNET([.AK$24]+[.BB53]) +[.AL$27]*[.$Z$5]*MAGNET([.AL$24]+[.BB53]) +[.AM$27]*[.$Z$5]*MAGNET([.AM$24]+[.BB53]) +[.AN$27]*[.$Z$5]*MAGNET([.AN$24]+[.BB53]) +[.AO$27]*[.$Z$5]*MAGNET([.AO$24]+[.BB53]) +[.AP$27]*[.$Z$5]*MAGNET([.AP$24]+[.$BB53])&#10;+[.AQ$27]*[.$Z$5]*MAGNET([.AQ$24]+[.$BB53])&#10;+[.AR$27]*[.$Z$5]*MAGNET([.AR$24]+[.$BB53])&#10;+[.AS$27]*[.$Z$5]*MAGNET([.AS$24]+[.$BB53])&#10;+[.AT$27]*[.$Z$5]*MAGNET([.AT$24]+[.$BB53])&#10;+[.AU$27]*[.$Z$5]*MAGNET([.AU$24]+[.$BB53])&#10;+[.AV$27]*[.$Z$5]*MAGNET([.AV$24]+[.$BB53])&#10;+[.AW$27]*[.$Z$5]*MAGNET([.AW$24]+[.$BB53])&#10;+[.AX$27]*[.$Z$5]*MAGNET([.AX$24]+[.$BB53])&#10;+[.AY$27]*[.$Z$5]*MAGNET([.AY$24]+[.$BB53]) +RAND()*[.$BE$13]" office:value-type="float" office:value="122.7221983803" calcext:value-type="float">
            <text:p>122.7221983803</text:p>
          </table:table-cell>
          <table:table-cell table:style-name="ce71" table:formula="of:=[.E$28]*[.$Z$5]*MAGNET([.E$24]+[.$BB53])+[.F$28]*[.$Z$5]*MAGNET([.F$24]+[.$BB53])+[.G$28]*[.$Z$5]*MAGNET([.G$24]+[.$BB53])+[.H$28]*[.$Z$5]*MAGNET([.H$24]+[.$BB53])+[.I$28]*[.$Z$5]*MAGNET([.I$24]+[.$BB53])+[.J$28]*[.$Z$5]*MAGNET([.J$24]+[.$BB53])+[.K$28]*[.$Z$5]*MAGNET([.K$24]+[.$BB53])+[.L$28]*[.$Z$5]*MAGNET([.L$24]+[.$BB53])+[.M$28]*[.$Z$5]*MAGNET([.M$24]+[.$BB53])+[.N$28]*[.$Z$5]*MAGNET([.N$24]+[.$BB53])+[.O$28]*[.$Z$5]*MAGNET([.O$24]+[.$BB53])+[.P$28]*[.$Z$5]*MAGNET([.P$24]+[.$BB53])+[.Q$28]*[.$Z$5]*MAGNET([.Q$24]+[.$BB53])+[.R$28]*[.$Z$5]*MAGNET([.R$24]+[.$BB53])+[.S$28]*[.$Z$5]*MAGNET([.S$24]+[.$BB53])+[.T$28]*[.$Z$5]*MAGNET([.T$24]+[.$BB53])+[.U$28]*[.$Z$5]*MAGNET([.U$24]+[.$BB53])+[.V$28]*[.$Z$5]*MAGNET([.V$24]+[.$BB53])+[.W$28]*[.$Z$5]*MAGNET([.W$24]+[.$BB53])+[.X$28]*[.$Z$5]*MAGNET([.X$24]+[.$BB53])+[.Y$28]*[.$Z$5]*MAGNET([.Y$24]+[.$BB53])+[.Z$28]*[.$Z$5]*MAGNET([.Z$24]+[.$BB53])+[.AA$28]*[.$Z$5]*MAGNET([.AA$24]+[.$BB53])+[.AB$28]*[.$Z$5]*MAGNET([.AB$24]+[.$BB53])+[.AC$28]*[.$Z$5]*MAGNET([.AC$24]+[.$BB53])+[.AD$28]*[.$Z$5]*MAGNET([.AD$24]+[.$BB53])+[.AE$28]*[.$Z$5]*MAGNET([.AE$24]+[.$BB53])+[.AF$28]*[.$Z$5]*MAGNET([.AF$24]+[.$BB53])+[.AG$28]*[.$Z$5]*MAGNET([.AG$24]+[.$BB53])+[.D$28]*[.$Z$5]*MAGNET([.D$24]+[.$BB53])+[.AH$28]*[.$Z$5]*MAGNET([.AH$24]+[.BB53]) +[.AI$28]*[.$Z$5]*MAGNET([.AI$24]+[.BB53]) +[.AJ$28]*[.$Z$5]*MAGNET([.AJ$24]+[.BB53]) +[.AK$28]*[.$Z$5]*MAGNET([.AK$24]+[.BB53]) +[.AL$28]*[.$Z$5]*MAGNET([.AL$24]+[.BB53]) +[.AM$28]*[.$Z$5]*MAGNET([.AM$24]+[.BB53]) +[.AN$28]*[.$Z$5]*MAGNET([.AN$24]+[.BB53]) +[.AO$28]*[.$Z$5]*MAGNET([.AO$24]+[.BB53]) +[.AP$28]*[.$Z$5]*MAGNET([.AP$24]+[.$BB53])&#10;+[.AQ$28]*[.$Z$5]*MAGNET([.AQ$24]+[.$BB53])&#10;+[.AR$28]*[.$Z$5]*MAGNET([.AR$24]+[.$BB53])&#10;+[.AS$28]*[.$Z$5]*MAGNET([.AS$24]+[.$BB53])&#10;+[.AT$28]*[.$Z$5]*MAGNET([.AT$24]+[.$BB53])&#10;+[.AU$28]*[.$Z$5]*MAGNET([.AU$24]+[.$BB53])&#10;+[.AV$28]*[.$Z$5]*MAGNET([.AV$24]+[.$BB53])&#10;+[.AW$28]*[.$Z$5]*MAGNET([.AW$24]+[.$BB53])&#10;+[.AX$28]*[.$Z$5]*MAGNET([.AX$24]+[.$BB53])&#10;+[.AY$28]*[.$Z$5]*MAGNET([.AY$24]+[.$BB53]) +RAND()*[.$BF$13]" office:value-type="float" office:value="17.0677483759393" calcext:value-type="float">
            <text:p>17.0677483759393</text:p>
          </table:table-cell>
          <table:table-cell table:style-name="ce71" table:formula="of:=[.E$29]*[.$Z$5]*MAGNET([.E$24]+[.$BB53])+[.F$29]*[.$Z$5]*MAGNET([.F$24]+[.$BB53])+[.G$29]*[.$Z$5]*MAGNET([.G$24]+[.$BB53])+[.H$29]*[.$Z$5]*MAGNET([.H$24]+[.$BB53])+[.I$29]*[.$Z$5]*MAGNET([.I$24]+[.$BB53])+[.J$29]*[.$Z$5]*MAGNET([.J$24]+[.$BB53])+[.K$29]*[.$Z$5]*MAGNET([.K$24]+[.$BB53])+[.L$29]*[.$Z$5]*MAGNET([.L$24]+[.$BB53])+[.M$29]*[.$Z$5]*MAGNET([.M$24]+[.$BB53])+[.N$29]*[.$Z$5]*MAGNET([.N$24]+[.$BB53])+[.O$29]*[.$Z$5]*MAGNET([.O$24]+[.$BB53])+[.P$29]*[.$Z$5]*MAGNET([.P$24]+[.$BB53])+[.Q$29]*[.$Z$5]*MAGNET([.Q$24]+[.$BB53])+[.R$29]*[.$Z$5]*MAGNET([.R$24]+[.$BB53])+[.S$29]*[.$Z$5]*MAGNET([.S$24]+[.$BB53])+[.T$29]*[.$Z$5]*MAGNET([.T$24]+[.$BB53])+[.U$29]*[.$Z$5]*MAGNET([.U$24]+[.$BB53])+[.V$29]*[.$Z$5]*MAGNET([.V$24]+[.$BB53])+[.W$29]*[.$Z$5]*MAGNET([.W$24]+[.$BB53])+[.X$29]*[.$Z$5]*MAGNET([.X$24]+[.$BB53])+[.Y$29]*[.$Z$5]*MAGNET([.Y$24]+[.$BB53])+[.Z$29]*[.$Z$5]*MAGNET([.Z$24]+[.$BB53])+[.AA$29]*[.$Z$5]*MAGNET([.AA$24]+[.$BB53])+[.AB$29]*[.$Z$5]*MAGNET([.AB$24]+[.$BB53])+[.AC$29]*[.$Z$5]*MAGNET([.AC$24]+[.$BB53])+[.AD$29]*[.$Z$5]*MAGNET([.AD$24]+[.$BB53])+[.AE$29]*[.$Z$5]*MAGNET([.AE$24]+[.$BB53])+[.AF$29]*[.$Z$5]*MAGNET([.AF$24]+[.$BB53])+[.AG$29]*[.$Z$5]*MAGNET([.AG$24]+[.$BB53])+[.D$29]*[.$Z$5]*MAGNET([.D$24]+[.$BB53])+[.AH$29]*[.$Z$5]*MAGNET([.AH$24]+[.BB53]) +[.AI$29]*[.$Z$5]*MAGNET([.AI$24]+[.BB53]) +[.AJ$29]*[.$Z$5]*MAGNET([.AJ$24]+[.BB53]) +[.AK$29]*[.$Z$5]*MAGNET([.AK$24]+[.BB53]) +[.AL$29]*[.$Z$5]*MAGNET([.AL$24]+[.BB53]) +[.AM$29]*[.$Z$5]*MAGNET([.AM$24]+[.BB53]) +[.AN$29]*[.$Z$5]*MAGNET([.AN$24]+[.BB53]) +[.AO$29]*[.$Z$5]*MAGNET([.AO$24]+[.BB53]) +[.AP$29]*[.$Z$5]*MAGNET([.AP$24]+[.$BB53])&#10;+[.AQ$29]*[.$Z$5]*MAGNET([.AQ$24]+[.$BB53])&#10;+[.AR$29]*[.$Z$5]*MAGNET([.AR$24]+[.$BB53])&#10;+[.AS$29]*[.$Z$5]*MAGNET([.AS$24]+[.$BB53])&#10;+[.AT$29]*[.$Z$5]*MAGNET([.AT$24]+[.$BB53])&#10;+[.AU$29]*[.$Z$5]*MAGNET([.AU$24]+[.$BB53])&#10;+[.AV$29]*[.$Z$5]*MAGNET([.AV$24]+[.$BB53])&#10;+[.AW$29]*[.$Z$5]*MAGNET([.AW$24]+[.$BB53])&#10;+[.AX$29]*[.$Z$5]*MAGNET([.AX$24]+[.$BB53])&#10;+[.AY$29]*[.$Z$5]*MAGNET([.AY$24]+[.$BB53]) +RAND()*[.$BG$13]" office:value-type="float" office:value="-44.3265632282088" calcext:value-type="float">
            <text:p>-44.3265632282088</text:p>
          </table:table-cell>
          <table:table-cell table:style-name="ce71" table:formula="of:=[.E$30]*[.$Z$5]*MAGNET([.E$24]+[.$BB53])+[.F$30]*[.$Z$5]*MAGNET([.F$24]+[.$BB53])+[.G$30]*[.$Z$5]*MAGNET([.G$24]+[.$BB53])+[.H$30]*[.$Z$5]*MAGNET([.H$24]+[.$BB53])+[.I$30]*[.$Z$5]*MAGNET([.I$24]+[.$BB53])+[.J$30]*[.$Z$5]*MAGNET([.J$24]+[.$BB53])+[.K$30]*[.$Z$5]*MAGNET([.K$24]+[.$BB53])+[.L$30]*[.$Z$5]*MAGNET([.L$24]+[.$BB53])+[.M$30]*[.$Z$5]*MAGNET([.M$24]+[.$BB53])+[.N$30]*[.$Z$5]*MAGNET([.N$24]+[.$BB53])+[.O$30]*[.$Z$5]*MAGNET([.O$24]+[.$BB53])+[.P$30]*[.$Z$5]*MAGNET([.P$24]+[.$BB53])+[.Q$30]*[.$Z$5]*MAGNET([.Q$24]+[.$BB53])+[.R$30]*[.$Z$5]*MAGNET([.R$24]+[.$BB53])+[.S$30]*[.$Z$5]*MAGNET([.S$24]+[.$BB53])+[.T$30]*[.$Z$5]*MAGNET([.T$24]+[.$BB53])+[.U$30]*[.$Z$5]*MAGNET([.U$24]+[.$BB53])+[.V$30]*[.$Z$5]*MAGNET([.V$24]+[.$BB53])+[.W$30]*[.$Z$5]*MAGNET([.W$24]+[.$BB53])+[.X$30]*[.$Z$5]*MAGNET([.X$24]+[.$BB53])+[.Y$30]*[.$Z$5]*MAGNET([.Y$24]+[.$BB53])+[.Z$30]*[.$Z$5]*MAGNET([.Z$24]+[.$BB53])+[.AA$30]*[.$Z$5]*MAGNET([.AA$24]+[.$BB53])+[.AB$30]*[.$Z$5]*MAGNET([.AB$24]+[.$BB53])+[.AC$30]*[.$Z$5]*MAGNET([.AC$24]+[.$BB53])+[.AD$30]*[.$Z$5]*MAGNET([.AD$24]+[.$BB53])+[.AE$30]*[.$Z$5]*MAGNET([.AE$24]+[.$BB53])+[.AF$30]*[.$Z$5]*MAGNET([.AF$24]+[.$BB53])+[.AG$30]*[.$Z$5]*MAGNET([.AG$24]+[.$BB53])+[.D$30]*[.$Z$5]*MAGNET([.D$24]+[.$BB53])+[.AH$30]*[.$Z$5]*MAGNET([.AH$24]+[.BB53]) +[.AI$30]*[.$Z$5]*MAGNET([.AI$24]+[.BB53]) +[.AJ$30]*[.$Z$5]*MAGNET([.AJ$24]+[.BB53]) +[.AK$30]*[.$Z$5]*MAGNET([.AK$24]+[.BB53]) +[.AL$30]*[.$Z$5]*MAGNET([.AL$24]+[.BB53]) +[.AM$30]*[.$Z$5]*MAGNET([.AM$24]+[.BB53]) +[.AN$30]*[.$Z$5]*MAGNET([.AN$24]+[.BB53]) +[.AO$30]*[.$Z$5]*MAGNET([.AO$24]+[.BB53]) +[.AP$30]*[.$Z$5]*MAGNET([.AP$24]+[.$BB53])&#10;+[.AQ$30]*[.$Z$5]*MAGNET([.AQ$24]+[.$BB53])&#10;+[.AR$30]*[.$Z$5]*MAGNET([.AR$24]+[.$BB53])&#10;+[.AS$30]*[.$Z$5]*MAGNET([.AS$24]+[.$BB53])&#10;+[.AT$30]*[.$Z$5]*MAGNET([.AT$24]+[.$BB53])&#10;+[.AU$30]*[.$Z$5]*MAGNET([.AU$24]+[.$BB53])&#10;+[.AV$30]*[.$Z$5]*MAGNET([.AV$24]+[.$BB53])&#10;+[.AW$30]*[.$Z$5]*MAGNET([.AW$24]+[.$BB53])&#10;+[.AX$30]*[.$Z$5]*MAGNET([.AX$24]+[.$BB53])&#10;+[.AY$30]*[.$Z$5]*MAGNET([.AY$24]+[.$BB53]) +RAND()*[.$BH$13]" office:value-type="float" office:value="0" calcext:value-type="float">
            <text:p>0</text:p>
          </table:table-cell>
          <table:table-cell table:style-name="ce71" table:formula="of:=[.E$31]*[.$Z$5]*MAGNET([.E$24]+[.$BB53])+[.F$31]*[.$Z$5]*MAGNET([.F$24]+[.$BB53])+[.G$31]*[.$Z$5]*MAGNET([.G$24]+[.$BB53])+[.H$31]*[.$Z$5]*MAGNET([.H$24]+[.$BB53])+[.I$31]*[.$Z$5]*MAGNET([.I$24]+[.$BB53])+[.J$31]*[.$Z$5]*MAGNET([.J$24]+[.$BB53])+[.K$31]*[.$Z$5]*MAGNET([.K$24]+[.$BB53])+[.L$31]*[.$Z$5]*MAGNET([.L$24]+[.$BB53])+[.M$31]*[.$Z$5]*MAGNET([.M$24]+[.$BB53])+[.N$31]*[.$Z$5]*MAGNET([.N$24]+[.$BB53])+[.O$31]*[.$Z$5]*MAGNET([.O$24]+[.$BB53])+[.P$31]*[.$Z$5]*MAGNET([.P$24]+[.$BB53])+[.Q$31]*[.$Z$5]*MAGNET([.Q$24]+[.$BB53])+[.R$31]*[.$Z$5]*MAGNET([.R$24]+[.$BB53])+[.S$31]*[.$Z$5]*MAGNET([.S$24]+[.$BB53])+[.T$31]*[.$Z$5]*MAGNET([.T$24]+[.$BB53])+[.U$31]*[.$Z$5]*MAGNET([.U$24]+[.$BB53])+[.V$31]*[.$Z$5]*MAGNET([.V$24]+[.$BB53])+[.W$31]*[.$Z$5]*MAGNET([.W$24]+[.$BB53])+[.X$31]*[.$Z$5]*MAGNET([.X$24]+[.$BB53])+[.Y$31]*[.$Z$5]*MAGNET([.Y$24]+[.$BB53])+[.Z$31]*[.$Z$5]*MAGNET([.Z$24]+[.$BB53])+[.AA$31]*[.$Z$5]*MAGNET([.AA$24]+[.$BB53])+[.AB$31]*[.$Z$5]*MAGNET([.AB$24]+[.$BB53])+[.AC$31]*[.$Z$5]*MAGNET([.AC$24]+[.$BB53])+[.AD$31]*[.$Z$5]*MAGNET([.AD$24]+[.$BB53])+[.AE$31]*[.$Z$5]*MAGNET([.AE$24]+[.$BB53])+[.AF$31]*[.$Z$5]*MAGNET([.AF$24]+[.$BB53])+[.AG$31]*[.$Z$5]*MAGNET([.AG$24]+[.$BB53])+[.D$31]*[.$Z$5]*MAGNET([.D$24]+[.$BB53])+[.AH$31]*[.$Z$5]*MAGNET([.AH$24]+[.BB53]) +[.AI$31]*[.$Z$5]*MAGNET([.AI$24]+[.BB53]) +[.AJ$31]*[.$Z$5]*MAGNET([.AJ$24]+[.BB53]) +[.AK$31]*[.$Z$5]*MAGNET([.AK$24]+[.BB53]) +[.AL$31]*[.$Z$5]*MAGNET([.AL$24]+[.BB53]) +[.AM$31]*[.$Z$5]*MAGNET([.AM$24]+[.BB53]) +[.AN$31]*[.$Z$5]*MAGNET([.AN$24]+[.BB53]) +[.AO$31]*[.$Z$5]*MAGNET([.AO$24]+[.BB53]) +[.AP$31]*[.$Z$5]*MAGNET([.AP$24]+[.$BB53])&#10;+[.AQ$31]*[.$Z$5]*MAGNET([.AQ$24]+[.$BB53])&#10;+[.AR$31]*[.$Z$5]*MAGNET([.AR$24]+[.$BB53])&#10;+[.AS$31]*[.$Z$5]*MAGNET([.AS$24]+[.$BB53])&#10;+[.AT$31]*[.$Z$5]*MAGNET([.AT$24]+[.$BB53])&#10;+[.AU$31]*[.$Z$5]*MAGNET([.AU$24]+[.$BB53])&#10;+[.AV$31]*[.$Z$5]*MAGNET([.AV$24]+[.$BB53])&#10;+[.AW$31]*[.$Z$5]*MAGNET([.AW$24]+[.$BB53])&#10;+[.AX$31]*[.$Z$5]*MAGNET([.AX$24]+[.$BB53])&#10;+[.AY$31]*[.$Z$5]*MAGNET([.AY$24]+[.$BB53]) +RAND()*[.$BI$13]" office:value-type="float" office:value="0" calcext:value-type="float">
            <text:p>0</text:p>
          </table:table-cell>
          <table:table-cell table:style-name="ce71" table:formula="of:=[.E$32]*[.$Z$5]*MAGNET([.E$24]+[.$BB53])+[.F$32]*[.$Z$5]*MAGNET([.F$24]+[.$BB53])+[.G$32]*[.$Z$5]*MAGNET([.G$24]+[.$BB53])+[.H$32]*[.$Z$5]*MAGNET([.H$24]+[.$BB53])+[.I$32]*[.$Z$5]*MAGNET([.I$24]+[.$BB53])+[.J$32]*[.$Z$5]*MAGNET([.J$24]+[.$BB53])+[.K$32]*[.$Z$5]*MAGNET([.K$24]+[.$BB53])+[.L$32]*[.$Z$5]*MAGNET([.L$24]+[.$BB53])+[.M$32]*[.$Z$5]*MAGNET([.M$24]+[.$BB53])+[.N$32]*[.$Z$5]*MAGNET([.N$24]+[.$BB53])+[.O$32]*[.$Z$5]*MAGNET([.O$24]+[.$BB53])+[.P$32]*[.$Z$5]*MAGNET([.P$24]+[.$BB53])+[.Q$32]*[.$Z$5]*MAGNET([.Q$24]+[.$BB53])+[.R$32]*[.$Z$5]*MAGNET([.R$24]+[.$BB53])+[.S$32]*[.$Z$5]*MAGNET([.S$24]+[.$BB53])+[.T$32]*[.$Z$5]*MAGNET([.T$24]+[.$BB53])+[.U$32]*[.$Z$5]*MAGNET([.U$24]+[.$BB53])+[.V$32]*[.$Z$5]*MAGNET([.V$24]+[.$BB53])+[.W$32]*[.$Z$5]*MAGNET([.W$24]+[.$BB53])+[.X$32]*[.$Z$5]*MAGNET([.X$24]+[.$BB53])+[.Y$32]*[.$Z$5]*MAGNET([.Y$24]+[.$BB53])+[.Z$32]*[.$Z$5]*MAGNET([.Z$24]+[.$BB53])+[.AA$32]*[.$Z$5]*MAGNET([.AA$24]+[.$BB53])+[.AB$32]*[.$Z$5]*MAGNET([.AB$24]+[.$BB53])+[.AC$32]*[.$Z$5]*MAGNET([.AC$24]+[.$BB53])+[.AD$32]*[.$Z$5]*MAGNET([.AD$24]+[.$BB53])+[.AE$32]*[.$Z$5]*MAGNET([.AE$24]+[.$BB53])+[.AF$32]*[.$Z$5]*MAGNET([.AF$24]+[.$BB53])+[.AG$32]*[.$Z$5]*MAGNET([.AG$24]+[.$BB53])+[.D$32]*[.$Z$5]*MAGNET([.D$24]+[.$BB53])+[.AH$32]*[.$Z$5]*MAGNET([.AH$24]+[.BB53]) +[.AI$32]*[.$Z$5]*MAGNET([.AI$24]+[.BB53]) +[.AJ$32]*[.$Z$5]*MAGNET([.AJ$24]+[.BB53]) +[.AK$32]*[.$Z$5]*MAGNET([.AK$24]+[.BB53]) +[.AL$32]*[.$Z$5]*MAGNET([.AL$24]+[.BB53]) +[.AM$32]*[.$Z$5]*MAGNET([.AM$24]+[.BB53]) +[.AN$32]*[.$Z$5]*MAGNET([.AN$24]+[.BB53]) +[.AO$32]*[.$Z$5]*MAGNET([.AO$24]+[.BB53]) +[.AP$32]*[.$Z$5]*MAGNET([.AP$24]+[.$BB53])&#10;+[.AQ$32]*[.$Z$5]*MAGNET([.AQ$24]+[.$BB53])&#10;+[.AR$32]*[.$Z$5]*MAGNET([.AR$24]+[.$BB53])&#10;+[.AS$32]*[.$Z$5]*MAGNET([.AS$24]+[.$BB53])&#10;+[.AT$32]*[.$Z$5]*MAGNET([.AT$24]+[.$BB53])&#10;+[.AU$32]*[.$Z$5]*MAGNET([.AU$24]+[.$BB53])&#10;+[.AV$32]*[.$Z$5]*MAGNET([.AV$24]+[.$BB53])&#10;+[.AW$32]*[.$Z$5]*MAGNET([.AW$24]+[.$BB53])&#10;+[.AX$32]*[.$Z$5]*MAGNET([.AX$24]+[.$BB53])&#10;+[.AY$32]*[.$Z$5]*MAGNET([.AY$24]+[.$BB5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/>
          <table:table-cell table:number-columns-repeated="49"/>
          <table:table-cell table:formula="of:=[.BA53]+0.002" office:value-type="float" office:value="0.0780000000000001" calcext:value-type="float">
            <text:p>0.0780000000000001</text:p>
          </table:table-cell>
          <table:table-cell table:formula="of:=[.BA54]*[.$D$6]" office:value-type="float" office:value="3.92070763168006" calcext:value-type="float">
            <text:p>3.921</text:p>
          </table:table-cell>
          <table:table-cell table:formula="of:=[.D$25]*[.$Z$5]*MAGNET([.D$24]+[.BB54])+[.E$25]*[.$Z$5]*MAGNET([.E$24]+[.BB54])+[.F$25]*[.$Z$5]*MAGNET([.F$24]+[.BB54])+[.G$25]*[.$Z$5]*MAGNET([.G$24]+[.BB54])+[.H$25]*[.$Z$5]*MAGNET([.H$24]+[.BB54])+[.I$25]*[.$Z$5]*MAGNET([.I$24]+[.BB54])+[.J$25]*[.$Z$5]*MAGNET([.J$24]+[.BB54])+[.K$25]*[.$Z$5]*MAGNET([.K$24]+[.BB54])+[.L$25]*[.$Z$5]*MAGNET([.L$24]+[.BB54])+[.M$25]*[.$Z$5]*MAGNET([.M$24]+[.BB54])+[.N$25]*[.$Z$5]*MAGNET([.N$24]+[.BB54])+[.O$25]*[.$Z$5]*MAGNET([.O$24]+[.BB54])+[.P$25]*[.$Z$5]*MAGNET([.P$24]+[.BB54])+[.Q$25]*[.$Z$5]*MAGNET([.Q$24]+[.BB54])+[.R$25]*[.$Z$5]*MAGNET([.R$24]+[.BB54])+[.S$25]*[.$Z$5]*MAGNET([.S$24]+[.BB54])+[.T$25]*[.$Z$5]*MAGNET([.T$24]+[.BB54])+[.U$25]*[.$Z$5]*MAGNET([.U$24]+[.BB54])+[.V$25]*[.$Z$5]*MAGNET([.V$24]+[.BB54])+[.W$25]*[.$Z$5]*MAGNET([.W$24]+[.BB54])+[.X$25]*[.$Z$5]*MAGNET([.X$24]+[.BB54])+[.Y$25]*[.$Z$5]*MAGNET([.Y$24]+[.BB54])+[.Z$25]*[.$Z$5]*MAGNET([.Z$24]+[.BB54])+[.AA$25]*[.$Z$5]*MAGNET([.AA$24]+[.BB54])+[.AB$25]*[.$Z$5]*MAGNET([.AB$24]+[.BB54])+[.AC$25]*[.$Z$5]*MAGNET([.AC$24]+[.BB54])+[.AD$25]*[.$Z$5]*MAGNET([.AD$24]+[.BB54])+[.AE$25]*[.$Z$5]*MAGNET([.AE$24]+[.BB54])+[.AF$25]*[.$Z$5]*MAGNET([.AF$24]+[.BB54])+[.AG$25]*[.$Z$5]*MAGNET([.AG$24]+[.BB54])+[.AH$25]*[.$Z$5]*MAGNET([.AH$24]+[.BB54]) +[.AI$25]*[.$Z$5]*MAGNET([.AI$24]+[.BB54]) +[.AJ$25]*[.$Z$5]*MAGNET([.AJ$24]+[.BB54]) +[.AK$25]*[.$Z$5]*MAGNET([.AK$24]+[.BB54]) +[.AL$25]*[.$Z$5]*MAGNET([.AL$24]+[.BB54]) +[.AM$25]*[.$Z$5]*MAGNET([.AM$24]+[.BB54]) +[.AN$25]*[.$Z$5]*MAGNET([.AN$24]+[.BB54]) +[.AO$25]*[.$Z$5]*MAGNET([.AO$24]+[.BB54])+RAND()*[.$BC$13]+[.AP$25]*[.$Z$5]*MAGNET([.AP$24]+[.BB54])&#10;+[.AQ$25]*[.$Z$5]*MAGNET([.AQ$24]+[.BB54])&#10;+[.AR$25]*[.$Z$5]*MAGNET([.AR$24]+[.BB54])&#10;+[.AS$25]*[.$Z$5]*MAGNET([.AS$24]+[.BB54])&#10;+[.AT$25]*[.$Z$5]*MAGNET([.AT$24]+[.BB54])&#10;+[.AU$25]*[.$Z$5]*MAGNET([.AU$24]+[.BB54])&#10;+[.AV$25]*[.$Z$5]*MAGNET([.AV$24]+[.BB54])&#10;+[.AW$25]*[.$Z$5]*MAGNET([.AW$24]+[.BB54])&#10;+[.AX$25]*[.$Z$5]*MAGNET([.AX$24]+[.BB54])&#10;+[.AY$25]*[.$Z$5]*MAGNET([.AY$24]+[.BB54])" office:value-type="float" office:value="-36.3347891208782" calcext:value-type="float">
            <text:p>-36.33</text:p>
          </table:table-cell>
          <table:table-cell table:style-name="ce70" table:formula="of:=[.E$26]*[.$Z$5]*MAGNET([.E$24]+[.$BB54])+[.F$26]*[.$Z$5]*MAGNET([.F$24]+[.$BB54])+[.G$26]*[.$Z$5]*MAGNET([.G$24]+[.$BB54])+[.H$26]*[.$Z$5]*MAGNET([.H$24]+[.$BB54])+[.I$26]*[.$Z$5]*MAGNET([.I$24]+[.$BB54])+[.J$26]*[.$Z$5]*MAGNET([.J$24]+[.$BB54])+[.K$26]*[.$Z$5]*MAGNET([.K$24]+[.$BB54])+[.L$26]*[.$Z$5]*MAGNET([.L$24]+[.$BB54])+[.M$26]*[.$Z$5]*MAGNET([.M$24]+[.$BB54])+[.N$26]*[.$Z$5]*MAGNET([.N$24]+[.$BB54])+[.O$26]*[.$Z$5]*MAGNET([.O$24]+[.$BB54])+[.P$26]*[.$Z$5]*MAGNET([.P$24]+[.$BB54])+[.Q$26]*[.$Z$5]*MAGNET([.Q$24]+[.$BB54])+[.R$26]*[.$Z$5]*MAGNET([.R$24]+[.$BB54])+[.S$26]*[.$Z$5]*MAGNET([.S$24]+[.$BB54])+[.T$26]*[.$Z$5]*MAGNET([.T$24]+[.$BB54])+[.U$26]*[.$Z$5]*MAGNET([.U$24]+[.$BB54])+[.V$26]*[.$Z$5]*MAGNET([.V$24]+[.$BB54])+[.W$26]*[.$Z$5]*MAGNET([.W$24]+[.$BB54])+[.X$26]*[.$Z$5]*MAGNET([.X$24]+[.$BB54])+[.Y$26]*[.$Z$5]*MAGNET([.Y$24]+[.$BB54])+[.Z$26]*[.$Z$5]*MAGNET([.Z$24]+[.$BB54])+[.AA$26]*[.$Z$5]*MAGNET([.AA$24]+[.$BB54])+[.AB$26]*[.$Z$5]*MAGNET([.AB$24]+[.$BB54])+[.AC$26]*[.$Z$5]*MAGNET([.AC$24]+[.$BB54])+[.AD$26]*[.$Z$5]*MAGNET([.AD$24]+[.$BB54])+[.AE$26]*[.$Z$5]*MAGNET([.AE$24]+[.$BB54])+[.AF$26]*[.$Z$5]*MAGNET([.AF$24]+[.$BB54])+[.AG$26]*[.$Z$5]*MAGNET([.AG$24]+[.$BB54])+[.D$26]*[.$Z$5]*MAGNET([.D$24]+[.$BB54])+[.AH$26]*[.$Z$5]*MAGNET([.AH$24]+[.BB54]) +[.AI$26]*[.$Z$5]*MAGNET([.AI$24]+[.BB54]) +[.AJ$26]*[.$Z$5]*MAGNET([.AJ$24]+[.BB54]) +[.AK$26]*[.$Z$5]*MAGNET([.AK$24]+[.BB54]) +[.AL$26]*[.$Z$5]*MAGNET([.AL$24]+[.BB54]) +[.AM$26]*[.$Z$5]*MAGNET([.AM$24]+[.BB54]) +[.AN$26]*[.$Z$5]*MAGNET([.AN$24]+[.BB54]) +[.AO$26]*[.$Z$5]*MAGNET([.AO$24]+[.BB54]) +[.AP$26]*[.$Z$5]*MAGNET([.AP$24]+[.$BB54])&#10;+[.AQ$26]*[.$Z$5]*MAGNET([.AQ$24]+[.$BB54])&#10;+[.AR$26]*[.$Z$5]*MAGNET([.AR$24]+[.$BB54])&#10;+[.AS$26]*[.$Z$5]*MAGNET([.AS$24]+[.$BB54])&#10;+[.AT$26]*[.$Z$5]*MAGNET([.AT$24]+[.$BB54])&#10;+[.AU$26]*[.$Z$5]*MAGNET([.AU$24]+[.$BB54])&#10;+[.AV$26]*[.$Z$5]*MAGNET([.AV$24]+[.$BB54])&#10;+[.AW$26]*[.$Z$5]*MAGNET([.AW$24]+[.$BB54])&#10;+[.AX$26]*[.$Z$5]*MAGNET([.AX$24]+[.$BB54])&#10;+[.AY$26]*[.$Z$5]*MAGNET([.AY$24]+[.$BB54]) +RAND()*[.$BD$13]" office:value-type="float" office:value="-51.6700352202279" calcext:value-type="float">
            <text:p>-51.67</text:p>
          </table:table-cell>
          <table:table-cell table:style-name="ce71" table:formula="of:=[.E$27]*[.$Z$5]*MAGNET([.E$24]+[.$BB54])+[.F$27]*[.$Z$5]*MAGNET([.F$24]+[.$BB54])+[.G$27]*[.$Z$5]*MAGNET([.G$24]+[.$BB54])+[.H$27]*[.$Z$5]*MAGNET([.H$24]+[.$BB54])+[.I$27]*[.$Z$5]*MAGNET([.I$24]+[.$BB54])+[.J$27]*[.$Z$5]*MAGNET([.J$24]+[.$BB54])+[.K$27]*[.$Z$5]*MAGNET([.K$24]+[.$BB54])+[.L$27]*[.$Z$5]*MAGNET([.L$24]+[.$BB54])+[.M$27]*[.$Z$5]*MAGNET([.M$24]+[.$BB54])+[.N$27]*[.$Z$5]*MAGNET([.N$24]+[.$BB54])+[.O$27]*[.$Z$5]*MAGNET([.O$24]+[.$BB54])+[.P$27]*[.$Z$5]*MAGNET([.P$24]+[.$BB54])+[.Q$27]*[.$Z$5]*MAGNET([.Q$24]+[.$BB54])+[.R$27]*[.$Z$5]*MAGNET([.R$24]+[.$BB54])+[.S$27]*[.$Z$5]*MAGNET([.S$24]+[.$BB54])+[.T$27]*[.$Z$5]*MAGNET([.T$24]+[.$BB54])+[.U$27]*[.$Z$5]*MAGNET([.U$24]+[.$BB54])+[.V$27]*[.$Z$5]*MAGNET([.V$24]+[.$BB54])+[.W$27]*[.$Z$5]*MAGNET([.W$24]+[.$BB54])+[.X$27]*[.$Z$5]*MAGNET([.X$24]+[.$BB54])+[.Y$27]*[.$Z$5]*MAGNET([.Y$24]+[.$BB54])+[.Z$27]*[.$Z$5]*MAGNET([.Z$24]+[.$BB54])+[.AA$27]*[.$Z$5]*MAGNET([.AA$24]+[.$BB54])+[.AB$27]*[.$Z$5]*MAGNET([.AB$24]+[.$BB54])+[.AC$27]*[.$Z$5]*MAGNET([.AC$24]+[.$BB54])+[.AD$27]*[.$Z$5]*MAGNET([.AD$24]+[.$BB54])+[.AE$27]*[.$Z$5]*MAGNET([.AE$24]+[.$BB54])+[.AF$27]*[.$Z$5]*MAGNET([.AF$24]+[.$BB54])+[.AG$27]*[.$Z$5]*MAGNET([.AG$24]+[.$BB54])+[.D$27]*[.$Z$5]*MAGNET([.D$24]+[.$BB54])+[.AH$27]*[.$Z$5]*MAGNET([.AH$24]+[.BB54]) +[.AI$27]*[.$Z$5]*MAGNET([.AI$24]+[.BB54]) +[.AJ$27]*[.$Z$5]*MAGNET([.AJ$24]+[.BB54]) +[.AK$27]*[.$Z$5]*MAGNET([.AK$24]+[.BB54]) +[.AL$27]*[.$Z$5]*MAGNET([.AL$24]+[.BB54]) +[.AM$27]*[.$Z$5]*MAGNET([.AM$24]+[.BB54]) +[.AN$27]*[.$Z$5]*MAGNET([.AN$24]+[.BB54]) +[.AO$27]*[.$Z$5]*MAGNET([.AO$24]+[.BB54]) +[.AP$27]*[.$Z$5]*MAGNET([.AP$24]+[.$BB54])&#10;+[.AQ$27]*[.$Z$5]*MAGNET([.AQ$24]+[.$BB54])&#10;+[.AR$27]*[.$Z$5]*MAGNET([.AR$24]+[.$BB54])&#10;+[.AS$27]*[.$Z$5]*MAGNET([.AS$24]+[.$BB54])&#10;+[.AT$27]*[.$Z$5]*MAGNET([.AT$24]+[.$BB54])&#10;+[.AU$27]*[.$Z$5]*MAGNET([.AU$24]+[.$BB54])&#10;+[.AV$27]*[.$Z$5]*MAGNET([.AV$24]+[.$BB54])&#10;+[.AW$27]*[.$Z$5]*MAGNET([.AW$24]+[.$BB54])&#10;+[.AX$27]*[.$Z$5]*MAGNET([.AX$24]+[.$BB54])&#10;+[.AY$27]*[.$Z$5]*MAGNET([.AY$24]+[.$BB54]) +RAND()*[.$BE$13]" office:value-type="float" office:value="130.038554832708" calcext:value-type="float">
            <text:p>130.038554832708</text:p>
          </table:table-cell>
          <table:table-cell table:style-name="ce71" table:formula="of:=[.E$28]*[.$Z$5]*MAGNET([.E$24]+[.$BB54])+[.F$28]*[.$Z$5]*MAGNET([.F$24]+[.$BB54])+[.G$28]*[.$Z$5]*MAGNET([.G$24]+[.$BB54])+[.H$28]*[.$Z$5]*MAGNET([.H$24]+[.$BB54])+[.I$28]*[.$Z$5]*MAGNET([.I$24]+[.$BB54])+[.J$28]*[.$Z$5]*MAGNET([.J$24]+[.$BB54])+[.K$28]*[.$Z$5]*MAGNET([.K$24]+[.$BB54])+[.L$28]*[.$Z$5]*MAGNET([.L$24]+[.$BB54])+[.M$28]*[.$Z$5]*MAGNET([.M$24]+[.$BB54])+[.N$28]*[.$Z$5]*MAGNET([.N$24]+[.$BB54])+[.O$28]*[.$Z$5]*MAGNET([.O$24]+[.$BB54])+[.P$28]*[.$Z$5]*MAGNET([.P$24]+[.$BB54])+[.Q$28]*[.$Z$5]*MAGNET([.Q$24]+[.$BB54])+[.R$28]*[.$Z$5]*MAGNET([.R$24]+[.$BB54])+[.S$28]*[.$Z$5]*MAGNET([.S$24]+[.$BB54])+[.T$28]*[.$Z$5]*MAGNET([.T$24]+[.$BB54])+[.U$28]*[.$Z$5]*MAGNET([.U$24]+[.$BB54])+[.V$28]*[.$Z$5]*MAGNET([.V$24]+[.$BB54])+[.W$28]*[.$Z$5]*MAGNET([.W$24]+[.$BB54])+[.X$28]*[.$Z$5]*MAGNET([.X$24]+[.$BB54])+[.Y$28]*[.$Z$5]*MAGNET([.Y$24]+[.$BB54])+[.Z$28]*[.$Z$5]*MAGNET([.Z$24]+[.$BB54])+[.AA$28]*[.$Z$5]*MAGNET([.AA$24]+[.$BB54])+[.AB$28]*[.$Z$5]*MAGNET([.AB$24]+[.$BB54])+[.AC$28]*[.$Z$5]*MAGNET([.AC$24]+[.$BB54])+[.AD$28]*[.$Z$5]*MAGNET([.AD$24]+[.$BB54])+[.AE$28]*[.$Z$5]*MAGNET([.AE$24]+[.$BB54])+[.AF$28]*[.$Z$5]*MAGNET([.AF$24]+[.$BB54])+[.AG$28]*[.$Z$5]*MAGNET([.AG$24]+[.$BB54])+[.D$28]*[.$Z$5]*MAGNET([.D$24]+[.$BB54])+[.AH$28]*[.$Z$5]*MAGNET([.AH$24]+[.BB54]) +[.AI$28]*[.$Z$5]*MAGNET([.AI$24]+[.BB54]) +[.AJ$28]*[.$Z$5]*MAGNET([.AJ$24]+[.BB54]) +[.AK$28]*[.$Z$5]*MAGNET([.AK$24]+[.BB54]) +[.AL$28]*[.$Z$5]*MAGNET([.AL$24]+[.BB54]) +[.AM$28]*[.$Z$5]*MAGNET([.AM$24]+[.BB54]) +[.AN$28]*[.$Z$5]*MAGNET([.AN$24]+[.BB54]) +[.AO$28]*[.$Z$5]*MAGNET([.AO$24]+[.BB54]) +[.AP$28]*[.$Z$5]*MAGNET([.AP$24]+[.$BB54])&#10;+[.AQ$28]*[.$Z$5]*MAGNET([.AQ$24]+[.$BB54])&#10;+[.AR$28]*[.$Z$5]*MAGNET([.AR$24]+[.$BB54])&#10;+[.AS$28]*[.$Z$5]*MAGNET([.AS$24]+[.$BB54])&#10;+[.AT$28]*[.$Z$5]*MAGNET([.AT$24]+[.$BB54])&#10;+[.AU$28]*[.$Z$5]*MAGNET([.AU$24]+[.$BB54])&#10;+[.AV$28]*[.$Z$5]*MAGNET([.AV$24]+[.$BB54])&#10;+[.AW$28]*[.$Z$5]*MAGNET([.AW$24]+[.$BB54])&#10;+[.AX$28]*[.$Z$5]*MAGNET([.AX$24]+[.$BB54])&#10;+[.AY$28]*[.$Z$5]*MAGNET([.AY$24]+[.$BB54]) +RAND()*[.$BF$13]" office:value-type="float" office:value="18.6858723167101" calcext:value-type="float">
            <text:p>18.6858723167101</text:p>
          </table:table-cell>
          <table:table-cell table:style-name="ce71" table:formula="of:=[.E$29]*[.$Z$5]*MAGNET([.E$24]+[.$BB54])+[.F$29]*[.$Z$5]*MAGNET([.F$24]+[.$BB54])+[.G$29]*[.$Z$5]*MAGNET([.G$24]+[.$BB54])+[.H$29]*[.$Z$5]*MAGNET([.H$24]+[.$BB54])+[.I$29]*[.$Z$5]*MAGNET([.I$24]+[.$BB54])+[.J$29]*[.$Z$5]*MAGNET([.J$24]+[.$BB54])+[.K$29]*[.$Z$5]*MAGNET([.K$24]+[.$BB54])+[.L$29]*[.$Z$5]*MAGNET([.L$24]+[.$BB54])+[.M$29]*[.$Z$5]*MAGNET([.M$24]+[.$BB54])+[.N$29]*[.$Z$5]*MAGNET([.N$24]+[.$BB54])+[.O$29]*[.$Z$5]*MAGNET([.O$24]+[.$BB54])+[.P$29]*[.$Z$5]*MAGNET([.P$24]+[.$BB54])+[.Q$29]*[.$Z$5]*MAGNET([.Q$24]+[.$BB54])+[.R$29]*[.$Z$5]*MAGNET([.R$24]+[.$BB54])+[.S$29]*[.$Z$5]*MAGNET([.S$24]+[.$BB54])+[.T$29]*[.$Z$5]*MAGNET([.T$24]+[.$BB54])+[.U$29]*[.$Z$5]*MAGNET([.U$24]+[.$BB54])+[.V$29]*[.$Z$5]*MAGNET([.V$24]+[.$BB54])+[.W$29]*[.$Z$5]*MAGNET([.W$24]+[.$BB54])+[.X$29]*[.$Z$5]*MAGNET([.X$24]+[.$BB54])+[.Y$29]*[.$Z$5]*MAGNET([.Y$24]+[.$BB54])+[.Z$29]*[.$Z$5]*MAGNET([.Z$24]+[.$BB54])+[.AA$29]*[.$Z$5]*MAGNET([.AA$24]+[.$BB54])+[.AB$29]*[.$Z$5]*MAGNET([.AB$24]+[.$BB54])+[.AC$29]*[.$Z$5]*MAGNET([.AC$24]+[.$BB54])+[.AD$29]*[.$Z$5]*MAGNET([.AD$24]+[.$BB54])+[.AE$29]*[.$Z$5]*MAGNET([.AE$24]+[.$BB54])+[.AF$29]*[.$Z$5]*MAGNET([.AF$24]+[.$BB54])+[.AG$29]*[.$Z$5]*MAGNET([.AG$24]+[.$BB54])+[.D$29]*[.$Z$5]*MAGNET([.D$24]+[.$BB54])+[.AH$29]*[.$Z$5]*MAGNET([.AH$24]+[.BB54]) +[.AI$29]*[.$Z$5]*MAGNET([.AI$24]+[.BB54]) +[.AJ$29]*[.$Z$5]*MAGNET([.AJ$24]+[.BB54]) +[.AK$29]*[.$Z$5]*MAGNET([.AK$24]+[.BB54]) +[.AL$29]*[.$Z$5]*MAGNET([.AL$24]+[.BB54]) +[.AM$29]*[.$Z$5]*MAGNET([.AM$24]+[.BB54]) +[.AN$29]*[.$Z$5]*MAGNET([.AN$24]+[.BB54]) +[.AO$29]*[.$Z$5]*MAGNET([.AO$24]+[.BB54]) +[.AP$29]*[.$Z$5]*MAGNET([.AP$24]+[.$BB54])&#10;+[.AQ$29]*[.$Z$5]*MAGNET([.AQ$24]+[.$BB54])&#10;+[.AR$29]*[.$Z$5]*MAGNET([.AR$24]+[.$BB54])&#10;+[.AS$29]*[.$Z$5]*MAGNET([.AS$24]+[.$BB54])&#10;+[.AT$29]*[.$Z$5]*MAGNET([.AT$24]+[.$BB54])&#10;+[.AU$29]*[.$Z$5]*MAGNET([.AU$24]+[.$BB54])&#10;+[.AV$29]*[.$Z$5]*MAGNET([.AV$24]+[.$BB54])&#10;+[.AW$29]*[.$Z$5]*MAGNET([.AW$24]+[.$BB54])&#10;+[.AX$29]*[.$Z$5]*MAGNET([.AX$24]+[.$BB54])&#10;+[.AY$29]*[.$Z$5]*MAGNET([.AY$24]+[.$BB54]) +RAND()*[.$BG$13]" office:value-type="float" office:value="-44.6895312789872" calcext:value-type="float">
            <text:p>-44.6895312789872</text:p>
          </table:table-cell>
          <table:table-cell table:style-name="ce71" table:formula="of:=[.E$30]*[.$Z$5]*MAGNET([.E$24]+[.$BB54])+[.F$30]*[.$Z$5]*MAGNET([.F$24]+[.$BB54])+[.G$30]*[.$Z$5]*MAGNET([.G$24]+[.$BB54])+[.H$30]*[.$Z$5]*MAGNET([.H$24]+[.$BB54])+[.I$30]*[.$Z$5]*MAGNET([.I$24]+[.$BB54])+[.J$30]*[.$Z$5]*MAGNET([.J$24]+[.$BB54])+[.K$30]*[.$Z$5]*MAGNET([.K$24]+[.$BB54])+[.L$30]*[.$Z$5]*MAGNET([.L$24]+[.$BB54])+[.M$30]*[.$Z$5]*MAGNET([.M$24]+[.$BB54])+[.N$30]*[.$Z$5]*MAGNET([.N$24]+[.$BB54])+[.O$30]*[.$Z$5]*MAGNET([.O$24]+[.$BB54])+[.P$30]*[.$Z$5]*MAGNET([.P$24]+[.$BB54])+[.Q$30]*[.$Z$5]*MAGNET([.Q$24]+[.$BB54])+[.R$30]*[.$Z$5]*MAGNET([.R$24]+[.$BB54])+[.S$30]*[.$Z$5]*MAGNET([.S$24]+[.$BB54])+[.T$30]*[.$Z$5]*MAGNET([.T$24]+[.$BB54])+[.U$30]*[.$Z$5]*MAGNET([.U$24]+[.$BB54])+[.V$30]*[.$Z$5]*MAGNET([.V$24]+[.$BB54])+[.W$30]*[.$Z$5]*MAGNET([.W$24]+[.$BB54])+[.X$30]*[.$Z$5]*MAGNET([.X$24]+[.$BB54])+[.Y$30]*[.$Z$5]*MAGNET([.Y$24]+[.$BB54])+[.Z$30]*[.$Z$5]*MAGNET([.Z$24]+[.$BB54])+[.AA$30]*[.$Z$5]*MAGNET([.AA$24]+[.$BB54])+[.AB$30]*[.$Z$5]*MAGNET([.AB$24]+[.$BB54])+[.AC$30]*[.$Z$5]*MAGNET([.AC$24]+[.$BB54])+[.AD$30]*[.$Z$5]*MAGNET([.AD$24]+[.$BB54])+[.AE$30]*[.$Z$5]*MAGNET([.AE$24]+[.$BB54])+[.AF$30]*[.$Z$5]*MAGNET([.AF$24]+[.$BB54])+[.AG$30]*[.$Z$5]*MAGNET([.AG$24]+[.$BB54])+[.D$30]*[.$Z$5]*MAGNET([.D$24]+[.$BB54])+[.AH$30]*[.$Z$5]*MAGNET([.AH$24]+[.BB54]) +[.AI$30]*[.$Z$5]*MAGNET([.AI$24]+[.BB54]) +[.AJ$30]*[.$Z$5]*MAGNET([.AJ$24]+[.BB54]) +[.AK$30]*[.$Z$5]*MAGNET([.AK$24]+[.BB54]) +[.AL$30]*[.$Z$5]*MAGNET([.AL$24]+[.BB54]) +[.AM$30]*[.$Z$5]*MAGNET([.AM$24]+[.BB54]) +[.AN$30]*[.$Z$5]*MAGNET([.AN$24]+[.BB54]) +[.AO$30]*[.$Z$5]*MAGNET([.AO$24]+[.BB54]) +[.AP$30]*[.$Z$5]*MAGNET([.AP$24]+[.$BB54])&#10;+[.AQ$30]*[.$Z$5]*MAGNET([.AQ$24]+[.$BB54])&#10;+[.AR$30]*[.$Z$5]*MAGNET([.AR$24]+[.$BB54])&#10;+[.AS$30]*[.$Z$5]*MAGNET([.AS$24]+[.$BB54])&#10;+[.AT$30]*[.$Z$5]*MAGNET([.AT$24]+[.$BB54])&#10;+[.AU$30]*[.$Z$5]*MAGNET([.AU$24]+[.$BB54])&#10;+[.AV$30]*[.$Z$5]*MAGNET([.AV$24]+[.$BB54])&#10;+[.AW$30]*[.$Z$5]*MAGNET([.AW$24]+[.$BB54])&#10;+[.AX$30]*[.$Z$5]*MAGNET([.AX$24]+[.$BB54])&#10;+[.AY$30]*[.$Z$5]*MAGNET([.AY$24]+[.$BB54]) +RAND()*[.$BH$13]" office:value-type="float" office:value="0" calcext:value-type="float">
            <text:p>0</text:p>
          </table:table-cell>
          <table:table-cell table:style-name="ce71" table:formula="of:=[.E$31]*[.$Z$5]*MAGNET([.E$24]+[.$BB54])+[.F$31]*[.$Z$5]*MAGNET([.F$24]+[.$BB54])+[.G$31]*[.$Z$5]*MAGNET([.G$24]+[.$BB54])+[.H$31]*[.$Z$5]*MAGNET([.H$24]+[.$BB54])+[.I$31]*[.$Z$5]*MAGNET([.I$24]+[.$BB54])+[.J$31]*[.$Z$5]*MAGNET([.J$24]+[.$BB54])+[.K$31]*[.$Z$5]*MAGNET([.K$24]+[.$BB54])+[.L$31]*[.$Z$5]*MAGNET([.L$24]+[.$BB54])+[.M$31]*[.$Z$5]*MAGNET([.M$24]+[.$BB54])+[.N$31]*[.$Z$5]*MAGNET([.N$24]+[.$BB54])+[.O$31]*[.$Z$5]*MAGNET([.O$24]+[.$BB54])+[.P$31]*[.$Z$5]*MAGNET([.P$24]+[.$BB54])+[.Q$31]*[.$Z$5]*MAGNET([.Q$24]+[.$BB54])+[.R$31]*[.$Z$5]*MAGNET([.R$24]+[.$BB54])+[.S$31]*[.$Z$5]*MAGNET([.S$24]+[.$BB54])+[.T$31]*[.$Z$5]*MAGNET([.T$24]+[.$BB54])+[.U$31]*[.$Z$5]*MAGNET([.U$24]+[.$BB54])+[.V$31]*[.$Z$5]*MAGNET([.V$24]+[.$BB54])+[.W$31]*[.$Z$5]*MAGNET([.W$24]+[.$BB54])+[.X$31]*[.$Z$5]*MAGNET([.X$24]+[.$BB54])+[.Y$31]*[.$Z$5]*MAGNET([.Y$24]+[.$BB54])+[.Z$31]*[.$Z$5]*MAGNET([.Z$24]+[.$BB54])+[.AA$31]*[.$Z$5]*MAGNET([.AA$24]+[.$BB54])+[.AB$31]*[.$Z$5]*MAGNET([.AB$24]+[.$BB54])+[.AC$31]*[.$Z$5]*MAGNET([.AC$24]+[.$BB54])+[.AD$31]*[.$Z$5]*MAGNET([.AD$24]+[.$BB54])+[.AE$31]*[.$Z$5]*MAGNET([.AE$24]+[.$BB54])+[.AF$31]*[.$Z$5]*MAGNET([.AF$24]+[.$BB54])+[.AG$31]*[.$Z$5]*MAGNET([.AG$24]+[.$BB54])+[.D$31]*[.$Z$5]*MAGNET([.D$24]+[.$BB54])+[.AH$31]*[.$Z$5]*MAGNET([.AH$24]+[.BB54]) +[.AI$31]*[.$Z$5]*MAGNET([.AI$24]+[.BB54]) +[.AJ$31]*[.$Z$5]*MAGNET([.AJ$24]+[.BB54]) +[.AK$31]*[.$Z$5]*MAGNET([.AK$24]+[.BB54]) +[.AL$31]*[.$Z$5]*MAGNET([.AL$24]+[.BB54]) +[.AM$31]*[.$Z$5]*MAGNET([.AM$24]+[.BB54]) +[.AN$31]*[.$Z$5]*MAGNET([.AN$24]+[.BB54]) +[.AO$31]*[.$Z$5]*MAGNET([.AO$24]+[.BB54]) +[.AP$31]*[.$Z$5]*MAGNET([.AP$24]+[.$BB54])&#10;+[.AQ$31]*[.$Z$5]*MAGNET([.AQ$24]+[.$BB54])&#10;+[.AR$31]*[.$Z$5]*MAGNET([.AR$24]+[.$BB54])&#10;+[.AS$31]*[.$Z$5]*MAGNET([.AS$24]+[.$BB54])&#10;+[.AT$31]*[.$Z$5]*MAGNET([.AT$24]+[.$BB54])&#10;+[.AU$31]*[.$Z$5]*MAGNET([.AU$24]+[.$BB54])&#10;+[.AV$31]*[.$Z$5]*MAGNET([.AV$24]+[.$BB54])&#10;+[.AW$31]*[.$Z$5]*MAGNET([.AW$24]+[.$BB54])&#10;+[.AX$31]*[.$Z$5]*MAGNET([.AX$24]+[.$BB54])&#10;+[.AY$31]*[.$Z$5]*MAGNET([.AY$24]+[.$BB54]) +RAND()*[.$BI$13]" office:value-type="float" office:value="0" calcext:value-type="float">
            <text:p>0</text:p>
          </table:table-cell>
          <table:table-cell table:style-name="ce71" table:formula="of:=[.E$32]*[.$Z$5]*MAGNET([.E$24]+[.$BB54])+[.F$32]*[.$Z$5]*MAGNET([.F$24]+[.$BB54])+[.G$32]*[.$Z$5]*MAGNET([.G$24]+[.$BB54])+[.H$32]*[.$Z$5]*MAGNET([.H$24]+[.$BB54])+[.I$32]*[.$Z$5]*MAGNET([.I$24]+[.$BB54])+[.J$32]*[.$Z$5]*MAGNET([.J$24]+[.$BB54])+[.K$32]*[.$Z$5]*MAGNET([.K$24]+[.$BB54])+[.L$32]*[.$Z$5]*MAGNET([.L$24]+[.$BB54])+[.M$32]*[.$Z$5]*MAGNET([.M$24]+[.$BB54])+[.N$32]*[.$Z$5]*MAGNET([.N$24]+[.$BB54])+[.O$32]*[.$Z$5]*MAGNET([.O$24]+[.$BB54])+[.P$32]*[.$Z$5]*MAGNET([.P$24]+[.$BB54])+[.Q$32]*[.$Z$5]*MAGNET([.Q$24]+[.$BB54])+[.R$32]*[.$Z$5]*MAGNET([.R$24]+[.$BB54])+[.S$32]*[.$Z$5]*MAGNET([.S$24]+[.$BB54])+[.T$32]*[.$Z$5]*MAGNET([.T$24]+[.$BB54])+[.U$32]*[.$Z$5]*MAGNET([.U$24]+[.$BB54])+[.V$32]*[.$Z$5]*MAGNET([.V$24]+[.$BB54])+[.W$32]*[.$Z$5]*MAGNET([.W$24]+[.$BB54])+[.X$32]*[.$Z$5]*MAGNET([.X$24]+[.$BB54])+[.Y$32]*[.$Z$5]*MAGNET([.Y$24]+[.$BB54])+[.Z$32]*[.$Z$5]*MAGNET([.Z$24]+[.$BB54])+[.AA$32]*[.$Z$5]*MAGNET([.AA$24]+[.$BB54])+[.AB$32]*[.$Z$5]*MAGNET([.AB$24]+[.$BB54])+[.AC$32]*[.$Z$5]*MAGNET([.AC$24]+[.$BB54])+[.AD$32]*[.$Z$5]*MAGNET([.AD$24]+[.$BB54])+[.AE$32]*[.$Z$5]*MAGNET([.AE$24]+[.$BB54])+[.AF$32]*[.$Z$5]*MAGNET([.AF$24]+[.$BB54])+[.AG$32]*[.$Z$5]*MAGNET([.AG$24]+[.$BB54])+[.D$32]*[.$Z$5]*MAGNET([.D$24]+[.$BB54])+[.AH$32]*[.$Z$5]*MAGNET([.AH$24]+[.BB54]) +[.AI$32]*[.$Z$5]*MAGNET([.AI$24]+[.BB54]) +[.AJ$32]*[.$Z$5]*MAGNET([.AJ$24]+[.BB54]) +[.AK$32]*[.$Z$5]*MAGNET([.AK$24]+[.BB54]) +[.AL$32]*[.$Z$5]*MAGNET([.AL$24]+[.BB54]) +[.AM$32]*[.$Z$5]*MAGNET([.AM$24]+[.BB54]) +[.AN$32]*[.$Z$5]*MAGNET([.AN$24]+[.BB54]) +[.AO$32]*[.$Z$5]*MAGNET([.AO$24]+[.BB54]) +[.AP$32]*[.$Z$5]*MAGNET([.AP$24]+[.$BB54])&#10;+[.AQ$32]*[.$Z$5]*MAGNET([.AQ$24]+[.$BB54])&#10;+[.AR$32]*[.$Z$5]*MAGNET([.AR$24]+[.$BB54])&#10;+[.AS$32]*[.$Z$5]*MAGNET([.AS$24]+[.$BB54])&#10;+[.AT$32]*[.$Z$5]*MAGNET([.AT$24]+[.$BB54])&#10;+[.AU$32]*[.$Z$5]*MAGNET([.AU$24]+[.$BB54])&#10;+[.AV$32]*[.$Z$5]*MAGNET([.AV$24]+[.$BB54])&#10;+[.AW$32]*[.$Z$5]*MAGNET([.AW$24]+[.$BB54])&#10;+[.AX$32]*[.$Z$5]*MAGNET([.AX$24]+[.$BB54])&#10;+[.AY$32]*[.$Z$5]*MAGNET([.AY$24]+[.$BB5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/>
          <table:table-cell table:number-columns-repeated="49"/>
          <table:table-cell table:formula="of:=[.BA54]+0.002" office:value-type="float" office:value="0.0800000000000001" calcext:value-type="float">
            <text:p>0.0800000000000001</text:p>
          </table:table-cell>
          <table:table-cell table:formula="of:=[.BA55]*[.$D$6]" office:value-type="float" office:value="4.02123859659494" calcext:value-type="float">
            <text:p>4.021</text:p>
          </table:table-cell>
          <table:table-cell table:formula="of:=[.D$25]*[.$Z$5]*MAGNET([.D$24]+[.BB55])+[.E$25]*[.$Z$5]*MAGNET([.E$24]+[.BB55])+[.F$25]*[.$Z$5]*MAGNET([.F$24]+[.BB55])+[.G$25]*[.$Z$5]*MAGNET([.G$24]+[.BB55])+[.H$25]*[.$Z$5]*MAGNET([.H$24]+[.BB55])+[.I$25]*[.$Z$5]*MAGNET([.I$24]+[.BB55])+[.J$25]*[.$Z$5]*MAGNET([.J$24]+[.BB55])+[.K$25]*[.$Z$5]*MAGNET([.K$24]+[.BB55])+[.L$25]*[.$Z$5]*MAGNET([.L$24]+[.BB55])+[.M$25]*[.$Z$5]*MAGNET([.M$24]+[.BB55])+[.N$25]*[.$Z$5]*MAGNET([.N$24]+[.BB55])+[.O$25]*[.$Z$5]*MAGNET([.O$24]+[.BB55])+[.P$25]*[.$Z$5]*MAGNET([.P$24]+[.BB55])+[.Q$25]*[.$Z$5]*MAGNET([.Q$24]+[.BB55])+[.R$25]*[.$Z$5]*MAGNET([.R$24]+[.BB55])+[.S$25]*[.$Z$5]*MAGNET([.S$24]+[.BB55])+[.T$25]*[.$Z$5]*MAGNET([.T$24]+[.BB55])+[.U$25]*[.$Z$5]*MAGNET([.U$24]+[.BB55])+[.V$25]*[.$Z$5]*MAGNET([.V$24]+[.BB55])+[.W$25]*[.$Z$5]*MAGNET([.W$24]+[.BB55])+[.X$25]*[.$Z$5]*MAGNET([.X$24]+[.BB55])+[.Y$25]*[.$Z$5]*MAGNET([.Y$24]+[.BB55])+[.Z$25]*[.$Z$5]*MAGNET([.Z$24]+[.BB55])+[.AA$25]*[.$Z$5]*MAGNET([.AA$24]+[.BB55])+[.AB$25]*[.$Z$5]*MAGNET([.AB$24]+[.BB55])+[.AC$25]*[.$Z$5]*MAGNET([.AC$24]+[.BB55])+[.AD$25]*[.$Z$5]*MAGNET([.AD$24]+[.BB55])+[.AE$25]*[.$Z$5]*MAGNET([.AE$24]+[.BB55])+[.AF$25]*[.$Z$5]*MAGNET([.AF$24]+[.BB55])+[.AG$25]*[.$Z$5]*MAGNET([.AG$24]+[.BB55])+[.AH$25]*[.$Z$5]*MAGNET([.AH$24]+[.BB55]) +[.AI$25]*[.$Z$5]*MAGNET([.AI$24]+[.BB55]) +[.AJ$25]*[.$Z$5]*MAGNET([.AJ$24]+[.BB55]) +[.AK$25]*[.$Z$5]*MAGNET([.AK$24]+[.BB55]) +[.AL$25]*[.$Z$5]*MAGNET([.AL$24]+[.BB55]) +[.AM$25]*[.$Z$5]*MAGNET([.AM$24]+[.BB55]) +[.AN$25]*[.$Z$5]*MAGNET([.AN$24]+[.BB55]) +[.AO$25]*[.$Z$5]*MAGNET([.AO$24]+[.BB55])+RAND()*[.$BC$13]+[.AP$25]*[.$Z$5]*MAGNET([.AP$24]+[.BB55])&#10;+[.AQ$25]*[.$Z$5]*MAGNET([.AQ$24]+[.BB55])&#10;+[.AR$25]*[.$Z$5]*MAGNET([.AR$24]+[.BB55])&#10;+[.AS$25]*[.$Z$5]*MAGNET([.AS$24]+[.BB55])&#10;+[.AT$25]*[.$Z$5]*MAGNET([.AT$24]+[.BB55])&#10;+[.AU$25]*[.$Z$5]*MAGNET([.AU$24]+[.BB55])&#10;+[.AV$25]*[.$Z$5]*MAGNET([.AV$24]+[.BB55])&#10;+[.AW$25]*[.$Z$5]*MAGNET([.AW$24]+[.BB55])&#10;+[.AX$25]*[.$Z$5]*MAGNET([.AX$24]+[.BB55])&#10;+[.AY$25]*[.$Z$5]*MAGNET([.AY$24]+[.BB55])" office:value-type="float" office:value="-49.3037850355046" calcext:value-type="float">
            <text:p>-49.30</text:p>
          </table:table-cell>
          <table:table-cell table:style-name="ce70" table:formula="of:=[.E$26]*[.$Z$5]*MAGNET([.E$24]+[.$BB55])+[.F$26]*[.$Z$5]*MAGNET([.F$24]+[.$BB55])+[.G$26]*[.$Z$5]*MAGNET([.G$24]+[.$BB55])+[.H$26]*[.$Z$5]*MAGNET([.H$24]+[.$BB55])+[.I$26]*[.$Z$5]*MAGNET([.I$24]+[.$BB55])+[.J$26]*[.$Z$5]*MAGNET([.J$24]+[.$BB55])+[.K$26]*[.$Z$5]*MAGNET([.K$24]+[.$BB55])+[.L$26]*[.$Z$5]*MAGNET([.L$24]+[.$BB55])+[.M$26]*[.$Z$5]*MAGNET([.M$24]+[.$BB55])+[.N$26]*[.$Z$5]*MAGNET([.N$24]+[.$BB55])+[.O$26]*[.$Z$5]*MAGNET([.O$24]+[.$BB55])+[.P$26]*[.$Z$5]*MAGNET([.P$24]+[.$BB55])+[.Q$26]*[.$Z$5]*MAGNET([.Q$24]+[.$BB55])+[.R$26]*[.$Z$5]*MAGNET([.R$24]+[.$BB55])+[.S$26]*[.$Z$5]*MAGNET([.S$24]+[.$BB55])+[.T$26]*[.$Z$5]*MAGNET([.T$24]+[.$BB55])+[.U$26]*[.$Z$5]*MAGNET([.U$24]+[.$BB55])+[.V$26]*[.$Z$5]*MAGNET([.V$24]+[.$BB55])+[.W$26]*[.$Z$5]*MAGNET([.W$24]+[.$BB55])+[.X$26]*[.$Z$5]*MAGNET([.X$24]+[.$BB55])+[.Y$26]*[.$Z$5]*MAGNET([.Y$24]+[.$BB55])+[.Z$26]*[.$Z$5]*MAGNET([.Z$24]+[.$BB55])+[.AA$26]*[.$Z$5]*MAGNET([.AA$24]+[.$BB55])+[.AB$26]*[.$Z$5]*MAGNET([.AB$24]+[.$BB55])+[.AC$26]*[.$Z$5]*MAGNET([.AC$24]+[.$BB55])+[.AD$26]*[.$Z$5]*MAGNET([.AD$24]+[.$BB55])+[.AE$26]*[.$Z$5]*MAGNET([.AE$24]+[.$BB55])+[.AF$26]*[.$Z$5]*MAGNET([.AF$24]+[.$BB55])+[.AG$26]*[.$Z$5]*MAGNET([.AG$24]+[.$BB55])+[.D$26]*[.$Z$5]*MAGNET([.D$24]+[.$BB55])+[.AH$26]*[.$Z$5]*MAGNET([.AH$24]+[.BB55]) +[.AI$26]*[.$Z$5]*MAGNET([.AI$24]+[.BB55]) +[.AJ$26]*[.$Z$5]*MAGNET([.AJ$24]+[.BB55]) +[.AK$26]*[.$Z$5]*MAGNET([.AK$24]+[.BB55]) +[.AL$26]*[.$Z$5]*MAGNET([.AL$24]+[.BB55]) +[.AM$26]*[.$Z$5]*MAGNET([.AM$24]+[.BB55]) +[.AN$26]*[.$Z$5]*MAGNET([.AN$24]+[.BB55]) +[.AO$26]*[.$Z$5]*MAGNET([.AO$24]+[.BB55]) +[.AP$26]*[.$Z$5]*MAGNET([.AP$24]+[.$BB55])&#10;+[.AQ$26]*[.$Z$5]*MAGNET([.AQ$24]+[.$BB55])&#10;+[.AR$26]*[.$Z$5]*MAGNET([.AR$24]+[.$BB55])&#10;+[.AS$26]*[.$Z$5]*MAGNET([.AS$24]+[.$BB55])&#10;+[.AT$26]*[.$Z$5]*MAGNET([.AT$24]+[.$BB55])&#10;+[.AU$26]*[.$Z$5]*MAGNET([.AU$24]+[.$BB55])&#10;+[.AV$26]*[.$Z$5]*MAGNET([.AV$24]+[.$BB55])&#10;+[.AW$26]*[.$Z$5]*MAGNET([.AW$24]+[.$BB55])&#10;+[.AX$26]*[.$Z$5]*MAGNET([.AX$24]+[.$BB55])&#10;+[.AY$26]*[.$Z$5]*MAGNET([.AY$24]+[.$BB55]) +RAND()*[.$BD$13]" office:value-type="float" office:value="-43.2192612232081" calcext:value-type="float">
            <text:p>-43.22</text:p>
          </table:table-cell>
          <table:table-cell table:style-name="ce71" table:formula="of:=[.E$27]*[.$Z$5]*MAGNET([.E$24]+[.$BB55])+[.F$27]*[.$Z$5]*MAGNET([.F$24]+[.$BB55])+[.G$27]*[.$Z$5]*MAGNET([.G$24]+[.$BB55])+[.H$27]*[.$Z$5]*MAGNET([.H$24]+[.$BB55])+[.I$27]*[.$Z$5]*MAGNET([.I$24]+[.$BB55])+[.J$27]*[.$Z$5]*MAGNET([.J$24]+[.$BB55])+[.K$27]*[.$Z$5]*MAGNET([.K$24]+[.$BB55])+[.L$27]*[.$Z$5]*MAGNET([.L$24]+[.$BB55])+[.M$27]*[.$Z$5]*MAGNET([.M$24]+[.$BB55])+[.N$27]*[.$Z$5]*MAGNET([.N$24]+[.$BB55])+[.O$27]*[.$Z$5]*MAGNET([.O$24]+[.$BB55])+[.P$27]*[.$Z$5]*MAGNET([.P$24]+[.$BB55])+[.Q$27]*[.$Z$5]*MAGNET([.Q$24]+[.$BB55])+[.R$27]*[.$Z$5]*MAGNET([.R$24]+[.$BB55])+[.S$27]*[.$Z$5]*MAGNET([.S$24]+[.$BB55])+[.T$27]*[.$Z$5]*MAGNET([.T$24]+[.$BB55])+[.U$27]*[.$Z$5]*MAGNET([.U$24]+[.$BB55])+[.V$27]*[.$Z$5]*MAGNET([.V$24]+[.$BB55])+[.W$27]*[.$Z$5]*MAGNET([.W$24]+[.$BB55])+[.X$27]*[.$Z$5]*MAGNET([.X$24]+[.$BB55])+[.Y$27]*[.$Z$5]*MAGNET([.Y$24]+[.$BB55])+[.Z$27]*[.$Z$5]*MAGNET([.Z$24]+[.$BB55])+[.AA$27]*[.$Z$5]*MAGNET([.AA$24]+[.$BB55])+[.AB$27]*[.$Z$5]*MAGNET([.AB$24]+[.$BB55])+[.AC$27]*[.$Z$5]*MAGNET([.AC$24]+[.$BB55])+[.AD$27]*[.$Z$5]*MAGNET([.AD$24]+[.$BB55])+[.AE$27]*[.$Z$5]*MAGNET([.AE$24]+[.$BB55])+[.AF$27]*[.$Z$5]*MAGNET([.AF$24]+[.$BB55])+[.AG$27]*[.$Z$5]*MAGNET([.AG$24]+[.$BB55])+[.D$27]*[.$Z$5]*MAGNET([.D$24]+[.$BB55])+[.AH$27]*[.$Z$5]*MAGNET([.AH$24]+[.BB55]) +[.AI$27]*[.$Z$5]*MAGNET([.AI$24]+[.BB55]) +[.AJ$27]*[.$Z$5]*MAGNET([.AJ$24]+[.BB55]) +[.AK$27]*[.$Z$5]*MAGNET([.AK$24]+[.BB55]) +[.AL$27]*[.$Z$5]*MAGNET([.AL$24]+[.BB55]) +[.AM$27]*[.$Z$5]*MAGNET([.AM$24]+[.BB55]) +[.AN$27]*[.$Z$5]*MAGNET([.AN$24]+[.BB55]) +[.AO$27]*[.$Z$5]*MAGNET([.AO$24]+[.BB55]) +[.AP$27]*[.$Z$5]*MAGNET([.AP$24]+[.$BB55])&#10;+[.AQ$27]*[.$Z$5]*MAGNET([.AQ$24]+[.$BB55])&#10;+[.AR$27]*[.$Z$5]*MAGNET([.AR$24]+[.$BB55])&#10;+[.AS$27]*[.$Z$5]*MAGNET([.AS$24]+[.$BB55])&#10;+[.AT$27]*[.$Z$5]*MAGNET([.AT$24]+[.$BB55])&#10;+[.AU$27]*[.$Z$5]*MAGNET([.AU$24]+[.$BB55])&#10;+[.AV$27]*[.$Z$5]*MAGNET([.AV$24]+[.$BB55])&#10;+[.AW$27]*[.$Z$5]*MAGNET([.AW$24]+[.$BB55])&#10;+[.AX$27]*[.$Z$5]*MAGNET([.AX$24]+[.$BB55])&#10;+[.AY$27]*[.$Z$5]*MAGNET([.AY$24]+[.$BB55]) +RAND()*[.$BE$13]" office:value-type="float" office:value="128.379813246152" calcext:value-type="float">
            <text:p>128.379813246152</text:p>
          </table:table-cell>
          <table:table-cell table:style-name="ce71" table:formula="of:=[.E$28]*[.$Z$5]*MAGNET([.E$24]+[.$BB55])+[.F$28]*[.$Z$5]*MAGNET([.F$24]+[.$BB55])+[.G$28]*[.$Z$5]*MAGNET([.G$24]+[.$BB55])+[.H$28]*[.$Z$5]*MAGNET([.H$24]+[.$BB55])+[.I$28]*[.$Z$5]*MAGNET([.I$24]+[.$BB55])+[.J$28]*[.$Z$5]*MAGNET([.J$24]+[.$BB55])+[.K$28]*[.$Z$5]*MAGNET([.K$24]+[.$BB55])+[.L$28]*[.$Z$5]*MAGNET([.L$24]+[.$BB55])+[.M$28]*[.$Z$5]*MAGNET([.M$24]+[.$BB55])+[.N$28]*[.$Z$5]*MAGNET([.N$24]+[.$BB55])+[.O$28]*[.$Z$5]*MAGNET([.O$24]+[.$BB55])+[.P$28]*[.$Z$5]*MAGNET([.P$24]+[.$BB55])+[.Q$28]*[.$Z$5]*MAGNET([.Q$24]+[.$BB55])+[.R$28]*[.$Z$5]*MAGNET([.R$24]+[.$BB55])+[.S$28]*[.$Z$5]*MAGNET([.S$24]+[.$BB55])+[.T$28]*[.$Z$5]*MAGNET([.T$24]+[.$BB55])+[.U$28]*[.$Z$5]*MAGNET([.U$24]+[.$BB55])+[.V$28]*[.$Z$5]*MAGNET([.V$24]+[.$BB55])+[.W$28]*[.$Z$5]*MAGNET([.W$24]+[.$BB55])+[.X$28]*[.$Z$5]*MAGNET([.X$24]+[.$BB55])+[.Y$28]*[.$Z$5]*MAGNET([.Y$24]+[.$BB55])+[.Z$28]*[.$Z$5]*MAGNET([.Z$24]+[.$BB55])+[.AA$28]*[.$Z$5]*MAGNET([.AA$24]+[.$BB55])+[.AB$28]*[.$Z$5]*MAGNET([.AB$24]+[.$BB55])+[.AC$28]*[.$Z$5]*MAGNET([.AC$24]+[.$BB55])+[.AD$28]*[.$Z$5]*MAGNET([.AD$24]+[.$BB55])+[.AE$28]*[.$Z$5]*MAGNET([.AE$24]+[.$BB55])+[.AF$28]*[.$Z$5]*MAGNET([.AF$24]+[.$BB55])+[.AG$28]*[.$Z$5]*MAGNET([.AG$24]+[.$BB55])+[.D$28]*[.$Z$5]*MAGNET([.D$24]+[.$BB55])+[.AH$28]*[.$Z$5]*MAGNET([.AH$24]+[.BB55]) +[.AI$28]*[.$Z$5]*MAGNET([.AI$24]+[.BB55]) +[.AJ$28]*[.$Z$5]*MAGNET([.AJ$24]+[.BB55]) +[.AK$28]*[.$Z$5]*MAGNET([.AK$24]+[.BB55]) +[.AL$28]*[.$Z$5]*MAGNET([.AL$24]+[.BB55]) +[.AM$28]*[.$Z$5]*MAGNET([.AM$24]+[.BB55]) +[.AN$28]*[.$Z$5]*MAGNET([.AN$24]+[.BB55]) +[.AO$28]*[.$Z$5]*MAGNET([.AO$24]+[.BB55]) +[.AP$28]*[.$Z$5]*MAGNET([.AP$24]+[.$BB55])&#10;+[.AQ$28]*[.$Z$5]*MAGNET([.AQ$24]+[.$BB55])&#10;+[.AR$28]*[.$Z$5]*MAGNET([.AR$24]+[.$BB55])&#10;+[.AS$28]*[.$Z$5]*MAGNET([.AS$24]+[.$BB55])&#10;+[.AT$28]*[.$Z$5]*MAGNET([.AT$24]+[.$BB55])&#10;+[.AU$28]*[.$Z$5]*MAGNET([.AU$24]+[.$BB55])&#10;+[.AV$28]*[.$Z$5]*MAGNET([.AV$24]+[.$BB55])&#10;+[.AW$28]*[.$Z$5]*MAGNET([.AW$24]+[.$BB55])&#10;+[.AX$28]*[.$Z$5]*MAGNET([.AX$24]+[.$BB55])&#10;+[.AY$28]*[.$Z$5]*MAGNET([.AY$24]+[.$BB55]) +RAND()*[.$BF$13]" office:value-type="float" office:value="19.4087295586872" calcext:value-type="float">
            <text:p>19.4087295586872</text:p>
          </table:table-cell>
          <table:table-cell table:style-name="ce71" table:formula="of:=[.E$29]*[.$Z$5]*MAGNET([.E$24]+[.$BB55])+[.F$29]*[.$Z$5]*MAGNET([.F$24]+[.$BB55])+[.G$29]*[.$Z$5]*MAGNET([.G$24]+[.$BB55])+[.H$29]*[.$Z$5]*MAGNET([.H$24]+[.$BB55])+[.I$29]*[.$Z$5]*MAGNET([.I$24]+[.$BB55])+[.J$29]*[.$Z$5]*MAGNET([.J$24]+[.$BB55])+[.K$29]*[.$Z$5]*MAGNET([.K$24]+[.$BB55])+[.L$29]*[.$Z$5]*MAGNET([.L$24]+[.$BB55])+[.M$29]*[.$Z$5]*MAGNET([.M$24]+[.$BB55])+[.N$29]*[.$Z$5]*MAGNET([.N$24]+[.$BB55])+[.O$29]*[.$Z$5]*MAGNET([.O$24]+[.$BB55])+[.P$29]*[.$Z$5]*MAGNET([.P$24]+[.$BB55])+[.Q$29]*[.$Z$5]*MAGNET([.Q$24]+[.$BB55])+[.R$29]*[.$Z$5]*MAGNET([.R$24]+[.$BB55])+[.S$29]*[.$Z$5]*MAGNET([.S$24]+[.$BB55])+[.T$29]*[.$Z$5]*MAGNET([.T$24]+[.$BB55])+[.U$29]*[.$Z$5]*MAGNET([.U$24]+[.$BB55])+[.V$29]*[.$Z$5]*MAGNET([.V$24]+[.$BB55])+[.W$29]*[.$Z$5]*MAGNET([.W$24]+[.$BB55])+[.X$29]*[.$Z$5]*MAGNET([.X$24]+[.$BB55])+[.Y$29]*[.$Z$5]*MAGNET([.Y$24]+[.$BB55])+[.Z$29]*[.$Z$5]*MAGNET([.Z$24]+[.$BB55])+[.AA$29]*[.$Z$5]*MAGNET([.AA$24]+[.$BB55])+[.AB$29]*[.$Z$5]*MAGNET([.AB$24]+[.$BB55])+[.AC$29]*[.$Z$5]*MAGNET([.AC$24]+[.$BB55])+[.AD$29]*[.$Z$5]*MAGNET([.AD$24]+[.$BB55])+[.AE$29]*[.$Z$5]*MAGNET([.AE$24]+[.$BB55])+[.AF$29]*[.$Z$5]*MAGNET([.AF$24]+[.$BB55])+[.AG$29]*[.$Z$5]*MAGNET([.AG$24]+[.$BB55])+[.D$29]*[.$Z$5]*MAGNET([.D$24]+[.$BB55])+[.AH$29]*[.$Z$5]*MAGNET([.AH$24]+[.BB55]) +[.AI$29]*[.$Z$5]*MAGNET([.AI$24]+[.BB55]) +[.AJ$29]*[.$Z$5]*MAGNET([.AJ$24]+[.BB55]) +[.AK$29]*[.$Z$5]*MAGNET([.AK$24]+[.BB55]) +[.AL$29]*[.$Z$5]*MAGNET([.AL$24]+[.BB55]) +[.AM$29]*[.$Z$5]*MAGNET([.AM$24]+[.BB55]) +[.AN$29]*[.$Z$5]*MAGNET([.AN$24]+[.BB55]) +[.AO$29]*[.$Z$5]*MAGNET([.AO$24]+[.BB55]) +[.AP$29]*[.$Z$5]*MAGNET([.AP$24]+[.$BB55])&#10;+[.AQ$29]*[.$Z$5]*MAGNET([.AQ$24]+[.$BB55])&#10;+[.AR$29]*[.$Z$5]*MAGNET([.AR$24]+[.$BB55])&#10;+[.AS$29]*[.$Z$5]*MAGNET([.AS$24]+[.$BB55])&#10;+[.AT$29]*[.$Z$5]*MAGNET([.AT$24]+[.$BB55])&#10;+[.AU$29]*[.$Z$5]*MAGNET([.AU$24]+[.$BB55])&#10;+[.AV$29]*[.$Z$5]*MAGNET([.AV$24]+[.$BB55])&#10;+[.AW$29]*[.$Z$5]*MAGNET([.AW$24]+[.$BB55])&#10;+[.AX$29]*[.$Z$5]*MAGNET([.AX$24]+[.$BB55])&#10;+[.AY$29]*[.$Z$5]*MAGNET([.AY$24]+[.$BB55]) +RAND()*[.$BG$13]" office:value-type="float" office:value="-44.2989254796937" calcext:value-type="float">
            <text:p>-44.2989254796937</text:p>
          </table:table-cell>
          <table:table-cell table:style-name="ce71" table:formula="of:=[.E$30]*[.$Z$5]*MAGNET([.E$24]+[.$BB55])+[.F$30]*[.$Z$5]*MAGNET([.F$24]+[.$BB55])+[.G$30]*[.$Z$5]*MAGNET([.G$24]+[.$BB55])+[.H$30]*[.$Z$5]*MAGNET([.H$24]+[.$BB55])+[.I$30]*[.$Z$5]*MAGNET([.I$24]+[.$BB55])+[.J$30]*[.$Z$5]*MAGNET([.J$24]+[.$BB55])+[.K$30]*[.$Z$5]*MAGNET([.K$24]+[.$BB55])+[.L$30]*[.$Z$5]*MAGNET([.L$24]+[.$BB55])+[.M$30]*[.$Z$5]*MAGNET([.M$24]+[.$BB55])+[.N$30]*[.$Z$5]*MAGNET([.N$24]+[.$BB55])+[.O$30]*[.$Z$5]*MAGNET([.O$24]+[.$BB55])+[.P$30]*[.$Z$5]*MAGNET([.P$24]+[.$BB55])+[.Q$30]*[.$Z$5]*MAGNET([.Q$24]+[.$BB55])+[.R$30]*[.$Z$5]*MAGNET([.R$24]+[.$BB55])+[.S$30]*[.$Z$5]*MAGNET([.S$24]+[.$BB55])+[.T$30]*[.$Z$5]*MAGNET([.T$24]+[.$BB55])+[.U$30]*[.$Z$5]*MAGNET([.U$24]+[.$BB55])+[.V$30]*[.$Z$5]*MAGNET([.V$24]+[.$BB55])+[.W$30]*[.$Z$5]*MAGNET([.W$24]+[.$BB55])+[.X$30]*[.$Z$5]*MAGNET([.X$24]+[.$BB55])+[.Y$30]*[.$Z$5]*MAGNET([.Y$24]+[.$BB55])+[.Z$30]*[.$Z$5]*MAGNET([.Z$24]+[.$BB55])+[.AA$30]*[.$Z$5]*MAGNET([.AA$24]+[.$BB55])+[.AB$30]*[.$Z$5]*MAGNET([.AB$24]+[.$BB55])+[.AC$30]*[.$Z$5]*MAGNET([.AC$24]+[.$BB55])+[.AD$30]*[.$Z$5]*MAGNET([.AD$24]+[.$BB55])+[.AE$30]*[.$Z$5]*MAGNET([.AE$24]+[.$BB55])+[.AF$30]*[.$Z$5]*MAGNET([.AF$24]+[.$BB55])+[.AG$30]*[.$Z$5]*MAGNET([.AG$24]+[.$BB55])+[.D$30]*[.$Z$5]*MAGNET([.D$24]+[.$BB55])+[.AH$30]*[.$Z$5]*MAGNET([.AH$24]+[.BB55]) +[.AI$30]*[.$Z$5]*MAGNET([.AI$24]+[.BB55]) +[.AJ$30]*[.$Z$5]*MAGNET([.AJ$24]+[.BB55]) +[.AK$30]*[.$Z$5]*MAGNET([.AK$24]+[.BB55]) +[.AL$30]*[.$Z$5]*MAGNET([.AL$24]+[.BB55]) +[.AM$30]*[.$Z$5]*MAGNET([.AM$24]+[.BB55]) +[.AN$30]*[.$Z$5]*MAGNET([.AN$24]+[.BB55]) +[.AO$30]*[.$Z$5]*MAGNET([.AO$24]+[.BB55]) +[.AP$30]*[.$Z$5]*MAGNET([.AP$24]+[.$BB55])&#10;+[.AQ$30]*[.$Z$5]*MAGNET([.AQ$24]+[.$BB55])&#10;+[.AR$30]*[.$Z$5]*MAGNET([.AR$24]+[.$BB55])&#10;+[.AS$30]*[.$Z$5]*MAGNET([.AS$24]+[.$BB55])&#10;+[.AT$30]*[.$Z$5]*MAGNET([.AT$24]+[.$BB55])&#10;+[.AU$30]*[.$Z$5]*MAGNET([.AU$24]+[.$BB55])&#10;+[.AV$30]*[.$Z$5]*MAGNET([.AV$24]+[.$BB55])&#10;+[.AW$30]*[.$Z$5]*MAGNET([.AW$24]+[.$BB55])&#10;+[.AX$30]*[.$Z$5]*MAGNET([.AX$24]+[.$BB55])&#10;+[.AY$30]*[.$Z$5]*MAGNET([.AY$24]+[.$BB55]) +RAND()*[.$BH$13]" office:value-type="float" office:value="0" calcext:value-type="float">
            <text:p>0</text:p>
          </table:table-cell>
          <table:table-cell table:style-name="ce71" table:formula="of:=[.E$31]*[.$Z$5]*MAGNET([.E$24]+[.$BB55])+[.F$31]*[.$Z$5]*MAGNET([.F$24]+[.$BB55])+[.G$31]*[.$Z$5]*MAGNET([.G$24]+[.$BB55])+[.H$31]*[.$Z$5]*MAGNET([.H$24]+[.$BB55])+[.I$31]*[.$Z$5]*MAGNET([.I$24]+[.$BB55])+[.J$31]*[.$Z$5]*MAGNET([.J$24]+[.$BB55])+[.K$31]*[.$Z$5]*MAGNET([.K$24]+[.$BB55])+[.L$31]*[.$Z$5]*MAGNET([.L$24]+[.$BB55])+[.M$31]*[.$Z$5]*MAGNET([.M$24]+[.$BB55])+[.N$31]*[.$Z$5]*MAGNET([.N$24]+[.$BB55])+[.O$31]*[.$Z$5]*MAGNET([.O$24]+[.$BB55])+[.P$31]*[.$Z$5]*MAGNET([.P$24]+[.$BB55])+[.Q$31]*[.$Z$5]*MAGNET([.Q$24]+[.$BB55])+[.R$31]*[.$Z$5]*MAGNET([.R$24]+[.$BB55])+[.S$31]*[.$Z$5]*MAGNET([.S$24]+[.$BB55])+[.T$31]*[.$Z$5]*MAGNET([.T$24]+[.$BB55])+[.U$31]*[.$Z$5]*MAGNET([.U$24]+[.$BB55])+[.V$31]*[.$Z$5]*MAGNET([.V$24]+[.$BB55])+[.W$31]*[.$Z$5]*MAGNET([.W$24]+[.$BB55])+[.X$31]*[.$Z$5]*MAGNET([.X$24]+[.$BB55])+[.Y$31]*[.$Z$5]*MAGNET([.Y$24]+[.$BB55])+[.Z$31]*[.$Z$5]*MAGNET([.Z$24]+[.$BB55])+[.AA$31]*[.$Z$5]*MAGNET([.AA$24]+[.$BB55])+[.AB$31]*[.$Z$5]*MAGNET([.AB$24]+[.$BB55])+[.AC$31]*[.$Z$5]*MAGNET([.AC$24]+[.$BB55])+[.AD$31]*[.$Z$5]*MAGNET([.AD$24]+[.$BB55])+[.AE$31]*[.$Z$5]*MAGNET([.AE$24]+[.$BB55])+[.AF$31]*[.$Z$5]*MAGNET([.AF$24]+[.$BB55])+[.AG$31]*[.$Z$5]*MAGNET([.AG$24]+[.$BB55])+[.D$31]*[.$Z$5]*MAGNET([.D$24]+[.$BB55])+[.AH$31]*[.$Z$5]*MAGNET([.AH$24]+[.BB55]) +[.AI$31]*[.$Z$5]*MAGNET([.AI$24]+[.BB55]) +[.AJ$31]*[.$Z$5]*MAGNET([.AJ$24]+[.BB55]) +[.AK$31]*[.$Z$5]*MAGNET([.AK$24]+[.BB55]) +[.AL$31]*[.$Z$5]*MAGNET([.AL$24]+[.BB55]) +[.AM$31]*[.$Z$5]*MAGNET([.AM$24]+[.BB55]) +[.AN$31]*[.$Z$5]*MAGNET([.AN$24]+[.BB55]) +[.AO$31]*[.$Z$5]*MAGNET([.AO$24]+[.BB55]) +[.AP$31]*[.$Z$5]*MAGNET([.AP$24]+[.$BB55])&#10;+[.AQ$31]*[.$Z$5]*MAGNET([.AQ$24]+[.$BB55])&#10;+[.AR$31]*[.$Z$5]*MAGNET([.AR$24]+[.$BB55])&#10;+[.AS$31]*[.$Z$5]*MAGNET([.AS$24]+[.$BB55])&#10;+[.AT$31]*[.$Z$5]*MAGNET([.AT$24]+[.$BB55])&#10;+[.AU$31]*[.$Z$5]*MAGNET([.AU$24]+[.$BB55])&#10;+[.AV$31]*[.$Z$5]*MAGNET([.AV$24]+[.$BB55])&#10;+[.AW$31]*[.$Z$5]*MAGNET([.AW$24]+[.$BB55])&#10;+[.AX$31]*[.$Z$5]*MAGNET([.AX$24]+[.$BB55])&#10;+[.AY$31]*[.$Z$5]*MAGNET([.AY$24]+[.$BB55]) +RAND()*[.$BI$13]" office:value-type="float" office:value="0" calcext:value-type="float">
            <text:p>0</text:p>
          </table:table-cell>
          <table:table-cell table:style-name="ce71" table:formula="of:=[.E$32]*[.$Z$5]*MAGNET([.E$24]+[.$BB55])+[.F$32]*[.$Z$5]*MAGNET([.F$24]+[.$BB55])+[.G$32]*[.$Z$5]*MAGNET([.G$24]+[.$BB55])+[.H$32]*[.$Z$5]*MAGNET([.H$24]+[.$BB55])+[.I$32]*[.$Z$5]*MAGNET([.I$24]+[.$BB55])+[.J$32]*[.$Z$5]*MAGNET([.J$24]+[.$BB55])+[.K$32]*[.$Z$5]*MAGNET([.K$24]+[.$BB55])+[.L$32]*[.$Z$5]*MAGNET([.L$24]+[.$BB55])+[.M$32]*[.$Z$5]*MAGNET([.M$24]+[.$BB55])+[.N$32]*[.$Z$5]*MAGNET([.N$24]+[.$BB55])+[.O$32]*[.$Z$5]*MAGNET([.O$24]+[.$BB55])+[.P$32]*[.$Z$5]*MAGNET([.P$24]+[.$BB55])+[.Q$32]*[.$Z$5]*MAGNET([.Q$24]+[.$BB55])+[.R$32]*[.$Z$5]*MAGNET([.R$24]+[.$BB55])+[.S$32]*[.$Z$5]*MAGNET([.S$24]+[.$BB55])+[.T$32]*[.$Z$5]*MAGNET([.T$24]+[.$BB55])+[.U$32]*[.$Z$5]*MAGNET([.U$24]+[.$BB55])+[.V$32]*[.$Z$5]*MAGNET([.V$24]+[.$BB55])+[.W$32]*[.$Z$5]*MAGNET([.W$24]+[.$BB55])+[.X$32]*[.$Z$5]*MAGNET([.X$24]+[.$BB55])+[.Y$32]*[.$Z$5]*MAGNET([.Y$24]+[.$BB55])+[.Z$32]*[.$Z$5]*MAGNET([.Z$24]+[.$BB55])+[.AA$32]*[.$Z$5]*MAGNET([.AA$24]+[.$BB55])+[.AB$32]*[.$Z$5]*MAGNET([.AB$24]+[.$BB55])+[.AC$32]*[.$Z$5]*MAGNET([.AC$24]+[.$BB55])+[.AD$32]*[.$Z$5]*MAGNET([.AD$24]+[.$BB55])+[.AE$32]*[.$Z$5]*MAGNET([.AE$24]+[.$BB55])+[.AF$32]*[.$Z$5]*MAGNET([.AF$24]+[.$BB55])+[.AG$32]*[.$Z$5]*MAGNET([.AG$24]+[.$BB55])+[.D$32]*[.$Z$5]*MAGNET([.D$24]+[.$BB55])+[.AH$32]*[.$Z$5]*MAGNET([.AH$24]+[.BB55]) +[.AI$32]*[.$Z$5]*MAGNET([.AI$24]+[.BB55]) +[.AJ$32]*[.$Z$5]*MAGNET([.AJ$24]+[.BB55]) +[.AK$32]*[.$Z$5]*MAGNET([.AK$24]+[.BB55]) +[.AL$32]*[.$Z$5]*MAGNET([.AL$24]+[.BB55]) +[.AM$32]*[.$Z$5]*MAGNET([.AM$24]+[.BB55]) +[.AN$32]*[.$Z$5]*MAGNET([.AN$24]+[.BB55]) +[.AO$32]*[.$Z$5]*MAGNET([.AO$24]+[.BB55]) +[.AP$32]*[.$Z$5]*MAGNET([.AP$24]+[.$BB55])&#10;+[.AQ$32]*[.$Z$5]*MAGNET([.AQ$24]+[.$BB55])&#10;+[.AR$32]*[.$Z$5]*MAGNET([.AR$24]+[.$BB55])&#10;+[.AS$32]*[.$Z$5]*MAGNET([.AS$24]+[.$BB55])&#10;+[.AT$32]*[.$Z$5]*MAGNET([.AT$24]+[.$BB55])&#10;+[.AU$32]*[.$Z$5]*MAGNET([.AU$24]+[.$BB55])&#10;+[.AV$32]*[.$Z$5]*MAGNET([.AV$24]+[.$BB55])&#10;+[.AW$32]*[.$Z$5]*MAGNET([.AW$24]+[.$BB55])&#10;+[.AX$32]*[.$Z$5]*MAGNET([.AX$24]+[.$BB55])&#10;+[.AY$32]*[.$Z$5]*MAGNET([.AY$24]+[.$BB5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2"/>
          <table:table-cell table:style-name="ce4"/>
          <table:table-cell table:number-columns-repeated="49"/>
          <table:table-cell table:formula="of:=[.BA55]+0.002" office:value-type="float" office:value="0.0820000000000001" calcext:value-type="float">
            <text:p>0.0820000000000001</text:p>
          </table:table-cell>
          <table:table-cell table:formula="of:=[.BA56]*[.$D$6]" office:value-type="float" office:value="4.12176956150981" calcext:value-type="float">
            <text:p>4.122</text:p>
          </table:table-cell>
          <table:table-cell table:formula="of:=[.D$25]*[.$Z$5]*MAGNET([.D$24]+[.BB56])+[.E$25]*[.$Z$5]*MAGNET([.E$24]+[.BB56])+[.F$25]*[.$Z$5]*MAGNET([.F$24]+[.BB56])+[.G$25]*[.$Z$5]*MAGNET([.G$24]+[.BB56])+[.H$25]*[.$Z$5]*MAGNET([.H$24]+[.BB56])+[.I$25]*[.$Z$5]*MAGNET([.I$24]+[.BB56])+[.J$25]*[.$Z$5]*MAGNET([.J$24]+[.BB56])+[.K$25]*[.$Z$5]*MAGNET([.K$24]+[.BB56])+[.L$25]*[.$Z$5]*MAGNET([.L$24]+[.BB56])+[.M$25]*[.$Z$5]*MAGNET([.M$24]+[.BB56])+[.N$25]*[.$Z$5]*MAGNET([.N$24]+[.BB56])+[.O$25]*[.$Z$5]*MAGNET([.O$24]+[.BB56])+[.P$25]*[.$Z$5]*MAGNET([.P$24]+[.BB56])+[.Q$25]*[.$Z$5]*MAGNET([.Q$24]+[.BB56])+[.R$25]*[.$Z$5]*MAGNET([.R$24]+[.BB56])+[.S$25]*[.$Z$5]*MAGNET([.S$24]+[.BB56])+[.T$25]*[.$Z$5]*MAGNET([.T$24]+[.BB56])+[.U$25]*[.$Z$5]*MAGNET([.U$24]+[.BB56])+[.V$25]*[.$Z$5]*MAGNET([.V$24]+[.BB56])+[.W$25]*[.$Z$5]*MAGNET([.W$24]+[.BB56])+[.X$25]*[.$Z$5]*MAGNET([.X$24]+[.BB56])+[.Y$25]*[.$Z$5]*MAGNET([.Y$24]+[.BB56])+[.Z$25]*[.$Z$5]*MAGNET([.Z$24]+[.BB56])+[.AA$25]*[.$Z$5]*MAGNET([.AA$24]+[.BB56])+[.AB$25]*[.$Z$5]*MAGNET([.AB$24]+[.BB56])+[.AC$25]*[.$Z$5]*MAGNET([.AC$24]+[.BB56])+[.AD$25]*[.$Z$5]*MAGNET([.AD$24]+[.BB56])+[.AE$25]*[.$Z$5]*MAGNET([.AE$24]+[.BB56])+[.AF$25]*[.$Z$5]*MAGNET([.AF$24]+[.BB56])+[.AG$25]*[.$Z$5]*MAGNET([.AG$24]+[.BB56])+[.AH$25]*[.$Z$5]*MAGNET([.AH$24]+[.BB56]) +[.AI$25]*[.$Z$5]*MAGNET([.AI$24]+[.BB56]) +[.AJ$25]*[.$Z$5]*MAGNET([.AJ$24]+[.BB56]) +[.AK$25]*[.$Z$5]*MAGNET([.AK$24]+[.BB56]) +[.AL$25]*[.$Z$5]*MAGNET([.AL$24]+[.BB56]) +[.AM$25]*[.$Z$5]*MAGNET([.AM$24]+[.BB56]) +[.AN$25]*[.$Z$5]*MAGNET([.AN$24]+[.BB56]) +[.AO$25]*[.$Z$5]*MAGNET([.AO$24]+[.BB56])+RAND()*[.$BC$13]+[.AP$25]*[.$Z$5]*MAGNET([.AP$24]+[.BB56])&#10;+[.AQ$25]*[.$Z$5]*MAGNET([.AQ$24]+[.BB56])&#10;+[.AR$25]*[.$Z$5]*MAGNET([.AR$24]+[.BB56])&#10;+[.AS$25]*[.$Z$5]*MAGNET([.AS$24]+[.BB56])&#10;+[.AT$25]*[.$Z$5]*MAGNET([.AT$24]+[.BB56])&#10;+[.AU$25]*[.$Z$5]*MAGNET([.AU$24]+[.BB56])&#10;+[.AV$25]*[.$Z$5]*MAGNET([.AV$24]+[.BB56])&#10;+[.AW$25]*[.$Z$5]*MAGNET([.AW$24]+[.BB56])&#10;+[.AX$25]*[.$Z$5]*MAGNET([.AX$24]+[.BB56])&#10;+[.AY$25]*[.$Z$5]*MAGNET([.AY$24]+[.BB56])" office:value-type="float" office:value="-55.4885140603798" calcext:value-type="float">
            <text:p>-55.49</text:p>
          </table:table-cell>
          <table:table-cell table:style-name="ce70" table:formula="of:=[.E$26]*[.$Z$5]*MAGNET([.E$24]+[.$BB56])+[.F$26]*[.$Z$5]*MAGNET([.F$24]+[.$BB56])+[.G$26]*[.$Z$5]*MAGNET([.G$24]+[.$BB56])+[.H$26]*[.$Z$5]*MAGNET([.H$24]+[.$BB56])+[.I$26]*[.$Z$5]*MAGNET([.I$24]+[.$BB56])+[.J$26]*[.$Z$5]*MAGNET([.J$24]+[.$BB56])+[.K$26]*[.$Z$5]*MAGNET([.K$24]+[.$BB56])+[.L$26]*[.$Z$5]*MAGNET([.L$24]+[.$BB56])+[.M$26]*[.$Z$5]*MAGNET([.M$24]+[.$BB56])+[.N$26]*[.$Z$5]*MAGNET([.N$24]+[.$BB56])+[.O$26]*[.$Z$5]*MAGNET([.O$24]+[.$BB56])+[.P$26]*[.$Z$5]*MAGNET([.P$24]+[.$BB56])+[.Q$26]*[.$Z$5]*MAGNET([.Q$24]+[.$BB56])+[.R$26]*[.$Z$5]*MAGNET([.R$24]+[.$BB56])+[.S$26]*[.$Z$5]*MAGNET([.S$24]+[.$BB56])+[.T$26]*[.$Z$5]*MAGNET([.T$24]+[.$BB56])+[.U$26]*[.$Z$5]*MAGNET([.U$24]+[.$BB56])+[.V$26]*[.$Z$5]*MAGNET([.V$24]+[.$BB56])+[.W$26]*[.$Z$5]*MAGNET([.W$24]+[.$BB56])+[.X$26]*[.$Z$5]*MAGNET([.X$24]+[.$BB56])+[.Y$26]*[.$Z$5]*MAGNET([.Y$24]+[.$BB56])+[.Z$26]*[.$Z$5]*MAGNET([.Z$24]+[.$BB56])+[.AA$26]*[.$Z$5]*MAGNET([.AA$24]+[.$BB56])+[.AB$26]*[.$Z$5]*MAGNET([.AB$24]+[.$BB56])+[.AC$26]*[.$Z$5]*MAGNET([.AC$24]+[.$BB56])+[.AD$26]*[.$Z$5]*MAGNET([.AD$24]+[.$BB56])+[.AE$26]*[.$Z$5]*MAGNET([.AE$24]+[.$BB56])+[.AF$26]*[.$Z$5]*MAGNET([.AF$24]+[.$BB56])+[.AG$26]*[.$Z$5]*MAGNET([.AG$24]+[.$BB56])+[.D$26]*[.$Z$5]*MAGNET([.D$24]+[.$BB56])+[.AH$26]*[.$Z$5]*MAGNET([.AH$24]+[.BB56]) +[.AI$26]*[.$Z$5]*MAGNET([.AI$24]+[.BB56]) +[.AJ$26]*[.$Z$5]*MAGNET([.AJ$24]+[.BB56]) +[.AK$26]*[.$Z$5]*MAGNET([.AK$24]+[.BB56]) +[.AL$26]*[.$Z$5]*MAGNET([.AL$24]+[.BB56]) +[.AM$26]*[.$Z$5]*MAGNET([.AM$24]+[.BB56]) +[.AN$26]*[.$Z$5]*MAGNET([.AN$24]+[.BB56]) +[.AO$26]*[.$Z$5]*MAGNET([.AO$24]+[.BB56]) +[.AP$26]*[.$Z$5]*MAGNET([.AP$24]+[.$BB56])&#10;+[.AQ$26]*[.$Z$5]*MAGNET([.AQ$24]+[.$BB56])&#10;+[.AR$26]*[.$Z$5]*MAGNET([.AR$24]+[.$BB56])&#10;+[.AS$26]*[.$Z$5]*MAGNET([.AS$24]+[.$BB56])&#10;+[.AT$26]*[.$Z$5]*MAGNET([.AT$24]+[.$BB56])&#10;+[.AU$26]*[.$Z$5]*MAGNET([.AU$24]+[.$BB56])&#10;+[.AV$26]*[.$Z$5]*MAGNET([.AV$24]+[.$BB56])&#10;+[.AW$26]*[.$Z$5]*MAGNET([.AW$24]+[.$BB56])&#10;+[.AX$26]*[.$Z$5]*MAGNET([.AX$24]+[.$BB56])&#10;+[.AY$26]*[.$Z$5]*MAGNET([.AY$24]+[.$BB56]) +RAND()*[.$BD$13]" office:value-type="float" office:value="-34.5298260113916" calcext:value-type="float">
            <text:p>-34.53</text:p>
          </table:table-cell>
          <table:table-cell table:style-name="ce71" table:formula="of:=[.E$27]*[.$Z$5]*MAGNET([.E$24]+[.$BB56])+[.F$27]*[.$Z$5]*MAGNET([.F$24]+[.$BB56])+[.G$27]*[.$Z$5]*MAGNET([.G$24]+[.$BB56])+[.H$27]*[.$Z$5]*MAGNET([.H$24]+[.$BB56])+[.I$27]*[.$Z$5]*MAGNET([.I$24]+[.$BB56])+[.J$27]*[.$Z$5]*MAGNET([.J$24]+[.$BB56])+[.K$27]*[.$Z$5]*MAGNET([.K$24]+[.$BB56])+[.L$27]*[.$Z$5]*MAGNET([.L$24]+[.$BB56])+[.M$27]*[.$Z$5]*MAGNET([.M$24]+[.$BB56])+[.N$27]*[.$Z$5]*MAGNET([.N$24]+[.$BB56])+[.O$27]*[.$Z$5]*MAGNET([.O$24]+[.$BB56])+[.P$27]*[.$Z$5]*MAGNET([.P$24]+[.$BB56])+[.Q$27]*[.$Z$5]*MAGNET([.Q$24]+[.$BB56])+[.R$27]*[.$Z$5]*MAGNET([.R$24]+[.$BB56])+[.S$27]*[.$Z$5]*MAGNET([.S$24]+[.$BB56])+[.T$27]*[.$Z$5]*MAGNET([.T$24]+[.$BB56])+[.U$27]*[.$Z$5]*MAGNET([.U$24]+[.$BB56])+[.V$27]*[.$Z$5]*MAGNET([.V$24]+[.$BB56])+[.W$27]*[.$Z$5]*MAGNET([.W$24]+[.$BB56])+[.X$27]*[.$Z$5]*MAGNET([.X$24]+[.$BB56])+[.Y$27]*[.$Z$5]*MAGNET([.Y$24]+[.$BB56])+[.Z$27]*[.$Z$5]*MAGNET([.Z$24]+[.$BB56])+[.AA$27]*[.$Z$5]*MAGNET([.AA$24]+[.$BB56])+[.AB$27]*[.$Z$5]*MAGNET([.AB$24]+[.$BB56])+[.AC$27]*[.$Z$5]*MAGNET([.AC$24]+[.$BB56])+[.AD$27]*[.$Z$5]*MAGNET([.AD$24]+[.$BB56])+[.AE$27]*[.$Z$5]*MAGNET([.AE$24]+[.$BB56])+[.AF$27]*[.$Z$5]*MAGNET([.AF$24]+[.$BB56])+[.AG$27]*[.$Z$5]*MAGNET([.AG$24]+[.$BB56])+[.D$27]*[.$Z$5]*MAGNET([.D$24]+[.$BB56])+[.AH$27]*[.$Z$5]*MAGNET([.AH$24]+[.BB56]) +[.AI$27]*[.$Z$5]*MAGNET([.AI$24]+[.BB56]) +[.AJ$27]*[.$Z$5]*MAGNET([.AJ$24]+[.BB56]) +[.AK$27]*[.$Z$5]*MAGNET([.AK$24]+[.BB56]) +[.AL$27]*[.$Z$5]*MAGNET([.AL$24]+[.BB56]) +[.AM$27]*[.$Z$5]*MAGNET([.AM$24]+[.BB56]) +[.AN$27]*[.$Z$5]*MAGNET([.AN$24]+[.BB56]) +[.AO$27]*[.$Z$5]*MAGNET([.AO$24]+[.BB56]) +[.AP$27]*[.$Z$5]*MAGNET([.AP$24]+[.$BB56])&#10;+[.AQ$27]*[.$Z$5]*MAGNET([.AQ$24]+[.$BB56])&#10;+[.AR$27]*[.$Z$5]*MAGNET([.AR$24]+[.$BB56])&#10;+[.AS$27]*[.$Z$5]*MAGNET([.AS$24]+[.$BB56])&#10;+[.AT$27]*[.$Z$5]*MAGNET([.AT$24]+[.$BB56])&#10;+[.AU$27]*[.$Z$5]*MAGNET([.AU$24]+[.$BB56])&#10;+[.AV$27]*[.$Z$5]*MAGNET([.AV$24]+[.$BB56])&#10;+[.AW$27]*[.$Z$5]*MAGNET([.AW$24]+[.$BB56])&#10;+[.AX$27]*[.$Z$5]*MAGNET([.AX$24]+[.$BB56])&#10;+[.AY$27]*[.$Z$5]*MAGNET([.AY$24]+[.$BB56]) +RAND()*[.$BE$13]" office:value-type="float" office:value="134.769538773867" calcext:value-type="float">
            <text:p>134.769538773867</text:p>
          </table:table-cell>
          <table:table-cell table:style-name="ce71" table:formula="of:=[.E$28]*[.$Z$5]*MAGNET([.E$24]+[.$BB56])+[.F$28]*[.$Z$5]*MAGNET([.F$24]+[.$BB56])+[.G$28]*[.$Z$5]*MAGNET([.G$24]+[.$BB56])+[.H$28]*[.$Z$5]*MAGNET([.H$24]+[.$BB56])+[.I$28]*[.$Z$5]*MAGNET([.I$24]+[.$BB56])+[.J$28]*[.$Z$5]*MAGNET([.J$24]+[.$BB56])+[.K$28]*[.$Z$5]*MAGNET([.K$24]+[.$BB56])+[.L$28]*[.$Z$5]*MAGNET([.L$24]+[.$BB56])+[.M$28]*[.$Z$5]*MAGNET([.M$24]+[.$BB56])+[.N$28]*[.$Z$5]*MAGNET([.N$24]+[.$BB56])+[.O$28]*[.$Z$5]*MAGNET([.O$24]+[.$BB56])+[.P$28]*[.$Z$5]*MAGNET([.P$24]+[.$BB56])+[.Q$28]*[.$Z$5]*MAGNET([.Q$24]+[.$BB56])+[.R$28]*[.$Z$5]*MAGNET([.R$24]+[.$BB56])+[.S$28]*[.$Z$5]*MAGNET([.S$24]+[.$BB56])+[.T$28]*[.$Z$5]*MAGNET([.T$24]+[.$BB56])+[.U$28]*[.$Z$5]*MAGNET([.U$24]+[.$BB56])+[.V$28]*[.$Z$5]*MAGNET([.V$24]+[.$BB56])+[.W$28]*[.$Z$5]*MAGNET([.W$24]+[.$BB56])+[.X$28]*[.$Z$5]*MAGNET([.X$24]+[.$BB56])+[.Y$28]*[.$Z$5]*MAGNET([.Y$24]+[.$BB56])+[.Z$28]*[.$Z$5]*MAGNET([.Z$24]+[.$BB56])+[.AA$28]*[.$Z$5]*MAGNET([.AA$24]+[.$BB56])+[.AB$28]*[.$Z$5]*MAGNET([.AB$24]+[.$BB56])+[.AC$28]*[.$Z$5]*MAGNET([.AC$24]+[.$BB56])+[.AD$28]*[.$Z$5]*MAGNET([.AD$24]+[.$BB56])+[.AE$28]*[.$Z$5]*MAGNET([.AE$24]+[.$BB56])+[.AF$28]*[.$Z$5]*MAGNET([.AF$24]+[.$BB56])+[.AG$28]*[.$Z$5]*MAGNET([.AG$24]+[.$BB56])+[.D$28]*[.$Z$5]*MAGNET([.D$24]+[.$BB56])+[.AH$28]*[.$Z$5]*MAGNET([.AH$24]+[.BB56]) +[.AI$28]*[.$Z$5]*MAGNET([.AI$24]+[.BB56]) +[.AJ$28]*[.$Z$5]*MAGNET([.AJ$24]+[.BB56]) +[.AK$28]*[.$Z$5]*MAGNET([.AK$24]+[.BB56]) +[.AL$28]*[.$Z$5]*MAGNET([.AL$24]+[.BB56]) +[.AM$28]*[.$Z$5]*MAGNET([.AM$24]+[.BB56]) +[.AN$28]*[.$Z$5]*MAGNET([.AN$24]+[.BB56]) +[.AO$28]*[.$Z$5]*MAGNET([.AO$24]+[.BB56]) +[.AP$28]*[.$Z$5]*MAGNET([.AP$24]+[.$BB56])&#10;+[.AQ$28]*[.$Z$5]*MAGNET([.AQ$24]+[.$BB56])&#10;+[.AR$28]*[.$Z$5]*MAGNET([.AR$24]+[.$BB56])&#10;+[.AS$28]*[.$Z$5]*MAGNET([.AS$24]+[.$BB56])&#10;+[.AT$28]*[.$Z$5]*MAGNET([.AT$24]+[.$BB56])&#10;+[.AU$28]*[.$Z$5]*MAGNET([.AU$24]+[.$BB56])&#10;+[.AV$28]*[.$Z$5]*MAGNET([.AV$24]+[.$BB56])&#10;+[.AW$28]*[.$Z$5]*MAGNET([.AW$24]+[.$BB56])&#10;+[.AX$28]*[.$Z$5]*MAGNET([.AX$24]+[.$BB56])&#10;+[.AY$28]*[.$Z$5]*MAGNET([.AY$24]+[.$BB56]) +RAND()*[.$BF$13]" office:value-type="float" office:value="18.9394051008791" calcext:value-type="float">
            <text:p>18.9394051008791</text:p>
          </table:table-cell>
          <table:table-cell table:style-name="ce71" table:formula="of:=[.E$29]*[.$Z$5]*MAGNET([.E$24]+[.$BB56])+[.F$29]*[.$Z$5]*MAGNET([.F$24]+[.$BB56])+[.G$29]*[.$Z$5]*MAGNET([.G$24]+[.$BB56])+[.H$29]*[.$Z$5]*MAGNET([.H$24]+[.$BB56])+[.I$29]*[.$Z$5]*MAGNET([.I$24]+[.$BB56])+[.J$29]*[.$Z$5]*MAGNET([.J$24]+[.$BB56])+[.K$29]*[.$Z$5]*MAGNET([.K$24]+[.$BB56])+[.L$29]*[.$Z$5]*MAGNET([.L$24]+[.$BB56])+[.M$29]*[.$Z$5]*MAGNET([.M$24]+[.$BB56])+[.N$29]*[.$Z$5]*MAGNET([.N$24]+[.$BB56])+[.O$29]*[.$Z$5]*MAGNET([.O$24]+[.$BB56])+[.P$29]*[.$Z$5]*MAGNET([.P$24]+[.$BB56])+[.Q$29]*[.$Z$5]*MAGNET([.Q$24]+[.$BB56])+[.R$29]*[.$Z$5]*MAGNET([.R$24]+[.$BB56])+[.S$29]*[.$Z$5]*MAGNET([.S$24]+[.$BB56])+[.T$29]*[.$Z$5]*MAGNET([.T$24]+[.$BB56])+[.U$29]*[.$Z$5]*MAGNET([.U$24]+[.$BB56])+[.V$29]*[.$Z$5]*MAGNET([.V$24]+[.$BB56])+[.W$29]*[.$Z$5]*MAGNET([.W$24]+[.$BB56])+[.X$29]*[.$Z$5]*MAGNET([.X$24]+[.$BB56])+[.Y$29]*[.$Z$5]*MAGNET([.Y$24]+[.$BB56])+[.Z$29]*[.$Z$5]*MAGNET([.Z$24]+[.$BB56])+[.AA$29]*[.$Z$5]*MAGNET([.AA$24]+[.$BB56])+[.AB$29]*[.$Z$5]*MAGNET([.AB$24]+[.$BB56])+[.AC$29]*[.$Z$5]*MAGNET([.AC$24]+[.$BB56])+[.AD$29]*[.$Z$5]*MAGNET([.AD$24]+[.$BB56])+[.AE$29]*[.$Z$5]*MAGNET([.AE$24]+[.$BB56])+[.AF$29]*[.$Z$5]*MAGNET([.AF$24]+[.$BB56])+[.AG$29]*[.$Z$5]*MAGNET([.AG$24]+[.$BB56])+[.D$29]*[.$Z$5]*MAGNET([.D$24]+[.$BB56])+[.AH$29]*[.$Z$5]*MAGNET([.AH$24]+[.BB56]) +[.AI$29]*[.$Z$5]*MAGNET([.AI$24]+[.BB56]) +[.AJ$29]*[.$Z$5]*MAGNET([.AJ$24]+[.BB56]) +[.AK$29]*[.$Z$5]*MAGNET([.AK$24]+[.BB56]) +[.AL$29]*[.$Z$5]*MAGNET([.AL$24]+[.BB56]) +[.AM$29]*[.$Z$5]*MAGNET([.AM$24]+[.BB56]) +[.AN$29]*[.$Z$5]*MAGNET([.AN$24]+[.BB56]) +[.AO$29]*[.$Z$5]*MAGNET([.AO$24]+[.BB56]) +[.AP$29]*[.$Z$5]*MAGNET([.AP$24]+[.$BB56])&#10;+[.AQ$29]*[.$Z$5]*MAGNET([.AQ$24]+[.$BB56])&#10;+[.AR$29]*[.$Z$5]*MAGNET([.AR$24]+[.$BB56])&#10;+[.AS$29]*[.$Z$5]*MAGNET([.AS$24]+[.$BB56])&#10;+[.AT$29]*[.$Z$5]*MAGNET([.AT$24]+[.$BB56])&#10;+[.AU$29]*[.$Z$5]*MAGNET([.AU$24]+[.$BB56])&#10;+[.AV$29]*[.$Z$5]*MAGNET([.AV$24]+[.$BB56])&#10;+[.AW$29]*[.$Z$5]*MAGNET([.AW$24]+[.$BB56])&#10;+[.AX$29]*[.$Z$5]*MAGNET([.AX$24]+[.$BB56])&#10;+[.AY$29]*[.$Z$5]*MAGNET([.AY$24]+[.$BB56]) +RAND()*[.$BG$13]" office:value-type="float" office:value="-44.838406860361" calcext:value-type="float">
            <text:p>-44.838406860361</text:p>
          </table:table-cell>
          <table:table-cell table:style-name="ce71" table:formula="of:=[.E$30]*[.$Z$5]*MAGNET([.E$24]+[.$BB56])+[.F$30]*[.$Z$5]*MAGNET([.F$24]+[.$BB56])+[.G$30]*[.$Z$5]*MAGNET([.G$24]+[.$BB56])+[.H$30]*[.$Z$5]*MAGNET([.H$24]+[.$BB56])+[.I$30]*[.$Z$5]*MAGNET([.I$24]+[.$BB56])+[.J$30]*[.$Z$5]*MAGNET([.J$24]+[.$BB56])+[.K$30]*[.$Z$5]*MAGNET([.K$24]+[.$BB56])+[.L$30]*[.$Z$5]*MAGNET([.L$24]+[.$BB56])+[.M$30]*[.$Z$5]*MAGNET([.M$24]+[.$BB56])+[.N$30]*[.$Z$5]*MAGNET([.N$24]+[.$BB56])+[.O$30]*[.$Z$5]*MAGNET([.O$24]+[.$BB56])+[.P$30]*[.$Z$5]*MAGNET([.P$24]+[.$BB56])+[.Q$30]*[.$Z$5]*MAGNET([.Q$24]+[.$BB56])+[.R$30]*[.$Z$5]*MAGNET([.R$24]+[.$BB56])+[.S$30]*[.$Z$5]*MAGNET([.S$24]+[.$BB56])+[.T$30]*[.$Z$5]*MAGNET([.T$24]+[.$BB56])+[.U$30]*[.$Z$5]*MAGNET([.U$24]+[.$BB56])+[.V$30]*[.$Z$5]*MAGNET([.V$24]+[.$BB56])+[.W$30]*[.$Z$5]*MAGNET([.W$24]+[.$BB56])+[.X$30]*[.$Z$5]*MAGNET([.X$24]+[.$BB56])+[.Y$30]*[.$Z$5]*MAGNET([.Y$24]+[.$BB56])+[.Z$30]*[.$Z$5]*MAGNET([.Z$24]+[.$BB56])+[.AA$30]*[.$Z$5]*MAGNET([.AA$24]+[.$BB56])+[.AB$30]*[.$Z$5]*MAGNET([.AB$24]+[.$BB56])+[.AC$30]*[.$Z$5]*MAGNET([.AC$24]+[.$BB56])+[.AD$30]*[.$Z$5]*MAGNET([.AD$24]+[.$BB56])+[.AE$30]*[.$Z$5]*MAGNET([.AE$24]+[.$BB56])+[.AF$30]*[.$Z$5]*MAGNET([.AF$24]+[.$BB56])+[.AG$30]*[.$Z$5]*MAGNET([.AG$24]+[.$BB56])+[.D$30]*[.$Z$5]*MAGNET([.D$24]+[.$BB56])+[.AH$30]*[.$Z$5]*MAGNET([.AH$24]+[.BB56]) +[.AI$30]*[.$Z$5]*MAGNET([.AI$24]+[.BB56]) +[.AJ$30]*[.$Z$5]*MAGNET([.AJ$24]+[.BB56]) +[.AK$30]*[.$Z$5]*MAGNET([.AK$24]+[.BB56]) +[.AL$30]*[.$Z$5]*MAGNET([.AL$24]+[.BB56]) +[.AM$30]*[.$Z$5]*MAGNET([.AM$24]+[.BB56]) +[.AN$30]*[.$Z$5]*MAGNET([.AN$24]+[.BB56]) +[.AO$30]*[.$Z$5]*MAGNET([.AO$24]+[.BB56]) +[.AP$30]*[.$Z$5]*MAGNET([.AP$24]+[.$BB56])&#10;+[.AQ$30]*[.$Z$5]*MAGNET([.AQ$24]+[.$BB56])&#10;+[.AR$30]*[.$Z$5]*MAGNET([.AR$24]+[.$BB56])&#10;+[.AS$30]*[.$Z$5]*MAGNET([.AS$24]+[.$BB56])&#10;+[.AT$30]*[.$Z$5]*MAGNET([.AT$24]+[.$BB56])&#10;+[.AU$30]*[.$Z$5]*MAGNET([.AU$24]+[.$BB56])&#10;+[.AV$30]*[.$Z$5]*MAGNET([.AV$24]+[.$BB56])&#10;+[.AW$30]*[.$Z$5]*MAGNET([.AW$24]+[.$BB56])&#10;+[.AX$30]*[.$Z$5]*MAGNET([.AX$24]+[.$BB56])&#10;+[.AY$30]*[.$Z$5]*MAGNET([.AY$24]+[.$BB56]) +RAND()*[.$BH$13]" office:value-type="float" office:value="0" calcext:value-type="float">
            <text:p>0</text:p>
          </table:table-cell>
          <table:table-cell table:style-name="ce71" table:formula="of:=[.E$31]*[.$Z$5]*MAGNET([.E$24]+[.$BB56])+[.F$31]*[.$Z$5]*MAGNET([.F$24]+[.$BB56])+[.G$31]*[.$Z$5]*MAGNET([.G$24]+[.$BB56])+[.H$31]*[.$Z$5]*MAGNET([.H$24]+[.$BB56])+[.I$31]*[.$Z$5]*MAGNET([.I$24]+[.$BB56])+[.J$31]*[.$Z$5]*MAGNET([.J$24]+[.$BB56])+[.K$31]*[.$Z$5]*MAGNET([.K$24]+[.$BB56])+[.L$31]*[.$Z$5]*MAGNET([.L$24]+[.$BB56])+[.M$31]*[.$Z$5]*MAGNET([.M$24]+[.$BB56])+[.N$31]*[.$Z$5]*MAGNET([.N$24]+[.$BB56])+[.O$31]*[.$Z$5]*MAGNET([.O$24]+[.$BB56])+[.P$31]*[.$Z$5]*MAGNET([.P$24]+[.$BB56])+[.Q$31]*[.$Z$5]*MAGNET([.Q$24]+[.$BB56])+[.R$31]*[.$Z$5]*MAGNET([.R$24]+[.$BB56])+[.S$31]*[.$Z$5]*MAGNET([.S$24]+[.$BB56])+[.T$31]*[.$Z$5]*MAGNET([.T$24]+[.$BB56])+[.U$31]*[.$Z$5]*MAGNET([.U$24]+[.$BB56])+[.V$31]*[.$Z$5]*MAGNET([.V$24]+[.$BB56])+[.W$31]*[.$Z$5]*MAGNET([.W$24]+[.$BB56])+[.X$31]*[.$Z$5]*MAGNET([.X$24]+[.$BB56])+[.Y$31]*[.$Z$5]*MAGNET([.Y$24]+[.$BB56])+[.Z$31]*[.$Z$5]*MAGNET([.Z$24]+[.$BB56])+[.AA$31]*[.$Z$5]*MAGNET([.AA$24]+[.$BB56])+[.AB$31]*[.$Z$5]*MAGNET([.AB$24]+[.$BB56])+[.AC$31]*[.$Z$5]*MAGNET([.AC$24]+[.$BB56])+[.AD$31]*[.$Z$5]*MAGNET([.AD$24]+[.$BB56])+[.AE$31]*[.$Z$5]*MAGNET([.AE$24]+[.$BB56])+[.AF$31]*[.$Z$5]*MAGNET([.AF$24]+[.$BB56])+[.AG$31]*[.$Z$5]*MAGNET([.AG$24]+[.$BB56])+[.D$31]*[.$Z$5]*MAGNET([.D$24]+[.$BB56])+[.AH$31]*[.$Z$5]*MAGNET([.AH$24]+[.BB56]) +[.AI$31]*[.$Z$5]*MAGNET([.AI$24]+[.BB56]) +[.AJ$31]*[.$Z$5]*MAGNET([.AJ$24]+[.BB56]) +[.AK$31]*[.$Z$5]*MAGNET([.AK$24]+[.BB56]) +[.AL$31]*[.$Z$5]*MAGNET([.AL$24]+[.BB56]) +[.AM$31]*[.$Z$5]*MAGNET([.AM$24]+[.BB56]) +[.AN$31]*[.$Z$5]*MAGNET([.AN$24]+[.BB56]) +[.AO$31]*[.$Z$5]*MAGNET([.AO$24]+[.BB56]) +[.AP$31]*[.$Z$5]*MAGNET([.AP$24]+[.$BB56])&#10;+[.AQ$31]*[.$Z$5]*MAGNET([.AQ$24]+[.$BB56])&#10;+[.AR$31]*[.$Z$5]*MAGNET([.AR$24]+[.$BB56])&#10;+[.AS$31]*[.$Z$5]*MAGNET([.AS$24]+[.$BB56])&#10;+[.AT$31]*[.$Z$5]*MAGNET([.AT$24]+[.$BB56])&#10;+[.AU$31]*[.$Z$5]*MAGNET([.AU$24]+[.$BB56])&#10;+[.AV$31]*[.$Z$5]*MAGNET([.AV$24]+[.$BB56])&#10;+[.AW$31]*[.$Z$5]*MAGNET([.AW$24]+[.$BB56])&#10;+[.AX$31]*[.$Z$5]*MAGNET([.AX$24]+[.$BB56])&#10;+[.AY$31]*[.$Z$5]*MAGNET([.AY$24]+[.$BB56]) +RAND()*[.$BI$13]" office:value-type="float" office:value="0" calcext:value-type="float">
            <text:p>0</text:p>
          </table:table-cell>
          <table:table-cell table:style-name="ce71" table:formula="of:=[.E$32]*[.$Z$5]*MAGNET([.E$24]+[.$BB56])+[.F$32]*[.$Z$5]*MAGNET([.F$24]+[.$BB56])+[.G$32]*[.$Z$5]*MAGNET([.G$24]+[.$BB56])+[.H$32]*[.$Z$5]*MAGNET([.H$24]+[.$BB56])+[.I$32]*[.$Z$5]*MAGNET([.I$24]+[.$BB56])+[.J$32]*[.$Z$5]*MAGNET([.J$24]+[.$BB56])+[.K$32]*[.$Z$5]*MAGNET([.K$24]+[.$BB56])+[.L$32]*[.$Z$5]*MAGNET([.L$24]+[.$BB56])+[.M$32]*[.$Z$5]*MAGNET([.M$24]+[.$BB56])+[.N$32]*[.$Z$5]*MAGNET([.N$24]+[.$BB56])+[.O$32]*[.$Z$5]*MAGNET([.O$24]+[.$BB56])+[.P$32]*[.$Z$5]*MAGNET([.P$24]+[.$BB56])+[.Q$32]*[.$Z$5]*MAGNET([.Q$24]+[.$BB56])+[.R$32]*[.$Z$5]*MAGNET([.R$24]+[.$BB56])+[.S$32]*[.$Z$5]*MAGNET([.S$24]+[.$BB56])+[.T$32]*[.$Z$5]*MAGNET([.T$24]+[.$BB56])+[.U$32]*[.$Z$5]*MAGNET([.U$24]+[.$BB56])+[.V$32]*[.$Z$5]*MAGNET([.V$24]+[.$BB56])+[.W$32]*[.$Z$5]*MAGNET([.W$24]+[.$BB56])+[.X$32]*[.$Z$5]*MAGNET([.X$24]+[.$BB56])+[.Y$32]*[.$Z$5]*MAGNET([.Y$24]+[.$BB56])+[.Z$32]*[.$Z$5]*MAGNET([.Z$24]+[.$BB56])+[.AA$32]*[.$Z$5]*MAGNET([.AA$24]+[.$BB56])+[.AB$32]*[.$Z$5]*MAGNET([.AB$24]+[.$BB56])+[.AC$32]*[.$Z$5]*MAGNET([.AC$24]+[.$BB56])+[.AD$32]*[.$Z$5]*MAGNET([.AD$24]+[.$BB56])+[.AE$32]*[.$Z$5]*MAGNET([.AE$24]+[.$BB56])+[.AF$32]*[.$Z$5]*MAGNET([.AF$24]+[.$BB56])+[.AG$32]*[.$Z$5]*MAGNET([.AG$24]+[.$BB56])+[.D$32]*[.$Z$5]*MAGNET([.D$24]+[.$BB56])+[.AH$32]*[.$Z$5]*MAGNET([.AH$24]+[.BB56]) +[.AI$32]*[.$Z$5]*MAGNET([.AI$24]+[.BB56]) +[.AJ$32]*[.$Z$5]*MAGNET([.AJ$24]+[.BB56]) +[.AK$32]*[.$Z$5]*MAGNET([.AK$24]+[.BB56]) +[.AL$32]*[.$Z$5]*MAGNET([.AL$24]+[.BB56]) +[.AM$32]*[.$Z$5]*MAGNET([.AM$24]+[.BB56]) +[.AN$32]*[.$Z$5]*MAGNET([.AN$24]+[.BB56]) +[.AO$32]*[.$Z$5]*MAGNET([.AO$24]+[.BB56]) +[.AP$32]*[.$Z$5]*MAGNET([.AP$24]+[.$BB56])&#10;+[.AQ$32]*[.$Z$5]*MAGNET([.AQ$24]+[.$BB56])&#10;+[.AR$32]*[.$Z$5]*MAGNET([.AR$24]+[.$BB56])&#10;+[.AS$32]*[.$Z$5]*MAGNET([.AS$24]+[.$BB56])&#10;+[.AT$32]*[.$Z$5]*MAGNET([.AT$24]+[.$BB56])&#10;+[.AU$32]*[.$Z$5]*MAGNET([.AU$24]+[.$BB56])&#10;+[.AV$32]*[.$Z$5]*MAGNET([.AV$24]+[.$BB56])&#10;+[.AW$32]*[.$Z$5]*MAGNET([.AW$24]+[.$BB56])&#10;+[.AX$32]*[.$Z$5]*MAGNET([.AX$24]+[.$BB56])&#10;+[.AY$32]*[.$Z$5]*MAGNET([.AY$24]+[.$BB5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56]+0.002" office:value-type="float" office:value="0.0840000000000001" calcext:value-type="float">
            <text:p>0.0840000000000001</text:p>
          </table:table-cell>
          <table:table-cell table:formula="of:=[.BA57]*[.$D$6]" office:value-type="float" office:value="4.22230052642469" calcext:value-type="float">
            <text:p>4.222</text:p>
          </table:table-cell>
          <table:table-cell table:formula="of:=[.D$25]*[.$Z$5]*MAGNET([.D$24]+[.BB57])+[.E$25]*[.$Z$5]*MAGNET([.E$24]+[.BB57])+[.F$25]*[.$Z$5]*MAGNET([.F$24]+[.BB57])+[.G$25]*[.$Z$5]*MAGNET([.G$24]+[.BB57])+[.H$25]*[.$Z$5]*MAGNET([.H$24]+[.BB57])+[.I$25]*[.$Z$5]*MAGNET([.I$24]+[.BB57])+[.J$25]*[.$Z$5]*MAGNET([.J$24]+[.BB57])+[.K$25]*[.$Z$5]*MAGNET([.K$24]+[.BB57])+[.L$25]*[.$Z$5]*MAGNET([.L$24]+[.BB57])+[.M$25]*[.$Z$5]*MAGNET([.M$24]+[.BB57])+[.N$25]*[.$Z$5]*MAGNET([.N$24]+[.BB57])+[.O$25]*[.$Z$5]*MAGNET([.O$24]+[.BB57])+[.P$25]*[.$Z$5]*MAGNET([.P$24]+[.BB57])+[.Q$25]*[.$Z$5]*MAGNET([.Q$24]+[.BB57])+[.R$25]*[.$Z$5]*MAGNET([.R$24]+[.BB57])+[.S$25]*[.$Z$5]*MAGNET([.S$24]+[.BB57])+[.T$25]*[.$Z$5]*MAGNET([.T$24]+[.BB57])+[.U$25]*[.$Z$5]*MAGNET([.U$24]+[.BB57])+[.V$25]*[.$Z$5]*MAGNET([.V$24]+[.BB57])+[.W$25]*[.$Z$5]*MAGNET([.W$24]+[.BB57])+[.X$25]*[.$Z$5]*MAGNET([.X$24]+[.BB57])+[.Y$25]*[.$Z$5]*MAGNET([.Y$24]+[.BB57])+[.Z$25]*[.$Z$5]*MAGNET([.Z$24]+[.BB57])+[.AA$25]*[.$Z$5]*MAGNET([.AA$24]+[.BB57])+[.AB$25]*[.$Z$5]*MAGNET([.AB$24]+[.BB57])+[.AC$25]*[.$Z$5]*MAGNET([.AC$24]+[.BB57])+[.AD$25]*[.$Z$5]*MAGNET([.AD$24]+[.BB57])+[.AE$25]*[.$Z$5]*MAGNET([.AE$24]+[.BB57])+[.AF$25]*[.$Z$5]*MAGNET([.AF$24]+[.BB57])+[.AG$25]*[.$Z$5]*MAGNET([.AG$24]+[.BB57])+[.AH$25]*[.$Z$5]*MAGNET([.AH$24]+[.BB57]) +[.AI$25]*[.$Z$5]*MAGNET([.AI$24]+[.BB57]) +[.AJ$25]*[.$Z$5]*MAGNET([.AJ$24]+[.BB57]) +[.AK$25]*[.$Z$5]*MAGNET([.AK$24]+[.BB57]) +[.AL$25]*[.$Z$5]*MAGNET([.AL$24]+[.BB57]) +[.AM$25]*[.$Z$5]*MAGNET([.AM$24]+[.BB57]) +[.AN$25]*[.$Z$5]*MAGNET([.AN$24]+[.BB57]) +[.AO$25]*[.$Z$5]*MAGNET([.AO$24]+[.BB57])+RAND()*[.$BC$13]+[.AP$25]*[.$Z$5]*MAGNET([.AP$24]+[.BB57])&#10;+[.AQ$25]*[.$Z$5]*MAGNET([.AQ$24]+[.BB57])&#10;+[.AR$25]*[.$Z$5]*MAGNET([.AR$24]+[.BB57])&#10;+[.AS$25]*[.$Z$5]*MAGNET([.AS$24]+[.BB57])&#10;+[.AT$25]*[.$Z$5]*MAGNET([.AT$24]+[.BB57])&#10;+[.AU$25]*[.$Z$5]*MAGNET([.AU$24]+[.BB57])&#10;+[.AV$25]*[.$Z$5]*MAGNET([.AV$24]+[.BB57])&#10;+[.AW$25]*[.$Z$5]*MAGNET([.AW$24]+[.BB57])&#10;+[.AX$25]*[.$Z$5]*MAGNET([.AX$24]+[.BB57])&#10;+[.AY$25]*[.$Z$5]*MAGNET([.AY$24]+[.BB57])" office:value-type="float" office:value="-70.2522230781151" calcext:value-type="float">
            <text:p>-70.25</text:p>
          </table:table-cell>
          <table:table-cell table:style-name="ce70" table:formula="of:=[.E$26]*[.$Z$5]*MAGNET([.E$24]+[.$BB57])+[.F$26]*[.$Z$5]*MAGNET([.F$24]+[.$BB57])+[.G$26]*[.$Z$5]*MAGNET([.G$24]+[.$BB57])+[.H$26]*[.$Z$5]*MAGNET([.H$24]+[.$BB57])+[.I$26]*[.$Z$5]*MAGNET([.I$24]+[.$BB57])+[.J$26]*[.$Z$5]*MAGNET([.J$24]+[.$BB57])+[.K$26]*[.$Z$5]*MAGNET([.K$24]+[.$BB57])+[.L$26]*[.$Z$5]*MAGNET([.L$24]+[.$BB57])+[.M$26]*[.$Z$5]*MAGNET([.M$24]+[.$BB57])+[.N$26]*[.$Z$5]*MAGNET([.N$24]+[.$BB57])+[.O$26]*[.$Z$5]*MAGNET([.O$24]+[.$BB57])+[.P$26]*[.$Z$5]*MAGNET([.P$24]+[.$BB57])+[.Q$26]*[.$Z$5]*MAGNET([.Q$24]+[.$BB57])+[.R$26]*[.$Z$5]*MAGNET([.R$24]+[.$BB57])+[.S$26]*[.$Z$5]*MAGNET([.S$24]+[.$BB57])+[.T$26]*[.$Z$5]*MAGNET([.T$24]+[.$BB57])+[.U$26]*[.$Z$5]*MAGNET([.U$24]+[.$BB57])+[.V$26]*[.$Z$5]*MAGNET([.V$24]+[.$BB57])+[.W$26]*[.$Z$5]*MAGNET([.W$24]+[.$BB57])+[.X$26]*[.$Z$5]*MAGNET([.X$24]+[.$BB57])+[.Y$26]*[.$Z$5]*MAGNET([.Y$24]+[.$BB57])+[.Z$26]*[.$Z$5]*MAGNET([.Z$24]+[.$BB57])+[.AA$26]*[.$Z$5]*MAGNET([.AA$24]+[.$BB57])+[.AB$26]*[.$Z$5]*MAGNET([.AB$24]+[.$BB57])+[.AC$26]*[.$Z$5]*MAGNET([.AC$24]+[.$BB57])+[.AD$26]*[.$Z$5]*MAGNET([.AD$24]+[.$BB57])+[.AE$26]*[.$Z$5]*MAGNET([.AE$24]+[.$BB57])+[.AF$26]*[.$Z$5]*MAGNET([.AF$24]+[.$BB57])+[.AG$26]*[.$Z$5]*MAGNET([.AG$24]+[.$BB57])+[.D$26]*[.$Z$5]*MAGNET([.D$24]+[.$BB57])+[.AH$26]*[.$Z$5]*MAGNET([.AH$24]+[.BB57]) +[.AI$26]*[.$Z$5]*MAGNET([.AI$24]+[.BB57]) +[.AJ$26]*[.$Z$5]*MAGNET([.AJ$24]+[.BB57]) +[.AK$26]*[.$Z$5]*MAGNET([.AK$24]+[.BB57]) +[.AL$26]*[.$Z$5]*MAGNET([.AL$24]+[.BB57]) +[.AM$26]*[.$Z$5]*MAGNET([.AM$24]+[.BB57]) +[.AN$26]*[.$Z$5]*MAGNET([.AN$24]+[.BB57]) +[.AO$26]*[.$Z$5]*MAGNET([.AO$24]+[.BB57]) +[.AP$26]*[.$Z$5]*MAGNET([.AP$24]+[.$BB57])&#10;+[.AQ$26]*[.$Z$5]*MAGNET([.AQ$24]+[.$BB57])&#10;+[.AR$26]*[.$Z$5]*MAGNET([.AR$24]+[.$BB57])&#10;+[.AS$26]*[.$Z$5]*MAGNET([.AS$24]+[.$BB57])&#10;+[.AT$26]*[.$Z$5]*MAGNET([.AT$24]+[.$BB57])&#10;+[.AU$26]*[.$Z$5]*MAGNET([.AU$24]+[.$BB57])&#10;+[.AV$26]*[.$Z$5]*MAGNET([.AV$24]+[.$BB57])&#10;+[.AW$26]*[.$Z$5]*MAGNET([.AW$24]+[.$BB57])&#10;+[.AX$26]*[.$Z$5]*MAGNET([.AX$24]+[.$BB57])&#10;+[.AY$26]*[.$Z$5]*MAGNET([.AY$24]+[.$BB57]) +RAND()*[.$BD$13]" office:value-type="float" office:value="-24.0801832262599" calcext:value-type="float">
            <text:p>-24.08</text:p>
          </table:table-cell>
          <table:table-cell table:style-name="ce71" table:formula="of:=[.E$27]*[.$Z$5]*MAGNET([.E$24]+[.$BB57])+[.F$27]*[.$Z$5]*MAGNET([.F$24]+[.$BB57])+[.G$27]*[.$Z$5]*MAGNET([.G$24]+[.$BB57])+[.H$27]*[.$Z$5]*MAGNET([.H$24]+[.$BB57])+[.I$27]*[.$Z$5]*MAGNET([.I$24]+[.$BB57])+[.J$27]*[.$Z$5]*MAGNET([.J$24]+[.$BB57])+[.K$27]*[.$Z$5]*MAGNET([.K$24]+[.$BB57])+[.L$27]*[.$Z$5]*MAGNET([.L$24]+[.$BB57])+[.M$27]*[.$Z$5]*MAGNET([.M$24]+[.$BB57])+[.N$27]*[.$Z$5]*MAGNET([.N$24]+[.$BB57])+[.O$27]*[.$Z$5]*MAGNET([.O$24]+[.$BB57])+[.P$27]*[.$Z$5]*MAGNET([.P$24]+[.$BB57])+[.Q$27]*[.$Z$5]*MAGNET([.Q$24]+[.$BB57])+[.R$27]*[.$Z$5]*MAGNET([.R$24]+[.$BB57])+[.S$27]*[.$Z$5]*MAGNET([.S$24]+[.$BB57])+[.T$27]*[.$Z$5]*MAGNET([.T$24]+[.$BB57])+[.U$27]*[.$Z$5]*MAGNET([.U$24]+[.$BB57])+[.V$27]*[.$Z$5]*MAGNET([.V$24]+[.$BB57])+[.W$27]*[.$Z$5]*MAGNET([.W$24]+[.$BB57])+[.X$27]*[.$Z$5]*MAGNET([.X$24]+[.$BB57])+[.Y$27]*[.$Z$5]*MAGNET([.Y$24]+[.$BB57])+[.Z$27]*[.$Z$5]*MAGNET([.Z$24]+[.$BB57])+[.AA$27]*[.$Z$5]*MAGNET([.AA$24]+[.$BB57])+[.AB$27]*[.$Z$5]*MAGNET([.AB$24]+[.$BB57])+[.AC$27]*[.$Z$5]*MAGNET([.AC$24]+[.$BB57])+[.AD$27]*[.$Z$5]*MAGNET([.AD$24]+[.$BB57])+[.AE$27]*[.$Z$5]*MAGNET([.AE$24]+[.$BB57])+[.AF$27]*[.$Z$5]*MAGNET([.AF$24]+[.$BB57])+[.AG$27]*[.$Z$5]*MAGNET([.AG$24]+[.$BB57])+[.D$27]*[.$Z$5]*MAGNET([.D$24]+[.$BB57])+[.AH$27]*[.$Z$5]*MAGNET([.AH$24]+[.BB57]) +[.AI$27]*[.$Z$5]*MAGNET([.AI$24]+[.BB57]) +[.AJ$27]*[.$Z$5]*MAGNET([.AJ$24]+[.BB57]) +[.AK$27]*[.$Z$5]*MAGNET([.AK$24]+[.BB57]) +[.AL$27]*[.$Z$5]*MAGNET([.AL$24]+[.BB57]) +[.AM$27]*[.$Z$5]*MAGNET([.AM$24]+[.BB57]) +[.AN$27]*[.$Z$5]*MAGNET([.AN$24]+[.BB57]) +[.AO$27]*[.$Z$5]*MAGNET([.AO$24]+[.BB57]) +[.AP$27]*[.$Z$5]*MAGNET([.AP$24]+[.$BB57])&#10;+[.AQ$27]*[.$Z$5]*MAGNET([.AQ$24]+[.$BB57])&#10;+[.AR$27]*[.$Z$5]*MAGNET([.AR$24]+[.$BB57])&#10;+[.AS$27]*[.$Z$5]*MAGNET([.AS$24]+[.$BB57])&#10;+[.AT$27]*[.$Z$5]*MAGNET([.AT$24]+[.$BB57])&#10;+[.AU$27]*[.$Z$5]*MAGNET([.AU$24]+[.$BB57])&#10;+[.AV$27]*[.$Z$5]*MAGNET([.AV$24]+[.$BB57])&#10;+[.AW$27]*[.$Z$5]*MAGNET([.AW$24]+[.$BB57])&#10;+[.AX$27]*[.$Z$5]*MAGNET([.AX$24]+[.$BB57])&#10;+[.AY$27]*[.$Z$5]*MAGNET([.AY$24]+[.$BB57]) +RAND()*[.$BE$13]" office:value-type="float" office:value="131.214851951301" calcext:value-type="float">
            <text:p>131.214851951301</text:p>
          </table:table-cell>
          <table:table-cell table:style-name="ce71" table:formula="of:=[.E$28]*[.$Z$5]*MAGNET([.E$24]+[.$BB57])+[.F$28]*[.$Z$5]*MAGNET([.F$24]+[.$BB57])+[.G$28]*[.$Z$5]*MAGNET([.G$24]+[.$BB57])+[.H$28]*[.$Z$5]*MAGNET([.H$24]+[.$BB57])+[.I$28]*[.$Z$5]*MAGNET([.I$24]+[.$BB57])+[.J$28]*[.$Z$5]*MAGNET([.J$24]+[.$BB57])+[.K$28]*[.$Z$5]*MAGNET([.K$24]+[.$BB57])+[.L$28]*[.$Z$5]*MAGNET([.L$24]+[.$BB57])+[.M$28]*[.$Z$5]*MAGNET([.M$24]+[.$BB57])+[.N$28]*[.$Z$5]*MAGNET([.N$24]+[.$BB57])+[.O$28]*[.$Z$5]*MAGNET([.O$24]+[.$BB57])+[.P$28]*[.$Z$5]*MAGNET([.P$24]+[.$BB57])+[.Q$28]*[.$Z$5]*MAGNET([.Q$24]+[.$BB57])+[.R$28]*[.$Z$5]*MAGNET([.R$24]+[.$BB57])+[.S$28]*[.$Z$5]*MAGNET([.S$24]+[.$BB57])+[.T$28]*[.$Z$5]*MAGNET([.T$24]+[.$BB57])+[.U$28]*[.$Z$5]*MAGNET([.U$24]+[.$BB57])+[.V$28]*[.$Z$5]*MAGNET([.V$24]+[.$BB57])+[.W$28]*[.$Z$5]*MAGNET([.W$24]+[.$BB57])+[.X$28]*[.$Z$5]*MAGNET([.X$24]+[.$BB57])+[.Y$28]*[.$Z$5]*MAGNET([.Y$24]+[.$BB57])+[.Z$28]*[.$Z$5]*MAGNET([.Z$24]+[.$BB57])+[.AA$28]*[.$Z$5]*MAGNET([.AA$24]+[.$BB57])+[.AB$28]*[.$Z$5]*MAGNET([.AB$24]+[.$BB57])+[.AC$28]*[.$Z$5]*MAGNET([.AC$24]+[.$BB57])+[.AD$28]*[.$Z$5]*MAGNET([.AD$24]+[.$BB57])+[.AE$28]*[.$Z$5]*MAGNET([.AE$24]+[.$BB57])+[.AF$28]*[.$Z$5]*MAGNET([.AF$24]+[.$BB57])+[.AG$28]*[.$Z$5]*MAGNET([.AG$24]+[.$BB57])+[.D$28]*[.$Z$5]*MAGNET([.D$24]+[.$BB57])+[.AH$28]*[.$Z$5]*MAGNET([.AH$24]+[.BB57]) +[.AI$28]*[.$Z$5]*MAGNET([.AI$24]+[.BB57]) +[.AJ$28]*[.$Z$5]*MAGNET([.AJ$24]+[.BB57]) +[.AK$28]*[.$Z$5]*MAGNET([.AK$24]+[.BB57]) +[.AL$28]*[.$Z$5]*MAGNET([.AL$24]+[.BB57]) +[.AM$28]*[.$Z$5]*MAGNET([.AM$24]+[.BB57]) +[.AN$28]*[.$Z$5]*MAGNET([.AN$24]+[.BB57]) +[.AO$28]*[.$Z$5]*MAGNET([.AO$24]+[.BB57]) +[.AP$28]*[.$Z$5]*MAGNET([.AP$24]+[.$BB57])&#10;+[.AQ$28]*[.$Z$5]*MAGNET([.AQ$24]+[.$BB57])&#10;+[.AR$28]*[.$Z$5]*MAGNET([.AR$24]+[.$BB57])&#10;+[.AS$28]*[.$Z$5]*MAGNET([.AS$24]+[.$BB57])&#10;+[.AT$28]*[.$Z$5]*MAGNET([.AT$24]+[.$BB57])&#10;+[.AU$28]*[.$Z$5]*MAGNET([.AU$24]+[.$BB57])&#10;+[.AV$28]*[.$Z$5]*MAGNET([.AV$24]+[.$BB57])&#10;+[.AW$28]*[.$Z$5]*MAGNET([.AW$24]+[.$BB57])&#10;+[.AX$28]*[.$Z$5]*MAGNET([.AX$24]+[.$BB57])&#10;+[.AY$28]*[.$Z$5]*MAGNET([.AY$24]+[.$BB57]) +RAND()*[.$BF$13]" office:value-type="float" office:value="19.7890275600234" calcext:value-type="float">
            <text:p>19.7890275600234</text:p>
          </table:table-cell>
          <table:table-cell table:style-name="ce71" table:formula="of:=[.E$29]*[.$Z$5]*MAGNET([.E$24]+[.$BB57])+[.F$29]*[.$Z$5]*MAGNET([.F$24]+[.$BB57])+[.G$29]*[.$Z$5]*MAGNET([.G$24]+[.$BB57])+[.H$29]*[.$Z$5]*MAGNET([.H$24]+[.$BB57])+[.I$29]*[.$Z$5]*MAGNET([.I$24]+[.$BB57])+[.J$29]*[.$Z$5]*MAGNET([.J$24]+[.$BB57])+[.K$29]*[.$Z$5]*MAGNET([.K$24]+[.$BB57])+[.L$29]*[.$Z$5]*MAGNET([.L$24]+[.$BB57])+[.M$29]*[.$Z$5]*MAGNET([.M$24]+[.$BB57])+[.N$29]*[.$Z$5]*MAGNET([.N$24]+[.$BB57])+[.O$29]*[.$Z$5]*MAGNET([.O$24]+[.$BB57])+[.P$29]*[.$Z$5]*MAGNET([.P$24]+[.$BB57])+[.Q$29]*[.$Z$5]*MAGNET([.Q$24]+[.$BB57])+[.R$29]*[.$Z$5]*MAGNET([.R$24]+[.$BB57])+[.S$29]*[.$Z$5]*MAGNET([.S$24]+[.$BB57])+[.T$29]*[.$Z$5]*MAGNET([.T$24]+[.$BB57])+[.U$29]*[.$Z$5]*MAGNET([.U$24]+[.$BB57])+[.V$29]*[.$Z$5]*MAGNET([.V$24]+[.$BB57])+[.W$29]*[.$Z$5]*MAGNET([.W$24]+[.$BB57])+[.X$29]*[.$Z$5]*MAGNET([.X$24]+[.$BB57])+[.Y$29]*[.$Z$5]*MAGNET([.Y$24]+[.$BB57])+[.Z$29]*[.$Z$5]*MAGNET([.Z$24]+[.$BB57])+[.AA$29]*[.$Z$5]*MAGNET([.AA$24]+[.$BB57])+[.AB$29]*[.$Z$5]*MAGNET([.AB$24]+[.$BB57])+[.AC$29]*[.$Z$5]*MAGNET([.AC$24]+[.$BB57])+[.AD$29]*[.$Z$5]*MAGNET([.AD$24]+[.$BB57])+[.AE$29]*[.$Z$5]*MAGNET([.AE$24]+[.$BB57])+[.AF$29]*[.$Z$5]*MAGNET([.AF$24]+[.$BB57])+[.AG$29]*[.$Z$5]*MAGNET([.AG$24]+[.$BB57])+[.D$29]*[.$Z$5]*MAGNET([.D$24]+[.$BB57])+[.AH$29]*[.$Z$5]*MAGNET([.AH$24]+[.BB57]) +[.AI$29]*[.$Z$5]*MAGNET([.AI$24]+[.BB57]) +[.AJ$29]*[.$Z$5]*MAGNET([.AJ$24]+[.BB57]) +[.AK$29]*[.$Z$5]*MAGNET([.AK$24]+[.BB57]) +[.AL$29]*[.$Z$5]*MAGNET([.AL$24]+[.BB57]) +[.AM$29]*[.$Z$5]*MAGNET([.AM$24]+[.BB57]) +[.AN$29]*[.$Z$5]*MAGNET([.AN$24]+[.BB57]) +[.AO$29]*[.$Z$5]*MAGNET([.AO$24]+[.BB57]) +[.AP$29]*[.$Z$5]*MAGNET([.AP$24]+[.$BB57])&#10;+[.AQ$29]*[.$Z$5]*MAGNET([.AQ$24]+[.$BB57])&#10;+[.AR$29]*[.$Z$5]*MAGNET([.AR$24]+[.$BB57])&#10;+[.AS$29]*[.$Z$5]*MAGNET([.AS$24]+[.$BB57])&#10;+[.AT$29]*[.$Z$5]*MAGNET([.AT$24]+[.$BB57])&#10;+[.AU$29]*[.$Z$5]*MAGNET([.AU$24]+[.$BB57])&#10;+[.AV$29]*[.$Z$5]*MAGNET([.AV$24]+[.$BB57])&#10;+[.AW$29]*[.$Z$5]*MAGNET([.AW$24]+[.$BB57])&#10;+[.AX$29]*[.$Z$5]*MAGNET([.AX$24]+[.$BB57])&#10;+[.AY$29]*[.$Z$5]*MAGNET([.AY$24]+[.$BB57]) +RAND()*[.$BG$13]" office:value-type="float" office:value="-44.9311512567445" calcext:value-type="float">
            <text:p>-44.9311512567445</text:p>
          </table:table-cell>
          <table:table-cell table:style-name="ce71" table:formula="of:=[.E$30]*[.$Z$5]*MAGNET([.E$24]+[.$BB57])+[.F$30]*[.$Z$5]*MAGNET([.F$24]+[.$BB57])+[.G$30]*[.$Z$5]*MAGNET([.G$24]+[.$BB57])+[.H$30]*[.$Z$5]*MAGNET([.H$24]+[.$BB57])+[.I$30]*[.$Z$5]*MAGNET([.I$24]+[.$BB57])+[.J$30]*[.$Z$5]*MAGNET([.J$24]+[.$BB57])+[.K$30]*[.$Z$5]*MAGNET([.K$24]+[.$BB57])+[.L$30]*[.$Z$5]*MAGNET([.L$24]+[.$BB57])+[.M$30]*[.$Z$5]*MAGNET([.M$24]+[.$BB57])+[.N$30]*[.$Z$5]*MAGNET([.N$24]+[.$BB57])+[.O$30]*[.$Z$5]*MAGNET([.O$24]+[.$BB57])+[.P$30]*[.$Z$5]*MAGNET([.P$24]+[.$BB57])+[.Q$30]*[.$Z$5]*MAGNET([.Q$24]+[.$BB57])+[.R$30]*[.$Z$5]*MAGNET([.R$24]+[.$BB57])+[.S$30]*[.$Z$5]*MAGNET([.S$24]+[.$BB57])+[.T$30]*[.$Z$5]*MAGNET([.T$24]+[.$BB57])+[.U$30]*[.$Z$5]*MAGNET([.U$24]+[.$BB57])+[.V$30]*[.$Z$5]*MAGNET([.V$24]+[.$BB57])+[.W$30]*[.$Z$5]*MAGNET([.W$24]+[.$BB57])+[.X$30]*[.$Z$5]*MAGNET([.X$24]+[.$BB57])+[.Y$30]*[.$Z$5]*MAGNET([.Y$24]+[.$BB57])+[.Z$30]*[.$Z$5]*MAGNET([.Z$24]+[.$BB57])+[.AA$30]*[.$Z$5]*MAGNET([.AA$24]+[.$BB57])+[.AB$30]*[.$Z$5]*MAGNET([.AB$24]+[.$BB57])+[.AC$30]*[.$Z$5]*MAGNET([.AC$24]+[.$BB57])+[.AD$30]*[.$Z$5]*MAGNET([.AD$24]+[.$BB57])+[.AE$30]*[.$Z$5]*MAGNET([.AE$24]+[.$BB57])+[.AF$30]*[.$Z$5]*MAGNET([.AF$24]+[.$BB57])+[.AG$30]*[.$Z$5]*MAGNET([.AG$24]+[.$BB57])+[.D$30]*[.$Z$5]*MAGNET([.D$24]+[.$BB57])+[.AH$30]*[.$Z$5]*MAGNET([.AH$24]+[.BB57]) +[.AI$30]*[.$Z$5]*MAGNET([.AI$24]+[.BB57]) +[.AJ$30]*[.$Z$5]*MAGNET([.AJ$24]+[.BB57]) +[.AK$30]*[.$Z$5]*MAGNET([.AK$24]+[.BB57]) +[.AL$30]*[.$Z$5]*MAGNET([.AL$24]+[.BB57]) +[.AM$30]*[.$Z$5]*MAGNET([.AM$24]+[.BB57]) +[.AN$30]*[.$Z$5]*MAGNET([.AN$24]+[.BB57]) +[.AO$30]*[.$Z$5]*MAGNET([.AO$24]+[.BB57]) +[.AP$30]*[.$Z$5]*MAGNET([.AP$24]+[.$BB57])&#10;+[.AQ$30]*[.$Z$5]*MAGNET([.AQ$24]+[.$BB57])&#10;+[.AR$30]*[.$Z$5]*MAGNET([.AR$24]+[.$BB57])&#10;+[.AS$30]*[.$Z$5]*MAGNET([.AS$24]+[.$BB57])&#10;+[.AT$30]*[.$Z$5]*MAGNET([.AT$24]+[.$BB57])&#10;+[.AU$30]*[.$Z$5]*MAGNET([.AU$24]+[.$BB57])&#10;+[.AV$30]*[.$Z$5]*MAGNET([.AV$24]+[.$BB57])&#10;+[.AW$30]*[.$Z$5]*MAGNET([.AW$24]+[.$BB57])&#10;+[.AX$30]*[.$Z$5]*MAGNET([.AX$24]+[.$BB57])&#10;+[.AY$30]*[.$Z$5]*MAGNET([.AY$24]+[.$BB57]) +RAND()*[.$BH$13]" office:value-type="float" office:value="0" calcext:value-type="float">
            <text:p>0</text:p>
          </table:table-cell>
          <table:table-cell table:style-name="ce71" table:formula="of:=[.E$31]*[.$Z$5]*MAGNET([.E$24]+[.$BB57])+[.F$31]*[.$Z$5]*MAGNET([.F$24]+[.$BB57])+[.G$31]*[.$Z$5]*MAGNET([.G$24]+[.$BB57])+[.H$31]*[.$Z$5]*MAGNET([.H$24]+[.$BB57])+[.I$31]*[.$Z$5]*MAGNET([.I$24]+[.$BB57])+[.J$31]*[.$Z$5]*MAGNET([.J$24]+[.$BB57])+[.K$31]*[.$Z$5]*MAGNET([.K$24]+[.$BB57])+[.L$31]*[.$Z$5]*MAGNET([.L$24]+[.$BB57])+[.M$31]*[.$Z$5]*MAGNET([.M$24]+[.$BB57])+[.N$31]*[.$Z$5]*MAGNET([.N$24]+[.$BB57])+[.O$31]*[.$Z$5]*MAGNET([.O$24]+[.$BB57])+[.P$31]*[.$Z$5]*MAGNET([.P$24]+[.$BB57])+[.Q$31]*[.$Z$5]*MAGNET([.Q$24]+[.$BB57])+[.R$31]*[.$Z$5]*MAGNET([.R$24]+[.$BB57])+[.S$31]*[.$Z$5]*MAGNET([.S$24]+[.$BB57])+[.T$31]*[.$Z$5]*MAGNET([.T$24]+[.$BB57])+[.U$31]*[.$Z$5]*MAGNET([.U$24]+[.$BB57])+[.V$31]*[.$Z$5]*MAGNET([.V$24]+[.$BB57])+[.W$31]*[.$Z$5]*MAGNET([.W$24]+[.$BB57])+[.X$31]*[.$Z$5]*MAGNET([.X$24]+[.$BB57])+[.Y$31]*[.$Z$5]*MAGNET([.Y$24]+[.$BB57])+[.Z$31]*[.$Z$5]*MAGNET([.Z$24]+[.$BB57])+[.AA$31]*[.$Z$5]*MAGNET([.AA$24]+[.$BB57])+[.AB$31]*[.$Z$5]*MAGNET([.AB$24]+[.$BB57])+[.AC$31]*[.$Z$5]*MAGNET([.AC$24]+[.$BB57])+[.AD$31]*[.$Z$5]*MAGNET([.AD$24]+[.$BB57])+[.AE$31]*[.$Z$5]*MAGNET([.AE$24]+[.$BB57])+[.AF$31]*[.$Z$5]*MAGNET([.AF$24]+[.$BB57])+[.AG$31]*[.$Z$5]*MAGNET([.AG$24]+[.$BB57])+[.D$31]*[.$Z$5]*MAGNET([.D$24]+[.$BB57])+[.AH$31]*[.$Z$5]*MAGNET([.AH$24]+[.BB57]) +[.AI$31]*[.$Z$5]*MAGNET([.AI$24]+[.BB57]) +[.AJ$31]*[.$Z$5]*MAGNET([.AJ$24]+[.BB57]) +[.AK$31]*[.$Z$5]*MAGNET([.AK$24]+[.BB57]) +[.AL$31]*[.$Z$5]*MAGNET([.AL$24]+[.BB57]) +[.AM$31]*[.$Z$5]*MAGNET([.AM$24]+[.BB57]) +[.AN$31]*[.$Z$5]*MAGNET([.AN$24]+[.BB57]) +[.AO$31]*[.$Z$5]*MAGNET([.AO$24]+[.BB57]) +[.AP$31]*[.$Z$5]*MAGNET([.AP$24]+[.$BB57])&#10;+[.AQ$31]*[.$Z$5]*MAGNET([.AQ$24]+[.$BB57])&#10;+[.AR$31]*[.$Z$5]*MAGNET([.AR$24]+[.$BB57])&#10;+[.AS$31]*[.$Z$5]*MAGNET([.AS$24]+[.$BB57])&#10;+[.AT$31]*[.$Z$5]*MAGNET([.AT$24]+[.$BB57])&#10;+[.AU$31]*[.$Z$5]*MAGNET([.AU$24]+[.$BB57])&#10;+[.AV$31]*[.$Z$5]*MAGNET([.AV$24]+[.$BB57])&#10;+[.AW$31]*[.$Z$5]*MAGNET([.AW$24]+[.$BB57])&#10;+[.AX$31]*[.$Z$5]*MAGNET([.AX$24]+[.$BB57])&#10;+[.AY$31]*[.$Z$5]*MAGNET([.AY$24]+[.$BB57]) +RAND()*[.$BI$13]" office:value-type="float" office:value="0" calcext:value-type="float">
            <text:p>0</text:p>
          </table:table-cell>
          <table:table-cell table:style-name="ce71" table:formula="of:=[.E$32]*[.$Z$5]*MAGNET([.E$24]+[.$BB57])+[.F$32]*[.$Z$5]*MAGNET([.F$24]+[.$BB57])+[.G$32]*[.$Z$5]*MAGNET([.G$24]+[.$BB57])+[.H$32]*[.$Z$5]*MAGNET([.H$24]+[.$BB57])+[.I$32]*[.$Z$5]*MAGNET([.I$24]+[.$BB57])+[.J$32]*[.$Z$5]*MAGNET([.J$24]+[.$BB57])+[.K$32]*[.$Z$5]*MAGNET([.K$24]+[.$BB57])+[.L$32]*[.$Z$5]*MAGNET([.L$24]+[.$BB57])+[.M$32]*[.$Z$5]*MAGNET([.M$24]+[.$BB57])+[.N$32]*[.$Z$5]*MAGNET([.N$24]+[.$BB57])+[.O$32]*[.$Z$5]*MAGNET([.O$24]+[.$BB57])+[.P$32]*[.$Z$5]*MAGNET([.P$24]+[.$BB57])+[.Q$32]*[.$Z$5]*MAGNET([.Q$24]+[.$BB57])+[.R$32]*[.$Z$5]*MAGNET([.R$24]+[.$BB57])+[.S$32]*[.$Z$5]*MAGNET([.S$24]+[.$BB57])+[.T$32]*[.$Z$5]*MAGNET([.T$24]+[.$BB57])+[.U$32]*[.$Z$5]*MAGNET([.U$24]+[.$BB57])+[.V$32]*[.$Z$5]*MAGNET([.V$24]+[.$BB57])+[.W$32]*[.$Z$5]*MAGNET([.W$24]+[.$BB57])+[.X$32]*[.$Z$5]*MAGNET([.X$24]+[.$BB57])+[.Y$32]*[.$Z$5]*MAGNET([.Y$24]+[.$BB57])+[.Z$32]*[.$Z$5]*MAGNET([.Z$24]+[.$BB57])+[.AA$32]*[.$Z$5]*MAGNET([.AA$24]+[.$BB57])+[.AB$32]*[.$Z$5]*MAGNET([.AB$24]+[.$BB57])+[.AC$32]*[.$Z$5]*MAGNET([.AC$24]+[.$BB57])+[.AD$32]*[.$Z$5]*MAGNET([.AD$24]+[.$BB57])+[.AE$32]*[.$Z$5]*MAGNET([.AE$24]+[.$BB57])+[.AF$32]*[.$Z$5]*MAGNET([.AF$24]+[.$BB57])+[.AG$32]*[.$Z$5]*MAGNET([.AG$24]+[.$BB57])+[.D$32]*[.$Z$5]*MAGNET([.D$24]+[.$BB57])+[.AH$32]*[.$Z$5]*MAGNET([.AH$24]+[.BB57]) +[.AI$32]*[.$Z$5]*MAGNET([.AI$24]+[.BB57]) +[.AJ$32]*[.$Z$5]*MAGNET([.AJ$24]+[.BB57]) +[.AK$32]*[.$Z$5]*MAGNET([.AK$24]+[.BB57]) +[.AL$32]*[.$Z$5]*MAGNET([.AL$24]+[.BB57]) +[.AM$32]*[.$Z$5]*MAGNET([.AM$24]+[.BB57]) +[.AN$32]*[.$Z$5]*MAGNET([.AN$24]+[.BB57]) +[.AO$32]*[.$Z$5]*MAGNET([.AO$24]+[.BB57]) +[.AP$32]*[.$Z$5]*MAGNET([.AP$24]+[.$BB57])&#10;+[.AQ$32]*[.$Z$5]*MAGNET([.AQ$24]+[.$BB57])&#10;+[.AR$32]*[.$Z$5]*MAGNET([.AR$24]+[.$BB57])&#10;+[.AS$32]*[.$Z$5]*MAGNET([.AS$24]+[.$BB57])&#10;+[.AT$32]*[.$Z$5]*MAGNET([.AT$24]+[.$BB57])&#10;+[.AU$32]*[.$Z$5]*MAGNET([.AU$24]+[.$BB57])&#10;+[.AV$32]*[.$Z$5]*MAGNET([.AV$24]+[.$BB57])&#10;+[.AW$32]*[.$Z$5]*MAGNET([.AW$24]+[.$BB57])&#10;+[.AX$32]*[.$Z$5]*MAGNET([.AX$24]+[.$BB57])&#10;+[.AY$32]*[.$Z$5]*MAGNET([.AY$24]+[.$BB5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57]+0.002" office:value-type="float" office:value="0.0860000000000001" calcext:value-type="float">
            <text:p>0.0860000000000001</text:p>
          </table:table-cell>
          <table:table-cell table:formula="of:=[.BA58]*[.$D$6]" office:value-type="float" office:value="4.32283149133956" calcext:value-type="float">
            <text:p>4.323</text:p>
          </table:table-cell>
          <table:table-cell table:formula="of:=[.D$25]*[.$Z$5]*MAGNET([.D$24]+[.BB58])+[.E$25]*[.$Z$5]*MAGNET([.E$24]+[.BB58])+[.F$25]*[.$Z$5]*MAGNET([.F$24]+[.BB58])+[.G$25]*[.$Z$5]*MAGNET([.G$24]+[.BB58])+[.H$25]*[.$Z$5]*MAGNET([.H$24]+[.BB58])+[.I$25]*[.$Z$5]*MAGNET([.I$24]+[.BB58])+[.J$25]*[.$Z$5]*MAGNET([.J$24]+[.BB58])+[.K$25]*[.$Z$5]*MAGNET([.K$24]+[.BB58])+[.L$25]*[.$Z$5]*MAGNET([.L$24]+[.BB58])+[.M$25]*[.$Z$5]*MAGNET([.M$24]+[.BB58])+[.N$25]*[.$Z$5]*MAGNET([.N$24]+[.BB58])+[.O$25]*[.$Z$5]*MAGNET([.O$24]+[.BB58])+[.P$25]*[.$Z$5]*MAGNET([.P$24]+[.BB58])+[.Q$25]*[.$Z$5]*MAGNET([.Q$24]+[.BB58])+[.R$25]*[.$Z$5]*MAGNET([.R$24]+[.BB58])+[.S$25]*[.$Z$5]*MAGNET([.S$24]+[.BB58])+[.T$25]*[.$Z$5]*MAGNET([.T$24]+[.BB58])+[.U$25]*[.$Z$5]*MAGNET([.U$24]+[.BB58])+[.V$25]*[.$Z$5]*MAGNET([.V$24]+[.BB58])+[.W$25]*[.$Z$5]*MAGNET([.W$24]+[.BB58])+[.X$25]*[.$Z$5]*MAGNET([.X$24]+[.BB58])+[.Y$25]*[.$Z$5]*MAGNET([.Y$24]+[.BB58])+[.Z$25]*[.$Z$5]*MAGNET([.Z$24]+[.BB58])+[.AA$25]*[.$Z$5]*MAGNET([.AA$24]+[.BB58])+[.AB$25]*[.$Z$5]*MAGNET([.AB$24]+[.BB58])+[.AC$25]*[.$Z$5]*MAGNET([.AC$24]+[.BB58])+[.AD$25]*[.$Z$5]*MAGNET([.AD$24]+[.BB58])+[.AE$25]*[.$Z$5]*MAGNET([.AE$24]+[.BB58])+[.AF$25]*[.$Z$5]*MAGNET([.AF$24]+[.BB58])+[.AG$25]*[.$Z$5]*MAGNET([.AG$24]+[.BB58])+[.AH$25]*[.$Z$5]*MAGNET([.AH$24]+[.BB58]) +[.AI$25]*[.$Z$5]*MAGNET([.AI$24]+[.BB58]) +[.AJ$25]*[.$Z$5]*MAGNET([.AJ$24]+[.BB58]) +[.AK$25]*[.$Z$5]*MAGNET([.AK$24]+[.BB58]) +[.AL$25]*[.$Z$5]*MAGNET([.AL$24]+[.BB58]) +[.AM$25]*[.$Z$5]*MAGNET([.AM$24]+[.BB58]) +[.AN$25]*[.$Z$5]*MAGNET([.AN$24]+[.BB58]) +[.AO$25]*[.$Z$5]*MAGNET([.AO$24]+[.BB58])+RAND()*[.$BC$13]+[.AP$25]*[.$Z$5]*MAGNET([.AP$24]+[.BB58])&#10;+[.AQ$25]*[.$Z$5]*MAGNET([.AQ$24]+[.BB58])&#10;+[.AR$25]*[.$Z$5]*MAGNET([.AR$24]+[.BB58])&#10;+[.AS$25]*[.$Z$5]*MAGNET([.AS$24]+[.BB58])&#10;+[.AT$25]*[.$Z$5]*MAGNET([.AT$24]+[.BB58])&#10;+[.AU$25]*[.$Z$5]*MAGNET([.AU$24]+[.BB58])&#10;+[.AV$25]*[.$Z$5]*MAGNET([.AV$24]+[.BB58])&#10;+[.AW$25]*[.$Z$5]*MAGNET([.AW$24]+[.BB58])&#10;+[.AX$25]*[.$Z$5]*MAGNET([.AX$24]+[.BB58])&#10;+[.AY$25]*[.$Z$5]*MAGNET([.AY$24]+[.BB58])" office:value-type="float" office:value="-77.6832820211965" calcext:value-type="float">
            <text:p>-77.68</text:p>
          </table:table-cell>
          <table:table-cell table:style-name="ce70" table:formula="of:=[.E$26]*[.$Z$5]*MAGNET([.E$24]+[.$BB58])+[.F$26]*[.$Z$5]*MAGNET([.F$24]+[.$BB58])+[.G$26]*[.$Z$5]*MAGNET([.G$24]+[.$BB58])+[.H$26]*[.$Z$5]*MAGNET([.H$24]+[.$BB58])+[.I$26]*[.$Z$5]*MAGNET([.I$24]+[.$BB58])+[.J$26]*[.$Z$5]*MAGNET([.J$24]+[.$BB58])+[.K$26]*[.$Z$5]*MAGNET([.K$24]+[.$BB58])+[.L$26]*[.$Z$5]*MAGNET([.L$24]+[.$BB58])+[.M$26]*[.$Z$5]*MAGNET([.M$24]+[.$BB58])+[.N$26]*[.$Z$5]*MAGNET([.N$24]+[.$BB58])+[.O$26]*[.$Z$5]*MAGNET([.O$24]+[.$BB58])+[.P$26]*[.$Z$5]*MAGNET([.P$24]+[.$BB58])+[.Q$26]*[.$Z$5]*MAGNET([.Q$24]+[.$BB58])+[.R$26]*[.$Z$5]*MAGNET([.R$24]+[.$BB58])+[.S$26]*[.$Z$5]*MAGNET([.S$24]+[.$BB58])+[.T$26]*[.$Z$5]*MAGNET([.T$24]+[.$BB58])+[.U$26]*[.$Z$5]*MAGNET([.U$24]+[.$BB58])+[.V$26]*[.$Z$5]*MAGNET([.V$24]+[.$BB58])+[.W$26]*[.$Z$5]*MAGNET([.W$24]+[.$BB58])+[.X$26]*[.$Z$5]*MAGNET([.X$24]+[.$BB58])+[.Y$26]*[.$Z$5]*MAGNET([.Y$24]+[.$BB58])+[.Z$26]*[.$Z$5]*MAGNET([.Z$24]+[.$BB58])+[.AA$26]*[.$Z$5]*MAGNET([.AA$24]+[.$BB58])+[.AB$26]*[.$Z$5]*MAGNET([.AB$24]+[.$BB58])+[.AC$26]*[.$Z$5]*MAGNET([.AC$24]+[.$BB58])+[.AD$26]*[.$Z$5]*MAGNET([.AD$24]+[.$BB58])+[.AE$26]*[.$Z$5]*MAGNET([.AE$24]+[.$BB58])+[.AF$26]*[.$Z$5]*MAGNET([.AF$24]+[.$BB58])+[.AG$26]*[.$Z$5]*MAGNET([.AG$24]+[.$BB58])+[.D$26]*[.$Z$5]*MAGNET([.D$24]+[.$BB58])+[.AH$26]*[.$Z$5]*MAGNET([.AH$24]+[.BB58]) +[.AI$26]*[.$Z$5]*MAGNET([.AI$24]+[.BB58]) +[.AJ$26]*[.$Z$5]*MAGNET([.AJ$24]+[.BB58]) +[.AK$26]*[.$Z$5]*MAGNET([.AK$24]+[.BB58]) +[.AL$26]*[.$Z$5]*MAGNET([.AL$24]+[.BB58]) +[.AM$26]*[.$Z$5]*MAGNET([.AM$24]+[.BB58]) +[.AN$26]*[.$Z$5]*MAGNET([.AN$24]+[.BB58]) +[.AO$26]*[.$Z$5]*MAGNET([.AO$24]+[.BB58]) +[.AP$26]*[.$Z$5]*MAGNET([.AP$24]+[.$BB58])&#10;+[.AQ$26]*[.$Z$5]*MAGNET([.AQ$24]+[.$BB58])&#10;+[.AR$26]*[.$Z$5]*MAGNET([.AR$24]+[.$BB58])&#10;+[.AS$26]*[.$Z$5]*MAGNET([.AS$24]+[.$BB58])&#10;+[.AT$26]*[.$Z$5]*MAGNET([.AT$24]+[.$BB58])&#10;+[.AU$26]*[.$Z$5]*MAGNET([.AU$24]+[.$BB58])&#10;+[.AV$26]*[.$Z$5]*MAGNET([.AV$24]+[.$BB58])&#10;+[.AW$26]*[.$Z$5]*MAGNET([.AW$24]+[.$BB58])&#10;+[.AX$26]*[.$Z$5]*MAGNET([.AX$24]+[.$BB58])&#10;+[.AY$26]*[.$Z$5]*MAGNET([.AY$24]+[.$BB58]) +RAND()*[.$BD$13]" office:value-type="float" office:value="-12.3361888493939" calcext:value-type="float">
            <text:p>-12.34</text:p>
          </table:table-cell>
          <table:table-cell table:style-name="ce71" table:formula="of:=[.E$27]*[.$Z$5]*MAGNET([.E$24]+[.$BB58])+[.F$27]*[.$Z$5]*MAGNET([.F$24]+[.$BB58])+[.G$27]*[.$Z$5]*MAGNET([.G$24]+[.$BB58])+[.H$27]*[.$Z$5]*MAGNET([.H$24]+[.$BB58])+[.I$27]*[.$Z$5]*MAGNET([.I$24]+[.$BB58])+[.J$27]*[.$Z$5]*MAGNET([.J$24]+[.$BB58])+[.K$27]*[.$Z$5]*MAGNET([.K$24]+[.$BB58])+[.L$27]*[.$Z$5]*MAGNET([.L$24]+[.$BB58])+[.M$27]*[.$Z$5]*MAGNET([.M$24]+[.$BB58])+[.N$27]*[.$Z$5]*MAGNET([.N$24]+[.$BB58])+[.O$27]*[.$Z$5]*MAGNET([.O$24]+[.$BB58])+[.P$27]*[.$Z$5]*MAGNET([.P$24]+[.$BB58])+[.Q$27]*[.$Z$5]*MAGNET([.Q$24]+[.$BB58])+[.R$27]*[.$Z$5]*MAGNET([.R$24]+[.$BB58])+[.S$27]*[.$Z$5]*MAGNET([.S$24]+[.$BB58])+[.T$27]*[.$Z$5]*MAGNET([.T$24]+[.$BB58])+[.U$27]*[.$Z$5]*MAGNET([.U$24]+[.$BB58])+[.V$27]*[.$Z$5]*MAGNET([.V$24]+[.$BB58])+[.W$27]*[.$Z$5]*MAGNET([.W$24]+[.$BB58])+[.X$27]*[.$Z$5]*MAGNET([.X$24]+[.$BB58])+[.Y$27]*[.$Z$5]*MAGNET([.Y$24]+[.$BB58])+[.Z$27]*[.$Z$5]*MAGNET([.Z$24]+[.$BB58])+[.AA$27]*[.$Z$5]*MAGNET([.AA$24]+[.$BB58])+[.AB$27]*[.$Z$5]*MAGNET([.AB$24]+[.$BB58])+[.AC$27]*[.$Z$5]*MAGNET([.AC$24]+[.$BB58])+[.AD$27]*[.$Z$5]*MAGNET([.AD$24]+[.$BB58])+[.AE$27]*[.$Z$5]*MAGNET([.AE$24]+[.$BB58])+[.AF$27]*[.$Z$5]*MAGNET([.AF$24]+[.$BB58])+[.AG$27]*[.$Z$5]*MAGNET([.AG$24]+[.$BB58])+[.D$27]*[.$Z$5]*MAGNET([.D$24]+[.$BB58])+[.AH$27]*[.$Z$5]*MAGNET([.AH$24]+[.BB58]) +[.AI$27]*[.$Z$5]*MAGNET([.AI$24]+[.BB58]) +[.AJ$27]*[.$Z$5]*MAGNET([.AJ$24]+[.BB58]) +[.AK$27]*[.$Z$5]*MAGNET([.AK$24]+[.BB58]) +[.AL$27]*[.$Z$5]*MAGNET([.AL$24]+[.BB58]) +[.AM$27]*[.$Z$5]*MAGNET([.AM$24]+[.BB58]) +[.AN$27]*[.$Z$5]*MAGNET([.AN$24]+[.BB58]) +[.AO$27]*[.$Z$5]*MAGNET([.AO$24]+[.BB58]) +[.AP$27]*[.$Z$5]*MAGNET([.AP$24]+[.$BB58])&#10;+[.AQ$27]*[.$Z$5]*MAGNET([.AQ$24]+[.$BB58])&#10;+[.AR$27]*[.$Z$5]*MAGNET([.AR$24]+[.$BB58])&#10;+[.AS$27]*[.$Z$5]*MAGNET([.AS$24]+[.$BB58])&#10;+[.AT$27]*[.$Z$5]*MAGNET([.AT$24]+[.$BB58])&#10;+[.AU$27]*[.$Z$5]*MAGNET([.AU$24]+[.$BB58])&#10;+[.AV$27]*[.$Z$5]*MAGNET([.AV$24]+[.$BB58])&#10;+[.AW$27]*[.$Z$5]*MAGNET([.AW$24]+[.$BB58])&#10;+[.AX$27]*[.$Z$5]*MAGNET([.AX$24]+[.$BB58])&#10;+[.AY$27]*[.$Z$5]*MAGNET([.AY$24]+[.$BB58]) +RAND()*[.$BE$13]" office:value-type="float" office:value="134.857485065541" calcext:value-type="float">
            <text:p>134.857485065541</text:p>
          </table:table-cell>
          <table:table-cell table:style-name="ce71" table:formula="of:=[.E$28]*[.$Z$5]*MAGNET([.E$24]+[.$BB58])+[.F$28]*[.$Z$5]*MAGNET([.F$24]+[.$BB58])+[.G$28]*[.$Z$5]*MAGNET([.G$24]+[.$BB58])+[.H$28]*[.$Z$5]*MAGNET([.H$24]+[.$BB58])+[.I$28]*[.$Z$5]*MAGNET([.I$24]+[.$BB58])+[.J$28]*[.$Z$5]*MAGNET([.J$24]+[.$BB58])+[.K$28]*[.$Z$5]*MAGNET([.K$24]+[.$BB58])+[.L$28]*[.$Z$5]*MAGNET([.L$24]+[.$BB58])+[.M$28]*[.$Z$5]*MAGNET([.M$24]+[.$BB58])+[.N$28]*[.$Z$5]*MAGNET([.N$24]+[.$BB58])+[.O$28]*[.$Z$5]*MAGNET([.O$24]+[.$BB58])+[.P$28]*[.$Z$5]*MAGNET([.P$24]+[.$BB58])+[.Q$28]*[.$Z$5]*MAGNET([.Q$24]+[.$BB58])+[.R$28]*[.$Z$5]*MAGNET([.R$24]+[.$BB58])+[.S$28]*[.$Z$5]*MAGNET([.S$24]+[.$BB58])+[.T$28]*[.$Z$5]*MAGNET([.T$24]+[.$BB58])+[.U$28]*[.$Z$5]*MAGNET([.U$24]+[.$BB58])+[.V$28]*[.$Z$5]*MAGNET([.V$24]+[.$BB58])+[.W$28]*[.$Z$5]*MAGNET([.W$24]+[.$BB58])+[.X$28]*[.$Z$5]*MAGNET([.X$24]+[.$BB58])+[.Y$28]*[.$Z$5]*MAGNET([.Y$24]+[.$BB58])+[.Z$28]*[.$Z$5]*MAGNET([.Z$24]+[.$BB58])+[.AA$28]*[.$Z$5]*MAGNET([.AA$24]+[.$BB58])+[.AB$28]*[.$Z$5]*MAGNET([.AB$24]+[.$BB58])+[.AC$28]*[.$Z$5]*MAGNET([.AC$24]+[.$BB58])+[.AD$28]*[.$Z$5]*MAGNET([.AD$24]+[.$BB58])+[.AE$28]*[.$Z$5]*MAGNET([.AE$24]+[.$BB58])+[.AF$28]*[.$Z$5]*MAGNET([.AF$24]+[.$BB58])+[.AG$28]*[.$Z$5]*MAGNET([.AG$24]+[.$BB58])+[.D$28]*[.$Z$5]*MAGNET([.D$24]+[.$BB58])+[.AH$28]*[.$Z$5]*MAGNET([.AH$24]+[.BB58]) +[.AI$28]*[.$Z$5]*MAGNET([.AI$24]+[.BB58]) +[.AJ$28]*[.$Z$5]*MAGNET([.AJ$24]+[.BB58]) +[.AK$28]*[.$Z$5]*MAGNET([.AK$24]+[.BB58]) +[.AL$28]*[.$Z$5]*MAGNET([.AL$24]+[.BB58]) +[.AM$28]*[.$Z$5]*MAGNET([.AM$24]+[.BB58]) +[.AN$28]*[.$Z$5]*MAGNET([.AN$24]+[.BB58]) +[.AO$28]*[.$Z$5]*MAGNET([.AO$24]+[.BB58]) +[.AP$28]*[.$Z$5]*MAGNET([.AP$24]+[.$BB58])&#10;+[.AQ$28]*[.$Z$5]*MAGNET([.AQ$24]+[.$BB58])&#10;+[.AR$28]*[.$Z$5]*MAGNET([.AR$24]+[.$BB58])&#10;+[.AS$28]*[.$Z$5]*MAGNET([.AS$24]+[.$BB58])&#10;+[.AT$28]*[.$Z$5]*MAGNET([.AT$24]+[.$BB58])&#10;+[.AU$28]*[.$Z$5]*MAGNET([.AU$24]+[.$BB58])&#10;+[.AV$28]*[.$Z$5]*MAGNET([.AV$24]+[.$BB58])&#10;+[.AW$28]*[.$Z$5]*MAGNET([.AW$24]+[.$BB58])&#10;+[.AX$28]*[.$Z$5]*MAGNET([.AX$24]+[.$BB58])&#10;+[.AY$28]*[.$Z$5]*MAGNET([.AY$24]+[.$BB58]) +RAND()*[.$BF$13]" office:value-type="float" office:value="18.3473417083006" calcext:value-type="float">
            <text:p>18.3473417083006</text:p>
          </table:table-cell>
          <table:table-cell table:style-name="ce71" table:formula="of:=[.E$29]*[.$Z$5]*MAGNET([.E$24]+[.$BB58])+[.F$29]*[.$Z$5]*MAGNET([.F$24]+[.$BB58])+[.G$29]*[.$Z$5]*MAGNET([.G$24]+[.$BB58])+[.H$29]*[.$Z$5]*MAGNET([.H$24]+[.$BB58])+[.I$29]*[.$Z$5]*MAGNET([.I$24]+[.$BB58])+[.J$29]*[.$Z$5]*MAGNET([.J$24]+[.$BB58])+[.K$29]*[.$Z$5]*MAGNET([.K$24]+[.$BB58])+[.L$29]*[.$Z$5]*MAGNET([.L$24]+[.$BB58])+[.M$29]*[.$Z$5]*MAGNET([.M$24]+[.$BB58])+[.N$29]*[.$Z$5]*MAGNET([.N$24]+[.$BB58])+[.O$29]*[.$Z$5]*MAGNET([.O$24]+[.$BB58])+[.P$29]*[.$Z$5]*MAGNET([.P$24]+[.$BB58])+[.Q$29]*[.$Z$5]*MAGNET([.Q$24]+[.$BB58])+[.R$29]*[.$Z$5]*MAGNET([.R$24]+[.$BB58])+[.S$29]*[.$Z$5]*MAGNET([.S$24]+[.$BB58])+[.T$29]*[.$Z$5]*MAGNET([.T$24]+[.$BB58])+[.U$29]*[.$Z$5]*MAGNET([.U$24]+[.$BB58])+[.V$29]*[.$Z$5]*MAGNET([.V$24]+[.$BB58])+[.W$29]*[.$Z$5]*MAGNET([.W$24]+[.$BB58])+[.X$29]*[.$Z$5]*MAGNET([.X$24]+[.$BB58])+[.Y$29]*[.$Z$5]*MAGNET([.Y$24]+[.$BB58])+[.Z$29]*[.$Z$5]*MAGNET([.Z$24]+[.$BB58])+[.AA$29]*[.$Z$5]*MAGNET([.AA$24]+[.$BB58])+[.AB$29]*[.$Z$5]*MAGNET([.AB$24]+[.$BB58])+[.AC$29]*[.$Z$5]*MAGNET([.AC$24]+[.$BB58])+[.AD$29]*[.$Z$5]*MAGNET([.AD$24]+[.$BB58])+[.AE$29]*[.$Z$5]*MAGNET([.AE$24]+[.$BB58])+[.AF$29]*[.$Z$5]*MAGNET([.AF$24]+[.$BB58])+[.AG$29]*[.$Z$5]*MAGNET([.AG$24]+[.$BB58])+[.D$29]*[.$Z$5]*MAGNET([.D$24]+[.$BB58])+[.AH$29]*[.$Z$5]*MAGNET([.AH$24]+[.BB58]) +[.AI$29]*[.$Z$5]*MAGNET([.AI$24]+[.BB58]) +[.AJ$29]*[.$Z$5]*MAGNET([.AJ$24]+[.BB58]) +[.AK$29]*[.$Z$5]*MAGNET([.AK$24]+[.BB58]) +[.AL$29]*[.$Z$5]*MAGNET([.AL$24]+[.BB58]) +[.AM$29]*[.$Z$5]*MAGNET([.AM$24]+[.BB58]) +[.AN$29]*[.$Z$5]*MAGNET([.AN$24]+[.BB58]) +[.AO$29]*[.$Z$5]*MAGNET([.AO$24]+[.BB58]) +[.AP$29]*[.$Z$5]*MAGNET([.AP$24]+[.$BB58])&#10;+[.AQ$29]*[.$Z$5]*MAGNET([.AQ$24]+[.$BB58])&#10;+[.AR$29]*[.$Z$5]*MAGNET([.AR$24]+[.$BB58])&#10;+[.AS$29]*[.$Z$5]*MAGNET([.AS$24]+[.$BB58])&#10;+[.AT$29]*[.$Z$5]*MAGNET([.AT$24]+[.$BB58])&#10;+[.AU$29]*[.$Z$5]*MAGNET([.AU$24]+[.$BB58])&#10;+[.AV$29]*[.$Z$5]*MAGNET([.AV$24]+[.$BB58])&#10;+[.AW$29]*[.$Z$5]*MAGNET([.AW$24]+[.$BB58])&#10;+[.AX$29]*[.$Z$5]*MAGNET([.AX$24]+[.$BB58])&#10;+[.AY$29]*[.$Z$5]*MAGNET([.AY$24]+[.$BB58]) +RAND()*[.$BG$13]" office:value-type="float" office:value="-44.6370804230468" calcext:value-type="float">
            <text:p>-44.6370804230468</text:p>
          </table:table-cell>
          <table:table-cell table:style-name="ce71" table:formula="of:=[.E$30]*[.$Z$5]*MAGNET([.E$24]+[.$BB58])+[.F$30]*[.$Z$5]*MAGNET([.F$24]+[.$BB58])+[.G$30]*[.$Z$5]*MAGNET([.G$24]+[.$BB58])+[.H$30]*[.$Z$5]*MAGNET([.H$24]+[.$BB58])+[.I$30]*[.$Z$5]*MAGNET([.I$24]+[.$BB58])+[.J$30]*[.$Z$5]*MAGNET([.J$24]+[.$BB58])+[.K$30]*[.$Z$5]*MAGNET([.K$24]+[.$BB58])+[.L$30]*[.$Z$5]*MAGNET([.L$24]+[.$BB58])+[.M$30]*[.$Z$5]*MAGNET([.M$24]+[.$BB58])+[.N$30]*[.$Z$5]*MAGNET([.N$24]+[.$BB58])+[.O$30]*[.$Z$5]*MAGNET([.O$24]+[.$BB58])+[.P$30]*[.$Z$5]*MAGNET([.P$24]+[.$BB58])+[.Q$30]*[.$Z$5]*MAGNET([.Q$24]+[.$BB58])+[.R$30]*[.$Z$5]*MAGNET([.R$24]+[.$BB58])+[.S$30]*[.$Z$5]*MAGNET([.S$24]+[.$BB58])+[.T$30]*[.$Z$5]*MAGNET([.T$24]+[.$BB58])+[.U$30]*[.$Z$5]*MAGNET([.U$24]+[.$BB58])+[.V$30]*[.$Z$5]*MAGNET([.V$24]+[.$BB58])+[.W$30]*[.$Z$5]*MAGNET([.W$24]+[.$BB58])+[.X$30]*[.$Z$5]*MAGNET([.X$24]+[.$BB58])+[.Y$30]*[.$Z$5]*MAGNET([.Y$24]+[.$BB58])+[.Z$30]*[.$Z$5]*MAGNET([.Z$24]+[.$BB58])+[.AA$30]*[.$Z$5]*MAGNET([.AA$24]+[.$BB58])+[.AB$30]*[.$Z$5]*MAGNET([.AB$24]+[.$BB58])+[.AC$30]*[.$Z$5]*MAGNET([.AC$24]+[.$BB58])+[.AD$30]*[.$Z$5]*MAGNET([.AD$24]+[.$BB58])+[.AE$30]*[.$Z$5]*MAGNET([.AE$24]+[.$BB58])+[.AF$30]*[.$Z$5]*MAGNET([.AF$24]+[.$BB58])+[.AG$30]*[.$Z$5]*MAGNET([.AG$24]+[.$BB58])+[.D$30]*[.$Z$5]*MAGNET([.D$24]+[.$BB58])+[.AH$30]*[.$Z$5]*MAGNET([.AH$24]+[.BB58]) +[.AI$30]*[.$Z$5]*MAGNET([.AI$24]+[.BB58]) +[.AJ$30]*[.$Z$5]*MAGNET([.AJ$24]+[.BB58]) +[.AK$30]*[.$Z$5]*MAGNET([.AK$24]+[.BB58]) +[.AL$30]*[.$Z$5]*MAGNET([.AL$24]+[.BB58]) +[.AM$30]*[.$Z$5]*MAGNET([.AM$24]+[.BB58]) +[.AN$30]*[.$Z$5]*MAGNET([.AN$24]+[.BB58]) +[.AO$30]*[.$Z$5]*MAGNET([.AO$24]+[.BB58]) +[.AP$30]*[.$Z$5]*MAGNET([.AP$24]+[.$BB58])&#10;+[.AQ$30]*[.$Z$5]*MAGNET([.AQ$24]+[.$BB58])&#10;+[.AR$30]*[.$Z$5]*MAGNET([.AR$24]+[.$BB58])&#10;+[.AS$30]*[.$Z$5]*MAGNET([.AS$24]+[.$BB58])&#10;+[.AT$30]*[.$Z$5]*MAGNET([.AT$24]+[.$BB58])&#10;+[.AU$30]*[.$Z$5]*MAGNET([.AU$24]+[.$BB58])&#10;+[.AV$30]*[.$Z$5]*MAGNET([.AV$24]+[.$BB58])&#10;+[.AW$30]*[.$Z$5]*MAGNET([.AW$24]+[.$BB58])&#10;+[.AX$30]*[.$Z$5]*MAGNET([.AX$24]+[.$BB58])&#10;+[.AY$30]*[.$Z$5]*MAGNET([.AY$24]+[.$BB58]) +RAND()*[.$BH$13]" office:value-type="float" office:value="0" calcext:value-type="float">
            <text:p>0</text:p>
          </table:table-cell>
          <table:table-cell table:style-name="ce71" table:formula="of:=[.E$31]*[.$Z$5]*MAGNET([.E$24]+[.$BB58])+[.F$31]*[.$Z$5]*MAGNET([.F$24]+[.$BB58])+[.G$31]*[.$Z$5]*MAGNET([.G$24]+[.$BB58])+[.H$31]*[.$Z$5]*MAGNET([.H$24]+[.$BB58])+[.I$31]*[.$Z$5]*MAGNET([.I$24]+[.$BB58])+[.J$31]*[.$Z$5]*MAGNET([.J$24]+[.$BB58])+[.K$31]*[.$Z$5]*MAGNET([.K$24]+[.$BB58])+[.L$31]*[.$Z$5]*MAGNET([.L$24]+[.$BB58])+[.M$31]*[.$Z$5]*MAGNET([.M$24]+[.$BB58])+[.N$31]*[.$Z$5]*MAGNET([.N$24]+[.$BB58])+[.O$31]*[.$Z$5]*MAGNET([.O$24]+[.$BB58])+[.P$31]*[.$Z$5]*MAGNET([.P$24]+[.$BB58])+[.Q$31]*[.$Z$5]*MAGNET([.Q$24]+[.$BB58])+[.R$31]*[.$Z$5]*MAGNET([.R$24]+[.$BB58])+[.S$31]*[.$Z$5]*MAGNET([.S$24]+[.$BB58])+[.T$31]*[.$Z$5]*MAGNET([.T$24]+[.$BB58])+[.U$31]*[.$Z$5]*MAGNET([.U$24]+[.$BB58])+[.V$31]*[.$Z$5]*MAGNET([.V$24]+[.$BB58])+[.W$31]*[.$Z$5]*MAGNET([.W$24]+[.$BB58])+[.X$31]*[.$Z$5]*MAGNET([.X$24]+[.$BB58])+[.Y$31]*[.$Z$5]*MAGNET([.Y$24]+[.$BB58])+[.Z$31]*[.$Z$5]*MAGNET([.Z$24]+[.$BB58])+[.AA$31]*[.$Z$5]*MAGNET([.AA$24]+[.$BB58])+[.AB$31]*[.$Z$5]*MAGNET([.AB$24]+[.$BB58])+[.AC$31]*[.$Z$5]*MAGNET([.AC$24]+[.$BB58])+[.AD$31]*[.$Z$5]*MAGNET([.AD$24]+[.$BB58])+[.AE$31]*[.$Z$5]*MAGNET([.AE$24]+[.$BB58])+[.AF$31]*[.$Z$5]*MAGNET([.AF$24]+[.$BB58])+[.AG$31]*[.$Z$5]*MAGNET([.AG$24]+[.$BB58])+[.D$31]*[.$Z$5]*MAGNET([.D$24]+[.$BB58])+[.AH$31]*[.$Z$5]*MAGNET([.AH$24]+[.BB58]) +[.AI$31]*[.$Z$5]*MAGNET([.AI$24]+[.BB58]) +[.AJ$31]*[.$Z$5]*MAGNET([.AJ$24]+[.BB58]) +[.AK$31]*[.$Z$5]*MAGNET([.AK$24]+[.BB58]) +[.AL$31]*[.$Z$5]*MAGNET([.AL$24]+[.BB58]) +[.AM$31]*[.$Z$5]*MAGNET([.AM$24]+[.BB58]) +[.AN$31]*[.$Z$5]*MAGNET([.AN$24]+[.BB58]) +[.AO$31]*[.$Z$5]*MAGNET([.AO$24]+[.BB58]) +[.AP$31]*[.$Z$5]*MAGNET([.AP$24]+[.$BB58])&#10;+[.AQ$31]*[.$Z$5]*MAGNET([.AQ$24]+[.$BB58])&#10;+[.AR$31]*[.$Z$5]*MAGNET([.AR$24]+[.$BB58])&#10;+[.AS$31]*[.$Z$5]*MAGNET([.AS$24]+[.$BB58])&#10;+[.AT$31]*[.$Z$5]*MAGNET([.AT$24]+[.$BB58])&#10;+[.AU$31]*[.$Z$5]*MAGNET([.AU$24]+[.$BB58])&#10;+[.AV$31]*[.$Z$5]*MAGNET([.AV$24]+[.$BB58])&#10;+[.AW$31]*[.$Z$5]*MAGNET([.AW$24]+[.$BB58])&#10;+[.AX$31]*[.$Z$5]*MAGNET([.AX$24]+[.$BB58])&#10;+[.AY$31]*[.$Z$5]*MAGNET([.AY$24]+[.$BB58]) +RAND()*[.$BI$13]" office:value-type="float" office:value="0" calcext:value-type="float">
            <text:p>0</text:p>
          </table:table-cell>
          <table:table-cell table:style-name="ce71" table:formula="of:=[.E$32]*[.$Z$5]*MAGNET([.E$24]+[.$BB58])+[.F$32]*[.$Z$5]*MAGNET([.F$24]+[.$BB58])+[.G$32]*[.$Z$5]*MAGNET([.G$24]+[.$BB58])+[.H$32]*[.$Z$5]*MAGNET([.H$24]+[.$BB58])+[.I$32]*[.$Z$5]*MAGNET([.I$24]+[.$BB58])+[.J$32]*[.$Z$5]*MAGNET([.J$24]+[.$BB58])+[.K$32]*[.$Z$5]*MAGNET([.K$24]+[.$BB58])+[.L$32]*[.$Z$5]*MAGNET([.L$24]+[.$BB58])+[.M$32]*[.$Z$5]*MAGNET([.M$24]+[.$BB58])+[.N$32]*[.$Z$5]*MAGNET([.N$24]+[.$BB58])+[.O$32]*[.$Z$5]*MAGNET([.O$24]+[.$BB58])+[.P$32]*[.$Z$5]*MAGNET([.P$24]+[.$BB58])+[.Q$32]*[.$Z$5]*MAGNET([.Q$24]+[.$BB58])+[.R$32]*[.$Z$5]*MAGNET([.R$24]+[.$BB58])+[.S$32]*[.$Z$5]*MAGNET([.S$24]+[.$BB58])+[.T$32]*[.$Z$5]*MAGNET([.T$24]+[.$BB58])+[.U$32]*[.$Z$5]*MAGNET([.U$24]+[.$BB58])+[.V$32]*[.$Z$5]*MAGNET([.V$24]+[.$BB58])+[.W$32]*[.$Z$5]*MAGNET([.W$24]+[.$BB58])+[.X$32]*[.$Z$5]*MAGNET([.X$24]+[.$BB58])+[.Y$32]*[.$Z$5]*MAGNET([.Y$24]+[.$BB58])+[.Z$32]*[.$Z$5]*MAGNET([.Z$24]+[.$BB58])+[.AA$32]*[.$Z$5]*MAGNET([.AA$24]+[.$BB58])+[.AB$32]*[.$Z$5]*MAGNET([.AB$24]+[.$BB58])+[.AC$32]*[.$Z$5]*MAGNET([.AC$24]+[.$BB58])+[.AD$32]*[.$Z$5]*MAGNET([.AD$24]+[.$BB58])+[.AE$32]*[.$Z$5]*MAGNET([.AE$24]+[.$BB58])+[.AF$32]*[.$Z$5]*MAGNET([.AF$24]+[.$BB58])+[.AG$32]*[.$Z$5]*MAGNET([.AG$24]+[.$BB58])+[.D$32]*[.$Z$5]*MAGNET([.D$24]+[.$BB58])+[.AH$32]*[.$Z$5]*MAGNET([.AH$24]+[.BB58]) +[.AI$32]*[.$Z$5]*MAGNET([.AI$24]+[.BB58]) +[.AJ$32]*[.$Z$5]*MAGNET([.AJ$24]+[.BB58]) +[.AK$32]*[.$Z$5]*MAGNET([.AK$24]+[.BB58]) +[.AL$32]*[.$Z$5]*MAGNET([.AL$24]+[.BB58]) +[.AM$32]*[.$Z$5]*MAGNET([.AM$24]+[.BB58]) +[.AN$32]*[.$Z$5]*MAGNET([.AN$24]+[.BB58]) +[.AO$32]*[.$Z$5]*MAGNET([.AO$24]+[.BB58]) +[.AP$32]*[.$Z$5]*MAGNET([.AP$24]+[.$BB58])&#10;+[.AQ$32]*[.$Z$5]*MAGNET([.AQ$24]+[.$BB58])&#10;+[.AR$32]*[.$Z$5]*MAGNET([.AR$24]+[.$BB58])&#10;+[.AS$32]*[.$Z$5]*MAGNET([.AS$24]+[.$BB58])&#10;+[.AT$32]*[.$Z$5]*MAGNET([.AT$24]+[.$BB58])&#10;+[.AU$32]*[.$Z$5]*MAGNET([.AU$24]+[.$BB58])&#10;+[.AV$32]*[.$Z$5]*MAGNET([.AV$24]+[.$BB58])&#10;+[.AW$32]*[.$Z$5]*MAGNET([.AW$24]+[.$BB58])&#10;+[.AX$32]*[.$Z$5]*MAGNET([.AX$24]+[.$BB58])&#10;+[.AY$32]*[.$Z$5]*MAGNET([.AY$24]+[.$BB5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58]+0.002" office:value-type="float" office:value="0.0880000000000001" calcext:value-type="float">
            <text:p>0.0880000000000001</text:p>
          </table:table-cell>
          <table:table-cell table:formula="of:=[.BA59]*[.$D$6]" office:value-type="float" office:value="4.42336245625443" calcext:value-type="float">
            <text:p>4.423</text:p>
          </table:table-cell>
          <table:table-cell table:formula="of:=[.D$25]*[.$Z$5]*MAGNET([.D$24]+[.BB59])+[.E$25]*[.$Z$5]*MAGNET([.E$24]+[.BB59])+[.F$25]*[.$Z$5]*MAGNET([.F$24]+[.BB59])+[.G$25]*[.$Z$5]*MAGNET([.G$24]+[.BB59])+[.H$25]*[.$Z$5]*MAGNET([.H$24]+[.BB59])+[.I$25]*[.$Z$5]*MAGNET([.I$24]+[.BB59])+[.J$25]*[.$Z$5]*MAGNET([.J$24]+[.BB59])+[.K$25]*[.$Z$5]*MAGNET([.K$24]+[.BB59])+[.L$25]*[.$Z$5]*MAGNET([.L$24]+[.BB59])+[.M$25]*[.$Z$5]*MAGNET([.M$24]+[.BB59])+[.N$25]*[.$Z$5]*MAGNET([.N$24]+[.BB59])+[.O$25]*[.$Z$5]*MAGNET([.O$24]+[.BB59])+[.P$25]*[.$Z$5]*MAGNET([.P$24]+[.BB59])+[.Q$25]*[.$Z$5]*MAGNET([.Q$24]+[.BB59])+[.R$25]*[.$Z$5]*MAGNET([.R$24]+[.BB59])+[.S$25]*[.$Z$5]*MAGNET([.S$24]+[.BB59])+[.T$25]*[.$Z$5]*MAGNET([.T$24]+[.BB59])+[.U$25]*[.$Z$5]*MAGNET([.U$24]+[.BB59])+[.V$25]*[.$Z$5]*MAGNET([.V$24]+[.BB59])+[.W$25]*[.$Z$5]*MAGNET([.W$24]+[.BB59])+[.X$25]*[.$Z$5]*MAGNET([.X$24]+[.BB59])+[.Y$25]*[.$Z$5]*MAGNET([.Y$24]+[.BB59])+[.Z$25]*[.$Z$5]*MAGNET([.Z$24]+[.BB59])+[.AA$25]*[.$Z$5]*MAGNET([.AA$24]+[.BB59])+[.AB$25]*[.$Z$5]*MAGNET([.AB$24]+[.BB59])+[.AC$25]*[.$Z$5]*MAGNET([.AC$24]+[.BB59])+[.AD$25]*[.$Z$5]*MAGNET([.AD$24]+[.BB59])+[.AE$25]*[.$Z$5]*MAGNET([.AE$24]+[.BB59])+[.AF$25]*[.$Z$5]*MAGNET([.AF$24]+[.BB59])+[.AG$25]*[.$Z$5]*MAGNET([.AG$24]+[.BB59])+[.AH$25]*[.$Z$5]*MAGNET([.AH$24]+[.BB59]) +[.AI$25]*[.$Z$5]*MAGNET([.AI$24]+[.BB59]) +[.AJ$25]*[.$Z$5]*MAGNET([.AJ$24]+[.BB59]) +[.AK$25]*[.$Z$5]*MAGNET([.AK$24]+[.BB59]) +[.AL$25]*[.$Z$5]*MAGNET([.AL$24]+[.BB59]) +[.AM$25]*[.$Z$5]*MAGNET([.AM$24]+[.BB59]) +[.AN$25]*[.$Z$5]*MAGNET([.AN$24]+[.BB59]) +[.AO$25]*[.$Z$5]*MAGNET([.AO$24]+[.BB59])+RAND()*[.$BC$13]+[.AP$25]*[.$Z$5]*MAGNET([.AP$24]+[.BB59])&#10;+[.AQ$25]*[.$Z$5]*MAGNET([.AQ$24]+[.BB59])&#10;+[.AR$25]*[.$Z$5]*MAGNET([.AR$24]+[.BB59])&#10;+[.AS$25]*[.$Z$5]*MAGNET([.AS$24]+[.BB59])&#10;+[.AT$25]*[.$Z$5]*MAGNET([.AT$24]+[.BB59])&#10;+[.AU$25]*[.$Z$5]*MAGNET([.AU$24]+[.BB59])&#10;+[.AV$25]*[.$Z$5]*MAGNET([.AV$24]+[.BB59])&#10;+[.AW$25]*[.$Z$5]*MAGNET([.AW$24]+[.BB59])&#10;+[.AX$25]*[.$Z$5]*MAGNET([.AX$24]+[.BB59])&#10;+[.AY$25]*[.$Z$5]*MAGNET([.AY$24]+[.BB59])" office:value-type="float" office:value="-87.7663229959387" calcext:value-type="float">
            <text:p>-87.77</text:p>
          </table:table-cell>
          <table:table-cell table:style-name="ce70" table:formula="of:=[.E$26]*[.$Z$5]*MAGNET([.E$24]+[.$BB59])+[.F$26]*[.$Z$5]*MAGNET([.F$24]+[.$BB59])+[.G$26]*[.$Z$5]*MAGNET([.G$24]+[.$BB59])+[.H$26]*[.$Z$5]*MAGNET([.H$24]+[.$BB59])+[.I$26]*[.$Z$5]*MAGNET([.I$24]+[.$BB59])+[.J$26]*[.$Z$5]*MAGNET([.J$24]+[.$BB59])+[.K$26]*[.$Z$5]*MAGNET([.K$24]+[.$BB59])+[.L$26]*[.$Z$5]*MAGNET([.L$24]+[.$BB59])+[.M$26]*[.$Z$5]*MAGNET([.M$24]+[.$BB59])+[.N$26]*[.$Z$5]*MAGNET([.N$24]+[.$BB59])+[.O$26]*[.$Z$5]*MAGNET([.O$24]+[.$BB59])+[.P$26]*[.$Z$5]*MAGNET([.P$24]+[.$BB59])+[.Q$26]*[.$Z$5]*MAGNET([.Q$24]+[.$BB59])+[.R$26]*[.$Z$5]*MAGNET([.R$24]+[.$BB59])+[.S$26]*[.$Z$5]*MAGNET([.S$24]+[.$BB59])+[.T$26]*[.$Z$5]*MAGNET([.T$24]+[.$BB59])+[.U$26]*[.$Z$5]*MAGNET([.U$24]+[.$BB59])+[.V$26]*[.$Z$5]*MAGNET([.V$24]+[.$BB59])+[.W$26]*[.$Z$5]*MAGNET([.W$24]+[.$BB59])+[.X$26]*[.$Z$5]*MAGNET([.X$24]+[.$BB59])+[.Y$26]*[.$Z$5]*MAGNET([.Y$24]+[.$BB59])+[.Z$26]*[.$Z$5]*MAGNET([.Z$24]+[.$BB59])+[.AA$26]*[.$Z$5]*MAGNET([.AA$24]+[.$BB59])+[.AB$26]*[.$Z$5]*MAGNET([.AB$24]+[.$BB59])+[.AC$26]*[.$Z$5]*MAGNET([.AC$24]+[.$BB59])+[.AD$26]*[.$Z$5]*MAGNET([.AD$24]+[.$BB59])+[.AE$26]*[.$Z$5]*MAGNET([.AE$24]+[.$BB59])+[.AF$26]*[.$Z$5]*MAGNET([.AF$24]+[.$BB59])+[.AG$26]*[.$Z$5]*MAGNET([.AG$24]+[.$BB59])+[.D$26]*[.$Z$5]*MAGNET([.D$24]+[.$BB59])+[.AH$26]*[.$Z$5]*MAGNET([.AH$24]+[.BB59]) +[.AI$26]*[.$Z$5]*MAGNET([.AI$24]+[.BB59]) +[.AJ$26]*[.$Z$5]*MAGNET([.AJ$24]+[.BB59]) +[.AK$26]*[.$Z$5]*MAGNET([.AK$24]+[.BB59]) +[.AL$26]*[.$Z$5]*MAGNET([.AL$24]+[.BB59]) +[.AM$26]*[.$Z$5]*MAGNET([.AM$24]+[.BB59]) +[.AN$26]*[.$Z$5]*MAGNET([.AN$24]+[.BB59]) +[.AO$26]*[.$Z$5]*MAGNET([.AO$24]+[.BB59]) +[.AP$26]*[.$Z$5]*MAGNET([.AP$24]+[.$BB59])&#10;+[.AQ$26]*[.$Z$5]*MAGNET([.AQ$24]+[.$BB59])&#10;+[.AR$26]*[.$Z$5]*MAGNET([.AR$24]+[.$BB59])&#10;+[.AS$26]*[.$Z$5]*MAGNET([.AS$24]+[.$BB59])&#10;+[.AT$26]*[.$Z$5]*MAGNET([.AT$24]+[.$BB59])&#10;+[.AU$26]*[.$Z$5]*MAGNET([.AU$24]+[.$BB59])&#10;+[.AV$26]*[.$Z$5]*MAGNET([.AV$24]+[.$BB59])&#10;+[.AW$26]*[.$Z$5]*MAGNET([.AW$24]+[.$BB59])&#10;+[.AX$26]*[.$Z$5]*MAGNET([.AX$24]+[.$BB59])&#10;+[.AY$26]*[.$Z$5]*MAGNET([.AY$24]+[.$BB59]) +RAND()*[.$BD$13]" office:value-type="float" office:value="-2.9761403451324" calcext:value-type="float">
            <text:p>-2.98</text:p>
          </table:table-cell>
          <table:table-cell table:style-name="ce71" table:formula="of:=[.E$27]*[.$Z$5]*MAGNET([.E$24]+[.$BB59])+[.F$27]*[.$Z$5]*MAGNET([.F$24]+[.$BB59])+[.G$27]*[.$Z$5]*MAGNET([.G$24]+[.$BB59])+[.H$27]*[.$Z$5]*MAGNET([.H$24]+[.$BB59])+[.I$27]*[.$Z$5]*MAGNET([.I$24]+[.$BB59])+[.J$27]*[.$Z$5]*MAGNET([.J$24]+[.$BB59])+[.K$27]*[.$Z$5]*MAGNET([.K$24]+[.$BB59])+[.L$27]*[.$Z$5]*MAGNET([.L$24]+[.$BB59])+[.M$27]*[.$Z$5]*MAGNET([.M$24]+[.$BB59])+[.N$27]*[.$Z$5]*MAGNET([.N$24]+[.$BB59])+[.O$27]*[.$Z$5]*MAGNET([.O$24]+[.$BB59])+[.P$27]*[.$Z$5]*MAGNET([.P$24]+[.$BB59])+[.Q$27]*[.$Z$5]*MAGNET([.Q$24]+[.$BB59])+[.R$27]*[.$Z$5]*MAGNET([.R$24]+[.$BB59])+[.S$27]*[.$Z$5]*MAGNET([.S$24]+[.$BB59])+[.T$27]*[.$Z$5]*MAGNET([.T$24]+[.$BB59])+[.U$27]*[.$Z$5]*MAGNET([.U$24]+[.$BB59])+[.V$27]*[.$Z$5]*MAGNET([.V$24]+[.$BB59])+[.W$27]*[.$Z$5]*MAGNET([.W$24]+[.$BB59])+[.X$27]*[.$Z$5]*MAGNET([.X$24]+[.$BB59])+[.Y$27]*[.$Z$5]*MAGNET([.Y$24]+[.$BB59])+[.Z$27]*[.$Z$5]*MAGNET([.Z$24]+[.$BB59])+[.AA$27]*[.$Z$5]*MAGNET([.AA$24]+[.$BB59])+[.AB$27]*[.$Z$5]*MAGNET([.AB$24]+[.$BB59])+[.AC$27]*[.$Z$5]*MAGNET([.AC$24]+[.$BB59])+[.AD$27]*[.$Z$5]*MAGNET([.AD$24]+[.$BB59])+[.AE$27]*[.$Z$5]*MAGNET([.AE$24]+[.$BB59])+[.AF$27]*[.$Z$5]*MAGNET([.AF$24]+[.$BB59])+[.AG$27]*[.$Z$5]*MAGNET([.AG$24]+[.$BB59])+[.D$27]*[.$Z$5]*MAGNET([.D$24]+[.$BB59])+[.AH$27]*[.$Z$5]*MAGNET([.AH$24]+[.BB59]) +[.AI$27]*[.$Z$5]*MAGNET([.AI$24]+[.BB59]) +[.AJ$27]*[.$Z$5]*MAGNET([.AJ$24]+[.BB59]) +[.AK$27]*[.$Z$5]*MAGNET([.AK$24]+[.BB59]) +[.AL$27]*[.$Z$5]*MAGNET([.AL$24]+[.BB59]) +[.AM$27]*[.$Z$5]*MAGNET([.AM$24]+[.BB59]) +[.AN$27]*[.$Z$5]*MAGNET([.AN$24]+[.BB59]) +[.AO$27]*[.$Z$5]*MAGNET([.AO$24]+[.BB59]) +[.AP$27]*[.$Z$5]*MAGNET([.AP$24]+[.$BB59])&#10;+[.AQ$27]*[.$Z$5]*MAGNET([.AQ$24]+[.$BB59])&#10;+[.AR$27]*[.$Z$5]*MAGNET([.AR$24]+[.$BB59])&#10;+[.AS$27]*[.$Z$5]*MAGNET([.AS$24]+[.$BB59])&#10;+[.AT$27]*[.$Z$5]*MAGNET([.AT$24]+[.$BB59])&#10;+[.AU$27]*[.$Z$5]*MAGNET([.AU$24]+[.$BB59])&#10;+[.AV$27]*[.$Z$5]*MAGNET([.AV$24]+[.$BB59])&#10;+[.AW$27]*[.$Z$5]*MAGNET([.AW$24]+[.$BB59])&#10;+[.AX$27]*[.$Z$5]*MAGNET([.AX$24]+[.$BB59])&#10;+[.AY$27]*[.$Z$5]*MAGNET([.AY$24]+[.$BB59]) +RAND()*[.$BE$13]" office:value-type="float" office:value="135.152656888697" calcext:value-type="float">
            <text:p>135.152656888697</text:p>
          </table:table-cell>
          <table:table-cell table:style-name="ce71" table:formula="of:=[.E$28]*[.$Z$5]*MAGNET([.E$24]+[.$BB59])+[.F$28]*[.$Z$5]*MAGNET([.F$24]+[.$BB59])+[.G$28]*[.$Z$5]*MAGNET([.G$24]+[.$BB59])+[.H$28]*[.$Z$5]*MAGNET([.H$24]+[.$BB59])+[.I$28]*[.$Z$5]*MAGNET([.I$24]+[.$BB59])+[.J$28]*[.$Z$5]*MAGNET([.J$24]+[.$BB59])+[.K$28]*[.$Z$5]*MAGNET([.K$24]+[.$BB59])+[.L$28]*[.$Z$5]*MAGNET([.L$24]+[.$BB59])+[.M$28]*[.$Z$5]*MAGNET([.M$24]+[.$BB59])+[.N$28]*[.$Z$5]*MAGNET([.N$24]+[.$BB59])+[.O$28]*[.$Z$5]*MAGNET([.O$24]+[.$BB59])+[.P$28]*[.$Z$5]*MAGNET([.P$24]+[.$BB59])+[.Q$28]*[.$Z$5]*MAGNET([.Q$24]+[.$BB59])+[.R$28]*[.$Z$5]*MAGNET([.R$24]+[.$BB59])+[.S$28]*[.$Z$5]*MAGNET([.S$24]+[.$BB59])+[.T$28]*[.$Z$5]*MAGNET([.T$24]+[.$BB59])+[.U$28]*[.$Z$5]*MAGNET([.U$24]+[.$BB59])+[.V$28]*[.$Z$5]*MAGNET([.V$24]+[.$BB59])+[.W$28]*[.$Z$5]*MAGNET([.W$24]+[.$BB59])+[.X$28]*[.$Z$5]*MAGNET([.X$24]+[.$BB59])+[.Y$28]*[.$Z$5]*MAGNET([.Y$24]+[.$BB59])+[.Z$28]*[.$Z$5]*MAGNET([.Z$24]+[.$BB59])+[.AA$28]*[.$Z$5]*MAGNET([.AA$24]+[.$BB59])+[.AB$28]*[.$Z$5]*MAGNET([.AB$24]+[.$BB59])+[.AC$28]*[.$Z$5]*MAGNET([.AC$24]+[.$BB59])+[.AD$28]*[.$Z$5]*MAGNET([.AD$24]+[.$BB59])+[.AE$28]*[.$Z$5]*MAGNET([.AE$24]+[.$BB59])+[.AF$28]*[.$Z$5]*MAGNET([.AF$24]+[.$BB59])+[.AG$28]*[.$Z$5]*MAGNET([.AG$24]+[.$BB59])+[.D$28]*[.$Z$5]*MAGNET([.D$24]+[.$BB59])+[.AH$28]*[.$Z$5]*MAGNET([.AH$24]+[.BB59]) +[.AI$28]*[.$Z$5]*MAGNET([.AI$24]+[.BB59]) +[.AJ$28]*[.$Z$5]*MAGNET([.AJ$24]+[.BB59]) +[.AK$28]*[.$Z$5]*MAGNET([.AK$24]+[.BB59]) +[.AL$28]*[.$Z$5]*MAGNET([.AL$24]+[.BB59]) +[.AM$28]*[.$Z$5]*MAGNET([.AM$24]+[.BB59]) +[.AN$28]*[.$Z$5]*MAGNET([.AN$24]+[.BB59]) +[.AO$28]*[.$Z$5]*MAGNET([.AO$24]+[.BB59]) +[.AP$28]*[.$Z$5]*MAGNET([.AP$24]+[.$BB59])&#10;+[.AQ$28]*[.$Z$5]*MAGNET([.AQ$24]+[.$BB59])&#10;+[.AR$28]*[.$Z$5]*MAGNET([.AR$24]+[.$BB59])&#10;+[.AS$28]*[.$Z$5]*MAGNET([.AS$24]+[.$BB59])&#10;+[.AT$28]*[.$Z$5]*MAGNET([.AT$24]+[.$BB59])&#10;+[.AU$28]*[.$Z$5]*MAGNET([.AU$24]+[.$BB59])&#10;+[.AV$28]*[.$Z$5]*MAGNET([.AV$24]+[.$BB59])&#10;+[.AW$28]*[.$Z$5]*MAGNET([.AW$24]+[.$BB59])&#10;+[.AX$28]*[.$Z$5]*MAGNET([.AX$24]+[.$BB59])&#10;+[.AY$28]*[.$Z$5]*MAGNET([.AY$24]+[.$BB59]) +RAND()*[.$BF$13]" office:value-type="float" office:value="17.254141783408" calcext:value-type="float">
            <text:p>17.254141783408</text:p>
          </table:table-cell>
          <table:table-cell table:style-name="ce71" table:formula="of:=[.E$29]*[.$Z$5]*MAGNET([.E$24]+[.$BB59])+[.F$29]*[.$Z$5]*MAGNET([.F$24]+[.$BB59])+[.G$29]*[.$Z$5]*MAGNET([.G$24]+[.$BB59])+[.H$29]*[.$Z$5]*MAGNET([.H$24]+[.$BB59])+[.I$29]*[.$Z$5]*MAGNET([.I$24]+[.$BB59])+[.J$29]*[.$Z$5]*MAGNET([.J$24]+[.$BB59])+[.K$29]*[.$Z$5]*MAGNET([.K$24]+[.$BB59])+[.L$29]*[.$Z$5]*MAGNET([.L$24]+[.$BB59])+[.M$29]*[.$Z$5]*MAGNET([.M$24]+[.$BB59])+[.N$29]*[.$Z$5]*MAGNET([.N$24]+[.$BB59])+[.O$29]*[.$Z$5]*MAGNET([.O$24]+[.$BB59])+[.P$29]*[.$Z$5]*MAGNET([.P$24]+[.$BB59])+[.Q$29]*[.$Z$5]*MAGNET([.Q$24]+[.$BB59])+[.R$29]*[.$Z$5]*MAGNET([.R$24]+[.$BB59])+[.S$29]*[.$Z$5]*MAGNET([.S$24]+[.$BB59])+[.T$29]*[.$Z$5]*MAGNET([.T$24]+[.$BB59])+[.U$29]*[.$Z$5]*MAGNET([.U$24]+[.$BB59])+[.V$29]*[.$Z$5]*MAGNET([.V$24]+[.$BB59])+[.W$29]*[.$Z$5]*MAGNET([.W$24]+[.$BB59])+[.X$29]*[.$Z$5]*MAGNET([.X$24]+[.$BB59])+[.Y$29]*[.$Z$5]*MAGNET([.Y$24]+[.$BB59])+[.Z$29]*[.$Z$5]*MAGNET([.Z$24]+[.$BB59])+[.AA$29]*[.$Z$5]*MAGNET([.AA$24]+[.$BB59])+[.AB$29]*[.$Z$5]*MAGNET([.AB$24]+[.$BB59])+[.AC$29]*[.$Z$5]*MAGNET([.AC$24]+[.$BB59])+[.AD$29]*[.$Z$5]*MAGNET([.AD$24]+[.$BB59])+[.AE$29]*[.$Z$5]*MAGNET([.AE$24]+[.$BB59])+[.AF$29]*[.$Z$5]*MAGNET([.AF$24]+[.$BB59])+[.AG$29]*[.$Z$5]*MAGNET([.AG$24]+[.$BB59])+[.D$29]*[.$Z$5]*MAGNET([.D$24]+[.$BB59])+[.AH$29]*[.$Z$5]*MAGNET([.AH$24]+[.BB59]) +[.AI$29]*[.$Z$5]*MAGNET([.AI$24]+[.BB59]) +[.AJ$29]*[.$Z$5]*MAGNET([.AJ$24]+[.BB59]) +[.AK$29]*[.$Z$5]*MAGNET([.AK$24]+[.BB59]) +[.AL$29]*[.$Z$5]*MAGNET([.AL$24]+[.BB59]) +[.AM$29]*[.$Z$5]*MAGNET([.AM$24]+[.BB59]) +[.AN$29]*[.$Z$5]*MAGNET([.AN$24]+[.BB59]) +[.AO$29]*[.$Z$5]*MAGNET([.AO$24]+[.BB59]) +[.AP$29]*[.$Z$5]*MAGNET([.AP$24]+[.$BB59])&#10;+[.AQ$29]*[.$Z$5]*MAGNET([.AQ$24]+[.$BB59])&#10;+[.AR$29]*[.$Z$5]*MAGNET([.AR$24]+[.$BB59])&#10;+[.AS$29]*[.$Z$5]*MAGNET([.AS$24]+[.$BB59])&#10;+[.AT$29]*[.$Z$5]*MAGNET([.AT$24]+[.$BB59])&#10;+[.AU$29]*[.$Z$5]*MAGNET([.AU$24]+[.$BB59])&#10;+[.AV$29]*[.$Z$5]*MAGNET([.AV$24]+[.$BB59])&#10;+[.AW$29]*[.$Z$5]*MAGNET([.AW$24]+[.$BB59])&#10;+[.AX$29]*[.$Z$5]*MAGNET([.AX$24]+[.$BB59])&#10;+[.AY$29]*[.$Z$5]*MAGNET([.AY$24]+[.$BB59]) +RAND()*[.$BG$13]" office:value-type="float" office:value="-45.1677317988915" calcext:value-type="float">
            <text:p>-45.1677317988915</text:p>
          </table:table-cell>
          <table:table-cell table:style-name="ce71" table:formula="of:=[.E$30]*[.$Z$5]*MAGNET([.E$24]+[.$BB59])+[.F$30]*[.$Z$5]*MAGNET([.F$24]+[.$BB59])+[.G$30]*[.$Z$5]*MAGNET([.G$24]+[.$BB59])+[.H$30]*[.$Z$5]*MAGNET([.H$24]+[.$BB59])+[.I$30]*[.$Z$5]*MAGNET([.I$24]+[.$BB59])+[.J$30]*[.$Z$5]*MAGNET([.J$24]+[.$BB59])+[.K$30]*[.$Z$5]*MAGNET([.K$24]+[.$BB59])+[.L$30]*[.$Z$5]*MAGNET([.L$24]+[.$BB59])+[.M$30]*[.$Z$5]*MAGNET([.M$24]+[.$BB59])+[.N$30]*[.$Z$5]*MAGNET([.N$24]+[.$BB59])+[.O$30]*[.$Z$5]*MAGNET([.O$24]+[.$BB59])+[.P$30]*[.$Z$5]*MAGNET([.P$24]+[.$BB59])+[.Q$30]*[.$Z$5]*MAGNET([.Q$24]+[.$BB59])+[.R$30]*[.$Z$5]*MAGNET([.R$24]+[.$BB59])+[.S$30]*[.$Z$5]*MAGNET([.S$24]+[.$BB59])+[.T$30]*[.$Z$5]*MAGNET([.T$24]+[.$BB59])+[.U$30]*[.$Z$5]*MAGNET([.U$24]+[.$BB59])+[.V$30]*[.$Z$5]*MAGNET([.V$24]+[.$BB59])+[.W$30]*[.$Z$5]*MAGNET([.W$24]+[.$BB59])+[.X$30]*[.$Z$5]*MAGNET([.X$24]+[.$BB59])+[.Y$30]*[.$Z$5]*MAGNET([.Y$24]+[.$BB59])+[.Z$30]*[.$Z$5]*MAGNET([.Z$24]+[.$BB59])+[.AA$30]*[.$Z$5]*MAGNET([.AA$24]+[.$BB59])+[.AB$30]*[.$Z$5]*MAGNET([.AB$24]+[.$BB59])+[.AC$30]*[.$Z$5]*MAGNET([.AC$24]+[.$BB59])+[.AD$30]*[.$Z$5]*MAGNET([.AD$24]+[.$BB59])+[.AE$30]*[.$Z$5]*MAGNET([.AE$24]+[.$BB59])+[.AF$30]*[.$Z$5]*MAGNET([.AF$24]+[.$BB59])+[.AG$30]*[.$Z$5]*MAGNET([.AG$24]+[.$BB59])+[.D$30]*[.$Z$5]*MAGNET([.D$24]+[.$BB59])+[.AH$30]*[.$Z$5]*MAGNET([.AH$24]+[.BB59]) +[.AI$30]*[.$Z$5]*MAGNET([.AI$24]+[.BB59]) +[.AJ$30]*[.$Z$5]*MAGNET([.AJ$24]+[.BB59]) +[.AK$30]*[.$Z$5]*MAGNET([.AK$24]+[.BB59]) +[.AL$30]*[.$Z$5]*MAGNET([.AL$24]+[.BB59]) +[.AM$30]*[.$Z$5]*MAGNET([.AM$24]+[.BB59]) +[.AN$30]*[.$Z$5]*MAGNET([.AN$24]+[.BB59]) +[.AO$30]*[.$Z$5]*MAGNET([.AO$24]+[.BB59]) +[.AP$30]*[.$Z$5]*MAGNET([.AP$24]+[.$BB59])&#10;+[.AQ$30]*[.$Z$5]*MAGNET([.AQ$24]+[.$BB59])&#10;+[.AR$30]*[.$Z$5]*MAGNET([.AR$24]+[.$BB59])&#10;+[.AS$30]*[.$Z$5]*MAGNET([.AS$24]+[.$BB59])&#10;+[.AT$30]*[.$Z$5]*MAGNET([.AT$24]+[.$BB59])&#10;+[.AU$30]*[.$Z$5]*MAGNET([.AU$24]+[.$BB59])&#10;+[.AV$30]*[.$Z$5]*MAGNET([.AV$24]+[.$BB59])&#10;+[.AW$30]*[.$Z$5]*MAGNET([.AW$24]+[.$BB59])&#10;+[.AX$30]*[.$Z$5]*MAGNET([.AX$24]+[.$BB59])&#10;+[.AY$30]*[.$Z$5]*MAGNET([.AY$24]+[.$BB59]) +RAND()*[.$BH$13]" office:value-type="float" office:value="0" calcext:value-type="float">
            <text:p>0</text:p>
          </table:table-cell>
          <table:table-cell table:style-name="ce71" table:formula="of:=[.E$31]*[.$Z$5]*MAGNET([.E$24]+[.$BB59])+[.F$31]*[.$Z$5]*MAGNET([.F$24]+[.$BB59])+[.G$31]*[.$Z$5]*MAGNET([.G$24]+[.$BB59])+[.H$31]*[.$Z$5]*MAGNET([.H$24]+[.$BB59])+[.I$31]*[.$Z$5]*MAGNET([.I$24]+[.$BB59])+[.J$31]*[.$Z$5]*MAGNET([.J$24]+[.$BB59])+[.K$31]*[.$Z$5]*MAGNET([.K$24]+[.$BB59])+[.L$31]*[.$Z$5]*MAGNET([.L$24]+[.$BB59])+[.M$31]*[.$Z$5]*MAGNET([.M$24]+[.$BB59])+[.N$31]*[.$Z$5]*MAGNET([.N$24]+[.$BB59])+[.O$31]*[.$Z$5]*MAGNET([.O$24]+[.$BB59])+[.P$31]*[.$Z$5]*MAGNET([.P$24]+[.$BB59])+[.Q$31]*[.$Z$5]*MAGNET([.Q$24]+[.$BB59])+[.R$31]*[.$Z$5]*MAGNET([.R$24]+[.$BB59])+[.S$31]*[.$Z$5]*MAGNET([.S$24]+[.$BB59])+[.T$31]*[.$Z$5]*MAGNET([.T$24]+[.$BB59])+[.U$31]*[.$Z$5]*MAGNET([.U$24]+[.$BB59])+[.V$31]*[.$Z$5]*MAGNET([.V$24]+[.$BB59])+[.W$31]*[.$Z$5]*MAGNET([.W$24]+[.$BB59])+[.X$31]*[.$Z$5]*MAGNET([.X$24]+[.$BB59])+[.Y$31]*[.$Z$5]*MAGNET([.Y$24]+[.$BB59])+[.Z$31]*[.$Z$5]*MAGNET([.Z$24]+[.$BB59])+[.AA$31]*[.$Z$5]*MAGNET([.AA$24]+[.$BB59])+[.AB$31]*[.$Z$5]*MAGNET([.AB$24]+[.$BB59])+[.AC$31]*[.$Z$5]*MAGNET([.AC$24]+[.$BB59])+[.AD$31]*[.$Z$5]*MAGNET([.AD$24]+[.$BB59])+[.AE$31]*[.$Z$5]*MAGNET([.AE$24]+[.$BB59])+[.AF$31]*[.$Z$5]*MAGNET([.AF$24]+[.$BB59])+[.AG$31]*[.$Z$5]*MAGNET([.AG$24]+[.$BB59])+[.D$31]*[.$Z$5]*MAGNET([.D$24]+[.$BB59])+[.AH$31]*[.$Z$5]*MAGNET([.AH$24]+[.BB59]) +[.AI$31]*[.$Z$5]*MAGNET([.AI$24]+[.BB59]) +[.AJ$31]*[.$Z$5]*MAGNET([.AJ$24]+[.BB59]) +[.AK$31]*[.$Z$5]*MAGNET([.AK$24]+[.BB59]) +[.AL$31]*[.$Z$5]*MAGNET([.AL$24]+[.BB59]) +[.AM$31]*[.$Z$5]*MAGNET([.AM$24]+[.BB59]) +[.AN$31]*[.$Z$5]*MAGNET([.AN$24]+[.BB59]) +[.AO$31]*[.$Z$5]*MAGNET([.AO$24]+[.BB59]) +[.AP$31]*[.$Z$5]*MAGNET([.AP$24]+[.$BB59])&#10;+[.AQ$31]*[.$Z$5]*MAGNET([.AQ$24]+[.$BB59])&#10;+[.AR$31]*[.$Z$5]*MAGNET([.AR$24]+[.$BB59])&#10;+[.AS$31]*[.$Z$5]*MAGNET([.AS$24]+[.$BB59])&#10;+[.AT$31]*[.$Z$5]*MAGNET([.AT$24]+[.$BB59])&#10;+[.AU$31]*[.$Z$5]*MAGNET([.AU$24]+[.$BB59])&#10;+[.AV$31]*[.$Z$5]*MAGNET([.AV$24]+[.$BB59])&#10;+[.AW$31]*[.$Z$5]*MAGNET([.AW$24]+[.$BB59])&#10;+[.AX$31]*[.$Z$5]*MAGNET([.AX$24]+[.$BB59])&#10;+[.AY$31]*[.$Z$5]*MAGNET([.AY$24]+[.$BB59]) +RAND()*[.$BI$13]" office:value-type="float" office:value="0" calcext:value-type="float">
            <text:p>0</text:p>
          </table:table-cell>
          <table:table-cell table:style-name="ce71" table:formula="of:=[.E$32]*[.$Z$5]*MAGNET([.E$24]+[.$BB59])+[.F$32]*[.$Z$5]*MAGNET([.F$24]+[.$BB59])+[.G$32]*[.$Z$5]*MAGNET([.G$24]+[.$BB59])+[.H$32]*[.$Z$5]*MAGNET([.H$24]+[.$BB59])+[.I$32]*[.$Z$5]*MAGNET([.I$24]+[.$BB59])+[.J$32]*[.$Z$5]*MAGNET([.J$24]+[.$BB59])+[.K$32]*[.$Z$5]*MAGNET([.K$24]+[.$BB59])+[.L$32]*[.$Z$5]*MAGNET([.L$24]+[.$BB59])+[.M$32]*[.$Z$5]*MAGNET([.M$24]+[.$BB59])+[.N$32]*[.$Z$5]*MAGNET([.N$24]+[.$BB59])+[.O$32]*[.$Z$5]*MAGNET([.O$24]+[.$BB59])+[.P$32]*[.$Z$5]*MAGNET([.P$24]+[.$BB59])+[.Q$32]*[.$Z$5]*MAGNET([.Q$24]+[.$BB59])+[.R$32]*[.$Z$5]*MAGNET([.R$24]+[.$BB59])+[.S$32]*[.$Z$5]*MAGNET([.S$24]+[.$BB59])+[.T$32]*[.$Z$5]*MAGNET([.T$24]+[.$BB59])+[.U$32]*[.$Z$5]*MAGNET([.U$24]+[.$BB59])+[.V$32]*[.$Z$5]*MAGNET([.V$24]+[.$BB59])+[.W$32]*[.$Z$5]*MAGNET([.W$24]+[.$BB59])+[.X$32]*[.$Z$5]*MAGNET([.X$24]+[.$BB59])+[.Y$32]*[.$Z$5]*MAGNET([.Y$24]+[.$BB59])+[.Z$32]*[.$Z$5]*MAGNET([.Z$24]+[.$BB59])+[.AA$32]*[.$Z$5]*MAGNET([.AA$24]+[.$BB59])+[.AB$32]*[.$Z$5]*MAGNET([.AB$24]+[.$BB59])+[.AC$32]*[.$Z$5]*MAGNET([.AC$24]+[.$BB59])+[.AD$32]*[.$Z$5]*MAGNET([.AD$24]+[.$BB59])+[.AE$32]*[.$Z$5]*MAGNET([.AE$24]+[.$BB59])+[.AF$32]*[.$Z$5]*MAGNET([.AF$24]+[.$BB59])+[.AG$32]*[.$Z$5]*MAGNET([.AG$24]+[.$BB59])+[.D$32]*[.$Z$5]*MAGNET([.D$24]+[.$BB59])+[.AH$32]*[.$Z$5]*MAGNET([.AH$24]+[.BB59]) +[.AI$32]*[.$Z$5]*MAGNET([.AI$24]+[.BB59]) +[.AJ$32]*[.$Z$5]*MAGNET([.AJ$24]+[.BB59]) +[.AK$32]*[.$Z$5]*MAGNET([.AK$24]+[.BB59]) +[.AL$32]*[.$Z$5]*MAGNET([.AL$24]+[.BB59]) +[.AM$32]*[.$Z$5]*MAGNET([.AM$24]+[.BB59]) +[.AN$32]*[.$Z$5]*MAGNET([.AN$24]+[.BB59]) +[.AO$32]*[.$Z$5]*MAGNET([.AO$24]+[.BB59]) +[.AP$32]*[.$Z$5]*MAGNET([.AP$24]+[.$BB59])&#10;+[.AQ$32]*[.$Z$5]*MAGNET([.AQ$24]+[.$BB59])&#10;+[.AR$32]*[.$Z$5]*MAGNET([.AR$24]+[.$BB59])&#10;+[.AS$32]*[.$Z$5]*MAGNET([.AS$24]+[.$BB59])&#10;+[.AT$32]*[.$Z$5]*MAGNET([.AT$24]+[.$BB59])&#10;+[.AU$32]*[.$Z$5]*MAGNET([.AU$24]+[.$BB59])&#10;+[.AV$32]*[.$Z$5]*MAGNET([.AV$24]+[.$BB59])&#10;+[.AW$32]*[.$Z$5]*MAGNET([.AW$24]+[.$BB59])&#10;+[.AX$32]*[.$Z$5]*MAGNET([.AX$24]+[.$BB59])&#10;+[.AY$32]*[.$Z$5]*MAGNET([.AY$24]+[.$BB5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59]+0.002" office:value-type="float" office:value="0.0900000000000001" calcext:value-type="float">
            <text:p>0.0900000000000001</text:p>
          </table:table-cell>
          <table:table-cell table:formula="of:=[.BA60]*[.$D$6]" office:value-type="float" office:value="4.52389342116931" calcext:value-type="float">
            <text:p>4.524</text:p>
          </table:table-cell>
          <table:table-cell table:formula="of:=[.D$25]*[.$Z$5]*MAGNET([.D$24]+[.BB60])+[.E$25]*[.$Z$5]*MAGNET([.E$24]+[.BB60])+[.F$25]*[.$Z$5]*MAGNET([.F$24]+[.BB60])+[.G$25]*[.$Z$5]*MAGNET([.G$24]+[.BB60])+[.H$25]*[.$Z$5]*MAGNET([.H$24]+[.BB60])+[.I$25]*[.$Z$5]*MAGNET([.I$24]+[.BB60])+[.J$25]*[.$Z$5]*MAGNET([.J$24]+[.BB60])+[.K$25]*[.$Z$5]*MAGNET([.K$24]+[.BB60])+[.L$25]*[.$Z$5]*MAGNET([.L$24]+[.BB60])+[.M$25]*[.$Z$5]*MAGNET([.M$24]+[.BB60])+[.N$25]*[.$Z$5]*MAGNET([.N$24]+[.BB60])+[.O$25]*[.$Z$5]*MAGNET([.O$24]+[.BB60])+[.P$25]*[.$Z$5]*MAGNET([.P$24]+[.BB60])+[.Q$25]*[.$Z$5]*MAGNET([.Q$24]+[.BB60])+[.R$25]*[.$Z$5]*MAGNET([.R$24]+[.BB60])+[.S$25]*[.$Z$5]*MAGNET([.S$24]+[.BB60])+[.T$25]*[.$Z$5]*MAGNET([.T$24]+[.BB60])+[.U$25]*[.$Z$5]*MAGNET([.U$24]+[.BB60])+[.V$25]*[.$Z$5]*MAGNET([.V$24]+[.BB60])+[.W$25]*[.$Z$5]*MAGNET([.W$24]+[.BB60])+[.X$25]*[.$Z$5]*MAGNET([.X$24]+[.BB60])+[.Y$25]*[.$Z$5]*MAGNET([.Y$24]+[.BB60])+[.Z$25]*[.$Z$5]*MAGNET([.Z$24]+[.BB60])+[.AA$25]*[.$Z$5]*MAGNET([.AA$24]+[.BB60])+[.AB$25]*[.$Z$5]*MAGNET([.AB$24]+[.BB60])+[.AC$25]*[.$Z$5]*MAGNET([.AC$24]+[.BB60])+[.AD$25]*[.$Z$5]*MAGNET([.AD$24]+[.BB60])+[.AE$25]*[.$Z$5]*MAGNET([.AE$24]+[.BB60])+[.AF$25]*[.$Z$5]*MAGNET([.AF$24]+[.BB60])+[.AG$25]*[.$Z$5]*MAGNET([.AG$24]+[.BB60])+[.AH$25]*[.$Z$5]*MAGNET([.AH$24]+[.BB60]) +[.AI$25]*[.$Z$5]*MAGNET([.AI$24]+[.BB60]) +[.AJ$25]*[.$Z$5]*MAGNET([.AJ$24]+[.BB60]) +[.AK$25]*[.$Z$5]*MAGNET([.AK$24]+[.BB60]) +[.AL$25]*[.$Z$5]*MAGNET([.AL$24]+[.BB60]) +[.AM$25]*[.$Z$5]*MAGNET([.AM$24]+[.BB60]) +[.AN$25]*[.$Z$5]*MAGNET([.AN$24]+[.BB60]) +[.AO$25]*[.$Z$5]*MAGNET([.AO$24]+[.BB60])+RAND()*[.$BC$13]+[.AP$25]*[.$Z$5]*MAGNET([.AP$24]+[.BB60])&#10;+[.AQ$25]*[.$Z$5]*MAGNET([.AQ$24]+[.BB60])&#10;+[.AR$25]*[.$Z$5]*MAGNET([.AR$24]+[.BB60])&#10;+[.AS$25]*[.$Z$5]*MAGNET([.AS$24]+[.BB60])&#10;+[.AT$25]*[.$Z$5]*MAGNET([.AT$24]+[.BB60])&#10;+[.AU$25]*[.$Z$5]*MAGNET([.AU$24]+[.BB60])&#10;+[.AV$25]*[.$Z$5]*MAGNET([.AV$24]+[.BB60])&#10;+[.AW$25]*[.$Z$5]*MAGNET([.AW$24]+[.BB60])&#10;+[.AX$25]*[.$Z$5]*MAGNET([.AX$24]+[.BB60])&#10;+[.AY$25]*[.$Z$5]*MAGNET([.AY$24]+[.BB60])" office:value-type="float" office:value="-90.6329896303337" calcext:value-type="float">
            <text:p>-90.63</text:p>
          </table:table-cell>
          <table:table-cell table:style-name="ce70" table:formula="of:=[.E$26]*[.$Z$5]*MAGNET([.E$24]+[.$BB60])+[.F$26]*[.$Z$5]*MAGNET([.F$24]+[.$BB60])+[.G$26]*[.$Z$5]*MAGNET([.G$24]+[.$BB60])+[.H$26]*[.$Z$5]*MAGNET([.H$24]+[.$BB60])+[.I$26]*[.$Z$5]*MAGNET([.I$24]+[.$BB60])+[.J$26]*[.$Z$5]*MAGNET([.J$24]+[.$BB60])+[.K$26]*[.$Z$5]*MAGNET([.K$24]+[.$BB60])+[.L$26]*[.$Z$5]*MAGNET([.L$24]+[.$BB60])+[.M$26]*[.$Z$5]*MAGNET([.M$24]+[.$BB60])+[.N$26]*[.$Z$5]*MAGNET([.N$24]+[.$BB60])+[.O$26]*[.$Z$5]*MAGNET([.O$24]+[.$BB60])+[.P$26]*[.$Z$5]*MAGNET([.P$24]+[.$BB60])+[.Q$26]*[.$Z$5]*MAGNET([.Q$24]+[.$BB60])+[.R$26]*[.$Z$5]*MAGNET([.R$24]+[.$BB60])+[.S$26]*[.$Z$5]*MAGNET([.S$24]+[.$BB60])+[.T$26]*[.$Z$5]*MAGNET([.T$24]+[.$BB60])+[.U$26]*[.$Z$5]*MAGNET([.U$24]+[.$BB60])+[.V$26]*[.$Z$5]*MAGNET([.V$24]+[.$BB60])+[.W$26]*[.$Z$5]*MAGNET([.W$24]+[.$BB60])+[.X$26]*[.$Z$5]*MAGNET([.X$24]+[.$BB60])+[.Y$26]*[.$Z$5]*MAGNET([.Y$24]+[.$BB60])+[.Z$26]*[.$Z$5]*MAGNET([.Z$24]+[.$BB60])+[.AA$26]*[.$Z$5]*MAGNET([.AA$24]+[.$BB60])+[.AB$26]*[.$Z$5]*MAGNET([.AB$24]+[.$BB60])+[.AC$26]*[.$Z$5]*MAGNET([.AC$24]+[.$BB60])+[.AD$26]*[.$Z$5]*MAGNET([.AD$24]+[.$BB60])+[.AE$26]*[.$Z$5]*MAGNET([.AE$24]+[.$BB60])+[.AF$26]*[.$Z$5]*MAGNET([.AF$24]+[.$BB60])+[.AG$26]*[.$Z$5]*MAGNET([.AG$24]+[.$BB60])+[.D$26]*[.$Z$5]*MAGNET([.D$24]+[.$BB60])+[.AH$26]*[.$Z$5]*MAGNET([.AH$24]+[.BB60]) +[.AI$26]*[.$Z$5]*MAGNET([.AI$24]+[.BB60]) +[.AJ$26]*[.$Z$5]*MAGNET([.AJ$24]+[.BB60]) +[.AK$26]*[.$Z$5]*MAGNET([.AK$24]+[.BB60]) +[.AL$26]*[.$Z$5]*MAGNET([.AL$24]+[.BB60]) +[.AM$26]*[.$Z$5]*MAGNET([.AM$24]+[.BB60]) +[.AN$26]*[.$Z$5]*MAGNET([.AN$24]+[.BB60]) +[.AO$26]*[.$Z$5]*MAGNET([.AO$24]+[.BB60]) +[.AP$26]*[.$Z$5]*MAGNET([.AP$24]+[.$BB60])&#10;+[.AQ$26]*[.$Z$5]*MAGNET([.AQ$24]+[.$BB60])&#10;+[.AR$26]*[.$Z$5]*MAGNET([.AR$24]+[.$BB60])&#10;+[.AS$26]*[.$Z$5]*MAGNET([.AS$24]+[.$BB60])&#10;+[.AT$26]*[.$Z$5]*MAGNET([.AT$24]+[.$BB60])&#10;+[.AU$26]*[.$Z$5]*MAGNET([.AU$24]+[.$BB60])&#10;+[.AV$26]*[.$Z$5]*MAGNET([.AV$24]+[.$BB60])&#10;+[.AW$26]*[.$Z$5]*MAGNET([.AW$24]+[.$BB60])&#10;+[.AX$26]*[.$Z$5]*MAGNET([.AX$24]+[.$BB60])&#10;+[.AY$26]*[.$Z$5]*MAGNET([.AY$24]+[.$BB60]) +RAND()*[.$BD$13]" office:value-type="float" office:value="6.97745213856195" calcext:value-type="float">
            <text:p>6.98</text:p>
          </table:table-cell>
          <table:table-cell table:style-name="ce71" table:formula="of:=[.E$27]*[.$Z$5]*MAGNET([.E$24]+[.$BB60])+[.F$27]*[.$Z$5]*MAGNET([.F$24]+[.$BB60])+[.G$27]*[.$Z$5]*MAGNET([.G$24]+[.$BB60])+[.H$27]*[.$Z$5]*MAGNET([.H$24]+[.$BB60])+[.I$27]*[.$Z$5]*MAGNET([.I$24]+[.$BB60])+[.J$27]*[.$Z$5]*MAGNET([.J$24]+[.$BB60])+[.K$27]*[.$Z$5]*MAGNET([.K$24]+[.$BB60])+[.L$27]*[.$Z$5]*MAGNET([.L$24]+[.$BB60])+[.M$27]*[.$Z$5]*MAGNET([.M$24]+[.$BB60])+[.N$27]*[.$Z$5]*MAGNET([.N$24]+[.$BB60])+[.O$27]*[.$Z$5]*MAGNET([.O$24]+[.$BB60])+[.P$27]*[.$Z$5]*MAGNET([.P$24]+[.$BB60])+[.Q$27]*[.$Z$5]*MAGNET([.Q$24]+[.$BB60])+[.R$27]*[.$Z$5]*MAGNET([.R$24]+[.$BB60])+[.S$27]*[.$Z$5]*MAGNET([.S$24]+[.$BB60])+[.T$27]*[.$Z$5]*MAGNET([.T$24]+[.$BB60])+[.U$27]*[.$Z$5]*MAGNET([.U$24]+[.$BB60])+[.V$27]*[.$Z$5]*MAGNET([.V$24]+[.$BB60])+[.W$27]*[.$Z$5]*MAGNET([.W$24]+[.$BB60])+[.X$27]*[.$Z$5]*MAGNET([.X$24]+[.$BB60])+[.Y$27]*[.$Z$5]*MAGNET([.Y$24]+[.$BB60])+[.Z$27]*[.$Z$5]*MAGNET([.Z$24]+[.$BB60])+[.AA$27]*[.$Z$5]*MAGNET([.AA$24]+[.$BB60])+[.AB$27]*[.$Z$5]*MAGNET([.AB$24]+[.$BB60])+[.AC$27]*[.$Z$5]*MAGNET([.AC$24]+[.$BB60])+[.AD$27]*[.$Z$5]*MAGNET([.AD$24]+[.$BB60])+[.AE$27]*[.$Z$5]*MAGNET([.AE$24]+[.$BB60])+[.AF$27]*[.$Z$5]*MAGNET([.AF$24]+[.$BB60])+[.AG$27]*[.$Z$5]*MAGNET([.AG$24]+[.$BB60])+[.D$27]*[.$Z$5]*MAGNET([.D$24]+[.$BB60])+[.AH$27]*[.$Z$5]*MAGNET([.AH$24]+[.BB60]) +[.AI$27]*[.$Z$5]*MAGNET([.AI$24]+[.BB60]) +[.AJ$27]*[.$Z$5]*MAGNET([.AJ$24]+[.BB60]) +[.AK$27]*[.$Z$5]*MAGNET([.AK$24]+[.BB60]) +[.AL$27]*[.$Z$5]*MAGNET([.AL$24]+[.BB60]) +[.AM$27]*[.$Z$5]*MAGNET([.AM$24]+[.BB60]) +[.AN$27]*[.$Z$5]*MAGNET([.AN$24]+[.BB60]) +[.AO$27]*[.$Z$5]*MAGNET([.AO$24]+[.BB60]) +[.AP$27]*[.$Z$5]*MAGNET([.AP$24]+[.$BB60])&#10;+[.AQ$27]*[.$Z$5]*MAGNET([.AQ$24]+[.$BB60])&#10;+[.AR$27]*[.$Z$5]*MAGNET([.AR$24]+[.$BB60])&#10;+[.AS$27]*[.$Z$5]*MAGNET([.AS$24]+[.$BB60])&#10;+[.AT$27]*[.$Z$5]*MAGNET([.AT$24]+[.$BB60])&#10;+[.AU$27]*[.$Z$5]*MAGNET([.AU$24]+[.$BB60])&#10;+[.AV$27]*[.$Z$5]*MAGNET([.AV$24]+[.$BB60])&#10;+[.AW$27]*[.$Z$5]*MAGNET([.AW$24]+[.$BB60])&#10;+[.AX$27]*[.$Z$5]*MAGNET([.AX$24]+[.$BB60])&#10;+[.AY$27]*[.$Z$5]*MAGNET([.AY$24]+[.$BB60]) +RAND()*[.$BE$13]" office:value-type="float" office:value="124.634587325008" calcext:value-type="float">
            <text:p>124.634587325008</text:p>
          </table:table-cell>
          <table:table-cell table:style-name="ce71" table:formula="of:=[.E$28]*[.$Z$5]*MAGNET([.E$24]+[.$BB60])+[.F$28]*[.$Z$5]*MAGNET([.F$24]+[.$BB60])+[.G$28]*[.$Z$5]*MAGNET([.G$24]+[.$BB60])+[.H$28]*[.$Z$5]*MAGNET([.H$24]+[.$BB60])+[.I$28]*[.$Z$5]*MAGNET([.I$24]+[.$BB60])+[.J$28]*[.$Z$5]*MAGNET([.J$24]+[.$BB60])+[.K$28]*[.$Z$5]*MAGNET([.K$24]+[.$BB60])+[.L$28]*[.$Z$5]*MAGNET([.L$24]+[.$BB60])+[.M$28]*[.$Z$5]*MAGNET([.M$24]+[.$BB60])+[.N$28]*[.$Z$5]*MAGNET([.N$24]+[.$BB60])+[.O$28]*[.$Z$5]*MAGNET([.O$24]+[.$BB60])+[.P$28]*[.$Z$5]*MAGNET([.P$24]+[.$BB60])+[.Q$28]*[.$Z$5]*MAGNET([.Q$24]+[.$BB60])+[.R$28]*[.$Z$5]*MAGNET([.R$24]+[.$BB60])+[.S$28]*[.$Z$5]*MAGNET([.S$24]+[.$BB60])+[.T$28]*[.$Z$5]*MAGNET([.T$24]+[.$BB60])+[.U$28]*[.$Z$5]*MAGNET([.U$24]+[.$BB60])+[.V$28]*[.$Z$5]*MAGNET([.V$24]+[.$BB60])+[.W$28]*[.$Z$5]*MAGNET([.W$24]+[.$BB60])+[.X$28]*[.$Z$5]*MAGNET([.X$24]+[.$BB60])+[.Y$28]*[.$Z$5]*MAGNET([.Y$24]+[.$BB60])+[.Z$28]*[.$Z$5]*MAGNET([.Z$24]+[.$BB60])+[.AA$28]*[.$Z$5]*MAGNET([.AA$24]+[.$BB60])+[.AB$28]*[.$Z$5]*MAGNET([.AB$24]+[.$BB60])+[.AC$28]*[.$Z$5]*MAGNET([.AC$24]+[.$BB60])+[.AD$28]*[.$Z$5]*MAGNET([.AD$24]+[.$BB60])+[.AE$28]*[.$Z$5]*MAGNET([.AE$24]+[.$BB60])+[.AF$28]*[.$Z$5]*MAGNET([.AF$24]+[.$BB60])+[.AG$28]*[.$Z$5]*MAGNET([.AG$24]+[.$BB60])+[.D$28]*[.$Z$5]*MAGNET([.D$24]+[.$BB60])+[.AH$28]*[.$Z$5]*MAGNET([.AH$24]+[.BB60]) +[.AI$28]*[.$Z$5]*MAGNET([.AI$24]+[.BB60]) +[.AJ$28]*[.$Z$5]*MAGNET([.AJ$24]+[.BB60]) +[.AK$28]*[.$Z$5]*MAGNET([.AK$24]+[.BB60]) +[.AL$28]*[.$Z$5]*MAGNET([.AL$24]+[.BB60]) +[.AM$28]*[.$Z$5]*MAGNET([.AM$24]+[.BB60]) +[.AN$28]*[.$Z$5]*MAGNET([.AN$24]+[.BB60]) +[.AO$28]*[.$Z$5]*MAGNET([.AO$24]+[.BB60]) +[.AP$28]*[.$Z$5]*MAGNET([.AP$24]+[.$BB60])&#10;+[.AQ$28]*[.$Z$5]*MAGNET([.AQ$24]+[.$BB60])&#10;+[.AR$28]*[.$Z$5]*MAGNET([.AR$24]+[.$BB60])&#10;+[.AS$28]*[.$Z$5]*MAGNET([.AS$24]+[.$BB60])&#10;+[.AT$28]*[.$Z$5]*MAGNET([.AT$24]+[.$BB60])&#10;+[.AU$28]*[.$Z$5]*MAGNET([.AU$24]+[.$BB60])&#10;+[.AV$28]*[.$Z$5]*MAGNET([.AV$24]+[.$BB60])&#10;+[.AW$28]*[.$Z$5]*MAGNET([.AW$24]+[.$BB60])&#10;+[.AX$28]*[.$Z$5]*MAGNET([.AX$24]+[.$BB60])&#10;+[.AY$28]*[.$Z$5]*MAGNET([.AY$24]+[.$BB60]) +RAND()*[.$BF$13]" office:value-type="float" office:value="16.8136875076292" calcext:value-type="float">
            <text:p>16.8136875076292</text:p>
          </table:table-cell>
          <table:table-cell table:style-name="ce71" table:formula="of:=[.E$29]*[.$Z$5]*MAGNET([.E$24]+[.$BB60])+[.F$29]*[.$Z$5]*MAGNET([.F$24]+[.$BB60])+[.G$29]*[.$Z$5]*MAGNET([.G$24]+[.$BB60])+[.H$29]*[.$Z$5]*MAGNET([.H$24]+[.$BB60])+[.I$29]*[.$Z$5]*MAGNET([.I$24]+[.$BB60])+[.J$29]*[.$Z$5]*MAGNET([.J$24]+[.$BB60])+[.K$29]*[.$Z$5]*MAGNET([.K$24]+[.$BB60])+[.L$29]*[.$Z$5]*MAGNET([.L$24]+[.$BB60])+[.M$29]*[.$Z$5]*MAGNET([.M$24]+[.$BB60])+[.N$29]*[.$Z$5]*MAGNET([.N$24]+[.$BB60])+[.O$29]*[.$Z$5]*MAGNET([.O$24]+[.$BB60])+[.P$29]*[.$Z$5]*MAGNET([.P$24]+[.$BB60])+[.Q$29]*[.$Z$5]*MAGNET([.Q$24]+[.$BB60])+[.R$29]*[.$Z$5]*MAGNET([.R$24]+[.$BB60])+[.S$29]*[.$Z$5]*MAGNET([.S$24]+[.$BB60])+[.T$29]*[.$Z$5]*MAGNET([.T$24]+[.$BB60])+[.U$29]*[.$Z$5]*MAGNET([.U$24]+[.$BB60])+[.V$29]*[.$Z$5]*MAGNET([.V$24]+[.$BB60])+[.W$29]*[.$Z$5]*MAGNET([.W$24]+[.$BB60])+[.X$29]*[.$Z$5]*MAGNET([.X$24]+[.$BB60])+[.Y$29]*[.$Z$5]*MAGNET([.Y$24]+[.$BB60])+[.Z$29]*[.$Z$5]*MAGNET([.Z$24]+[.$BB60])+[.AA$29]*[.$Z$5]*MAGNET([.AA$24]+[.$BB60])+[.AB$29]*[.$Z$5]*MAGNET([.AB$24]+[.$BB60])+[.AC$29]*[.$Z$5]*MAGNET([.AC$24]+[.$BB60])+[.AD$29]*[.$Z$5]*MAGNET([.AD$24]+[.$BB60])+[.AE$29]*[.$Z$5]*MAGNET([.AE$24]+[.$BB60])+[.AF$29]*[.$Z$5]*MAGNET([.AF$24]+[.$BB60])+[.AG$29]*[.$Z$5]*MAGNET([.AG$24]+[.$BB60])+[.D$29]*[.$Z$5]*MAGNET([.D$24]+[.$BB60])+[.AH$29]*[.$Z$5]*MAGNET([.AH$24]+[.BB60]) +[.AI$29]*[.$Z$5]*MAGNET([.AI$24]+[.BB60]) +[.AJ$29]*[.$Z$5]*MAGNET([.AJ$24]+[.BB60]) +[.AK$29]*[.$Z$5]*MAGNET([.AK$24]+[.BB60]) +[.AL$29]*[.$Z$5]*MAGNET([.AL$24]+[.BB60]) +[.AM$29]*[.$Z$5]*MAGNET([.AM$24]+[.BB60]) +[.AN$29]*[.$Z$5]*MAGNET([.AN$24]+[.BB60]) +[.AO$29]*[.$Z$5]*MAGNET([.AO$24]+[.BB60]) +[.AP$29]*[.$Z$5]*MAGNET([.AP$24]+[.$BB60])&#10;+[.AQ$29]*[.$Z$5]*MAGNET([.AQ$24]+[.$BB60])&#10;+[.AR$29]*[.$Z$5]*MAGNET([.AR$24]+[.$BB60])&#10;+[.AS$29]*[.$Z$5]*MAGNET([.AS$24]+[.$BB60])&#10;+[.AT$29]*[.$Z$5]*MAGNET([.AT$24]+[.$BB60])&#10;+[.AU$29]*[.$Z$5]*MAGNET([.AU$24]+[.$BB60])&#10;+[.AV$29]*[.$Z$5]*MAGNET([.AV$24]+[.$BB60])&#10;+[.AW$29]*[.$Z$5]*MAGNET([.AW$24]+[.$BB60])&#10;+[.AX$29]*[.$Z$5]*MAGNET([.AX$24]+[.$BB60])&#10;+[.AY$29]*[.$Z$5]*MAGNET([.AY$24]+[.$BB60]) +RAND()*[.$BG$13]" office:value-type="float" office:value="-44.0510770927829" calcext:value-type="float">
            <text:p>-44.0510770927829</text:p>
          </table:table-cell>
          <table:table-cell table:style-name="ce71" table:formula="of:=[.E$30]*[.$Z$5]*MAGNET([.E$24]+[.$BB60])+[.F$30]*[.$Z$5]*MAGNET([.F$24]+[.$BB60])+[.G$30]*[.$Z$5]*MAGNET([.G$24]+[.$BB60])+[.H$30]*[.$Z$5]*MAGNET([.H$24]+[.$BB60])+[.I$30]*[.$Z$5]*MAGNET([.I$24]+[.$BB60])+[.J$30]*[.$Z$5]*MAGNET([.J$24]+[.$BB60])+[.K$30]*[.$Z$5]*MAGNET([.K$24]+[.$BB60])+[.L$30]*[.$Z$5]*MAGNET([.L$24]+[.$BB60])+[.M$30]*[.$Z$5]*MAGNET([.M$24]+[.$BB60])+[.N$30]*[.$Z$5]*MAGNET([.N$24]+[.$BB60])+[.O$30]*[.$Z$5]*MAGNET([.O$24]+[.$BB60])+[.P$30]*[.$Z$5]*MAGNET([.P$24]+[.$BB60])+[.Q$30]*[.$Z$5]*MAGNET([.Q$24]+[.$BB60])+[.R$30]*[.$Z$5]*MAGNET([.R$24]+[.$BB60])+[.S$30]*[.$Z$5]*MAGNET([.S$24]+[.$BB60])+[.T$30]*[.$Z$5]*MAGNET([.T$24]+[.$BB60])+[.U$30]*[.$Z$5]*MAGNET([.U$24]+[.$BB60])+[.V$30]*[.$Z$5]*MAGNET([.V$24]+[.$BB60])+[.W$30]*[.$Z$5]*MAGNET([.W$24]+[.$BB60])+[.X$30]*[.$Z$5]*MAGNET([.X$24]+[.$BB60])+[.Y$30]*[.$Z$5]*MAGNET([.Y$24]+[.$BB60])+[.Z$30]*[.$Z$5]*MAGNET([.Z$24]+[.$BB60])+[.AA$30]*[.$Z$5]*MAGNET([.AA$24]+[.$BB60])+[.AB$30]*[.$Z$5]*MAGNET([.AB$24]+[.$BB60])+[.AC$30]*[.$Z$5]*MAGNET([.AC$24]+[.$BB60])+[.AD$30]*[.$Z$5]*MAGNET([.AD$24]+[.$BB60])+[.AE$30]*[.$Z$5]*MAGNET([.AE$24]+[.$BB60])+[.AF$30]*[.$Z$5]*MAGNET([.AF$24]+[.$BB60])+[.AG$30]*[.$Z$5]*MAGNET([.AG$24]+[.$BB60])+[.D$30]*[.$Z$5]*MAGNET([.D$24]+[.$BB60])+[.AH$30]*[.$Z$5]*MAGNET([.AH$24]+[.BB60]) +[.AI$30]*[.$Z$5]*MAGNET([.AI$24]+[.BB60]) +[.AJ$30]*[.$Z$5]*MAGNET([.AJ$24]+[.BB60]) +[.AK$30]*[.$Z$5]*MAGNET([.AK$24]+[.BB60]) +[.AL$30]*[.$Z$5]*MAGNET([.AL$24]+[.BB60]) +[.AM$30]*[.$Z$5]*MAGNET([.AM$24]+[.BB60]) +[.AN$30]*[.$Z$5]*MAGNET([.AN$24]+[.BB60]) +[.AO$30]*[.$Z$5]*MAGNET([.AO$24]+[.BB60]) +[.AP$30]*[.$Z$5]*MAGNET([.AP$24]+[.$BB60])&#10;+[.AQ$30]*[.$Z$5]*MAGNET([.AQ$24]+[.$BB60])&#10;+[.AR$30]*[.$Z$5]*MAGNET([.AR$24]+[.$BB60])&#10;+[.AS$30]*[.$Z$5]*MAGNET([.AS$24]+[.$BB60])&#10;+[.AT$30]*[.$Z$5]*MAGNET([.AT$24]+[.$BB60])&#10;+[.AU$30]*[.$Z$5]*MAGNET([.AU$24]+[.$BB60])&#10;+[.AV$30]*[.$Z$5]*MAGNET([.AV$24]+[.$BB60])&#10;+[.AW$30]*[.$Z$5]*MAGNET([.AW$24]+[.$BB60])&#10;+[.AX$30]*[.$Z$5]*MAGNET([.AX$24]+[.$BB60])&#10;+[.AY$30]*[.$Z$5]*MAGNET([.AY$24]+[.$BB60]) +RAND()*[.$BH$13]" office:value-type="float" office:value="0" calcext:value-type="float">
            <text:p>0</text:p>
          </table:table-cell>
          <table:table-cell table:style-name="ce71" table:formula="of:=[.E$31]*[.$Z$5]*MAGNET([.E$24]+[.$BB60])+[.F$31]*[.$Z$5]*MAGNET([.F$24]+[.$BB60])+[.G$31]*[.$Z$5]*MAGNET([.G$24]+[.$BB60])+[.H$31]*[.$Z$5]*MAGNET([.H$24]+[.$BB60])+[.I$31]*[.$Z$5]*MAGNET([.I$24]+[.$BB60])+[.J$31]*[.$Z$5]*MAGNET([.J$24]+[.$BB60])+[.K$31]*[.$Z$5]*MAGNET([.K$24]+[.$BB60])+[.L$31]*[.$Z$5]*MAGNET([.L$24]+[.$BB60])+[.M$31]*[.$Z$5]*MAGNET([.M$24]+[.$BB60])+[.N$31]*[.$Z$5]*MAGNET([.N$24]+[.$BB60])+[.O$31]*[.$Z$5]*MAGNET([.O$24]+[.$BB60])+[.P$31]*[.$Z$5]*MAGNET([.P$24]+[.$BB60])+[.Q$31]*[.$Z$5]*MAGNET([.Q$24]+[.$BB60])+[.R$31]*[.$Z$5]*MAGNET([.R$24]+[.$BB60])+[.S$31]*[.$Z$5]*MAGNET([.S$24]+[.$BB60])+[.T$31]*[.$Z$5]*MAGNET([.T$24]+[.$BB60])+[.U$31]*[.$Z$5]*MAGNET([.U$24]+[.$BB60])+[.V$31]*[.$Z$5]*MAGNET([.V$24]+[.$BB60])+[.W$31]*[.$Z$5]*MAGNET([.W$24]+[.$BB60])+[.X$31]*[.$Z$5]*MAGNET([.X$24]+[.$BB60])+[.Y$31]*[.$Z$5]*MAGNET([.Y$24]+[.$BB60])+[.Z$31]*[.$Z$5]*MAGNET([.Z$24]+[.$BB60])+[.AA$31]*[.$Z$5]*MAGNET([.AA$24]+[.$BB60])+[.AB$31]*[.$Z$5]*MAGNET([.AB$24]+[.$BB60])+[.AC$31]*[.$Z$5]*MAGNET([.AC$24]+[.$BB60])+[.AD$31]*[.$Z$5]*MAGNET([.AD$24]+[.$BB60])+[.AE$31]*[.$Z$5]*MAGNET([.AE$24]+[.$BB60])+[.AF$31]*[.$Z$5]*MAGNET([.AF$24]+[.$BB60])+[.AG$31]*[.$Z$5]*MAGNET([.AG$24]+[.$BB60])+[.D$31]*[.$Z$5]*MAGNET([.D$24]+[.$BB60])+[.AH$31]*[.$Z$5]*MAGNET([.AH$24]+[.BB60]) +[.AI$31]*[.$Z$5]*MAGNET([.AI$24]+[.BB60]) +[.AJ$31]*[.$Z$5]*MAGNET([.AJ$24]+[.BB60]) +[.AK$31]*[.$Z$5]*MAGNET([.AK$24]+[.BB60]) +[.AL$31]*[.$Z$5]*MAGNET([.AL$24]+[.BB60]) +[.AM$31]*[.$Z$5]*MAGNET([.AM$24]+[.BB60]) +[.AN$31]*[.$Z$5]*MAGNET([.AN$24]+[.BB60]) +[.AO$31]*[.$Z$5]*MAGNET([.AO$24]+[.BB60]) +[.AP$31]*[.$Z$5]*MAGNET([.AP$24]+[.$BB60])&#10;+[.AQ$31]*[.$Z$5]*MAGNET([.AQ$24]+[.$BB60])&#10;+[.AR$31]*[.$Z$5]*MAGNET([.AR$24]+[.$BB60])&#10;+[.AS$31]*[.$Z$5]*MAGNET([.AS$24]+[.$BB60])&#10;+[.AT$31]*[.$Z$5]*MAGNET([.AT$24]+[.$BB60])&#10;+[.AU$31]*[.$Z$5]*MAGNET([.AU$24]+[.$BB60])&#10;+[.AV$31]*[.$Z$5]*MAGNET([.AV$24]+[.$BB60])&#10;+[.AW$31]*[.$Z$5]*MAGNET([.AW$24]+[.$BB60])&#10;+[.AX$31]*[.$Z$5]*MAGNET([.AX$24]+[.$BB60])&#10;+[.AY$31]*[.$Z$5]*MAGNET([.AY$24]+[.$BB60]) +RAND()*[.$BI$13]" office:value-type="float" office:value="0" calcext:value-type="float">
            <text:p>0</text:p>
          </table:table-cell>
          <table:table-cell table:style-name="ce71" table:formula="of:=[.E$32]*[.$Z$5]*MAGNET([.E$24]+[.$BB60])+[.F$32]*[.$Z$5]*MAGNET([.F$24]+[.$BB60])+[.G$32]*[.$Z$5]*MAGNET([.G$24]+[.$BB60])+[.H$32]*[.$Z$5]*MAGNET([.H$24]+[.$BB60])+[.I$32]*[.$Z$5]*MAGNET([.I$24]+[.$BB60])+[.J$32]*[.$Z$5]*MAGNET([.J$24]+[.$BB60])+[.K$32]*[.$Z$5]*MAGNET([.K$24]+[.$BB60])+[.L$32]*[.$Z$5]*MAGNET([.L$24]+[.$BB60])+[.M$32]*[.$Z$5]*MAGNET([.M$24]+[.$BB60])+[.N$32]*[.$Z$5]*MAGNET([.N$24]+[.$BB60])+[.O$32]*[.$Z$5]*MAGNET([.O$24]+[.$BB60])+[.P$32]*[.$Z$5]*MAGNET([.P$24]+[.$BB60])+[.Q$32]*[.$Z$5]*MAGNET([.Q$24]+[.$BB60])+[.R$32]*[.$Z$5]*MAGNET([.R$24]+[.$BB60])+[.S$32]*[.$Z$5]*MAGNET([.S$24]+[.$BB60])+[.T$32]*[.$Z$5]*MAGNET([.T$24]+[.$BB60])+[.U$32]*[.$Z$5]*MAGNET([.U$24]+[.$BB60])+[.V$32]*[.$Z$5]*MAGNET([.V$24]+[.$BB60])+[.W$32]*[.$Z$5]*MAGNET([.W$24]+[.$BB60])+[.X$32]*[.$Z$5]*MAGNET([.X$24]+[.$BB60])+[.Y$32]*[.$Z$5]*MAGNET([.Y$24]+[.$BB60])+[.Z$32]*[.$Z$5]*MAGNET([.Z$24]+[.$BB60])+[.AA$32]*[.$Z$5]*MAGNET([.AA$24]+[.$BB60])+[.AB$32]*[.$Z$5]*MAGNET([.AB$24]+[.$BB60])+[.AC$32]*[.$Z$5]*MAGNET([.AC$24]+[.$BB60])+[.AD$32]*[.$Z$5]*MAGNET([.AD$24]+[.$BB60])+[.AE$32]*[.$Z$5]*MAGNET([.AE$24]+[.$BB60])+[.AF$32]*[.$Z$5]*MAGNET([.AF$24]+[.$BB60])+[.AG$32]*[.$Z$5]*MAGNET([.AG$24]+[.$BB60])+[.D$32]*[.$Z$5]*MAGNET([.D$24]+[.$BB60])+[.AH$32]*[.$Z$5]*MAGNET([.AH$24]+[.BB60]) +[.AI$32]*[.$Z$5]*MAGNET([.AI$24]+[.BB60]) +[.AJ$32]*[.$Z$5]*MAGNET([.AJ$24]+[.BB60]) +[.AK$32]*[.$Z$5]*MAGNET([.AK$24]+[.BB60]) +[.AL$32]*[.$Z$5]*MAGNET([.AL$24]+[.BB60]) +[.AM$32]*[.$Z$5]*MAGNET([.AM$24]+[.BB60]) +[.AN$32]*[.$Z$5]*MAGNET([.AN$24]+[.BB60]) +[.AO$32]*[.$Z$5]*MAGNET([.AO$24]+[.BB60]) +[.AP$32]*[.$Z$5]*MAGNET([.AP$24]+[.$BB60])&#10;+[.AQ$32]*[.$Z$5]*MAGNET([.AQ$24]+[.$BB60])&#10;+[.AR$32]*[.$Z$5]*MAGNET([.AR$24]+[.$BB60])&#10;+[.AS$32]*[.$Z$5]*MAGNET([.AS$24]+[.$BB60])&#10;+[.AT$32]*[.$Z$5]*MAGNET([.AT$24]+[.$BB60])&#10;+[.AU$32]*[.$Z$5]*MAGNET([.AU$24]+[.$BB60])&#10;+[.AV$32]*[.$Z$5]*MAGNET([.AV$24]+[.$BB60])&#10;+[.AW$32]*[.$Z$5]*MAGNET([.AW$24]+[.$BB60])&#10;+[.AX$32]*[.$Z$5]*MAGNET([.AX$24]+[.$BB60])&#10;+[.AY$32]*[.$Z$5]*MAGNET([.AY$24]+[.$BB6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0]+0.002" office:value-type="float" office:value="0.0920000000000001" calcext:value-type="float">
            <text:p>0.0920000000000001</text:p>
          </table:table-cell>
          <table:table-cell table:formula="of:=[.BA61]*[.$D$6]" office:value-type="float" office:value="4.62442438608418" calcext:value-type="float">
            <text:p>4.624</text:p>
          </table:table-cell>
          <table:table-cell table:formula="of:=[.D$25]*[.$Z$5]*MAGNET([.D$24]+[.BB61])+[.E$25]*[.$Z$5]*MAGNET([.E$24]+[.BB61])+[.F$25]*[.$Z$5]*MAGNET([.F$24]+[.BB61])+[.G$25]*[.$Z$5]*MAGNET([.G$24]+[.BB61])+[.H$25]*[.$Z$5]*MAGNET([.H$24]+[.BB61])+[.I$25]*[.$Z$5]*MAGNET([.I$24]+[.BB61])+[.J$25]*[.$Z$5]*MAGNET([.J$24]+[.BB61])+[.K$25]*[.$Z$5]*MAGNET([.K$24]+[.BB61])+[.L$25]*[.$Z$5]*MAGNET([.L$24]+[.BB61])+[.M$25]*[.$Z$5]*MAGNET([.M$24]+[.BB61])+[.N$25]*[.$Z$5]*MAGNET([.N$24]+[.BB61])+[.O$25]*[.$Z$5]*MAGNET([.O$24]+[.BB61])+[.P$25]*[.$Z$5]*MAGNET([.P$24]+[.BB61])+[.Q$25]*[.$Z$5]*MAGNET([.Q$24]+[.BB61])+[.R$25]*[.$Z$5]*MAGNET([.R$24]+[.BB61])+[.S$25]*[.$Z$5]*MAGNET([.S$24]+[.BB61])+[.T$25]*[.$Z$5]*MAGNET([.T$24]+[.BB61])+[.U$25]*[.$Z$5]*MAGNET([.U$24]+[.BB61])+[.V$25]*[.$Z$5]*MAGNET([.V$24]+[.BB61])+[.W$25]*[.$Z$5]*MAGNET([.W$24]+[.BB61])+[.X$25]*[.$Z$5]*MAGNET([.X$24]+[.BB61])+[.Y$25]*[.$Z$5]*MAGNET([.Y$24]+[.BB61])+[.Z$25]*[.$Z$5]*MAGNET([.Z$24]+[.BB61])+[.AA$25]*[.$Z$5]*MAGNET([.AA$24]+[.BB61])+[.AB$25]*[.$Z$5]*MAGNET([.AB$24]+[.BB61])+[.AC$25]*[.$Z$5]*MAGNET([.AC$24]+[.BB61])+[.AD$25]*[.$Z$5]*MAGNET([.AD$24]+[.BB61])+[.AE$25]*[.$Z$5]*MAGNET([.AE$24]+[.BB61])+[.AF$25]*[.$Z$5]*MAGNET([.AF$24]+[.BB61])+[.AG$25]*[.$Z$5]*MAGNET([.AG$24]+[.BB61])+[.AH$25]*[.$Z$5]*MAGNET([.AH$24]+[.BB61]) +[.AI$25]*[.$Z$5]*MAGNET([.AI$24]+[.BB61]) +[.AJ$25]*[.$Z$5]*MAGNET([.AJ$24]+[.BB61]) +[.AK$25]*[.$Z$5]*MAGNET([.AK$24]+[.BB61]) +[.AL$25]*[.$Z$5]*MAGNET([.AL$24]+[.BB61]) +[.AM$25]*[.$Z$5]*MAGNET([.AM$24]+[.BB61]) +[.AN$25]*[.$Z$5]*MAGNET([.AN$24]+[.BB61]) +[.AO$25]*[.$Z$5]*MAGNET([.AO$24]+[.BB61])+RAND()*[.$BC$13]+[.AP$25]*[.$Z$5]*MAGNET([.AP$24]+[.BB61])&#10;+[.AQ$25]*[.$Z$5]*MAGNET([.AQ$24]+[.BB61])&#10;+[.AR$25]*[.$Z$5]*MAGNET([.AR$24]+[.BB61])&#10;+[.AS$25]*[.$Z$5]*MAGNET([.AS$24]+[.BB61])&#10;+[.AT$25]*[.$Z$5]*MAGNET([.AT$24]+[.BB61])&#10;+[.AU$25]*[.$Z$5]*MAGNET([.AU$24]+[.BB61])&#10;+[.AV$25]*[.$Z$5]*MAGNET([.AV$24]+[.BB61])&#10;+[.AW$25]*[.$Z$5]*MAGNET([.AW$24]+[.BB61])&#10;+[.AX$25]*[.$Z$5]*MAGNET([.AX$24]+[.BB61])&#10;+[.AY$25]*[.$Z$5]*MAGNET([.AY$24]+[.BB61])" office:value-type="float" office:value="-101.460472446474" calcext:value-type="float">
            <text:p>-101.46</text:p>
          </table:table-cell>
          <table:table-cell table:style-name="ce70" table:formula="of:=[.E$26]*[.$Z$5]*MAGNET([.E$24]+[.$BB61])+[.F$26]*[.$Z$5]*MAGNET([.F$24]+[.$BB61])+[.G$26]*[.$Z$5]*MAGNET([.G$24]+[.$BB61])+[.H$26]*[.$Z$5]*MAGNET([.H$24]+[.$BB61])+[.I$26]*[.$Z$5]*MAGNET([.I$24]+[.$BB61])+[.J$26]*[.$Z$5]*MAGNET([.J$24]+[.$BB61])+[.K$26]*[.$Z$5]*MAGNET([.K$24]+[.$BB61])+[.L$26]*[.$Z$5]*MAGNET([.L$24]+[.$BB61])+[.M$26]*[.$Z$5]*MAGNET([.M$24]+[.$BB61])+[.N$26]*[.$Z$5]*MAGNET([.N$24]+[.$BB61])+[.O$26]*[.$Z$5]*MAGNET([.O$24]+[.$BB61])+[.P$26]*[.$Z$5]*MAGNET([.P$24]+[.$BB61])+[.Q$26]*[.$Z$5]*MAGNET([.Q$24]+[.$BB61])+[.R$26]*[.$Z$5]*MAGNET([.R$24]+[.$BB61])+[.S$26]*[.$Z$5]*MAGNET([.S$24]+[.$BB61])+[.T$26]*[.$Z$5]*MAGNET([.T$24]+[.$BB61])+[.U$26]*[.$Z$5]*MAGNET([.U$24]+[.$BB61])+[.V$26]*[.$Z$5]*MAGNET([.V$24]+[.$BB61])+[.W$26]*[.$Z$5]*MAGNET([.W$24]+[.$BB61])+[.X$26]*[.$Z$5]*MAGNET([.X$24]+[.$BB61])+[.Y$26]*[.$Z$5]*MAGNET([.Y$24]+[.$BB61])+[.Z$26]*[.$Z$5]*MAGNET([.Z$24]+[.$BB61])+[.AA$26]*[.$Z$5]*MAGNET([.AA$24]+[.$BB61])+[.AB$26]*[.$Z$5]*MAGNET([.AB$24]+[.$BB61])+[.AC$26]*[.$Z$5]*MAGNET([.AC$24]+[.$BB61])+[.AD$26]*[.$Z$5]*MAGNET([.AD$24]+[.$BB61])+[.AE$26]*[.$Z$5]*MAGNET([.AE$24]+[.$BB61])+[.AF$26]*[.$Z$5]*MAGNET([.AF$24]+[.$BB61])+[.AG$26]*[.$Z$5]*MAGNET([.AG$24]+[.$BB61])+[.D$26]*[.$Z$5]*MAGNET([.D$24]+[.$BB61])+[.AH$26]*[.$Z$5]*MAGNET([.AH$24]+[.BB61]) +[.AI$26]*[.$Z$5]*MAGNET([.AI$24]+[.BB61]) +[.AJ$26]*[.$Z$5]*MAGNET([.AJ$24]+[.BB61]) +[.AK$26]*[.$Z$5]*MAGNET([.AK$24]+[.BB61]) +[.AL$26]*[.$Z$5]*MAGNET([.AL$24]+[.BB61]) +[.AM$26]*[.$Z$5]*MAGNET([.AM$24]+[.BB61]) +[.AN$26]*[.$Z$5]*MAGNET([.AN$24]+[.BB61]) +[.AO$26]*[.$Z$5]*MAGNET([.AO$24]+[.BB61]) +[.AP$26]*[.$Z$5]*MAGNET([.AP$24]+[.$BB61])&#10;+[.AQ$26]*[.$Z$5]*MAGNET([.AQ$24]+[.$BB61])&#10;+[.AR$26]*[.$Z$5]*MAGNET([.AR$24]+[.$BB61])&#10;+[.AS$26]*[.$Z$5]*MAGNET([.AS$24]+[.$BB61])&#10;+[.AT$26]*[.$Z$5]*MAGNET([.AT$24]+[.$BB61])&#10;+[.AU$26]*[.$Z$5]*MAGNET([.AU$24]+[.$BB61])&#10;+[.AV$26]*[.$Z$5]*MAGNET([.AV$24]+[.$BB61])&#10;+[.AW$26]*[.$Z$5]*MAGNET([.AW$24]+[.$BB61])&#10;+[.AX$26]*[.$Z$5]*MAGNET([.AX$24]+[.$BB61])&#10;+[.AY$26]*[.$Z$5]*MAGNET([.AY$24]+[.$BB61]) +RAND()*[.$BD$13]" office:value-type="float" office:value="18.8460961576913" calcext:value-type="float">
            <text:p>18.85</text:p>
          </table:table-cell>
          <table:table-cell table:style-name="ce71" table:formula="of:=[.E$27]*[.$Z$5]*MAGNET([.E$24]+[.$BB61])+[.F$27]*[.$Z$5]*MAGNET([.F$24]+[.$BB61])+[.G$27]*[.$Z$5]*MAGNET([.G$24]+[.$BB61])+[.H$27]*[.$Z$5]*MAGNET([.H$24]+[.$BB61])+[.I$27]*[.$Z$5]*MAGNET([.I$24]+[.$BB61])+[.J$27]*[.$Z$5]*MAGNET([.J$24]+[.$BB61])+[.K$27]*[.$Z$5]*MAGNET([.K$24]+[.$BB61])+[.L$27]*[.$Z$5]*MAGNET([.L$24]+[.$BB61])+[.M$27]*[.$Z$5]*MAGNET([.M$24]+[.$BB61])+[.N$27]*[.$Z$5]*MAGNET([.N$24]+[.$BB61])+[.O$27]*[.$Z$5]*MAGNET([.O$24]+[.$BB61])+[.P$27]*[.$Z$5]*MAGNET([.P$24]+[.$BB61])+[.Q$27]*[.$Z$5]*MAGNET([.Q$24]+[.$BB61])+[.R$27]*[.$Z$5]*MAGNET([.R$24]+[.$BB61])+[.S$27]*[.$Z$5]*MAGNET([.S$24]+[.$BB61])+[.T$27]*[.$Z$5]*MAGNET([.T$24]+[.$BB61])+[.U$27]*[.$Z$5]*MAGNET([.U$24]+[.$BB61])+[.V$27]*[.$Z$5]*MAGNET([.V$24]+[.$BB61])+[.W$27]*[.$Z$5]*MAGNET([.W$24]+[.$BB61])+[.X$27]*[.$Z$5]*MAGNET([.X$24]+[.$BB61])+[.Y$27]*[.$Z$5]*MAGNET([.Y$24]+[.$BB61])+[.Z$27]*[.$Z$5]*MAGNET([.Z$24]+[.$BB61])+[.AA$27]*[.$Z$5]*MAGNET([.AA$24]+[.$BB61])+[.AB$27]*[.$Z$5]*MAGNET([.AB$24]+[.$BB61])+[.AC$27]*[.$Z$5]*MAGNET([.AC$24]+[.$BB61])+[.AD$27]*[.$Z$5]*MAGNET([.AD$24]+[.$BB61])+[.AE$27]*[.$Z$5]*MAGNET([.AE$24]+[.$BB61])+[.AF$27]*[.$Z$5]*MAGNET([.AF$24]+[.$BB61])+[.AG$27]*[.$Z$5]*MAGNET([.AG$24]+[.$BB61])+[.D$27]*[.$Z$5]*MAGNET([.D$24]+[.$BB61])+[.AH$27]*[.$Z$5]*MAGNET([.AH$24]+[.BB61]) +[.AI$27]*[.$Z$5]*MAGNET([.AI$24]+[.BB61]) +[.AJ$27]*[.$Z$5]*MAGNET([.AJ$24]+[.BB61]) +[.AK$27]*[.$Z$5]*MAGNET([.AK$24]+[.BB61]) +[.AL$27]*[.$Z$5]*MAGNET([.AL$24]+[.BB61]) +[.AM$27]*[.$Z$5]*MAGNET([.AM$24]+[.BB61]) +[.AN$27]*[.$Z$5]*MAGNET([.AN$24]+[.BB61]) +[.AO$27]*[.$Z$5]*MAGNET([.AO$24]+[.BB61]) +[.AP$27]*[.$Z$5]*MAGNET([.AP$24]+[.$BB61])&#10;+[.AQ$27]*[.$Z$5]*MAGNET([.AQ$24]+[.$BB61])&#10;+[.AR$27]*[.$Z$5]*MAGNET([.AR$24]+[.$BB61])&#10;+[.AS$27]*[.$Z$5]*MAGNET([.AS$24]+[.$BB61])&#10;+[.AT$27]*[.$Z$5]*MAGNET([.AT$24]+[.$BB61])&#10;+[.AU$27]*[.$Z$5]*MAGNET([.AU$24]+[.$BB61])&#10;+[.AV$27]*[.$Z$5]*MAGNET([.AV$24]+[.$BB61])&#10;+[.AW$27]*[.$Z$5]*MAGNET([.AW$24]+[.$BB61])&#10;+[.AX$27]*[.$Z$5]*MAGNET([.AX$24]+[.$BB61])&#10;+[.AY$27]*[.$Z$5]*MAGNET([.AY$24]+[.$BB61]) +RAND()*[.$BE$13]" office:value-type="float" office:value="127.002967052547" calcext:value-type="float">
            <text:p>127.002967052547</text:p>
          </table:table-cell>
          <table:table-cell table:style-name="ce71" table:formula="of:=[.E$28]*[.$Z$5]*MAGNET([.E$24]+[.$BB61])+[.F$28]*[.$Z$5]*MAGNET([.F$24]+[.$BB61])+[.G$28]*[.$Z$5]*MAGNET([.G$24]+[.$BB61])+[.H$28]*[.$Z$5]*MAGNET([.H$24]+[.$BB61])+[.I$28]*[.$Z$5]*MAGNET([.I$24]+[.$BB61])+[.J$28]*[.$Z$5]*MAGNET([.J$24]+[.$BB61])+[.K$28]*[.$Z$5]*MAGNET([.K$24]+[.$BB61])+[.L$28]*[.$Z$5]*MAGNET([.L$24]+[.$BB61])+[.M$28]*[.$Z$5]*MAGNET([.M$24]+[.$BB61])+[.N$28]*[.$Z$5]*MAGNET([.N$24]+[.$BB61])+[.O$28]*[.$Z$5]*MAGNET([.O$24]+[.$BB61])+[.P$28]*[.$Z$5]*MAGNET([.P$24]+[.$BB61])+[.Q$28]*[.$Z$5]*MAGNET([.Q$24]+[.$BB61])+[.R$28]*[.$Z$5]*MAGNET([.R$24]+[.$BB61])+[.S$28]*[.$Z$5]*MAGNET([.S$24]+[.$BB61])+[.T$28]*[.$Z$5]*MAGNET([.T$24]+[.$BB61])+[.U$28]*[.$Z$5]*MAGNET([.U$24]+[.$BB61])+[.V$28]*[.$Z$5]*MAGNET([.V$24]+[.$BB61])+[.W$28]*[.$Z$5]*MAGNET([.W$24]+[.$BB61])+[.X$28]*[.$Z$5]*MAGNET([.X$24]+[.$BB61])+[.Y$28]*[.$Z$5]*MAGNET([.Y$24]+[.$BB61])+[.Z$28]*[.$Z$5]*MAGNET([.Z$24]+[.$BB61])+[.AA$28]*[.$Z$5]*MAGNET([.AA$24]+[.$BB61])+[.AB$28]*[.$Z$5]*MAGNET([.AB$24]+[.$BB61])+[.AC$28]*[.$Z$5]*MAGNET([.AC$24]+[.$BB61])+[.AD$28]*[.$Z$5]*MAGNET([.AD$24]+[.$BB61])+[.AE$28]*[.$Z$5]*MAGNET([.AE$24]+[.$BB61])+[.AF$28]*[.$Z$5]*MAGNET([.AF$24]+[.$BB61])+[.AG$28]*[.$Z$5]*MAGNET([.AG$24]+[.$BB61])+[.D$28]*[.$Z$5]*MAGNET([.D$24]+[.$BB61])+[.AH$28]*[.$Z$5]*MAGNET([.AH$24]+[.BB61]) +[.AI$28]*[.$Z$5]*MAGNET([.AI$24]+[.BB61]) +[.AJ$28]*[.$Z$5]*MAGNET([.AJ$24]+[.BB61]) +[.AK$28]*[.$Z$5]*MAGNET([.AK$24]+[.BB61]) +[.AL$28]*[.$Z$5]*MAGNET([.AL$24]+[.BB61]) +[.AM$28]*[.$Z$5]*MAGNET([.AM$24]+[.BB61]) +[.AN$28]*[.$Z$5]*MAGNET([.AN$24]+[.BB61]) +[.AO$28]*[.$Z$5]*MAGNET([.AO$24]+[.BB61]) +[.AP$28]*[.$Z$5]*MAGNET([.AP$24]+[.$BB61])&#10;+[.AQ$28]*[.$Z$5]*MAGNET([.AQ$24]+[.$BB61])&#10;+[.AR$28]*[.$Z$5]*MAGNET([.AR$24]+[.$BB61])&#10;+[.AS$28]*[.$Z$5]*MAGNET([.AS$24]+[.$BB61])&#10;+[.AT$28]*[.$Z$5]*MAGNET([.AT$24]+[.$BB61])&#10;+[.AU$28]*[.$Z$5]*MAGNET([.AU$24]+[.$BB61])&#10;+[.AV$28]*[.$Z$5]*MAGNET([.AV$24]+[.$BB61])&#10;+[.AW$28]*[.$Z$5]*MAGNET([.AW$24]+[.$BB61])&#10;+[.AX$28]*[.$Z$5]*MAGNET([.AX$24]+[.$BB61])&#10;+[.AY$28]*[.$Z$5]*MAGNET([.AY$24]+[.$BB61]) +RAND()*[.$BF$13]" office:value-type="float" office:value="15.0715521268179" calcext:value-type="float">
            <text:p>15.0715521268179</text:p>
          </table:table-cell>
          <table:table-cell table:style-name="ce71" table:formula="of:=[.E$29]*[.$Z$5]*MAGNET([.E$24]+[.$BB61])+[.F$29]*[.$Z$5]*MAGNET([.F$24]+[.$BB61])+[.G$29]*[.$Z$5]*MAGNET([.G$24]+[.$BB61])+[.H$29]*[.$Z$5]*MAGNET([.H$24]+[.$BB61])+[.I$29]*[.$Z$5]*MAGNET([.I$24]+[.$BB61])+[.J$29]*[.$Z$5]*MAGNET([.J$24]+[.$BB61])+[.K$29]*[.$Z$5]*MAGNET([.K$24]+[.$BB61])+[.L$29]*[.$Z$5]*MAGNET([.L$24]+[.$BB61])+[.M$29]*[.$Z$5]*MAGNET([.M$24]+[.$BB61])+[.N$29]*[.$Z$5]*MAGNET([.N$24]+[.$BB61])+[.O$29]*[.$Z$5]*MAGNET([.O$24]+[.$BB61])+[.P$29]*[.$Z$5]*MAGNET([.P$24]+[.$BB61])+[.Q$29]*[.$Z$5]*MAGNET([.Q$24]+[.$BB61])+[.R$29]*[.$Z$5]*MAGNET([.R$24]+[.$BB61])+[.S$29]*[.$Z$5]*MAGNET([.S$24]+[.$BB61])+[.T$29]*[.$Z$5]*MAGNET([.T$24]+[.$BB61])+[.U$29]*[.$Z$5]*MAGNET([.U$24]+[.$BB61])+[.V$29]*[.$Z$5]*MAGNET([.V$24]+[.$BB61])+[.W$29]*[.$Z$5]*MAGNET([.W$24]+[.$BB61])+[.X$29]*[.$Z$5]*MAGNET([.X$24]+[.$BB61])+[.Y$29]*[.$Z$5]*MAGNET([.Y$24]+[.$BB61])+[.Z$29]*[.$Z$5]*MAGNET([.Z$24]+[.$BB61])+[.AA$29]*[.$Z$5]*MAGNET([.AA$24]+[.$BB61])+[.AB$29]*[.$Z$5]*MAGNET([.AB$24]+[.$BB61])+[.AC$29]*[.$Z$5]*MAGNET([.AC$24]+[.$BB61])+[.AD$29]*[.$Z$5]*MAGNET([.AD$24]+[.$BB61])+[.AE$29]*[.$Z$5]*MAGNET([.AE$24]+[.$BB61])+[.AF$29]*[.$Z$5]*MAGNET([.AF$24]+[.$BB61])+[.AG$29]*[.$Z$5]*MAGNET([.AG$24]+[.$BB61])+[.D$29]*[.$Z$5]*MAGNET([.D$24]+[.$BB61])+[.AH$29]*[.$Z$5]*MAGNET([.AH$24]+[.BB61]) +[.AI$29]*[.$Z$5]*MAGNET([.AI$24]+[.BB61]) +[.AJ$29]*[.$Z$5]*MAGNET([.AJ$24]+[.BB61]) +[.AK$29]*[.$Z$5]*MAGNET([.AK$24]+[.BB61]) +[.AL$29]*[.$Z$5]*MAGNET([.AL$24]+[.BB61]) +[.AM$29]*[.$Z$5]*MAGNET([.AM$24]+[.BB61]) +[.AN$29]*[.$Z$5]*MAGNET([.AN$24]+[.BB61]) +[.AO$29]*[.$Z$5]*MAGNET([.AO$24]+[.BB61]) +[.AP$29]*[.$Z$5]*MAGNET([.AP$24]+[.$BB61])&#10;+[.AQ$29]*[.$Z$5]*MAGNET([.AQ$24]+[.$BB61])&#10;+[.AR$29]*[.$Z$5]*MAGNET([.AR$24]+[.$BB61])&#10;+[.AS$29]*[.$Z$5]*MAGNET([.AS$24]+[.$BB61])&#10;+[.AT$29]*[.$Z$5]*MAGNET([.AT$24]+[.$BB61])&#10;+[.AU$29]*[.$Z$5]*MAGNET([.AU$24]+[.$BB61])&#10;+[.AV$29]*[.$Z$5]*MAGNET([.AV$24]+[.$BB61])&#10;+[.AW$29]*[.$Z$5]*MAGNET([.AW$24]+[.$BB61])&#10;+[.AX$29]*[.$Z$5]*MAGNET([.AX$24]+[.$BB61])&#10;+[.AY$29]*[.$Z$5]*MAGNET([.AY$24]+[.$BB61]) +RAND()*[.$BG$13]" office:value-type="float" office:value="-42.8074855078691" calcext:value-type="float">
            <text:p>-42.8074855078691</text:p>
          </table:table-cell>
          <table:table-cell table:style-name="ce71" table:formula="of:=[.E$30]*[.$Z$5]*MAGNET([.E$24]+[.$BB61])+[.F$30]*[.$Z$5]*MAGNET([.F$24]+[.$BB61])+[.G$30]*[.$Z$5]*MAGNET([.G$24]+[.$BB61])+[.H$30]*[.$Z$5]*MAGNET([.H$24]+[.$BB61])+[.I$30]*[.$Z$5]*MAGNET([.I$24]+[.$BB61])+[.J$30]*[.$Z$5]*MAGNET([.J$24]+[.$BB61])+[.K$30]*[.$Z$5]*MAGNET([.K$24]+[.$BB61])+[.L$30]*[.$Z$5]*MAGNET([.L$24]+[.$BB61])+[.M$30]*[.$Z$5]*MAGNET([.M$24]+[.$BB61])+[.N$30]*[.$Z$5]*MAGNET([.N$24]+[.$BB61])+[.O$30]*[.$Z$5]*MAGNET([.O$24]+[.$BB61])+[.P$30]*[.$Z$5]*MAGNET([.P$24]+[.$BB61])+[.Q$30]*[.$Z$5]*MAGNET([.Q$24]+[.$BB61])+[.R$30]*[.$Z$5]*MAGNET([.R$24]+[.$BB61])+[.S$30]*[.$Z$5]*MAGNET([.S$24]+[.$BB61])+[.T$30]*[.$Z$5]*MAGNET([.T$24]+[.$BB61])+[.U$30]*[.$Z$5]*MAGNET([.U$24]+[.$BB61])+[.V$30]*[.$Z$5]*MAGNET([.V$24]+[.$BB61])+[.W$30]*[.$Z$5]*MAGNET([.W$24]+[.$BB61])+[.X$30]*[.$Z$5]*MAGNET([.X$24]+[.$BB61])+[.Y$30]*[.$Z$5]*MAGNET([.Y$24]+[.$BB61])+[.Z$30]*[.$Z$5]*MAGNET([.Z$24]+[.$BB61])+[.AA$30]*[.$Z$5]*MAGNET([.AA$24]+[.$BB61])+[.AB$30]*[.$Z$5]*MAGNET([.AB$24]+[.$BB61])+[.AC$30]*[.$Z$5]*MAGNET([.AC$24]+[.$BB61])+[.AD$30]*[.$Z$5]*MAGNET([.AD$24]+[.$BB61])+[.AE$30]*[.$Z$5]*MAGNET([.AE$24]+[.$BB61])+[.AF$30]*[.$Z$5]*MAGNET([.AF$24]+[.$BB61])+[.AG$30]*[.$Z$5]*MAGNET([.AG$24]+[.$BB61])+[.D$30]*[.$Z$5]*MAGNET([.D$24]+[.$BB61])+[.AH$30]*[.$Z$5]*MAGNET([.AH$24]+[.BB61]) +[.AI$30]*[.$Z$5]*MAGNET([.AI$24]+[.BB61]) +[.AJ$30]*[.$Z$5]*MAGNET([.AJ$24]+[.BB61]) +[.AK$30]*[.$Z$5]*MAGNET([.AK$24]+[.BB61]) +[.AL$30]*[.$Z$5]*MAGNET([.AL$24]+[.BB61]) +[.AM$30]*[.$Z$5]*MAGNET([.AM$24]+[.BB61]) +[.AN$30]*[.$Z$5]*MAGNET([.AN$24]+[.BB61]) +[.AO$30]*[.$Z$5]*MAGNET([.AO$24]+[.BB61]) +[.AP$30]*[.$Z$5]*MAGNET([.AP$24]+[.$BB61])&#10;+[.AQ$30]*[.$Z$5]*MAGNET([.AQ$24]+[.$BB61])&#10;+[.AR$30]*[.$Z$5]*MAGNET([.AR$24]+[.$BB61])&#10;+[.AS$30]*[.$Z$5]*MAGNET([.AS$24]+[.$BB61])&#10;+[.AT$30]*[.$Z$5]*MAGNET([.AT$24]+[.$BB61])&#10;+[.AU$30]*[.$Z$5]*MAGNET([.AU$24]+[.$BB61])&#10;+[.AV$30]*[.$Z$5]*MAGNET([.AV$24]+[.$BB61])&#10;+[.AW$30]*[.$Z$5]*MAGNET([.AW$24]+[.$BB61])&#10;+[.AX$30]*[.$Z$5]*MAGNET([.AX$24]+[.$BB61])&#10;+[.AY$30]*[.$Z$5]*MAGNET([.AY$24]+[.$BB61]) +RAND()*[.$BH$13]" office:value-type="float" office:value="0" calcext:value-type="float">
            <text:p>0</text:p>
          </table:table-cell>
          <table:table-cell table:style-name="ce71" table:formula="of:=[.E$31]*[.$Z$5]*MAGNET([.E$24]+[.$BB61])+[.F$31]*[.$Z$5]*MAGNET([.F$24]+[.$BB61])+[.G$31]*[.$Z$5]*MAGNET([.G$24]+[.$BB61])+[.H$31]*[.$Z$5]*MAGNET([.H$24]+[.$BB61])+[.I$31]*[.$Z$5]*MAGNET([.I$24]+[.$BB61])+[.J$31]*[.$Z$5]*MAGNET([.J$24]+[.$BB61])+[.K$31]*[.$Z$5]*MAGNET([.K$24]+[.$BB61])+[.L$31]*[.$Z$5]*MAGNET([.L$24]+[.$BB61])+[.M$31]*[.$Z$5]*MAGNET([.M$24]+[.$BB61])+[.N$31]*[.$Z$5]*MAGNET([.N$24]+[.$BB61])+[.O$31]*[.$Z$5]*MAGNET([.O$24]+[.$BB61])+[.P$31]*[.$Z$5]*MAGNET([.P$24]+[.$BB61])+[.Q$31]*[.$Z$5]*MAGNET([.Q$24]+[.$BB61])+[.R$31]*[.$Z$5]*MAGNET([.R$24]+[.$BB61])+[.S$31]*[.$Z$5]*MAGNET([.S$24]+[.$BB61])+[.T$31]*[.$Z$5]*MAGNET([.T$24]+[.$BB61])+[.U$31]*[.$Z$5]*MAGNET([.U$24]+[.$BB61])+[.V$31]*[.$Z$5]*MAGNET([.V$24]+[.$BB61])+[.W$31]*[.$Z$5]*MAGNET([.W$24]+[.$BB61])+[.X$31]*[.$Z$5]*MAGNET([.X$24]+[.$BB61])+[.Y$31]*[.$Z$5]*MAGNET([.Y$24]+[.$BB61])+[.Z$31]*[.$Z$5]*MAGNET([.Z$24]+[.$BB61])+[.AA$31]*[.$Z$5]*MAGNET([.AA$24]+[.$BB61])+[.AB$31]*[.$Z$5]*MAGNET([.AB$24]+[.$BB61])+[.AC$31]*[.$Z$5]*MAGNET([.AC$24]+[.$BB61])+[.AD$31]*[.$Z$5]*MAGNET([.AD$24]+[.$BB61])+[.AE$31]*[.$Z$5]*MAGNET([.AE$24]+[.$BB61])+[.AF$31]*[.$Z$5]*MAGNET([.AF$24]+[.$BB61])+[.AG$31]*[.$Z$5]*MAGNET([.AG$24]+[.$BB61])+[.D$31]*[.$Z$5]*MAGNET([.D$24]+[.$BB61])+[.AH$31]*[.$Z$5]*MAGNET([.AH$24]+[.BB61]) +[.AI$31]*[.$Z$5]*MAGNET([.AI$24]+[.BB61]) +[.AJ$31]*[.$Z$5]*MAGNET([.AJ$24]+[.BB61]) +[.AK$31]*[.$Z$5]*MAGNET([.AK$24]+[.BB61]) +[.AL$31]*[.$Z$5]*MAGNET([.AL$24]+[.BB61]) +[.AM$31]*[.$Z$5]*MAGNET([.AM$24]+[.BB61]) +[.AN$31]*[.$Z$5]*MAGNET([.AN$24]+[.BB61]) +[.AO$31]*[.$Z$5]*MAGNET([.AO$24]+[.BB61]) +[.AP$31]*[.$Z$5]*MAGNET([.AP$24]+[.$BB61])&#10;+[.AQ$31]*[.$Z$5]*MAGNET([.AQ$24]+[.$BB61])&#10;+[.AR$31]*[.$Z$5]*MAGNET([.AR$24]+[.$BB61])&#10;+[.AS$31]*[.$Z$5]*MAGNET([.AS$24]+[.$BB61])&#10;+[.AT$31]*[.$Z$5]*MAGNET([.AT$24]+[.$BB61])&#10;+[.AU$31]*[.$Z$5]*MAGNET([.AU$24]+[.$BB61])&#10;+[.AV$31]*[.$Z$5]*MAGNET([.AV$24]+[.$BB61])&#10;+[.AW$31]*[.$Z$5]*MAGNET([.AW$24]+[.$BB61])&#10;+[.AX$31]*[.$Z$5]*MAGNET([.AX$24]+[.$BB61])&#10;+[.AY$31]*[.$Z$5]*MAGNET([.AY$24]+[.$BB61]) +RAND()*[.$BI$13]" office:value-type="float" office:value="0" calcext:value-type="float">
            <text:p>0</text:p>
          </table:table-cell>
          <table:table-cell table:style-name="ce71" table:formula="of:=[.E$32]*[.$Z$5]*MAGNET([.E$24]+[.$BB61])+[.F$32]*[.$Z$5]*MAGNET([.F$24]+[.$BB61])+[.G$32]*[.$Z$5]*MAGNET([.G$24]+[.$BB61])+[.H$32]*[.$Z$5]*MAGNET([.H$24]+[.$BB61])+[.I$32]*[.$Z$5]*MAGNET([.I$24]+[.$BB61])+[.J$32]*[.$Z$5]*MAGNET([.J$24]+[.$BB61])+[.K$32]*[.$Z$5]*MAGNET([.K$24]+[.$BB61])+[.L$32]*[.$Z$5]*MAGNET([.L$24]+[.$BB61])+[.M$32]*[.$Z$5]*MAGNET([.M$24]+[.$BB61])+[.N$32]*[.$Z$5]*MAGNET([.N$24]+[.$BB61])+[.O$32]*[.$Z$5]*MAGNET([.O$24]+[.$BB61])+[.P$32]*[.$Z$5]*MAGNET([.P$24]+[.$BB61])+[.Q$32]*[.$Z$5]*MAGNET([.Q$24]+[.$BB61])+[.R$32]*[.$Z$5]*MAGNET([.R$24]+[.$BB61])+[.S$32]*[.$Z$5]*MAGNET([.S$24]+[.$BB61])+[.T$32]*[.$Z$5]*MAGNET([.T$24]+[.$BB61])+[.U$32]*[.$Z$5]*MAGNET([.U$24]+[.$BB61])+[.V$32]*[.$Z$5]*MAGNET([.V$24]+[.$BB61])+[.W$32]*[.$Z$5]*MAGNET([.W$24]+[.$BB61])+[.X$32]*[.$Z$5]*MAGNET([.X$24]+[.$BB61])+[.Y$32]*[.$Z$5]*MAGNET([.Y$24]+[.$BB61])+[.Z$32]*[.$Z$5]*MAGNET([.Z$24]+[.$BB61])+[.AA$32]*[.$Z$5]*MAGNET([.AA$24]+[.$BB61])+[.AB$32]*[.$Z$5]*MAGNET([.AB$24]+[.$BB61])+[.AC$32]*[.$Z$5]*MAGNET([.AC$24]+[.$BB61])+[.AD$32]*[.$Z$5]*MAGNET([.AD$24]+[.$BB61])+[.AE$32]*[.$Z$5]*MAGNET([.AE$24]+[.$BB61])+[.AF$32]*[.$Z$5]*MAGNET([.AF$24]+[.$BB61])+[.AG$32]*[.$Z$5]*MAGNET([.AG$24]+[.$BB61])+[.D$32]*[.$Z$5]*MAGNET([.D$24]+[.$BB61])+[.AH$32]*[.$Z$5]*MAGNET([.AH$24]+[.BB61]) +[.AI$32]*[.$Z$5]*MAGNET([.AI$24]+[.BB61]) +[.AJ$32]*[.$Z$5]*MAGNET([.AJ$24]+[.BB61]) +[.AK$32]*[.$Z$5]*MAGNET([.AK$24]+[.BB61]) +[.AL$32]*[.$Z$5]*MAGNET([.AL$24]+[.BB61]) +[.AM$32]*[.$Z$5]*MAGNET([.AM$24]+[.BB61]) +[.AN$32]*[.$Z$5]*MAGNET([.AN$24]+[.BB61]) +[.AO$32]*[.$Z$5]*MAGNET([.AO$24]+[.BB61]) +[.AP$32]*[.$Z$5]*MAGNET([.AP$24]+[.$BB61])&#10;+[.AQ$32]*[.$Z$5]*MAGNET([.AQ$24]+[.$BB61])&#10;+[.AR$32]*[.$Z$5]*MAGNET([.AR$24]+[.$BB61])&#10;+[.AS$32]*[.$Z$5]*MAGNET([.AS$24]+[.$BB61])&#10;+[.AT$32]*[.$Z$5]*MAGNET([.AT$24]+[.$BB61])&#10;+[.AU$32]*[.$Z$5]*MAGNET([.AU$24]+[.$BB61])&#10;+[.AV$32]*[.$Z$5]*MAGNET([.AV$24]+[.$BB61])&#10;+[.AW$32]*[.$Z$5]*MAGNET([.AW$24]+[.$BB61])&#10;+[.AX$32]*[.$Z$5]*MAGNET([.AX$24]+[.$BB61])&#10;+[.AY$32]*[.$Z$5]*MAGNET([.AY$24]+[.$BB6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1]+0.002" office:value-type="float" office:value="0.0940000000000001" calcext:value-type="float">
            <text:p>0.0940000000000001</text:p>
          </table:table-cell>
          <table:table-cell table:formula="of:=[.BA62]*[.$D$6]" office:value-type="float" office:value="4.72495535099905" calcext:value-type="float">
            <text:p>4.725</text:p>
          </table:table-cell>
          <table:table-cell table:formula="of:=[.D$25]*[.$Z$5]*MAGNET([.D$24]+[.BB62])+[.E$25]*[.$Z$5]*MAGNET([.E$24]+[.BB62])+[.F$25]*[.$Z$5]*MAGNET([.F$24]+[.BB62])+[.G$25]*[.$Z$5]*MAGNET([.G$24]+[.BB62])+[.H$25]*[.$Z$5]*MAGNET([.H$24]+[.BB62])+[.I$25]*[.$Z$5]*MAGNET([.I$24]+[.BB62])+[.J$25]*[.$Z$5]*MAGNET([.J$24]+[.BB62])+[.K$25]*[.$Z$5]*MAGNET([.K$24]+[.BB62])+[.L$25]*[.$Z$5]*MAGNET([.L$24]+[.BB62])+[.M$25]*[.$Z$5]*MAGNET([.M$24]+[.BB62])+[.N$25]*[.$Z$5]*MAGNET([.N$24]+[.BB62])+[.O$25]*[.$Z$5]*MAGNET([.O$24]+[.BB62])+[.P$25]*[.$Z$5]*MAGNET([.P$24]+[.BB62])+[.Q$25]*[.$Z$5]*MAGNET([.Q$24]+[.BB62])+[.R$25]*[.$Z$5]*MAGNET([.R$24]+[.BB62])+[.S$25]*[.$Z$5]*MAGNET([.S$24]+[.BB62])+[.T$25]*[.$Z$5]*MAGNET([.T$24]+[.BB62])+[.U$25]*[.$Z$5]*MAGNET([.U$24]+[.BB62])+[.V$25]*[.$Z$5]*MAGNET([.V$24]+[.BB62])+[.W$25]*[.$Z$5]*MAGNET([.W$24]+[.BB62])+[.X$25]*[.$Z$5]*MAGNET([.X$24]+[.BB62])+[.Y$25]*[.$Z$5]*MAGNET([.Y$24]+[.BB62])+[.Z$25]*[.$Z$5]*MAGNET([.Z$24]+[.BB62])+[.AA$25]*[.$Z$5]*MAGNET([.AA$24]+[.BB62])+[.AB$25]*[.$Z$5]*MAGNET([.AB$24]+[.BB62])+[.AC$25]*[.$Z$5]*MAGNET([.AC$24]+[.BB62])+[.AD$25]*[.$Z$5]*MAGNET([.AD$24]+[.BB62])+[.AE$25]*[.$Z$5]*MAGNET([.AE$24]+[.BB62])+[.AF$25]*[.$Z$5]*MAGNET([.AF$24]+[.BB62])+[.AG$25]*[.$Z$5]*MAGNET([.AG$24]+[.BB62])+[.AH$25]*[.$Z$5]*MAGNET([.AH$24]+[.BB62]) +[.AI$25]*[.$Z$5]*MAGNET([.AI$24]+[.BB62]) +[.AJ$25]*[.$Z$5]*MAGNET([.AJ$24]+[.BB62]) +[.AK$25]*[.$Z$5]*MAGNET([.AK$24]+[.BB62]) +[.AL$25]*[.$Z$5]*MAGNET([.AL$24]+[.BB62]) +[.AM$25]*[.$Z$5]*MAGNET([.AM$24]+[.BB62]) +[.AN$25]*[.$Z$5]*MAGNET([.AN$24]+[.BB62]) +[.AO$25]*[.$Z$5]*MAGNET([.AO$24]+[.BB62])+RAND()*[.$BC$13]+[.AP$25]*[.$Z$5]*MAGNET([.AP$24]+[.BB62])&#10;+[.AQ$25]*[.$Z$5]*MAGNET([.AQ$24]+[.BB62])&#10;+[.AR$25]*[.$Z$5]*MAGNET([.AR$24]+[.BB62])&#10;+[.AS$25]*[.$Z$5]*MAGNET([.AS$24]+[.BB62])&#10;+[.AT$25]*[.$Z$5]*MAGNET([.AT$24]+[.BB62])&#10;+[.AU$25]*[.$Z$5]*MAGNET([.AU$24]+[.BB62])&#10;+[.AV$25]*[.$Z$5]*MAGNET([.AV$24]+[.BB62])&#10;+[.AW$25]*[.$Z$5]*MAGNET([.AW$24]+[.BB62])&#10;+[.AX$25]*[.$Z$5]*MAGNET([.AX$24]+[.BB62])&#10;+[.AY$25]*[.$Z$5]*MAGNET([.AY$24]+[.BB62])" office:value-type="float" office:value="-108.873534990591" calcext:value-type="float">
            <text:p>-108.87</text:p>
          </table:table-cell>
          <table:table-cell table:style-name="ce70" table:formula="of:=[.E$26]*[.$Z$5]*MAGNET([.E$24]+[.$BB62])+[.F$26]*[.$Z$5]*MAGNET([.F$24]+[.$BB62])+[.G$26]*[.$Z$5]*MAGNET([.G$24]+[.$BB62])+[.H$26]*[.$Z$5]*MAGNET([.H$24]+[.$BB62])+[.I$26]*[.$Z$5]*MAGNET([.I$24]+[.$BB62])+[.J$26]*[.$Z$5]*MAGNET([.J$24]+[.$BB62])+[.K$26]*[.$Z$5]*MAGNET([.K$24]+[.$BB62])+[.L$26]*[.$Z$5]*MAGNET([.L$24]+[.$BB62])+[.M$26]*[.$Z$5]*MAGNET([.M$24]+[.$BB62])+[.N$26]*[.$Z$5]*MAGNET([.N$24]+[.$BB62])+[.O$26]*[.$Z$5]*MAGNET([.O$24]+[.$BB62])+[.P$26]*[.$Z$5]*MAGNET([.P$24]+[.$BB62])+[.Q$26]*[.$Z$5]*MAGNET([.Q$24]+[.$BB62])+[.R$26]*[.$Z$5]*MAGNET([.R$24]+[.$BB62])+[.S$26]*[.$Z$5]*MAGNET([.S$24]+[.$BB62])+[.T$26]*[.$Z$5]*MAGNET([.T$24]+[.$BB62])+[.U$26]*[.$Z$5]*MAGNET([.U$24]+[.$BB62])+[.V$26]*[.$Z$5]*MAGNET([.V$24]+[.$BB62])+[.W$26]*[.$Z$5]*MAGNET([.W$24]+[.$BB62])+[.X$26]*[.$Z$5]*MAGNET([.X$24]+[.$BB62])+[.Y$26]*[.$Z$5]*MAGNET([.Y$24]+[.$BB62])+[.Z$26]*[.$Z$5]*MAGNET([.Z$24]+[.$BB62])+[.AA$26]*[.$Z$5]*MAGNET([.AA$24]+[.$BB62])+[.AB$26]*[.$Z$5]*MAGNET([.AB$24]+[.$BB62])+[.AC$26]*[.$Z$5]*MAGNET([.AC$24]+[.$BB62])+[.AD$26]*[.$Z$5]*MAGNET([.AD$24]+[.$BB62])+[.AE$26]*[.$Z$5]*MAGNET([.AE$24]+[.$BB62])+[.AF$26]*[.$Z$5]*MAGNET([.AF$24]+[.$BB62])+[.AG$26]*[.$Z$5]*MAGNET([.AG$24]+[.$BB62])+[.D$26]*[.$Z$5]*MAGNET([.D$24]+[.$BB62])+[.AH$26]*[.$Z$5]*MAGNET([.AH$24]+[.BB62]) +[.AI$26]*[.$Z$5]*MAGNET([.AI$24]+[.BB62]) +[.AJ$26]*[.$Z$5]*MAGNET([.AJ$24]+[.BB62]) +[.AK$26]*[.$Z$5]*MAGNET([.AK$24]+[.BB62]) +[.AL$26]*[.$Z$5]*MAGNET([.AL$24]+[.BB62]) +[.AM$26]*[.$Z$5]*MAGNET([.AM$24]+[.BB62]) +[.AN$26]*[.$Z$5]*MAGNET([.AN$24]+[.BB62]) +[.AO$26]*[.$Z$5]*MAGNET([.AO$24]+[.BB62]) +[.AP$26]*[.$Z$5]*MAGNET([.AP$24]+[.$BB62])&#10;+[.AQ$26]*[.$Z$5]*MAGNET([.AQ$24]+[.$BB62])&#10;+[.AR$26]*[.$Z$5]*MAGNET([.AR$24]+[.$BB62])&#10;+[.AS$26]*[.$Z$5]*MAGNET([.AS$24]+[.$BB62])&#10;+[.AT$26]*[.$Z$5]*MAGNET([.AT$24]+[.$BB62])&#10;+[.AU$26]*[.$Z$5]*MAGNET([.AU$24]+[.$BB62])&#10;+[.AV$26]*[.$Z$5]*MAGNET([.AV$24]+[.$BB62])&#10;+[.AW$26]*[.$Z$5]*MAGNET([.AW$24]+[.$BB62])&#10;+[.AX$26]*[.$Z$5]*MAGNET([.AX$24]+[.$BB62])&#10;+[.AY$26]*[.$Z$5]*MAGNET([.AY$24]+[.$BB62]) +RAND()*[.$BD$13]" office:value-type="float" office:value="26.8138520953739" calcext:value-type="float">
            <text:p>26.81</text:p>
          </table:table-cell>
          <table:table-cell table:style-name="ce71" table:formula="of:=[.E$27]*[.$Z$5]*MAGNET([.E$24]+[.$BB62])+[.F$27]*[.$Z$5]*MAGNET([.F$24]+[.$BB62])+[.G$27]*[.$Z$5]*MAGNET([.G$24]+[.$BB62])+[.H$27]*[.$Z$5]*MAGNET([.H$24]+[.$BB62])+[.I$27]*[.$Z$5]*MAGNET([.I$24]+[.$BB62])+[.J$27]*[.$Z$5]*MAGNET([.J$24]+[.$BB62])+[.K$27]*[.$Z$5]*MAGNET([.K$24]+[.$BB62])+[.L$27]*[.$Z$5]*MAGNET([.L$24]+[.$BB62])+[.M$27]*[.$Z$5]*MAGNET([.M$24]+[.$BB62])+[.N$27]*[.$Z$5]*MAGNET([.N$24]+[.$BB62])+[.O$27]*[.$Z$5]*MAGNET([.O$24]+[.$BB62])+[.P$27]*[.$Z$5]*MAGNET([.P$24]+[.$BB62])+[.Q$27]*[.$Z$5]*MAGNET([.Q$24]+[.$BB62])+[.R$27]*[.$Z$5]*MAGNET([.R$24]+[.$BB62])+[.S$27]*[.$Z$5]*MAGNET([.S$24]+[.$BB62])+[.T$27]*[.$Z$5]*MAGNET([.T$24]+[.$BB62])+[.U$27]*[.$Z$5]*MAGNET([.U$24]+[.$BB62])+[.V$27]*[.$Z$5]*MAGNET([.V$24]+[.$BB62])+[.W$27]*[.$Z$5]*MAGNET([.W$24]+[.$BB62])+[.X$27]*[.$Z$5]*MAGNET([.X$24]+[.$BB62])+[.Y$27]*[.$Z$5]*MAGNET([.Y$24]+[.$BB62])+[.Z$27]*[.$Z$5]*MAGNET([.Z$24]+[.$BB62])+[.AA$27]*[.$Z$5]*MAGNET([.AA$24]+[.$BB62])+[.AB$27]*[.$Z$5]*MAGNET([.AB$24]+[.$BB62])+[.AC$27]*[.$Z$5]*MAGNET([.AC$24]+[.$BB62])+[.AD$27]*[.$Z$5]*MAGNET([.AD$24]+[.$BB62])+[.AE$27]*[.$Z$5]*MAGNET([.AE$24]+[.$BB62])+[.AF$27]*[.$Z$5]*MAGNET([.AF$24]+[.$BB62])+[.AG$27]*[.$Z$5]*MAGNET([.AG$24]+[.$BB62])+[.D$27]*[.$Z$5]*MAGNET([.D$24]+[.$BB62])+[.AH$27]*[.$Z$5]*MAGNET([.AH$24]+[.BB62]) +[.AI$27]*[.$Z$5]*MAGNET([.AI$24]+[.BB62]) +[.AJ$27]*[.$Z$5]*MAGNET([.AJ$24]+[.BB62]) +[.AK$27]*[.$Z$5]*MAGNET([.AK$24]+[.BB62]) +[.AL$27]*[.$Z$5]*MAGNET([.AL$24]+[.BB62]) +[.AM$27]*[.$Z$5]*MAGNET([.AM$24]+[.BB62]) +[.AN$27]*[.$Z$5]*MAGNET([.AN$24]+[.BB62]) +[.AO$27]*[.$Z$5]*MAGNET([.AO$24]+[.BB62]) +[.AP$27]*[.$Z$5]*MAGNET([.AP$24]+[.$BB62])&#10;+[.AQ$27]*[.$Z$5]*MAGNET([.AQ$24]+[.$BB62])&#10;+[.AR$27]*[.$Z$5]*MAGNET([.AR$24]+[.$BB62])&#10;+[.AS$27]*[.$Z$5]*MAGNET([.AS$24]+[.$BB62])&#10;+[.AT$27]*[.$Z$5]*MAGNET([.AT$24]+[.$BB62])&#10;+[.AU$27]*[.$Z$5]*MAGNET([.AU$24]+[.$BB62])&#10;+[.AV$27]*[.$Z$5]*MAGNET([.AV$24]+[.$BB62])&#10;+[.AW$27]*[.$Z$5]*MAGNET([.AW$24]+[.$BB62])&#10;+[.AX$27]*[.$Z$5]*MAGNET([.AX$24]+[.$BB62])&#10;+[.AY$27]*[.$Z$5]*MAGNET([.AY$24]+[.$BB62]) +RAND()*[.$BE$13]" office:value-type="float" office:value="121.124422572619" calcext:value-type="float">
            <text:p>121.124422572619</text:p>
          </table:table-cell>
          <table:table-cell table:style-name="ce71" table:formula="of:=[.E$28]*[.$Z$5]*MAGNET([.E$24]+[.$BB62])+[.F$28]*[.$Z$5]*MAGNET([.F$24]+[.$BB62])+[.G$28]*[.$Z$5]*MAGNET([.G$24]+[.$BB62])+[.H$28]*[.$Z$5]*MAGNET([.H$24]+[.$BB62])+[.I$28]*[.$Z$5]*MAGNET([.I$24]+[.$BB62])+[.J$28]*[.$Z$5]*MAGNET([.J$24]+[.$BB62])+[.K$28]*[.$Z$5]*MAGNET([.K$24]+[.$BB62])+[.L$28]*[.$Z$5]*MAGNET([.L$24]+[.$BB62])+[.M$28]*[.$Z$5]*MAGNET([.M$24]+[.$BB62])+[.N$28]*[.$Z$5]*MAGNET([.N$24]+[.$BB62])+[.O$28]*[.$Z$5]*MAGNET([.O$24]+[.$BB62])+[.P$28]*[.$Z$5]*MAGNET([.P$24]+[.$BB62])+[.Q$28]*[.$Z$5]*MAGNET([.Q$24]+[.$BB62])+[.R$28]*[.$Z$5]*MAGNET([.R$24]+[.$BB62])+[.S$28]*[.$Z$5]*MAGNET([.S$24]+[.$BB62])+[.T$28]*[.$Z$5]*MAGNET([.T$24]+[.$BB62])+[.U$28]*[.$Z$5]*MAGNET([.U$24]+[.$BB62])+[.V$28]*[.$Z$5]*MAGNET([.V$24]+[.$BB62])+[.W$28]*[.$Z$5]*MAGNET([.W$24]+[.$BB62])+[.X$28]*[.$Z$5]*MAGNET([.X$24]+[.$BB62])+[.Y$28]*[.$Z$5]*MAGNET([.Y$24]+[.$BB62])+[.Z$28]*[.$Z$5]*MAGNET([.Z$24]+[.$BB62])+[.AA$28]*[.$Z$5]*MAGNET([.AA$24]+[.$BB62])+[.AB$28]*[.$Z$5]*MAGNET([.AB$24]+[.$BB62])+[.AC$28]*[.$Z$5]*MAGNET([.AC$24]+[.$BB62])+[.AD$28]*[.$Z$5]*MAGNET([.AD$24]+[.$BB62])+[.AE$28]*[.$Z$5]*MAGNET([.AE$24]+[.$BB62])+[.AF$28]*[.$Z$5]*MAGNET([.AF$24]+[.$BB62])+[.AG$28]*[.$Z$5]*MAGNET([.AG$24]+[.$BB62])+[.D$28]*[.$Z$5]*MAGNET([.D$24]+[.$BB62])+[.AH$28]*[.$Z$5]*MAGNET([.AH$24]+[.BB62]) +[.AI$28]*[.$Z$5]*MAGNET([.AI$24]+[.BB62]) +[.AJ$28]*[.$Z$5]*MAGNET([.AJ$24]+[.BB62]) +[.AK$28]*[.$Z$5]*MAGNET([.AK$24]+[.BB62]) +[.AL$28]*[.$Z$5]*MAGNET([.AL$24]+[.BB62]) +[.AM$28]*[.$Z$5]*MAGNET([.AM$24]+[.BB62]) +[.AN$28]*[.$Z$5]*MAGNET([.AN$24]+[.BB62]) +[.AO$28]*[.$Z$5]*MAGNET([.AO$24]+[.BB62]) +[.AP$28]*[.$Z$5]*MAGNET([.AP$24]+[.$BB62])&#10;+[.AQ$28]*[.$Z$5]*MAGNET([.AQ$24]+[.$BB62])&#10;+[.AR$28]*[.$Z$5]*MAGNET([.AR$24]+[.$BB62])&#10;+[.AS$28]*[.$Z$5]*MAGNET([.AS$24]+[.$BB62])&#10;+[.AT$28]*[.$Z$5]*MAGNET([.AT$24]+[.$BB62])&#10;+[.AU$28]*[.$Z$5]*MAGNET([.AU$24]+[.$BB62])&#10;+[.AV$28]*[.$Z$5]*MAGNET([.AV$24]+[.$BB62])&#10;+[.AW$28]*[.$Z$5]*MAGNET([.AW$24]+[.$BB62])&#10;+[.AX$28]*[.$Z$5]*MAGNET([.AX$24]+[.$BB62])&#10;+[.AY$28]*[.$Z$5]*MAGNET([.AY$24]+[.$BB62]) +RAND()*[.$BF$13]" office:value-type="float" office:value="14.4724233885424" calcext:value-type="float">
            <text:p>14.4724233885424</text:p>
          </table:table-cell>
          <table:table-cell table:style-name="ce71" table:formula="of:=[.E$29]*[.$Z$5]*MAGNET([.E$24]+[.$BB62])+[.F$29]*[.$Z$5]*MAGNET([.F$24]+[.$BB62])+[.G$29]*[.$Z$5]*MAGNET([.G$24]+[.$BB62])+[.H$29]*[.$Z$5]*MAGNET([.H$24]+[.$BB62])+[.I$29]*[.$Z$5]*MAGNET([.I$24]+[.$BB62])+[.J$29]*[.$Z$5]*MAGNET([.J$24]+[.$BB62])+[.K$29]*[.$Z$5]*MAGNET([.K$24]+[.$BB62])+[.L$29]*[.$Z$5]*MAGNET([.L$24]+[.$BB62])+[.M$29]*[.$Z$5]*MAGNET([.M$24]+[.$BB62])+[.N$29]*[.$Z$5]*MAGNET([.N$24]+[.$BB62])+[.O$29]*[.$Z$5]*MAGNET([.O$24]+[.$BB62])+[.P$29]*[.$Z$5]*MAGNET([.P$24]+[.$BB62])+[.Q$29]*[.$Z$5]*MAGNET([.Q$24]+[.$BB62])+[.R$29]*[.$Z$5]*MAGNET([.R$24]+[.$BB62])+[.S$29]*[.$Z$5]*MAGNET([.S$24]+[.$BB62])+[.T$29]*[.$Z$5]*MAGNET([.T$24]+[.$BB62])+[.U$29]*[.$Z$5]*MAGNET([.U$24]+[.$BB62])+[.V$29]*[.$Z$5]*MAGNET([.V$24]+[.$BB62])+[.W$29]*[.$Z$5]*MAGNET([.W$24]+[.$BB62])+[.X$29]*[.$Z$5]*MAGNET([.X$24]+[.$BB62])+[.Y$29]*[.$Z$5]*MAGNET([.Y$24]+[.$BB62])+[.Z$29]*[.$Z$5]*MAGNET([.Z$24]+[.$BB62])+[.AA$29]*[.$Z$5]*MAGNET([.AA$24]+[.$BB62])+[.AB$29]*[.$Z$5]*MAGNET([.AB$24]+[.$BB62])+[.AC$29]*[.$Z$5]*MAGNET([.AC$24]+[.$BB62])+[.AD$29]*[.$Z$5]*MAGNET([.AD$24]+[.$BB62])+[.AE$29]*[.$Z$5]*MAGNET([.AE$24]+[.$BB62])+[.AF$29]*[.$Z$5]*MAGNET([.AF$24]+[.$BB62])+[.AG$29]*[.$Z$5]*MAGNET([.AG$24]+[.$BB62])+[.D$29]*[.$Z$5]*MAGNET([.D$24]+[.$BB62])+[.AH$29]*[.$Z$5]*MAGNET([.AH$24]+[.BB62]) +[.AI$29]*[.$Z$5]*MAGNET([.AI$24]+[.BB62]) +[.AJ$29]*[.$Z$5]*MAGNET([.AJ$24]+[.BB62]) +[.AK$29]*[.$Z$5]*MAGNET([.AK$24]+[.BB62]) +[.AL$29]*[.$Z$5]*MAGNET([.AL$24]+[.BB62]) +[.AM$29]*[.$Z$5]*MAGNET([.AM$24]+[.BB62]) +[.AN$29]*[.$Z$5]*MAGNET([.AN$24]+[.BB62]) +[.AO$29]*[.$Z$5]*MAGNET([.AO$24]+[.BB62]) +[.AP$29]*[.$Z$5]*MAGNET([.AP$24]+[.$BB62])&#10;+[.AQ$29]*[.$Z$5]*MAGNET([.AQ$24]+[.$BB62])&#10;+[.AR$29]*[.$Z$5]*MAGNET([.AR$24]+[.$BB62])&#10;+[.AS$29]*[.$Z$5]*MAGNET([.AS$24]+[.$BB62])&#10;+[.AT$29]*[.$Z$5]*MAGNET([.AT$24]+[.$BB62])&#10;+[.AU$29]*[.$Z$5]*MAGNET([.AU$24]+[.$BB62])&#10;+[.AV$29]*[.$Z$5]*MAGNET([.AV$24]+[.$BB62])&#10;+[.AW$29]*[.$Z$5]*MAGNET([.AW$24]+[.$BB62])&#10;+[.AX$29]*[.$Z$5]*MAGNET([.AX$24]+[.$BB62])&#10;+[.AY$29]*[.$Z$5]*MAGNET([.AY$24]+[.$BB62]) +RAND()*[.$BG$13]" office:value-type="float" office:value="-39.4363289355569" calcext:value-type="float">
            <text:p>-39.4363289355569</text:p>
          </table:table-cell>
          <table:table-cell table:style-name="ce71" table:formula="of:=[.E$30]*[.$Z$5]*MAGNET([.E$24]+[.$BB62])+[.F$30]*[.$Z$5]*MAGNET([.F$24]+[.$BB62])+[.G$30]*[.$Z$5]*MAGNET([.G$24]+[.$BB62])+[.H$30]*[.$Z$5]*MAGNET([.H$24]+[.$BB62])+[.I$30]*[.$Z$5]*MAGNET([.I$24]+[.$BB62])+[.J$30]*[.$Z$5]*MAGNET([.J$24]+[.$BB62])+[.K$30]*[.$Z$5]*MAGNET([.K$24]+[.$BB62])+[.L$30]*[.$Z$5]*MAGNET([.L$24]+[.$BB62])+[.M$30]*[.$Z$5]*MAGNET([.M$24]+[.$BB62])+[.N$30]*[.$Z$5]*MAGNET([.N$24]+[.$BB62])+[.O$30]*[.$Z$5]*MAGNET([.O$24]+[.$BB62])+[.P$30]*[.$Z$5]*MAGNET([.P$24]+[.$BB62])+[.Q$30]*[.$Z$5]*MAGNET([.Q$24]+[.$BB62])+[.R$30]*[.$Z$5]*MAGNET([.R$24]+[.$BB62])+[.S$30]*[.$Z$5]*MAGNET([.S$24]+[.$BB62])+[.T$30]*[.$Z$5]*MAGNET([.T$24]+[.$BB62])+[.U$30]*[.$Z$5]*MAGNET([.U$24]+[.$BB62])+[.V$30]*[.$Z$5]*MAGNET([.V$24]+[.$BB62])+[.W$30]*[.$Z$5]*MAGNET([.W$24]+[.$BB62])+[.X$30]*[.$Z$5]*MAGNET([.X$24]+[.$BB62])+[.Y$30]*[.$Z$5]*MAGNET([.Y$24]+[.$BB62])+[.Z$30]*[.$Z$5]*MAGNET([.Z$24]+[.$BB62])+[.AA$30]*[.$Z$5]*MAGNET([.AA$24]+[.$BB62])+[.AB$30]*[.$Z$5]*MAGNET([.AB$24]+[.$BB62])+[.AC$30]*[.$Z$5]*MAGNET([.AC$24]+[.$BB62])+[.AD$30]*[.$Z$5]*MAGNET([.AD$24]+[.$BB62])+[.AE$30]*[.$Z$5]*MAGNET([.AE$24]+[.$BB62])+[.AF$30]*[.$Z$5]*MAGNET([.AF$24]+[.$BB62])+[.AG$30]*[.$Z$5]*MAGNET([.AG$24]+[.$BB62])+[.D$30]*[.$Z$5]*MAGNET([.D$24]+[.$BB62])+[.AH$30]*[.$Z$5]*MAGNET([.AH$24]+[.BB62]) +[.AI$30]*[.$Z$5]*MAGNET([.AI$24]+[.BB62]) +[.AJ$30]*[.$Z$5]*MAGNET([.AJ$24]+[.BB62]) +[.AK$30]*[.$Z$5]*MAGNET([.AK$24]+[.BB62]) +[.AL$30]*[.$Z$5]*MAGNET([.AL$24]+[.BB62]) +[.AM$30]*[.$Z$5]*MAGNET([.AM$24]+[.BB62]) +[.AN$30]*[.$Z$5]*MAGNET([.AN$24]+[.BB62]) +[.AO$30]*[.$Z$5]*MAGNET([.AO$24]+[.BB62]) +[.AP$30]*[.$Z$5]*MAGNET([.AP$24]+[.$BB62])&#10;+[.AQ$30]*[.$Z$5]*MAGNET([.AQ$24]+[.$BB62])&#10;+[.AR$30]*[.$Z$5]*MAGNET([.AR$24]+[.$BB62])&#10;+[.AS$30]*[.$Z$5]*MAGNET([.AS$24]+[.$BB62])&#10;+[.AT$30]*[.$Z$5]*MAGNET([.AT$24]+[.$BB62])&#10;+[.AU$30]*[.$Z$5]*MAGNET([.AU$24]+[.$BB62])&#10;+[.AV$30]*[.$Z$5]*MAGNET([.AV$24]+[.$BB62])&#10;+[.AW$30]*[.$Z$5]*MAGNET([.AW$24]+[.$BB62])&#10;+[.AX$30]*[.$Z$5]*MAGNET([.AX$24]+[.$BB62])&#10;+[.AY$30]*[.$Z$5]*MAGNET([.AY$24]+[.$BB62]) +RAND()*[.$BH$13]" office:value-type="float" office:value="0" calcext:value-type="float">
            <text:p>0</text:p>
          </table:table-cell>
          <table:table-cell table:style-name="ce71" table:formula="of:=[.E$31]*[.$Z$5]*MAGNET([.E$24]+[.$BB62])+[.F$31]*[.$Z$5]*MAGNET([.F$24]+[.$BB62])+[.G$31]*[.$Z$5]*MAGNET([.G$24]+[.$BB62])+[.H$31]*[.$Z$5]*MAGNET([.H$24]+[.$BB62])+[.I$31]*[.$Z$5]*MAGNET([.I$24]+[.$BB62])+[.J$31]*[.$Z$5]*MAGNET([.J$24]+[.$BB62])+[.K$31]*[.$Z$5]*MAGNET([.K$24]+[.$BB62])+[.L$31]*[.$Z$5]*MAGNET([.L$24]+[.$BB62])+[.M$31]*[.$Z$5]*MAGNET([.M$24]+[.$BB62])+[.N$31]*[.$Z$5]*MAGNET([.N$24]+[.$BB62])+[.O$31]*[.$Z$5]*MAGNET([.O$24]+[.$BB62])+[.P$31]*[.$Z$5]*MAGNET([.P$24]+[.$BB62])+[.Q$31]*[.$Z$5]*MAGNET([.Q$24]+[.$BB62])+[.R$31]*[.$Z$5]*MAGNET([.R$24]+[.$BB62])+[.S$31]*[.$Z$5]*MAGNET([.S$24]+[.$BB62])+[.T$31]*[.$Z$5]*MAGNET([.T$24]+[.$BB62])+[.U$31]*[.$Z$5]*MAGNET([.U$24]+[.$BB62])+[.V$31]*[.$Z$5]*MAGNET([.V$24]+[.$BB62])+[.W$31]*[.$Z$5]*MAGNET([.W$24]+[.$BB62])+[.X$31]*[.$Z$5]*MAGNET([.X$24]+[.$BB62])+[.Y$31]*[.$Z$5]*MAGNET([.Y$24]+[.$BB62])+[.Z$31]*[.$Z$5]*MAGNET([.Z$24]+[.$BB62])+[.AA$31]*[.$Z$5]*MAGNET([.AA$24]+[.$BB62])+[.AB$31]*[.$Z$5]*MAGNET([.AB$24]+[.$BB62])+[.AC$31]*[.$Z$5]*MAGNET([.AC$24]+[.$BB62])+[.AD$31]*[.$Z$5]*MAGNET([.AD$24]+[.$BB62])+[.AE$31]*[.$Z$5]*MAGNET([.AE$24]+[.$BB62])+[.AF$31]*[.$Z$5]*MAGNET([.AF$24]+[.$BB62])+[.AG$31]*[.$Z$5]*MAGNET([.AG$24]+[.$BB62])+[.D$31]*[.$Z$5]*MAGNET([.D$24]+[.$BB62])+[.AH$31]*[.$Z$5]*MAGNET([.AH$24]+[.BB62]) +[.AI$31]*[.$Z$5]*MAGNET([.AI$24]+[.BB62]) +[.AJ$31]*[.$Z$5]*MAGNET([.AJ$24]+[.BB62]) +[.AK$31]*[.$Z$5]*MAGNET([.AK$24]+[.BB62]) +[.AL$31]*[.$Z$5]*MAGNET([.AL$24]+[.BB62]) +[.AM$31]*[.$Z$5]*MAGNET([.AM$24]+[.BB62]) +[.AN$31]*[.$Z$5]*MAGNET([.AN$24]+[.BB62]) +[.AO$31]*[.$Z$5]*MAGNET([.AO$24]+[.BB62]) +[.AP$31]*[.$Z$5]*MAGNET([.AP$24]+[.$BB62])&#10;+[.AQ$31]*[.$Z$5]*MAGNET([.AQ$24]+[.$BB62])&#10;+[.AR$31]*[.$Z$5]*MAGNET([.AR$24]+[.$BB62])&#10;+[.AS$31]*[.$Z$5]*MAGNET([.AS$24]+[.$BB62])&#10;+[.AT$31]*[.$Z$5]*MAGNET([.AT$24]+[.$BB62])&#10;+[.AU$31]*[.$Z$5]*MAGNET([.AU$24]+[.$BB62])&#10;+[.AV$31]*[.$Z$5]*MAGNET([.AV$24]+[.$BB62])&#10;+[.AW$31]*[.$Z$5]*MAGNET([.AW$24]+[.$BB62])&#10;+[.AX$31]*[.$Z$5]*MAGNET([.AX$24]+[.$BB62])&#10;+[.AY$31]*[.$Z$5]*MAGNET([.AY$24]+[.$BB62]) +RAND()*[.$BI$13]" office:value-type="float" office:value="0" calcext:value-type="float">
            <text:p>0</text:p>
          </table:table-cell>
          <table:table-cell table:style-name="ce71" table:formula="of:=[.E$32]*[.$Z$5]*MAGNET([.E$24]+[.$BB62])+[.F$32]*[.$Z$5]*MAGNET([.F$24]+[.$BB62])+[.G$32]*[.$Z$5]*MAGNET([.G$24]+[.$BB62])+[.H$32]*[.$Z$5]*MAGNET([.H$24]+[.$BB62])+[.I$32]*[.$Z$5]*MAGNET([.I$24]+[.$BB62])+[.J$32]*[.$Z$5]*MAGNET([.J$24]+[.$BB62])+[.K$32]*[.$Z$5]*MAGNET([.K$24]+[.$BB62])+[.L$32]*[.$Z$5]*MAGNET([.L$24]+[.$BB62])+[.M$32]*[.$Z$5]*MAGNET([.M$24]+[.$BB62])+[.N$32]*[.$Z$5]*MAGNET([.N$24]+[.$BB62])+[.O$32]*[.$Z$5]*MAGNET([.O$24]+[.$BB62])+[.P$32]*[.$Z$5]*MAGNET([.P$24]+[.$BB62])+[.Q$32]*[.$Z$5]*MAGNET([.Q$24]+[.$BB62])+[.R$32]*[.$Z$5]*MAGNET([.R$24]+[.$BB62])+[.S$32]*[.$Z$5]*MAGNET([.S$24]+[.$BB62])+[.T$32]*[.$Z$5]*MAGNET([.T$24]+[.$BB62])+[.U$32]*[.$Z$5]*MAGNET([.U$24]+[.$BB62])+[.V$32]*[.$Z$5]*MAGNET([.V$24]+[.$BB62])+[.W$32]*[.$Z$5]*MAGNET([.W$24]+[.$BB62])+[.X$32]*[.$Z$5]*MAGNET([.X$24]+[.$BB62])+[.Y$32]*[.$Z$5]*MAGNET([.Y$24]+[.$BB62])+[.Z$32]*[.$Z$5]*MAGNET([.Z$24]+[.$BB62])+[.AA$32]*[.$Z$5]*MAGNET([.AA$24]+[.$BB62])+[.AB$32]*[.$Z$5]*MAGNET([.AB$24]+[.$BB62])+[.AC$32]*[.$Z$5]*MAGNET([.AC$24]+[.$BB62])+[.AD$32]*[.$Z$5]*MAGNET([.AD$24]+[.$BB62])+[.AE$32]*[.$Z$5]*MAGNET([.AE$24]+[.$BB62])+[.AF$32]*[.$Z$5]*MAGNET([.AF$24]+[.$BB62])+[.AG$32]*[.$Z$5]*MAGNET([.AG$24]+[.$BB62])+[.D$32]*[.$Z$5]*MAGNET([.D$24]+[.$BB62])+[.AH$32]*[.$Z$5]*MAGNET([.AH$24]+[.BB62]) +[.AI$32]*[.$Z$5]*MAGNET([.AI$24]+[.BB62]) +[.AJ$32]*[.$Z$5]*MAGNET([.AJ$24]+[.BB62]) +[.AK$32]*[.$Z$5]*MAGNET([.AK$24]+[.BB62]) +[.AL$32]*[.$Z$5]*MAGNET([.AL$24]+[.BB62]) +[.AM$32]*[.$Z$5]*MAGNET([.AM$24]+[.BB62]) +[.AN$32]*[.$Z$5]*MAGNET([.AN$24]+[.BB62]) +[.AO$32]*[.$Z$5]*MAGNET([.AO$24]+[.BB62]) +[.AP$32]*[.$Z$5]*MAGNET([.AP$24]+[.$BB62])&#10;+[.AQ$32]*[.$Z$5]*MAGNET([.AQ$24]+[.$BB62])&#10;+[.AR$32]*[.$Z$5]*MAGNET([.AR$24]+[.$BB62])&#10;+[.AS$32]*[.$Z$5]*MAGNET([.AS$24]+[.$BB62])&#10;+[.AT$32]*[.$Z$5]*MAGNET([.AT$24]+[.$BB62])&#10;+[.AU$32]*[.$Z$5]*MAGNET([.AU$24]+[.$BB62])&#10;+[.AV$32]*[.$Z$5]*MAGNET([.AV$24]+[.$BB62])&#10;+[.AW$32]*[.$Z$5]*MAGNET([.AW$24]+[.$BB62])&#10;+[.AX$32]*[.$Z$5]*MAGNET([.AX$24]+[.$BB62])&#10;+[.AY$32]*[.$Z$5]*MAGNET([.AY$24]+[.$BB6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2]+0.002" office:value-type="float" office:value="0.0960000000000001" calcext:value-type="float">
            <text:p>0.0960000000000001</text:p>
          </table:table-cell>
          <table:table-cell table:formula="of:=[.BA63]*[.$D$6]" office:value-type="float" office:value="4.82548631591393" calcext:value-type="float">
            <text:p>4.825</text:p>
          </table:table-cell>
          <table:table-cell table:formula="of:=[.D$25]*[.$Z$5]*MAGNET([.D$24]+[.BB63])+[.E$25]*[.$Z$5]*MAGNET([.E$24]+[.BB63])+[.F$25]*[.$Z$5]*MAGNET([.F$24]+[.BB63])+[.G$25]*[.$Z$5]*MAGNET([.G$24]+[.BB63])+[.H$25]*[.$Z$5]*MAGNET([.H$24]+[.BB63])+[.I$25]*[.$Z$5]*MAGNET([.I$24]+[.BB63])+[.J$25]*[.$Z$5]*MAGNET([.J$24]+[.BB63])+[.K$25]*[.$Z$5]*MAGNET([.K$24]+[.BB63])+[.L$25]*[.$Z$5]*MAGNET([.L$24]+[.BB63])+[.M$25]*[.$Z$5]*MAGNET([.M$24]+[.BB63])+[.N$25]*[.$Z$5]*MAGNET([.N$24]+[.BB63])+[.O$25]*[.$Z$5]*MAGNET([.O$24]+[.BB63])+[.P$25]*[.$Z$5]*MAGNET([.P$24]+[.BB63])+[.Q$25]*[.$Z$5]*MAGNET([.Q$24]+[.BB63])+[.R$25]*[.$Z$5]*MAGNET([.R$24]+[.BB63])+[.S$25]*[.$Z$5]*MAGNET([.S$24]+[.BB63])+[.T$25]*[.$Z$5]*MAGNET([.T$24]+[.BB63])+[.U$25]*[.$Z$5]*MAGNET([.U$24]+[.BB63])+[.V$25]*[.$Z$5]*MAGNET([.V$24]+[.BB63])+[.W$25]*[.$Z$5]*MAGNET([.W$24]+[.BB63])+[.X$25]*[.$Z$5]*MAGNET([.X$24]+[.BB63])+[.Y$25]*[.$Z$5]*MAGNET([.Y$24]+[.BB63])+[.Z$25]*[.$Z$5]*MAGNET([.Z$24]+[.BB63])+[.AA$25]*[.$Z$5]*MAGNET([.AA$24]+[.BB63])+[.AB$25]*[.$Z$5]*MAGNET([.AB$24]+[.BB63])+[.AC$25]*[.$Z$5]*MAGNET([.AC$24]+[.BB63])+[.AD$25]*[.$Z$5]*MAGNET([.AD$24]+[.BB63])+[.AE$25]*[.$Z$5]*MAGNET([.AE$24]+[.BB63])+[.AF$25]*[.$Z$5]*MAGNET([.AF$24]+[.BB63])+[.AG$25]*[.$Z$5]*MAGNET([.AG$24]+[.BB63])+[.AH$25]*[.$Z$5]*MAGNET([.AH$24]+[.BB63]) +[.AI$25]*[.$Z$5]*MAGNET([.AI$24]+[.BB63]) +[.AJ$25]*[.$Z$5]*MAGNET([.AJ$24]+[.BB63]) +[.AK$25]*[.$Z$5]*MAGNET([.AK$24]+[.BB63]) +[.AL$25]*[.$Z$5]*MAGNET([.AL$24]+[.BB63]) +[.AM$25]*[.$Z$5]*MAGNET([.AM$24]+[.BB63]) +[.AN$25]*[.$Z$5]*MAGNET([.AN$24]+[.BB63]) +[.AO$25]*[.$Z$5]*MAGNET([.AO$24]+[.BB63])+RAND()*[.$BC$13]+[.AP$25]*[.$Z$5]*MAGNET([.AP$24]+[.BB63])&#10;+[.AQ$25]*[.$Z$5]*MAGNET([.AQ$24]+[.BB63])&#10;+[.AR$25]*[.$Z$5]*MAGNET([.AR$24]+[.BB63])&#10;+[.AS$25]*[.$Z$5]*MAGNET([.AS$24]+[.BB63])&#10;+[.AT$25]*[.$Z$5]*MAGNET([.AT$24]+[.BB63])&#10;+[.AU$25]*[.$Z$5]*MAGNET([.AU$24]+[.BB63])&#10;+[.AV$25]*[.$Z$5]*MAGNET([.AV$24]+[.BB63])&#10;+[.AW$25]*[.$Z$5]*MAGNET([.AW$24]+[.BB63])&#10;+[.AX$25]*[.$Z$5]*MAGNET([.AX$24]+[.BB63])&#10;+[.AY$25]*[.$Z$5]*MAGNET([.AY$24]+[.BB63])" office:value-type="float" office:value="-112.493781620895" calcext:value-type="float">
            <text:p>-112.49</text:p>
          </table:table-cell>
          <table:table-cell table:style-name="ce70" table:formula="of:=[.E$26]*[.$Z$5]*MAGNET([.E$24]+[.$BB63])+[.F$26]*[.$Z$5]*MAGNET([.F$24]+[.$BB63])+[.G$26]*[.$Z$5]*MAGNET([.G$24]+[.$BB63])+[.H$26]*[.$Z$5]*MAGNET([.H$24]+[.$BB63])+[.I$26]*[.$Z$5]*MAGNET([.I$24]+[.$BB63])+[.J$26]*[.$Z$5]*MAGNET([.J$24]+[.$BB63])+[.K$26]*[.$Z$5]*MAGNET([.K$24]+[.$BB63])+[.L$26]*[.$Z$5]*MAGNET([.L$24]+[.$BB63])+[.M$26]*[.$Z$5]*MAGNET([.M$24]+[.$BB63])+[.N$26]*[.$Z$5]*MAGNET([.N$24]+[.$BB63])+[.O$26]*[.$Z$5]*MAGNET([.O$24]+[.$BB63])+[.P$26]*[.$Z$5]*MAGNET([.P$24]+[.$BB63])+[.Q$26]*[.$Z$5]*MAGNET([.Q$24]+[.$BB63])+[.R$26]*[.$Z$5]*MAGNET([.R$24]+[.$BB63])+[.S$26]*[.$Z$5]*MAGNET([.S$24]+[.$BB63])+[.T$26]*[.$Z$5]*MAGNET([.T$24]+[.$BB63])+[.U$26]*[.$Z$5]*MAGNET([.U$24]+[.$BB63])+[.V$26]*[.$Z$5]*MAGNET([.V$24]+[.$BB63])+[.W$26]*[.$Z$5]*MAGNET([.W$24]+[.$BB63])+[.X$26]*[.$Z$5]*MAGNET([.X$24]+[.$BB63])+[.Y$26]*[.$Z$5]*MAGNET([.Y$24]+[.$BB63])+[.Z$26]*[.$Z$5]*MAGNET([.Z$24]+[.$BB63])+[.AA$26]*[.$Z$5]*MAGNET([.AA$24]+[.$BB63])+[.AB$26]*[.$Z$5]*MAGNET([.AB$24]+[.$BB63])+[.AC$26]*[.$Z$5]*MAGNET([.AC$24]+[.$BB63])+[.AD$26]*[.$Z$5]*MAGNET([.AD$24]+[.$BB63])+[.AE$26]*[.$Z$5]*MAGNET([.AE$24]+[.$BB63])+[.AF$26]*[.$Z$5]*MAGNET([.AF$24]+[.$BB63])+[.AG$26]*[.$Z$5]*MAGNET([.AG$24]+[.$BB63])+[.D$26]*[.$Z$5]*MAGNET([.D$24]+[.$BB63])+[.AH$26]*[.$Z$5]*MAGNET([.AH$24]+[.BB63]) +[.AI$26]*[.$Z$5]*MAGNET([.AI$24]+[.BB63]) +[.AJ$26]*[.$Z$5]*MAGNET([.AJ$24]+[.BB63]) +[.AK$26]*[.$Z$5]*MAGNET([.AK$24]+[.BB63]) +[.AL$26]*[.$Z$5]*MAGNET([.AL$24]+[.BB63]) +[.AM$26]*[.$Z$5]*MAGNET([.AM$24]+[.BB63]) +[.AN$26]*[.$Z$5]*MAGNET([.AN$24]+[.BB63]) +[.AO$26]*[.$Z$5]*MAGNET([.AO$24]+[.BB63]) +[.AP$26]*[.$Z$5]*MAGNET([.AP$24]+[.$BB63])&#10;+[.AQ$26]*[.$Z$5]*MAGNET([.AQ$24]+[.$BB63])&#10;+[.AR$26]*[.$Z$5]*MAGNET([.AR$24]+[.$BB63])&#10;+[.AS$26]*[.$Z$5]*MAGNET([.AS$24]+[.$BB63])&#10;+[.AT$26]*[.$Z$5]*MAGNET([.AT$24]+[.$BB63])&#10;+[.AU$26]*[.$Z$5]*MAGNET([.AU$24]+[.$BB63])&#10;+[.AV$26]*[.$Z$5]*MAGNET([.AV$24]+[.$BB63])&#10;+[.AW$26]*[.$Z$5]*MAGNET([.AW$24]+[.$BB63])&#10;+[.AX$26]*[.$Z$5]*MAGNET([.AX$24]+[.$BB63])&#10;+[.AY$26]*[.$Z$5]*MAGNET([.AY$24]+[.$BB63]) +RAND()*[.$BD$13]" office:value-type="float" office:value="35.3899990906995" calcext:value-type="float">
            <text:p>35.39</text:p>
          </table:table-cell>
          <table:table-cell table:style-name="ce71" table:formula="of:=[.E$27]*[.$Z$5]*MAGNET([.E$24]+[.$BB63])+[.F$27]*[.$Z$5]*MAGNET([.F$24]+[.$BB63])+[.G$27]*[.$Z$5]*MAGNET([.G$24]+[.$BB63])+[.H$27]*[.$Z$5]*MAGNET([.H$24]+[.$BB63])+[.I$27]*[.$Z$5]*MAGNET([.I$24]+[.$BB63])+[.J$27]*[.$Z$5]*MAGNET([.J$24]+[.$BB63])+[.K$27]*[.$Z$5]*MAGNET([.K$24]+[.$BB63])+[.L$27]*[.$Z$5]*MAGNET([.L$24]+[.$BB63])+[.M$27]*[.$Z$5]*MAGNET([.M$24]+[.$BB63])+[.N$27]*[.$Z$5]*MAGNET([.N$24]+[.$BB63])+[.O$27]*[.$Z$5]*MAGNET([.O$24]+[.$BB63])+[.P$27]*[.$Z$5]*MAGNET([.P$24]+[.$BB63])+[.Q$27]*[.$Z$5]*MAGNET([.Q$24]+[.$BB63])+[.R$27]*[.$Z$5]*MAGNET([.R$24]+[.$BB63])+[.S$27]*[.$Z$5]*MAGNET([.S$24]+[.$BB63])+[.T$27]*[.$Z$5]*MAGNET([.T$24]+[.$BB63])+[.U$27]*[.$Z$5]*MAGNET([.U$24]+[.$BB63])+[.V$27]*[.$Z$5]*MAGNET([.V$24]+[.$BB63])+[.W$27]*[.$Z$5]*MAGNET([.W$24]+[.$BB63])+[.X$27]*[.$Z$5]*MAGNET([.X$24]+[.$BB63])+[.Y$27]*[.$Z$5]*MAGNET([.Y$24]+[.$BB63])+[.Z$27]*[.$Z$5]*MAGNET([.Z$24]+[.$BB63])+[.AA$27]*[.$Z$5]*MAGNET([.AA$24]+[.$BB63])+[.AB$27]*[.$Z$5]*MAGNET([.AB$24]+[.$BB63])+[.AC$27]*[.$Z$5]*MAGNET([.AC$24]+[.$BB63])+[.AD$27]*[.$Z$5]*MAGNET([.AD$24]+[.$BB63])+[.AE$27]*[.$Z$5]*MAGNET([.AE$24]+[.$BB63])+[.AF$27]*[.$Z$5]*MAGNET([.AF$24]+[.$BB63])+[.AG$27]*[.$Z$5]*MAGNET([.AG$24]+[.$BB63])+[.D$27]*[.$Z$5]*MAGNET([.D$24]+[.$BB63])+[.AH$27]*[.$Z$5]*MAGNET([.AH$24]+[.BB63]) +[.AI$27]*[.$Z$5]*MAGNET([.AI$24]+[.BB63]) +[.AJ$27]*[.$Z$5]*MAGNET([.AJ$24]+[.BB63]) +[.AK$27]*[.$Z$5]*MAGNET([.AK$24]+[.BB63]) +[.AL$27]*[.$Z$5]*MAGNET([.AL$24]+[.BB63]) +[.AM$27]*[.$Z$5]*MAGNET([.AM$24]+[.BB63]) +[.AN$27]*[.$Z$5]*MAGNET([.AN$24]+[.BB63]) +[.AO$27]*[.$Z$5]*MAGNET([.AO$24]+[.BB63]) +[.AP$27]*[.$Z$5]*MAGNET([.AP$24]+[.$BB63])&#10;+[.AQ$27]*[.$Z$5]*MAGNET([.AQ$24]+[.$BB63])&#10;+[.AR$27]*[.$Z$5]*MAGNET([.AR$24]+[.$BB63])&#10;+[.AS$27]*[.$Z$5]*MAGNET([.AS$24]+[.$BB63])&#10;+[.AT$27]*[.$Z$5]*MAGNET([.AT$24]+[.$BB63])&#10;+[.AU$27]*[.$Z$5]*MAGNET([.AU$24]+[.$BB63])&#10;+[.AV$27]*[.$Z$5]*MAGNET([.AV$24]+[.$BB63])&#10;+[.AW$27]*[.$Z$5]*MAGNET([.AW$24]+[.$BB63])&#10;+[.AX$27]*[.$Z$5]*MAGNET([.AX$24]+[.$BB63])&#10;+[.AY$27]*[.$Z$5]*MAGNET([.AY$24]+[.$BB63]) +RAND()*[.$BE$13]" office:value-type="float" office:value="107.647893267513" calcext:value-type="float">
            <text:p>107.647893267513</text:p>
          </table:table-cell>
          <table:table-cell table:style-name="ce71" table:formula="of:=[.E$28]*[.$Z$5]*MAGNET([.E$24]+[.$BB63])+[.F$28]*[.$Z$5]*MAGNET([.F$24]+[.$BB63])+[.G$28]*[.$Z$5]*MAGNET([.G$24]+[.$BB63])+[.H$28]*[.$Z$5]*MAGNET([.H$24]+[.$BB63])+[.I$28]*[.$Z$5]*MAGNET([.I$24]+[.$BB63])+[.J$28]*[.$Z$5]*MAGNET([.J$24]+[.$BB63])+[.K$28]*[.$Z$5]*MAGNET([.K$24]+[.$BB63])+[.L$28]*[.$Z$5]*MAGNET([.L$24]+[.$BB63])+[.M$28]*[.$Z$5]*MAGNET([.M$24]+[.$BB63])+[.N$28]*[.$Z$5]*MAGNET([.N$24]+[.$BB63])+[.O$28]*[.$Z$5]*MAGNET([.O$24]+[.$BB63])+[.P$28]*[.$Z$5]*MAGNET([.P$24]+[.$BB63])+[.Q$28]*[.$Z$5]*MAGNET([.Q$24]+[.$BB63])+[.R$28]*[.$Z$5]*MAGNET([.R$24]+[.$BB63])+[.S$28]*[.$Z$5]*MAGNET([.S$24]+[.$BB63])+[.T$28]*[.$Z$5]*MAGNET([.T$24]+[.$BB63])+[.U$28]*[.$Z$5]*MAGNET([.U$24]+[.$BB63])+[.V$28]*[.$Z$5]*MAGNET([.V$24]+[.$BB63])+[.W$28]*[.$Z$5]*MAGNET([.W$24]+[.$BB63])+[.X$28]*[.$Z$5]*MAGNET([.X$24]+[.$BB63])+[.Y$28]*[.$Z$5]*MAGNET([.Y$24]+[.$BB63])+[.Z$28]*[.$Z$5]*MAGNET([.Z$24]+[.$BB63])+[.AA$28]*[.$Z$5]*MAGNET([.AA$24]+[.$BB63])+[.AB$28]*[.$Z$5]*MAGNET([.AB$24]+[.$BB63])+[.AC$28]*[.$Z$5]*MAGNET([.AC$24]+[.$BB63])+[.AD$28]*[.$Z$5]*MAGNET([.AD$24]+[.$BB63])+[.AE$28]*[.$Z$5]*MAGNET([.AE$24]+[.$BB63])+[.AF$28]*[.$Z$5]*MAGNET([.AF$24]+[.$BB63])+[.AG$28]*[.$Z$5]*MAGNET([.AG$24]+[.$BB63])+[.D$28]*[.$Z$5]*MAGNET([.D$24]+[.$BB63])+[.AH$28]*[.$Z$5]*MAGNET([.AH$24]+[.BB63]) +[.AI$28]*[.$Z$5]*MAGNET([.AI$24]+[.BB63]) +[.AJ$28]*[.$Z$5]*MAGNET([.AJ$24]+[.BB63]) +[.AK$28]*[.$Z$5]*MAGNET([.AK$24]+[.BB63]) +[.AL$28]*[.$Z$5]*MAGNET([.AL$24]+[.BB63]) +[.AM$28]*[.$Z$5]*MAGNET([.AM$24]+[.BB63]) +[.AN$28]*[.$Z$5]*MAGNET([.AN$24]+[.BB63]) +[.AO$28]*[.$Z$5]*MAGNET([.AO$24]+[.BB63]) +[.AP$28]*[.$Z$5]*MAGNET([.AP$24]+[.$BB63])&#10;+[.AQ$28]*[.$Z$5]*MAGNET([.AQ$24]+[.$BB63])&#10;+[.AR$28]*[.$Z$5]*MAGNET([.AR$24]+[.$BB63])&#10;+[.AS$28]*[.$Z$5]*MAGNET([.AS$24]+[.$BB63])&#10;+[.AT$28]*[.$Z$5]*MAGNET([.AT$24]+[.$BB63])&#10;+[.AU$28]*[.$Z$5]*MAGNET([.AU$24]+[.$BB63])&#10;+[.AV$28]*[.$Z$5]*MAGNET([.AV$24]+[.$BB63])&#10;+[.AW$28]*[.$Z$5]*MAGNET([.AW$24]+[.$BB63])&#10;+[.AX$28]*[.$Z$5]*MAGNET([.AX$24]+[.$BB63])&#10;+[.AY$28]*[.$Z$5]*MAGNET([.AY$24]+[.$BB63]) +RAND()*[.$BF$13]" office:value-type="float" office:value="13.1534340802963" calcext:value-type="float">
            <text:p>13.1534340802963</text:p>
          </table:table-cell>
          <table:table-cell table:style-name="ce71" table:formula="of:=[.E$29]*[.$Z$5]*MAGNET([.E$24]+[.$BB63])+[.F$29]*[.$Z$5]*MAGNET([.F$24]+[.$BB63])+[.G$29]*[.$Z$5]*MAGNET([.G$24]+[.$BB63])+[.H$29]*[.$Z$5]*MAGNET([.H$24]+[.$BB63])+[.I$29]*[.$Z$5]*MAGNET([.I$24]+[.$BB63])+[.J$29]*[.$Z$5]*MAGNET([.J$24]+[.$BB63])+[.K$29]*[.$Z$5]*MAGNET([.K$24]+[.$BB63])+[.L$29]*[.$Z$5]*MAGNET([.L$24]+[.$BB63])+[.M$29]*[.$Z$5]*MAGNET([.M$24]+[.$BB63])+[.N$29]*[.$Z$5]*MAGNET([.N$24]+[.$BB63])+[.O$29]*[.$Z$5]*MAGNET([.O$24]+[.$BB63])+[.P$29]*[.$Z$5]*MAGNET([.P$24]+[.$BB63])+[.Q$29]*[.$Z$5]*MAGNET([.Q$24]+[.$BB63])+[.R$29]*[.$Z$5]*MAGNET([.R$24]+[.$BB63])+[.S$29]*[.$Z$5]*MAGNET([.S$24]+[.$BB63])+[.T$29]*[.$Z$5]*MAGNET([.T$24]+[.$BB63])+[.U$29]*[.$Z$5]*MAGNET([.U$24]+[.$BB63])+[.V$29]*[.$Z$5]*MAGNET([.V$24]+[.$BB63])+[.W$29]*[.$Z$5]*MAGNET([.W$24]+[.$BB63])+[.X$29]*[.$Z$5]*MAGNET([.X$24]+[.$BB63])+[.Y$29]*[.$Z$5]*MAGNET([.Y$24]+[.$BB63])+[.Z$29]*[.$Z$5]*MAGNET([.Z$24]+[.$BB63])+[.AA$29]*[.$Z$5]*MAGNET([.AA$24]+[.$BB63])+[.AB$29]*[.$Z$5]*MAGNET([.AB$24]+[.$BB63])+[.AC$29]*[.$Z$5]*MAGNET([.AC$24]+[.$BB63])+[.AD$29]*[.$Z$5]*MAGNET([.AD$24]+[.$BB63])+[.AE$29]*[.$Z$5]*MAGNET([.AE$24]+[.$BB63])+[.AF$29]*[.$Z$5]*MAGNET([.AF$24]+[.$BB63])+[.AG$29]*[.$Z$5]*MAGNET([.AG$24]+[.$BB63])+[.D$29]*[.$Z$5]*MAGNET([.D$24]+[.$BB63])+[.AH$29]*[.$Z$5]*MAGNET([.AH$24]+[.BB63]) +[.AI$29]*[.$Z$5]*MAGNET([.AI$24]+[.BB63]) +[.AJ$29]*[.$Z$5]*MAGNET([.AJ$24]+[.BB63]) +[.AK$29]*[.$Z$5]*MAGNET([.AK$24]+[.BB63]) +[.AL$29]*[.$Z$5]*MAGNET([.AL$24]+[.BB63]) +[.AM$29]*[.$Z$5]*MAGNET([.AM$24]+[.BB63]) +[.AN$29]*[.$Z$5]*MAGNET([.AN$24]+[.BB63]) +[.AO$29]*[.$Z$5]*MAGNET([.AO$24]+[.BB63]) +[.AP$29]*[.$Z$5]*MAGNET([.AP$24]+[.$BB63])&#10;+[.AQ$29]*[.$Z$5]*MAGNET([.AQ$24]+[.$BB63])&#10;+[.AR$29]*[.$Z$5]*MAGNET([.AR$24]+[.$BB63])&#10;+[.AS$29]*[.$Z$5]*MAGNET([.AS$24]+[.$BB63])&#10;+[.AT$29]*[.$Z$5]*MAGNET([.AT$24]+[.$BB63])&#10;+[.AU$29]*[.$Z$5]*MAGNET([.AU$24]+[.$BB63])&#10;+[.AV$29]*[.$Z$5]*MAGNET([.AV$24]+[.$BB63])&#10;+[.AW$29]*[.$Z$5]*MAGNET([.AW$24]+[.$BB63])&#10;+[.AX$29]*[.$Z$5]*MAGNET([.AX$24]+[.$BB63])&#10;+[.AY$29]*[.$Z$5]*MAGNET([.AY$24]+[.$BB63]) +RAND()*[.$BG$13]" office:value-type="float" office:value="-36.9999332487918" calcext:value-type="float">
            <text:p>-36.9999332487918</text:p>
          </table:table-cell>
          <table:table-cell table:style-name="ce71" table:formula="of:=[.E$30]*[.$Z$5]*MAGNET([.E$24]+[.$BB63])+[.F$30]*[.$Z$5]*MAGNET([.F$24]+[.$BB63])+[.G$30]*[.$Z$5]*MAGNET([.G$24]+[.$BB63])+[.H$30]*[.$Z$5]*MAGNET([.H$24]+[.$BB63])+[.I$30]*[.$Z$5]*MAGNET([.I$24]+[.$BB63])+[.J$30]*[.$Z$5]*MAGNET([.J$24]+[.$BB63])+[.K$30]*[.$Z$5]*MAGNET([.K$24]+[.$BB63])+[.L$30]*[.$Z$5]*MAGNET([.L$24]+[.$BB63])+[.M$30]*[.$Z$5]*MAGNET([.M$24]+[.$BB63])+[.N$30]*[.$Z$5]*MAGNET([.N$24]+[.$BB63])+[.O$30]*[.$Z$5]*MAGNET([.O$24]+[.$BB63])+[.P$30]*[.$Z$5]*MAGNET([.P$24]+[.$BB63])+[.Q$30]*[.$Z$5]*MAGNET([.Q$24]+[.$BB63])+[.R$30]*[.$Z$5]*MAGNET([.R$24]+[.$BB63])+[.S$30]*[.$Z$5]*MAGNET([.S$24]+[.$BB63])+[.T$30]*[.$Z$5]*MAGNET([.T$24]+[.$BB63])+[.U$30]*[.$Z$5]*MAGNET([.U$24]+[.$BB63])+[.V$30]*[.$Z$5]*MAGNET([.V$24]+[.$BB63])+[.W$30]*[.$Z$5]*MAGNET([.W$24]+[.$BB63])+[.X$30]*[.$Z$5]*MAGNET([.X$24]+[.$BB63])+[.Y$30]*[.$Z$5]*MAGNET([.Y$24]+[.$BB63])+[.Z$30]*[.$Z$5]*MAGNET([.Z$24]+[.$BB63])+[.AA$30]*[.$Z$5]*MAGNET([.AA$24]+[.$BB63])+[.AB$30]*[.$Z$5]*MAGNET([.AB$24]+[.$BB63])+[.AC$30]*[.$Z$5]*MAGNET([.AC$24]+[.$BB63])+[.AD$30]*[.$Z$5]*MAGNET([.AD$24]+[.$BB63])+[.AE$30]*[.$Z$5]*MAGNET([.AE$24]+[.$BB63])+[.AF$30]*[.$Z$5]*MAGNET([.AF$24]+[.$BB63])+[.AG$30]*[.$Z$5]*MAGNET([.AG$24]+[.$BB63])+[.D$30]*[.$Z$5]*MAGNET([.D$24]+[.$BB63])+[.AH$30]*[.$Z$5]*MAGNET([.AH$24]+[.BB63]) +[.AI$30]*[.$Z$5]*MAGNET([.AI$24]+[.BB63]) +[.AJ$30]*[.$Z$5]*MAGNET([.AJ$24]+[.BB63]) +[.AK$30]*[.$Z$5]*MAGNET([.AK$24]+[.BB63]) +[.AL$30]*[.$Z$5]*MAGNET([.AL$24]+[.BB63]) +[.AM$30]*[.$Z$5]*MAGNET([.AM$24]+[.BB63]) +[.AN$30]*[.$Z$5]*MAGNET([.AN$24]+[.BB63]) +[.AO$30]*[.$Z$5]*MAGNET([.AO$24]+[.BB63]) +[.AP$30]*[.$Z$5]*MAGNET([.AP$24]+[.$BB63])&#10;+[.AQ$30]*[.$Z$5]*MAGNET([.AQ$24]+[.$BB63])&#10;+[.AR$30]*[.$Z$5]*MAGNET([.AR$24]+[.$BB63])&#10;+[.AS$30]*[.$Z$5]*MAGNET([.AS$24]+[.$BB63])&#10;+[.AT$30]*[.$Z$5]*MAGNET([.AT$24]+[.$BB63])&#10;+[.AU$30]*[.$Z$5]*MAGNET([.AU$24]+[.$BB63])&#10;+[.AV$30]*[.$Z$5]*MAGNET([.AV$24]+[.$BB63])&#10;+[.AW$30]*[.$Z$5]*MAGNET([.AW$24]+[.$BB63])&#10;+[.AX$30]*[.$Z$5]*MAGNET([.AX$24]+[.$BB63])&#10;+[.AY$30]*[.$Z$5]*MAGNET([.AY$24]+[.$BB63]) +RAND()*[.$BH$13]" office:value-type="float" office:value="0" calcext:value-type="float">
            <text:p>0</text:p>
          </table:table-cell>
          <table:table-cell table:style-name="ce71" table:formula="of:=[.E$31]*[.$Z$5]*MAGNET([.E$24]+[.$BB63])+[.F$31]*[.$Z$5]*MAGNET([.F$24]+[.$BB63])+[.G$31]*[.$Z$5]*MAGNET([.G$24]+[.$BB63])+[.H$31]*[.$Z$5]*MAGNET([.H$24]+[.$BB63])+[.I$31]*[.$Z$5]*MAGNET([.I$24]+[.$BB63])+[.J$31]*[.$Z$5]*MAGNET([.J$24]+[.$BB63])+[.K$31]*[.$Z$5]*MAGNET([.K$24]+[.$BB63])+[.L$31]*[.$Z$5]*MAGNET([.L$24]+[.$BB63])+[.M$31]*[.$Z$5]*MAGNET([.M$24]+[.$BB63])+[.N$31]*[.$Z$5]*MAGNET([.N$24]+[.$BB63])+[.O$31]*[.$Z$5]*MAGNET([.O$24]+[.$BB63])+[.P$31]*[.$Z$5]*MAGNET([.P$24]+[.$BB63])+[.Q$31]*[.$Z$5]*MAGNET([.Q$24]+[.$BB63])+[.R$31]*[.$Z$5]*MAGNET([.R$24]+[.$BB63])+[.S$31]*[.$Z$5]*MAGNET([.S$24]+[.$BB63])+[.T$31]*[.$Z$5]*MAGNET([.T$24]+[.$BB63])+[.U$31]*[.$Z$5]*MAGNET([.U$24]+[.$BB63])+[.V$31]*[.$Z$5]*MAGNET([.V$24]+[.$BB63])+[.W$31]*[.$Z$5]*MAGNET([.W$24]+[.$BB63])+[.X$31]*[.$Z$5]*MAGNET([.X$24]+[.$BB63])+[.Y$31]*[.$Z$5]*MAGNET([.Y$24]+[.$BB63])+[.Z$31]*[.$Z$5]*MAGNET([.Z$24]+[.$BB63])+[.AA$31]*[.$Z$5]*MAGNET([.AA$24]+[.$BB63])+[.AB$31]*[.$Z$5]*MAGNET([.AB$24]+[.$BB63])+[.AC$31]*[.$Z$5]*MAGNET([.AC$24]+[.$BB63])+[.AD$31]*[.$Z$5]*MAGNET([.AD$24]+[.$BB63])+[.AE$31]*[.$Z$5]*MAGNET([.AE$24]+[.$BB63])+[.AF$31]*[.$Z$5]*MAGNET([.AF$24]+[.$BB63])+[.AG$31]*[.$Z$5]*MAGNET([.AG$24]+[.$BB63])+[.D$31]*[.$Z$5]*MAGNET([.D$24]+[.$BB63])+[.AH$31]*[.$Z$5]*MAGNET([.AH$24]+[.BB63]) +[.AI$31]*[.$Z$5]*MAGNET([.AI$24]+[.BB63]) +[.AJ$31]*[.$Z$5]*MAGNET([.AJ$24]+[.BB63]) +[.AK$31]*[.$Z$5]*MAGNET([.AK$24]+[.BB63]) +[.AL$31]*[.$Z$5]*MAGNET([.AL$24]+[.BB63]) +[.AM$31]*[.$Z$5]*MAGNET([.AM$24]+[.BB63]) +[.AN$31]*[.$Z$5]*MAGNET([.AN$24]+[.BB63]) +[.AO$31]*[.$Z$5]*MAGNET([.AO$24]+[.BB63]) +[.AP$31]*[.$Z$5]*MAGNET([.AP$24]+[.$BB63])&#10;+[.AQ$31]*[.$Z$5]*MAGNET([.AQ$24]+[.$BB63])&#10;+[.AR$31]*[.$Z$5]*MAGNET([.AR$24]+[.$BB63])&#10;+[.AS$31]*[.$Z$5]*MAGNET([.AS$24]+[.$BB63])&#10;+[.AT$31]*[.$Z$5]*MAGNET([.AT$24]+[.$BB63])&#10;+[.AU$31]*[.$Z$5]*MAGNET([.AU$24]+[.$BB63])&#10;+[.AV$31]*[.$Z$5]*MAGNET([.AV$24]+[.$BB63])&#10;+[.AW$31]*[.$Z$5]*MAGNET([.AW$24]+[.$BB63])&#10;+[.AX$31]*[.$Z$5]*MAGNET([.AX$24]+[.$BB63])&#10;+[.AY$31]*[.$Z$5]*MAGNET([.AY$24]+[.$BB63]) +RAND()*[.$BI$13]" office:value-type="float" office:value="0" calcext:value-type="float">
            <text:p>0</text:p>
          </table:table-cell>
          <table:table-cell table:style-name="ce71" table:formula="of:=[.E$32]*[.$Z$5]*MAGNET([.E$24]+[.$BB63])+[.F$32]*[.$Z$5]*MAGNET([.F$24]+[.$BB63])+[.G$32]*[.$Z$5]*MAGNET([.G$24]+[.$BB63])+[.H$32]*[.$Z$5]*MAGNET([.H$24]+[.$BB63])+[.I$32]*[.$Z$5]*MAGNET([.I$24]+[.$BB63])+[.J$32]*[.$Z$5]*MAGNET([.J$24]+[.$BB63])+[.K$32]*[.$Z$5]*MAGNET([.K$24]+[.$BB63])+[.L$32]*[.$Z$5]*MAGNET([.L$24]+[.$BB63])+[.M$32]*[.$Z$5]*MAGNET([.M$24]+[.$BB63])+[.N$32]*[.$Z$5]*MAGNET([.N$24]+[.$BB63])+[.O$32]*[.$Z$5]*MAGNET([.O$24]+[.$BB63])+[.P$32]*[.$Z$5]*MAGNET([.P$24]+[.$BB63])+[.Q$32]*[.$Z$5]*MAGNET([.Q$24]+[.$BB63])+[.R$32]*[.$Z$5]*MAGNET([.R$24]+[.$BB63])+[.S$32]*[.$Z$5]*MAGNET([.S$24]+[.$BB63])+[.T$32]*[.$Z$5]*MAGNET([.T$24]+[.$BB63])+[.U$32]*[.$Z$5]*MAGNET([.U$24]+[.$BB63])+[.V$32]*[.$Z$5]*MAGNET([.V$24]+[.$BB63])+[.W$32]*[.$Z$5]*MAGNET([.W$24]+[.$BB63])+[.X$32]*[.$Z$5]*MAGNET([.X$24]+[.$BB63])+[.Y$32]*[.$Z$5]*MAGNET([.Y$24]+[.$BB63])+[.Z$32]*[.$Z$5]*MAGNET([.Z$24]+[.$BB63])+[.AA$32]*[.$Z$5]*MAGNET([.AA$24]+[.$BB63])+[.AB$32]*[.$Z$5]*MAGNET([.AB$24]+[.$BB63])+[.AC$32]*[.$Z$5]*MAGNET([.AC$24]+[.$BB63])+[.AD$32]*[.$Z$5]*MAGNET([.AD$24]+[.$BB63])+[.AE$32]*[.$Z$5]*MAGNET([.AE$24]+[.$BB63])+[.AF$32]*[.$Z$5]*MAGNET([.AF$24]+[.$BB63])+[.AG$32]*[.$Z$5]*MAGNET([.AG$24]+[.$BB63])+[.D$32]*[.$Z$5]*MAGNET([.D$24]+[.$BB63])+[.AH$32]*[.$Z$5]*MAGNET([.AH$24]+[.BB63]) +[.AI$32]*[.$Z$5]*MAGNET([.AI$24]+[.BB63]) +[.AJ$32]*[.$Z$5]*MAGNET([.AJ$24]+[.BB63]) +[.AK$32]*[.$Z$5]*MAGNET([.AK$24]+[.BB63]) +[.AL$32]*[.$Z$5]*MAGNET([.AL$24]+[.BB63]) +[.AM$32]*[.$Z$5]*MAGNET([.AM$24]+[.BB63]) +[.AN$32]*[.$Z$5]*MAGNET([.AN$24]+[.BB63]) +[.AO$32]*[.$Z$5]*MAGNET([.AO$24]+[.BB63]) +[.AP$32]*[.$Z$5]*MAGNET([.AP$24]+[.$BB63])&#10;+[.AQ$32]*[.$Z$5]*MAGNET([.AQ$24]+[.$BB63])&#10;+[.AR$32]*[.$Z$5]*MAGNET([.AR$24]+[.$BB63])&#10;+[.AS$32]*[.$Z$5]*MAGNET([.AS$24]+[.$BB63])&#10;+[.AT$32]*[.$Z$5]*MAGNET([.AT$24]+[.$BB63])&#10;+[.AU$32]*[.$Z$5]*MAGNET([.AU$24]+[.$BB63])&#10;+[.AV$32]*[.$Z$5]*MAGNET([.AV$24]+[.$BB63])&#10;+[.AW$32]*[.$Z$5]*MAGNET([.AW$24]+[.$BB63])&#10;+[.AX$32]*[.$Z$5]*MAGNET([.AX$24]+[.$BB63])&#10;+[.AY$32]*[.$Z$5]*MAGNET([.AY$24]+[.$BB6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3]+0.002" office:value-type="float" office:value="0.0980000000000001" calcext:value-type="float">
            <text:p>0.0980000000000001</text:p>
          </table:table-cell>
          <table:table-cell table:formula="of:=[.BA64]*[.$D$6]" office:value-type="float" office:value="4.9260172808288" calcext:value-type="float">
            <text:p>4.926</text:p>
          </table:table-cell>
          <table:table-cell table:formula="of:=[.D$25]*[.$Z$5]*MAGNET([.D$24]+[.BB64])+[.E$25]*[.$Z$5]*MAGNET([.E$24]+[.BB64])+[.F$25]*[.$Z$5]*MAGNET([.F$24]+[.BB64])+[.G$25]*[.$Z$5]*MAGNET([.G$24]+[.BB64])+[.H$25]*[.$Z$5]*MAGNET([.H$24]+[.BB64])+[.I$25]*[.$Z$5]*MAGNET([.I$24]+[.BB64])+[.J$25]*[.$Z$5]*MAGNET([.J$24]+[.BB64])+[.K$25]*[.$Z$5]*MAGNET([.K$24]+[.BB64])+[.L$25]*[.$Z$5]*MAGNET([.L$24]+[.BB64])+[.M$25]*[.$Z$5]*MAGNET([.M$24]+[.BB64])+[.N$25]*[.$Z$5]*MAGNET([.N$24]+[.BB64])+[.O$25]*[.$Z$5]*MAGNET([.O$24]+[.BB64])+[.P$25]*[.$Z$5]*MAGNET([.P$24]+[.BB64])+[.Q$25]*[.$Z$5]*MAGNET([.Q$24]+[.BB64])+[.R$25]*[.$Z$5]*MAGNET([.R$24]+[.BB64])+[.S$25]*[.$Z$5]*MAGNET([.S$24]+[.BB64])+[.T$25]*[.$Z$5]*MAGNET([.T$24]+[.BB64])+[.U$25]*[.$Z$5]*MAGNET([.U$24]+[.BB64])+[.V$25]*[.$Z$5]*MAGNET([.V$24]+[.BB64])+[.W$25]*[.$Z$5]*MAGNET([.W$24]+[.BB64])+[.X$25]*[.$Z$5]*MAGNET([.X$24]+[.BB64])+[.Y$25]*[.$Z$5]*MAGNET([.Y$24]+[.BB64])+[.Z$25]*[.$Z$5]*MAGNET([.Z$24]+[.BB64])+[.AA$25]*[.$Z$5]*MAGNET([.AA$24]+[.BB64])+[.AB$25]*[.$Z$5]*MAGNET([.AB$24]+[.BB64])+[.AC$25]*[.$Z$5]*MAGNET([.AC$24]+[.BB64])+[.AD$25]*[.$Z$5]*MAGNET([.AD$24]+[.BB64])+[.AE$25]*[.$Z$5]*MAGNET([.AE$24]+[.BB64])+[.AF$25]*[.$Z$5]*MAGNET([.AF$24]+[.BB64])+[.AG$25]*[.$Z$5]*MAGNET([.AG$24]+[.BB64])+[.AH$25]*[.$Z$5]*MAGNET([.AH$24]+[.BB64]) +[.AI$25]*[.$Z$5]*MAGNET([.AI$24]+[.BB64]) +[.AJ$25]*[.$Z$5]*MAGNET([.AJ$24]+[.BB64]) +[.AK$25]*[.$Z$5]*MAGNET([.AK$24]+[.BB64]) +[.AL$25]*[.$Z$5]*MAGNET([.AL$24]+[.BB64]) +[.AM$25]*[.$Z$5]*MAGNET([.AM$24]+[.BB64]) +[.AN$25]*[.$Z$5]*MAGNET([.AN$24]+[.BB64]) +[.AO$25]*[.$Z$5]*MAGNET([.AO$24]+[.BB64])+RAND()*[.$BC$13]+[.AP$25]*[.$Z$5]*MAGNET([.AP$24]+[.BB64])&#10;+[.AQ$25]*[.$Z$5]*MAGNET([.AQ$24]+[.BB64])&#10;+[.AR$25]*[.$Z$5]*MAGNET([.AR$24]+[.BB64])&#10;+[.AS$25]*[.$Z$5]*MAGNET([.AS$24]+[.BB64])&#10;+[.AT$25]*[.$Z$5]*MAGNET([.AT$24]+[.BB64])&#10;+[.AU$25]*[.$Z$5]*MAGNET([.AU$24]+[.BB64])&#10;+[.AV$25]*[.$Z$5]*MAGNET([.AV$24]+[.BB64])&#10;+[.AW$25]*[.$Z$5]*MAGNET([.AW$24]+[.BB64])&#10;+[.AX$25]*[.$Z$5]*MAGNET([.AX$24]+[.BB64])&#10;+[.AY$25]*[.$Z$5]*MAGNET([.AY$24]+[.BB64])" office:value-type="float" office:value="-114.712111374333" calcext:value-type="float">
            <text:p>-114.71</text:p>
          </table:table-cell>
          <table:table-cell table:style-name="ce70" table:formula="of:=[.E$26]*[.$Z$5]*MAGNET([.E$24]+[.$BB64])+[.F$26]*[.$Z$5]*MAGNET([.F$24]+[.$BB64])+[.G$26]*[.$Z$5]*MAGNET([.G$24]+[.$BB64])+[.H$26]*[.$Z$5]*MAGNET([.H$24]+[.$BB64])+[.I$26]*[.$Z$5]*MAGNET([.I$24]+[.$BB64])+[.J$26]*[.$Z$5]*MAGNET([.J$24]+[.$BB64])+[.K$26]*[.$Z$5]*MAGNET([.K$24]+[.$BB64])+[.L$26]*[.$Z$5]*MAGNET([.L$24]+[.$BB64])+[.M$26]*[.$Z$5]*MAGNET([.M$24]+[.$BB64])+[.N$26]*[.$Z$5]*MAGNET([.N$24]+[.$BB64])+[.O$26]*[.$Z$5]*MAGNET([.O$24]+[.$BB64])+[.P$26]*[.$Z$5]*MAGNET([.P$24]+[.$BB64])+[.Q$26]*[.$Z$5]*MAGNET([.Q$24]+[.$BB64])+[.R$26]*[.$Z$5]*MAGNET([.R$24]+[.$BB64])+[.S$26]*[.$Z$5]*MAGNET([.S$24]+[.$BB64])+[.T$26]*[.$Z$5]*MAGNET([.T$24]+[.$BB64])+[.U$26]*[.$Z$5]*MAGNET([.U$24]+[.$BB64])+[.V$26]*[.$Z$5]*MAGNET([.V$24]+[.$BB64])+[.W$26]*[.$Z$5]*MAGNET([.W$24]+[.$BB64])+[.X$26]*[.$Z$5]*MAGNET([.X$24]+[.$BB64])+[.Y$26]*[.$Z$5]*MAGNET([.Y$24]+[.$BB64])+[.Z$26]*[.$Z$5]*MAGNET([.Z$24]+[.$BB64])+[.AA$26]*[.$Z$5]*MAGNET([.AA$24]+[.$BB64])+[.AB$26]*[.$Z$5]*MAGNET([.AB$24]+[.$BB64])+[.AC$26]*[.$Z$5]*MAGNET([.AC$24]+[.$BB64])+[.AD$26]*[.$Z$5]*MAGNET([.AD$24]+[.$BB64])+[.AE$26]*[.$Z$5]*MAGNET([.AE$24]+[.$BB64])+[.AF$26]*[.$Z$5]*MAGNET([.AF$24]+[.$BB64])+[.AG$26]*[.$Z$5]*MAGNET([.AG$24]+[.$BB64])+[.D$26]*[.$Z$5]*MAGNET([.D$24]+[.$BB64])+[.AH$26]*[.$Z$5]*MAGNET([.AH$24]+[.BB64]) +[.AI$26]*[.$Z$5]*MAGNET([.AI$24]+[.BB64]) +[.AJ$26]*[.$Z$5]*MAGNET([.AJ$24]+[.BB64]) +[.AK$26]*[.$Z$5]*MAGNET([.AK$24]+[.BB64]) +[.AL$26]*[.$Z$5]*MAGNET([.AL$24]+[.BB64]) +[.AM$26]*[.$Z$5]*MAGNET([.AM$24]+[.BB64]) +[.AN$26]*[.$Z$5]*MAGNET([.AN$24]+[.BB64]) +[.AO$26]*[.$Z$5]*MAGNET([.AO$24]+[.BB64]) +[.AP$26]*[.$Z$5]*MAGNET([.AP$24]+[.$BB64])&#10;+[.AQ$26]*[.$Z$5]*MAGNET([.AQ$24]+[.$BB64])&#10;+[.AR$26]*[.$Z$5]*MAGNET([.AR$24]+[.$BB64])&#10;+[.AS$26]*[.$Z$5]*MAGNET([.AS$24]+[.$BB64])&#10;+[.AT$26]*[.$Z$5]*MAGNET([.AT$24]+[.$BB64])&#10;+[.AU$26]*[.$Z$5]*MAGNET([.AU$24]+[.$BB64])&#10;+[.AV$26]*[.$Z$5]*MAGNET([.AV$24]+[.$BB64])&#10;+[.AW$26]*[.$Z$5]*MAGNET([.AW$24]+[.$BB64])&#10;+[.AX$26]*[.$Z$5]*MAGNET([.AX$24]+[.$BB64])&#10;+[.AY$26]*[.$Z$5]*MAGNET([.AY$24]+[.$BB64]) +RAND()*[.$BD$13]" office:value-type="float" office:value="45.1811148420711" calcext:value-type="float">
            <text:p>45.18</text:p>
          </table:table-cell>
          <table:table-cell table:style-name="ce71" table:formula="of:=[.E$27]*[.$Z$5]*MAGNET([.E$24]+[.$BB64])+[.F$27]*[.$Z$5]*MAGNET([.F$24]+[.$BB64])+[.G$27]*[.$Z$5]*MAGNET([.G$24]+[.$BB64])+[.H$27]*[.$Z$5]*MAGNET([.H$24]+[.$BB64])+[.I$27]*[.$Z$5]*MAGNET([.I$24]+[.$BB64])+[.J$27]*[.$Z$5]*MAGNET([.J$24]+[.$BB64])+[.K$27]*[.$Z$5]*MAGNET([.K$24]+[.$BB64])+[.L$27]*[.$Z$5]*MAGNET([.L$24]+[.$BB64])+[.M$27]*[.$Z$5]*MAGNET([.M$24]+[.$BB64])+[.N$27]*[.$Z$5]*MAGNET([.N$24]+[.$BB64])+[.O$27]*[.$Z$5]*MAGNET([.O$24]+[.$BB64])+[.P$27]*[.$Z$5]*MAGNET([.P$24]+[.$BB64])+[.Q$27]*[.$Z$5]*MAGNET([.Q$24]+[.$BB64])+[.R$27]*[.$Z$5]*MAGNET([.R$24]+[.$BB64])+[.S$27]*[.$Z$5]*MAGNET([.S$24]+[.$BB64])+[.T$27]*[.$Z$5]*MAGNET([.T$24]+[.$BB64])+[.U$27]*[.$Z$5]*MAGNET([.U$24]+[.$BB64])+[.V$27]*[.$Z$5]*MAGNET([.V$24]+[.$BB64])+[.W$27]*[.$Z$5]*MAGNET([.W$24]+[.$BB64])+[.X$27]*[.$Z$5]*MAGNET([.X$24]+[.$BB64])+[.Y$27]*[.$Z$5]*MAGNET([.Y$24]+[.$BB64])+[.Z$27]*[.$Z$5]*MAGNET([.Z$24]+[.$BB64])+[.AA$27]*[.$Z$5]*MAGNET([.AA$24]+[.$BB64])+[.AB$27]*[.$Z$5]*MAGNET([.AB$24]+[.$BB64])+[.AC$27]*[.$Z$5]*MAGNET([.AC$24]+[.$BB64])+[.AD$27]*[.$Z$5]*MAGNET([.AD$24]+[.$BB64])+[.AE$27]*[.$Z$5]*MAGNET([.AE$24]+[.$BB64])+[.AF$27]*[.$Z$5]*MAGNET([.AF$24]+[.$BB64])+[.AG$27]*[.$Z$5]*MAGNET([.AG$24]+[.$BB64])+[.D$27]*[.$Z$5]*MAGNET([.D$24]+[.$BB64])+[.AH$27]*[.$Z$5]*MAGNET([.AH$24]+[.BB64]) +[.AI$27]*[.$Z$5]*MAGNET([.AI$24]+[.BB64]) +[.AJ$27]*[.$Z$5]*MAGNET([.AJ$24]+[.BB64]) +[.AK$27]*[.$Z$5]*MAGNET([.AK$24]+[.BB64]) +[.AL$27]*[.$Z$5]*MAGNET([.AL$24]+[.BB64]) +[.AM$27]*[.$Z$5]*MAGNET([.AM$24]+[.BB64]) +[.AN$27]*[.$Z$5]*MAGNET([.AN$24]+[.BB64]) +[.AO$27]*[.$Z$5]*MAGNET([.AO$24]+[.BB64]) +[.AP$27]*[.$Z$5]*MAGNET([.AP$24]+[.$BB64])&#10;+[.AQ$27]*[.$Z$5]*MAGNET([.AQ$24]+[.$BB64])&#10;+[.AR$27]*[.$Z$5]*MAGNET([.AR$24]+[.$BB64])&#10;+[.AS$27]*[.$Z$5]*MAGNET([.AS$24]+[.$BB64])&#10;+[.AT$27]*[.$Z$5]*MAGNET([.AT$24]+[.$BB64])&#10;+[.AU$27]*[.$Z$5]*MAGNET([.AU$24]+[.$BB64])&#10;+[.AV$27]*[.$Z$5]*MAGNET([.AV$24]+[.$BB64])&#10;+[.AW$27]*[.$Z$5]*MAGNET([.AW$24]+[.$BB64])&#10;+[.AX$27]*[.$Z$5]*MAGNET([.AX$24]+[.$BB64])&#10;+[.AY$27]*[.$Z$5]*MAGNET([.AY$24]+[.$BB64]) +RAND()*[.$BE$13]" office:value-type="float" office:value="103.559264460012" calcext:value-type="float">
            <text:p>103.559264460012</text:p>
          </table:table-cell>
          <table:table-cell table:style-name="ce71" table:formula="of:=[.E$28]*[.$Z$5]*MAGNET([.E$24]+[.$BB64])+[.F$28]*[.$Z$5]*MAGNET([.F$24]+[.$BB64])+[.G$28]*[.$Z$5]*MAGNET([.G$24]+[.$BB64])+[.H$28]*[.$Z$5]*MAGNET([.H$24]+[.$BB64])+[.I$28]*[.$Z$5]*MAGNET([.I$24]+[.$BB64])+[.J$28]*[.$Z$5]*MAGNET([.J$24]+[.$BB64])+[.K$28]*[.$Z$5]*MAGNET([.K$24]+[.$BB64])+[.L$28]*[.$Z$5]*MAGNET([.L$24]+[.$BB64])+[.M$28]*[.$Z$5]*MAGNET([.M$24]+[.$BB64])+[.N$28]*[.$Z$5]*MAGNET([.N$24]+[.$BB64])+[.O$28]*[.$Z$5]*MAGNET([.O$24]+[.$BB64])+[.P$28]*[.$Z$5]*MAGNET([.P$24]+[.$BB64])+[.Q$28]*[.$Z$5]*MAGNET([.Q$24]+[.$BB64])+[.R$28]*[.$Z$5]*MAGNET([.R$24]+[.$BB64])+[.S$28]*[.$Z$5]*MAGNET([.S$24]+[.$BB64])+[.T$28]*[.$Z$5]*MAGNET([.T$24]+[.$BB64])+[.U$28]*[.$Z$5]*MAGNET([.U$24]+[.$BB64])+[.V$28]*[.$Z$5]*MAGNET([.V$24]+[.$BB64])+[.W$28]*[.$Z$5]*MAGNET([.W$24]+[.$BB64])+[.X$28]*[.$Z$5]*MAGNET([.X$24]+[.$BB64])+[.Y$28]*[.$Z$5]*MAGNET([.Y$24]+[.$BB64])+[.Z$28]*[.$Z$5]*MAGNET([.Z$24]+[.$BB64])+[.AA$28]*[.$Z$5]*MAGNET([.AA$24]+[.$BB64])+[.AB$28]*[.$Z$5]*MAGNET([.AB$24]+[.$BB64])+[.AC$28]*[.$Z$5]*MAGNET([.AC$24]+[.$BB64])+[.AD$28]*[.$Z$5]*MAGNET([.AD$24]+[.$BB64])+[.AE$28]*[.$Z$5]*MAGNET([.AE$24]+[.$BB64])+[.AF$28]*[.$Z$5]*MAGNET([.AF$24]+[.$BB64])+[.AG$28]*[.$Z$5]*MAGNET([.AG$24]+[.$BB64])+[.D$28]*[.$Z$5]*MAGNET([.D$24]+[.$BB64])+[.AH$28]*[.$Z$5]*MAGNET([.AH$24]+[.BB64]) +[.AI$28]*[.$Z$5]*MAGNET([.AI$24]+[.BB64]) +[.AJ$28]*[.$Z$5]*MAGNET([.AJ$24]+[.BB64]) +[.AK$28]*[.$Z$5]*MAGNET([.AK$24]+[.BB64]) +[.AL$28]*[.$Z$5]*MAGNET([.AL$24]+[.BB64]) +[.AM$28]*[.$Z$5]*MAGNET([.AM$24]+[.BB64]) +[.AN$28]*[.$Z$5]*MAGNET([.AN$24]+[.BB64]) +[.AO$28]*[.$Z$5]*MAGNET([.AO$24]+[.BB64]) +[.AP$28]*[.$Z$5]*MAGNET([.AP$24]+[.$BB64])&#10;+[.AQ$28]*[.$Z$5]*MAGNET([.AQ$24]+[.$BB64])&#10;+[.AR$28]*[.$Z$5]*MAGNET([.AR$24]+[.$BB64])&#10;+[.AS$28]*[.$Z$5]*MAGNET([.AS$24]+[.$BB64])&#10;+[.AT$28]*[.$Z$5]*MAGNET([.AT$24]+[.$BB64])&#10;+[.AU$28]*[.$Z$5]*MAGNET([.AU$24]+[.$BB64])&#10;+[.AV$28]*[.$Z$5]*MAGNET([.AV$24]+[.$BB64])&#10;+[.AW$28]*[.$Z$5]*MAGNET([.AW$24]+[.$BB64])&#10;+[.AX$28]*[.$Z$5]*MAGNET([.AX$24]+[.$BB64])&#10;+[.AY$28]*[.$Z$5]*MAGNET([.AY$24]+[.$BB64]) +RAND()*[.$BF$13]" office:value-type="float" office:value="11.9172264041023" calcext:value-type="float">
            <text:p>11.9172264041023</text:p>
          </table:table-cell>
          <table:table-cell table:style-name="ce71" table:formula="of:=[.E$29]*[.$Z$5]*MAGNET([.E$24]+[.$BB64])+[.F$29]*[.$Z$5]*MAGNET([.F$24]+[.$BB64])+[.G$29]*[.$Z$5]*MAGNET([.G$24]+[.$BB64])+[.H$29]*[.$Z$5]*MAGNET([.H$24]+[.$BB64])+[.I$29]*[.$Z$5]*MAGNET([.I$24]+[.$BB64])+[.J$29]*[.$Z$5]*MAGNET([.J$24]+[.$BB64])+[.K$29]*[.$Z$5]*MAGNET([.K$24]+[.$BB64])+[.L$29]*[.$Z$5]*MAGNET([.L$24]+[.$BB64])+[.M$29]*[.$Z$5]*MAGNET([.M$24]+[.$BB64])+[.N$29]*[.$Z$5]*MAGNET([.N$24]+[.$BB64])+[.O$29]*[.$Z$5]*MAGNET([.O$24]+[.$BB64])+[.P$29]*[.$Z$5]*MAGNET([.P$24]+[.$BB64])+[.Q$29]*[.$Z$5]*MAGNET([.Q$24]+[.$BB64])+[.R$29]*[.$Z$5]*MAGNET([.R$24]+[.$BB64])+[.S$29]*[.$Z$5]*MAGNET([.S$24]+[.$BB64])+[.T$29]*[.$Z$5]*MAGNET([.T$24]+[.$BB64])+[.U$29]*[.$Z$5]*MAGNET([.U$24]+[.$BB64])+[.V$29]*[.$Z$5]*MAGNET([.V$24]+[.$BB64])+[.W$29]*[.$Z$5]*MAGNET([.W$24]+[.$BB64])+[.X$29]*[.$Z$5]*MAGNET([.X$24]+[.$BB64])+[.Y$29]*[.$Z$5]*MAGNET([.Y$24]+[.$BB64])+[.Z$29]*[.$Z$5]*MAGNET([.Z$24]+[.$BB64])+[.AA$29]*[.$Z$5]*MAGNET([.AA$24]+[.$BB64])+[.AB$29]*[.$Z$5]*MAGNET([.AB$24]+[.$BB64])+[.AC$29]*[.$Z$5]*MAGNET([.AC$24]+[.$BB64])+[.AD$29]*[.$Z$5]*MAGNET([.AD$24]+[.$BB64])+[.AE$29]*[.$Z$5]*MAGNET([.AE$24]+[.$BB64])+[.AF$29]*[.$Z$5]*MAGNET([.AF$24]+[.$BB64])+[.AG$29]*[.$Z$5]*MAGNET([.AG$24]+[.$BB64])+[.D$29]*[.$Z$5]*MAGNET([.D$24]+[.$BB64])+[.AH$29]*[.$Z$5]*MAGNET([.AH$24]+[.BB64]) +[.AI$29]*[.$Z$5]*MAGNET([.AI$24]+[.BB64]) +[.AJ$29]*[.$Z$5]*MAGNET([.AJ$24]+[.BB64]) +[.AK$29]*[.$Z$5]*MAGNET([.AK$24]+[.BB64]) +[.AL$29]*[.$Z$5]*MAGNET([.AL$24]+[.BB64]) +[.AM$29]*[.$Z$5]*MAGNET([.AM$24]+[.BB64]) +[.AN$29]*[.$Z$5]*MAGNET([.AN$24]+[.BB64]) +[.AO$29]*[.$Z$5]*MAGNET([.AO$24]+[.BB64]) +[.AP$29]*[.$Z$5]*MAGNET([.AP$24]+[.$BB64])&#10;+[.AQ$29]*[.$Z$5]*MAGNET([.AQ$24]+[.$BB64])&#10;+[.AR$29]*[.$Z$5]*MAGNET([.AR$24]+[.$BB64])&#10;+[.AS$29]*[.$Z$5]*MAGNET([.AS$24]+[.$BB64])&#10;+[.AT$29]*[.$Z$5]*MAGNET([.AT$24]+[.$BB64])&#10;+[.AU$29]*[.$Z$5]*MAGNET([.AU$24]+[.$BB64])&#10;+[.AV$29]*[.$Z$5]*MAGNET([.AV$24]+[.$BB64])&#10;+[.AW$29]*[.$Z$5]*MAGNET([.AW$24]+[.$BB64])&#10;+[.AX$29]*[.$Z$5]*MAGNET([.AX$24]+[.$BB64])&#10;+[.AY$29]*[.$Z$5]*MAGNET([.AY$24]+[.$BB64]) +RAND()*[.$BG$13]" office:value-type="float" office:value="-33.9732043646347" calcext:value-type="float">
            <text:p>-33.9732043646347</text:p>
          </table:table-cell>
          <table:table-cell table:style-name="ce71" table:formula="of:=[.E$30]*[.$Z$5]*MAGNET([.E$24]+[.$BB64])+[.F$30]*[.$Z$5]*MAGNET([.F$24]+[.$BB64])+[.G$30]*[.$Z$5]*MAGNET([.G$24]+[.$BB64])+[.H$30]*[.$Z$5]*MAGNET([.H$24]+[.$BB64])+[.I$30]*[.$Z$5]*MAGNET([.I$24]+[.$BB64])+[.J$30]*[.$Z$5]*MAGNET([.J$24]+[.$BB64])+[.K$30]*[.$Z$5]*MAGNET([.K$24]+[.$BB64])+[.L$30]*[.$Z$5]*MAGNET([.L$24]+[.$BB64])+[.M$30]*[.$Z$5]*MAGNET([.M$24]+[.$BB64])+[.N$30]*[.$Z$5]*MAGNET([.N$24]+[.$BB64])+[.O$30]*[.$Z$5]*MAGNET([.O$24]+[.$BB64])+[.P$30]*[.$Z$5]*MAGNET([.P$24]+[.$BB64])+[.Q$30]*[.$Z$5]*MAGNET([.Q$24]+[.$BB64])+[.R$30]*[.$Z$5]*MAGNET([.R$24]+[.$BB64])+[.S$30]*[.$Z$5]*MAGNET([.S$24]+[.$BB64])+[.T$30]*[.$Z$5]*MAGNET([.T$24]+[.$BB64])+[.U$30]*[.$Z$5]*MAGNET([.U$24]+[.$BB64])+[.V$30]*[.$Z$5]*MAGNET([.V$24]+[.$BB64])+[.W$30]*[.$Z$5]*MAGNET([.W$24]+[.$BB64])+[.X$30]*[.$Z$5]*MAGNET([.X$24]+[.$BB64])+[.Y$30]*[.$Z$5]*MAGNET([.Y$24]+[.$BB64])+[.Z$30]*[.$Z$5]*MAGNET([.Z$24]+[.$BB64])+[.AA$30]*[.$Z$5]*MAGNET([.AA$24]+[.$BB64])+[.AB$30]*[.$Z$5]*MAGNET([.AB$24]+[.$BB64])+[.AC$30]*[.$Z$5]*MAGNET([.AC$24]+[.$BB64])+[.AD$30]*[.$Z$5]*MAGNET([.AD$24]+[.$BB64])+[.AE$30]*[.$Z$5]*MAGNET([.AE$24]+[.$BB64])+[.AF$30]*[.$Z$5]*MAGNET([.AF$24]+[.$BB64])+[.AG$30]*[.$Z$5]*MAGNET([.AG$24]+[.$BB64])+[.D$30]*[.$Z$5]*MAGNET([.D$24]+[.$BB64])+[.AH$30]*[.$Z$5]*MAGNET([.AH$24]+[.BB64]) +[.AI$30]*[.$Z$5]*MAGNET([.AI$24]+[.BB64]) +[.AJ$30]*[.$Z$5]*MAGNET([.AJ$24]+[.BB64]) +[.AK$30]*[.$Z$5]*MAGNET([.AK$24]+[.BB64]) +[.AL$30]*[.$Z$5]*MAGNET([.AL$24]+[.BB64]) +[.AM$30]*[.$Z$5]*MAGNET([.AM$24]+[.BB64]) +[.AN$30]*[.$Z$5]*MAGNET([.AN$24]+[.BB64]) +[.AO$30]*[.$Z$5]*MAGNET([.AO$24]+[.BB64]) +[.AP$30]*[.$Z$5]*MAGNET([.AP$24]+[.$BB64])&#10;+[.AQ$30]*[.$Z$5]*MAGNET([.AQ$24]+[.$BB64])&#10;+[.AR$30]*[.$Z$5]*MAGNET([.AR$24]+[.$BB64])&#10;+[.AS$30]*[.$Z$5]*MAGNET([.AS$24]+[.$BB64])&#10;+[.AT$30]*[.$Z$5]*MAGNET([.AT$24]+[.$BB64])&#10;+[.AU$30]*[.$Z$5]*MAGNET([.AU$24]+[.$BB64])&#10;+[.AV$30]*[.$Z$5]*MAGNET([.AV$24]+[.$BB64])&#10;+[.AW$30]*[.$Z$5]*MAGNET([.AW$24]+[.$BB64])&#10;+[.AX$30]*[.$Z$5]*MAGNET([.AX$24]+[.$BB64])&#10;+[.AY$30]*[.$Z$5]*MAGNET([.AY$24]+[.$BB64]) +RAND()*[.$BH$13]" office:value-type="float" office:value="0" calcext:value-type="float">
            <text:p>0</text:p>
          </table:table-cell>
          <table:table-cell table:style-name="ce71" table:formula="of:=[.E$31]*[.$Z$5]*MAGNET([.E$24]+[.$BB64])+[.F$31]*[.$Z$5]*MAGNET([.F$24]+[.$BB64])+[.G$31]*[.$Z$5]*MAGNET([.G$24]+[.$BB64])+[.H$31]*[.$Z$5]*MAGNET([.H$24]+[.$BB64])+[.I$31]*[.$Z$5]*MAGNET([.I$24]+[.$BB64])+[.J$31]*[.$Z$5]*MAGNET([.J$24]+[.$BB64])+[.K$31]*[.$Z$5]*MAGNET([.K$24]+[.$BB64])+[.L$31]*[.$Z$5]*MAGNET([.L$24]+[.$BB64])+[.M$31]*[.$Z$5]*MAGNET([.M$24]+[.$BB64])+[.N$31]*[.$Z$5]*MAGNET([.N$24]+[.$BB64])+[.O$31]*[.$Z$5]*MAGNET([.O$24]+[.$BB64])+[.P$31]*[.$Z$5]*MAGNET([.P$24]+[.$BB64])+[.Q$31]*[.$Z$5]*MAGNET([.Q$24]+[.$BB64])+[.R$31]*[.$Z$5]*MAGNET([.R$24]+[.$BB64])+[.S$31]*[.$Z$5]*MAGNET([.S$24]+[.$BB64])+[.T$31]*[.$Z$5]*MAGNET([.T$24]+[.$BB64])+[.U$31]*[.$Z$5]*MAGNET([.U$24]+[.$BB64])+[.V$31]*[.$Z$5]*MAGNET([.V$24]+[.$BB64])+[.W$31]*[.$Z$5]*MAGNET([.W$24]+[.$BB64])+[.X$31]*[.$Z$5]*MAGNET([.X$24]+[.$BB64])+[.Y$31]*[.$Z$5]*MAGNET([.Y$24]+[.$BB64])+[.Z$31]*[.$Z$5]*MAGNET([.Z$24]+[.$BB64])+[.AA$31]*[.$Z$5]*MAGNET([.AA$24]+[.$BB64])+[.AB$31]*[.$Z$5]*MAGNET([.AB$24]+[.$BB64])+[.AC$31]*[.$Z$5]*MAGNET([.AC$24]+[.$BB64])+[.AD$31]*[.$Z$5]*MAGNET([.AD$24]+[.$BB64])+[.AE$31]*[.$Z$5]*MAGNET([.AE$24]+[.$BB64])+[.AF$31]*[.$Z$5]*MAGNET([.AF$24]+[.$BB64])+[.AG$31]*[.$Z$5]*MAGNET([.AG$24]+[.$BB64])+[.D$31]*[.$Z$5]*MAGNET([.D$24]+[.$BB64])+[.AH$31]*[.$Z$5]*MAGNET([.AH$24]+[.BB64]) +[.AI$31]*[.$Z$5]*MAGNET([.AI$24]+[.BB64]) +[.AJ$31]*[.$Z$5]*MAGNET([.AJ$24]+[.BB64]) +[.AK$31]*[.$Z$5]*MAGNET([.AK$24]+[.BB64]) +[.AL$31]*[.$Z$5]*MAGNET([.AL$24]+[.BB64]) +[.AM$31]*[.$Z$5]*MAGNET([.AM$24]+[.BB64]) +[.AN$31]*[.$Z$5]*MAGNET([.AN$24]+[.BB64]) +[.AO$31]*[.$Z$5]*MAGNET([.AO$24]+[.BB64]) +[.AP$31]*[.$Z$5]*MAGNET([.AP$24]+[.$BB64])&#10;+[.AQ$31]*[.$Z$5]*MAGNET([.AQ$24]+[.$BB64])&#10;+[.AR$31]*[.$Z$5]*MAGNET([.AR$24]+[.$BB64])&#10;+[.AS$31]*[.$Z$5]*MAGNET([.AS$24]+[.$BB64])&#10;+[.AT$31]*[.$Z$5]*MAGNET([.AT$24]+[.$BB64])&#10;+[.AU$31]*[.$Z$5]*MAGNET([.AU$24]+[.$BB64])&#10;+[.AV$31]*[.$Z$5]*MAGNET([.AV$24]+[.$BB64])&#10;+[.AW$31]*[.$Z$5]*MAGNET([.AW$24]+[.$BB64])&#10;+[.AX$31]*[.$Z$5]*MAGNET([.AX$24]+[.$BB64])&#10;+[.AY$31]*[.$Z$5]*MAGNET([.AY$24]+[.$BB64]) +RAND()*[.$BI$13]" office:value-type="float" office:value="0" calcext:value-type="float">
            <text:p>0</text:p>
          </table:table-cell>
          <table:table-cell table:style-name="ce71" table:formula="of:=[.E$32]*[.$Z$5]*MAGNET([.E$24]+[.$BB64])+[.F$32]*[.$Z$5]*MAGNET([.F$24]+[.$BB64])+[.G$32]*[.$Z$5]*MAGNET([.G$24]+[.$BB64])+[.H$32]*[.$Z$5]*MAGNET([.H$24]+[.$BB64])+[.I$32]*[.$Z$5]*MAGNET([.I$24]+[.$BB64])+[.J$32]*[.$Z$5]*MAGNET([.J$24]+[.$BB64])+[.K$32]*[.$Z$5]*MAGNET([.K$24]+[.$BB64])+[.L$32]*[.$Z$5]*MAGNET([.L$24]+[.$BB64])+[.M$32]*[.$Z$5]*MAGNET([.M$24]+[.$BB64])+[.N$32]*[.$Z$5]*MAGNET([.N$24]+[.$BB64])+[.O$32]*[.$Z$5]*MAGNET([.O$24]+[.$BB64])+[.P$32]*[.$Z$5]*MAGNET([.P$24]+[.$BB64])+[.Q$32]*[.$Z$5]*MAGNET([.Q$24]+[.$BB64])+[.R$32]*[.$Z$5]*MAGNET([.R$24]+[.$BB64])+[.S$32]*[.$Z$5]*MAGNET([.S$24]+[.$BB64])+[.T$32]*[.$Z$5]*MAGNET([.T$24]+[.$BB64])+[.U$32]*[.$Z$5]*MAGNET([.U$24]+[.$BB64])+[.V$32]*[.$Z$5]*MAGNET([.V$24]+[.$BB64])+[.W$32]*[.$Z$5]*MAGNET([.W$24]+[.$BB64])+[.X$32]*[.$Z$5]*MAGNET([.X$24]+[.$BB64])+[.Y$32]*[.$Z$5]*MAGNET([.Y$24]+[.$BB64])+[.Z$32]*[.$Z$5]*MAGNET([.Z$24]+[.$BB64])+[.AA$32]*[.$Z$5]*MAGNET([.AA$24]+[.$BB64])+[.AB$32]*[.$Z$5]*MAGNET([.AB$24]+[.$BB64])+[.AC$32]*[.$Z$5]*MAGNET([.AC$24]+[.$BB64])+[.AD$32]*[.$Z$5]*MAGNET([.AD$24]+[.$BB64])+[.AE$32]*[.$Z$5]*MAGNET([.AE$24]+[.$BB64])+[.AF$32]*[.$Z$5]*MAGNET([.AF$24]+[.$BB64])+[.AG$32]*[.$Z$5]*MAGNET([.AG$24]+[.$BB64])+[.D$32]*[.$Z$5]*MAGNET([.D$24]+[.$BB64])+[.AH$32]*[.$Z$5]*MAGNET([.AH$24]+[.BB64]) +[.AI$32]*[.$Z$5]*MAGNET([.AI$24]+[.BB64]) +[.AJ$32]*[.$Z$5]*MAGNET([.AJ$24]+[.BB64]) +[.AK$32]*[.$Z$5]*MAGNET([.AK$24]+[.BB64]) +[.AL$32]*[.$Z$5]*MAGNET([.AL$24]+[.BB64]) +[.AM$32]*[.$Z$5]*MAGNET([.AM$24]+[.BB64]) +[.AN$32]*[.$Z$5]*MAGNET([.AN$24]+[.BB64]) +[.AO$32]*[.$Z$5]*MAGNET([.AO$24]+[.BB64]) +[.AP$32]*[.$Z$5]*MAGNET([.AP$24]+[.$BB64])&#10;+[.AQ$32]*[.$Z$5]*MAGNET([.AQ$24]+[.$BB64])&#10;+[.AR$32]*[.$Z$5]*MAGNET([.AR$24]+[.$BB64])&#10;+[.AS$32]*[.$Z$5]*MAGNET([.AS$24]+[.$BB64])&#10;+[.AT$32]*[.$Z$5]*MAGNET([.AT$24]+[.$BB64])&#10;+[.AU$32]*[.$Z$5]*MAGNET([.AU$24]+[.$BB64])&#10;+[.AV$32]*[.$Z$5]*MAGNET([.AV$24]+[.$BB64])&#10;+[.AW$32]*[.$Z$5]*MAGNET([.AW$24]+[.$BB64])&#10;+[.AX$32]*[.$Z$5]*MAGNET([.AX$24]+[.$BB64])&#10;+[.AY$32]*[.$Z$5]*MAGNET([.AY$24]+[.$BB6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4]+0.002" office:value-type="float" office:value="0.1" calcext:value-type="float">
            <text:p>0.1</text:p>
          </table:table-cell>
          <table:table-cell table:formula="of:=[.BA65]*[.$D$6]" office:value-type="float" office:value="5.02654824574367" calcext:value-type="float">
            <text:p>5.027</text:p>
          </table:table-cell>
          <table:table-cell table:formula="of:=[.D$25]*[.$Z$5]*MAGNET([.D$24]+[.BB65])+[.E$25]*[.$Z$5]*MAGNET([.E$24]+[.BB65])+[.F$25]*[.$Z$5]*MAGNET([.F$24]+[.BB65])+[.G$25]*[.$Z$5]*MAGNET([.G$24]+[.BB65])+[.H$25]*[.$Z$5]*MAGNET([.H$24]+[.BB65])+[.I$25]*[.$Z$5]*MAGNET([.I$24]+[.BB65])+[.J$25]*[.$Z$5]*MAGNET([.J$24]+[.BB65])+[.K$25]*[.$Z$5]*MAGNET([.K$24]+[.BB65])+[.L$25]*[.$Z$5]*MAGNET([.L$24]+[.BB65])+[.M$25]*[.$Z$5]*MAGNET([.M$24]+[.BB65])+[.N$25]*[.$Z$5]*MAGNET([.N$24]+[.BB65])+[.O$25]*[.$Z$5]*MAGNET([.O$24]+[.BB65])+[.P$25]*[.$Z$5]*MAGNET([.P$24]+[.BB65])+[.Q$25]*[.$Z$5]*MAGNET([.Q$24]+[.BB65])+[.R$25]*[.$Z$5]*MAGNET([.R$24]+[.BB65])+[.S$25]*[.$Z$5]*MAGNET([.S$24]+[.BB65])+[.T$25]*[.$Z$5]*MAGNET([.T$24]+[.BB65])+[.U$25]*[.$Z$5]*MAGNET([.U$24]+[.BB65])+[.V$25]*[.$Z$5]*MAGNET([.V$24]+[.BB65])+[.W$25]*[.$Z$5]*MAGNET([.W$24]+[.BB65])+[.X$25]*[.$Z$5]*MAGNET([.X$24]+[.BB65])+[.Y$25]*[.$Z$5]*MAGNET([.Y$24]+[.BB65])+[.Z$25]*[.$Z$5]*MAGNET([.Z$24]+[.BB65])+[.AA$25]*[.$Z$5]*MAGNET([.AA$24]+[.BB65])+[.AB$25]*[.$Z$5]*MAGNET([.AB$24]+[.BB65])+[.AC$25]*[.$Z$5]*MAGNET([.AC$24]+[.BB65])+[.AD$25]*[.$Z$5]*MAGNET([.AD$24]+[.BB65])+[.AE$25]*[.$Z$5]*MAGNET([.AE$24]+[.BB65])+[.AF$25]*[.$Z$5]*MAGNET([.AF$24]+[.BB65])+[.AG$25]*[.$Z$5]*MAGNET([.AG$24]+[.BB65])+[.AH$25]*[.$Z$5]*MAGNET([.AH$24]+[.BB65]) +[.AI$25]*[.$Z$5]*MAGNET([.AI$24]+[.BB65]) +[.AJ$25]*[.$Z$5]*MAGNET([.AJ$24]+[.BB65]) +[.AK$25]*[.$Z$5]*MAGNET([.AK$24]+[.BB65]) +[.AL$25]*[.$Z$5]*MAGNET([.AL$24]+[.BB65]) +[.AM$25]*[.$Z$5]*MAGNET([.AM$24]+[.BB65]) +[.AN$25]*[.$Z$5]*MAGNET([.AN$24]+[.BB65]) +[.AO$25]*[.$Z$5]*MAGNET([.AO$24]+[.BB65])+RAND()*[.$BC$13]+[.AP$25]*[.$Z$5]*MAGNET([.AP$24]+[.BB65])&#10;+[.AQ$25]*[.$Z$5]*MAGNET([.AQ$24]+[.BB65])&#10;+[.AR$25]*[.$Z$5]*MAGNET([.AR$24]+[.BB65])&#10;+[.AS$25]*[.$Z$5]*MAGNET([.AS$24]+[.BB65])&#10;+[.AT$25]*[.$Z$5]*MAGNET([.AT$24]+[.BB65])&#10;+[.AU$25]*[.$Z$5]*MAGNET([.AU$24]+[.BB65])&#10;+[.AV$25]*[.$Z$5]*MAGNET([.AV$24]+[.BB65])&#10;+[.AW$25]*[.$Z$5]*MAGNET([.AW$24]+[.BB65])&#10;+[.AX$25]*[.$Z$5]*MAGNET([.AX$24]+[.BB65])&#10;+[.AY$25]*[.$Z$5]*MAGNET([.AY$24]+[.BB65])" office:value-type="float" office:value="-113.224181555811" calcext:value-type="float">
            <text:p>-113.22</text:p>
          </table:table-cell>
          <table:table-cell table:style-name="ce70" table:formula="of:=[.E$26]*[.$Z$5]*MAGNET([.E$24]+[.$BB65])+[.F$26]*[.$Z$5]*MAGNET([.F$24]+[.$BB65])+[.G$26]*[.$Z$5]*MAGNET([.G$24]+[.$BB65])+[.H$26]*[.$Z$5]*MAGNET([.H$24]+[.$BB65])+[.I$26]*[.$Z$5]*MAGNET([.I$24]+[.$BB65])+[.J$26]*[.$Z$5]*MAGNET([.J$24]+[.$BB65])+[.K$26]*[.$Z$5]*MAGNET([.K$24]+[.$BB65])+[.L$26]*[.$Z$5]*MAGNET([.L$24]+[.$BB65])+[.M$26]*[.$Z$5]*MAGNET([.M$24]+[.$BB65])+[.N$26]*[.$Z$5]*MAGNET([.N$24]+[.$BB65])+[.O$26]*[.$Z$5]*MAGNET([.O$24]+[.$BB65])+[.P$26]*[.$Z$5]*MAGNET([.P$24]+[.$BB65])+[.Q$26]*[.$Z$5]*MAGNET([.Q$24]+[.$BB65])+[.R$26]*[.$Z$5]*MAGNET([.R$24]+[.$BB65])+[.S$26]*[.$Z$5]*MAGNET([.S$24]+[.$BB65])+[.T$26]*[.$Z$5]*MAGNET([.T$24]+[.$BB65])+[.U$26]*[.$Z$5]*MAGNET([.U$24]+[.$BB65])+[.V$26]*[.$Z$5]*MAGNET([.V$24]+[.$BB65])+[.W$26]*[.$Z$5]*MAGNET([.W$24]+[.$BB65])+[.X$26]*[.$Z$5]*MAGNET([.X$24]+[.$BB65])+[.Y$26]*[.$Z$5]*MAGNET([.Y$24]+[.$BB65])+[.Z$26]*[.$Z$5]*MAGNET([.Z$24]+[.$BB65])+[.AA$26]*[.$Z$5]*MAGNET([.AA$24]+[.$BB65])+[.AB$26]*[.$Z$5]*MAGNET([.AB$24]+[.$BB65])+[.AC$26]*[.$Z$5]*MAGNET([.AC$24]+[.$BB65])+[.AD$26]*[.$Z$5]*MAGNET([.AD$24]+[.$BB65])+[.AE$26]*[.$Z$5]*MAGNET([.AE$24]+[.$BB65])+[.AF$26]*[.$Z$5]*MAGNET([.AF$24]+[.$BB65])+[.AG$26]*[.$Z$5]*MAGNET([.AG$24]+[.$BB65])+[.D$26]*[.$Z$5]*MAGNET([.D$24]+[.$BB65])+[.AH$26]*[.$Z$5]*MAGNET([.AH$24]+[.BB65]) +[.AI$26]*[.$Z$5]*MAGNET([.AI$24]+[.BB65]) +[.AJ$26]*[.$Z$5]*MAGNET([.AJ$24]+[.BB65]) +[.AK$26]*[.$Z$5]*MAGNET([.AK$24]+[.BB65]) +[.AL$26]*[.$Z$5]*MAGNET([.AL$24]+[.BB65]) +[.AM$26]*[.$Z$5]*MAGNET([.AM$24]+[.BB65]) +[.AN$26]*[.$Z$5]*MAGNET([.AN$24]+[.BB65]) +[.AO$26]*[.$Z$5]*MAGNET([.AO$24]+[.BB65]) +[.AP$26]*[.$Z$5]*MAGNET([.AP$24]+[.$BB65])&#10;+[.AQ$26]*[.$Z$5]*MAGNET([.AQ$24]+[.$BB65])&#10;+[.AR$26]*[.$Z$5]*MAGNET([.AR$24]+[.$BB65])&#10;+[.AS$26]*[.$Z$5]*MAGNET([.AS$24]+[.$BB65])&#10;+[.AT$26]*[.$Z$5]*MAGNET([.AT$24]+[.$BB65])&#10;+[.AU$26]*[.$Z$5]*MAGNET([.AU$24]+[.$BB65])&#10;+[.AV$26]*[.$Z$5]*MAGNET([.AV$24]+[.$BB65])&#10;+[.AW$26]*[.$Z$5]*MAGNET([.AW$24]+[.$BB65])&#10;+[.AX$26]*[.$Z$5]*MAGNET([.AX$24]+[.$BB65])&#10;+[.AY$26]*[.$Z$5]*MAGNET([.AY$24]+[.$BB65]) +RAND()*[.$BD$13]" office:value-type="float" office:value="53.7031459663884" calcext:value-type="float">
            <text:p>53.70</text:p>
          </table:table-cell>
          <table:table-cell table:style-name="ce71" table:formula="of:=[.E$27]*[.$Z$5]*MAGNET([.E$24]+[.$BB65])+[.F$27]*[.$Z$5]*MAGNET([.F$24]+[.$BB65])+[.G$27]*[.$Z$5]*MAGNET([.G$24]+[.$BB65])+[.H$27]*[.$Z$5]*MAGNET([.H$24]+[.$BB65])+[.I$27]*[.$Z$5]*MAGNET([.I$24]+[.$BB65])+[.J$27]*[.$Z$5]*MAGNET([.J$24]+[.$BB65])+[.K$27]*[.$Z$5]*MAGNET([.K$24]+[.$BB65])+[.L$27]*[.$Z$5]*MAGNET([.L$24]+[.$BB65])+[.M$27]*[.$Z$5]*MAGNET([.M$24]+[.$BB65])+[.N$27]*[.$Z$5]*MAGNET([.N$24]+[.$BB65])+[.O$27]*[.$Z$5]*MAGNET([.O$24]+[.$BB65])+[.P$27]*[.$Z$5]*MAGNET([.P$24]+[.$BB65])+[.Q$27]*[.$Z$5]*MAGNET([.Q$24]+[.$BB65])+[.R$27]*[.$Z$5]*MAGNET([.R$24]+[.$BB65])+[.S$27]*[.$Z$5]*MAGNET([.S$24]+[.$BB65])+[.T$27]*[.$Z$5]*MAGNET([.T$24]+[.$BB65])+[.U$27]*[.$Z$5]*MAGNET([.U$24]+[.$BB65])+[.V$27]*[.$Z$5]*MAGNET([.V$24]+[.$BB65])+[.W$27]*[.$Z$5]*MAGNET([.W$24]+[.$BB65])+[.X$27]*[.$Z$5]*MAGNET([.X$24]+[.$BB65])+[.Y$27]*[.$Z$5]*MAGNET([.Y$24]+[.$BB65])+[.Z$27]*[.$Z$5]*MAGNET([.Z$24]+[.$BB65])+[.AA$27]*[.$Z$5]*MAGNET([.AA$24]+[.$BB65])+[.AB$27]*[.$Z$5]*MAGNET([.AB$24]+[.$BB65])+[.AC$27]*[.$Z$5]*MAGNET([.AC$24]+[.$BB65])+[.AD$27]*[.$Z$5]*MAGNET([.AD$24]+[.$BB65])+[.AE$27]*[.$Z$5]*MAGNET([.AE$24]+[.$BB65])+[.AF$27]*[.$Z$5]*MAGNET([.AF$24]+[.$BB65])+[.AG$27]*[.$Z$5]*MAGNET([.AG$24]+[.$BB65])+[.D$27]*[.$Z$5]*MAGNET([.D$24]+[.$BB65])+[.AH$27]*[.$Z$5]*MAGNET([.AH$24]+[.BB65]) +[.AI$27]*[.$Z$5]*MAGNET([.AI$24]+[.BB65]) +[.AJ$27]*[.$Z$5]*MAGNET([.AJ$24]+[.BB65]) +[.AK$27]*[.$Z$5]*MAGNET([.AK$24]+[.BB65]) +[.AL$27]*[.$Z$5]*MAGNET([.AL$24]+[.BB65]) +[.AM$27]*[.$Z$5]*MAGNET([.AM$24]+[.BB65]) +[.AN$27]*[.$Z$5]*MAGNET([.AN$24]+[.BB65]) +[.AO$27]*[.$Z$5]*MAGNET([.AO$24]+[.BB65]) +[.AP$27]*[.$Z$5]*MAGNET([.AP$24]+[.$BB65])&#10;+[.AQ$27]*[.$Z$5]*MAGNET([.AQ$24]+[.$BB65])&#10;+[.AR$27]*[.$Z$5]*MAGNET([.AR$24]+[.$BB65])&#10;+[.AS$27]*[.$Z$5]*MAGNET([.AS$24]+[.$BB65])&#10;+[.AT$27]*[.$Z$5]*MAGNET([.AT$24]+[.$BB65])&#10;+[.AU$27]*[.$Z$5]*MAGNET([.AU$24]+[.$BB65])&#10;+[.AV$27]*[.$Z$5]*MAGNET([.AV$24]+[.$BB65])&#10;+[.AW$27]*[.$Z$5]*MAGNET([.AW$24]+[.$BB65])&#10;+[.AX$27]*[.$Z$5]*MAGNET([.AX$24]+[.$BB65])&#10;+[.AY$27]*[.$Z$5]*MAGNET([.AY$24]+[.$BB65]) +RAND()*[.$BE$13]" office:value-type="float" office:value="87.9546946830382" calcext:value-type="float">
            <text:p>87.9546946830382</text:p>
          </table:table-cell>
          <table:table-cell table:style-name="ce71" table:formula="of:=[.E$28]*[.$Z$5]*MAGNET([.E$24]+[.$BB65])+[.F$28]*[.$Z$5]*MAGNET([.F$24]+[.$BB65])+[.G$28]*[.$Z$5]*MAGNET([.G$24]+[.$BB65])+[.H$28]*[.$Z$5]*MAGNET([.H$24]+[.$BB65])+[.I$28]*[.$Z$5]*MAGNET([.I$24]+[.$BB65])+[.J$28]*[.$Z$5]*MAGNET([.J$24]+[.$BB65])+[.K$28]*[.$Z$5]*MAGNET([.K$24]+[.$BB65])+[.L$28]*[.$Z$5]*MAGNET([.L$24]+[.$BB65])+[.M$28]*[.$Z$5]*MAGNET([.M$24]+[.$BB65])+[.N$28]*[.$Z$5]*MAGNET([.N$24]+[.$BB65])+[.O$28]*[.$Z$5]*MAGNET([.O$24]+[.$BB65])+[.P$28]*[.$Z$5]*MAGNET([.P$24]+[.$BB65])+[.Q$28]*[.$Z$5]*MAGNET([.Q$24]+[.$BB65])+[.R$28]*[.$Z$5]*MAGNET([.R$24]+[.$BB65])+[.S$28]*[.$Z$5]*MAGNET([.S$24]+[.$BB65])+[.T$28]*[.$Z$5]*MAGNET([.T$24]+[.$BB65])+[.U$28]*[.$Z$5]*MAGNET([.U$24]+[.$BB65])+[.V$28]*[.$Z$5]*MAGNET([.V$24]+[.$BB65])+[.W$28]*[.$Z$5]*MAGNET([.W$24]+[.$BB65])+[.X$28]*[.$Z$5]*MAGNET([.X$24]+[.$BB65])+[.Y$28]*[.$Z$5]*MAGNET([.Y$24]+[.$BB65])+[.Z$28]*[.$Z$5]*MAGNET([.Z$24]+[.$BB65])+[.AA$28]*[.$Z$5]*MAGNET([.AA$24]+[.$BB65])+[.AB$28]*[.$Z$5]*MAGNET([.AB$24]+[.$BB65])+[.AC$28]*[.$Z$5]*MAGNET([.AC$24]+[.$BB65])+[.AD$28]*[.$Z$5]*MAGNET([.AD$24]+[.$BB65])+[.AE$28]*[.$Z$5]*MAGNET([.AE$24]+[.$BB65])+[.AF$28]*[.$Z$5]*MAGNET([.AF$24]+[.$BB65])+[.AG$28]*[.$Z$5]*MAGNET([.AG$24]+[.$BB65])+[.D$28]*[.$Z$5]*MAGNET([.D$24]+[.$BB65])+[.AH$28]*[.$Z$5]*MAGNET([.AH$24]+[.BB65]) +[.AI$28]*[.$Z$5]*MAGNET([.AI$24]+[.BB65]) +[.AJ$28]*[.$Z$5]*MAGNET([.AJ$24]+[.BB65]) +[.AK$28]*[.$Z$5]*MAGNET([.AK$24]+[.BB65]) +[.AL$28]*[.$Z$5]*MAGNET([.AL$24]+[.BB65]) +[.AM$28]*[.$Z$5]*MAGNET([.AM$24]+[.BB65]) +[.AN$28]*[.$Z$5]*MAGNET([.AN$24]+[.BB65]) +[.AO$28]*[.$Z$5]*MAGNET([.AO$24]+[.BB65]) +[.AP$28]*[.$Z$5]*MAGNET([.AP$24]+[.$BB65])&#10;+[.AQ$28]*[.$Z$5]*MAGNET([.AQ$24]+[.$BB65])&#10;+[.AR$28]*[.$Z$5]*MAGNET([.AR$24]+[.$BB65])&#10;+[.AS$28]*[.$Z$5]*MAGNET([.AS$24]+[.$BB65])&#10;+[.AT$28]*[.$Z$5]*MAGNET([.AT$24]+[.$BB65])&#10;+[.AU$28]*[.$Z$5]*MAGNET([.AU$24]+[.$BB65])&#10;+[.AV$28]*[.$Z$5]*MAGNET([.AV$24]+[.$BB65])&#10;+[.AW$28]*[.$Z$5]*MAGNET([.AW$24]+[.$BB65])&#10;+[.AX$28]*[.$Z$5]*MAGNET([.AX$24]+[.$BB65])&#10;+[.AY$28]*[.$Z$5]*MAGNET([.AY$24]+[.$BB65]) +RAND()*[.$BF$13]" office:value-type="float" office:value="10.3548709080713" calcext:value-type="float">
            <text:p>10.3548709080713</text:p>
          </table:table-cell>
          <table:table-cell table:style-name="ce71" table:formula="of:=[.E$29]*[.$Z$5]*MAGNET([.E$24]+[.$BB65])+[.F$29]*[.$Z$5]*MAGNET([.F$24]+[.$BB65])+[.G$29]*[.$Z$5]*MAGNET([.G$24]+[.$BB65])+[.H$29]*[.$Z$5]*MAGNET([.H$24]+[.$BB65])+[.I$29]*[.$Z$5]*MAGNET([.I$24]+[.$BB65])+[.J$29]*[.$Z$5]*MAGNET([.J$24]+[.$BB65])+[.K$29]*[.$Z$5]*MAGNET([.K$24]+[.$BB65])+[.L$29]*[.$Z$5]*MAGNET([.L$24]+[.$BB65])+[.M$29]*[.$Z$5]*MAGNET([.M$24]+[.$BB65])+[.N$29]*[.$Z$5]*MAGNET([.N$24]+[.$BB65])+[.O$29]*[.$Z$5]*MAGNET([.O$24]+[.$BB65])+[.P$29]*[.$Z$5]*MAGNET([.P$24]+[.$BB65])+[.Q$29]*[.$Z$5]*MAGNET([.Q$24]+[.$BB65])+[.R$29]*[.$Z$5]*MAGNET([.R$24]+[.$BB65])+[.S$29]*[.$Z$5]*MAGNET([.S$24]+[.$BB65])+[.T$29]*[.$Z$5]*MAGNET([.T$24]+[.$BB65])+[.U$29]*[.$Z$5]*MAGNET([.U$24]+[.$BB65])+[.V$29]*[.$Z$5]*MAGNET([.V$24]+[.$BB65])+[.W$29]*[.$Z$5]*MAGNET([.W$24]+[.$BB65])+[.X$29]*[.$Z$5]*MAGNET([.X$24]+[.$BB65])+[.Y$29]*[.$Z$5]*MAGNET([.Y$24]+[.$BB65])+[.Z$29]*[.$Z$5]*MAGNET([.Z$24]+[.$BB65])+[.AA$29]*[.$Z$5]*MAGNET([.AA$24]+[.$BB65])+[.AB$29]*[.$Z$5]*MAGNET([.AB$24]+[.$BB65])+[.AC$29]*[.$Z$5]*MAGNET([.AC$24]+[.$BB65])+[.AD$29]*[.$Z$5]*MAGNET([.AD$24]+[.$BB65])+[.AE$29]*[.$Z$5]*MAGNET([.AE$24]+[.$BB65])+[.AF$29]*[.$Z$5]*MAGNET([.AF$24]+[.$BB65])+[.AG$29]*[.$Z$5]*MAGNET([.AG$24]+[.$BB65])+[.D$29]*[.$Z$5]*MAGNET([.D$24]+[.$BB65])+[.AH$29]*[.$Z$5]*MAGNET([.AH$24]+[.BB65]) +[.AI$29]*[.$Z$5]*MAGNET([.AI$24]+[.BB65]) +[.AJ$29]*[.$Z$5]*MAGNET([.AJ$24]+[.BB65]) +[.AK$29]*[.$Z$5]*MAGNET([.AK$24]+[.BB65]) +[.AL$29]*[.$Z$5]*MAGNET([.AL$24]+[.BB65]) +[.AM$29]*[.$Z$5]*MAGNET([.AM$24]+[.BB65]) +[.AN$29]*[.$Z$5]*MAGNET([.AN$24]+[.BB65]) +[.AO$29]*[.$Z$5]*MAGNET([.AO$24]+[.BB65]) +[.AP$29]*[.$Z$5]*MAGNET([.AP$24]+[.$BB65])&#10;+[.AQ$29]*[.$Z$5]*MAGNET([.AQ$24]+[.$BB65])&#10;+[.AR$29]*[.$Z$5]*MAGNET([.AR$24]+[.$BB65])&#10;+[.AS$29]*[.$Z$5]*MAGNET([.AS$24]+[.$BB65])&#10;+[.AT$29]*[.$Z$5]*MAGNET([.AT$24]+[.$BB65])&#10;+[.AU$29]*[.$Z$5]*MAGNET([.AU$24]+[.$BB65])&#10;+[.AV$29]*[.$Z$5]*MAGNET([.AV$24]+[.$BB65])&#10;+[.AW$29]*[.$Z$5]*MAGNET([.AW$24]+[.$BB65])&#10;+[.AX$29]*[.$Z$5]*MAGNET([.AX$24]+[.$BB65])&#10;+[.AY$29]*[.$Z$5]*MAGNET([.AY$24]+[.$BB65]) +RAND()*[.$BG$13]" office:value-type="float" office:value="-31.6203716748618" calcext:value-type="float">
            <text:p>-31.6203716748618</text:p>
          </table:table-cell>
          <table:table-cell table:style-name="ce71" table:formula="of:=[.E$30]*[.$Z$5]*MAGNET([.E$24]+[.$BB65])+[.F$30]*[.$Z$5]*MAGNET([.F$24]+[.$BB65])+[.G$30]*[.$Z$5]*MAGNET([.G$24]+[.$BB65])+[.H$30]*[.$Z$5]*MAGNET([.H$24]+[.$BB65])+[.I$30]*[.$Z$5]*MAGNET([.I$24]+[.$BB65])+[.J$30]*[.$Z$5]*MAGNET([.J$24]+[.$BB65])+[.K$30]*[.$Z$5]*MAGNET([.K$24]+[.$BB65])+[.L$30]*[.$Z$5]*MAGNET([.L$24]+[.$BB65])+[.M$30]*[.$Z$5]*MAGNET([.M$24]+[.$BB65])+[.N$30]*[.$Z$5]*MAGNET([.N$24]+[.$BB65])+[.O$30]*[.$Z$5]*MAGNET([.O$24]+[.$BB65])+[.P$30]*[.$Z$5]*MAGNET([.P$24]+[.$BB65])+[.Q$30]*[.$Z$5]*MAGNET([.Q$24]+[.$BB65])+[.R$30]*[.$Z$5]*MAGNET([.R$24]+[.$BB65])+[.S$30]*[.$Z$5]*MAGNET([.S$24]+[.$BB65])+[.T$30]*[.$Z$5]*MAGNET([.T$24]+[.$BB65])+[.U$30]*[.$Z$5]*MAGNET([.U$24]+[.$BB65])+[.V$30]*[.$Z$5]*MAGNET([.V$24]+[.$BB65])+[.W$30]*[.$Z$5]*MAGNET([.W$24]+[.$BB65])+[.X$30]*[.$Z$5]*MAGNET([.X$24]+[.$BB65])+[.Y$30]*[.$Z$5]*MAGNET([.Y$24]+[.$BB65])+[.Z$30]*[.$Z$5]*MAGNET([.Z$24]+[.$BB65])+[.AA$30]*[.$Z$5]*MAGNET([.AA$24]+[.$BB65])+[.AB$30]*[.$Z$5]*MAGNET([.AB$24]+[.$BB65])+[.AC$30]*[.$Z$5]*MAGNET([.AC$24]+[.$BB65])+[.AD$30]*[.$Z$5]*MAGNET([.AD$24]+[.$BB65])+[.AE$30]*[.$Z$5]*MAGNET([.AE$24]+[.$BB65])+[.AF$30]*[.$Z$5]*MAGNET([.AF$24]+[.$BB65])+[.AG$30]*[.$Z$5]*MAGNET([.AG$24]+[.$BB65])+[.D$30]*[.$Z$5]*MAGNET([.D$24]+[.$BB65])+[.AH$30]*[.$Z$5]*MAGNET([.AH$24]+[.BB65]) +[.AI$30]*[.$Z$5]*MAGNET([.AI$24]+[.BB65]) +[.AJ$30]*[.$Z$5]*MAGNET([.AJ$24]+[.BB65]) +[.AK$30]*[.$Z$5]*MAGNET([.AK$24]+[.BB65]) +[.AL$30]*[.$Z$5]*MAGNET([.AL$24]+[.BB65]) +[.AM$30]*[.$Z$5]*MAGNET([.AM$24]+[.BB65]) +[.AN$30]*[.$Z$5]*MAGNET([.AN$24]+[.BB65]) +[.AO$30]*[.$Z$5]*MAGNET([.AO$24]+[.BB65]) +[.AP$30]*[.$Z$5]*MAGNET([.AP$24]+[.$BB65])&#10;+[.AQ$30]*[.$Z$5]*MAGNET([.AQ$24]+[.$BB65])&#10;+[.AR$30]*[.$Z$5]*MAGNET([.AR$24]+[.$BB65])&#10;+[.AS$30]*[.$Z$5]*MAGNET([.AS$24]+[.$BB65])&#10;+[.AT$30]*[.$Z$5]*MAGNET([.AT$24]+[.$BB65])&#10;+[.AU$30]*[.$Z$5]*MAGNET([.AU$24]+[.$BB65])&#10;+[.AV$30]*[.$Z$5]*MAGNET([.AV$24]+[.$BB65])&#10;+[.AW$30]*[.$Z$5]*MAGNET([.AW$24]+[.$BB65])&#10;+[.AX$30]*[.$Z$5]*MAGNET([.AX$24]+[.$BB65])&#10;+[.AY$30]*[.$Z$5]*MAGNET([.AY$24]+[.$BB65]) +RAND()*[.$BH$13]" office:value-type="float" office:value="0" calcext:value-type="float">
            <text:p>0</text:p>
          </table:table-cell>
          <table:table-cell table:style-name="ce71" table:formula="of:=[.E$31]*[.$Z$5]*MAGNET([.E$24]+[.$BB65])+[.F$31]*[.$Z$5]*MAGNET([.F$24]+[.$BB65])+[.G$31]*[.$Z$5]*MAGNET([.G$24]+[.$BB65])+[.H$31]*[.$Z$5]*MAGNET([.H$24]+[.$BB65])+[.I$31]*[.$Z$5]*MAGNET([.I$24]+[.$BB65])+[.J$31]*[.$Z$5]*MAGNET([.J$24]+[.$BB65])+[.K$31]*[.$Z$5]*MAGNET([.K$24]+[.$BB65])+[.L$31]*[.$Z$5]*MAGNET([.L$24]+[.$BB65])+[.M$31]*[.$Z$5]*MAGNET([.M$24]+[.$BB65])+[.N$31]*[.$Z$5]*MAGNET([.N$24]+[.$BB65])+[.O$31]*[.$Z$5]*MAGNET([.O$24]+[.$BB65])+[.P$31]*[.$Z$5]*MAGNET([.P$24]+[.$BB65])+[.Q$31]*[.$Z$5]*MAGNET([.Q$24]+[.$BB65])+[.R$31]*[.$Z$5]*MAGNET([.R$24]+[.$BB65])+[.S$31]*[.$Z$5]*MAGNET([.S$24]+[.$BB65])+[.T$31]*[.$Z$5]*MAGNET([.T$24]+[.$BB65])+[.U$31]*[.$Z$5]*MAGNET([.U$24]+[.$BB65])+[.V$31]*[.$Z$5]*MAGNET([.V$24]+[.$BB65])+[.W$31]*[.$Z$5]*MAGNET([.W$24]+[.$BB65])+[.X$31]*[.$Z$5]*MAGNET([.X$24]+[.$BB65])+[.Y$31]*[.$Z$5]*MAGNET([.Y$24]+[.$BB65])+[.Z$31]*[.$Z$5]*MAGNET([.Z$24]+[.$BB65])+[.AA$31]*[.$Z$5]*MAGNET([.AA$24]+[.$BB65])+[.AB$31]*[.$Z$5]*MAGNET([.AB$24]+[.$BB65])+[.AC$31]*[.$Z$5]*MAGNET([.AC$24]+[.$BB65])+[.AD$31]*[.$Z$5]*MAGNET([.AD$24]+[.$BB65])+[.AE$31]*[.$Z$5]*MAGNET([.AE$24]+[.$BB65])+[.AF$31]*[.$Z$5]*MAGNET([.AF$24]+[.$BB65])+[.AG$31]*[.$Z$5]*MAGNET([.AG$24]+[.$BB65])+[.D$31]*[.$Z$5]*MAGNET([.D$24]+[.$BB65])+[.AH$31]*[.$Z$5]*MAGNET([.AH$24]+[.BB65]) +[.AI$31]*[.$Z$5]*MAGNET([.AI$24]+[.BB65]) +[.AJ$31]*[.$Z$5]*MAGNET([.AJ$24]+[.BB65]) +[.AK$31]*[.$Z$5]*MAGNET([.AK$24]+[.BB65]) +[.AL$31]*[.$Z$5]*MAGNET([.AL$24]+[.BB65]) +[.AM$31]*[.$Z$5]*MAGNET([.AM$24]+[.BB65]) +[.AN$31]*[.$Z$5]*MAGNET([.AN$24]+[.BB65]) +[.AO$31]*[.$Z$5]*MAGNET([.AO$24]+[.BB65]) +[.AP$31]*[.$Z$5]*MAGNET([.AP$24]+[.$BB65])&#10;+[.AQ$31]*[.$Z$5]*MAGNET([.AQ$24]+[.$BB65])&#10;+[.AR$31]*[.$Z$5]*MAGNET([.AR$24]+[.$BB65])&#10;+[.AS$31]*[.$Z$5]*MAGNET([.AS$24]+[.$BB65])&#10;+[.AT$31]*[.$Z$5]*MAGNET([.AT$24]+[.$BB65])&#10;+[.AU$31]*[.$Z$5]*MAGNET([.AU$24]+[.$BB65])&#10;+[.AV$31]*[.$Z$5]*MAGNET([.AV$24]+[.$BB65])&#10;+[.AW$31]*[.$Z$5]*MAGNET([.AW$24]+[.$BB65])&#10;+[.AX$31]*[.$Z$5]*MAGNET([.AX$24]+[.$BB65])&#10;+[.AY$31]*[.$Z$5]*MAGNET([.AY$24]+[.$BB65]) +RAND()*[.$BI$13]" office:value-type="float" office:value="0" calcext:value-type="float">
            <text:p>0</text:p>
          </table:table-cell>
          <table:table-cell table:style-name="ce71" table:formula="of:=[.E$32]*[.$Z$5]*MAGNET([.E$24]+[.$BB65])+[.F$32]*[.$Z$5]*MAGNET([.F$24]+[.$BB65])+[.G$32]*[.$Z$5]*MAGNET([.G$24]+[.$BB65])+[.H$32]*[.$Z$5]*MAGNET([.H$24]+[.$BB65])+[.I$32]*[.$Z$5]*MAGNET([.I$24]+[.$BB65])+[.J$32]*[.$Z$5]*MAGNET([.J$24]+[.$BB65])+[.K$32]*[.$Z$5]*MAGNET([.K$24]+[.$BB65])+[.L$32]*[.$Z$5]*MAGNET([.L$24]+[.$BB65])+[.M$32]*[.$Z$5]*MAGNET([.M$24]+[.$BB65])+[.N$32]*[.$Z$5]*MAGNET([.N$24]+[.$BB65])+[.O$32]*[.$Z$5]*MAGNET([.O$24]+[.$BB65])+[.P$32]*[.$Z$5]*MAGNET([.P$24]+[.$BB65])+[.Q$32]*[.$Z$5]*MAGNET([.Q$24]+[.$BB65])+[.R$32]*[.$Z$5]*MAGNET([.R$24]+[.$BB65])+[.S$32]*[.$Z$5]*MAGNET([.S$24]+[.$BB65])+[.T$32]*[.$Z$5]*MAGNET([.T$24]+[.$BB65])+[.U$32]*[.$Z$5]*MAGNET([.U$24]+[.$BB65])+[.V$32]*[.$Z$5]*MAGNET([.V$24]+[.$BB65])+[.W$32]*[.$Z$5]*MAGNET([.W$24]+[.$BB65])+[.X$32]*[.$Z$5]*MAGNET([.X$24]+[.$BB65])+[.Y$32]*[.$Z$5]*MAGNET([.Y$24]+[.$BB65])+[.Z$32]*[.$Z$5]*MAGNET([.Z$24]+[.$BB65])+[.AA$32]*[.$Z$5]*MAGNET([.AA$24]+[.$BB65])+[.AB$32]*[.$Z$5]*MAGNET([.AB$24]+[.$BB65])+[.AC$32]*[.$Z$5]*MAGNET([.AC$24]+[.$BB65])+[.AD$32]*[.$Z$5]*MAGNET([.AD$24]+[.$BB65])+[.AE$32]*[.$Z$5]*MAGNET([.AE$24]+[.$BB65])+[.AF$32]*[.$Z$5]*MAGNET([.AF$24]+[.$BB65])+[.AG$32]*[.$Z$5]*MAGNET([.AG$24]+[.$BB65])+[.D$32]*[.$Z$5]*MAGNET([.D$24]+[.$BB65])+[.AH$32]*[.$Z$5]*MAGNET([.AH$24]+[.BB65]) +[.AI$32]*[.$Z$5]*MAGNET([.AI$24]+[.BB65]) +[.AJ$32]*[.$Z$5]*MAGNET([.AJ$24]+[.BB65]) +[.AK$32]*[.$Z$5]*MAGNET([.AK$24]+[.BB65]) +[.AL$32]*[.$Z$5]*MAGNET([.AL$24]+[.BB65]) +[.AM$32]*[.$Z$5]*MAGNET([.AM$24]+[.BB65]) +[.AN$32]*[.$Z$5]*MAGNET([.AN$24]+[.BB65]) +[.AO$32]*[.$Z$5]*MAGNET([.AO$24]+[.BB65]) +[.AP$32]*[.$Z$5]*MAGNET([.AP$24]+[.$BB65])&#10;+[.AQ$32]*[.$Z$5]*MAGNET([.AQ$24]+[.$BB65])&#10;+[.AR$32]*[.$Z$5]*MAGNET([.AR$24]+[.$BB65])&#10;+[.AS$32]*[.$Z$5]*MAGNET([.AS$24]+[.$BB65])&#10;+[.AT$32]*[.$Z$5]*MAGNET([.AT$24]+[.$BB65])&#10;+[.AU$32]*[.$Z$5]*MAGNET([.AU$24]+[.$BB65])&#10;+[.AV$32]*[.$Z$5]*MAGNET([.AV$24]+[.$BB65])&#10;+[.AW$32]*[.$Z$5]*MAGNET([.AW$24]+[.$BB65])&#10;+[.AX$32]*[.$Z$5]*MAGNET([.AX$24]+[.$BB65])&#10;+[.AY$32]*[.$Z$5]*MAGNET([.AY$24]+[.$BB6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5]+0.002" office:value-type="float" office:value="0.102" calcext:value-type="float">
            <text:p>0.102</text:p>
          </table:table-cell>
          <table:table-cell table:formula="of:=[.BA66]*[.$D$6]" office:value-type="float" office:value="5.12707921065855" calcext:value-type="float">
            <text:p>5.127</text:p>
          </table:table-cell>
          <table:table-cell table:formula="of:=[.D$25]*[.$Z$5]*MAGNET([.D$24]+[.BB66])+[.E$25]*[.$Z$5]*MAGNET([.E$24]+[.BB66])+[.F$25]*[.$Z$5]*MAGNET([.F$24]+[.BB66])+[.G$25]*[.$Z$5]*MAGNET([.G$24]+[.BB66])+[.H$25]*[.$Z$5]*MAGNET([.H$24]+[.BB66])+[.I$25]*[.$Z$5]*MAGNET([.I$24]+[.BB66])+[.J$25]*[.$Z$5]*MAGNET([.J$24]+[.BB66])+[.K$25]*[.$Z$5]*MAGNET([.K$24]+[.BB66])+[.L$25]*[.$Z$5]*MAGNET([.L$24]+[.BB66])+[.M$25]*[.$Z$5]*MAGNET([.M$24]+[.BB66])+[.N$25]*[.$Z$5]*MAGNET([.N$24]+[.BB66])+[.O$25]*[.$Z$5]*MAGNET([.O$24]+[.BB66])+[.P$25]*[.$Z$5]*MAGNET([.P$24]+[.BB66])+[.Q$25]*[.$Z$5]*MAGNET([.Q$24]+[.BB66])+[.R$25]*[.$Z$5]*MAGNET([.R$24]+[.BB66])+[.S$25]*[.$Z$5]*MAGNET([.S$24]+[.BB66])+[.T$25]*[.$Z$5]*MAGNET([.T$24]+[.BB66])+[.U$25]*[.$Z$5]*MAGNET([.U$24]+[.BB66])+[.V$25]*[.$Z$5]*MAGNET([.V$24]+[.BB66])+[.W$25]*[.$Z$5]*MAGNET([.W$24]+[.BB66])+[.X$25]*[.$Z$5]*MAGNET([.X$24]+[.BB66])+[.Y$25]*[.$Z$5]*MAGNET([.Y$24]+[.BB66])+[.Z$25]*[.$Z$5]*MAGNET([.Z$24]+[.BB66])+[.AA$25]*[.$Z$5]*MAGNET([.AA$24]+[.BB66])+[.AB$25]*[.$Z$5]*MAGNET([.AB$24]+[.BB66])+[.AC$25]*[.$Z$5]*MAGNET([.AC$24]+[.BB66])+[.AD$25]*[.$Z$5]*MAGNET([.AD$24]+[.BB66])+[.AE$25]*[.$Z$5]*MAGNET([.AE$24]+[.BB66])+[.AF$25]*[.$Z$5]*MAGNET([.AF$24]+[.BB66])+[.AG$25]*[.$Z$5]*MAGNET([.AG$24]+[.BB66])+[.AH$25]*[.$Z$5]*MAGNET([.AH$24]+[.BB66]) +[.AI$25]*[.$Z$5]*MAGNET([.AI$24]+[.BB66]) +[.AJ$25]*[.$Z$5]*MAGNET([.AJ$24]+[.BB66]) +[.AK$25]*[.$Z$5]*MAGNET([.AK$24]+[.BB66]) +[.AL$25]*[.$Z$5]*MAGNET([.AL$24]+[.BB66]) +[.AM$25]*[.$Z$5]*MAGNET([.AM$24]+[.BB66]) +[.AN$25]*[.$Z$5]*MAGNET([.AN$24]+[.BB66]) +[.AO$25]*[.$Z$5]*MAGNET([.AO$24]+[.BB66])+RAND()*[.$BC$13]+[.AP$25]*[.$Z$5]*MAGNET([.AP$24]+[.BB66])&#10;+[.AQ$25]*[.$Z$5]*MAGNET([.AQ$24]+[.BB66])&#10;+[.AR$25]*[.$Z$5]*MAGNET([.AR$24]+[.BB66])&#10;+[.AS$25]*[.$Z$5]*MAGNET([.AS$24]+[.BB66])&#10;+[.AT$25]*[.$Z$5]*MAGNET([.AT$24]+[.BB66])&#10;+[.AU$25]*[.$Z$5]*MAGNET([.AU$24]+[.BB66])&#10;+[.AV$25]*[.$Z$5]*MAGNET([.AV$24]+[.BB66])&#10;+[.AW$25]*[.$Z$5]*MAGNET([.AW$24]+[.BB66])&#10;+[.AX$25]*[.$Z$5]*MAGNET([.AX$24]+[.BB66])&#10;+[.AY$25]*[.$Z$5]*MAGNET([.AY$24]+[.BB66])" office:value-type="float" office:value="-113.451280936086" calcext:value-type="float">
            <text:p>-113.45</text:p>
          </table:table-cell>
          <table:table-cell table:style-name="ce70" table:formula="of:=[.E$26]*[.$Z$5]*MAGNET([.E$24]+[.$BB66])+[.F$26]*[.$Z$5]*MAGNET([.F$24]+[.$BB66])+[.G$26]*[.$Z$5]*MAGNET([.G$24]+[.$BB66])+[.H$26]*[.$Z$5]*MAGNET([.H$24]+[.$BB66])+[.I$26]*[.$Z$5]*MAGNET([.I$24]+[.$BB66])+[.J$26]*[.$Z$5]*MAGNET([.J$24]+[.$BB66])+[.K$26]*[.$Z$5]*MAGNET([.K$24]+[.$BB66])+[.L$26]*[.$Z$5]*MAGNET([.L$24]+[.$BB66])+[.M$26]*[.$Z$5]*MAGNET([.M$24]+[.$BB66])+[.N$26]*[.$Z$5]*MAGNET([.N$24]+[.$BB66])+[.O$26]*[.$Z$5]*MAGNET([.O$24]+[.$BB66])+[.P$26]*[.$Z$5]*MAGNET([.P$24]+[.$BB66])+[.Q$26]*[.$Z$5]*MAGNET([.Q$24]+[.$BB66])+[.R$26]*[.$Z$5]*MAGNET([.R$24]+[.$BB66])+[.S$26]*[.$Z$5]*MAGNET([.S$24]+[.$BB66])+[.T$26]*[.$Z$5]*MAGNET([.T$24]+[.$BB66])+[.U$26]*[.$Z$5]*MAGNET([.U$24]+[.$BB66])+[.V$26]*[.$Z$5]*MAGNET([.V$24]+[.$BB66])+[.W$26]*[.$Z$5]*MAGNET([.W$24]+[.$BB66])+[.X$26]*[.$Z$5]*MAGNET([.X$24]+[.$BB66])+[.Y$26]*[.$Z$5]*MAGNET([.Y$24]+[.$BB66])+[.Z$26]*[.$Z$5]*MAGNET([.Z$24]+[.$BB66])+[.AA$26]*[.$Z$5]*MAGNET([.AA$24]+[.$BB66])+[.AB$26]*[.$Z$5]*MAGNET([.AB$24]+[.$BB66])+[.AC$26]*[.$Z$5]*MAGNET([.AC$24]+[.$BB66])+[.AD$26]*[.$Z$5]*MAGNET([.AD$24]+[.$BB66])+[.AE$26]*[.$Z$5]*MAGNET([.AE$24]+[.$BB66])+[.AF$26]*[.$Z$5]*MAGNET([.AF$24]+[.$BB66])+[.AG$26]*[.$Z$5]*MAGNET([.AG$24]+[.$BB66])+[.D$26]*[.$Z$5]*MAGNET([.D$24]+[.$BB66])+[.AH$26]*[.$Z$5]*MAGNET([.AH$24]+[.BB66]) +[.AI$26]*[.$Z$5]*MAGNET([.AI$24]+[.BB66]) +[.AJ$26]*[.$Z$5]*MAGNET([.AJ$24]+[.BB66]) +[.AK$26]*[.$Z$5]*MAGNET([.AK$24]+[.BB66]) +[.AL$26]*[.$Z$5]*MAGNET([.AL$24]+[.BB66]) +[.AM$26]*[.$Z$5]*MAGNET([.AM$24]+[.BB66]) +[.AN$26]*[.$Z$5]*MAGNET([.AN$24]+[.BB66]) +[.AO$26]*[.$Z$5]*MAGNET([.AO$24]+[.BB66]) +[.AP$26]*[.$Z$5]*MAGNET([.AP$24]+[.$BB66])&#10;+[.AQ$26]*[.$Z$5]*MAGNET([.AQ$24]+[.$BB66])&#10;+[.AR$26]*[.$Z$5]*MAGNET([.AR$24]+[.$BB66])&#10;+[.AS$26]*[.$Z$5]*MAGNET([.AS$24]+[.$BB66])&#10;+[.AT$26]*[.$Z$5]*MAGNET([.AT$24]+[.$BB66])&#10;+[.AU$26]*[.$Z$5]*MAGNET([.AU$24]+[.$BB66])&#10;+[.AV$26]*[.$Z$5]*MAGNET([.AV$24]+[.$BB66])&#10;+[.AW$26]*[.$Z$5]*MAGNET([.AW$24]+[.$BB66])&#10;+[.AX$26]*[.$Z$5]*MAGNET([.AX$24]+[.$BB66])&#10;+[.AY$26]*[.$Z$5]*MAGNET([.AY$24]+[.$BB66]) +RAND()*[.$BD$13]" office:value-type="float" office:value="60.534923373427" calcext:value-type="float">
            <text:p>60.53</text:p>
          </table:table-cell>
          <table:table-cell table:style-name="ce71" table:formula="of:=[.E$27]*[.$Z$5]*MAGNET([.E$24]+[.$BB66])+[.F$27]*[.$Z$5]*MAGNET([.F$24]+[.$BB66])+[.G$27]*[.$Z$5]*MAGNET([.G$24]+[.$BB66])+[.H$27]*[.$Z$5]*MAGNET([.H$24]+[.$BB66])+[.I$27]*[.$Z$5]*MAGNET([.I$24]+[.$BB66])+[.J$27]*[.$Z$5]*MAGNET([.J$24]+[.$BB66])+[.K$27]*[.$Z$5]*MAGNET([.K$24]+[.$BB66])+[.L$27]*[.$Z$5]*MAGNET([.L$24]+[.$BB66])+[.M$27]*[.$Z$5]*MAGNET([.M$24]+[.$BB66])+[.N$27]*[.$Z$5]*MAGNET([.N$24]+[.$BB66])+[.O$27]*[.$Z$5]*MAGNET([.O$24]+[.$BB66])+[.P$27]*[.$Z$5]*MAGNET([.P$24]+[.$BB66])+[.Q$27]*[.$Z$5]*MAGNET([.Q$24]+[.$BB66])+[.R$27]*[.$Z$5]*MAGNET([.R$24]+[.$BB66])+[.S$27]*[.$Z$5]*MAGNET([.S$24]+[.$BB66])+[.T$27]*[.$Z$5]*MAGNET([.T$24]+[.$BB66])+[.U$27]*[.$Z$5]*MAGNET([.U$24]+[.$BB66])+[.V$27]*[.$Z$5]*MAGNET([.V$24]+[.$BB66])+[.W$27]*[.$Z$5]*MAGNET([.W$24]+[.$BB66])+[.X$27]*[.$Z$5]*MAGNET([.X$24]+[.$BB66])+[.Y$27]*[.$Z$5]*MAGNET([.Y$24]+[.$BB66])+[.Z$27]*[.$Z$5]*MAGNET([.Z$24]+[.$BB66])+[.AA$27]*[.$Z$5]*MAGNET([.AA$24]+[.$BB66])+[.AB$27]*[.$Z$5]*MAGNET([.AB$24]+[.$BB66])+[.AC$27]*[.$Z$5]*MAGNET([.AC$24]+[.$BB66])+[.AD$27]*[.$Z$5]*MAGNET([.AD$24]+[.$BB66])+[.AE$27]*[.$Z$5]*MAGNET([.AE$24]+[.$BB66])+[.AF$27]*[.$Z$5]*MAGNET([.AF$24]+[.$BB66])+[.AG$27]*[.$Z$5]*MAGNET([.AG$24]+[.$BB66])+[.D$27]*[.$Z$5]*MAGNET([.D$24]+[.$BB66])+[.AH$27]*[.$Z$5]*MAGNET([.AH$24]+[.BB66]) +[.AI$27]*[.$Z$5]*MAGNET([.AI$24]+[.BB66]) +[.AJ$27]*[.$Z$5]*MAGNET([.AJ$24]+[.BB66]) +[.AK$27]*[.$Z$5]*MAGNET([.AK$24]+[.BB66]) +[.AL$27]*[.$Z$5]*MAGNET([.AL$24]+[.BB66]) +[.AM$27]*[.$Z$5]*MAGNET([.AM$24]+[.BB66]) +[.AN$27]*[.$Z$5]*MAGNET([.AN$24]+[.BB66]) +[.AO$27]*[.$Z$5]*MAGNET([.AO$24]+[.BB66]) +[.AP$27]*[.$Z$5]*MAGNET([.AP$24]+[.$BB66])&#10;+[.AQ$27]*[.$Z$5]*MAGNET([.AQ$24]+[.$BB66])&#10;+[.AR$27]*[.$Z$5]*MAGNET([.AR$24]+[.$BB66])&#10;+[.AS$27]*[.$Z$5]*MAGNET([.AS$24]+[.$BB66])&#10;+[.AT$27]*[.$Z$5]*MAGNET([.AT$24]+[.$BB66])&#10;+[.AU$27]*[.$Z$5]*MAGNET([.AU$24]+[.$BB66])&#10;+[.AV$27]*[.$Z$5]*MAGNET([.AV$24]+[.$BB66])&#10;+[.AW$27]*[.$Z$5]*MAGNET([.AW$24]+[.$BB66])&#10;+[.AX$27]*[.$Z$5]*MAGNET([.AX$24]+[.$BB66])&#10;+[.AY$27]*[.$Z$5]*MAGNET([.AY$24]+[.$BB66]) +RAND()*[.$BE$13]" office:value-type="float" office:value="83.8129671300721" calcext:value-type="float">
            <text:p>83.8129671300721</text:p>
          </table:table-cell>
          <table:table-cell table:style-name="ce71" table:formula="of:=[.E$28]*[.$Z$5]*MAGNET([.E$24]+[.$BB66])+[.F$28]*[.$Z$5]*MAGNET([.F$24]+[.$BB66])+[.G$28]*[.$Z$5]*MAGNET([.G$24]+[.$BB66])+[.H$28]*[.$Z$5]*MAGNET([.H$24]+[.$BB66])+[.I$28]*[.$Z$5]*MAGNET([.I$24]+[.$BB66])+[.J$28]*[.$Z$5]*MAGNET([.J$24]+[.$BB66])+[.K$28]*[.$Z$5]*MAGNET([.K$24]+[.$BB66])+[.L$28]*[.$Z$5]*MAGNET([.L$24]+[.$BB66])+[.M$28]*[.$Z$5]*MAGNET([.M$24]+[.$BB66])+[.N$28]*[.$Z$5]*MAGNET([.N$24]+[.$BB66])+[.O$28]*[.$Z$5]*MAGNET([.O$24]+[.$BB66])+[.P$28]*[.$Z$5]*MAGNET([.P$24]+[.$BB66])+[.Q$28]*[.$Z$5]*MAGNET([.Q$24]+[.$BB66])+[.R$28]*[.$Z$5]*MAGNET([.R$24]+[.$BB66])+[.S$28]*[.$Z$5]*MAGNET([.S$24]+[.$BB66])+[.T$28]*[.$Z$5]*MAGNET([.T$24]+[.$BB66])+[.U$28]*[.$Z$5]*MAGNET([.U$24]+[.$BB66])+[.V$28]*[.$Z$5]*MAGNET([.V$24]+[.$BB66])+[.W$28]*[.$Z$5]*MAGNET([.W$24]+[.$BB66])+[.X$28]*[.$Z$5]*MAGNET([.X$24]+[.$BB66])+[.Y$28]*[.$Z$5]*MAGNET([.Y$24]+[.$BB66])+[.Z$28]*[.$Z$5]*MAGNET([.Z$24]+[.$BB66])+[.AA$28]*[.$Z$5]*MAGNET([.AA$24]+[.$BB66])+[.AB$28]*[.$Z$5]*MAGNET([.AB$24]+[.$BB66])+[.AC$28]*[.$Z$5]*MAGNET([.AC$24]+[.$BB66])+[.AD$28]*[.$Z$5]*MAGNET([.AD$24]+[.$BB66])+[.AE$28]*[.$Z$5]*MAGNET([.AE$24]+[.$BB66])+[.AF$28]*[.$Z$5]*MAGNET([.AF$24]+[.$BB66])+[.AG$28]*[.$Z$5]*MAGNET([.AG$24]+[.$BB66])+[.D$28]*[.$Z$5]*MAGNET([.D$24]+[.$BB66])+[.AH$28]*[.$Z$5]*MAGNET([.AH$24]+[.BB66]) +[.AI$28]*[.$Z$5]*MAGNET([.AI$24]+[.BB66]) +[.AJ$28]*[.$Z$5]*MAGNET([.AJ$24]+[.BB66]) +[.AK$28]*[.$Z$5]*MAGNET([.AK$24]+[.BB66]) +[.AL$28]*[.$Z$5]*MAGNET([.AL$24]+[.BB66]) +[.AM$28]*[.$Z$5]*MAGNET([.AM$24]+[.BB66]) +[.AN$28]*[.$Z$5]*MAGNET([.AN$24]+[.BB66]) +[.AO$28]*[.$Z$5]*MAGNET([.AO$24]+[.BB66]) +[.AP$28]*[.$Z$5]*MAGNET([.AP$24]+[.$BB66])&#10;+[.AQ$28]*[.$Z$5]*MAGNET([.AQ$24]+[.$BB66])&#10;+[.AR$28]*[.$Z$5]*MAGNET([.AR$24]+[.$BB66])&#10;+[.AS$28]*[.$Z$5]*MAGNET([.AS$24]+[.$BB66])&#10;+[.AT$28]*[.$Z$5]*MAGNET([.AT$24]+[.$BB66])&#10;+[.AU$28]*[.$Z$5]*MAGNET([.AU$24]+[.$BB66])&#10;+[.AV$28]*[.$Z$5]*MAGNET([.AV$24]+[.$BB66])&#10;+[.AW$28]*[.$Z$5]*MAGNET([.AW$24]+[.$BB66])&#10;+[.AX$28]*[.$Z$5]*MAGNET([.AX$24]+[.$BB66])&#10;+[.AY$28]*[.$Z$5]*MAGNET([.AY$24]+[.$BB66]) +RAND()*[.$BF$13]" office:value-type="float" office:value="8.62498974354245" calcext:value-type="float">
            <text:p>8.62498974354245</text:p>
          </table:table-cell>
          <table:table-cell table:style-name="ce71" table:formula="of:=[.E$29]*[.$Z$5]*MAGNET([.E$24]+[.$BB66])+[.F$29]*[.$Z$5]*MAGNET([.F$24]+[.$BB66])+[.G$29]*[.$Z$5]*MAGNET([.G$24]+[.$BB66])+[.H$29]*[.$Z$5]*MAGNET([.H$24]+[.$BB66])+[.I$29]*[.$Z$5]*MAGNET([.I$24]+[.$BB66])+[.J$29]*[.$Z$5]*MAGNET([.J$24]+[.$BB66])+[.K$29]*[.$Z$5]*MAGNET([.K$24]+[.$BB66])+[.L$29]*[.$Z$5]*MAGNET([.L$24]+[.$BB66])+[.M$29]*[.$Z$5]*MAGNET([.M$24]+[.$BB66])+[.N$29]*[.$Z$5]*MAGNET([.N$24]+[.$BB66])+[.O$29]*[.$Z$5]*MAGNET([.O$24]+[.$BB66])+[.P$29]*[.$Z$5]*MAGNET([.P$24]+[.$BB66])+[.Q$29]*[.$Z$5]*MAGNET([.Q$24]+[.$BB66])+[.R$29]*[.$Z$5]*MAGNET([.R$24]+[.$BB66])+[.S$29]*[.$Z$5]*MAGNET([.S$24]+[.$BB66])+[.T$29]*[.$Z$5]*MAGNET([.T$24]+[.$BB66])+[.U$29]*[.$Z$5]*MAGNET([.U$24]+[.$BB66])+[.V$29]*[.$Z$5]*MAGNET([.V$24]+[.$BB66])+[.W$29]*[.$Z$5]*MAGNET([.W$24]+[.$BB66])+[.X$29]*[.$Z$5]*MAGNET([.X$24]+[.$BB66])+[.Y$29]*[.$Z$5]*MAGNET([.Y$24]+[.$BB66])+[.Z$29]*[.$Z$5]*MAGNET([.Z$24]+[.$BB66])+[.AA$29]*[.$Z$5]*MAGNET([.AA$24]+[.$BB66])+[.AB$29]*[.$Z$5]*MAGNET([.AB$24]+[.$BB66])+[.AC$29]*[.$Z$5]*MAGNET([.AC$24]+[.$BB66])+[.AD$29]*[.$Z$5]*MAGNET([.AD$24]+[.$BB66])+[.AE$29]*[.$Z$5]*MAGNET([.AE$24]+[.$BB66])+[.AF$29]*[.$Z$5]*MAGNET([.AF$24]+[.$BB66])+[.AG$29]*[.$Z$5]*MAGNET([.AG$24]+[.$BB66])+[.D$29]*[.$Z$5]*MAGNET([.D$24]+[.$BB66])+[.AH$29]*[.$Z$5]*MAGNET([.AH$24]+[.BB66]) +[.AI$29]*[.$Z$5]*MAGNET([.AI$24]+[.BB66]) +[.AJ$29]*[.$Z$5]*MAGNET([.AJ$24]+[.BB66]) +[.AK$29]*[.$Z$5]*MAGNET([.AK$24]+[.BB66]) +[.AL$29]*[.$Z$5]*MAGNET([.AL$24]+[.BB66]) +[.AM$29]*[.$Z$5]*MAGNET([.AM$24]+[.BB66]) +[.AN$29]*[.$Z$5]*MAGNET([.AN$24]+[.BB66]) +[.AO$29]*[.$Z$5]*MAGNET([.AO$24]+[.BB66]) +[.AP$29]*[.$Z$5]*MAGNET([.AP$24]+[.$BB66])&#10;+[.AQ$29]*[.$Z$5]*MAGNET([.AQ$24]+[.$BB66])&#10;+[.AR$29]*[.$Z$5]*MAGNET([.AR$24]+[.$BB66])&#10;+[.AS$29]*[.$Z$5]*MAGNET([.AS$24]+[.$BB66])&#10;+[.AT$29]*[.$Z$5]*MAGNET([.AT$24]+[.$BB66])&#10;+[.AU$29]*[.$Z$5]*MAGNET([.AU$24]+[.$BB66])&#10;+[.AV$29]*[.$Z$5]*MAGNET([.AV$24]+[.$BB66])&#10;+[.AW$29]*[.$Z$5]*MAGNET([.AW$24]+[.$BB66])&#10;+[.AX$29]*[.$Z$5]*MAGNET([.AX$24]+[.$BB66])&#10;+[.AY$29]*[.$Z$5]*MAGNET([.AY$24]+[.$BB66]) +RAND()*[.$BG$13]" office:value-type="float" office:value="-28.1797977777671" calcext:value-type="float">
            <text:p>-28.1797977777671</text:p>
          </table:table-cell>
          <table:table-cell table:style-name="ce71" table:formula="of:=[.E$30]*[.$Z$5]*MAGNET([.E$24]+[.$BB66])+[.F$30]*[.$Z$5]*MAGNET([.F$24]+[.$BB66])+[.G$30]*[.$Z$5]*MAGNET([.G$24]+[.$BB66])+[.H$30]*[.$Z$5]*MAGNET([.H$24]+[.$BB66])+[.I$30]*[.$Z$5]*MAGNET([.I$24]+[.$BB66])+[.J$30]*[.$Z$5]*MAGNET([.J$24]+[.$BB66])+[.K$30]*[.$Z$5]*MAGNET([.K$24]+[.$BB66])+[.L$30]*[.$Z$5]*MAGNET([.L$24]+[.$BB66])+[.M$30]*[.$Z$5]*MAGNET([.M$24]+[.$BB66])+[.N$30]*[.$Z$5]*MAGNET([.N$24]+[.$BB66])+[.O$30]*[.$Z$5]*MAGNET([.O$24]+[.$BB66])+[.P$30]*[.$Z$5]*MAGNET([.P$24]+[.$BB66])+[.Q$30]*[.$Z$5]*MAGNET([.Q$24]+[.$BB66])+[.R$30]*[.$Z$5]*MAGNET([.R$24]+[.$BB66])+[.S$30]*[.$Z$5]*MAGNET([.S$24]+[.$BB66])+[.T$30]*[.$Z$5]*MAGNET([.T$24]+[.$BB66])+[.U$30]*[.$Z$5]*MAGNET([.U$24]+[.$BB66])+[.V$30]*[.$Z$5]*MAGNET([.V$24]+[.$BB66])+[.W$30]*[.$Z$5]*MAGNET([.W$24]+[.$BB66])+[.X$30]*[.$Z$5]*MAGNET([.X$24]+[.$BB66])+[.Y$30]*[.$Z$5]*MAGNET([.Y$24]+[.$BB66])+[.Z$30]*[.$Z$5]*MAGNET([.Z$24]+[.$BB66])+[.AA$30]*[.$Z$5]*MAGNET([.AA$24]+[.$BB66])+[.AB$30]*[.$Z$5]*MAGNET([.AB$24]+[.$BB66])+[.AC$30]*[.$Z$5]*MAGNET([.AC$24]+[.$BB66])+[.AD$30]*[.$Z$5]*MAGNET([.AD$24]+[.$BB66])+[.AE$30]*[.$Z$5]*MAGNET([.AE$24]+[.$BB66])+[.AF$30]*[.$Z$5]*MAGNET([.AF$24]+[.$BB66])+[.AG$30]*[.$Z$5]*MAGNET([.AG$24]+[.$BB66])+[.D$30]*[.$Z$5]*MAGNET([.D$24]+[.$BB66])+[.AH$30]*[.$Z$5]*MAGNET([.AH$24]+[.BB66]) +[.AI$30]*[.$Z$5]*MAGNET([.AI$24]+[.BB66]) +[.AJ$30]*[.$Z$5]*MAGNET([.AJ$24]+[.BB66]) +[.AK$30]*[.$Z$5]*MAGNET([.AK$24]+[.BB66]) +[.AL$30]*[.$Z$5]*MAGNET([.AL$24]+[.BB66]) +[.AM$30]*[.$Z$5]*MAGNET([.AM$24]+[.BB66]) +[.AN$30]*[.$Z$5]*MAGNET([.AN$24]+[.BB66]) +[.AO$30]*[.$Z$5]*MAGNET([.AO$24]+[.BB66]) +[.AP$30]*[.$Z$5]*MAGNET([.AP$24]+[.$BB66])&#10;+[.AQ$30]*[.$Z$5]*MAGNET([.AQ$24]+[.$BB66])&#10;+[.AR$30]*[.$Z$5]*MAGNET([.AR$24]+[.$BB66])&#10;+[.AS$30]*[.$Z$5]*MAGNET([.AS$24]+[.$BB66])&#10;+[.AT$30]*[.$Z$5]*MAGNET([.AT$24]+[.$BB66])&#10;+[.AU$30]*[.$Z$5]*MAGNET([.AU$24]+[.$BB66])&#10;+[.AV$30]*[.$Z$5]*MAGNET([.AV$24]+[.$BB66])&#10;+[.AW$30]*[.$Z$5]*MAGNET([.AW$24]+[.$BB66])&#10;+[.AX$30]*[.$Z$5]*MAGNET([.AX$24]+[.$BB66])&#10;+[.AY$30]*[.$Z$5]*MAGNET([.AY$24]+[.$BB66]) +RAND()*[.$BH$13]" office:value-type="float" office:value="0" calcext:value-type="float">
            <text:p>0</text:p>
          </table:table-cell>
          <table:table-cell table:style-name="ce71" table:formula="of:=[.E$31]*[.$Z$5]*MAGNET([.E$24]+[.$BB66])+[.F$31]*[.$Z$5]*MAGNET([.F$24]+[.$BB66])+[.G$31]*[.$Z$5]*MAGNET([.G$24]+[.$BB66])+[.H$31]*[.$Z$5]*MAGNET([.H$24]+[.$BB66])+[.I$31]*[.$Z$5]*MAGNET([.I$24]+[.$BB66])+[.J$31]*[.$Z$5]*MAGNET([.J$24]+[.$BB66])+[.K$31]*[.$Z$5]*MAGNET([.K$24]+[.$BB66])+[.L$31]*[.$Z$5]*MAGNET([.L$24]+[.$BB66])+[.M$31]*[.$Z$5]*MAGNET([.M$24]+[.$BB66])+[.N$31]*[.$Z$5]*MAGNET([.N$24]+[.$BB66])+[.O$31]*[.$Z$5]*MAGNET([.O$24]+[.$BB66])+[.P$31]*[.$Z$5]*MAGNET([.P$24]+[.$BB66])+[.Q$31]*[.$Z$5]*MAGNET([.Q$24]+[.$BB66])+[.R$31]*[.$Z$5]*MAGNET([.R$24]+[.$BB66])+[.S$31]*[.$Z$5]*MAGNET([.S$24]+[.$BB66])+[.T$31]*[.$Z$5]*MAGNET([.T$24]+[.$BB66])+[.U$31]*[.$Z$5]*MAGNET([.U$24]+[.$BB66])+[.V$31]*[.$Z$5]*MAGNET([.V$24]+[.$BB66])+[.W$31]*[.$Z$5]*MAGNET([.W$24]+[.$BB66])+[.X$31]*[.$Z$5]*MAGNET([.X$24]+[.$BB66])+[.Y$31]*[.$Z$5]*MAGNET([.Y$24]+[.$BB66])+[.Z$31]*[.$Z$5]*MAGNET([.Z$24]+[.$BB66])+[.AA$31]*[.$Z$5]*MAGNET([.AA$24]+[.$BB66])+[.AB$31]*[.$Z$5]*MAGNET([.AB$24]+[.$BB66])+[.AC$31]*[.$Z$5]*MAGNET([.AC$24]+[.$BB66])+[.AD$31]*[.$Z$5]*MAGNET([.AD$24]+[.$BB66])+[.AE$31]*[.$Z$5]*MAGNET([.AE$24]+[.$BB66])+[.AF$31]*[.$Z$5]*MAGNET([.AF$24]+[.$BB66])+[.AG$31]*[.$Z$5]*MAGNET([.AG$24]+[.$BB66])+[.D$31]*[.$Z$5]*MAGNET([.D$24]+[.$BB66])+[.AH$31]*[.$Z$5]*MAGNET([.AH$24]+[.BB66]) +[.AI$31]*[.$Z$5]*MAGNET([.AI$24]+[.BB66]) +[.AJ$31]*[.$Z$5]*MAGNET([.AJ$24]+[.BB66]) +[.AK$31]*[.$Z$5]*MAGNET([.AK$24]+[.BB66]) +[.AL$31]*[.$Z$5]*MAGNET([.AL$24]+[.BB66]) +[.AM$31]*[.$Z$5]*MAGNET([.AM$24]+[.BB66]) +[.AN$31]*[.$Z$5]*MAGNET([.AN$24]+[.BB66]) +[.AO$31]*[.$Z$5]*MAGNET([.AO$24]+[.BB66]) +[.AP$31]*[.$Z$5]*MAGNET([.AP$24]+[.$BB66])&#10;+[.AQ$31]*[.$Z$5]*MAGNET([.AQ$24]+[.$BB66])&#10;+[.AR$31]*[.$Z$5]*MAGNET([.AR$24]+[.$BB66])&#10;+[.AS$31]*[.$Z$5]*MAGNET([.AS$24]+[.$BB66])&#10;+[.AT$31]*[.$Z$5]*MAGNET([.AT$24]+[.$BB66])&#10;+[.AU$31]*[.$Z$5]*MAGNET([.AU$24]+[.$BB66])&#10;+[.AV$31]*[.$Z$5]*MAGNET([.AV$24]+[.$BB66])&#10;+[.AW$31]*[.$Z$5]*MAGNET([.AW$24]+[.$BB66])&#10;+[.AX$31]*[.$Z$5]*MAGNET([.AX$24]+[.$BB66])&#10;+[.AY$31]*[.$Z$5]*MAGNET([.AY$24]+[.$BB66]) +RAND()*[.$BI$13]" office:value-type="float" office:value="0" calcext:value-type="float">
            <text:p>0</text:p>
          </table:table-cell>
          <table:table-cell table:style-name="ce71" table:formula="of:=[.E$32]*[.$Z$5]*MAGNET([.E$24]+[.$BB66])+[.F$32]*[.$Z$5]*MAGNET([.F$24]+[.$BB66])+[.G$32]*[.$Z$5]*MAGNET([.G$24]+[.$BB66])+[.H$32]*[.$Z$5]*MAGNET([.H$24]+[.$BB66])+[.I$32]*[.$Z$5]*MAGNET([.I$24]+[.$BB66])+[.J$32]*[.$Z$5]*MAGNET([.J$24]+[.$BB66])+[.K$32]*[.$Z$5]*MAGNET([.K$24]+[.$BB66])+[.L$32]*[.$Z$5]*MAGNET([.L$24]+[.$BB66])+[.M$32]*[.$Z$5]*MAGNET([.M$24]+[.$BB66])+[.N$32]*[.$Z$5]*MAGNET([.N$24]+[.$BB66])+[.O$32]*[.$Z$5]*MAGNET([.O$24]+[.$BB66])+[.P$32]*[.$Z$5]*MAGNET([.P$24]+[.$BB66])+[.Q$32]*[.$Z$5]*MAGNET([.Q$24]+[.$BB66])+[.R$32]*[.$Z$5]*MAGNET([.R$24]+[.$BB66])+[.S$32]*[.$Z$5]*MAGNET([.S$24]+[.$BB66])+[.T$32]*[.$Z$5]*MAGNET([.T$24]+[.$BB66])+[.U$32]*[.$Z$5]*MAGNET([.U$24]+[.$BB66])+[.V$32]*[.$Z$5]*MAGNET([.V$24]+[.$BB66])+[.W$32]*[.$Z$5]*MAGNET([.W$24]+[.$BB66])+[.X$32]*[.$Z$5]*MAGNET([.X$24]+[.$BB66])+[.Y$32]*[.$Z$5]*MAGNET([.Y$24]+[.$BB66])+[.Z$32]*[.$Z$5]*MAGNET([.Z$24]+[.$BB66])+[.AA$32]*[.$Z$5]*MAGNET([.AA$24]+[.$BB66])+[.AB$32]*[.$Z$5]*MAGNET([.AB$24]+[.$BB66])+[.AC$32]*[.$Z$5]*MAGNET([.AC$24]+[.$BB66])+[.AD$32]*[.$Z$5]*MAGNET([.AD$24]+[.$BB66])+[.AE$32]*[.$Z$5]*MAGNET([.AE$24]+[.$BB66])+[.AF$32]*[.$Z$5]*MAGNET([.AF$24]+[.$BB66])+[.AG$32]*[.$Z$5]*MAGNET([.AG$24]+[.$BB66])+[.D$32]*[.$Z$5]*MAGNET([.D$24]+[.$BB66])+[.AH$32]*[.$Z$5]*MAGNET([.AH$24]+[.BB66]) +[.AI$32]*[.$Z$5]*MAGNET([.AI$24]+[.BB66]) +[.AJ$32]*[.$Z$5]*MAGNET([.AJ$24]+[.BB66]) +[.AK$32]*[.$Z$5]*MAGNET([.AK$24]+[.BB66]) +[.AL$32]*[.$Z$5]*MAGNET([.AL$24]+[.BB66]) +[.AM$32]*[.$Z$5]*MAGNET([.AM$24]+[.BB66]) +[.AN$32]*[.$Z$5]*MAGNET([.AN$24]+[.BB66]) +[.AO$32]*[.$Z$5]*MAGNET([.AO$24]+[.BB66]) +[.AP$32]*[.$Z$5]*MAGNET([.AP$24]+[.$BB66])&#10;+[.AQ$32]*[.$Z$5]*MAGNET([.AQ$24]+[.$BB66])&#10;+[.AR$32]*[.$Z$5]*MAGNET([.AR$24]+[.$BB66])&#10;+[.AS$32]*[.$Z$5]*MAGNET([.AS$24]+[.$BB66])&#10;+[.AT$32]*[.$Z$5]*MAGNET([.AT$24]+[.$BB66])&#10;+[.AU$32]*[.$Z$5]*MAGNET([.AU$24]+[.$BB66])&#10;+[.AV$32]*[.$Z$5]*MAGNET([.AV$24]+[.$BB66])&#10;+[.AW$32]*[.$Z$5]*MAGNET([.AW$24]+[.$BB66])&#10;+[.AX$32]*[.$Z$5]*MAGNET([.AX$24]+[.$BB66])&#10;+[.AY$32]*[.$Z$5]*MAGNET([.AY$24]+[.$BB6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6]+0.002" office:value-type="float" office:value="0.104" calcext:value-type="float">
            <text:p>0.104</text:p>
          </table:table-cell>
          <table:table-cell table:formula="of:=[.BA67]*[.$D$6]" office:value-type="float" office:value="5.22761017557342" calcext:value-type="float">
            <text:p>5.228</text:p>
          </table:table-cell>
          <table:table-cell table:formula="of:=[.D$25]*[.$Z$5]*MAGNET([.D$24]+[.BB67])+[.E$25]*[.$Z$5]*MAGNET([.E$24]+[.BB67])+[.F$25]*[.$Z$5]*MAGNET([.F$24]+[.BB67])+[.G$25]*[.$Z$5]*MAGNET([.G$24]+[.BB67])+[.H$25]*[.$Z$5]*MAGNET([.H$24]+[.BB67])+[.I$25]*[.$Z$5]*MAGNET([.I$24]+[.BB67])+[.J$25]*[.$Z$5]*MAGNET([.J$24]+[.BB67])+[.K$25]*[.$Z$5]*MAGNET([.K$24]+[.BB67])+[.L$25]*[.$Z$5]*MAGNET([.L$24]+[.BB67])+[.M$25]*[.$Z$5]*MAGNET([.M$24]+[.BB67])+[.N$25]*[.$Z$5]*MAGNET([.N$24]+[.BB67])+[.O$25]*[.$Z$5]*MAGNET([.O$24]+[.BB67])+[.P$25]*[.$Z$5]*MAGNET([.P$24]+[.BB67])+[.Q$25]*[.$Z$5]*MAGNET([.Q$24]+[.BB67])+[.R$25]*[.$Z$5]*MAGNET([.R$24]+[.BB67])+[.S$25]*[.$Z$5]*MAGNET([.S$24]+[.BB67])+[.T$25]*[.$Z$5]*MAGNET([.T$24]+[.BB67])+[.U$25]*[.$Z$5]*MAGNET([.U$24]+[.BB67])+[.V$25]*[.$Z$5]*MAGNET([.V$24]+[.BB67])+[.W$25]*[.$Z$5]*MAGNET([.W$24]+[.BB67])+[.X$25]*[.$Z$5]*MAGNET([.X$24]+[.BB67])+[.Y$25]*[.$Z$5]*MAGNET([.Y$24]+[.BB67])+[.Z$25]*[.$Z$5]*MAGNET([.Z$24]+[.BB67])+[.AA$25]*[.$Z$5]*MAGNET([.AA$24]+[.BB67])+[.AB$25]*[.$Z$5]*MAGNET([.AB$24]+[.BB67])+[.AC$25]*[.$Z$5]*MAGNET([.AC$24]+[.BB67])+[.AD$25]*[.$Z$5]*MAGNET([.AD$24]+[.BB67])+[.AE$25]*[.$Z$5]*MAGNET([.AE$24]+[.BB67])+[.AF$25]*[.$Z$5]*MAGNET([.AF$24]+[.BB67])+[.AG$25]*[.$Z$5]*MAGNET([.AG$24]+[.BB67])+[.AH$25]*[.$Z$5]*MAGNET([.AH$24]+[.BB67]) +[.AI$25]*[.$Z$5]*MAGNET([.AI$24]+[.BB67]) +[.AJ$25]*[.$Z$5]*MAGNET([.AJ$24]+[.BB67]) +[.AK$25]*[.$Z$5]*MAGNET([.AK$24]+[.BB67]) +[.AL$25]*[.$Z$5]*MAGNET([.AL$24]+[.BB67]) +[.AM$25]*[.$Z$5]*MAGNET([.AM$24]+[.BB67]) +[.AN$25]*[.$Z$5]*MAGNET([.AN$24]+[.BB67]) +[.AO$25]*[.$Z$5]*MAGNET([.AO$24]+[.BB67])+RAND()*[.$BC$13]+[.AP$25]*[.$Z$5]*MAGNET([.AP$24]+[.BB67])&#10;+[.AQ$25]*[.$Z$5]*MAGNET([.AQ$24]+[.BB67])&#10;+[.AR$25]*[.$Z$5]*MAGNET([.AR$24]+[.BB67])&#10;+[.AS$25]*[.$Z$5]*MAGNET([.AS$24]+[.BB67])&#10;+[.AT$25]*[.$Z$5]*MAGNET([.AT$24]+[.BB67])&#10;+[.AU$25]*[.$Z$5]*MAGNET([.AU$24]+[.BB67])&#10;+[.AV$25]*[.$Z$5]*MAGNET([.AV$24]+[.BB67])&#10;+[.AW$25]*[.$Z$5]*MAGNET([.AW$24]+[.BB67])&#10;+[.AX$25]*[.$Z$5]*MAGNET([.AX$24]+[.BB67])&#10;+[.AY$25]*[.$Z$5]*MAGNET([.AY$24]+[.BB67])" office:value-type="float" office:value="-112.788507145977" calcext:value-type="float">
            <text:p>-112.79</text:p>
          </table:table-cell>
          <table:table-cell table:style-name="ce70" table:formula="of:=[.E$26]*[.$Z$5]*MAGNET([.E$24]+[.$BB67])+[.F$26]*[.$Z$5]*MAGNET([.F$24]+[.$BB67])+[.G$26]*[.$Z$5]*MAGNET([.G$24]+[.$BB67])+[.H$26]*[.$Z$5]*MAGNET([.H$24]+[.$BB67])+[.I$26]*[.$Z$5]*MAGNET([.I$24]+[.$BB67])+[.J$26]*[.$Z$5]*MAGNET([.J$24]+[.$BB67])+[.K$26]*[.$Z$5]*MAGNET([.K$24]+[.$BB67])+[.L$26]*[.$Z$5]*MAGNET([.L$24]+[.$BB67])+[.M$26]*[.$Z$5]*MAGNET([.M$24]+[.$BB67])+[.N$26]*[.$Z$5]*MAGNET([.N$24]+[.$BB67])+[.O$26]*[.$Z$5]*MAGNET([.O$24]+[.$BB67])+[.P$26]*[.$Z$5]*MAGNET([.P$24]+[.$BB67])+[.Q$26]*[.$Z$5]*MAGNET([.Q$24]+[.$BB67])+[.R$26]*[.$Z$5]*MAGNET([.R$24]+[.$BB67])+[.S$26]*[.$Z$5]*MAGNET([.S$24]+[.$BB67])+[.T$26]*[.$Z$5]*MAGNET([.T$24]+[.$BB67])+[.U$26]*[.$Z$5]*MAGNET([.U$24]+[.$BB67])+[.V$26]*[.$Z$5]*MAGNET([.V$24]+[.$BB67])+[.W$26]*[.$Z$5]*MAGNET([.W$24]+[.$BB67])+[.X$26]*[.$Z$5]*MAGNET([.X$24]+[.$BB67])+[.Y$26]*[.$Z$5]*MAGNET([.Y$24]+[.$BB67])+[.Z$26]*[.$Z$5]*MAGNET([.Z$24]+[.$BB67])+[.AA$26]*[.$Z$5]*MAGNET([.AA$24]+[.$BB67])+[.AB$26]*[.$Z$5]*MAGNET([.AB$24]+[.$BB67])+[.AC$26]*[.$Z$5]*MAGNET([.AC$24]+[.$BB67])+[.AD$26]*[.$Z$5]*MAGNET([.AD$24]+[.$BB67])+[.AE$26]*[.$Z$5]*MAGNET([.AE$24]+[.$BB67])+[.AF$26]*[.$Z$5]*MAGNET([.AF$24]+[.$BB67])+[.AG$26]*[.$Z$5]*MAGNET([.AG$24]+[.$BB67])+[.D$26]*[.$Z$5]*MAGNET([.D$24]+[.$BB67])+[.AH$26]*[.$Z$5]*MAGNET([.AH$24]+[.BB67]) +[.AI$26]*[.$Z$5]*MAGNET([.AI$24]+[.BB67]) +[.AJ$26]*[.$Z$5]*MAGNET([.AJ$24]+[.BB67]) +[.AK$26]*[.$Z$5]*MAGNET([.AK$24]+[.BB67]) +[.AL$26]*[.$Z$5]*MAGNET([.AL$24]+[.BB67]) +[.AM$26]*[.$Z$5]*MAGNET([.AM$24]+[.BB67]) +[.AN$26]*[.$Z$5]*MAGNET([.AN$24]+[.BB67]) +[.AO$26]*[.$Z$5]*MAGNET([.AO$24]+[.BB67]) +[.AP$26]*[.$Z$5]*MAGNET([.AP$24]+[.$BB67])&#10;+[.AQ$26]*[.$Z$5]*MAGNET([.AQ$24]+[.$BB67])&#10;+[.AR$26]*[.$Z$5]*MAGNET([.AR$24]+[.$BB67])&#10;+[.AS$26]*[.$Z$5]*MAGNET([.AS$24]+[.$BB67])&#10;+[.AT$26]*[.$Z$5]*MAGNET([.AT$24]+[.$BB67])&#10;+[.AU$26]*[.$Z$5]*MAGNET([.AU$24]+[.$BB67])&#10;+[.AV$26]*[.$Z$5]*MAGNET([.AV$24]+[.$BB67])&#10;+[.AW$26]*[.$Z$5]*MAGNET([.AW$24]+[.$BB67])&#10;+[.AX$26]*[.$Z$5]*MAGNET([.AX$24]+[.$BB67])&#10;+[.AY$26]*[.$Z$5]*MAGNET([.AY$24]+[.$BB67]) +RAND()*[.$BD$13]" office:value-type="float" office:value="66.8497775324572" calcext:value-type="float">
            <text:p>66.85</text:p>
          </table:table-cell>
          <table:table-cell table:style-name="ce71" table:formula="of:=[.E$27]*[.$Z$5]*MAGNET([.E$24]+[.$BB67])+[.F$27]*[.$Z$5]*MAGNET([.F$24]+[.$BB67])+[.G$27]*[.$Z$5]*MAGNET([.G$24]+[.$BB67])+[.H$27]*[.$Z$5]*MAGNET([.H$24]+[.$BB67])+[.I$27]*[.$Z$5]*MAGNET([.I$24]+[.$BB67])+[.J$27]*[.$Z$5]*MAGNET([.J$24]+[.$BB67])+[.K$27]*[.$Z$5]*MAGNET([.K$24]+[.$BB67])+[.L$27]*[.$Z$5]*MAGNET([.L$24]+[.$BB67])+[.M$27]*[.$Z$5]*MAGNET([.M$24]+[.$BB67])+[.N$27]*[.$Z$5]*MAGNET([.N$24]+[.$BB67])+[.O$27]*[.$Z$5]*MAGNET([.O$24]+[.$BB67])+[.P$27]*[.$Z$5]*MAGNET([.P$24]+[.$BB67])+[.Q$27]*[.$Z$5]*MAGNET([.Q$24]+[.$BB67])+[.R$27]*[.$Z$5]*MAGNET([.R$24]+[.$BB67])+[.S$27]*[.$Z$5]*MAGNET([.S$24]+[.$BB67])+[.T$27]*[.$Z$5]*MAGNET([.T$24]+[.$BB67])+[.U$27]*[.$Z$5]*MAGNET([.U$24]+[.$BB67])+[.V$27]*[.$Z$5]*MAGNET([.V$24]+[.$BB67])+[.W$27]*[.$Z$5]*MAGNET([.W$24]+[.$BB67])+[.X$27]*[.$Z$5]*MAGNET([.X$24]+[.$BB67])+[.Y$27]*[.$Z$5]*MAGNET([.Y$24]+[.$BB67])+[.Z$27]*[.$Z$5]*MAGNET([.Z$24]+[.$BB67])+[.AA$27]*[.$Z$5]*MAGNET([.AA$24]+[.$BB67])+[.AB$27]*[.$Z$5]*MAGNET([.AB$24]+[.$BB67])+[.AC$27]*[.$Z$5]*MAGNET([.AC$24]+[.$BB67])+[.AD$27]*[.$Z$5]*MAGNET([.AD$24]+[.$BB67])+[.AE$27]*[.$Z$5]*MAGNET([.AE$24]+[.$BB67])+[.AF$27]*[.$Z$5]*MAGNET([.AF$24]+[.$BB67])+[.AG$27]*[.$Z$5]*MAGNET([.AG$24]+[.$BB67])+[.D$27]*[.$Z$5]*MAGNET([.D$24]+[.$BB67])+[.AH$27]*[.$Z$5]*MAGNET([.AH$24]+[.BB67]) +[.AI$27]*[.$Z$5]*MAGNET([.AI$24]+[.BB67]) +[.AJ$27]*[.$Z$5]*MAGNET([.AJ$24]+[.BB67]) +[.AK$27]*[.$Z$5]*MAGNET([.AK$24]+[.BB67]) +[.AL$27]*[.$Z$5]*MAGNET([.AL$24]+[.BB67]) +[.AM$27]*[.$Z$5]*MAGNET([.AM$24]+[.BB67]) +[.AN$27]*[.$Z$5]*MAGNET([.AN$24]+[.BB67]) +[.AO$27]*[.$Z$5]*MAGNET([.AO$24]+[.BB67]) +[.AP$27]*[.$Z$5]*MAGNET([.AP$24]+[.$BB67])&#10;+[.AQ$27]*[.$Z$5]*MAGNET([.AQ$24]+[.$BB67])&#10;+[.AR$27]*[.$Z$5]*MAGNET([.AR$24]+[.$BB67])&#10;+[.AS$27]*[.$Z$5]*MAGNET([.AS$24]+[.$BB67])&#10;+[.AT$27]*[.$Z$5]*MAGNET([.AT$24]+[.$BB67])&#10;+[.AU$27]*[.$Z$5]*MAGNET([.AU$24]+[.$BB67])&#10;+[.AV$27]*[.$Z$5]*MAGNET([.AV$24]+[.$BB67])&#10;+[.AW$27]*[.$Z$5]*MAGNET([.AW$24]+[.$BB67])&#10;+[.AX$27]*[.$Z$5]*MAGNET([.AX$24]+[.$BB67])&#10;+[.AY$27]*[.$Z$5]*MAGNET([.AY$24]+[.$BB67]) +RAND()*[.$BE$13]" office:value-type="float" office:value="66.4679855538504" calcext:value-type="float">
            <text:p>66.4679855538504</text:p>
          </table:table-cell>
          <table:table-cell table:style-name="ce71" table:formula="of:=[.E$28]*[.$Z$5]*MAGNET([.E$24]+[.$BB67])+[.F$28]*[.$Z$5]*MAGNET([.F$24]+[.$BB67])+[.G$28]*[.$Z$5]*MAGNET([.G$24]+[.$BB67])+[.H$28]*[.$Z$5]*MAGNET([.H$24]+[.$BB67])+[.I$28]*[.$Z$5]*MAGNET([.I$24]+[.$BB67])+[.J$28]*[.$Z$5]*MAGNET([.J$24]+[.$BB67])+[.K$28]*[.$Z$5]*MAGNET([.K$24]+[.$BB67])+[.L$28]*[.$Z$5]*MAGNET([.L$24]+[.$BB67])+[.M$28]*[.$Z$5]*MAGNET([.M$24]+[.$BB67])+[.N$28]*[.$Z$5]*MAGNET([.N$24]+[.$BB67])+[.O$28]*[.$Z$5]*MAGNET([.O$24]+[.$BB67])+[.P$28]*[.$Z$5]*MAGNET([.P$24]+[.$BB67])+[.Q$28]*[.$Z$5]*MAGNET([.Q$24]+[.$BB67])+[.R$28]*[.$Z$5]*MAGNET([.R$24]+[.$BB67])+[.S$28]*[.$Z$5]*MAGNET([.S$24]+[.$BB67])+[.T$28]*[.$Z$5]*MAGNET([.T$24]+[.$BB67])+[.U$28]*[.$Z$5]*MAGNET([.U$24]+[.$BB67])+[.V$28]*[.$Z$5]*MAGNET([.V$24]+[.$BB67])+[.W$28]*[.$Z$5]*MAGNET([.W$24]+[.$BB67])+[.X$28]*[.$Z$5]*MAGNET([.X$24]+[.$BB67])+[.Y$28]*[.$Z$5]*MAGNET([.Y$24]+[.$BB67])+[.Z$28]*[.$Z$5]*MAGNET([.Z$24]+[.$BB67])+[.AA$28]*[.$Z$5]*MAGNET([.AA$24]+[.$BB67])+[.AB$28]*[.$Z$5]*MAGNET([.AB$24]+[.$BB67])+[.AC$28]*[.$Z$5]*MAGNET([.AC$24]+[.$BB67])+[.AD$28]*[.$Z$5]*MAGNET([.AD$24]+[.$BB67])+[.AE$28]*[.$Z$5]*MAGNET([.AE$24]+[.$BB67])+[.AF$28]*[.$Z$5]*MAGNET([.AF$24]+[.$BB67])+[.AG$28]*[.$Z$5]*MAGNET([.AG$24]+[.$BB67])+[.D$28]*[.$Z$5]*MAGNET([.D$24]+[.$BB67])+[.AH$28]*[.$Z$5]*MAGNET([.AH$24]+[.BB67]) +[.AI$28]*[.$Z$5]*MAGNET([.AI$24]+[.BB67]) +[.AJ$28]*[.$Z$5]*MAGNET([.AJ$24]+[.BB67]) +[.AK$28]*[.$Z$5]*MAGNET([.AK$24]+[.BB67]) +[.AL$28]*[.$Z$5]*MAGNET([.AL$24]+[.BB67]) +[.AM$28]*[.$Z$5]*MAGNET([.AM$24]+[.BB67]) +[.AN$28]*[.$Z$5]*MAGNET([.AN$24]+[.BB67]) +[.AO$28]*[.$Z$5]*MAGNET([.AO$24]+[.BB67]) +[.AP$28]*[.$Z$5]*MAGNET([.AP$24]+[.$BB67])&#10;+[.AQ$28]*[.$Z$5]*MAGNET([.AQ$24]+[.$BB67])&#10;+[.AR$28]*[.$Z$5]*MAGNET([.AR$24]+[.$BB67])&#10;+[.AS$28]*[.$Z$5]*MAGNET([.AS$24]+[.$BB67])&#10;+[.AT$28]*[.$Z$5]*MAGNET([.AT$24]+[.$BB67])&#10;+[.AU$28]*[.$Z$5]*MAGNET([.AU$24]+[.$BB67])&#10;+[.AV$28]*[.$Z$5]*MAGNET([.AV$24]+[.$BB67])&#10;+[.AW$28]*[.$Z$5]*MAGNET([.AW$24]+[.$BB67])&#10;+[.AX$28]*[.$Z$5]*MAGNET([.AX$24]+[.$BB67])&#10;+[.AY$28]*[.$Z$5]*MAGNET([.AY$24]+[.$BB67]) +RAND()*[.$BF$13]" office:value-type="float" office:value="6.33127461448454" calcext:value-type="float">
            <text:p>6.33127461448454</text:p>
          </table:table-cell>
          <table:table-cell table:style-name="ce71" table:formula="of:=[.E$29]*[.$Z$5]*MAGNET([.E$24]+[.$BB67])+[.F$29]*[.$Z$5]*MAGNET([.F$24]+[.$BB67])+[.G$29]*[.$Z$5]*MAGNET([.G$24]+[.$BB67])+[.H$29]*[.$Z$5]*MAGNET([.H$24]+[.$BB67])+[.I$29]*[.$Z$5]*MAGNET([.I$24]+[.$BB67])+[.J$29]*[.$Z$5]*MAGNET([.J$24]+[.$BB67])+[.K$29]*[.$Z$5]*MAGNET([.K$24]+[.$BB67])+[.L$29]*[.$Z$5]*MAGNET([.L$24]+[.$BB67])+[.M$29]*[.$Z$5]*MAGNET([.M$24]+[.$BB67])+[.N$29]*[.$Z$5]*MAGNET([.N$24]+[.$BB67])+[.O$29]*[.$Z$5]*MAGNET([.O$24]+[.$BB67])+[.P$29]*[.$Z$5]*MAGNET([.P$24]+[.$BB67])+[.Q$29]*[.$Z$5]*MAGNET([.Q$24]+[.$BB67])+[.R$29]*[.$Z$5]*MAGNET([.R$24]+[.$BB67])+[.S$29]*[.$Z$5]*MAGNET([.S$24]+[.$BB67])+[.T$29]*[.$Z$5]*MAGNET([.T$24]+[.$BB67])+[.U$29]*[.$Z$5]*MAGNET([.U$24]+[.$BB67])+[.V$29]*[.$Z$5]*MAGNET([.V$24]+[.$BB67])+[.W$29]*[.$Z$5]*MAGNET([.W$24]+[.$BB67])+[.X$29]*[.$Z$5]*MAGNET([.X$24]+[.$BB67])+[.Y$29]*[.$Z$5]*MAGNET([.Y$24]+[.$BB67])+[.Z$29]*[.$Z$5]*MAGNET([.Z$24]+[.$BB67])+[.AA$29]*[.$Z$5]*MAGNET([.AA$24]+[.$BB67])+[.AB$29]*[.$Z$5]*MAGNET([.AB$24]+[.$BB67])+[.AC$29]*[.$Z$5]*MAGNET([.AC$24]+[.$BB67])+[.AD$29]*[.$Z$5]*MAGNET([.AD$24]+[.$BB67])+[.AE$29]*[.$Z$5]*MAGNET([.AE$24]+[.$BB67])+[.AF$29]*[.$Z$5]*MAGNET([.AF$24]+[.$BB67])+[.AG$29]*[.$Z$5]*MAGNET([.AG$24]+[.$BB67])+[.D$29]*[.$Z$5]*MAGNET([.D$24]+[.$BB67])+[.AH$29]*[.$Z$5]*MAGNET([.AH$24]+[.BB67]) +[.AI$29]*[.$Z$5]*MAGNET([.AI$24]+[.BB67]) +[.AJ$29]*[.$Z$5]*MAGNET([.AJ$24]+[.BB67]) +[.AK$29]*[.$Z$5]*MAGNET([.AK$24]+[.BB67]) +[.AL$29]*[.$Z$5]*MAGNET([.AL$24]+[.BB67]) +[.AM$29]*[.$Z$5]*MAGNET([.AM$24]+[.BB67]) +[.AN$29]*[.$Z$5]*MAGNET([.AN$24]+[.BB67]) +[.AO$29]*[.$Z$5]*MAGNET([.AO$24]+[.BB67]) +[.AP$29]*[.$Z$5]*MAGNET([.AP$24]+[.$BB67])&#10;+[.AQ$29]*[.$Z$5]*MAGNET([.AQ$24]+[.$BB67])&#10;+[.AR$29]*[.$Z$5]*MAGNET([.AR$24]+[.$BB67])&#10;+[.AS$29]*[.$Z$5]*MAGNET([.AS$24]+[.$BB67])&#10;+[.AT$29]*[.$Z$5]*MAGNET([.AT$24]+[.$BB67])&#10;+[.AU$29]*[.$Z$5]*MAGNET([.AU$24]+[.$BB67])&#10;+[.AV$29]*[.$Z$5]*MAGNET([.AV$24]+[.$BB67])&#10;+[.AW$29]*[.$Z$5]*MAGNET([.AW$24]+[.$BB67])&#10;+[.AX$29]*[.$Z$5]*MAGNET([.AX$24]+[.$BB67])&#10;+[.AY$29]*[.$Z$5]*MAGNET([.AY$24]+[.$BB67]) +RAND()*[.$BG$13]" office:value-type="float" office:value="-23.6094146406465" calcext:value-type="float">
            <text:p>-23.6094146406465</text:p>
          </table:table-cell>
          <table:table-cell table:style-name="ce71" table:formula="of:=[.E$30]*[.$Z$5]*MAGNET([.E$24]+[.$BB67])+[.F$30]*[.$Z$5]*MAGNET([.F$24]+[.$BB67])+[.G$30]*[.$Z$5]*MAGNET([.G$24]+[.$BB67])+[.H$30]*[.$Z$5]*MAGNET([.H$24]+[.$BB67])+[.I$30]*[.$Z$5]*MAGNET([.I$24]+[.$BB67])+[.J$30]*[.$Z$5]*MAGNET([.J$24]+[.$BB67])+[.K$30]*[.$Z$5]*MAGNET([.K$24]+[.$BB67])+[.L$30]*[.$Z$5]*MAGNET([.L$24]+[.$BB67])+[.M$30]*[.$Z$5]*MAGNET([.M$24]+[.$BB67])+[.N$30]*[.$Z$5]*MAGNET([.N$24]+[.$BB67])+[.O$30]*[.$Z$5]*MAGNET([.O$24]+[.$BB67])+[.P$30]*[.$Z$5]*MAGNET([.P$24]+[.$BB67])+[.Q$30]*[.$Z$5]*MAGNET([.Q$24]+[.$BB67])+[.R$30]*[.$Z$5]*MAGNET([.R$24]+[.$BB67])+[.S$30]*[.$Z$5]*MAGNET([.S$24]+[.$BB67])+[.T$30]*[.$Z$5]*MAGNET([.T$24]+[.$BB67])+[.U$30]*[.$Z$5]*MAGNET([.U$24]+[.$BB67])+[.V$30]*[.$Z$5]*MAGNET([.V$24]+[.$BB67])+[.W$30]*[.$Z$5]*MAGNET([.W$24]+[.$BB67])+[.X$30]*[.$Z$5]*MAGNET([.X$24]+[.$BB67])+[.Y$30]*[.$Z$5]*MAGNET([.Y$24]+[.$BB67])+[.Z$30]*[.$Z$5]*MAGNET([.Z$24]+[.$BB67])+[.AA$30]*[.$Z$5]*MAGNET([.AA$24]+[.$BB67])+[.AB$30]*[.$Z$5]*MAGNET([.AB$24]+[.$BB67])+[.AC$30]*[.$Z$5]*MAGNET([.AC$24]+[.$BB67])+[.AD$30]*[.$Z$5]*MAGNET([.AD$24]+[.$BB67])+[.AE$30]*[.$Z$5]*MAGNET([.AE$24]+[.$BB67])+[.AF$30]*[.$Z$5]*MAGNET([.AF$24]+[.$BB67])+[.AG$30]*[.$Z$5]*MAGNET([.AG$24]+[.$BB67])+[.D$30]*[.$Z$5]*MAGNET([.D$24]+[.$BB67])+[.AH$30]*[.$Z$5]*MAGNET([.AH$24]+[.BB67]) +[.AI$30]*[.$Z$5]*MAGNET([.AI$24]+[.BB67]) +[.AJ$30]*[.$Z$5]*MAGNET([.AJ$24]+[.BB67]) +[.AK$30]*[.$Z$5]*MAGNET([.AK$24]+[.BB67]) +[.AL$30]*[.$Z$5]*MAGNET([.AL$24]+[.BB67]) +[.AM$30]*[.$Z$5]*MAGNET([.AM$24]+[.BB67]) +[.AN$30]*[.$Z$5]*MAGNET([.AN$24]+[.BB67]) +[.AO$30]*[.$Z$5]*MAGNET([.AO$24]+[.BB67]) +[.AP$30]*[.$Z$5]*MAGNET([.AP$24]+[.$BB67])&#10;+[.AQ$30]*[.$Z$5]*MAGNET([.AQ$24]+[.$BB67])&#10;+[.AR$30]*[.$Z$5]*MAGNET([.AR$24]+[.$BB67])&#10;+[.AS$30]*[.$Z$5]*MAGNET([.AS$24]+[.$BB67])&#10;+[.AT$30]*[.$Z$5]*MAGNET([.AT$24]+[.$BB67])&#10;+[.AU$30]*[.$Z$5]*MAGNET([.AU$24]+[.$BB67])&#10;+[.AV$30]*[.$Z$5]*MAGNET([.AV$24]+[.$BB67])&#10;+[.AW$30]*[.$Z$5]*MAGNET([.AW$24]+[.$BB67])&#10;+[.AX$30]*[.$Z$5]*MAGNET([.AX$24]+[.$BB67])&#10;+[.AY$30]*[.$Z$5]*MAGNET([.AY$24]+[.$BB67]) +RAND()*[.$BH$13]" office:value-type="float" office:value="0" calcext:value-type="float">
            <text:p>0</text:p>
          </table:table-cell>
          <table:table-cell table:style-name="ce71" table:formula="of:=[.E$31]*[.$Z$5]*MAGNET([.E$24]+[.$BB67])+[.F$31]*[.$Z$5]*MAGNET([.F$24]+[.$BB67])+[.G$31]*[.$Z$5]*MAGNET([.G$24]+[.$BB67])+[.H$31]*[.$Z$5]*MAGNET([.H$24]+[.$BB67])+[.I$31]*[.$Z$5]*MAGNET([.I$24]+[.$BB67])+[.J$31]*[.$Z$5]*MAGNET([.J$24]+[.$BB67])+[.K$31]*[.$Z$5]*MAGNET([.K$24]+[.$BB67])+[.L$31]*[.$Z$5]*MAGNET([.L$24]+[.$BB67])+[.M$31]*[.$Z$5]*MAGNET([.M$24]+[.$BB67])+[.N$31]*[.$Z$5]*MAGNET([.N$24]+[.$BB67])+[.O$31]*[.$Z$5]*MAGNET([.O$24]+[.$BB67])+[.P$31]*[.$Z$5]*MAGNET([.P$24]+[.$BB67])+[.Q$31]*[.$Z$5]*MAGNET([.Q$24]+[.$BB67])+[.R$31]*[.$Z$5]*MAGNET([.R$24]+[.$BB67])+[.S$31]*[.$Z$5]*MAGNET([.S$24]+[.$BB67])+[.T$31]*[.$Z$5]*MAGNET([.T$24]+[.$BB67])+[.U$31]*[.$Z$5]*MAGNET([.U$24]+[.$BB67])+[.V$31]*[.$Z$5]*MAGNET([.V$24]+[.$BB67])+[.W$31]*[.$Z$5]*MAGNET([.W$24]+[.$BB67])+[.X$31]*[.$Z$5]*MAGNET([.X$24]+[.$BB67])+[.Y$31]*[.$Z$5]*MAGNET([.Y$24]+[.$BB67])+[.Z$31]*[.$Z$5]*MAGNET([.Z$24]+[.$BB67])+[.AA$31]*[.$Z$5]*MAGNET([.AA$24]+[.$BB67])+[.AB$31]*[.$Z$5]*MAGNET([.AB$24]+[.$BB67])+[.AC$31]*[.$Z$5]*MAGNET([.AC$24]+[.$BB67])+[.AD$31]*[.$Z$5]*MAGNET([.AD$24]+[.$BB67])+[.AE$31]*[.$Z$5]*MAGNET([.AE$24]+[.$BB67])+[.AF$31]*[.$Z$5]*MAGNET([.AF$24]+[.$BB67])+[.AG$31]*[.$Z$5]*MAGNET([.AG$24]+[.$BB67])+[.D$31]*[.$Z$5]*MAGNET([.D$24]+[.$BB67])+[.AH$31]*[.$Z$5]*MAGNET([.AH$24]+[.BB67]) +[.AI$31]*[.$Z$5]*MAGNET([.AI$24]+[.BB67]) +[.AJ$31]*[.$Z$5]*MAGNET([.AJ$24]+[.BB67]) +[.AK$31]*[.$Z$5]*MAGNET([.AK$24]+[.BB67]) +[.AL$31]*[.$Z$5]*MAGNET([.AL$24]+[.BB67]) +[.AM$31]*[.$Z$5]*MAGNET([.AM$24]+[.BB67]) +[.AN$31]*[.$Z$5]*MAGNET([.AN$24]+[.BB67]) +[.AO$31]*[.$Z$5]*MAGNET([.AO$24]+[.BB67]) +[.AP$31]*[.$Z$5]*MAGNET([.AP$24]+[.$BB67])&#10;+[.AQ$31]*[.$Z$5]*MAGNET([.AQ$24]+[.$BB67])&#10;+[.AR$31]*[.$Z$5]*MAGNET([.AR$24]+[.$BB67])&#10;+[.AS$31]*[.$Z$5]*MAGNET([.AS$24]+[.$BB67])&#10;+[.AT$31]*[.$Z$5]*MAGNET([.AT$24]+[.$BB67])&#10;+[.AU$31]*[.$Z$5]*MAGNET([.AU$24]+[.$BB67])&#10;+[.AV$31]*[.$Z$5]*MAGNET([.AV$24]+[.$BB67])&#10;+[.AW$31]*[.$Z$5]*MAGNET([.AW$24]+[.$BB67])&#10;+[.AX$31]*[.$Z$5]*MAGNET([.AX$24]+[.$BB67])&#10;+[.AY$31]*[.$Z$5]*MAGNET([.AY$24]+[.$BB67]) +RAND()*[.$BI$13]" office:value-type="float" office:value="0" calcext:value-type="float">
            <text:p>0</text:p>
          </table:table-cell>
          <table:table-cell table:style-name="ce71" table:formula="of:=[.E$32]*[.$Z$5]*MAGNET([.E$24]+[.$BB67])+[.F$32]*[.$Z$5]*MAGNET([.F$24]+[.$BB67])+[.G$32]*[.$Z$5]*MAGNET([.G$24]+[.$BB67])+[.H$32]*[.$Z$5]*MAGNET([.H$24]+[.$BB67])+[.I$32]*[.$Z$5]*MAGNET([.I$24]+[.$BB67])+[.J$32]*[.$Z$5]*MAGNET([.J$24]+[.$BB67])+[.K$32]*[.$Z$5]*MAGNET([.K$24]+[.$BB67])+[.L$32]*[.$Z$5]*MAGNET([.L$24]+[.$BB67])+[.M$32]*[.$Z$5]*MAGNET([.M$24]+[.$BB67])+[.N$32]*[.$Z$5]*MAGNET([.N$24]+[.$BB67])+[.O$32]*[.$Z$5]*MAGNET([.O$24]+[.$BB67])+[.P$32]*[.$Z$5]*MAGNET([.P$24]+[.$BB67])+[.Q$32]*[.$Z$5]*MAGNET([.Q$24]+[.$BB67])+[.R$32]*[.$Z$5]*MAGNET([.R$24]+[.$BB67])+[.S$32]*[.$Z$5]*MAGNET([.S$24]+[.$BB67])+[.T$32]*[.$Z$5]*MAGNET([.T$24]+[.$BB67])+[.U$32]*[.$Z$5]*MAGNET([.U$24]+[.$BB67])+[.V$32]*[.$Z$5]*MAGNET([.V$24]+[.$BB67])+[.W$32]*[.$Z$5]*MAGNET([.W$24]+[.$BB67])+[.X$32]*[.$Z$5]*MAGNET([.X$24]+[.$BB67])+[.Y$32]*[.$Z$5]*MAGNET([.Y$24]+[.$BB67])+[.Z$32]*[.$Z$5]*MAGNET([.Z$24]+[.$BB67])+[.AA$32]*[.$Z$5]*MAGNET([.AA$24]+[.$BB67])+[.AB$32]*[.$Z$5]*MAGNET([.AB$24]+[.$BB67])+[.AC$32]*[.$Z$5]*MAGNET([.AC$24]+[.$BB67])+[.AD$32]*[.$Z$5]*MAGNET([.AD$24]+[.$BB67])+[.AE$32]*[.$Z$5]*MAGNET([.AE$24]+[.$BB67])+[.AF$32]*[.$Z$5]*MAGNET([.AF$24]+[.$BB67])+[.AG$32]*[.$Z$5]*MAGNET([.AG$24]+[.$BB67])+[.D$32]*[.$Z$5]*MAGNET([.D$24]+[.$BB67])+[.AH$32]*[.$Z$5]*MAGNET([.AH$24]+[.BB67]) +[.AI$32]*[.$Z$5]*MAGNET([.AI$24]+[.BB67]) +[.AJ$32]*[.$Z$5]*MAGNET([.AJ$24]+[.BB67]) +[.AK$32]*[.$Z$5]*MAGNET([.AK$24]+[.BB67]) +[.AL$32]*[.$Z$5]*MAGNET([.AL$24]+[.BB67]) +[.AM$32]*[.$Z$5]*MAGNET([.AM$24]+[.BB67]) +[.AN$32]*[.$Z$5]*MAGNET([.AN$24]+[.BB67]) +[.AO$32]*[.$Z$5]*MAGNET([.AO$24]+[.BB67]) +[.AP$32]*[.$Z$5]*MAGNET([.AP$24]+[.$BB67])&#10;+[.AQ$32]*[.$Z$5]*MAGNET([.AQ$24]+[.$BB67])&#10;+[.AR$32]*[.$Z$5]*MAGNET([.AR$24]+[.$BB67])&#10;+[.AS$32]*[.$Z$5]*MAGNET([.AS$24]+[.$BB67])&#10;+[.AT$32]*[.$Z$5]*MAGNET([.AT$24]+[.$BB67])&#10;+[.AU$32]*[.$Z$5]*MAGNET([.AU$24]+[.$BB67])&#10;+[.AV$32]*[.$Z$5]*MAGNET([.AV$24]+[.$BB67])&#10;+[.AW$32]*[.$Z$5]*MAGNET([.AW$24]+[.$BB67])&#10;+[.AX$32]*[.$Z$5]*MAGNET([.AX$24]+[.$BB67])&#10;+[.AY$32]*[.$Z$5]*MAGNET([.AY$24]+[.$BB6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7]+0.002" office:value-type="float" office:value="0.106" calcext:value-type="float">
            <text:p>0.106</text:p>
          </table:table-cell>
          <table:table-cell table:formula="of:=[.BA68]*[.$D$6]" office:value-type="float" office:value="5.32814114048829" calcext:value-type="float">
            <text:p>5.328</text:p>
          </table:table-cell>
          <table:table-cell table:formula="of:=[.D$25]*[.$Z$5]*MAGNET([.D$24]+[.BB68])+[.E$25]*[.$Z$5]*MAGNET([.E$24]+[.BB68])+[.F$25]*[.$Z$5]*MAGNET([.F$24]+[.BB68])+[.G$25]*[.$Z$5]*MAGNET([.G$24]+[.BB68])+[.H$25]*[.$Z$5]*MAGNET([.H$24]+[.BB68])+[.I$25]*[.$Z$5]*MAGNET([.I$24]+[.BB68])+[.J$25]*[.$Z$5]*MAGNET([.J$24]+[.BB68])+[.K$25]*[.$Z$5]*MAGNET([.K$24]+[.BB68])+[.L$25]*[.$Z$5]*MAGNET([.L$24]+[.BB68])+[.M$25]*[.$Z$5]*MAGNET([.M$24]+[.BB68])+[.N$25]*[.$Z$5]*MAGNET([.N$24]+[.BB68])+[.O$25]*[.$Z$5]*MAGNET([.O$24]+[.BB68])+[.P$25]*[.$Z$5]*MAGNET([.P$24]+[.BB68])+[.Q$25]*[.$Z$5]*MAGNET([.Q$24]+[.BB68])+[.R$25]*[.$Z$5]*MAGNET([.R$24]+[.BB68])+[.S$25]*[.$Z$5]*MAGNET([.S$24]+[.BB68])+[.T$25]*[.$Z$5]*MAGNET([.T$24]+[.BB68])+[.U$25]*[.$Z$5]*MAGNET([.U$24]+[.BB68])+[.V$25]*[.$Z$5]*MAGNET([.V$24]+[.BB68])+[.W$25]*[.$Z$5]*MAGNET([.W$24]+[.BB68])+[.X$25]*[.$Z$5]*MAGNET([.X$24]+[.BB68])+[.Y$25]*[.$Z$5]*MAGNET([.Y$24]+[.BB68])+[.Z$25]*[.$Z$5]*MAGNET([.Z$24]+[.BB68])+[.AA$25]*[.$Z$5]*MAGNET([.AA$24]+[.BB68])+[.AB$25]*[.$Z$5]*MAGNET([.AB$24]+[.BB68])+[.AC$25]*[.$Z$5]*MAGNET([.AC$24]+[.BB68])+[.AD$25]*[.$Z$5]*MAGNET([.AD$24]+[.BB68])+[.AE$25]*[.$Z$5]*MAGNET([.AE$24]+[.BB68])+[.AF$25]*[.$Z$5]*MAGNET([.AF$24]+[.BB68])+[.AG$25]*[.$Z$5]*MAGNET([.AG$24]+[.BB68])+[.AH$25]*[.$Z$5]*MAGNET([.AH$24]+[.BB68]) +[.AI$25]*[.$Z$5]*MAGNET([.AI$24]+[.BB68]) +[.AJ$25]*[.$Z$5]*MAGNET([.AJ$24]+[.BB68]) +[.AK$25]*[.$Z$5]*MAGNET([.AK$24]+[.BB68]) +[.AL$25]*[.$Z$5]*MAGNET([.AL$24]+[.BB68]) +[.AM$25]*[.$Z$5]*MAGNET([.AM$24]+[.BB68]) +[.AN$25]*[.$Z$5]*MAGNET([.AN$24]+[.BB68]) +[.AO$25]*[.$Z$5]*MAGNET([.AO$24]+[.BB68])+RAND()*[.$BC$13]+[.AP$25]*[.$Z$5]*MAGNET([.AP$24]+[.BB68])&#10;+[.AQ$25]*[.$Z$5]*MAGNET([.AQ$24]+[.BB68])&#10;+[.AR$25]*[.$Z$5]*MAGNET([.AR$24]+[.BB68])&#10;+[.AS$25]*[.$Z$5]*MAGNET([.AS$24]+[.BB68])&#10;+[.AT$25]*[.$Z$5]*MAGNET([.AT$24]+[.BB68])&#10;+[.AU$25]*[.$Z$5]*MAGNET([.AU$24]+[.BB68])&#10;+[.AV$25]*[.$Z$5]*MAGNET([.AV$24]+[.BB68])&#10;+[.AW$25]*[.$Z$5]*MAGNET([.AW$24]+[.BB68])&#10;+[.AX$25]*[.$Z$5]*MAGNET([.AX$24]+[.BB68])&#10;+[.AY$25]*[.$Z$5]*MAGNET([.AY$24]+[.BB68])" office:value-type="float" office:value="-112.398976995711" calcext:value-type="float">
            <text:p>-112.40</text:p>
          </table:table-cell>
          <table:table-cell table:style-name="ce70" table:formula="of:=[.E$26]*[.$Z$5]*MAGNET([.E$24]+[.$BB68])+[.F$26]*[.$Z$5]*MAGNET([.F$24]+[.$BB68])+[.G$26]*[.$Z$5]*MAGNET([.G$24]+[.$BB68])+[.H$26]*[.$Z$5]*MAGNET([.H$24]+[.$BB68])+[.I$26]*[.$Z$5]*MAGNET([.I$24]+[.$BB68])+[.J$26]*[.$Z$5]*MAGNET([.J$24]+[.$BB68])+[.K$26]*[.$Z$5]*MAGNET([.K$24]+[.$BB68])+[.L$26]*[.$Z$5]*MAGNET([.L$24]+[.$BB68])+[.M$26]*[.$Z$5]*MAGNET([.M$24]+[.$BB68])+[.N$26]*[.$Z$5]*MAGNET([.N$24]+[.$BB68])+[.O$26]*[.$Z$5]*MAGNET([.O$24]+[.$BB68])+[.P$26]*[.$Z$5]*MAGNET([.P$24]+[.$BB68])+[.Q$26]*[.$Z$5]*MAGNET([.Q$24]+[.$BB68])+[.R$26]*[.$Z$5]*MAGNET([.R$24]+[.$BB68])+[.S$26]*[.$Z$5]*MAGNET([.S$24]+[.$BB68])+[.T$26]*[.$Z$5]*MAGNET([.T$24]+[.$BB68])+[.U$26]*[.$Z$5]*MAGNET([.U$24]+[.$BB68])+[.V$26]*[.$Z$5]*MAGNET([.V$24]+[.$BB68])+[.W$26]*[.$Z$5]*MAGNET([.W$24]+[.$BB68])+[.X$26]*[.$Z$5]*MAGNET([.X$24]+[.$BB68])+[.Y$26]*[.$Z$5]*MAGNET([.Y$24]+[.$BB68])+[.Z$26]*[.$Z$5]*MAGNET([.Z$24]+[.$BB68])+[.AA$26]*[.$Z$5]*MAGNET([.AA$24]+[.$BB68])+[.AB$26]*[.$Z$5]*MAGNET([.AB$24]+[.$BB68])+[.AC$26]*[.$Z$5]*MAGNET([.AC$24]+[.$BB68])+[.AD$26]*[.$Z$5]*MAGNET([.AD$24]+[.$BB68])+[.AE$26]*[.$Z$5]*MAGNET([.AE$24]+[.$BB68])+[.AF$26]*[.$Z$5]*MAGNET([.AF$24]+[.$BB68])+[.AG$26]*[.$Z$5]*MAGNET([.AG$24]+[.$BB68])+[.D$26]*[.$Z$5]*MAGNET([.D$24]+[.$BB68])+[.AH$26]*[.$Z$5]*MAGNET([.AH$24]+[.BB68]) +[.AI$26]*[.$Z$5]*MAGNET([.AI$24]+[.BB68]) +[.AJ$26]*[.$Z$5]*MAGNET([.AJ$24]+[.BB68]) +[.AK$26]*[.$Z$5]*MAGNET([.AK$24]+[.BB68]) +[.AL$26]*[.$Z$5]*MAGNET([.AL$24]+[.BB68]) +[.AM$26]*[.$Z$5]*MAGNET([.AM$24]+[.BB68]) +[.AN$26]*[.$Z$5]*MAGNET([.AN$24]+[.BB68]) +[.AO$26]*[.$Z$5]*MAGNET([.AO$24]+[.BB68]) +[.AP$26]*[.$Z$5]*MAGNET([.AP$24]+[.$BB68])&#10;+[.AQ$26]*[.$Z$5]*MAGNET([.AQ$24]+[.$BB68])&#10;+[.AR$26]*[.$Z$5]*MAGNET([.AR$24]+[.$BB68])&#10;+[.AS$26]*[.$Z$5]*MAGNET([.AS$24]+[.$BB68])&#10;+[.AT$26]*[.$Z$5]*MAGNET([.AT$24]+[.$BB68])&#10;+[.AU$26]*[.$Z$5]*MAGNET([.AU$24]+[.$BB68])&#10;+[.AV$26]*[.$Z$5]*MAGNET([.AV$24]+[.$BB68])&#10;+[.AW$26]*[.$Z$5]*MAGNET([.AW$24]+[.$BB68])&#10;+[.AX$26]*[.$Z$5]*MAGNET([.AX$24]+[.$BB68])&#10;+[.AY$26]*[.$Z$5]*MAGNET([.AY$24]+[.$BB68]) +RAND()*[.$BD$13]" office:value-type="float" office:value="70.9037234264017" calcext:value-type="float">
            <text:p>70.90</text:p>
          </table:table-cell>
          <table:table-cell table:style-name="ce71" table:formula="of:=[.E$27]*[.$Z$5]*MAGNET([.E$24]+[.$BB68])+[.F$27]*[.$Z$5]*MAGNET([.F$24]+[.$BB68])+[.G$27]*[.$Z$5]*MAGNET([.G$24]+[.$BB68])+[.H$27]*[.$Z$5]*MAGNET([.H$24]+[.$BB68])+[.I$27]*[.$Z$5]*MAGNET([.I$24]+[.$BB68])+[.J$27]*[.$Z$5]*MAGNET([.J$24]+[.$BB68])+[.K$27]*[.$Z$5]*MAGNET([.K$24]+[.$BB68])+[.L$27]*[.$Z$5]*MAGNET([.L$24]+[.$BB68])+[.M$27]*[.$Z$5]*MAGNET([.M$24]+[.$BB68])+[.N$27]*[.$Z$5]*MAGNET([.N$24]+[.$BB68])+[.O$27]*[.$Z$5]*MAGNET([.O$24]+[.$BB68])+[.P$27]*[.$Z$5]*MAGNET([.P$24]+[.$BB68])+[.Q$27]*[.$Z$5]*MAGNET([.Q$24]+[.$BB68])+[.R$27]*[.$Z$5]*MAGNET([.R$24]+[.$BB68])+[.S$27]*[.$Z$5]*MAGNET([.S$24]+[.$BB68])+[.T$27]*[.$Z$5]*MAGNET([.T$24]+[.$BB68])+[.U$27]*[.$Z$5]*MAGNET([.U$24]+[.$BB68])+[.V$27]*[.$Z$5]*MAGNET([.V$24]+[.$BB68])+[.W$27]*[.$Z$5]*MAGNET([.W$24]+[.$BB68])+[.X$27]*[.$Z$5]*MAGNET([.X$24]+[.$BB68])+[.Y$27]*[.$Z$5]*MAGNET([.Y$24]+[.$BB68])+[.Z$27]*[.$Z$5]*MAGNET([.Z$24]+[.$BB68])+[.AA$27]*[.$Z$5]*MAGNET([.AA$24]+[.$BB68])+[.AB$27]*[.$Z$5]*MAGNET([.AB$24]+[.$BB68])+[.AC$27]*[.$Z$5]*MAGNET([.AC$24]+[.$BB68])+[.AD$27]*[.$Z$5]*MAGNET([.AD$24]+[.$BB68])+[.AE$27]*[.$Z$5]*MAGNET([.AE$24]+[.$BB68])+[.AF$27]*[.$Z$5]*MAGNET([.AF$24]+[.$BB68])+[.AG$27]*[.$Z$5]*MAGNET([.AG$24]+[.$BB68])+[.D$27]*[.$Z$5]*MAGNET([.D$24]+[.$BB68])+[.AH$27]*[.$Z$5]*MAGNET([.AH$24]+[.BB68]) +[.AI$27]*[.$Z$5]*MAGNET([.AI$24]+[.BB68]) +[.AJ$27]*[.$Z$5]*MAGNET([.AJ$24]+[.BB68]) +[.AK$27]*[.$Z$5]*MAGNET([.AK$24]+[.BB68]) +[.AL$27]*[.$Z$5]*MAGNET([.AL$24]+[.BB68]) +[.AM$27]*[.$Z$5]*MAGNET([.AM$24]+[.BB68]) +[.AN$27]*[.$Z$5]*MAGNET([.AN$24]+[.BB68]) +[.AO$27]*[.$Z$5]*MAGNET([.AO$24]+[.BB68]) +[.AP$27]*[.$Z$5]*MAGNET([.AP$24]+[.$BB68])&#10;+[.AQ$27]*[.$Z$5]*MAGNET([.AQ$24]+[.$BB68])&#10;+[.AR$27]*[.$Z$5]*MAGNET([.AR$24]+[.$BB68])&#10;+[.AS$27]*[.$Z$5]*MAGNET([.AS$24]+[.$BB68])&#10;+[.AT$27]*[.$Z$5]*MAGNET([.AT$24]+[.$BB68])&#10;+[.AU$27]*[.$Z$5]*MAGNET([.AU$24]+[.$BB68])&#10;+[.AV$27]*[.$Z$5]*MAGNET([.AV$24]+[.$BB68])&#10;+[.AW$27]*[.$Z$5]*MAGNET([.AW$24]+[.$BB68])&#10;+[.AX$27]*[.$Z$5]*MAGNET([.AX$24]+[.$BB68])&#10;+[.AY$27]*[.$Z$5]*MAGNET([.AY$24]+[.$BB68]) +RAND()*[.$BE$13]" office:value-type="float" office:value="61.5134981310219" calcext:value-type="float">
            <text:p>61.5134981310219</text:p>
          </table:table-cell>
          <table:table-cell table:style-name="ce71" table:formula="of:=[.E$28]*[.$Z$5]*MAGNET([.E$24]+[.$BB68])+[.F$28]*[.$Z$5]*MAGNET([.F$24]+[.$BB68])+[.G$28]*[.$Z$5]*MAGNET([.G$24]+[.$BB68])+[.H$28]*[.$Z$5]*MAGNET([.H$24]+[.$BB68])+[.I$28]*[.$Z$5]*MAGNET([.I$24]+[.$BB68])+[.J$28]*[.$Z$5]*MAGNET([.J$24]+[.$BB68])+[.K$28]*[.$Z$5]*MAGNET([.K$24]+[.$BB68])+[.L$28]*[.$Z$5]*MAGNET([.L$24]+[.$BB68])+[.M$28]*[.$Z$5]*MAGNET([.M$24]+[.$BB68])+[.N$28]*[.$Z$5]*MAGNET([.N$24]+[.$BB68])+[.O$28]*[.$Z$5]*MAGNET([.O$24]+[.$BB68])+[.P$28]*[.$Z$5]*MAGNET([.P$24]+[.$BB68])+[.Q$28]*[.$Z$5]*MAGNET([.Q$24]+[.$BB68])+[.R$28]*[.$Z$5]*MAGNET([.R$24]+[.$BB68])+[.S$28]*[.$Z$5]*MAGNET([.S$24]+[.$BB68])+[.T$28]*[.$Z$5]*MAGNET([.T$24]+[.$BB68])+[.U$28]*[.$Z$5]*MAGNET([.U$24]+[.$BB68])+[.V$28]*[.$Z$5]*MAGNET([.V$24]+[.$BB68])+[.W$28]*[.$Z$5]*MAGNET([.W$24]+[.$BB68])+[.X$28]*[.$Z$5]*MAGNET([.X$24]+[.$BB68])+[.Y$28]*[.$Z$5]*MAGNET([.Y$24]+[.$BB68])+[.Z$28]*[.$Z$5]*MAGNET([.Z$24]+[.$BB68])+[.AA$28]*[.$Z$5]*MAGNET([.AA$24]+[.$BB68])+[.AB$28]*[.$Z$5]*MAGNET([.AB$24]+[.$BB68])+[.AC$28]*[.$Z$5]*MAGNET([.AC$24]+[.$BB68])+[.AD$28]*[.$Z$5]*MAGNET([.AD$24]+[.$BB68])+[.AE$28]*[.$Z$5]*MAGNET([.AE$24]+[.$BB68])+[.AF$28]*[.$Z$5]*MAGNET([.AF$24]+[.$BB68])+[.AG$28]*[.$Z$5]*MAGNET([.AG$24]+[.$BB68])+[.D$28]*[.$Z$5]*MAGNET([.D$24]+[.$BB68])+[.AH$28]*[.$Z$5]*MAGNET([.AH$24]+[.BB68]) +[.AI$28]*[.$Z$5]*MAGNET([.AI$24]+[.BB68]) +[.AJ$28]*[.$Z$5]*MAGNET([.AJ$24]+[.BB68]) +[.AK$28]*[.$Z$5]*MAGNET([.AK$24]+[.BB68]) +[.AL$28]*[.$Z$5]*MAGNET([.AL$24]+[.BB68]) +[.AM$28]*[.$Z$5]*MAGNET([.AM$24]+[.BB68]) +[.AN$28]*[.$Z$5]*MAGNET([.AN$24]+[.BB68]) +[.AO$28]*[.$Z$5]*MAGNET([.AO$24]+[.BB68]) +[.AP$28]*[.$Z$5]*MAGNET([.AP$24]+[.$BB68])&#10;+[.AQ$28]*[.$Z$5]*MAGNET([.AQ$24]+[.$BB68])&#10;+[.AR$28]*[.$Z$5]*MAGNET([.AR$24]+[.$BB68])&#10;+[.AS$28]*[.$Z$5]*MAGNET([.AS$24]+[.$BB68])&#10;+[.AT$28]*[.$Z$5]*MAGNET([.AT$24]+[.$BB68])&#10;+[.AU$28]*[.$Z$5]*MAGNET([.AU$24]+[.$BB68])&#10;+[.AV$28]*[.$Z$5]*MAGNET([.AV$24]+[.$BB68])&#10;+[.AW$28]*[.$Z$5]*MAGNET([.AW$24]+[.$BB68])&#10;+[.AX$28]*[.$Z$5]*MAGNET([.AX$24]+[.$BB68])&#10;+[.AY$28]*[.$Z$5]*MAGNET([.AY$24]+[.$BB68]) +RAND()*[.$BF$13]" office:value-type="float" office:value="4.83781308297291" calcext:value-type="float">
            <text:p>4.83781308297291</text:p>
          </table:table-cell>
          <table:table-cell table:style-name="ce71" table:formula="of:=[.E$29]*[.$Z$5]*MAGNET([.E$24]+[.$BB68])+[.F$29]*[.$Z$5]*MAGNET([.F$24]+[.$BB68])+[.G$29]*[.$Z$5]*MAGNET([.G$24]+[.$BB68])+[.H$29]*[.$Z$5]*MAGNET([.H$24]+[.$BB68])+[.I$29]*[.$Z$5]*MAGNET([.I$24]+[.$BB68])+[.J$29]*[.$Z$5]*MAGNET([.J$24]+[.$BB68])+[.K$29]*[.$Z$5]*MAGNET([.K$24]+[.$BB68])+[.L$29]*[.$Z$5]*MAGNET([.L$24]+[.$BB68])+[.M$29]*[.$Z$5]*MAGNET([.M$24]+[.$BB68])+[.N$29]*[.$Z$5]*MAGNET([.N$24]+[.$BB68])+[.O$29]*[.$Z$5]*MAGNET([.O$24]+[.$BB68])+[.P$29]*[.$Z$5]*MAGNET([.P$24]+[.$BB68])+[.Q$29]*[.$Z$5]*MAGNET([.Q$24]+[.$BB68])+[.R$29]*[.$Z$5]*MAGNET([.R$24]+[.$BB68])+[.S$29]*[.$Z$5]*MAGNET([.S$24]+[.$BB68])+[.T$29]*[.$Z$5]*MAGNET([.T$24]+[.$BB68])+[.U$29]*[.$Z$5]*MAGNET([.U$24]+[.$BB68])+[.V$29]*[.$Z$5]*MAGNET([.V$24]+[.$BB68])+[.W$29]*[.$Z$5]*MAGNET([.W$24]+[.$BB68])+[.X$29]*[.$Z$5]*MAGNET([.X$24]+[.$BB68])+[.Y$29]*[.$Z$5]*MAGNET([.Y$24]+[.$BB68])+[.Z$29]*[.$Z$5]*MAGNET([.Z$24]+[.$BB68])+[.AA$29]*[.$Z$5]*MAGNET([.AA$24]+[.$BB68])+[.AB$29]*[.$Z$5]*MAGNET([.AB$24]+[.$BB68])+[.AC$29]*[.$Z$5]*MAGNET([.AC$24]+[.$BB68])+[.AD$29]*[.$Z$5]*MAGNET([.AD$24]+[.$BB68])+[.AE$29]*[.$Z$5]*MAGNET([.AE$24]+[.$BB68])+[.AF$29]*[.$Z$5]*MAGNET([.AF$24]+[.$BB68])+[.AG$29]*[.$Z$5]*MAGNET([.AG$24]+[.$BB68])+[.D$29]*[.$Z$5]*MAGNET([.D$24]+[.$BB68])+[.AH$29]*[.$Z$5]*MAGNET([.AH$24]+[.BB68]) +[.AI$29]*[.$Z$5]*MAGNET([.AI$24]+[.BB68]) +[.AJ$29]*[.$Z$5]*MAGNET([.AJ$24]+[.BB68]) +[.AK$29]*[.$Z$5]*MAGNET([.AK$24]+[.BB68]) +[.AL$29]*[.$Z$5]*MAGNET([.AL$24]+[.BB68]) +[.AM$29]*[.$Z$5]*MAGNET([.AM$24]+[.BB68]) +[.AN$29]*[.$Z$5]*MAGNET([.AN$24]+[.BB68]) +[.AO$29]*[.$Z$5]*MAGNET([.AO$24]+[.BB68]) +[.AP$29]*[.$Z$5]*MAGNET([.AP$24]+[.$BB68])&#10;+[.AQ$29]*[.$Z$5]*MAGNET([.AQ$24]+[.$BB68])&#10;+[.AR$29]*[.$Z$5]*MAGNET([.AR$24]+[.$BB68])&#10;+[.AS$29]*[.$Z$5]*MAGNET([.AS$24]+[.$BB68])&#10;+[.AT$29]*[.$Z$5]*MAGNET([.AT$24]+[.$BB68])&#10;+[.AU$29]*[.$Z$5]*MAGNET([.AU$24]+[.$BB68])&#10;+[.AV$29]*[.$Z$5]*MAGNET([.AV$24]+[.$BB68])&#10;+[.AW$29]*[.$Z$5]*MAGNET([.AW$24]+[.$BB68])&#10;+[.AX$29]*[.$Z$5]*MAGNET([.AX$24]+[.$BB68])&#10;+[.AY$29]*[.$Z$5]*MAGNET([.AY$24]+[.$BB68]) +RAND()*[.$BG$13]" office:value-type="float" office:value="-17.3143507386538" calcext:value-type="float">
            <text:p>-17.3143507386538</text:p>
          </table:table-cell>
          <table:table-cell table:style-name="ce71" table:formula="of:=[.E$30]*[.$Z$5]*MAGNET([.E$24]+[.$BB68])+[.F$30]*[.$Z$5]*MAGNET([.F$24]+[.$BB68])+[.G$30]*[.$Z$5]*MAGNET([.G$24]+[.$BB68])+[.H$30]*[.$Z$5]*MAGNET([.H$24]+[.$BB68])+[.I$30]*[.$Z$5]*MAGNET([.I$24]+[.$BB68])+[.J$30]*[.$Z$5]*MAGNET([.J$24]+[.$BB68])+[.K$30]*[.$Z$5]*MAGNET([.K$24]+[.$BB68])+[.L$30]*[.$Z$5]*MAGNET([.L$24]+[.$BB68])+[.M$30]*[.$Z$5]*MAGNET([.M$24]+[.$BB68])+[.N$30]*[.$Z$5]*MAGNET([.N$24]+[.$BB68])+[.O$30]*[.$Z$5]*MAGNET([.O$24]+[.$BB68])+[.P$30]*[.$Z$5]*MAGNET([.P$24]+[.$BB68])+[.Q$30]*[.$Z$5]*MAGNET([.Q$24]+[.$BB68])+[.R$30]*[.$Z$5]*MAGNET([.R$24]+[.$BB68])+[.S$30]*[.$Z$5]*MAGNET([.S$24]+[.$BB68])+[.T$30]*[.$Z$5]*MAGNET([.T$24]+[.$BB68])+[.U$30]*[.$Z$5]*MAGNET([.U$24]+[.$BB68])+[.V$30]*[.$Z$5]*MAGNET([.V$24]+[.$BB68])+[.W$30]*[.$Z$5]*MAGNET([.W$24]+[.$BB68])+[.X$30]*[.$Z$5]*MAGNET([.X$24]+[.$BB68])+[.Y$30]*[.$Z$5]*MAGNET([.Y$24]+[.$BB68])+[.Z$30]*[.$Z$5]*MAGNET([.Z$24]+[.$BB68])+[.AA$30]*[.$Z$5]*MAGNET([.AA$24]+[.$BB68])+[.AB$30]*[.$Z$5]*MAGNET([.AB$24]+[.$BB68])+[.AC$30]*[.$Z$5]*MAGNET([.AC$24]+[.$BB68])+[.AD$30]*[.$Z$5]*MAGNET([.AD$24]+[.$BB68])+[.AE$30]*[.$Z$5]*MAGNET([.AE$24]+[.$BB68])+[.AF$30]*[.$Z$5]*MAGNET([.AF$24]+[.$BB68])+[.AG$30]*[.$Z$5]*MAGNET([.AG$24]+[.$BB68])+[.D$30]*[.$Z$5]*MAGNET([.D$24]+[.$BB68])+[.AH$30]*[.$Z$5]*MAGNET([.AH$24]+[.BB68]) +[.AI$30]*[.$Z$5]*MAGNET([.AI$24]+[.BB68]) +[.AJ$30]*[.$Z$5]*MAGNET([.AJ$24]+[.BB68]) +[.AK$30]*[.$Z$5]*MAGNET([.AK$24]+[.BB68]) +[.AL$30]*[.$Z$5]*MAGNET([.AL$24]+[.BB68]) +[.AM$30]*[.$Z$5]*MAGNET([.AM$24]+[.BB68]) +[.AN$30]*[.$Z$5]*MAGNET([.AN$24]+[.BB68]) +[.AO$30]*[.$Z$5]*MAGNET([.AO$24]+[.BB68]) +[.AP$30]*[.$Z$5]*MAGNET([.AP$24]+[.$BB68])&#10;+[.AQ$30]*[.$Z$5]*MAGNET([.AQ$24]+[.$BB68])&#10;+[.AR$30]*[.$Z$5]*MAGNET([.AR$24]+[.$BB68])&#10;+[.AS$30]*[.$Z$5]*MAGNET([.AS$24]+[.$BB68])&#10;+[.AT$30]*[.$Z$5]*MAGNET([.AT$24]+[.$BB68])&#10;+[.AU$30]*[.$Z$5]*MAGNET([.AU$24]+[.$BB68])&#10;+[.AV$30]*[.$Z$5]*MAGNET([.AV$24]+[.$BB68])&#10;+[.AW$30]*[.$Z$5]*MAGNET([.AW$24]+[.$BB68])&#10;+[.AX$30]*[.$Z$5]*MAGNET([.AX$24]+[.$BB68])&#10;+[.AY$30]*[.$Z$5]*MAGNET([.AY$24]+[.$BB68]) +RAND()*[.$BH$13]" office:value-type="float" office:value="0" calcext:value-type="float">
            <text:p>0</text:p>
          </table:table-cell>
          <table:table-cell table:style-name="ce71" table:formula="of:=[.E$31]*[.$Z$5]*MAGNET([.E$24]+[.$BB68])+[.F$31]*[.$Z$5]*MAGNET([.F$24]+[.$BB68])+[.G$31]*[.$Z$5]*MAGNET([.G$24]+[.$BB68])+[.H$31]*[.$Z$5]*MAGNET([.H$24]+[.$BB68])+[.I$31]*[.$Z$5]*MAGNET([.I$24]+[.$BB68])+[.J$31]*[.$Z$5]*MAGNET([.J$24]+[.$BB68])+[.K$31]*[.$Z$5]*MAGNET([.K$24]+[.$BB68])+[.L$31]*[.$Z$5]*MAGNET([.L$24]+[.$BB68])+[.M$31]*[.$Z$5]*MAGNET([.M$24]+[.$BB68])+[.N$31]*[.$Z$5]*MAGNET([.N$24]+[.$BB68])+[.O$31]*[.$Z$5]*MAGNET([.O$24]+[.$BB68])+[.P$31]*[.$Z$5]*MAGNET([.P$24]+[.$BB68])+[.Q$31]*[.$Z$5]*MAGNET([.Q$24]+[.$BB68])+[.R$31]*[.$Z$5]*MAGNET([.R$24]+[.$BB68])+[.S$31]*[.$Z$5]*MAGNET([.S$24]+[.$BB68])+[.T$31]*[.$Z$5]*MAGNET([.T$24]+[.$BB68])+[.U$31]*[.$Z$5]*MAGNET([.U$24]+[.$BB68])+[.V$31]*[.$Z$5]*MAGNET([.V$24]+[.$BB68])+[.W$31]*[.$Z$5]*MAGNET([.W$24]+[.$BB68])+[.X$31]*[.$Z$5]*MAGNET([.X$24]+[.$BB68])+[.Y$31]*[.$Z$5]*MAGNET([.Y$24]+[.$BB68])+[.Z$31]*[.$Z$5]*MAGNET([.Z$24]+[.$BB68])+[.AA$31]*[.$Z$5]*MAGNET([.AA$24]+[.$BB68])+[.AB$31]*[.$Z$5]*MAGNET([.AB$24]+[.$BB68])+[.AC$31]*[.$Z$5]*MAGNET([.AC$24]+[.$BB68])+[.AD$31]*[.$Z$5]*MAGNET([.AD$24]+[.$BB68])+[.AE$31]*[.$Z$5]*MAGNET([.AE$24]+[.$BB68])+[.AF$31]*[.$Z$5]*MAGNET([.AF$24]+[.$BB68])+[.AG$31]*[.$Z$5]*MAGNET([.AG$24]+[.$BB68])+[.D$31]*[.$Z$5]*MAGNET([.D$24]+[.$BB68])+[.AH$31]*[.$Z$5]*MAGNET([.AH$24]+[.BB68]) +[.AI$31]*[.$Z$5]*MAGNET([.AI$24]+[.BB68]) +[.AJ$31]*[.$Z$5]*MAGNET([.AJ$24]+[.BB68]) +[.AK$31]*[.$Z$5]*MAGNET([.AK$24]+[.BB68]) +[.AL$31]*[.$Z$5]*MAGNET([.AL$24]+[.BB68]) +[.AM$31]*[.$Z$5]*MAGNET([.AM$24]+[.BB68]) +[.AN$31]*[.$Z$5]*MAGNET([.AN$24]+[.BB68]) +[.AO$31]*[.$Z$5]*MAGNET([.AO$24]+[.BB68]) +[.AP$31]*[.$Z$5]*MAGNET([.AP$24]+[.$BB68])&#10;+[.AQ$31]*[.$Z$5]*MAGNET([.AQ$24]+[.$BB68])&#10;+[.AR$31]*[.$Z$5]*MAGNET([.AR$24]+[.$BB68])&#10;+[.AS$31]*[.$Z$5]*MAGNET([.AS$24]+[.$BB68])&#10;+[.AT$31]*[.$Z$5]*MAGNET([.AT$24]+[.$BB68])&#10;+[.AU$31]*[.$Z$5]*MAGNET([.AU$24]+[.$BB68])&#10;+[.AV$31]*[.$Z$5]*MAGNET([.AV$24]+[.$BB68])&#10;+[.AW$31]*[.$Z$5]*MAGNET([.AW$24]+[.$BB68])&#10;+[.AX$31]*[.$Z$5]*MAGNET([.AX$24]+[.$BB68])&#10;+[.AY$31]*[.$Z$5]*MAGNET([.AY$24]+[.$BB68]) +RAND()*[.$BI$13]" office:value-type="float" office:value="0" calcext:value-type="float">
            <text:p>0</text:p>
          </table:table-cell>
          <table:table-cell table:style-name="ce71" table:formula="of:=[.E$32]*[.$Z$5]*MAGNET([.E$24]+[.$BB68])+[.F$32]*[.$Z$5]*MAGNET([.F$24]+[.$BB68])+[.G$32]*[.$Z$5]*MAGNET([.G$24]+[.$BB68])+[.H$32]*[.$Z$5]*MAGNET([.H$24]+[.$BB68])+[.I$32]*[.$Z$5]*MAGNET([.I$24]+[.$BB68])+[.J$32]*[.$Z$5]*MAGNET([.J$24]+[.$BB68])+[.K$32]*[.$Z$5]*MAGNET([.K$24]+[.$BB68])+[.L$32]*[.$Z$5]*MAGNET([.L$24]+[.$BB68])+[.M$32]*[.$Z$5]*MAGNET([.M$24]+[.$BB68])+[.N$32]*[.$Z$5]*MAGNET([.N$24]+[.$BB68])+[.O$32]*[.$Z$5]*MAGNET([.O$24]+[.$BB68])+[.P$32]*[.$Z$5]*MAGNET([.P$24]+[.$BB68])+[.Q$32]*[.$Z$5]*MAGNET([.Q$24]+[.$BB68])+[.R$32]*[.$Z$5]*MAGNET([.R$24]+[.$BB68])+[.S$32]*[.$Z$5]*MAGNET([.S$24]+[.$BB68])+[.T$32]*[.$Z$5]*MAGNET([.T$24]+[.$BB68])+[.U$32]*[.$Z$5]*MAGNET([.U$24]+[.$BB68])+[.V$32]*[.$Z$5]*MAGNET([.V$24]+[.$BB68])+[.W$32]*[.$Z$5]*MAGNET([.W$24]+[.$BB68])+[.X$32]*[.$Z$5]*MAGNET([.X$24]+[.$BB68])+[.Y$32]*[.$Z$5]*MAGNET([.Y$24]+[.$BB68])+[.Z$32]*[.$Z$5]*MAGNET([.Z$24]+[.$BB68])+[.AA$32]*[.$Z$5]*MAGNET([.AA$24]+[.$BB68])+[.AB$32]*[.$Z$5]*MAGNET([.AB$24]+[.$BB68])+[.AC$32]*[.$Z$5]*MAGNET([.AC$24]+[.$BB68])+[.AD$32]*[.$Z$5]*MAGNET([.AD$24]+[.$BB68])+[.AE$32]*[.$Z$5]*MAGNET([.AE$24]+[.$BB68])+[.AF$32]*[.$Z$5]*MAGNET([.AF$24]+[.$BB68])+[.AG$32]*[.$Z$5]*MAGNET([.AG$24]+[.$BB68])+[.D$32]*[.$Z$5]*MAGNET([.D$24]+[.$BB68])+[.AH$32]*[.$Z$5]*MAGNET([.AH$24]+[.BB68]) +[.AI$32]*[.$Z$5]*MAGNET([.AI$24]+[.BB68]) +[.AJ$32]*[.$Z$5]*MAGNET([.AJ$24]+[.BB68]) +[.AK$32]*[.$Z$5]*MAGNET([.AK$24]+[.BB68]) +[.AL$32]*[.$Z$5]*MAGNET([.AL$24]+[.BB68]) +[.AM$32]*[.$Z$5]*MAGNET([.AM$24]+[.BB68]) +[.AN$32]*[.$Z$5]*MAGNET([.AN$24]+[.BB68]) +[.AO$32]*[.$Z$5]*MAGNET([.AO$24]+[.BB68]) +[.AP$32]*[.$Z$5]*MAGNET([.AP$24]+[.$BB68])&#10;+[.AQ$32]*[.$Z$5]*MAGNET([.AQ$24]+[.$BB68])&#10;+[.AR$32]*[.$Z$5]*MAGNET([.AR$24]+[.$BB68])&#10;+[.AS$32]*[.$Z$5]*MAGNET([.AS$24]+[.$BB68])&#10;+[.AT$32]*[.$Z$5]*MAGNET([.AT$24]+[.$BB68])&#10;+[.AU$32]*[.$Z$5]*MAGNET([.AU$24]+[.$BB68])&#10;+[.AV$32]*[.$Z$5]*MAGNET([.AV$24]+[.$BB68])&#10;+[.AW$32]*[.$Z$5]*MAGNET([.AW$24]+[.$BB68])&#10;+[.AX$32]*[.$Z$5]*MAGNET([.AX$24]+[.$BB68])&#10;+[.AY$32]*[.$Z$5]*MAGNET([.AY$24]+[.$BB6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8]+0.002" office:value-type="float" office:value="0.108" calcext:value-type="float">
            <text:p>0.108</text:p>
          </table:table-cell>
          <table:table-cell table:formula="of:=[.BA69]*[.$D$6]" office:value-type="float" office:value="5.42867210540317" calcext:value-type="float">
            <text:p>5.429</text:p>
          </table:table-cell>
          <table:table-cell table:formula="of:=[.D$25]*[.$Z$5]*MAGNET([.D$24]+[.BB69])+[.E$25]*[.$Z$5]*MAGNET([.E$24]+[.BB69])+[.F$25]*[.$Z$5]*MAGNET([.F$24]+[.BB69])+[.G$25]*[.$Z$5]*MAGNET([.G$24]+[.BB69])+[.H$25]*[.$Z$5]*MAGNET([.H$24]+[.BB69])+[.I$25]*[.$Z$5]*MAGNET([.I$24]+[.BB69])+[.J$25]*[.$Z$5]*MAGNET([.J$24]+[.BB69])+[.K$25]*[.$Z$5]*MAGNET([.K$24]+[.BB69])+[.L$25]*[.$Z$5]*MAGNET([.L$24]+[.BB69])+[.M$25]*[.$Z$5]*MAGNET([.M$24]+[.BB69])+[.N$25]*[.$Z$5]*MAGNET([.N$24]+[.BB69])+[.O$25]*[.$Z$5]*MAGNET([.O$24]+[.BB69])+[.P$25]*[.$Z$5]*MAGNET([.P$24]+[.BB69])+[.Q$25]*[.$Z$5]*MAGNET([.Q$24]+[.BB69])+[.R$25]*[.$Z$5]*MAGNET([.R$24]+[.BB69])+[.S$25]*[.$Z$5]*MAGNET([.S$24]+[.BB69])+[.T$25]*[.$Z$5]*MAGNET([.T$24]+[.BB69])+[.U$25]*[.$Z$5]*MAGNET([.U$24]+[.BB69])+[.V$25]*[.$Z$5]*MAGNET([.V$24]+[.BB69])+[.W$25]*[.$Z$5]*MAGNET([.W$24]+[.BB69])+[.X$25]*[.$Z$5]*MAGNET([.X$24]+[.BB69])+[.Y$25]*[.$Z$5]*MAGNET([.Y$24]+[.BB69])+[.Z$25]*[.$Z$5]*MAGNET([.Z$24]+[.BB69])+[.AA$25]*[.$Z$5]*MAGNET([.AA$24]+[.BB69])+[.AB$25]*[.$Z$5]*MAGNET([.AB$24]+[.BB69])+[.AC$25]*[.$Z$5]*MAGNET([.AC$24]+[.BB69])+[.AD$25]*[.$Z$5]*MAGNET([.AD$24]+[.BB69])+[.AE$25]*[.$Z$5]*MAGNET([.AE$24]+[.BB69])+[.AF$25]*[.$Z$5]*MAGNET([.AF$24]+[.BB69])+[.AG$25]*[.$Z$5]*MAGNET([.AG$24]+[.BB69])+[.AH$25]*[.$Z$5]*MAGNET([.AH$24]+[.BB69]) +[.AI$25]*[.$Z$5]*MAGNET([.AI$24]+[.BB69]) +[.AJ$25]*[.$Z$5]*MAGNET([.AJ$24]+[.BB69]) +[.AK$25]*[.$Z$5]*MAGNET([.AK$24]+[.BB69]) +[.AL$25]*[.$Z$5]*MAGNET([.AL$24]+[.BB69]) +[.AM$25]*[.$Z$5]*MAGNET([.AM$24]+[.BB69]) +[.AN$25]*[.$Z$5]*MAGNET([.AN$24]+[.BB69]) +[.AO$25]*[.$Z$5]*MAGNET([.AO$24]+[.BB69])+RAND()*[.$BC$13]+[.AP$25]*[.$Z$5]*MAGNET([.AP$24]+[.BB69])&#10;+[.AQ$25]*[.$Z$5]*MAGNET([.AQ$24]+[.BB69])&#10;+[.AR$25]*[.$Z$5]*MAGNET([.AR$24]+[.BB69])&#10;+[.AS$25]*[.$Z$5]*MAGNET([.AS$24]+[.BB69])&#10;+[.AT$25]*[.$Z$5]*MAGNET([.AT$24]+[.BB69])&#10;+[.AU$25]*[.$Z$5]*MAGNET([.AU$24]+[.BB69])&#10;+[.AV$25]*[.$Z$5]*MAGNET([.AV$24]+[.BB69])&#10;+[.AW$25]*[.$Z$5]*MAGNET([.AW$24]+[.BB69])&#10;+[.AX$25]*[.$Z$5]*MAGNET([.AX$24]+[.BB69])&#10;+[.AY$25]*[.$Z$5]*MAGNET([.AY$24]+[.BB69])" office:value-type="float" office:value="-110.732404084818" calcext:value-type="float">
            <text:p>-110.73</text:p>
          </table:table-cell>
          <table:table-cell table:style-name="ce70" table:formula="of:=[.E$26]*[.$Z$5]*MAGNET([.E$24]+[.$BB69])+[.F$26]*[.$Z$5]*MAGNET([.F$24]+[.$BB69])+[.G$26]*[.$Z$5]*MAGNET([.G$24]+[.$BB69])+[.H$26]*[.$Z$5]*MAGNET([.H$24]+[.$BB69])+[.I$26]*[.$Z$5]*MAGNET([.I$24]+[.$BB69])+[.J$26]*[.$Z$5]*MAGNET([.J$24]+[.$BB69])+[.K$26]*[.$Z$5]*MAGNET([.K$24]+[.$BB69])+[.L$26]*[.$Z$5]*MAGNET([.L$24]+[.$BB69])+[.M$26]*[.$Z$5]*MAGNET([.M$24]+[.$BB69])+[.N$26]*[.$Z$5]*MAGNET([.N$24]+[.$BB69])+[.O$26]*[.$Z$5]*MAGNET([.O$24]+[.$BB69])+[.P$26]*[.$Z$5]*MAGNET([.P$24]+[.$BB69])+[.Q$26]*[.$Z$5]*MAGNET([.Q$24]+[.$BB69])+[.R$26]*[.$Z$5]*MAGNET([.R$24]+[.$BB69])+[.S$26]*[.$Z$5]*MAGNET([.S$24]+[.$BB69])+[.T$26]*[.$Z$5]*MAGNET([.T$24]+[.$BB69])+[.U$26]*[.$Z$5]*MAGNET([.U$24]+[.$BB69])+[.V$26]*[.$Z$5]*MAGNET([.V$24]+[.$BB69])+[.W$26]*[.$Z$5]*MAGNET([.W$24]+[.$BB69])+[.X$26]*[.$Z$5]*MAGNET([.X$24]+[.$BB69])+[.Y$26]*[.$Z$5]*MAGNET([.Y$24]+[.$BB69])+[.Z$26]*[.$Z$5]*MAGNET([.Z$24]+[.$BB69])+[.AA$26]*[.$Z$5]*MAGNET([.AA$24]+[.$BB69])+[.AB$26]*[.$Z$5]*MAGNET([.AB$24]+[.$BB69])+[.AC$26]*[.$Z$5]*MAGNET([.AC$24]+[.$BB69])+[.AD$26]*[.$Z$5]*MAGNET([.AD$24]+[.$BB69])+[.AE$26]*[.$Z$5]*MAGNET([.AE$24]+[.$BB69])+[.AF$26]*[.$Z$5]*MAGNET([.AF$24]+[.$BB69])+[.AG$26]*[.$Z$5]*MAGNET([.AG$24]+[.$BB69])+[.D$26]*[.$Z$5]*MAGNET([.D$24]+[.$BB69])+[.AH$26]*[.$Z$5]*MAGNET([.AH$24]+[.BB69]) +[.AI$26]*[.$Z$5]*MAGNET([.AI$24]+[.BB69]) +[.AJ$26]*[.$Z$5]*MAGNET([.AJ$24]+[.BB69]) +[.AK$26]*[.$Z$5]*MAGNET([.AK$24]+[.BB69]) +[.AL$26]*[.$Z$5]*MAGNET([.AL$24]+[.BB69]) +[.AM$26]*[.$Z$5]*MAGNET([.AM$24]+[.BB69]) +[.AN$26]*[.$Z$5]*MAGNET([.AN$24]+[.BB69]) +[.AO$26]*[.$Z$5]*MAGNET([.AO$24]+[.BB69]) +[.AP$26]*[.$Z$5]*MAGNET([.AP$24]+[.$BB69])&#10;+[.AQ$26]*[.$Z$5]*MAGNET([.AQ$24]+[.$BB69])&#10;+[.AR$26]*[.$Z$5]*MAGNET([.AR$24]+[.$BB69])&#10;+[.AS$26]*[.$Z$5]*MAGNET([.AS$24]+[.$BB69])&#10;+[.AT$26]*[.$Z$5]*MAGNET([.AT$24]+[.$BB69])&#10;+[.AU$26]*[.$Z$5]*MAGNET([.AU$24]+[.$BB69])&#10;+[.AV$26]*[.$Z$5]*MAGNET([.AV$24]+[.$BB69])&#10;+[.AW$26]*[.$Z$5]*MAGNET([.AW$24]+[.$BB69])&#10;+[.AX$26]*[.$Z$5]*MAGNET([.AX$24]+[.$BB69])&#10;+[.AY$26]*[.$Z$5]*MAGNET([.AY$24]+[.$BB69]) +RAND()*[.$BD$13]" office:value-type="float" office:value="75.702098565543" calcext:value-type="float">
            <text:p>75.70</text:p>
          </table:table-cell>
          <table:table-cell table:style-name="ce71" table:formula="of:=[.E$27]*[.$Z$5]*MAGNET([.E$24]+[.$BB69])+[.F$27]*[.$Z$5]*MAGNET([.F$24]+[.$BB69])+[.G$27]*[.$Z$5]*MAGNET([.G$24]+[.$BB69])+[.H$27]*[.$Z$5]*MAGNET([.H$24]+[.$BB69])+[.I$27]*[.$Z$5]*MAGNET([.I$24]+[.$BB69])+[.J$27]*[.$Z$5]*MAGNET([.J$24]+[.$BB69])+[.K$27]*[.$Z$5]*MAGNET([.K$24]+[.$BB69])+[.L$27]*[.$Z$5]*MAGNET([.L$24]+[.$BB69])+[.M$27]*[.$Z$5]*MAGNET([.M$24]+[.$BB69])+[.N$27]*[.$Z$5]*MAGNET([.N$24]+[.$BB69])+[.O$27]*[.$Z$5]*MAGNET([.O$24]+[.$BB69])+[.P$27]*[.$Z$5]*MAGNET([.P$24]+[.$BB69])+[.Q$27]*[.$Z$5]*MAGNET([.Q$24]+[.$BB69])+[.R$27]*[.$Z$5]*MAGNET([.R$24]+[.$BB69])+[.S$27]*[.$Z$5]*MAGNET([.S$24]+[.$BB69])+[.T$27]*[.$Z$5]*MAGNET([.T$24]+[.$BB69])+[.U$27]*[.$Z$5]*MAGNET([.U$24]+[.$BB69])+[.V$27]*[.$Z$5]*MAGNET([.V$24]+[.$BB69])+[.W$27]*[.$Z$5]*MAGNET([.W$24]+[.$BB69])+[.X$27]*[.$Z$5]*MAGNET([.X$24]+[.$BB69])+[.Y$27]*[.$Z$5]*MAGNET([.Y$24]+[.$BB69])+[.Z$27]*[.$Z$5]*MAGNET([.Z$24]+[.$BB69])+[.AA$27]*[.$Z$5]*MAGNET([.AA$24]+[.$BB69])+[.AB$27]*[.$Z$5]*MAGNET([.AB$24]+[.$BB69])+[.AC$27]*[.$Z$5]*MAGNET([.AC$24]+[.$BB69])+[.AD$27]*[.$Z$5]*MAGNET([.AD$24]+[.$BB69])+[.AE$27]*[.$Z$5]*MAGNET([.AE$24]+[.$BB69])+[.AF$27]*[.$Z$5]*MAGNET([.AF$24]+[.$BB69])+[.AG$27]*[.$Z$5]*MAGNET([.AG$24]+[.$BB69])+[.D$27]*[.$Z$5]*MAGNET([.D$24]+[.$BB69])+[.AH$27]*[.$Z$5]*MAGNET([.AH$24]+[.BB69]) +[.AI$27]*[.$Z$5]*MAGNET([.AI$24]+[.BB69]) +[.AJ$27]*[.$Z$5]*MAGNET([.AJ$24]+[.BB69]) +[.AK$27]*[.$Z$5]*MAGNET([.AK$24]+[.BB69]) +[.AL$27]*[.$Z$5]*MAGNET([.AL$24]+[.BB69]) +[.AM$27]*[.$Z$5]*MAGNET([.AM$24]+[.BB69]) +[.AN$27]*[.$Z$5]*MAGNET([.AN$24]+[.BB69]) +[.AO$27]*[.$Z$5]*MAGNET([.AO$24]+[.BB69]) +[.AP$27]*[.$Z$5]*MAGNET([.AP$24]+[.$BB69])&#10;+[.AQ$27]*[.$Z$5]*MAGNET([.AQ$24]+[.$BB69])&#10;+[.AR$27]*[.$Z$5]*MAGNET([.AR$24]+[.$BB69])&#10;+[.AS$27]*[.$Z$5]*MAGNET([.AS$24]+[.$BB69])&#10;+[.AT$27]*[.$Z$5]*MAGNET([.AT$24]+[.$BB69])&#10;+[.AU$27]*[.$Z$5]*MAGNET([.AU$24]+[.$BB69])&#10;+[.AV$27]*[.$Z$5]*MAGNET([.AV$24]+[.$BB69])&#10;+[.AW$27]*[.$Z$5]*MAGNET([.AW$24]+[.$BB69])&#10;+[.AX$27]*[.$Z$5]*MAGNET([.AX$24]+[.$BB69])&#10;+[.AY$27]*[.$Z$5]*MAGNET([.AY$24]+[.$BB69]) +RAND()*[.$BE$13]" office:value-type="float" office:value="47.1080936295275" calcext:value-type="float">
            <text:p>47.1080936295275</text:p>
          </table:table-cell>
          <table:table-cell table:style-name="ce71" table:formula="of:=[.E$28]*[.$Z$5]*MAGNET([.E$24]+[.$BB69])+[.F$28]*[.$Z$5]*MAGNET([.F$24]+[.$BB69])+[.G$28]*[.$Z$5]*MAGNET([.G$24]+[.$BB69])+[.H$28]*[.$Z$5]*MAGNET([.H$24]+[.$BB69])+[.I$28]*[.$Z$5]*MAGNET([.I$24]+[.$BB69])+[.J$28]*[.$Z$5]*MAGNET([.J$24]+[.$BB69])+[.K$28]*[.$Z$5]*MAGNET([.K$24]+[.$BB69])+[.L$28]*[.$Z$5]*MAGNET([.L$24]+[.$BB69])+[.M$28]*[.$Z$5]*MAGNET([.M$24]+[.$BB69])+[.N$28]*[.$Z$5]*MAGNET([.N$24]+[.$BB69])+[.O$28]*[.$Z$5]*MAGNET([.O$24]+[.$BB69])+[.P$28]*[.$Z$5]*MAGNET([.P$24]+[.$BB69])+[.Q$28]*[.$Z$5]*MAGNET([.Q$24]+[.$BB69])+[.R$28]*[.$Z$5]*MAGNET([.R$24]+[.$BB69])+[.S$28]*[.$Z$5]*MAGNET([.S$24]+[.$BB69])+[.T$28]*[.$Z$5]*MAGNET([.T$24]+[.$BB69])+[.U$28]*[.$Z$5]*MAGNET([.U$24]+[.$BB69])+[.V$28]*[.$Z$5]*MAGNET([.V$24]+[.$BB69])+[.W$28]*[.$Z$5]*MAGNET([.W$24]+[.$BB69])+[.X$28]*[.$Z$5]*MAGNET([.X$24]+[.$BB69])+[.Y$28]*[.$Z$5]*MAGNET([.Y$24]+[.$BB69])+[.Z$28]*[.$Z$5]*MAGNET([.Z$24]+[.$BB69])+[.AA$28]*[.$Z$5]*MAGNET([.AA$24]+[.$BB69])+[.AB$28]*[.$Z$5]*MAGNET([.AB$24]+[.$BB69])+[.AC$28]*[.$Z$5]*MAGNET([.AC$24]+[.$BB69])+[.AD$28]*[.$Z$5]*MAGNET([.AD$24]+[.$BB69])+[.AE$28]*[.$Z$5]*MAGNET([.AE$24]+[.$BB69])+[.AF$28]*[.$Z$5]*MAGNET([.AF$24]+[.$BB69])+[.AG$28]*[.$Z$5]*MAGNET([.AG$24]+[.$BB69])+[.D$28]*[.$Z$5]*MAGNET([.D$24]+[.$BB69])+[.AH$28]*[.$Z$5]*MAGNET([.AH$24]+[.BB69]) +[.AI$28]*[.$Z$5]*MAGNET([.AI$24]+[.BB69]) +[.AJ$28]*[.$Z$5]*MAGNET([.AJ$24]+[.BB69]) +[.AK$28]*[.$Z$5]*MAGNET([.AK$24]+[.BB69]) +[.AL$28]*[.$Z$5]*MAGNET([.AL$24]+[.BB69]) +[.AM$28]*[.$Z$5]*MAGNET([.AM$24]+[.BB69]) +[.AN$28]*[.$Z$5]*MAGNET([.AN$24]+[.BB69]) +[.AO$28]*[.$Z$5]*MAGNET([.AO$24]+[.BB69]) +[.AP$28]*[.$Z$5]*MAGNET([.AP$24]+[.$BB69])&#10;+[.AQ$28]*[.$Z$5]*MAGNET([.AQ$24]+[.$BB69])&#10;+[.AR$28]*[.$Z$5]*MAGNET([.AR$24]+[.$BB69])&#10;+[.AS$28]*[.$Z$5]*MAGNET([.AS$24]+[.$BB69])&#10;+[.AT$28]*[.$Z$5]*MAGNET([.AT$24]+[.$BB69])&#10;+[.AU$28]*[.$Z$5]*MAGNET([.AU$24]+[.$BB69])&#10;+[.AV$28]*[.$Z$5]*MAGNET([.AV$24]+[.$BB69])&#10;+[.AW$28]*[.$Z$5]*MAGNET([.AW$24]+[.$BB69])&#10;+[.AX$28]*[.$Z$5]*MAGNET([.AX$24]+[.$BB69])&#10;+[.AY$28]*[.$Z$5]*MAGNET([.AY$24]+[.$BB69]) +RAND()*[.$BF$13]" office:value-type="float" office:value="4.46377659513356" calcext:value-type="float">
            <text:p>4.46377659513356</text:p>
          </table:table-cell>
          <table:table-cell table:style-name="ce71" table:formula="of:=[.E$29]*[.$Z$5]*MAGNET([.E$24]+[.$BB69])+[.F$29]*[.$Z$5]*MAGNET([.F$24]+[.$BB69])+[.G$29]*[.$Z$5]*MAGNET([.G$24]+[.$BB69])+[.H$29]*[.$Z$5]*MAGNET([.H$24]+[.$BB69])+[.I$29]*[.$Z$5]*MAGNET([.I$24]+[.$BB69])+[.J$29]*[.$Z$5]*MAGNET([.J$24]+[.$BB69])+[.K$29]*[.$Z$5]*MAGNET([.K$24]+[.$BB69])+[.L$29]*[.$Z$5]*MAGNET([.L$24]+[.$BB69])+[.M$29]*[.$Z$5]*MAGNET([.M$24]+[.$BB69])+[.N$29]*[.$Z$5]*MAGNET([.N$24]+[.$BB69])+[.O$29]*[.$Z$5]*MAGNET([.O$24]+[.$BB69])+[.P$29]*[.$Z$5]*MAGNET([.P$24]+[.$BB69])+[.Q$29]*[.$Z$5]*MAGNET([.Q$24]+[.$BB69])+[.R$29]*[.$Z$5]*MAGNET([.R$24]+[.$BB69])+[.S$29]*[.$Z$5]*MAGNET([.S$24]+[.$BB69])+[.T$29]*[.$Z$5]*MAGNET([.T$24]+[.$BB69])+[.U$29]*[.$Z$5]*MAGNET([.U$24]+[.$BB69])+[.V$29]*[.$Z$5]*MAGNET([.V$24]+[.$BB69])+[.W$29]*[.$Z$5]*MAGNET([.W$24]+[.$BB69])+[.X$29]*[.$Z$5]*MAGNET([.X$24]+[.$BB69])+[.Y$29]*[.$Z$5]*MAGNET([.Y$24]+[.$BB69])+[.Z$29]*[.$Z$5]*MAGNET([.Z$24]+[.$BB69])+[.AA$29]*[.$Z$5]*MAGNET([.AA$24]+[.$BB69])+[.AB$29]*[.$Z$5]*MAGNET([.AB$24]+[.$BB69])+[.AC$29]*[.$Z$5]*MAGNET([.AC$24]+[.$BB69])+[.AD$29]*[.$Z$5]*MAGNET([.AD$24]+[.$BB69])+[.AE$29]*[.$Z$5]*MAGNET([.AE$24]+[.$BB69])+[.AF$29]*[.$Z$5]*MAGNET([.AF$24]+[.$BB69])+[.AG$29]*[.$Z$5]*MAGNET([.AG$24]+[.$BB69])+[.D$29]*[.$Z$5]*MAGNET([.D$24]+[.$BB69])+[.AH$29]*[.$Z$5]*MAGNET([.AH$24]+[.BB69]) +[.AI$29]*[.$Z$5]*MAGNET([.AI$24]+[.BB69]) +[.AJ$29]*[.$Z$5]*MAGNET([.AJ$24]+[.BB69]) +[.AK$29]*[.$Z$5]*MAGNET([.AK$24]+[.BB69]) +[.AL$29]*[.$Z$5]*MAGNET([.AL$24]+[.BB69]) +[.AM$29]*[.$Z$5]*MAGNET([.AM$24]+[.BB69]) +[.AN$29]*[.$Z$5]*MAGNET([.AN$24]+[.BB69]) +[.AO$29]*[.$Z$5]*MAGNET([.AO$24]+[.BB69]) +[.AP$29]*[.$Z$5]*MAGNET([.AP$24]+[.$BB69])&#10;+[.AQ$29]*[.$Z$5]*MAGNET([.AQ$24]+[.$BB69])&#10;+[.AR$29]*[.$Z$5]*MAGNET([.AR$24]+[.$BB69])&#10;+[.AS$29]*[.$Z$5]*MAGNET([.AS$24]+[.$BB69])&#10;+[.AT$29]*[.$Z$5]*MAGNET([.AT$24]+[.$BB69])&#10;+[.AU$29]*[.$Z$5]*MAGNET([.AU$24]+[.$BB69])&#10;+[.AV$29]*[.$Z$5]*MAGNET([.AV$24]+[.$BB69])&#10;+[.AW$29]*[.$Z$5]*MAGNET([.AW$24]+[.$BB69])&#10;+[.AX$29]*[.$Z$5]*MAGNET([.AX$24]+[.$BB69])&#10;+[.AY$29]*[.$Z$5]*MAGNET([.AY$24]+[.$BB69]) +RAND()*[.$BG$13]" office:value-type="float" office:value="-12.6212959829912" calcext:value-type="float">
            <text:p>-12.6212959829912</text:p>
          </table:table-cell>
          <table:table-cell table:style-name="ce71" table:formula="of:=[.E$30]*[.$Z$5]*MAGNET([.E$24]+[.$BB69])+[.F$30]*[.$Z$5]*MAGNET([.F$24]+[.$BB69])+[.G$30]*[.$Z$5]*MAGNET([.G$24]+[.$BB69])+[.H$30]*[.$Z$5]*MAGNET([.H$24]+[.$BB69])+[.I$30]*[.$Z$5]*MAGNET([.I$24]+[.$BB69])+[.J$30]*[.$Z$5]*MAGNET([.J$24]+[.$BB69])+[.K$30]*[.$Z$5]*MAGNET([.K$24]+[.$BB69])+[.L$30]*[.$Z$5]*MAGNET([.L$24]+[.$BB69])+[.M$30]*[.$Z$5]*MAGNET([.M$24]+[.$BB69])+[.N$30]*[.$Z$5]*MAGNET([.N$24]+[.$BB69])+[.O$30]*[.$Z$5]*MAGNET([.O$24]+[.$BB69])+[.P$30]*[.$Z$5]*MAGNET([.P$24]+[.$BB69])+[.Q$30]*[.$Z$5]*MAGNET([.Q$24]+[.$BB69])+[.R$30]*[.$Z$5]*MAGNET([.R$24]+[.$BB69])+[.S$30]*[.$Z$5]*MAGNET([.S$24]+[.$BB69])+[.T$30]*[.$Z$5]*MAGNET([.T$24]+[.$BB69])+[.U$30]*[.$Z$5]*MAGNET([.U$24]+[.$BB69])+[.V$30]*[.$Z$5]*MAGNET([.V$24]+[.$BB69])+[.W$30]*[.$Z$5]*MAGNET([.W$24]+[.$BB69])+[.X$30]*[.$Z$5]*MAGNET([.X$24]+[.$BB69])+[.Y$30]*[.$Z$5]*MAGNET([.Y$24]+[.$BB69])+[.Z$30]*[.$Z$5]*MAGNET([.Z$24]+[.$BB69])+[.AA$30]*[.$Z$5]*MAGNET([.AA$24]+[.$BB69])+[.AB$30]*[.$Z$5]*MAGNET([.AB$24]+[.$BB69])+[.AC$30]*[.$Z$5]*MAGNET([.AC$24]+[.$BB69])+[.AD$30]*[.$Z$5]*MAGNET([.AD$24]+[.$BB69])+[.AE$30]*[.$Z$5]*MAGNET([.AE$24]+[.$BB69])+[.AF$30]*[.$Z$5]*MAGNET([.AF$24]+[.$BB69])+[.AG$30]*[.$Z$5]*MAGNET([.AG$24]+[.$BB69])+[.D$30]*[.$Z$5]*MAGNET([.D$24]+[.$BB69])+[.AH$30]*[.$Z$5]*MAGNET([.AH$24]+[.BB69]) +[.AI$30]*[.$Z$5]*MAGNET([.AI$24]+[.BB69]) +[.AJ$30]*[.$Z$5]*MAGNET([.AJ$24]+[.BB69]) +[.AK$30]*[.$Z$5]*MAGNET([.AK$24]+[.BB69]) +[.AL$30]*[.$Z$5]*MAGNET([.AL$24]+[.BB69]) +[.AM$30]*[.$Z$5]*MAGNET([.AM$24]+[.BB69]) +[.AN$30]*[.$Z$5]*MAGNET([.AN$24]+[.BB69]) +[.AO$30]*[.$Z$5]*MAGNET([.AO$24]+[.BB69]) +[.AP$30]*[.$Z$5]*MAGNET([.AP$24]+[.$BB69])&#10;+[.AQ$30]*[.$Z$5]*MAGNET([.AQ$24]+[.$BB69])&#10;+[.AR$30]*[.$Z$5]*MAGNET([.AR$24]+[.$BB69])&#10;+[.AS$30]*[.$Z$5]*MAGNET([.AS$24]+[.$BB69])&#10;+[.AT$30]*[.$Z$5]*MAGNET([.AT$24]+[.$BB69])&#10;+[.AU$30]*[.$Z$5]*MAGNET([.AU$24]+[.$BB69])&#10;+[.AV$30]*[.$Z$5]*MAGNET([.AV$24]+[.$BB69])&#10;+[.AW$30]*[.$Z$5]*MAGNET([.AW$24]+[.$BB69])&#10;+[.AX$30]*[.$Z$5]*MAGNET([.AX$24]+[.$BB69])&#10;+[.AY$30]*[.$Z$5]*MAGNET([.AY$24]+[.$BB69]) +RAND()*[.$BH$13]" office:value-type="float" office:value="0" calcext:value-type="float">
            <text:p>0</text:p>
          </table:table-cell>
          <table:table-cell table:style-name="ce71" table:formula="of:=[.E$31]*[.$Z$5]*MAGNET([.E$24]+[.$BB69])+[.F$31]*[.$Z$5]*MAGNET([.F$24]+[.$BB69])+[.G$31]*[.$Z$5]*MAGNET([.G$24]+[.$BB69])+[.H$31]*[.$Z$5]*MAGNET([.H$24]+[.$BB69])+[.I$31]*[.$Z$5]*MAGNET([.I$24]+[.$BB69])+[.J$31]*[.$Z$5]*MAGNET([.J$24]+[.$BB69])+[.K$31]*[.$Z$5]*MAGNET([.K$24]+[.$BB69])+[.L$31]*[.$Z$5]*MAGNET([.L$24]+[.$BB69])+[.M$31]*[.$Z$5]*MAGNET([.M$24]+[.$BB69])+[.N$31]*[.$Z$5]*MAGNET([.N$24]+[.$BB69])+[.O$31]*[.$Z$5]*MAGNET([.O$24]+[.$BB69])+[.P$31]*[.$Z$5]*MAGNET([.P$24]+[.$BB69])+[.Q$31]*[.$Z$5]*MAGNET([.Q$24]+[.$BB69])+[.R$31]*[.$Z$5]*MAGNET([.R$24]+[.$BB69])+[.S$31]*[.$Z$5]*MAGNET([.S$24]+[.$BB69])+[.T$31]*[.$Z$5]*MAGNET([.T$24]+[.$BB69])+[.U$31]*[.$Z$5]*MAGNET([.U$24]+[.$BB69])+[.V$31]*[.$Z$5]*MAGNET([.V$24]+[.$BB69])+[.W$31]*[.$Z$5]*MAGNET([.W$24]+[.$BB69])+[.X$31]*[.$Z$5]*MAGNET([.X$24]+[.$BB69])+[.Y$31]*[.$Z$5]*MAGNET([.Y$24]+[.$BB69])+[.Z$31]*[.$Z$5]*MAGNET([.Z$24]+[.$BB69])+[.AA$31]*[.$Z$5]*MAGNET([.AA$24]+[.$BB69])+[.AB$31]*[.$Z$5]*MAGNET([.AB$24]+[.$BB69])+[.AC$31]*[.$Z$5]*MAGNET([.AC$24]+[.$BB69])+[.AD$31]*[.$Z$5]*MAGNET([.AD$24]+[.$BB69])+[.AE$31]*[.$Z$5]*MAGNET([.AE$24]+[.$BB69])+[.AF$31]*[.$Z$5]*MAGNET([.AF$24]+[.$BB69])+[.AG$31]*[.$Z$5]*MAGNET([.AG$24]+[.$BB69])+[.D$31]*[.$Z$5]*MAGNET([.D$24]+[.$BB69])+[.AH$31]*[.$Z$5]*MAGNET([.AH$24]+[.BB69]) +[.AI$31]*[.$Z$5]*MAGNET([.AI$24]+[.BB69]) +[.AJ$31]*[.$Z$5]*MAGNET([.AJ$24]+[.BB69]) +[.AK$31]*[.$Z$5]*MAGNET([.AK$24]+[.BB69]) +[.AL$31]*[.$Z$5]*MAGNET([.AL$24]+[.BB69]) +[.AM$31]*[.$Z$5]*MAGNET([.AM$24]+[.BB69]) +[.AN$31]*[.$Z$5]*MAGNET([.AN$24]+[.BB69]) +[.AO$31]*[.$Z$5]*MAGNET([.AO$24]+[.BB69]) +[.AP$31]*[.$Z$5]*MAGNET([.AP$24]+[.$BB69])&#10;+[.AQ$31]*[.$Z$5]*MAGNET([.AQ$24]+[.$BB69])&#10;+[.AR$31]*[.$Z$5]*MAGNET([.AR$24]+[.$BB69])&#10;+[.AS$31]*[.$Z$5]*MAGNET([.AS$24]+[.$BB69])&#10;+[.AT$31]*[.$Z$5]*MAGNET([.AT$24]+[.$BB69])&#10;+[.AU$31]*[.$Z$5]*MAGNET([.AU$24]+[.$BB69])&#10;+[.AV$31]*[.$Z$5]*MAGNET([.AV$24]+[.$BB69])&#10;+[.AW$31]*[.$Z$5]*MAGNET([.AW$24]+[.$BB69])&#10;+[.AX$31]*[.$Z$5]*MAGNET([.AX$24]+[.$BB69])&#10;+[.AY$31]*[.$Z$5]*MAGNET([.AY$24]+[.$BB69]) +RAND()*[.$BI$13]" office:value-type="float" office:value="0" calcext:value-type="float">
            <text:p>0</text:p>
          </table:table-cell>
          <table:table-cell table:style-name="ce71" table:formula="of:=[.E$32]*[.$Z$5]*MAGNET([.E$24]+[.$BB69])+[.F$32]*[.$Z$5]*MAGNET([.F$24]+[.$BB69])+[.G$32]*[.$Z$5]*MAGNET([.G$24]+[.$BB69])+[.H$32]*[.$Z$5]*MAGNET([.H$24]+[.$BB69])+[.I$32]*[.$Z$5]*MAGNET([.I$24]+[.$BB69])+[.J$32]*[.$Z$5]*MAGNET([.J$24]+[.$BB69])+[.K$32]*[.$Z$5]*MAGNET([.K$24]+[.$BB69])+[.L$32]*[.$Z$5]*MAGNET([.L$24]+[.$BB69])+[.M$32]*[.$Z$5]*MAGNET([.M$24]+[.$BB69])+[.N$32]*[.$Z$5]*MAGNET([.N$24]+[.$BB69])+[.O$32]*[.$Z$5]*MAGNET([.O$24]+[.$BB69])+[.P$32]*[.$Z$5]*MAGNET([.P$24]+[.$BB69])+[.Q$32]*[.$Z$5]*MAGNET([.Q$24]+[.$BB69])+[.R$32]*[.$Z$5]*MAGNET([.R$24]+[.$BB69])+[.S$32]*[.$Z$5]*MAGNET([.S$24]+[.$BB69])+[.T$32]*[.$Z$5]*MAGNET([.T$24]+[.$BB69])+[.U$32]*[.$Z$5]*MAGNET([.U$24]+[.$BB69])+[.V$32]*[.$Z$5]*MAGNET([.V$24]+[.$BB69])+[.W$32]*[.$Z$5]*MAGNET([.W$24]+[.$BB69])+[.X$32]*[.$Z$5]*MAGNET([.X$24]+[.$BB69])+[.Y$32]*[.$Z$5]*MAGNET([.Y$24]+[.$BB69])+[.Z$32]*[.$Z$5]*MAGNET([.Z$24]+[.$BB69])+[.AA$32]*[.$Z$5]*MAGNET([.AA$24]+[.$BB69])+[.AB$32]*[.$Z$5]*MAGNET([.AB$24]+[.$BB69])+[.AC$32]*[.$Z$5]*MAGNET([.AC$24]+[.$BB69])+[.AD$32]*[.$Z$5]*MAGNET([.AD$24]+[.$BB69])+[.AE$32]*[.$Z$5]*MAGNET([.AE$24]+[.$BB69])+[.AF$32]*[.$Z$5]*MAGNET([.AF$24]+[.$BB69])+[.AG$32]*[.$Z$5]*MAGNET([.AG$24]+[.$BB69])+[.D$32]*[.$Z$5]*MAGNET([.D$24]+[.$BB69])+[.AH$32]*[.$Z$5]*MAGNET([.AH$24]+[.BB69]) +[.AI$32]*[.$Z$5]*MAGNET([.AI$24]+[.BB69]) +[.AJ$32]*[.$Z$5]*MAGNET([.AJ$24]+[.BB69]) +[.AK$32]*[.$Z$5]*MAGNET([.AK$24]+[.BB69]) +[.AL$32]*[.$Z$5]*MAGNET([.AL$24]+[.BB69]) +[.AM$32]*[.$Z$5]*MAGNET([.AM$24]+[.BB69]) +[.AN$32]*[.$Z$5]*MAGNET([.AN$24]+[.BB69]) +[.AO$32]*[.$Z$5]*MAGNET([.AO$24]+[.BB69]) +[.AP$32]*[.$Z$5]*MAGNET([.AP$24]+[.$BB69])&#10;+[.AQ$32]*[.$Z$5]*MAGNET([.AQ$24]+[.$BB69])&#10;+[.AR$32]*[.$Z$5]*MAGNET([.AR$24]+[.$BB69])&#10;+[.AS$32]*[.$Z$5]*MAGNET([.AS$24]+[.$BB69])&#10;+[.AT$32]*[.$Z$5]*MAGNET([.AT$24]+[.$BB69])&#10;+[.AU$32]*[.$Z$5]*MAGNET([.AU$24]+[.$BB69])&#10;+[.AV$32]*[.$Z$5]*MAGNET([.AV$24]+[.$BB69])&#10;+[.AW$32]*[.$Z$5]*MAGNET([.AW$24]+[.$BB69])&#10;+[.AX$32]*[.$Z$5]*MAGNET([.AX$24]+[.$BB69])&#10;+[.AY$32]*[.$Z$5]*MAGNET([.AY$24]+[.$BB6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69]+0.002" office:value-type="float" office:value="0.11" calcext:value-type="float">
            <text:p>0.11</text:p>
          </table:table-cell>
          <table:table-cell table:formula="of:=[.BA70]*[.$D$6]" office:value-type="float" office:value="5.52920307031804" calcext:value-type="float">
            <text:p>5.529</text:p>
          </table:table-cell>
          <table:table-cell table:formula="of:=[.D$25]*[.$Z$5]*MAGNET([.D$24]+[.BB70])+[.E$25]*[.$Z$5]*MAGNET([.E$24]+[.BB70])+[.F$25]*[.$Z$5]*MAGNET([.F$24]+[.BB70])+[.G$25]*[.$Z$5]*MAGNET([.G$24]+[.BB70])+[.H$25]*[.$Z$5]*MAGNET([.H$24]+[.BB70])+[.I$25]*[.$Z$5]*MAGNET([.I$24]+[.BB70])+[.J$25]*[.$Z$5]*MAGNET([.J$24]+[.BB70])+[.K$25]*[.$Z$5]*MAGNET([.K$24]+[.BB70])+[.L$25]*[.$Z$5]*MAGNET([.L$24]+[.BB70])+[.M$25]*[.$Z$5]*MAGNET([.M$24]+[.BB70])+[.N$25]*[.$Z$5]*MAGNET([.N$24]+[.BB70])+[.O$25]*[.$Z$5]*MAGNET([.O$24]+[.BB70])+[.P$25]*[.$Z$5]*MAGNET([.P$24]+[.BB70])+[.Q$25]*[.$Z$5]*MAGNET([.Q$24]+[.BB70])+[.R$25]*[.$Z$5]*MAGNET([.R$24]+[.BB70])+[.S$25]*[.$Z$5]*MAGNET([.S$24]+[.BB70])+[.T$25]*[.$Z$5]*MAGNET([.T$24]+[.BB70])+[.U$25]*[.$Z$5]*MAGNET([.U$24]+[.BB70])+[.V$25]*[.$Z$5]*MAGNET([.V$24]+[.BB70])+[.W$25]*[.$Z$5]*MAGNET([.W$24]+[.BB70])+[.X$25]*[.$Z$5]*MAGNET([.X$24]+[.BB70])+[.Y$25]*[.$Z$5]*MAGNET([.Y$24]+[.BB70])+[.Z$25]*[.$Z$5]*MAGNET([.Z$24]+[.BB70])+[.AA$25]*[.$Z$5]*MAGNET([.AA$24]+[.BB70])+[.AB$25]*[.$Z$5]*MAGNET([.AB$24]+[.BB70])+[.AC$25]*[.$Z$5]*MAGNET([.AC$24]+[.BB70])+[.AD$25]*[.$Z$5]*MAGNET([.AD$24]+[.BB70])+[.AE$25]*[.$Z$5]*MAGNET([.AE$24]+[.BB70])+[.AF$25]*[.$Z$5]*MAGNET([.AF$24]+[.BB70])+[.AG$25]*[.$Z$5]*MAGNET([.AG$24]+[.BB70])+[.AH$25]*[.$Z$5]*MAGNET([.AH$24]+[.BB70]) +[.AI$25]*[.$Z$5]*MAGNET([.AI$24]+[.BB70]) +[.AJ$25]*[.$Z$5]*MAGNET([.AJ$24]+[.BB70]) +[.AK$25]*[.$Z$5]*MAGNET([.AK$24]+[.BB70]) +[.AL$25]*[.$Z$5]*MAGNET([.AL$24]+[.BB70]) +[.AM$25]*[.$Z$5]*MAGNET([.AM$24]+[.BB70]) +[.AN$25]*[.$Z$5]*MAGNET([.AN$24]+[.BB70]) +[.AO$25]*[.$Z$5]*MAGNET([.AO$24]+[.BB70])+RAND()*[.$BC$13]+[.AP$25]*[.$Z$5]*MAGNET([.AP$24]+[.BB70])&#10;+[.AQ$25]*[.$Z$5]*MAGNET([.AQ$24]+[.BB70])&#10;+[.AR$25]*[.$Z$5]*MAGNET([.AR$24]+[.BB70])&#10;+[.AS$25]*[.$Z$5]*MAGNET([.AS$24]+[.BB70])&#10;+[.AT$25]*[.$Z$5]*MAGNET([.AT$24]+[.BB70])&#10;+[.AU$25]*[.$Z$5]*MAGNET([.AU$24]+[.BB70])&#10;+[.AV$25]*[.$Z$5]*MAGNET([.AV$24]+[.BB70])&#10;+[.AW$25]*[.$Z$5]*MAGNET([.AW$24]+[.BB70])&#10;+[.AX$25]*[.$Z$5]*MAGNET([.AX$24]+[.BB70])&#10;+[.AY$25]*[.$Z$5]*MAGNET([.AY$24]+[.BB70])" office:value-type="float" office:value="-102.785734959324" calcext:value-type="float">
            <text:p>-102.79</text:p>
          </table:table-cell>
          <table:table-cell table:style-name="ce70" table:formula="of:=[.E$26]*[.$Z$5]*MAGNET([.E$24]+[.$BB70])+[.F$26]*[.$Z$5]*MAGNET([.F$24]+[.$BB70])+[.G$26]*[.$Z$5]*MAGNET([.G$24]+[.$BB70])+[.H$26]*[.$Z$5]*MAGNET([.H$24]+[.$BB70])+[.I$26]*[.$Z$5]*MAGNET([.I$24]+[.$BB70])+[.J$26]*[.$Z$5]*MAGNET([.J$24]+[.$BB70])+[.K$26]*[.$Z$5]*MAGNET([.K$24]+[.$BB70])+[.L$26]*[.$Z$5]*MAGNET([.L$24]+[.$BB70])+[.M$26]*[.$Z$5]*MAGNET([.M$24]+[.$BB70])+[.N$26]*[.$Z$5]*MAGNET([.N$24]+[.$BB70])+[.O$26]*[.$Z$5]*MAGNET([.O$24]+[.$BB70])+[.P$26]*[.$Z$5]*MAGNET([.P$24]+[.$BB70])+[.Q$26]*[.$Z$5]*MAGNET([.Q$24]+[.$BB70])+[.R$26]*[.$Z$5]*MAGNET([.R$24]+[.$BB70])+[.S$26]*[.$Z$5]*MAGNET([.S$24]+[.$BB70])+[.T$26]*[.$Z$5]*MAGNET([.T$24]+[.$BB70])+[.U$26]*[.$Z$5]*MAGNET([.U$24]+[.$BB70])+[.V$26]*[.$Z$5]*MAGNET([.V$24]+[.$BB70])+[.W$26]*[.$Z$5]*MAGNET([.W$24]+[.$BB70])+[.X$26]*[.$Z$5]*MAGNET([.X$24]+[.$BB70])+[.Y$26]*[.$Z$5]*MAGNET([.Y$24]+[.$BB70])+[.Z$26]*[.$Z$5]*MAGNET([.Z$24]+[.$BB70])+[.AA$26]*[.$Z$5]*MAGNET([.AA$24]+[.$BB70])+[.AB$26]*[.$Z$5]*MAGNET([.AB$24]+[.$BB70])+[.AC$26]*[.$Z$5]*MAGNET([.AC$24]+[.$BB70])+[.AD$26]*[.$Z$5]*MAGNET([.AD$24]+[.$BB70])+[.AE$26]*[.$Z$5]*MAGNET([.AE$24]+[.$BB70])+[.AF$26]*[.$Z$5]*MAGNET([.AF$24]+[.$BB70])+[.AG$26]*[.$Z$5]*MAGNET([.AG$24]+[.$BB70])+[.D$26]*[.$Z$5]*MAGNET([.D$24]+[.$BB70])+[.AH$26]*[.$Z$5]*MAGNET([.AH$24]+[.BB70]) +[.AI$26]*[.$Z$5]*MAGNET([.AI$24]+[.BB70]) +[.AJ$26]*[.$Z$5]*MAGNET([.AJ$24]+[.BB70]) +[.AK$26]*[.$Z$5]*MAGNET([.AK$24]+[.BB70]) +[.AL$26]*[.$Z$5]*MAGNET([.AL$24]+[.BB70]) +[.AM$26]*[.$Z$5]*MAGNET([.AM$24]+[.BB70]) +[.AN$26]*[.$Z$5]*MAGNET([.AN$24]+[.BB70]) +[.AO$26]*[.$Z$5]*MAGNET([.AO$24]+[.BB70]) +[.AP$26]*[.$Z$5]*MAGNET([.AP$24]+[.$BB70])&#10;+[.AQ$26]*[.$Z$5]*MAGNET([.AQ$24]+[.$BB70])&#10;+[.AR$26]*[.$Z$5]*MAGNET([.AR$24]+[.$BB70])&#10;+[.AS$26]*[.$Z$5]*MAGNET([.AS$24]+[.$BB70])&#10;+[.AT$26]*[.$Z$5]*MAGNET([.AT$24]+[.$BB70])&#10;+[.AU$26]*[.$Z$5]*MAGNET([.AU$24]+[.$BB70])&#10;+[.AV$26]*[.$Z$5]*MAGNET([.AV$24]+[.$BB70])&#10;+[.AW$26]*[.$Z$5]*MAGNET([.AW$24]+[.$BB70])&#10;+[.AX$26]*[.$Z$5]*MAGNET([.AX$24]+[.$BB70])&#10;+[.AY$26]*[.$Z$5]*MAGNET([.AY$24]+[.$BB70]) +RAND()*[.$BD$13]" office:value-type="float" office:value="83.268944576177" calcext:value-type="float">
            <text:p>83.27</text:p>
          </table:table-cell>
          <table:table-cell table:style-name="ce71" table:formula="of:=[.E$27]*[.$Z$5]*MAGNET([.E$24]+[.$BB70])+[.F$27]*[.$Z$5]*MAGNET([.F$24]+[.$BB70])+[.G$27]*[.$Z$5]*MAGNET([.G$24]+[.$BB70])+[.H$27]*[.$Z$5]*MAGNET([.H$24]+[.$BB70])+[.I$27]*[.$Z$5]*MAGNET([.I$24]+[.$BB70])+[.J$27]*[.$Z$5]*MAGNET([.J$24]+[.$BB70])+[.K$27]*[.$Z$5]*MAGNET([.K$24]+[.$BB70])+[.L$27]*[.$Z$5]*MAGNET([.L$24]+[.$BB70])+[.M$27]*[.$Z$5]*MAGNET([.M$24]+[.$BB70])+[.N$27]*[.$Z$5]*MAGNET([.N$24]+[.$BB70])+[.O$27]*[.$Z$5]*MAGNET([.O$24]+[.$BB70])+[.P$27]*[.$Z$5]*MAGNET([.P$24]+[.$BB70])+[.Q$27]*[.$Z$5]*MAGNET([.Q$24]+[.$BB70])+[.R$27]*[.$Z$5]*MAGNET([.R$24]+[.$BB70])+[.S$27]*[.$Z$5]*MAGNET([.S$24]+[.$BB70])+[.T$27]*[.$Z$5]*MAGNET([.T$24]+[.$BB70])+[.U$27]*[.$Z$5]*MAGNET([.U$24]+[.$BB70])+[.V$27]*[.$Z$5]*MAGNET([.V$24]+[.$BB70])+[.W$27]*[.$Z$5]*MAGNET([.W$24]+[.$BB70])+[.X$27]*[.$Z$5]*MAGNET([.X$24]+[.$BB70])+[.Y$27]*[.$Z$5]*MAGNET([.Y$24]+[.$BB70])+[.Z$27]*[.$Z$5]*MAGNET([.Z$24]+[.$BB70])+[.AA$27]*[.$Z$5]*MAGNET([.AA$24]+[.$BB70])+[.AB$27]*[.$Z$5]*MAGNET([.AB$24]+[.$BB70])+[.AC$27]*[.$Z$5]*MAGNET([.AC$24]+[.$BB70])+[.AD$27]*[.$Z$5]*MAGNET([.AD$24]+[.$BB70])+[.AE$27]*[.$Z$5]*MAGNET([.AE$24]+[.$BB70])+[.AF$27]*[.$Z$5]*MAGNET([.AF$24]+[.$BB70])+[.AG$27]*[.$Z$5]*MAGNET([.AG$24]+[.$BB70])+[.D$27]*[.$Z$5]*MAGNET([.D$24]+[.$BB70])+[.AH$27]*[.$Z$5]*MAGNET([.AH$24]+[.BB70]) +[.AI$27]*[.$Z$5]*MAGNET([.AI$24]+[.BB70]) +[.AJ$27]*[.$Z$5]*MAGNET([.AJ$24]+[.BB70]) +[.AK$27]*[.$Z$5]*MAGNET([.AK$24]+[.BB70]) +[.AL$27]*[.$Z$5]*MAGNET([.AL$24]+[.BB70]) +[.AM$27]*[.$Z$5]*MAGNET([.AM$24]+[.BB70]) +[.AN$27]*[.$Z$5]*MAGNET([.AN$24]+[.BB70]) +[.AO$27]*[.$Z$5]*MAGNET([.AO$24]+[.BB70]) +[.AP$27]*[.$Z$5]*MAGNET([.AP$24]+[.$BB70])&#10;+[.AQ$27]*[.$Z$5]*MAGNET([.AQ$24]+[.$BB70])&#10;+[.AR$27]*[.$Z$5]*MAGNET([.AR$24]+[.$BB70])&#10;+[.AS$27]*[.$Z$5]*MAGNET([.AS$24]+[.$BB70])&#10;+[.AT$27]*[.$Z$5]*MAGNET([.AT$24]+[.$BB70])&#10;+[.AU$27]*[.$Z$5]*MAGNET([.AU$24]+[.$BB70])&#10;+[.AV$27]*[.$Z$5]*MAGNET([.AV$24]+[.$BB70])&#10;+[.AW$27]*[.$Z$5]*MAGNET([.AW$24]+[.$BB70])&#10;+[.AX$27]*[.$Z$5]*MAGNET([.AX$24]+[.$BB70])&#10;+[.AY$27]*[.$Z$5]*MAGNET([.AY$24]+[.$BB70]) +RAND()*[.$BE$13]" office:value-type="float" office:value="34.0486501354722" calcext:value-type="float">
            <text:p>34.0486501354722</text:p>
          </table:table-cell>
          <table:table-cell table:style-name="ce71" table:formula="of:=[.E$28]*[.$Z$5]*MAGNET([.E$24]+[.$BB70])+[.F$28]*[.$Z$5]*MAGNET([.F$24]+[.$BB70])+[.G$28]*[.$Z$5]*MAGNET([.G$24]+[.$BB70])+[.H$28]*[.$Z$5]*MAGNET([.H$24]+[.$BB70])+[.I$28]*[.$Z$5]*MAGNET([.I$24]+[.$BB70])+[.J$28]*[.$Z$5]*MAGNET([.J$24]+[.$BB70])+[.K$28]*[.$Z$5]*MAGNET([.K$24]+[.$BB70])+[.L$28]*[.$Z$5]*MAGNET([.L$24]+[.$BB70])+[.M$28]*[.$Z$5]*MAGNET([.M$24]+[.$BB70])+[.N$28]*[.$Z$5]*MAGNET([.N$24]+[.$BB70])+[.O$28]*[.$Z$5]*MAGNET([.O$24]+[.$BB70])+[.P$28]*[.$Z$5]*MAGNET([.P$24]+[.$BB70])+[.Q$28]*[.$Z$5]*MAGNET([.Q$24]+[.$BB70])+[.R$28]*[.$Z$5]*MAGNET([.R$24]+[.$BB70])+[.S$28]*[.$Z$5]*MAGNET([.S$24]+[.$BB70])+[.T$28]*[.$Z$5]*MAGNET([.T$24]+[.$BB70])+[.U$28]*[.$Z$5]*MAGNET([.U$24]+[.$BB70])+[.V$28]*[.$Z$5]*MAGNET([.V$24]+[.$BB70])+[.W$28]*[.$Z$5]*MAGNET([.W$24]+[.$BB70])+[.X$28]*[.$Z$5]*MAGNET([.X$24]+[.$BB70])+[.Y$28]*[.$Z$5]*MAGNET([.Y$24]+[.$BB70])+[.Z$28]*[.$Z$5]*MAGNET([.Z$24]+[.$BB70])+[.AA$28]*[.$Z$5]*MAGNET([.AA$24]+[.$BB70])+[.AB$28]*[.$Z$5]*MAGNET([.AB$24]+[.$BB70])+[.AC$28]*[.$Z$5]*MAGNET([.AC$24]+[.$BB70])+[.AD$28]*[.$Z$5]*MAGNET([.AD$24]+[.$BB70])+[.AE$28]*[.$Z$5]*MAGNET([.AE$24]+[.$BB70])+[.AF$28]*[.$Z$5]*MAGNET([.AF$24]+[.$BB70])+[.AG$28]*[.$Z$5]*MAGNET([.AG$24]+[.$BB70])+[.D$28]*[.$Z$5]*MAGNET([.D$24]+[.$BB70])+[.AH$28]*[.$Z$5]*MAGNET([.AH$24]+[.BB70]) +[.AI$28]*[.$Z$5]*MAGNET([.AI$24]+[.BB70]) +[.AJ$28]*[.$Z$5]*MAGNET([.AJ$24]+[.BB70]) +[.AK$28]*[.$Z$5]*MAGNET([.AK$24]+[.BB70]) +[.AL$28]*[.$Z$5]*MAGNET([.AL$24]+[.BB70]) +[.AM$28]*[.$Z$5]*MAGNET([.AM$24]+[.BB70]) +[.AN$28]*[.$Z$5]*MAGNET([.AN$24]+[.BB70]) +[.AO$28]*[.$Z$5]*MAGNET([.AO$24]+[.BB70]) +[.AP$28]*[.$Z$5]*MAGNET([.AP$24]+[.$BB70])&#10;+[.AQ$28]*[.$Z$5]*MAGNET([.AQ$24]+[.$BB70])&#10;+[.AR$28]*[.$Z$5]*MAGNET([.AR$24]+[.$BB70])&#10;+[.AS$28]*[.$Z$5]*MAGNET([.AS$24]+[.$BB70])&#10;+[.AT$28]*[.$Z$5]*MAGNET([.AT$24]+[.$BB70])&#10;+[.AU$28]*[.$Z$5]*MAGNET([.AU$24]+[.$BB70])&#10;+[.AV$28]*[.$Z$5]*MAGNET([.AV$24]+[.$BB70])&#10;+[.AW$28]*[.$Z$5]*MAGNET([.AW$24]+[.$BB70])&#10;+[.AX$28]*[.$Z$5]*MAGNET([.AX$24]+[.$BB70])&#10;+[.AY$28]*[.$Z$5]*MAGNET([.AY$24]+[.$BB70]) +RAND()*[.$BF$13]" office:value-type="float" office:value="2.51843715207375" calcext:value-type="float">
            <text:p>2.51843715207375</text:p>
          </table:table-cell>
          <table:table-cell table:style-name="ce71" table:formula="of:=[.E$29]*[.$Z$5]*MAGNET([.E$24]+[.$BB70])+[.F$29]*[.$Z$5]*MAGNET([.F$24]+[.$BB70])+[.G$29]*[.$Z$5]*MAGNET([.G$24]+[.$BB70])+[.H$29]*[.$Z$5]*MAGNET([.H$24]+[.$BB70])+[.I$29]*[.$Z$5]*MAGNET([.I$24]+[.$BB70])+[.J$29]*[.$Z$5]*MAGNET([.J$24]+[.$BB70])+[.K$29]*[.$Z$5]*MAGNET([.K$24]+[.$BB70])+[.L$29]*[.$Z$5]*MAGNET([.L$24]+[.$BB70])+[.M$29]*[.$Z$5]*MAGNET([.M$24]+[.$BB70])+[.N$29]*[.$Z$5]*MAGNET([.N$24]+[.$BB70])+[.O$29]*[.$Z$5]*MAGNET([.O$24]+[.$BB70])+[.P$29]*[.$Z$5]*MAGNET([.P$24]+[.$BB70])+[.Q$29]*[.$Z$5]*MAGNET([.Q$24]+[.$BB70])+[.R$29]*[.$Z$5]*MAGNET([.R$24]+[.$BB70])+[.S$29]*[.$Z$5]*MAGNET([.S$24]+[.$BB70])+[.T$29]*[.$Z$5]*MAGNET([.T$24]+[.$BB70])+[.U$29]*[.$Z$5]*MAGNET([.U$24]+[.$BB70])+[.V$29]*[.$Z$5]*MAGNET([.V$24]+[.$BB70])+[.W$29]*[.$Z$5]*MAGNET([.W$24]+[.$BB70])+[.X$29]*[.$Z$5]*MAGNET([.X$24]+[.$BB70])+[.Y$29]*[.$Z$5]*MAGNET([.Y$24]+[.$BB70])+[.Z$29]*[.$Z$5]*MAGNET([.Z$24]+[.$BB70])+[.AA$29]*[.$Z$5]*MAGNET([.AA$24]+[.$BB70])+[.AB$29]*[.$Z$5]*MAGNET([.AB$24]+[.$BB70])+[.AC$29]*[.$Z$5]*MAGNET([.AC$24]+[.$BB70])+[.AD$29]*[.$Z$5]*MAGNET([.AD$24]+[.$BB70])+[.AE$29]*[.$Z$5]*MAGNET([.AE$24]+[.$BB70])+[.AF$29]*[.$Z$5]*MAGNET([.AF$24]+[.$BB70])+[.AG$29]*[.$Z$5]*MAGNET([.AG$24]+[.$BB70])+[.D$29]*[.$Z$5]*MAGNET([.D$24]+[.$BB70])+[.AH$29]*[.$Z$5]*MAGNET([.AH$24]+[.BB70]) +[.AI$29]*[.$Z$5]*MAGNET([.AI$24]+[.BB70]) +[.AJ$29]*[.$Z$5]*MAGNET([.AJ$24]+[.BB70]) +[.AK$29]*[.$Z$5]*MAGNET([.AK$24]+[.BB70]) +[.AL$29]*[.$Z$5]*MAGNET([.AL$24]+[.BB70]) +[.AM$29]*[.$Z$5]*MAGNET([.AM$24]+[.BB70]) +[.AN$29]*[.$Z$5]*MAGNET([.AN$24]+[.BB70]) +[.AO$29]*[.$Z$5]*MAGNET([.AO$24]+[.BB70]) +[.AP$29]*[.$Z$5]*MAGNET([.AP$24]+[.$BB70])&#10;+[.AQ$29]*[.$Z$5]*MAGNET([.AQ$24]+[.$BB70])&#10;+[.AR$29]*[.$Z$5]*MAGNET([.AR$24]+[.$BB70])&#10;+[.AS$29]*[.$Z$5]*MAGNET([.AS$24]+[.$BB70])&#10;+[.AT$29]*[.$Z$5]*MAGNET([.AT$24]+[.$BB70])&#10;+[.AU$29]*[.$Z$5]*MAGNET([.AU$24]+[.$BB70])&#10;+[.AV$29]*[.$Z$5]*MAGNET([.AV$24]+[.$BB70])&#10;+[.AW$29]*[.$Z$5]*MAGNET([.AW$24]+[.$BB70])&#10;+[.AX$29]*[.$Z$5]*MAGNET([.AX$24]+[.$BB70])&#10;+[.AY$29]*[.$Z$5]*MAGNET([.AY$24]+[.$BB70]) +RAND()*[.$BG$13]" office:value-type="float" office:value="-8.87269185466925" calcext:value-type="float">
            <text:p>-8.87269185466925</text:p>
          </table:table-cell>
          <table:table-cell table:style-name="ce71" table:formula="of:=[.E$30]*[.$Z$5]*MAGNET([.E$24]+[.$BB70])+[.F$30]*[.$Z$5]*MAGNET([.F$24]+[.$BB70])+[.G$30]*[.$Z$5]*MAGNET([.G$24]+[.$BB70])+[.H$30]*[.$Z$5]*MAGNET([.H$24]+[.$BB70])+[.I$30]*[.$Z$5]*MAGNET([.I$24]+[.$BB70])+[.J$30]*[.$Z$5]*MAGNET([.J$24]+[.$BB70])+[.K$30]*[.$Z$5]*MAGNET([.K$24]+[.$BB70])+[.L$30]*[.$Z$5]*MAGNET([.L$24]+[.$BB70])+[.M$30]*[.$Z$5]*MAGNET([.M$24]+[.$BB70])+[.N$30]*[.$Z$5]*MAGNET([.N$24]+[.$BB70])+[.O$30]*[.$Z$5]*MAGNET([.O$24]+[.$BB70])+[.P$30]*[.$Z$5]*MAGNET([.P$24]+[.$BB70])+[.Q$30]*[.$Z$5]*MAGNET([.Q$24]+[.$BB70])+[.R$30]*[.$Z$5]*MAGNET([.R$24]+[.$BB70])+[.S$30]*[.$Z$5]*MAGNET([.S$24]+[.$BB70])+[.T$30]*[.$Z$5]*MAGNET([.T$24]+[.$BB70])+[.U$30]*[.$Z$5]*MAGNET([.U$24]+[.$BB70])+[.V$30]*[.$Z$5]*MAGNET([.V$24]+[.$BB70])+[.W$30]*[.$Z$5]*MAGNET([.W$24]+[.$BB70])+[.X$30]*[.$Z$5]*MAGNET([.X$24]+[.$BB70])+[.Y$30]*[.$Z$5]*MAGNET([.Y$24]+[.$BB70])+[.Z$30]*[.$Z$5]*MAGNET([.Z$24]+[.$BB70])+[.AA$30]*[.$Z$5]*MAGNET([.AA$24]+[.$BB70])+[.AB$30]*[.$Z$5]*MAGNET([.AB$24]+[.$BB70])+[.AC$30]*[.$Z$5]*MAGNET([.AC$24]+[.$BB70])+[.AD$30]*[.$Z$5]*MAGNET([.AD$24]+[.$BB70])+[.AE$30]*[.$Z$5]*MAGNET([.AE$24]+[.$BB70])+[.AF$30]*[.$Z$5]*MAGNET([.AF$24]+[.$BB70])+[.AG$30]*[.$Z$5]*MAGNET([.AG$24]+[.$BB70])+[.D$30]*[.$Z$5]*MAGNET([.D$24]+[.$BB70])+[.AH$30]*[.$Z$5]*MAGNET([.AH$24]+[.BB70]) +[.AI$30]*[.$Z$5]*MAGNET([.AI$24]+[.BB70]) +[.AJ$30]*[.$Z$5]*MAGNET([.AJ$24]+[.BB70]) +[.AK$30]*[.$Z$5]*MAGNET([.AK$24]+[.BB70]) +[.AL$30]*[.$Z$5]*MAGNET([.AL$24]+[.BB70]) +[.AM$30]*[.$Z$5]*MAGNET([.AM$24]+[.BB70]) +[.AN$30]*[.$Z$5]*MAGNET([.AN$24]+[.BB70]) +[.AO$30]*[.$Z$5]*MAGNET([.AO$24]+[.BB70]) +[.AP$30]*[.$Z$5]*MAGNET([.AP$24]+[.$BB70])&#10;+[.AQ$30]*[.$Z$5]*MAGNET([.AQ$24]+[.$BB70])&#10;+[.AR$30]*[.$Z$5]*MAGNET([.AR$24]+[.$BB70])&#10;+[.AS$30]*[.$Z$5]*MAGNET([.AS$24]+[.$BB70])&#10;+[.AT$30]*[.$Z$5]*MAGNET([.AT$24]+[.$BB70])&#10;+[.AU$30]*[.$Z$5]*MAGNET([.AU$24]+[.$BB70])&#10;+[.AV$30]*[.$Z$5]*MAGNET([.AV$24]+[.$BB70])&#10;+[.AW$30]*[.$Z$5]*MAGNET([.AW$24]+[.$BB70])&#10;+[.AX$30]*[.$Z$5]*MAGNET([.AX$24]+[.$BB70])&#10;+[.AY$30]*[.$Z$5]*MAGNET([.AY$24]+[.$BB70]) +RAND()*[.$BH$13]" office:value-type="float" office:value="0" calcext:value-type="float">
            <text:p>0</text:p>
          </table:table-cell>
          <table:table-cell table:style-name="ce71" table:formula="of:=[.E$31]*[.$Z$5]*MAGNET([.E$24]+[.$BB70])+[.F$31]*[.$Z$5]*MAGNET([.F$24]+[.$BB70])+[.G$31]*[.$Z$5]*MAGNET([.G$24]+[.$BB70])+[.H$31]*[.$Z$5]*MAGNET([.H$24]+[.$BB70])+[.I$31]*[.$Z$5]*MAGNET([.I$24]+[.$BB70])+[.J$31]*[.$Z$5]*MAGNET([.J$24]+[.$BB70])+[.K$31]*[.$Z$5]*MAGNET([.K$24]+[.$BB70])+[.L$31]*[.$Z$5]*MAGNET([.L$24]+[.$BB70])+[.M$31]*[.$Z$5]*MAGNET([.M$24]+[.$BB70])+[.N$31]*[.$Z$5]*MAGNET([.N$24]+[.$BB70])+[.O$31]*[.$Z$5]*MAGNET([.O$24]+[.$BB70])+[.P$31]*[.$Z$5]*MAGNET([.P$24]+[.$BB70])+[.Q$31]*[.$Z$5]*MAGNET([.Q$24]+[.$BB70])+[.R$31]*[.$Z$5]*MAGNET([.R$24]+[.$BB70])+[.S$31]*[.$Z$5]*MAGNET([.S$24]+[.$BB70])+[.T$31]*[.$Z$5]*MAGNET([.T$24]+[.$BB70])+[.U$31]*[.$Z$5]*MAGNET([.U$24]+[.$BB70])+[.V$31]*[.$Z$5]*MAGNET([.V$24]+[.$BB70])+[.W$31]*[.$Z$5]*MAGNET([.W$24]+[.$BB70])+[.X$31]*[.$Z$5]*MAGNET([.X$24]+[.$BB70])+[.Y$31]*[.$Z$5]*MAGNET([.Y$24]+[.$BB70])+[.Z$31]*[.$Z$5]*MAGNET([.Z$24]+[.$BB70])+[.AA$31]*[.$Z$5]*MAGNET([.AA$24]+[.$BB70])+[.AB$31]*[.$Z$5]*MAGNET([.AB$24]+[.$BB70])+[.AC$31]*[.$Z$5]*MAGNET([.AC$24]+[.$BB70])+[.AD$31]*[.$Z$5]*MAGNET([.AD$24]+[.$BB70])+[.AE$31]*[.$Z$5]*MAGNET([.AE$24]+[.$BB70])+[.AF$31]*[.$Z$5]*MAGNET([.AF$24]+[.$BB70])+[.AG$31]*[.$Z$5]*MAGNET([.AG$24]+[.$BB70])+[.D$31]*[.$Z$5]*MAGNET([.D$24]+[.$BB70])+[.AH$31]*[.$Z$5]*MAGNET([.AH$24]+[.BB70]) +[.AI$31]*[.$Z$5]*MAGNET([.AI$24]+[.BB70]) +[.AJ$31]*[.$Z$5]*MAGNET([.AJ$24]+[.BB70]) +[.AK$31]*[.$Z$5]*MAGNET([.AK$24]+[.BB70]) +[.AL$31]*[.$Z$5]*MAGNET([.AL$24]+[.BB70]) +[.AM$31]*[.$Z$5]*MAGNET([.AM$24]+[.BB70]) +[.AN$31]*[.$Z$5]*MAGNET([.AN$24]+[.BB70]) +[.AO$31]*[.$Z$5]*MAGNET([.AO$24]+[.BB70]) +[.AP$31]*[.$Z$5]*MAGNET([.AP$24]+[.$BB70])&#10;+[.AQ$31]*[.$Z$5]*MAGNET([.AQ$24]+[.$BB70])&#10;+[.AR$31]*[.$Z$5]*MAGNET([.AR$24]+[.$BB70])&#10;+[.AS$31]*[.$Z$5]*MAGNET([.AS$24]+[.$BB70])&#10;+[.AT$31]*[.$Z$5]*MAGNET([.AT$24]+[.$BB70])&#10;+[.AU$31]*[.$Z$5]*MAGNET([.AU$24]+[.$BB70])&#10;+[.AV$31]*[.$Z$5]*MAGNET([.AV$24]+[.$BB70])&#10;+[.AW$31]*[.$Z$5]*MAGNET([.AW$24]+[.$BB70])&#10;+[.AX$31]*[.$Z$5]*MAGNET([.AX$24]+[.$BB70])&#10;+[.AY$31]*[.$Z$5]*MAGNET([.AY$24]+[.$BB70]) +RAND()*[.$BI$13]" office:value-type="float" office:value="0" calcext:value-type="float">
            <text:p>0</text:p>
          </table:table-cell>
          <table:table-cell table:style-name="ce71" table:formula="of:=[.E$32]*[.$Z$5]*MAGNET([.E$24]+[.$BB70])+[.F$32]*[.$Z$5]*MAGNET([.F$24]+[.$BB70])+[.G$32]*[.$Z$5]*MAGNET([.G$24]+[.$BB70])+[.H$32]*[.$Z$5]*MAGNET([.H$24]+[.$BB70])+[.I$32]*[.$Z$5]*MAGNET([.I$24]+[.$BB70])+[.J$32]*[.$Z$5]*MAGNET([.J$24]+[.$BB70])+[.K$32]*[.$Z$5]*MAGNET([.K$24]+[.$BB70])+[.L$32]*[.$Z$5]*MAGNET([.L$24]+[.$BB70])+[.M$32]*[.$Z$5]*MAGNET([.M$24]+[.$BB70])+[.N$32]*[.$Z$5]*MAGNET([.N$24]+[.$BB70])+[.O$32]*[.$Z$5]*MAGNET([.O$24]+[.$BB70])+[.P$32]*[.$Z$5]*MAGNET([.P$24]+[.$BB70])+[.Q$32]*[.$Z$5]*MAGNET([.Q$24]+[.$BB70])+[.R$32]*[.$Z$5]*MAGNET([.R$24]+[.$BB70])+[.S$32]*[.$Z$5]*MAGNET([.S$24]+[.$BB70])+[.T$32]*[.$Z$5]*MAGNET([.T$24]+[.$BB70])+[.U$32]*[.$Z$5]*MAGNET([.U$24]+[.$BB70])+[.V$32]*[.$Z$5]*MAGNET([.V$24]+[.$BB70])+[.W$32]*[.$Z$5]*MAGNET([.W$24]+[.$BB70])+[.X$32]*[.$Z$5]*MAGNET([.X$24]+[.$BB70])+[.Y$32]*[.$Z$5]*MAGNET([.Y$24]+[.$BB70])+[.Z$32]*[.$Z$5]*MAGNET([.Z$24]+[.$BB70])+[.AA$32]*[.$Z$5]*MAGNET([.AA$24]+[.$BB70])+[.AB$32]*[.$Z$5]*MAGNET([.AB$24]+[.$BB70])+[.AC$32]*[.$Z$5]*MAGNET([.AC$24]+[.$BB70])+[.AD$32]*[.$Z$5]*MAGNET([.AD$24]+[.$BB70])+[.AE$32]*[.$Z$5]*MAGNET([.AE$24]+[.$BB70])+[.AF$32]*[.$Z$5]*MAGNET([.AF$24]+[.$BB70])+[.AG$32]*[.$Z$5]*MAGNET([.AG$24]+[.$BB70])+[.D$32]*[.$Z$5]*MAGNET([.D$24]+[.$BB70])+[.AH$32]*[.$Z$5]*MAGNET([.AH$24]+[.BB70]) +[.AI$32]*[.$Z$5]*MAGNET([.AI$24]+[.BB70]) +[.AJ$32]*[.$Z$5]*MAGNET([.AJ$24]+[.BB70]) +[.AK$32]*[.$Z$5]*MAGNET([.AK$24]+[.BB70]) +[.AL$32]*[.$Z$5]*MAGNET([.AL$24]+[.BB70]) +[.AM$32]*[.$Z$5]*MAGNET([.AM$24]+[.BB70]) +[.AN$32]*[.$Z$5]*MAGNET([.AN$24]+[.BB70]) +[.AO$32]*[.$Z$5]*MAGNET([.AO$24]+[.BB70]) +[.AP$32]*[.$Z$5]*MAGNET([.AP$24]+[.$BB70])&#10;+[.AQ$32]*[.$Z$5]*MAGNET([.AQ$24]+[.$BB70])&#10;+[.AR$32]*[.$Z$5]*MAGNET([.AR$24]+[.$BB70])&#10;+[.AS$32]*[.$Z$5]*MAGNET([.AS$24]+[.$BB70])&#10;+[.AT$32]*[.$Z$5]*MAGNET([.AT$24]+[.$BB70])&#10;+[.AU$32]*[.$Z$5]*MAGNET([.AU$24]+[.$BB70])&#10;+[.AV$32]*[.$Z$5]*MAGNET([.AV$24]+[.$BB70])&#10;+[.AW$32]*[.$Z$5]*MAGNET([.AW$24]+[.$BB70])&#10;+[.AX$32]*[.$Z$5]*MAGNET([.AX$24]+[.$BB70])&#10;+[.AY$32]*[.$Z$5]*MAGNET([.AY$24]+[.$BB7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0]+0.002" office:value-type="float" office:value="0.112" calcext:value-type="float">
            <text:p>0.112</text:p>
          </table:table-cell>
          <table:table-cell table:formula="of:=[.BA71]*[.$D$6]" office:value-type="float" office:value="5.62973403523291" calcext:value-type="float">
            <text:p>5.630</text:p>
          </table:table-cell>
          <table:table-cell table:formula="of:=[.D$25]*[.$Z$5]*MAGNET([.D$24]+[.BB71])+[.E$25]*[.$Z$5]*MAGNET([.E$24]+[.BB71])+[.F$25]*[.$Z$5]*MAGNET([.F$24]+[.BB71])+[.G$25]*[.$Z$5]*MAGNET([.G$24]+[.BB71])+[.H$25]*[.$Z$5]*MAGNET([.H$24]+[.BB71])+[.I$25]*[.$Z$5]*MAGNET([.I$24]+[.BB71])+[.J$25]*[.$Z$5]*MAGNET([.J$24]+[.BB71])+[.K$25]*[.$Z$5]*MAGNET([.K$24]+[.BB71])+[.L$25]*[.$Z$5]*MAGNET([.L$24]+[.BB71])+[.M$25]*[.$Z$5]*MAGNET([.M$24]+[.BB71])+[.N$25]*[.$Z$5]*MAGNET([.N$24]+[.BB71])+[.O$25]*[.$Z$5]*MAGNET([.O$24]+[.BB71])+[.P$25]*[.$Z$5]*MAGNET([.P$24]+[.BB71])+[.Q$25]*[.$Z$5]*MAGNET([.Q$24]+[.BB71])+[.R$25]*[.$Z$5]*MAGNET([.R$24]+[.BB71])+[.S$25]*[.$Z$5]*MAGNET([.S$24]+[.BB71])+[.T$25]*[.$Z$5]*MAGNET([.T$24]+[.BB71])+[.U$25]*[.$Z$5]*MAGNET([.U$24]+[.BB71])+[.V$25]*[.$Z$5]*MAGNET([.V$24]+[.BB71])+[.W$25]*[.$Z$5]*MAGNET([.W$24]+[.BB71])+[.X$25]*[.$Z$5]*MAGNET([.X$24]+[.BB71])+[.Y$25]*[.$Z$5]*MAGNET([.Y$24]+[.BB71])+[.Z$25]*[.$Z$5]*MAGNET([.Z$24]+[.BB71])+[.AA$25]*[.$Z$5]*MAGNET([.AA$24]+[.BB71])+[.AB$25]*[.$Z$5]*MAGNET([.AB$24]+[.BB71])+[.AC$25]*[.$Z$5]*MAGNET([.AC$24]+[.BB71])+[.AD$25]*[.$Z$5]*MAGNET([.AD$24]+[.BB71])+[.AE$25]*[.$Z$5]*MAGNET([.AE$24]+[.BB71])+[.AF$25]*[.$Z$5]*MAGNET([.AF$24]+[.BB71])+[.AG$25]*[.$Z$5]*MAGNET([.AG$24]+[.BB71])+[.AH$25]*[.$Z$5]*MAGNET([.AH$24]+[.BB71]) +[.AI$25]*[.$Z$5]*MAGNET([.AI$24]+[.BB71]) +[.AJ$25]*[.$Z$5]*MAGNET([.AJ$24]+[.BB71]) +[.AK$25]*[.$Z$5]*MAGNET([.AK$24]+[.BB71]) +[.AL$25]*[.$Z$5]*MAGNET([.AL$24]+[.BB71]) +[.AM$25]*[.$Z$5]*MAGNET([.AM$24]+[.BB71]) +[.AN$25]*[.$Z$5]*MAGNET([.AN$24]+[.BB71]) +[.AO$25]*[.$Z$5]*MAGNET([.AO$24]+[.BB71])+RAND()*[.$BC$13]+[.AP$25]*[.$Z$5]*MAGNET([.AP$24]+[.BB71])&#10;+[.AQ$25]*[.$Z$5]*MAGNET([.AQ$24]+[.BB71])&#10;+[.AR$25]*[.$Z$5]*MAGNET([.AR$24]+[.BB71])&#10;+[.AS$25]*[.$Z$5]*MAGNET([.AS$24]+[.BB71])&#10;+[.AT$25]*[.$Z$5]*MAGNET([.AT$24]+[.BB71])&#10;+[.AU$25]*[.$Z$5]*MAGNET([.AU$24]+[.BB71])&#10;+[.AV$25]*[.$Z$5]*MAGNET([.AV$24]+[.BB71])&#10;+[.AW$25]*[.$Z$5]*MAGNET([.AW$24]+[.BB71])&#10;+[.AX$25]*[.$Z$5]*MAGNET([.AX$24]+[.BB71])&#10;+[.AY$25]*[.$Z$5]*MAGNET([.AY$24]+[.BB71])" office:value-type="float" office:value="-102.079792395497" calcext:value-type="float">
            <text:p>-102.08</text:p>
          </table:table-cell>
          <table:table-cell table:style-name="ce70" table:formula="of:=[.E$26]*[.$Z$5]*MAGNET([.E$24]+[.$BB71])+[.F$26]*[.$Z$5]*MAGNET([.F$24]+[.$BB71])+[.G$26]*[.$Z$5]*MAGNET([.G$24]+[.$BB71])+[.H$26]*[.$Z$5]*MAGNET([.H$24]+[.$BB71])+[.I$26]*[.$Z$5]*MAGNET([.I$24]+[.$BB71])+[.J$26]*[.$Z$5]*MAGNET([.J$24]+[.$BB71])+[.K$26]*[.$Z$5]*MAGNET([.K$24]+[.$BB71])+[.L$26]*[.$Z$5]*MAGNET([.L$24]+[.$BB71])+[.M$26]*[.$Z$5]*MAGNET([.M$24]+[.$BB71])+[.N$26]*[.$Z$5]*MAGNET([.N$24]+[.$BB71])+[.O$26]*[.$Z$5]*MAGNET([.O$24]+[.$BB71])+[.P$26]*[.$Z$5]*MAGNET([.P$24]+[.$BB71])+[.Q$26]*[.$Z$5]*MAGNET([.Q$24]+[.$BB71])+[.R$26]*[.$Z$5]*MAGNET([.R$24]+[.$BB71])+[.S$26]*[.$Z$5]*MAGNET([.S$24]+[.$BB71])+[.T$26]*[.$Z$5]*MAGNET([.T$24]+[.$BB71])+[.U$26]*[.$Z$5]*MAGNET([.U$24]+[.$BB71])+[.V$26]*[.$Z$5]*MAGNET([.V$24]+[.$BB71])+[.W$26]*[.$Z$5]*MAGNET([.W$24]+[.$BB71])+[.X$26]*[.$Z$5]*MAGNET([.X$24]+[.$BB71])+[.Y$26]*[.$Z$5]*MAGNET([.Y$24]+[.$BB71])+[.Z$26]*[.$Z$5]*MAGNET([.Z$24]+[.$BB71])+[.AA$26]*[.$Z$5]*MAGNET([.AA$24]+[.$BB71])+[.AB$26]*[.$Z$5]*MAGNET([.AB$24]+[.$BB71])+[.AC$26]*[.$Z$5]*MAGNET([.AC$24]+[.$BB71])+[.AD$26]*[.$Z$5]*MAGNET([.AD$24]+[.$BB71])+[.AE$26]*[.$Z$5]*MAGNET([.AE$24]+[.$BB71])+[.AF$26]*[.$Z$5]*MAGNET([.AF$24]+[.$BB71])+[.AG$26]*[.$Z$5]*MAGNET([.AG$24]+[.$BB71])+[.D$26]*[.$Z$5]*MAGNET([.D$24]+[.$BB71])+[.AH$26]*[.$Z$5]*MAGNET([.AH$24]+[.BB71]) +[.AI$26]*[.$Z$5]*MAGNET([.AI$24]+[.BB71]) +[.AJ$26]*[.$Z$5]*MAGNET([.AJ$24]+[.BB71]) +[.AK$26]*[.$Z$5]*MAGNET([.AK$24]+[.BB71]) +[.AL$26]*[.$Z$5]*MAGNET([.AL$24]+[.BB71]) +[.AM$26]*[.$Z$5]*MAGNET([.AM$24]+[.BB71]) +[.AN$26]*[.$Z$5]*MAGNET([.AN$24]+[.BB71]) +[.AO$26]*[.$Z$5]*MAGNET([.AO$24]+[.BB71]) +[.AP$26]*[.$Z$5]*MAGNET([.AP$24]+[.$BB71])&#10;+[.AQ$26]*[.$Z$5]*MAGNET([.AQ$24]+[.$BB71])&#10;+[.AR$26]*[.$Z$5]*MAGNET([.AR$24]+[.$BB71])&#10;+[.AS$26]*[.$Z$5]*MAGNET([.AS$24]+[.$BB71])&#10;+[.AT$26]*[.$Z$5]*MAGNET([.AT$24]+[.$BB71])&#10;+[.AU$26]*[.$Z$5]*MAGNET([.AU$24]+[.$BB71])&#10;+[.AV$26]*[.$Z$5]*MAGNET([.AV$24]+[.$BB71])&#10;+[.AW$26]*[.$Z$5]*MAGNET([.AW$24]+[.$BB71])&#10;+[.AX$26]*[.$Z$5]*MAGNET([.AX$24]+[.$BB71])&#10;+[.AY$26]*[.$Z$5]*MAGNET([.AY$24]+[.$BB71]) +RAND()*[.$BD$13]" office:value-type="float" office:value="82.3612553897623" calcext:value-type="float">
            <text:p>82.36</text:p>
          </table:table-cell>
          <table:table-cell table:style-name="ce71" table:formula="of:=[.E$27]*[.$Z$5]*MAGNET([.E$24]+[.$BB71])+[.F$27]*[.$Z$5]*MAGNET([.F$24]+[.$BB71])+[.G$27]*[.$Z$5]*MAGNET([.G$24]+[.$BB71])+[.H$27]*[.$Z$5]*MAGNET([.H$24]+[.$BB71])+[.I$27]*[.$Z$5]*MAGNET([.I$24]+[.$BB71])+[.J$27]*[.$Z$5]*MAGNET([.J$24]+[.$BB71])+[.K$27]*[.$Z$5]*MAGNET([.K$24]+[.$BB71])+[.L$27]*[.$Z$5]*MAGNET([.L$24]+[.$BB71])+[.M$27]*[.$Z$5]*MAGNET([.M$24]+[.$BB71])+[.N$27]*[.$Z$5]*MAGNET([.N$24]+[.$BB71])+[.O$27]*[.$Z$5]*MAGNET([.O$24]+[.$BB71])+[.P$27]*[.$Z$5]*MAGNET([.P$24]+[.$BB71])+[.Q$27]*[.$Z$5]*MAGNET([.Q$24]+[.$BB71])+[.R$27]*[.$Z$5]*MAGNET([.R$24]+[.$BB71])+[.S$27]*[.$Z$5]*MAGNET([.S$24]+[.$BB71])+[.T$27]*[.$Z$5]*MAGNET([.T$24]+[.$BB71])+[.U$27]*[.$Z$5]*MAGNET([.U$24]+[.$BB71])+[.V$27]*[.$Z$5]*MAGNET([.V$24]+[.$BB71])+[.W$27]*[.$Z$5]*MAGNET([.W$24]+[.$BB71])+[.X$27]*[.$Z$5]*MAGNET([.X$24]+[.$BB71])+[.Y$27]*[.$Z$5]*MAGNET([.Y$24]+[.$BB71])+[.Z$27]*[.$Z$5]*MAGNET([.Z$24]+[.$BB71])+[.AA$27]*[.$Z$5]*MAGNET([.AA$24]+[.$BB71])+[.AB$27]*[.$Z$5]*MAGNET([.AB$24]+[.$BB71])+[.AC$27]*[.$Z$5]*MAGNET([.AC$24]+[.$BB71])+[.AD$27]*[.$Z$5]*MAGNET([.AD$24]+[.$BB71])+[.AE$27]*[.$Z$5]*MAGNET([.AE$24]+[.$BB71])+[.AF$27]*[.$Z$5]*MAGNET([.AF$24]+[.$BB71])+[.AG$27]*[.$Z$5]*MAGNET([.AG$24]+[.$BB71])+[.D$27]*[.$Z$5]*MAGNET([.D$24]+[.$BB71])+[.AH$27]*[.$Z$5]*MAGNET([.AH$24]+[.BB71]) +[.AI$27]*[.$Z$5]*MAGNET([.AI$24]+[.BB71]) +[.AJ$27]*[.$Z$5]*MAGNET([.AJ$24]+[.BB71]) +[.AK$27]*[.$Z$5]*MAGNET([.AK$24]+[.BB71]) +[.AL$27]*[.$Z$5]*MAGNET([.AL$24]+[.BB71]) +[.AM$27]*[.$Z$5]*MAGNET([.AM$24]+[.BB71]) +[.AN$27]*[.$Z$5]*MAGNET([.AN$24]+[.BB71]) +[.AO$27]*[.$Z$5]*MAGNET([.AO$24]+[.BB71]) +[.AP$27]*[.$Z$5]*MAGNET([.AP$24]+[.$BB71])&#10;+[.AQ$27]*[.$Z$5]*MAGNET([.AQ$24]+[.$BB71])&#10;+[.AR$27]*[.$Z$5]*MAGNET([.AR$24]+[.$BB71])&#10;+[.AS$27]*[.$Z$5]*MAGNET([.AS$24]+[.$BB71])&#10;+[.AT$27]*[.$Z$5]*MAGNET([.AT$24]+[.$BB71])&#10;+[.AU$27]*[.$Z$5]*MAGNET([.AU$24]+[.$BB71])&#10;+[.AV$27]*[.$Z$5]*MAGNET([.AV$24]+[.$BB71])&#10;+[.AW$27]*[.$Z$5]*MAGNET([.AW$24]+[.$BB71])&#10;+[.AX$27]*[.$Z$5]*MAGNET([.AX$24]+[.$BB71])&#10;+[.AY$27]*[.$Z$5]*MAGNET([.AY$24]+[.$BB71]) +RAND()*[.$BE$13]" office:value-type="float" office:value="21.5916257782396" calcext:value-type="float">
            <text:p>21.5916257782396</text:p>
          </table:table-cell>
          <table:table-cell table:style-name="ce71" table:formula="of:=[.E$28]*[.$Z$5]*MAGNET([.E$24]+[.$BB71])+[.F$28]*[.$Z$5]*MAGNET([.F$24]+[.$BB71])+[.G$28]*[.$Z$5]*MAGNET([.G$24]+[.$BB71])+[.H$28]*[.$Z$5]*MAGNET([.H$24]+[.$BB71])+[.I$28]*[.$Z$5]*MAGNET([.I$24]+[.$BB71])+[.J$28]*[.$Z$5]*MAGNET([.J$24]+[.$BB71])+[.K$28]*[.$Z$5]*MAGNET([.K$24]+[.$BB71])+[.L$28]*[.$Z$5]*MAGNET([.L$24]+[.$BB71])+[.M$28]*[.$Z$5]*MAGNET([.M$24]+[.$BB71])+[.N$28]*[.$Z$5]*MAGNET([.N$24]+[.$BB71])+[.O$28]*[.$Z$5]*MAGNET([.O$24]+[.$BB71])+[.P$28]*[.$Z$5]*MAGNET([.P$24]+[.$BB71])+[.Q$28]*[.$Z$5]*MAGNET([.Q$24]+[.$BB71])+[.R$28]*[.$Z$5]*MAGNET([.R$24]+[.$BB71])+[.S$28]*[.$Z$5]*MAGNET([.S$24]+[.$BB71])+[.T$28]*[.$Z$5]*MAGNET([.T$24]+[.$BB71])+[.U$28]*[.$Z$5]*MAGNET([.U$24]+[.$BB71])+[.V$28]*[.$Z$5]*MAGNET([.V$24]+[.$BB71])+[.W$28]*[.$Z$5]*MAGNET([.W$24]+[.$BB71])+[.X$28]*[.$Z$5]*MAGNET([.X$24]+[.$BB71])+[.Y$28]*[.$Z$5]*MAGNET([.Y$24]+[.$BB71])+[.Z$28]*[.$Z$5]*MAGNET([.Z$24]+[.$BB71])+[.AA$28]*[.$Z$5]*MAGNET([.AA$24]+[.$BB71])+[.AB$28]*[.$Z$5]*MAGNET([.AB$24]+[.$BB71])+[.AC$28]*[.$Z$5]*MAGNET([.AC$24]+[.$BB71])+[.AD$28]*[.$Z$5]*MAGNET([.AD$24]+[.$BB71])+[.AE$28]*[.$Z$5]*MAGNET([.AE$24]+[.$BB71])+[.AF$28]*[.$Z$5]*MAGNET([.AF$24]+[.$BB71])+[.AG$28]*[.$Z$5]*MAGNET([.AG$24]+[.$BB71])+[.D$28]*[.$Z$5]*MAGNET([.D$24]+[.$BB71])+[.AH$28]*[.$Z$5]*MAGNET([.AH$24]+[.BB71]) +[.AI$28]*[.$Z$5]*MAGNET([.AI$24]+[.BB71]) +[.AJ$28]*[.$Z$5]*MAGNET([.AJ$24]+[.BB71]) +[.AK$28]*[.$Z$5]*MAGNET([.AK$24]+[.BB71]) +[.AL$28]*[.$Z$5]*MAGNET([.AL$24]+[.BB71]) +[.AM$28]*[.$Z$5]*MAGNET([.AM$24]+[.BB71]) +[.AN$28]*[.$Z$5]*MAGNET([.AN$24]+[.BB71]) +[.AO$28]*[.$Z$5]*MAGNET([.AO$24]+[.BB71]) +[.AP$28]*[.$Z$5]*MAGNET([.AP$24]+[.$BB71])&#10;+[.AQ$28]*[.$Z$5]*MAGNET([.AQ$24]+[.$BB71])&#10;+[.AR$28]*[.$Z$5]*MAGNET([.AR$24]+[.$BB71])&#10;+[.AS$28]*[.$Z$5]*MAGNET([.AS$24]+[.$BB71])&#10;+[.AT$28]*[.$Z$5]*MAGNET([.AT$24]+[.$BB71])&#10;+[.AU$28]*[.$Z$5]*MAGNET([.AU$24]+[.$BB71])&#10;+[.AV$28]*[.$Z$5]*MAGNET([.AV$24]+[.$BB71])&#10;+[.AW$28]*[.$Z$5]*MAGNET([.AW$24]+[.$BB71])&#10;+[.AX$28]*[.$Z$5]*MAGNET([.AX$24]+[.$BB71])&#10;+[.AY$28]*[.$Z$5]*MAGNET([.AY$24]+[.$BB71]) +RAND()*[.$BF$13]" office:value-type="float" office:value="1.71412783277957" calcext:value-type="float">
            <text:p>1.71412783277957</text:p>
          </table:table-cell>
          <table:table-cell table:style-name="ce71" table:formula="of:=[.E$29]*[.$Z$5]*MAGNET([.E$24]+[.$BB71])+[.F$29]*[.$Z$5]*MAGNET([.F$24]+[.$BB71])+[.G$29]*[.$Z$5]*MAGNET([.G$24]+[.$BB71])+[.H$29]*[.$Z$5]*MAGNET([.H$24]+[.$BB71])+[.I$29]*[.$Z$5]*MAGNET([.I$24]+[.$BB71])+[.J$29]*[.$Z$5]*MAGNET([.J$24]+[.$BB71])+[.K$29]*[.$Z$5]*MAGNET([.K$24]+[.$BB71])+[.L$29]*[.$Z$5]*MAGNET([.L$24]+[.$BB71])+[.M$29]*[.$Z$5]*MAGNET([.M$24]+[.$BB71])+[.N$29]*[.$Z$5]*MAGNET([.N$24]+[.$BB71])+[.O$29]*[.$Z$5]*MAGNET([.O$24]+[.$BB71])+[.P$29]*[.$Z$5]*MAGNET([.P$24]+[.$BB71])+[.Q$29]*[.$Z$5]*MAGNET([.Q$24]+[.$BB71])+[.R$29]*[.$Z$5]*MAGNET([.R$24]+[.$BB71])+[.S$29]*[.$Z$5]*MAGNET([.S$24]+[.$BB71])+[.T$29]*[.$Z$5]*MAGNET([.T$24]+[.$BB71])+[.U$29]*[.$Z$5]*MAGNET([.U$24]+[.$BB71])+[.V$29]*[.$Z$5]*MAGNET([.V$24]+[.$BB71])+[.W$29]*[.$Z$5]*MAGNET([.W$24]+[.$BB71])+[.X$29]*[.$Z$5]*MAGNET([.X$24]+[.$BB71])+[.Y$29]*[.$Z$5]*MAGNET([.Y$24]+[.$BB71])+[.Z$29]*[.$Z$5]*MAGNET([.Z$24]+[.$BB71])+[.AA$29]*[.$Z$5]*MAGNET([.AA$24]+[.$BB71])+[.AB$29]*[.$Z$5]*MAGNET([.AB$24]+[.$BB71])+[.AC$29]*[.$Z$5]*MAGNET([.AC$24]+[.$BB71])+[.AD$29]*[.$Z$5]*MAGNET([.AD$24]+[.$BB71])+[.AE$29]*[.$Z$5]*MAGNET([.AE$24]+[.$BB71])+[.AF$29]*[.$Z$5]*MAGNET([.AF$24]+[.$BB71])+[.AG$29]*[.$Z$5]*MAGNET([.AG$24]+[.$BB71])+[.D$29]*[.$Z$5]*MAGNET([.D$24]+[.$BB71])+[.AH$29]*[.$Z$5]*MAGNET([.AH$24]+[.BB71]) +[.AI$29]*[.$Z$5]*MAGNET([.AI$24]+[.BB71]) +[.AJ$29]*[.$Z$5]*MAGNET([.AJ$24]+[.BB71]) +[.AK$29]*[.$Z$5]*MAGNET([.AK$24]+[.BB71]) +[.AL$29]*[.$Z$5]*MAGNET([.AL$24]+[.BB71]) +[.AM$29]*[.$Z$5]*MAGNET([.AM$24]+[.BB71]) +[.AN$29]*[.$Z$5]*MAGNET([.AN$24]+[.BB71]) +[.AO$29]*[.$Z$5]*MAGNET([.AO$24]+[.BB71]) +[.AP$29]*[.$Z$5]*MAGNET([.AP$24]+[.$BB71])&#10;+[.AQ$29]*[.$Z$5]*MAGNET([.AQ$24]+[.$BB71])&#10;+[.AR$29]*[.$Z$5]*MAGNET([.AR$24]+[.$BB71])&#10;+[.AS$29]*[.$Z$5]*MAGNET([.AS$24]+[.$BB71])&#10;+[.AT$29]*[.$Z$5]*MAGNET([.AT$24]+[.$BB71])&#10;+[.AU$29]*[.$Z$5]*MAGNET([.AU$24]+[.$BB71])&#10;+[.AV$29]*[.$Z$5]*MAGNET([.AV$24]+[.$BB71])&#10;+[.AW$29]*[.$Z$5]*MAGNET([.AW$24]+[.$BB71])&#10;+[.AX$29]*[.$Z$5]*MAGNET([.AX$24]+[.$BB71])&#10;+[.AY$29]*[.$Z$5]*MAGNET([.AY$24]+[.$BB71]) +RAND()*[.$BG$13]" office:value-type="float" office:value="-3.46684722684379" calcext:value-type="float">
            <text:p>-3.46684722684379</text:p>
          </table:table-cell>
          <table:table-cell table:style-name="ce71" table:formula="of:=[.E$30]*[.$Z$5]*MAGNET([.E$24]+[.$BB71])+[.F$30]*[.$Z$5]*MAGNET([.F$24]+[.$BB71])+[.G$30]*[.$Z$5]*MAGNET([.G$24]+[.$BB71])+[.H$30]*[.$Z$5]*MAGNET([.H$24]+[.$BB71])+[.I$30]*[.$Z$5]*MAGNET([.I$24]+[.$BB71])+[.J$30]*[.$Z$5]*MAGNET([.J$24]+[.$BB71])+[.K$30]*[.$Z$5]*MAGNET([.K$24]+[.$BB71])+[.L$30]*[.$Z$5]*MAGNET([.L$24]+[.$BB71])+[.M$30]*[.$Z$5]*MAGNET([.M$24]+[.$BB71])+[.N$30]*[.$Z$5]*MAGNET([.N$24]+[.$BB71])+[.O$30]*[.$Z$5]*MAGNET([.O$24]+[.$BB71])+[.P$30]*[.$Z$5]*MAGNET([.P$24]+[.$BB71])+[.Q$30]*[.$Z$5]*MAGNET([.Q$24]+[.$BB71])+[.R$30]*[.$Z$5]*MAGNET([.R$24]+[.$BB71])+[.S$30]*[.$Z$5]*MAGNET([.S$24]+[.$BB71])+[.T$30]*[.$Z$5]*MAGNET([.T$24]+[.$BB71])+[.U$30]*[.$Z$5]*MAGNET([.U$24]+[.$BB71])+[.V$30]*[.$Z$5]*MAGNET([.V$24]+[.$BB71])+[.W$30]*[.$Z$5]*MAGNET([.W$24]+[.$BB71])+[.X$30]*[.$Z$5]*MAGNET([.X$24]+[.$BB71])+[.Y$30]*[.$Z$5]*MAGNET([.Y$24]+[.$BB71])+[.Z$30]*[.$Z$5]*MAGNET([.Z$24]+[.$BB71])+[.AA$30]*[.$Z$5]*MAGNET([.AA$24]+[.$BB71])+[.AB$30]*[.$Z$5]*MAGNET([.AB$24]+[.$BB71])+[.AC$30]*[.$Z$5]*MAGNET([.AC$24]+[.$BB71])+[.AD$30]*[.$Z$5]*MAGNET([.AD$24]+[.$BB71])+[.AE$30]*[.$Z$5]*MAGNET([.AE$24]+[.$BB71])+[.AF$30]*[.$Z$5]*MAGNET([.AF$24]+[.$BB71])+[.AG$30]*[.$Z$5]*MAGNET([.AG$24]+[.$BB71])+[.D$30]*[.$Z$5]*MAGNET([.D$24]+[.$BB71])+[.AH$30]*[.$Z$5]*MAGNET([.AH$24]+[.BB71]) +[.AI$30]*[.$Z$5]*MAGNET([.AI$24]+[.BB71]) +[.AJ$30]*[.$Z$5]*MAGNET([.AJ$24]+[.BB71]) +[.AK$30]*[.$Z$5]*MAGNET([.AK$24]+[.BB71]) +[.AL$30]*[.$Z$5]*MAGNET([.AL$24]+[.BB71]) +[.AM$30]*[.$Z$5]*MAGNET([.AM$24]+[.BB71]) +[.AN$30]*[.$Z$5]*MAGNET([.AN$24]+[.BB71]) +[.AO$30]*[.$Z$5]*MAGNET([.AO$24]+[.BB71]) +[.AP$30]*[.$Z$5]*MAGNET([.AP$24]+[.$BB71])&#10;+[.AQ$30]*[.$Z$5]*MAGNET([.AQ$24]+[.$BB71])&#10;+[.AR$30]*[.$Z$5]*MAGNET([.AR$24]+[.$BB71])&#10;+[.AS$30]*[.$Z$5]*MAGNET([.AS$24]+[.$BB71])&#10;+[.AT$30]*[.$Z$5]*MAGNET([.AT$24]+[.$BB71])&#10;+[.AU$30]*[.$Z$5]*MAGNET([.AU$24]+[.$BB71])&#10;+[.AV$30]*[.$Z$5]*MAGNET([.AV$24]+[.$BB71])&#10;+[.AW$30]*[.$Z$5]*MAGNET([.AW$24]+[.$BB71])&#10;+[.AX$30]*[.$Z$5]*MAGNET([.AX$24]+[.$BB71])&#10;+[.AY$30]*[.$Z$5]*MAGNET([.AY$24]+[.$BB71]) +RAND()*[.$BH$13]" office:value-type="float" office:value="0" calcext:value-type="float">
            <text:p>0</text:p>
          </table:table-cell>
          <table:table-cell table:style-name="ce71" table:formula="of:=[.E$31]*[.$Z$5]*MAGNET([.E$24]+[.$BB71])+[.F$31]*[.$Z$5]*MAGNET([.F$24]+[.$BB71])+[.G$31]*[.$Z$5]*MAGNET([.G$24]+[.$BB71])+[.H$31]*[.$Z$5]*MAGNET([.H$24]+[.$BB71])+[.I$31]*[.$Z$5]*MAGNET([.I$24]+[.$BB71])+[.J$31]*[.$Z$5]*MAGNET([.J$24]+[.$BB71])+[.K$31]*[.$Z$5]*MAGNET([.K$24]+[.$BB71])+[.L$31]*[.$Z$5]*MAGNET([.L$24]+[.$BB71])+[.M$31]*[.$Z$5]*MAGNET([.M$24]+[.$BB71])+[.N$31]*[.$Z$5]*MAGNET([.N$24]+[.$BB71])+[.O$31]*[.$Z$5]*MAGNET([.O$24]+[.$BB71])+[.P$31]*[.$Z$5]*MAGNET([.P$24]+[.$BB71])+[.Q$31]*[.$Z$5]*MAGNET([.Q$24]+[.$BB71])+[.R$31]*[.$Z$5]*MAGNET([.R$24]+[.$BB71])+[.S$31]*[.$Z$5]*MAGNET([.S$24]+[.$BB71])+[.T$31]*[.$Z$5]*MAGNET([.T$24]+[.$BB71])+[.U$31]*[.$Z$5]*MAGNET([.U$24]+[.$BB71])+[.V$31]*[.$Z$5]*MAGNET([.V$24]+[.$BB71])+[.W$31]*[.$Z$5]*MAGNET([.W$24]+[.$BB71])+[.X$31]*[.$Z$5]*MAGNET([.X$24]+[.$BB71])+[.Y$31]*[.$Z$5]*MAGNET([.Y$24]+[.$BB71])+[.Z$31]*[.$Z$5]*MAGNET([.Z$24]+[.$BB71])+[.AA$31]*[.$Z$5]*MAGNET([.AA$24]+[.$BB71])+[.AB$31]*[.$Z$5]*MAGNET([.AB$24]+[.$BB71])+[.AC$31]*[.$Z$5]*MAGNET([.AC$24]+[.$BB71])+[.AD$31]*[.$Z$5]*MAGNET([.AD$24]+[.$BB71])+[.AE$31]*[.$Z$5]*MAGNET([.AE$24]+[.$BB71])+[.AF$31]*[.$Z$5]*MAGNET([.AF$24]+[.$BB71])+[.AG$31]*[.$Z$5]*MAGNET([.AG$24]+[.$BB71])+[.D$31]*[.$Z$5]*MAGNET([.D$24]+[.$BB71])+[.AH$31]*[.$Z$5]*MAGNET([.AH$24]+[.BB71]) +[.AI$31]*[.$Z$5]*MAGNET([.AI$24]+[.BB71]) +[.AJ$31]*[.$Z$5]*MAGNET([.AJ$24]+[.BB71]) +[.AK$31]*[.$Z$5]*MAGNET([.AK$24]+[.BB71]) +[.AL$31]*[.$Z$5]*MAGNET([.AL$24]+[.BB71]) +[.AM$31]*[.$Z$5]*MAGNET([.AM$24]+[.BB71]) +[.AN$31]*[.$Z$5]*MAGNET([.AN$24]+[.BB71]) +[.AO$31]*[.$Z$5]*MAGNET([.AO$24]+[.BB71]) +[.AP$31]*[.$Z$5]*MAGNET([.AP$24]+[.$BB71])&#10;+[.AQ$31]*[.$Z$5]*MAGNET([.AQ$24]+[.$BB71])&#10;+[.AR$31]*[.$Z$5]*MAGNET([.AR$24]+[.$BB71])&#10;+[.AS$31]*[.$Z$5]*MAGNET([.AS$24]+[.$BB71])&#10;+[.AT$31]*[.$Z$5]*MAGNET([.AT$24]+[.$BB71])&#10;+[.AU$31]*[.$Z$5]*MAGNET([.AU$24]+[.$BB71])&#10;+[.AV$31]*[.$Z$5]*MAGNET([.AV$24]+[.$BB71])&#10;+[.AW$31]*[.$Z$5]*MAGNET([.AW$24]+[.$BB71])&#10;+[.AX$31]*[.$Z$5]*MAGNET([.AX$24]+[.$BB71])&#10;+[.AY$31]*[.$Z$5]*MAGNET([.AY$24]+[.$BB71]) +RAND()*[.$BI$13]" office:value-type="float" office:value="0" calcext:value-type="float">
            <text:p>0</text:p>
          </table:table-cell>
          <table:table-cell table:style-name="ce71" table:formula="of:=[.E$32]*[.$Z$5]*MAGNET([.E$24]+[.$BB71])+[.F$32]*[.$Z$5]*MAGNET([.F$24]+[.$BB71])+[.G$32]*[.$Z$5]*MAGNET([.G$24]+[.$BB71])+[.H$32]*[.$Z$5]*MAGNET([.H$24]+[.$BB71])+[.I$32]*[.$Z$5]*MAGNET([.I$24]+[.$BB71])+[.J$32]*[.$Z$5]*MAGNET([.J$24]+[.$BB71])+[.K$32]*[.$Z$5]*MAGNET([.K$24]+[.$BB71])+[.L$32]*[.$Z$5]*MAGNET([.L$24]+[.$BB71])+[.M$32]*[.$Z$5]*MAGNET([.M$24]+[.$BB71])+[.N$32]*[.$Z$5]*MAGNET([.N$24]+[.$BB71])+[.O$32]*[.$Z$5]*MAGNET([.O$24]+[.$BB71])+[.P$32]*[.$Z$5]*MAGNET([.P$24]+[.$BB71])+[.Q$32]*[.$Z$5]*MAGNET([.Q$24]+[.$BB71])+[.R$32]*[.$Z$5]*MAGNET([.R$24]+[.$BB71])+[.S$32]*[.$Z$5]*MAGNET([.S$24]+[.$BB71])+[.T$32]*[.$Z$5]*MAGNET([.T$24]+[.$BB71])+[.U$32]*[.$Z$5]*MAGNET([.U$24]+[.$BB71])+[.V$32]*[.$Z$5]*MAGNET([.V$24]+[.$BB71])+[.W$32]*[.$Z$5]*MAGNET([.W$24]+[.$BB71])+[.X$32]*[.$Z$5]*MAGNET([.X$24]+[.$BB71])+[.Y$32]*[.$Z$5]*MAGNET([.Y$24]+[.$BB71])+[.Z$32]*[.$Z$5]*MAGNET([.Z$24]+[.$BB71])+[.AA$32]*[.$Z$5]*MAGNET([.AA$24]+[.$BB71])+[.AB$32]*[.$Z$5]*MAGNET([.AB$24]+[.$BB71])+[.AC$32]*[.$Z$5]*MAGNET([.AC$24]+[.$BB71])+[.AD$32]*[.$Z$5]*MAGNET([.AD$24]+[.$BB71])+[.AE$32]*[.$Z$5]*MAGNET([.AE$24]+[.$BB71])+[.AF$32]*[.$Z$5]*MAGNET([.AF$24]+[.$BB71])+[.AG$32]*[.$Z$5]*MAGNET([.AG$24]+[.$BB71])+[.D$32]*[.$Z$5]*MAGNET([.D$24]+[.$BB71])+[.AH$32]*[.$Z$5]*MAGNET([.AH$24]+[.BB71]) +[.AI$32]*[.$Z$5]*MAGNET([.AI$24]+[.BB71]) +[.AJ$32]*[.$Z$5]*MAGNET([.AJ$24]+[.BB71]) +[.AK$32]*[.$Z$5]*MAGNET([.AK$24]+[.BB71]) +[.AL$32]*[.$Z$5]*MAGNET([.AL$24]+[.BB71]) +[.AM$32]*[.$Z$5]*MAGNET([.AM$24]+[.BB71]) +[.AN$32]*[.$Z$5]*MAGNET([.AN$24]+[.BB71]) +[.AO$32]*[.$Z$5]*MAGNET([.AO$24]+[.BB71]) +[.AP$32]*[.$Z$5]*MAGNET([.AP$24]+[.$BB71])&#10;+[.AQ$32]*[.$Z$5]*MAGNET([.AQ$24]+[.$BB71])&#10;+[.AR$32]*[.$Z$5]*MAGNET([.AR$24]+[.$BB71])&#10;+[.AS$32]*[.$Z$5]*MAGNET([.AS$24]+[.$BB71])&#10;+[.AT$32]*[.$Z$5]*MAGNET([.AT$24]+[.$BB71])&#10;+[.AU$32]*[.$Z$5]*MAGNET([.AU$24]+[.$BB71])&#10;+[.AV$32]*[.$Z$5]*MAGNET([.AV$24]+[.$BB71])&#10;+[.AW$32]*[.$Z$5]*MAGNET([.AW$24]+[.$BB71])&#10;+[.AX$32]*[.$Z$5]*MAGNET([.AX$24]+[.$BB71])&#10;+[.AY$32]*[.$Z$5]*MAGNET([.AY$24]+[.$BB7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1]+0.002" office:value-type="float" office:value="0.114" calcext:value-type="float">
            <text:p>0.114</text:p>
          </table:table-cell>
          <table:table-cell table:formula="of:=[.BA72]*[.$D$6]" office:value-type="float" office:value="5.73026500014779" calcext:value-type="float">
            <text:p>5.730</text:p>
          </table:table-cell>
          <table:table-cell table:formula="of:=[.D$25]*[.$Z$5]*MAGNET([.D$24]+[.BB72])+[.E$25]*[.$Z$5]*MAGNET([.E$24]+[.BB72])+[.F$25]*[.$Z$5]*MAGNET([.F$24]+[.BB72])+[.G$25]*[.$Z$5]*MAGNET([.G$24]+[.BB72])+[.H$25]*[.$Z$5]*MAGNET([.H$24]+[.BB72])+[.I$25]*[.$Z$5]*MAGNET([.I$24]+[.BB72])+[.J$25]*[.$Z$5]*MAGNET([.J$24]+[.BB72])+[.K$25]*[.$Z$5]*MAGNET([.K$24]+[.BB72])+[.L$25]*[.$Z$5]*MAGNET([.L$24]+[.BB72])+[.M$25]*[.$Z$5]*MAGNET([.M$24]+[.BB72])+[.N$25]*[.$Z$5]*MAGNET([.N$24]+[.BB72])+[.O$25]*[.$Z$5]*MAGNET([.O$24]+[.BB72])+[.P$25]*[.$Z$5]*MAGNET([.P$24]+[.BB72])+[.Q$25]*[.$Z$5]*MAGNET([.Q$24]+[.BB72])+[.R$25]*[.$Z$5]*MAGNET([.R$24]+[.BB72])+[.S$25]*[.$Z$5]*MAGNET([.S$24]+[.BB72])+[.T$25]*[.$Z$5]*MAGNET([.T$24]+[.BB72])+[.U$25]*[.$Z$5]*MAGNET([.U$24]+[.BB72])+[.V$25]*[.$Z$5]*MAGNET([.V$24]+[.BB72])+[.W$25]*[.$Z$5]*MAGNET([.W$24]+[.BB72])+[.X$25]*[.$Z$5]*MAGNET([.X$24]+[.BB72])+[.Y$25]*[.$Z$5]*MAGNET([.Y$24]+[.BB72])+[.Z$25]*[.$Z$5]*MAGNET([.Z$24]+[.BB72])+[.AA$25]*[.$Z$5]*MAGNET([.AA$24]+[.BB72])+[.AB$25]*[.$Z$5]*MAGNET([.AB$24]+[.BB72])+[.AC$25]*[.$Z$5]*MAGNET([.AC$24]+[.BB72])+[.AD$25]*[.$Z$5]*MAGNET([.AD$24]+[.BB72])+[.AE$25]*[.$Z$5]*MAGNET([.AE$24]+[.BB72])+[.AF$25]*[.$Z$5]*MAGNET([.AF$24]+[.BB72])+[.AG$25]*[.$Z$5]*MAGNET([.AG$24]+[.BB72])+[.AH$25]*[.$Z$5]*MAGNET([.AH$24]+[.BB72]) +[.AI$25]*[.$Z$5]*MAGNET([.AI$24]+[.BB72]) +[.AJ$25]*[.$Z$5]*MAGNET([.AJ$24]+[.BB72]) +[.AK$25]*[.$Z$5]*MAGNET([.AK$24]+[.BB72]) +[.AL$25]*[.$Z$5]*MAGNET([.AL$24]+[.BB72]) +[.AM$25]*[.$Z$5]*MAGNET([.AM$24]+[.BB72]) +[.AN$25]*[.$Z$5]*MAGNET([.AN$24]+[.BB72]) +[.AO$25]*[.$Z$5]*MAGNET([.AO$24]+[.BB72])+RAND()*[.$BC$13]+[.AP$25]*[.$Z$5]*MAGNET([.AP$24]+[.BB72])&#10;+[.AQ$25]*[.$Z$5]*MAGNET([.AQ$24]+[.BB72])&#10;+[.AR$25]*[.$Z$5]*MAGNET([.AR$24]+[.BB72])&#10;+[.AS$25]*[.$Z$5]*MAGNET([.AS$24]+[.BB72])&#10;+[.AT$25]*[.$Z$5]*MAGNET([.AT$24]+[.BB72])&#10;+[.AU$25]*[.$Z$5]*MAGNET([.AU$24]+[.BB72])&#10;+[.AV$25]*[.$Z$5]*MAGNET([.AV$24]+[.BB72])&#10;+[.AW$25]*[.$Z$5]*MAGNET([.AW$24]+[.BB72])&#10;+[.AX$25]*[.$Z$5]*MAGNET([.AX$24]+[.BB72])&#10;+[.AY$25]*[.$Z$5]*MAGNET([.AY$24]+[.BB72])" office:value-type="float" office:value="-94.6637323400215" calcext:value-type="float">
            <text:p>-94.66</text:p>
          </table:table-cell>
          <table:table-cell table:style-name="ce70" table:formula="of:=[.E$26]*[.$Z$5]*MAGNET([.E$24]+[.$BB72])+[.F$26]*[.$Z$5]*MAGNET([.F$24]+[.$BB72])+[.G$26]*[.$Z$5]*MAGNET([.G$24]+[.$BB72])+[.H$26]*[.$Z$5]*MAGNET([.H$24]+[.$BB72])+[.I$26]*[.$Z$5]*MAGNET([.I$24]+[.$BB72])+[.J$26]*[.$Z$5]*MAGNET([.J$24]+[.$BB72])+[.K$26]*[.$Z$5]*MAGNET([.K$24]+[.$BB72])+[.L$26]*[.$Z$5]*MAGNET([.L$24]+[.$BB72])+[.M$26]*[.$Z$5]*MAGNET([.M$24]+[.$BB72])+[.N$26]*[.$Z$5]*MAGNET([.N$24]+[.$BB72])+[.O$26]*[.$Z$5]*MAGNET([.O$24]+[.$BB72])+[.P$26]*[.$Z$5]*MAGNET([.P$24]+[.$BB72])+[.Q$26]*[.$Z$5]*MAGNET([.Q$24]+[.$BB72])+[.R$26]*[.$Z$5]*MAGNET([.R$24]+[.$BB72])+[.S$26]*[.$Z$5]*MAGNET([.S$24]+[.$BB72])+[.T$26]*[.$Z$5]*MAGNET([.T$24]+[.$BB72])+[.U$26]*[.$Z$5]*MAGNET([.U$24]+[.$BB72])+[.V$26]*[.$Z$5]*MAGNET([.V$24]+[.$BB72])+[.W$26]*[.$Z$5]*MAGNET([.W$24]+[.$BB72])+[.X$26]*[.$Z$5]*MAGNET([.X$24]+[.$BB72])+[.Y$26]*[.$Z$5]*MAGNET([.Y$24]+[.$BB72])+[.Z$26]*[.$Z$5]*MAGNET([.Z$24]+[.$BB72])+[.AA$26]*[.$Z$5]*MAGNET([.AA$24]+[.$BB72])+[.AB$26]*[.$Z$5]*MAGNET([.AB$24]+[.$BB72])+[.AC$26]*[.$Z$5]*MAGNET([.AC$24]+[.$BB72])+[.AD$26]*[.$Z$5]*MAGNET([.AD$24]+[.$BB72])+[.AE$26]*[.$Z$5]*MAGNET([.AE$24]+[.$BB72])+[.AF$26]*[.$Z$5]*MAGNET([.AF$24]+[.$BB72])+[.AG$26]*[.$Z$5]*MAGNET([.AG$24]+[.$BB72])+[.D$26]*[.$Z$5]*MAGNET([.D$24]+[.$BB72])+[.AH$26]*[.$Z$5]*MAGNET([.AH$24]+[.BB72]) +[.AI$26]*[.$Z$5]*MAGNET([.AI$24]+[.BB72]) +[.AJ$26]*[.$Z$5]*MAGNET([.AJ$24]+[.BB72]) +[.AK$26]*[.$Z$5]*MAGNET([.AK$24]+[.BB72]) +[.AL$26]*[.$Z$5]*MAGNET([.AL$24]+[.BB72]) +[.AM$26]*[.$Z$5]*MAGNET([.AM$24]+[.BB72]) +[.AN$26]*[.$Z$5]*MAGNET([.AN$24]+[.BB72]) +[.AO$26]*[.$Z$5]*MAGNET([.AO$24]+[.BB72]) +[.AP$26]*[.$Z$5]*MAGNET([.AP$24]+[.$BB72])&#10;+[.AQ$26]*[.$Z$5]*MAGNET([.AQ$24]+[.$BB72])&#10;+[.AR$26]*[.$Z$5]*MAGNET([.AR$24]+[.$BB72])&#10;+[.AS$26]*[.$Z$5]*MAGNET([.AS$24]+[.$BB72])&#10;+[.AT$26]*[.$Z$5]*MAGNET([.AT$24]+[.$BB72])&#10;+[.AU$26]*[.$Z$5]*MAGNET([.AU$24]+[.$BB72])&#10;+[.AV$26]*[.$Z$5]*MAGNET([.AV$24]+[.$BB72])&#10;+[.AW$26]*[.$Z$5]*MAGNET([.AW$24]+[.$BB72])&#10;+[.AX$26]*[.$Z$5]*MAGNET([.AX$24]+[.$BB72])&#10;+[.AY$26]*[.$Z$5]*MAGNET([.AY$24]+[.$BB72]) +RAND()*[.$BD$13]" office:value-type="float" office:value="85.714750320517" calcext:value-type="float">
            <text:p>85.71</text:p>
          </table:table-cell>
          <table:table-cell table:style-name="ce71" table:formula="of:=[.E$27]*[.$Z$5]*MAGNET([.E$24]+[.$BB72])+[.F$27]*[.$Z$5]*MAGNET([.F$24]+[.$BB72])+[.G$27]*[.$Z$5]*MAGNET([.G$24]+[.$BB72])+[.H$27]*[.$Z$5]*MAGNET([.H$24]+[.$BB72])+[.I$27]*[.$Z$5]*MAGNET([.I$24]+[.$BB72])+[.J$27]*[.$Z$5]*MAGNET([.J$24]+[.$BB72])+[.K$27]*[.$Z$5]*MAGNET([.K$24]+[.$BB72])+[.L$27]*[.$Z$5]*MAGNET([.L$24]+[.$BB72])+[.M$27]*[.$Z$5]*MAGNET([.M$24]+[.$BB72])+[.N$27]*[.$Z$5]*MAGNET([.N$24]+[.$BB72])+[.O$27]*[.$Z$5]*MAGNET([.O$24]+[.$BB72])+[.P$27]*[.$Z$5]*MAGNET([.P$24]+[.$BB72])+[.Q$27]*[.$Z$5]*MAGNET([.Q$24]+[.$BB72])+[.R$27]*[.$Z$5]*MAGNET([.R$24]+[.$BB72])+[.S$27]*[.$Z$5]*MAGNET([.S$24]+[.$BB72])+[.T$27]*[.$Z$5]*MAGNET([.T$24]+[.$BB72])+[.U$27]*[.$Z$5]*MAGNET([.U$24]+[.$BB72])+[.V$27]*[.$Z$5]*MAGNET([.V$24]+[.$BB72])+[.W$27]*[.$Z$5]*MAGNET([.W$24]+[.$BB72])+[.X$27]*[.$Z$5]*MAGNET([.X$24]+[.$BB72])+[.Y$27]*[.$Z$5]*MAGNET([.Y$24]+[.$BB72])+[.Z$27]*[.$Z$5]*MAGNET([.Z$24]+[.$BB72])+[.AA$27]*[.$Z$5]*MAGNET([.AA$24]+[.$BB72])+[.AB$27]*[.$Z$5]*MAGNET([.AB$24]+[.$BB72])+[.AC$27]*[.$Z$5]*MAGNET([.AC$24]+[.$BB72])+[.AD$27]*[.$Z$5]*MAGNET([.AD$24]+[.$BB72])+[.AE$27]*[.$Z$5]*MAGNET([.AE$24]+[.$BB72])+[.AF$27]*[.$Z$5]*MAGNET([.AF$24]+[.$BB72])+[.AG$27]*[.$Z$5]*MAGNET([.AG$24]+[.$BB72])+[.D$27]*[.$Z$5]*MAGNET([.D$24]+[.$BB72])+[.AH$27]*[.$Z$5]*MAGNET([.AH$24]+[.BB72]) +[.AI$27]*[.$Z$5]*MAGNET([.AI$24]+[.BB72]) +[.AJ$27]*[.$Z$5]*MAGNET([.AJ$24]+[.BB72]) +[.AK$27]*[.$Z$5]*MAGNET([.AK$24]+[.BB72]) +[.AL$27]*[.$Z$5]*MAGNET([.AL$24]+[.BB72]) +[.AM$27]*[.$Z$5]*MAGNET([.AM$24]+[.BB72]) +[.AN$27]*[.$Z$5]*MAGNET([.AN$24]+[.BB72]) +[.AO$27]*[.$Z$5]*MAGNET([.AO$24]+[.BB72]) +[.AP$27]*[.$Z$5]*MAGNET([.AP$24]+[.$BB72])&#10;+[.AQ$27]*[.$Z$5]*MAGNET([.AQ$24]+[.$BB72])&#10;+[.AR$27]*[.$Z$5]*MAGNET([.AR$24]+[.$BB72])&#10;+[.AS$27]*[.$Z$5]*MAGNET([.AS$24]+[.$BB72])&#10;+[.AT$27]*[.$Z$5]*MAGNET([.AT$24]+[.$BB72])&#10;+[.AU$27]*[.$Z$5]*MAGNET([.AU$24]+[.$BB72])&#10;+[.AV$27]*[.$Z$5]*MAGNET([.AV$24]+[.$BB72])&#10;+[.AW$27]*[.$Z$5]*MAGNET([.AW$24]+[.$BB72])&#10;+[.AX$27]*[.$Z$5]*MAGNET([.AX$24]+[.$BB72])&#10;+[.AY$27]*[.$Z$5]*MAGNET([.AY$24]+[.$BB72]) +RAND()*[.$BE$13]" office:value-type="float" office:value="4.69737338135929" calcext:value-type="float">
            <text:p>4.69737338135929</text:p>
          </table:table-cell>
          <table:table-cell table:style-name="ce71" table:formula="of:=[.E$28]*[.$Z$5]*MAGNET([.E$24]+[.$BB72])+[.F$28]*[.$Z$5]*MAGNET([.F$24]+[.$BB72])+[.G$28]*[.$Z$5]*MAGNET([.G$24]+[.$BB72])+[.H$28]*[.$Z$5]*MAGNET([.H$24]+[.$BB72])+[.I$28]*[.$Z$5]*MAGNET([.I$24]+[.$BB72])+[.J$28]*[.$Z$5]*MAGNET([.J$24]+[.$BB72])+[.K$28]*[.$Z$5]*MAGNET([.K$24]+[.$BB72])+[.L$28]*[.$Z$5]*MAGNET([.L$24]+[.$BB72])+[.M$28]*[.$Z$5]*MAGNET([.M$24]+[.$BB72])+[.N$28]*[.$Z$5]*MAGNET([.N$24]+[.$BB72])+[.O$28]*[.$Z$5]*MAGNET([.O$24]+[.$BB72])+[.P$28]*[.$Z$5]*MAGNET([.P$24]+[.$BB72])+[.Q$28]*[.$Z$5]*MAGNET([.Q$24]+[.$BB72])+[.R$28]*[.$Z$5]*MAGNET([.R$24]+[.$BB72])+[.S$28]*[.$Z$5]*MAGNET([.S$24]+[.$BB72])+[.T$28]*[.$Z$5]*MAGNET([.T$24]+[.$BB72])+[.U$28]*[.$Z$5]*MAGNET([.U$24]+[.$BB72])+[.V$28]*[.$Z$5]*MAGNET([.V$24]+[.$BB72])+[.W$28]*[.$Z$5]*MAGNET([.W$24]+[.$BB72])+[.X$28]*[.$Z$5]*MAGNET([.X$24]+[.$BB72])+[.Y$28]*[.$Z$5]*MAGNET([.Y$24]+[.$BB72])+[.Z$28]*[.$Z$5]*MAGNET([.Z$24]+[.$BB72])+[.AA$28]*[.$Z$5]*MAGNET([.AA$24]+[.$BB72])+[.AB$28]*[.$Z$5]*MAGNET([.AB$24]+[.$BB72])+[.AC$28]*[.$Z$5]*MAGNET([.AC$24]+[.$BB72])+[.AD$28]*[.$Z$5]*MAGNET([.AD$24]+[.$BB72])+[.AE$28]*[.$Z$5]*MAGNET([.AE$24]+[.$BB72])+[.AF$28]*[.$Z$5]*MAGNET([.AF$24]+[.$BB72])+[.AG$28]*[.$Z$5]*MAGNET([.AG$24]+[.$BB72])+[.D$28]*[.$Z$5]*MAGNET([.D$24]+[.$BB72])+[.AH$28]*[.$Z$5]*MAGNET([.AH$24]+[.BB72]) +[.AI$28]*[.$Z$5]*MAGNET([.AI$24]+[.BB72]) +[.AJ$28]*[.$Z$5]*MAGNET([.AJ$24]+[.BB72]) +[.AK$28]*[.$Z$5]*MAGNET([.AK$24]+[.BB72]) +[.AL$28]*[.$Z$5]*MAGNET([.AL$24]+[.BB72]) +[.AM$28]*[.$Z$5]*MAGNET([.AM$24]+[.BB72]) +[.AN$28]*[.$Z$5]*MAGNET([.AN$24]+[.BB72]) +[.AO$28]*[.$Z$5]*MAGNET([.AO$24]+[.BB72]) +[.AP$28]*[.$Z$5]*MAGNET([.AP$24]+[.$BB72])&#10;+[.AQ$28]*[.$Z$5]*MAGNET([.AQ$24]+[.$BB72])&#10;+[.AR$28]*[.$Z$5]*MAGNET([.AR$24]+[.$BB72])&#10;+[.AS$28]*[.$Z$5]*MAGNET([.AS$24]+[.$BB72])&#10;+[.AT$28]*[.$Z$5]*MAGNET([.AT$24]+[.$BB72])&#10;+[.AU$28]*[.$Z$5]*MAGNET([.AU$24]+[.$BB72])&#10;+[.AV$28]*[.$Z$5]*MAGNET([.AV$24]+[.$BB72])&#10;+[.AW$28]*[.$Z$5]*MAGNET([.AW$24]+[.$BB72])&#10;+[.AX$28]*[.$Z$5]*MAGNET([.AX$24]+[.$BB72])&#10;+[.AY$28]*[.$Z$5]*MAGNET([.AY$24]+[.$BB72]) +RAND()*[.$BF$13]" office:value-type="float" office:value="0.505321159331238" calcext:value-type="float">
            <text:p>0.505321159331238</text:p>
          </table:table-cell>
          <table:table-cell table:style-name="ce71" table:formula="of:=[.E$29]*[.$Z$5]*MAGNET([.E$24]+[.$BB72])+[.F$29]*[.$Z$5]*MAGNET([.F$24]+[.$BB72])+[.G$29]*[.$Z$5]*MAGNET([.G$24]+[.$BB72])+[.H$29]*[.$Z$5]*MAGNET([.H$24]+[.$BB72])+[.I$29]*[.$Z$5]*MAGNET([.I$24]+[.$BB72])+[.J$29]*[.$Z$5]*MAGNET([.J$24]+[.$BB72])+[.K$29]*[.$Z$5]*MAGNET([.K$24]+[.$BB72])+[.L$29]*[.$Z$5]*MAGNET([.L$24]+[.$BB72])+[.M$29]*[.$Z$5]*MAGNET([.M$24]+[.$BB72])+[.N$29]*[.$Z$5]*MAGNET([.N$24]+[.$BB72])+[.O$29]*[.$Z$5]*MAGNET([.O$24]+[.$BB72])+[.P$29]*[.$Z$5]*MAGNET([.P$24]+[.$BB72])+[.Q$29]*[.$Z$5]*MAGNET([.Q$24]+[.$BB72])+[.R$29]*[.$Z$5]*MAGNET([.R$24]+[.$BB72])+[.S$29]*[.$Z$5]*MAGNET([.S$24]+[.$BB72])+[.T$29]*[.$Z$5]*MAGNET([.T$24]+[.$BB72])+[.U$29]*[.$Z$5]*MAGNET([.U$24]+[.$BB72])+[.V$29]*[.$Z$5]*MAGNET([.V$24]+[.$BB72])+[.W$29]*[.$Z$5]*MAGNET([.W$24]+[.$BB72])+[.X$29]*[.$Z$5]*MAGNET([.X$24]+[.$BB72])+[.Y$29]*[.$Z$5]*MAGNET([.Y$24]+[.$BB72])+[.Z$29]*[.$Z$5]*MAGNET([.Z$24]+[.$BB72])+[.AA$29]*[.$Z$5]*MAGNET([.AA$24]+[.$BB72])+[.AB$29]*[.$Z$5]*MAGNET([.AB$24]+[.$BB72])+[.AC$29]*[.$Z$5]*MAGNET([.AC$24]+[.$BB72])+[.AD$29]*[.$Z$5]*MAGNET([.AD$24]+[.$BB72])+[.AE$29]*[.$Z$5]*MAGNET([.AE$24]+[.$BB72])+[.AF$29]*[.$Z$5]*MAGNET([.AF$24]+[.$BB72])+[.AG$29]*[.$Z$5]*MAGNET([.AG$24]+[.$BB72])+[.D$29]*[.$Z$5]*MAGNET([.D$24]+[.$BB72])+[.AH$29]*[.$Z$5]*MAGNET([.AH$24]+[.BB72]) +[.AI$29]*[.$Z$5]*MAGNET([.AI$24]+[.BB72]) +[.AJ$29]*[.$Z$5]*MAGNET([.AJ$24]+[.BB72]) +[.AK$29]*[.$Z$5]*MAGNET([.AK$24]+[.BB72]) +[.AL$29]*[.$Z$5]*MAGNET([.AL$24]+[.BB72]) +[.AM$29]*[.$Z$5]*MAGNET([.AM$24]+[.BB72]) +[.AN$29]*[.$Z$5]*MAGNET([.AN$24]+[.BB72]) +[.AO$29]*[.$Z$5]*MAGNET([.AO$24]+[.BB72]) +[.AP$29]*[.$Z$5]*MAGNET([.AP$24]+[.$BB72])&#10;+[.AQ$29]*[.$Z$5]*MAGNET([.AQ$24]+[.$BB72])&#10;+[.AR$29]*[.$Z$5]*MAGNET([.AR$24]+[.$BB72])&#10;+[.AS$29]*[.$Z$5]*MAGNET([.AS$24]+[.$BB72])&#10;+[.AT$29]*[.$Z$5]*MAGNET([.AT$24]+[.$BB72])&#10;+[.AU$29]*[.$Z$5]*MAGNET([.AU$24]+[.$BB72])&#10;+[.AV$29]*[.$Z$5]*MAGNET([.AV$24]+[.$BB72])&#10;+[.AW$29]*[.$Z$5]*MAGNET([.AW$24]+[.$BB72])&#10;+[.AX$29]*[.$Z$5]*MAGNET([.AX$24]+[.$BB72])&#10;+[.AY$29]*[.$Z$5]*MAGNET([.AY$24]+[.$BB72]) +RAND()*[.$BG$13]" office:value-type="float" office:value="2.79682417424334" calcext:value-type="float">
            <text:p>2.79682417424334</text:p>
          </table:table-cell>
          <table:table-cell table:style-name="ce71" table:formula="of:=[.E$30]*[.$Z$5]*MAGNET([.E$24]+[.$BB72])+[.F$30]*[.$Z$5]*MAGNET([.F$24]+[.$BB72])+[.G$30]*[.$Z$5]*MAGNET([.G$24]+[.$BB72])+[.H$30]*[.$Z$5]*MAGNET([.H$24]+[.$BB72])+[.I$30]*[.$Z$5]*MAGNET([.I$24]+[.$BB72])+[.J$30]*[.$Z$5]*MAGNET([.J$24]+[.$BB72])+[.K$30]*[.$Z$5]*MAGNET([.K$24]+[.$BB72])+[.L$30]*[.$Z$5]*MAGNET([.L$24]+[.$BB72])+[.M$30]*[.$Z$5]*MAGNET([.M$24]+[.$BB72])+[.N$30]*[.$Z$5]*MAGNET([.N$24]+[.$BB72])+[.O$30]*[.$Z$5]*MAGNET([.O$24]+[.$BB72])+[.P$30]*[.$Z$5]*MAGNET([.P$24]+[.$BB72])+[.Q$30]*[.$Z$5]*MAGNET([.Q$24]+[.$BB72])+[.R$30]*[.$Z$5]*MAGNET([.R$24]+[.$BB72])+[.S$30]*[.$Z$5]*MAGNET([.S$24]+[.$BB72])+[.T$30]*[.$Z$5]*MAGNET([.T$24]+[.$BB72])+[.U$30]*[.$Z$5]*MAGNET([.U$24]+[.$BB72])+[.V$30]*[.$Z$5]*MAGNET([.V$24]+[.$BB72])+[.W$30]*[.$Z$5]*MAGNET([.W$24]+[.$BB72])+[.X$30]*[.$Z$5]*MAGNET([.X$24]+[.$BB72])+[.Y$30]*[.$Z$5]*MAGNET([.Y$24]+[.$BB72])+[.Z$30]*[.$Z$5]*MAGNET([.Z$24]+[.$BB72])+[.AA$30]*[.$Z$5]*MAGNET([.AA$24]+[.$BB72])+[.AB$30]*[.$Z$5]*MAGNET([.AB$24]+[.$BB72])+[.AC$30]*[.$Z$5]*MAGNET([.AC$24]+[.$BB72])+[.AD$30]*[.$Z$5]*MAGNET([.AD$24]+[.$BB72])+[.AE$30]*[.$Z$5]*MAGNET([.AE$24]+[.$BB72])+[.AF$30]*[.$Z$5]*MAGNET([.AF$24]+[.$BB72])+[.AG$30]*[.$Z$5]*MAGNET([.AG$24]+[.$BB72])+[.D$30]*[.$Z$5]*MAGNET([.D$24]+[.$BB72])+[.AH$30]*[.$Z$5]*MAGNET([.AH$24]+[.BB72]) +[.AI$30]*[.$Z$5]*MAGNET([.AI$24]+[.BB72]) +[.AJ$30]*[.$Z$5]*MAGNET([.AJ$24]+[.BB72]) +[.AK$30]*[.$Z$5]*MAGNET([.AK$24]+[.BB72]) +[.AL$30]*[.$Z$5]*MAGNET([.AL$24]+[.BB72]) +[.AM$30]*[.$Z$5]*MAGNET([.AM$24]+[.BB72]) +[.AN$30]*[.$Z$5]*MAGNET([.AN$24]+[.BB72]) +[.AO$30]*[.$Z$5]*MAGNET([.AO$24]+[.BB72]) +[.AP$30]*[.$Z$5]*MAGNET([.AP$24]+[.$BB72])&#10;+[.AQ$30]*[.$Z$5]*MAGNET([.AQ$24]+[.$BB72])&#10;+[.AR$30]*[.$Z$5]*MAGNET([.AR$24]+[.$BB72])&#10;+[.AS$30]*[.$Z$5]*MAGNET([.AS$24]+[.$BB72])&#10;+[.AT$30]*[.$Z$5]*MAGNET([.AT$24]+[.$BB72])&#10;+[.AU$30]*[.$Z$5]*MAGNET([.AU$24]+[.$BB72])&#10;+[.AV$30]*[.$Z$5]*MAGNET([.AV$24]+[.$BB72])&#10;+[.AW$30]*[.$Z$5]*MAGNET([.AW$24]+[.$BB72])&#10;+[.AX$30]*[.$Z$5]*MAGNET([.AX$24]+[.$BB72])&#10;+[.AY$30]*[.$Z$5]*MAGNET([.AY$24]+[.$BB72]) +RAND()*[.$BH$13]" office:value-type="float" office:value="0" calcext:value-type="float">
            <text:p>0</text:p>
          </table:table-cell>
          <table:table-cell table:style-name="ce71" table:formula="of:=[.E$31]*[.$Z$5]*MAGNET([.E$24]+[.$BB72])+[.F$31]*[.$Z$5]*MAGNET([.F$24]+[.$BB72])+[.G$31]*[.$Z$5]*MAGNET([.G$24]+[.$BB72])+[.H$31]*[.$Z$5]*MAGNET([.H$24]+[.$BB72])+[.I$31]*[.$Z$5]*MAGNET([.I$24]+[.$BB72])+[.J$31]*[.$Z$5]*MAGNET([.J$24]+[.$BB72])+[.K$31]*[.$Z$5]*MAGNET([.K$24]+[.$BB72])+[.L$31]*[.$Z$5]*MAGNET([.L$24]+[.$BB72])+[.M$31]*[.$Z$5]*MAGNET([.M$24]+[.$BB72])+[.N$31]*[.$Z$5]*MAGNET([.N$24]+[.$BB72])+[.O$31]*[.$Z$5]*MAGNET([.O$24]+[.$BB72])+[.P$31]*[.$Z$5]*MAGNET([.P$24]+[.$BB72])+[.Q$31]*[.$Z$5]*MAGNET([.Q$24]+[.$BB72])+[.R$31]*[.$Z$5]*MAGNET([.R$24]+[.$BB72])+[.S$31]*[.$Z$5]*MAGNET([.S$24]+[.$BB72])+[.T$31]*[.$Z$5]*MAGNET([.T$24]+[.$BB72])+[.U$31]*[.$Z$5]*MAGNET([.U$24]+[.$BB72])+[.V$31]*[.$Z$5]*MAGNET([.V$24]+[.$BB72])+[.W$31]*[.$Z$5]*MAGNET([.W$24]+[.$BB72])+[.X$31]*[.$Z$5]*MAGNET([.X$24]+[.$BB72])+[.Y$31]*[.$Z$5]*MAGNET([.Y$24]+[.$BB72])+[.Z$31]*[.$Z$5]*MAGNET([.Z$24]+[.$BB72])+[.AA$31]*[.$Z$5]*MAGNET([.AA$24]+[.$BB72])+[.AB$31]*[.$Z$5]*MAGNET([.AB$24]+[.$BB72])+[.AC$31]*[.$Z$5]*MAGNET([.AC$24]+[.$BB72])+[.AD$31]*[.$Z$5]*MAGNET([.AD$24]+[.$BB72])+[.AE$31]*[.$Z$5]*MAGNET([.AE$24]+[.$BB72])+[.AF$31]*[.$Z$5]*MAGNET([.AF$24]+[.$BB72])+[.AG$31]*[.$Z$5]*MAGNET([.AG$24]+[.$BB72])+[.D$31]*[.$Z$5]*MAGNET([.D$24]+[.$BB72])+[.AH$31]*[.$Z$5]*MAGNET([.AH$24]+[.BB72]) +[.AI$31]*[.$Z$5]*MAGNET([.AI$24]+[.BB72]) +[.AJ$31]*[.$Z$5]*MAGNET([.AJ$24]+[.BB72]) +[.AK$31]*[.$Z$5]*MAGNET([.AK$24]+[.BB72]) +[.AL$31]*[.$Z$5]*MAGNET([.AL$24]+[.BB72]) +[.AM$31]*[.$Z$5]*MAGNET([.AM$24]+[.BB72]) +[.AN$31]*[.$Z$5]*MAGNET([.AN$24]+[.BB72]) +[.AO$31]*[.$Z$5]*MAGNET([.AO$24]+[.BB72]) +[.AP$31]*[.$Z$5]*MAGNET([.AP$24]+[.$BB72])&#10;+[.AQ$31]*[.$Z$5]*MAGNET([.AQ$24]+[.$BB72])&#10;+[.AR$31]*[.$Z$5]*MAGNET([.AR$24]+[.$BB72])&#10;+[.AS$31]*[.$Z$5]*MAGNET([.AS$24]+[.$BB72])&#10;+[.AT$31]*[.$Z$5]*MAGNET([.AT$24]+[.$BB72])&#10;+[.AU$31]*[.$Z$5]*MAGNET([.AU$24]+[.$BB72])&#10;+[.AV$31]*[.$Z$5]*MAGNET([.AV$24]+[.$BB72])&#10;+[.AW$31]*[.$Z$5]*MAGNET([.AW$24]+[.$BB72])&#10;+[.AX$31]*[.$Z$5]*MAGNET([.AX$24]+[.$BB72])&#10;+[.AY$31]*[.$Z$5]*MAGNET([.AY$24]+[.$BB72]) +RAND()*[.$BI$13]" office:value-type="float" office:value="0" calcext:value-type="float">
            <text:p>0</text:p>
          </table:table-cell>
          <table:table-cell table:style-name="ce71" table:formula="of:=[.E$32]*[.$Z$5]*MAGNET([.E$24]+[.$BB72])+[.F$32]*[.$Z$5]*MAGNET([.F$24]+[.$BB72])+[.G$32]*[.$Z$5]*MAGNET([.G$24]+[.$BB72])+[.H$32]*[.$Z$5]*MAGNET([.H$24]+[.$BB72])+[.I$32]*[.$Z$5]*MAGNET([.I$24]+[.$BB72])+[.J$32]*[.$Z$5]*MAGNET([.J$24]+[.$BB72])+[.K$32]*[.$Z$5]*MAGNET([.K$24]+[.$BB72])+[.L$32]*[.$Z$5]*MAGNET([.L$24]+[.$BB72])+[.M$32]*[.$Z$5]*MAGNET([.M$24]+[.$BB72])+[.N$32]*[.$Z$5]*MAGNET([.N$24]+[.$BB72])+[.O$32]*[.$Z$5]*MAGNET([.O$24]+[.$BB72])+[.P$32]*[.$Z$5]*MAGNET([.P$24]+[.$BB72])+[.Q$32]*[.$Z$5]*MAGNET([.Q$24]+[.$BB72])+[.R$32]*[.$Z$5]*MAGNET([.R$24]+[.$BB72])+[.S$32]*[.$Z$5]*MAGNET([.S$24]+[.$BB72])+[.T$32]*[.$Z$5]*MAGNET([.T$24]+[.$BB72])+[.U$32]*[.$Z$5]*MAGNET([.U$24]+[.$BB72])+[.V$32]*[.$Z$5]*MAGNET([.V$24]+[.$BB72])+[.W$32]*[.$Z$5]*MAGNET([.W$24]+[.$BB72])+[.X$32]*[.$Z$5]*MAGNET([.X$24]+[.$BB72])+[.Y$32]*[.$Z$5]*MAGNET([.Y$24]+[.$BB72])+[.Z$32]*[.$Z$5]*MAGNET([.Z$24]+[.$BB72])+[.AA$32]*[.$Z$5]*MAGNET([.AA$24]+[.$BB72])+[.AB$32]*[.$Z$5]*MAGNET([.AB$24]+[.$BB72])+[.AC$32]*[.$Z$5]*MAGNET([.AC$24]+[.$BB72])+[.AD$32]*[.$Z$5]*MAGNET([.AD$24]+[.$BB72])+[.AE$32]*[.$Z$5]*MAGNET([.AE$24]+[.$BB72])+[.AF$32]*[.$Z$5]*MAGNET([.AF$24]+[.$BB72])+[.AG$32]*[.$Z$5]*MAGNET([.AG$24]+[.$BB72])+[.D$32]*[.$Z$5]*MAGNET([.D$24]+[.$BB72])+[.AH$32]*[.$Z$5]*MAGNET([.AH$24]+[.BB72]) +[.AI$32]*[.$Z$5]*MAGNET([.AI$24]+[.BB72]) +[.AJ$32]*[.$Z$5]*MAGNET([.AJ$24]+[.BB72]) +[.AK$32]*[.$Z$5]*MAGNET([.AK$24]+[.BB72]) +[.AL$32]*[.$Z$5]*MAGNET([.AL$24]+[.BB72]) +[.AM$32]*[.$Z$5]*MAGNET([.AM$24]+[.BB72]) +[.AN$32]*[.$Z$5]*MAGNET([.AN$24]+[.BB72]) +[.AO$32]*[.$Z$5]*MAGNET([.AO$24]+[.BB72]) +[.AP$32]*[.$Z$5]*MAGNET([.AP$24]+[.$BB72])&#10;+[.AQ$32]*[.$Z$5]*MAGNET([.AQ$24]+[.$BB72])&#10;+[.AR$32]*[.$Z$5]*MAGNET([.AR$24]+[.$BB72])&#10;+[.AS$32]*[.$Z$5]*MAGNET([.AS$24]+[.$BB72])&#10;+[.AT$32]*[.$Z$5]*MAGNET([.AT$24]+[.$BB72])&#10;+[.AU$32]*[.$Z$5]*MAGNET([.AU$24]+[.$BB72])&#10;+[.AV$32]*[.$Z$5]*MAGNET([.AV$24]+[.$BB72])&#10;+[.AW$32]*[.$Z$5]*MAGNET([.AW$24]+[.$BB72])&#10;+[.AX$32]*[.$Z$5]*MAGNET([.AX$24]+[.$BB72])&#10;+[.AY$32]*[.$Z$5]*MAGNET([.AY$24]+[.$BB7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2]+0.002" office:value-type="float" office:value="0.116" calcext:value-type="float">
            <text:p>0.116</text:p>
          </table:table-cell>
          <table:table-cell table:formula="of:=[.BA73]*[.$D$6]" office:value-type="float" office:value="5.83079596506266" calcext:value-type="float">
            <text:p>5.831</text:p>
          </table:table-cell>
          <table:table-cell table:formula="of:=[.D$25]*[.$Z$5]*MAGNET([.D$24]+[.BB73])+[.E$25]*[.$Z$5]*MAGNET([.E$24]+[.BB73])+[.F$25]*[.$Z$5]*MAGNET([.F$24]+[.BB73])+[.G$25]*[.$Z$5]*MAGNET([.G$24]+[.BB73])+[.H$25]*[.$Z$5]*MAGNET([.H$24]+[.BB73])+[.I$25]*[.$Z$5]*MAGNET([.I$24]+[.BB73])+[.J$25]*[.$Z$5]*MAGNET([.J$24]+[.BB73])+[.K$25]*[.$Z$5]*MAGNET([.K$24]+[.BB73])+[.L$25]*[.$Z$5]*MAGNET([.L$24]+[.BB73])+[.M$25]*[.$Z$5]*MAGNET([.M$24]+[.BB73])+[.N$25]*[.$Z$5]*MAGNET([.N$24]+[.BB73])+[.O$25]*[.$Z$5]*MAGNET([.O$24]+[.BB73])+[.P$25]*[.$Z$5]*MAGNET([.P$24]+[.BB73])+[.Q$25]*[.$Z$5]*MAGNET([.Q$24]+[.BB73])+[.R$25]*[.$Z$5]*MAGNET([.R$24]+[.BB73])+[.S$25]*[.$Z$5]*MAGNET([.S$24]+[.BB73])+[.T$25]*[.$Z$5]*MAGNET([.T$24]+[.BB73])+[.U$25]*[.$Z$5]*MAGNET([.U$24]+[.BB73])+[.V$25]*[.$Z$5]*MAGNET([.V$24]+[.BB73])+[.W$25]*[.$Z$5]*MAGNET([.W$24]+[.BB73])+[.X$25]*[.$Z$5]*MAGNET([.X$24]+[.BB73])+[.Y$25]*[.$Z$5]*MAGNET([.Y$24]+[.BB73])+[.Z$25]*[.$Z$5]*MAGNET([.Z$24]+[.BB73])+[.AA$25]*[.$Z$5]*MAGNET([.AA$24]+[.BB73])+[.AB$25]*[.$Z$5]*MAGNET([.AB$24]+[.BB73])+[.AC$25]*[.$Z$5]*MAGNET([.AC$24]+[.BB73])+[.AD$25]*[.$Z$5]*MAGNET([.AD$24]+[.BB73])+[.AE$25]*[.$Z$5]*MAGNET([.AE$24]+[.BB73])+[.AF$25]*[.$Z$5]*MAGNET([.AF$24]+[.BB73])+[.AG$25]*[.$Z$5]*MAGNET([.AG$24]+[.BB73])+[.AH$25]*[.$Z$5]*MAGNET([.AH$24]+[.BB73]) +[.AI$25]*[.$Z$5]*MAGNET([.AI$24]+[.BB73]) +[.AJ$25]*[.$Z$5]*MAGNET([.AJ$24]+[.BB73]) +[.AK$25]*[.$Z$5]*MAGNET([.AK$24]+[.BB73]) +[.AL$25]*[.$Z$5]*MAGNET([.AL$24]+[.BB73]) +[.AM$25]*[.$Z$5]*MAGNET([.AM$24]+[.BB73]) +[.AN$25]*[.$Z$5]*MAGNET([.AN$24]+[.BB73]) +[.AO$25]*[.$Z$5]*MAGNET([.AO$24]+[.BB73])+RAND()*[.$BC$13]+[.AP$25]*[.$Z$5]*MAGNET([.AP$24]+[.BB73])&#10;+[.AQ$25]*[.$Z$5]*MAGNET([.AQ$24]+[.BB73])&#10;+[.AR$25]*[.$Z$5]*MAGNET([.AR$24]+[.BB73])&#10;+[.AS$25]*[.$Z$5]*MAGNET([.AS$24]+[.BB73])&#10;+[.AT$25]*[.$Z$5]*MAGNET([.AT$24]+[.BB73])&#10;+[.AU$25]*[.$Z$5]*MAGNET([.AU$24]+[.BB73])&#10;+[.AV$25]*[.$Z$5]*MAGNET([.AV$24]+[.BB73])&#10;+[.AW$25]*[.$Z$5]*MAGNET([.AW$24]+[.BB73])&#10;+[.AX$25]*[.$Z$5]*MAGNET([.AX$24]+[.BB73])&#10;+[.AY$25]*[.$Z$5]*MAGNET([.AY$24]+[.BB73])" office:value-type="float" office:value="-87.8316072797266" calcext:value-type="float">
            <text:p>-87.83</text:p>
          </table:table-cell>
          <table:table-cell table:style-name="ce70" table:formula="of:=[.E$26]*[.$Z$5]*MAGNET([.E$24]+[.$BB73])+[.F$26]*[.$Z$5]*MAGNET([.F$24]+[.$BB73])+[.G$26]*[.$Z$5]*MAGNET([.G$24]+[.$BB73])+[.H$26]*[.$Z$5]*MAGNET([.H$24]+[.$BB73])+[.I$26]*[.$Z$5]*MAGNET([.I$24]+[.$BB73])+[.J$26]*[.$Z$5]*MAGNET([.J$24]+[.$BB73])+[.K$26]*[.$Z$5]*MAGNET([.K$24]+[.$BB73])+[.L$26]*[.$Z$5]*MAGNET([.L$24]+[.$BB73])+[.M$26]*[.$Z$5]*MAGNET([.M$24]+[.$BB73])+[.N$26]*[.$Z$5]*MAGNET([.N$24]+[.$BB73])+[.O$26]*[.$Z$5]*MAGNET([.O$24]+[.$BB73])+[.P$26]*[.$Z$5]*MAGNET([.P$24]+[.$BB73])+[.Q$26]*[.$Z$5]*MAGNET([.Q$24]+[.$BB73])+[.R$26]*[.$Z$5]*MAGNET([.R$24]+[.$BB73])+[.S$26]*[.$Z$5]*MAGNET([.S$24]+[.$BB73])+[.T$26]*[.$Z$5]*MAGNET([.T$24]+[.$BB73])+[.U$26]*[.$Z$5]*MAGNET([.U$24]+[.$BB73])+[.V$26]*[.$Z$5]*MAGNET([.V$24]+[.$BB73])+[.W$26]*[.$Z$5]*MAGNET([.W$24]+[.$BB73])+[.X$26]*[.$Z$5]*MAGNET([.X$24]+[.$BB73])+[.Y$26]*[.$Z$5]*MAGNET([.Y$24]+[.$BB73])+[.Z$26]*[.$Z$5]*MAGNET([.Z$24]+[.$BB73])+[.AA$26]*[.$Z$5]*MAGNET([.AA$24]+[.$BB73])+[.AB$26]*[.$Z$5]*MAGNET([.AB$24]+[.$BB73])+[.AC$26]*[.$Z$5]*MAGNET([.AC$24]+[.$BB73])+[.AD$26]*[.$Z$5]*MAGNET([.AD$24]+[.$BB73])+[.AE$26]*[.$Z$5]*MAGNET([.AE$24]+[.$BB73])+[.AF$26]*[.$Z$5]*MAGNET([.AF$24]+[.$BB73])+[.AG$26]*[.$Z$5]*MAGNET([.AG$24]+[.$BB73])+[.D$26]*[.$Z$5]*MAGNET([.D$24]+[.$BB73])+[.AH$26]*[.$Z$5]*MAGNET([.AH$24]+[.BB73]) +[.AI$26]*[.$Z$5]*MAGNET([.AI$24]+[.BB73]) +[.AJ$26]*[.$Z$5]*MAGNET([.AJ$24]+[.BB73]) +[.AK$26]*[.$Z$5]*MAGNET([.AK$24]+[.BB73]) +[.AL$26]*[.$Z$5]*MAGNET([.AL$24]+[.BB73]) +[.AM$26]*[.$Z$5]*MAGNET([.AM$24]+[.BB73]) +[.AN$26]*[.$Z$5]*MAGNET([.AN$24]+[.BB73]) +[.AO$26]*[.$Z$5]*MAGNET([.AO$24]+[.BB73]) +[.AP$26]*[.$Z$5]*MAGNET([.AP$24]+[.$BB73])&#10;+[.AQ$26]*[.$Z$5]*MAGNET([.AQ$24]+[.$BB73])&#10;+[.AR$26]*[.$Z$5]*MAGNET([.AR$24]+[.$BB73])&#10;+[.AS$26]*[.$Z$5]*MAGNET([.AS$24]+[.$BB73])&#10;+[.AT$26]*[.$Z$5]*MAGNET([.AT$24]+[.$BB73])&#10;+[.AU$26]*[.$Z$5]*MAGNET([.AU$24]+[.$BB73])&#10;+[.AV$26]*[.$Z$5]*MAGNET([.AV$24]+[.$BB73])&#10;+[.AW$26]*[.$Z$5]*MAGNET([.AW$24]+[.$BB73])&#10;+[.AX$26]*[.$Z$5]*MAGNET([.AX$24]+[.$BB73])&#10;+[.AY$26]*[.$Z$5]*MAGNET([.AY$24]+[.$BB73]) +RAND()*[.$BD$13]" office:value-type="float" office:value="88.9880199149756" calcext:value-type="float">
            <text:p>88.99</text:p>
          </table:table-cell>
          <table:table-cell table:style-name="ce71" table:formula="of:=[.E$27]*[.$Z$5]*MAGNET([.E$24]+[.$BB73])+[.F$27]*[.$Z$5]*MAGNET([.F$24]+[.$BB73])+[.G$27]*[.$Z$5]*MAGNET([.G$24]+[.$BB73])+[.H$27]*[.$Z$5]*MAGNET([.H$24]+[.$BB73])+[.I$27]*[.$Z$5]*MAGNET([.I$24]+[.$BB73])+[.J$27]*[.$Z$5]*MAGNET([.J$24]+[.$BB73])+[.K$27]*[.$Z$5]*MAGNET([.K$24]+[.$BB73])+[.L$27]*[.$Z$5]*MAGNET([.L$24]+[.$BB73])+[.M$27]*[.$Z$5]*MAGNET([.M$24]+[.$BB73])+[.N$27]*[.$Z$5]*MAGNET([.N$24]+[.$BB73])+[.O$27]*[.$Z$5]*MAGNET([.O$24]+[.$BB73])+[.P$27]*[.$Z$5]*MAGNET([.P$24]+[.$BB73])+[.Q$27]*[.$Z$5]*MAGNET([.Q$24]+[.$BB73])+[.R$27]*[.$Z$5]*MAGNET([.R$24]+[.$BB73])+[.S$27]*[.$Z$5]*MAGNET([.S$24]+[.$BB73])+[.T$27]*[.$Z$5]*MAGNET([.T$24]+[.$BB73])+[.U$27]*[.$Z$5]*MAGNET([.U$24]+[.$BB73])+[.V$27]*[.$Z$5]*MAGNET([.V$24]+[.$BB73])+[.W$27]*[.$Z$5]*MAGNET([.W$24]+[.$BB73])+[.X$27]*[.$Z$5]*MAGNET([.X$24]+[.$BB73])+[.Y$27]*[.$Z$5]*MAGNET([.Y$24]+[.$BB73])+[.Z$27]*[.$Z$5]*MAGNET([.Z$24]+[.$BB73])+[.AA$27]*[.$Z$5]*MAGNET([.AA$24]+[.$BB73])+[.AB$27]*[.$Z$5]*MAGNET([.AB$24]+[.$BB73])+[.AC$27]*[.$Z$5]*MAGNET([.AC$24]+[.$BB73])+[.AD$27]*[.$Z$5]*MAGNET([.AD$24]+[.$BB73])+[.AE$27]*[.$Z$5]*MAGNET([.AE$24]+[.$BB73])+[.AF$27]*[.$Z$5]*MAGNET([.AF$24]+[.$BB73])+[.AG$27]*[.$Z$5]*MAGNET([.AG$24]+[.$BB73])+[.D$27]*[.$Z$5]*MAGNET([.D$24]+[.$BB73])+[.AH$27]*[.$Z$5]*MAGNET([.AH$24]+[.BB73]) +[.AI$27]*[.$Z$5]*MAGNET([.AI$24]+[.BB73]) +[.AJ$27]*[.$Z$5]*MAGNET([.AJ$24]+[.BB73]) +[.AK$27]*[.$Z$5]*MAGNET([.AK$24]+[.BB73]) +[.AL$27]*[.$Z$5]*MAGNET([.AL$24]+[.BB73]) +[.AM$27]*[.$Z$5]*MAGNET([.AM$24]+[.BB73]) +[.AN$27]*[.$Z$5]*MAGNET([.AN$24]+[.BB73]) +[.AO$27]*[.$Z$5]*MAGNET([.AO$24]+[.BB73]) +[.AP$27]*[.$Z$5]*MAGNET([.AP$24]+[.$BB73])&#10;+[.AQ$27]*[.$Z$5]*MAGNET([.AQ$24]+[.$BB73])&#10;+[.AR$27]*[.$Z$5]*MAGNET([.AR$24]+[.$BB73])&#10;+[.AS$27]*[.$Z$5]*MAGNET([.AS$24]+[.$BB73])&#10;+[.AT$27]*[.$Z$5]*MAGNET([.AT$24]+[.$BB73])&#10;+[.AU$27]*[.$Z$5]*MAGNET([.AU$24]+[.$BB73])&#10;+[.AV$27]*[.$Z$5]*MAGNET([.AV$24]+[.$BB73])&#10;+[.AW$27]*[.$Z$5]*MAGNET([.AW$24]+[.$BB73])&#10;+[.AX$27]*[.$Z$5]*MAGNET([.AX$24]+[.$BB73])&#10;+[.AY$27]*[.$Z$5]*MAGNET([.AY$24]+[.$BB73]) +RAND()*[.$BE$13]" office:value-type="float" office:value="-7.20284465394785" calcext:value-type="float">
            <text:p>-7.20284465394785</text:p>
          </table:table-cell>
          <table:table-cell table:style-name="ce71" table:formula="of:=[.E$28]*[.$Z$5]*MAGNET([.E$24]+[.$BB73])+[.F$28]*[.$Z$5]*MAGNET([.F$24]+[.$BB73])+[.G$28]*[.$Z$5]*MAGNET([.G$24]+[.$BB73])+[.H$28]*[.$Z$5]*MAGNET([.H$24]+[.$BB73])+[.I$28]*[.$Z$5]*MAGNET([.I$24]+[.$BB73])+[.J$28]*[.$Z$5]*MAGNET([.J$24]+[.$BB73])+[.K$28]*[.$Z$5]*MAGNET([.K$24]+[.$BB73])+[.L$28]*[.$Z$5]*MAGNET([.L$24]+[.$BB73])+[.M$28]*[.$Z$5]*MAGNET([.M$24]+[.$BB73])+[.N$28]*[.$Z$5]*MAGNET([.N$24]+[.$BB73])+[.O$28]*[.$Z$5]*MAGNET([.O$24]+[.$BB73])+[.P$28]*[.$Z$5]*MAGNET([.P$24]+[.$BB73])+[.Q$28]*[.$Z$5]*MAGNET([.Q$24]+[.$BB73])+[.R$28]*[.$Z$5]*MAGNET([.R$24]+[.$BB73])+[.S$28]*[.$Z$5]*MAGNET([.S$24]+[.$BB73])+[.T$28]*[.$Z$5]*MAGNET([.T$24]+[.$BB73])+[.U$28]*[.$Z$5]*MAGNET([.U$24]+[.$BB73])+[.V$28]*[.$Z$5]*MAGNET([.V$24]+[.$BB73])+[.W$28]*[.$Z$5]*MAGNET([.W$24]+[.$BB73])+[.X$28]*[.$Z$5]*MAGNET([.X$24]+[.$BB73])+[.Y$28]*[.$Z$5]*MAGNET([.Y$24]+[.$BB73])+[.Z$28]*[.$Z$5]*MAGNET([.Z$24]+[.$BB73])+[.AA$28]*[.$Z$5]*MAGNET([.AA$24]+[.$BB73])+[.AB$28]*[.$Z$5]*MAGNET([.AB$24]+[.$BB73])+[.AC$28]*[.$Z$5]*MAGNET([.AC$24]+[.$BB73])+[.AD$28]*[.$Z$5]*MAGNET([.AD$24]+[.$BB73])+[.AE$28]*[.$Z$5]*MAGNET([.AE$24]+[.$BB73])+[.AF$28]*[.$Z$5]*MAGNET([.AF$24]+[.$BB73])+[.AG$28]*[.$Z$5]*MAGNET([.AG$24]+[.$BB73])+[.D$28]*[.$Z$5]*MAGNET([.D$24]+[.$BB73])+[.AH$28]*[.$Z$5]*MAGNET([.AH$24]+[.BB73]) +[.AI$28]*[.$Z$5]*MAGNET([.AI$24]+[.BB73]) +[.AJ$28]*[.$Z$5]*MAGNET([.AJ$24]+[.BB73]) +[.AK$28]*[.$Z$5]*MAGNET([.AK$24]+[.BB73]) +[.AL$28]*[.$Z$5]*MAGNET([.AL$24]+[.BB73]) +[.AM$28]*[.$Z$5]*MAGNET([.AM$24]+[.BB73]) +[.AN$28]*[.$Z$5]*MAGNET([.AN$24]+[.BB73]) +[.AO$28]*[.$Z$5]*MAGNET([.AO$24]+[.BB73]) +[.AP$28]*[.$Z$5]*MAGNET([.AP$24]+[.$BB73])&#10;+[.AQ$28]*[.$Z$5]*MAGNET([.AQ$24]+[.$BB73])&#10;+[.AR$28]*[.$Z$5]*MAGNET([.AR$24]+[.$BB73])&#10;+[.AS$28]*[.$Z$5]*MAGNET([.AS$24]+[.$BB73])&#10;+[.AT$28]*[.$Z$5]*MAGNET([.AT$24]+[.$BB73])&#10;+[.AU$28]*[.$Z$5]*MAGNET([.AU$24]+[.$BB73])&#10;+[.AV$28]*[.$Z$5]*MAGNET([.AV$24]+[.$BB73])&#10;+[.AW$28]*[.$Z$5]*MAGNET([.AW$24]+[.$BB73])&#10;+[.AX$28]*[.$Z$5]*MAGNET([.AX$24]+[.$BB73])&#10;+[.AY$28]*[.$Z$5]*MAGNET([.AY$24]+[.$BB73]) +RAND()*[.$BF$13]" office:value-type="float" office:value="-0.675708203340292" calcext:value-type="float">
            <text:p>-0.675708203340292</text:p>
          </table:table-cell>
          <table:table-cell table:style-name="ce71" table:formula="of:=[.E$29]*[.$Z$5]*MAGNET([.E$24]+[.$BB73])+[.F$29]*[.$Z$5]*MAGNET([.F$24]+[.$BB73])+[.G$29]*[.$Z$5]*MAGNET([.G$24]+[.$BB73])+[.H$29]*[.$Z$5]*MAGNET([.H$24]+[.$BB73])+[.I$29]*[.$Z$5]*MAGNET([.I$24]+[.$BB73])+[.J$29]*[.$Z$5]*MAGNET([.J$24]+[.$BB73])+[.K$29]*[.$Z$5]*MAGNET([.K$24]+[.$BB73])+[.L$29]*[.$Z$5]*MAGNET([.L$24]+[.$BB73])+[.M$29]*[.$Z$5]*MAGNET([.M$24]+[.$BB73])+[.N$29]*[.$Z$5]*MAGNET([.N$24]+[.$BB73])+[.O$29]*[.$Z$5]*MAGNET([.O$24]+[.$BB73])+[.P$29]*[.$Z$5]*MAGNET([.P$24]+[.$BB73])+[.Q$29]*[.$Z$5]*MAGNET([.Q$24]+[.$BB73])+[.R$29]*[.$Z$5]*MAGNET([.R$24]+[.$BB73])+[.S$29]*[.$Z$5]*MAGNET([.S$24]+[.$BB73])+[.T$29]*[.$Z$5]*MAGNET([.T$24]+[.$BB73])+[.U$29]*[.$Z$5]*MAGNET([.U$24]+[.$BB73])+[.V$29]*[.$Z$5]*MAGNET([.V$24]+[.$BB73])+[.W$29]*[.$Z$5]*MAGNET([.W$24]+[.$BB73])+[.X$29]*[.$Z$5]*MAGNET([.X$24]+[.$BB73])+[.Y$29]*[.$Z$5]*MAGNET([.Y$24]+[.$BB73])+[.Z$29]*[.$Z$5]*MAGNET([.Z$24]+[.$BB73])+[.AA$29]*[.$Z$5]*MAGNET([.AA$24]+[.$BB73])+[.AB$29]*[.$Z$5]*MAGNET([.AB$24]+[.$BB73])+[.AC$29]*[.$Z$5]*MAGNET([.AC$24]+[.$BB73])+[.AD$29]*[.$Z$5]*MAGNET([.AD$24]+[.$BB73])+[.AE$29]*[.$Z$5]*MAGNET([.AE$24]+[.$BB73])+[.AF$29]*[.$Z$5]*MAGNET([.AF$24]+[.$BB73])+[.AG$29]*[.$Z$5]*MAGNET([.AG$24]+[.$BB73])+[.D$29]*[.$Z$5]*MAGNET([.D$24]+[.$BB73])+[.AH$29]*[.$Z$5]*MAGNET([.AH$24]+[.BB73]) +[.AI$29]*[.$Z$5]*MAGNET([.AI$24]+[.BB73]) +[.AJ$29]*[.$Z$5]*MAGNET([.AJ$24]+[.BB73]) +[.AK$29]*[.$Z$5]*MAGNET([.AK$24]+[.BB73]) +[.AL$29]*[.$Z$5]*MAGNET([.AL$24]+[.BB73]) +[.AM$29]*[.$Z$5]*MAGNET([.AM$24]+[.BB73]) +[.AN$29]*[.$Z$5]*MAGNET([.AN$24]+[.BB73]) +[.AO$29]*[.$Z$5]*MAGNET([.AO$24]+[.BB73]) +[.AP$29]*[.$Z$5]*MAGNET([.AP$24]+[.$BB73])&#10;+[.AQ$29]*[.$Z$5]*MAGNET([.AQ$24]+[.$BB73])&#10;+[.AR$29]*[.$Z$5]*MAGNET([.AR$24]+[.$BB73])&#10;+[.AS$29]*[.$Z$5]*MAGNET([.AS$24]+[.$BB73])&#10;+[.AT$29]*[.$Z$5]*MAGNET([.AT$24]+[.$BB73])&#10;+[.AU$29]*[.$Z$5]*MAGNET([.AU$24]+[.$BB73])&#10;+[.AV$29]*[.$Z$5]*MAGNET([.AV$24]+[.$BB73])&#10;+[.AW$29]*[.$Z$5]*MAGNET([.AW$24]+[.$BB73])&#10;+[.AX$29]*[.$Z$5]*MAGNET([.AX$24]+[.$BB73])&#10;+[.AY$29]*[.$Z$5]*MAGNET([.AY$24]+[.$BB73]) +RAND()*[.$BG$13]" office:value-type="float" office:value="7.58656964502237" calcext:value-type="float">
            <text:p>7.58656964502237</text:p>
          </table:table-cell>
          <table:table-cell table:style-name="ce71" table:formula="of:=[.E$30]*[.$Z$5]*MAGNET([.E$24]+[.$BB73])+[.F$30]*[.$Z$5]*MAGNET([.F$24]+[.$BB73])+[.G$30]*[.$Z$5]*MAGNET([.G$24]+[.$BB73])+[.H$30]*[.$Z$5]*MAGNET([.H$24]+[.$BB73])+[.I$30]*[.$Z$5]*MAGNET([.I$24]+[.$BB73])+[.J$30]*[.$Z$5]*MAGNET([.J$24]+[.$BB73])+[.K$30]*[.$Z$5]*MAGNET([.K$24]+[.$BB73])+[.L$30]*[.$Z$5]*MAGNET([.L$24]+[.$BB73])+[.M$30]*[.$Z$5]*MAGNET([.M$24]+[.$BB73])+[.N$30]*[.$Z$5]*MAGNET([.N$24]+[.$BB73])+[.O$30]*[.$Z$5]*MAGNET([.O$24]+[.$BB73])+[.P$30]*[.$Z$5]*MAGNET([.P$24]+[.$BB73])+[.Q$30]*[.$Z$5]*MAGNET([.Q$24]+[.$BB73])+[.R$30]*[.$Z$5]*MAGNET([.R$24]+[.$BB73])+[.S$30]*[.$Z$5]*MAGNET([.S$24]+[.$BB73])+[.T$30]*[.$Z$5]*MAGNET([.T$24]+[.$BB73])+[.U$30]*[.$Z$5]*MAGNET([.U$24]+[.$BB73])+[.V$30]*[.$Z$5]*MAGNET([.V$24]+[.$BB73])+[.W$30]*[.$Z$5]*MAGNET([.W$24]+[.$BB73])+[.X$30]*[.$Z$5]*MAGNET([.X$24]+[.$BB73])+[.Y$30]*[.$Z$5]*MAGNET([.Y$24]+[.$BB73])+[.Z$30]*[.$Z$5]*MAGNET([.Z$24]+[.$BB73])+[.AA$30]*[.$Z$5]*MAGNET([.AA$24]+[.$BB73])+[.AB$30]*[.$Z$5]*MAGNET([.AB$24]+[.$BB73])+[.AC$30]*[.$Z$5]*MAGNET([.AC$24]+[.$BB73])+[.AD$30]*[.$Z$5]*MAGNET([.AD$24]+[.$BB73])+[.AE$30]*[.$Z$5]*MAGNET([.AE$24]+[.$BB73])+[.AF$30]*[.$Z$5]*MAGNET([.AF$24]+[.$BB73])+[.AG$30]*[.$Z$5]*MAGNET([.AG$24]+[.$BB73])+[.D$30]*[.$Z$5]*MAGNET([.D$24]+[.$BB73])+[.AH$30]*[.$Z$5]*MAGNET([.AH$24]+[.BB73]) +[.AI$30]*[.$Z$5]*MAGNET([.AI$24]+[.BB73]) +[.AJ$30]*[.$Z$5]*MAGNET([.AJ$24]+[.BB73]) +[.AK$30]*[.$Z$5]*MAGNET([.AK$24]+[.BB73]) +[.AL$30]*[.$Z$5]*MAGNET([.AL$24]+[.BB73]) +[.AM$30]*[.$Z$5]*MAGNET([.AM$24]+[.BB73]) +[.AN$30]*[.$Z$5]*MAGNET([.AN$24]+[.BB73]) +[.AO$30]*[.$Z$5]*MAGNET([.AO$24]+[.BB73]) +[.AP$30]*[.$Z$5]*MAGNET([.AP$24]+[.$BB73])&#10;+[.AQ$30]*[.$Z$5]*MAGNET([.AQ$24]+[.$BB73])&#10;+[.AR$30]*[.$Z$5]*MAGNET([.AR$24]+[.$BB73])&#10;+[.AS$30]*[.$Z$5]*MAGNET([.AS$24]+[.$BB73])&#10;+[.AT$30]*[.$Z$5]*MAGNET([.AT$24]+[.$BB73])&#10;+[.AU$30]*[.$Z$5]*MAGNET([.AU$24]+[.$BB73])&#10;+[.AV$30]*[.$Z$5]*MAGNET([.AV$24]+[.$BB73])&#10;+[.AW$30]*[.$Z$5]*MAGNET([.AW$24]+[.$BB73])&#10;+[.AX$30]*[.$Z$5]*MAGNET([.AX$24]+[.$BB73])&#10;+[.AY$30]*[.$Z$5]*MAGNET([.AY$24]+[.$BB73]) +RAND()*[.$BH$13]" office:value-type="float" office:value="0" calcext:value-type="float">
            <text:p>0</text:p>
          </table:table-cell>
          <table:table-cell table:style-name="ce71" table:formula="of:=[.E$31]*[.$Z$5]*MAGNET([.E$24]+[.$BB73])+[.F$31]*[.$Z$5]*MAGNET([.F$24]+[.$BB73])+[.G$31]*[.$Z$5]*MAGNET([.G$24]+[.$BB73])+[.H$31]*[.$Z$5]*MAGNET([.H$24]+[.$BB73])+[.I$31]*[.$Z$5]*MAGNET([.I$24]+[.$BB73])+[.J$31]*[.$Z$5]*MAGNET([.J$24]+[.$BB73])+[.K$31]*[.$Z$5]*MAGNET([.K$24]+[.$BB73])+[.L$31]*[.$Z$5]*MAGNET([.L$24]+[.$BB73])+[.M$31]*[.$Z$5]*MAGNET([.M$24]+[.$BB73])+[.N$31]*[.$Z$5]*MAGNET([.N$24]+[.$BB73])+[.O$31]*[.$Z$5]*MAGNET([.O$24]+[.$BB73])+[.P$31]*[.$Z$5]*MAGNET([.P$24]+[.$BB73])+[.Q$31]*[.$Z$5]*MAGNET([.Q$24]+[.$BB73])+[.R$31]*[.$Z$5]*MAGNET([.R$24]+[.$BB73])+[.S$31]*[.$Z$5]*MAGNET([.S$24]+[.$BB73])+[.T$31]*[.$Z$5]*MAGNET([.T$24]+[.$BB73])+[.U$31]*[.$Z$5]*MAGNET([.U$24]+[.$BB73])+[.V$31]*[.$Z$5]*MAGNET([.V$24]+[.$BB73])+[.W$31]*[.$Z$5]*MAGNET([.W$24]+[.$BB73])+[.X$31]*[.$Z$5]*MAGNET([.X$24]+[.$BB73])+[.Y$31]*[.$Z$5]*MAGNET([.Y$24]+[.$BB73])+[.Z$31]*[.$Z$5]*MAGNET([.Z$24]+[.$BB73])+[.AA$31]*[.$Z$5]*MAGNET([.AA$24]+[.$BB73])+[.AB$31]*[.$Z$5]*MAGNET([.AB$24]+[.$BB73])+[.AC$31]*[.$Z$5]*MAGNET([.AC$24]+[.$BB73])+[.AD$31]*[.$Z$5]*MAGNET([.AD$24]+[.$BB73])+[.AE$31]*[.$Z$5]*MAGNET([.AE$24]+[.$BB73])+[.AF$31]*[.$Z$5]*MAGNET([.AF$24]+[.$BB73])+[.AG$31]*[.$Z$5]*MAGNET([.AG$24]+[.$BB73])+[.D$31]*[.$Z$5]*MAGNET([.D$24]+[.$BB73])+[.AH$31]*[.$Z$5]*MAGNET([.AH$24]+[.BB73]) +[.AI$31]*[.$Z$5]*MAGNET([.AI$24]+[.BB73]) +[.AJ$31]*[.$Z$5]*MAGNET([.AJ$24]+[.BB73]) +[.AK$31]*[.$Z$5]*MAGNET([.AK$24]+[.BB73]) +[.AL$31]*[.$Z$5]*MAGNET([.AL$24]+[.BB73]) +[.AM$31]*[.$Z$5]*MAGNET([.AM$24]+[.BB73]) +[.AN$31]*[.$Z$5]*MAGNET([.AN$24]+[.BB73]) +[.AO$31]*[.$Z$5]*MAGNET([.AO$24]+[.BB73]) +[.AP$31]*[.$Z$5]*MAGNET([.AP$24]+[.$BB73])&#10;+[.AQ$31]*[.$Z$5]*MAGNET([.AQ$24]+[.$BB73])&#10;+[.AR$31]*[.$Z$5]*MAGNET([.AR$24]+[.$BB73])&#10;+[.AS$31]*[.$Z$5]*MAGNET([.AS$24]+[.$BB73])&#10;+[.AT$31]*[.$Z$5]*MAGNET([.AT$24]+[.$BB73])&#10;+[.AU$31]*[.$Z$5]*MAGNET([.AU$24]+[.$BB73])&#10;+[.AV$31]*[.$Z$5]*MAGNET([.AV$24]+[.$BB73])&#10;+[.AW$31]*[.$Z$5]*MAGNET([.AW$24]+[.$BB73])&#10;+[.AX$31]*[.$Z$5]*MAGNET([.AX$24]+[.$BB73])&#10;+[.AY$31]*[.$Z$5]*MAGNET([.AY$24]+[.$BB73]) +RAND()*[.$BI$13]" office:value-type="float" office:value="0" calcext:value-type="float">
            <text:p>0</text:p>
          </table:table-cell>
          <table:table-cell table:style-name="ce71" table:formula="of:=[.E$32]*[.$Z$5]*MAGNET([.E$24]+[.$BB73])+[.F$32]*[.$Z$5]*MAGNET([.F$24]+[.$BB73])+[.G$32]*[.$Z$5]*MAGNET([.G$24]+[.$BB73])+[.H$32]*[.$Z$5]*MAGNET([.H$24]+[.$BB73])+[.I$32]*[.$Z$5]*MAGNET([.I$24]+[.$BB73])+[.J$32]*[.$Z$5]*MAGNET([.J$24]+[.$BB73])+[.K$32]*[.$Z$5]*MAGNET([.K$24]+[.$BB73])+[.L$32]*[.$Z$5]*MAGNET([.L$24]+[.$BB73])+[.M$32]*[.$Z$5]*MAGNET([.M$24]+[.$BB73])+[.N$32]*[.$Z$5]*MAGNET([.N$24]+[.$BB73])+[.O$32]*[.$Z$5]*MAGNET([.O$24]+[.$BB73])+[.P$32]*[.$Z$5]*MAGNET([.P$24]+[.$BB73])+[.Q$32]*[.$Z$5]*MAGNET([.Q$24]+[.$BB73])+[.R$32]*[.$Z$5]*MAGNET([.R$24]+[.$BB73])+[.S$32]*[.$Z$5]*MAGNET([.S$24]+[.$BB73])+[.T$32]*[.$Z$5]*MAGNET([.T$24]+[.$BB73])+[.U$32]*[.$Z$5]*MAGNET([.U$24]+[.$BB73])+[.V$32]*[.$Z$5]*MAGNET([.V$24]+[.$BB73])+[.W$32]*[.$Z$5]*MAGNET([.W$24]+[.$BB73])+[.X$32]*[.$Z$5]*MAGNET([.X$24]+[.$BB73])+[.Y$32]*[.$Z$5]*MAGNET([.Y$24]+[.$BB73])+[.Z$32]*[.$Z$5]*MAGNET([.Z$24]+[.$BB73])+[.AA$32]*[.$Z$5]*MAGNET([.AA$24]+[.$BB73])+[.AB$32]*[.$Z$5]*MAGNET([.AB$24]+[.$BB73])+[.AC$32]*[.$Z$5]*MAGNET([.AC$24]+[.$BB73])+[.AD$32]*[.$Z$5]*MAGNET([.AD$24]+[.$BB73])+[.AE$32]*[.$Z$5]*MAGNET([.AE$24]+[.$BB73])+[.AF$32]*[.$Z$5]*MAGNET([.AF$24]+[.$BB73])+[.AG$32]*[.$Z$5]*MAGNET([.AG$24]+[.$BB73])+[.D$32]*[.$Z$5]*MAGNET([.D$24]+[.$BB73])+[.AH$32]*[.$Z$5]*MAGNET([.AH$24]+[.BB73]) +[.AI$32]*[.$Z$5]*MAGNET([.AI$24]+[.BB73]) +[.AJ$32]*[.$Z$5]*MAGNET([.AJ$24]+[.BB73]) +[.AK$32]*[.$Z$5]*MAGNET([.AK$24]+[.BB73]) +[.AL$32]*[.$Z$5]*MAGNET([.AL$24]+[.BB73]) +[.AM$32]*[.$Z$5]*MAGNET([.AM$24]+[.BB73]) +[.AN$32]*[.$Z$5]*MAGNET([.AN$24]+[.BB73]) +[.AO$32]*[.$Z$5]*MAGNET([.AO$24]+[.BB73]) +[.AP$32]*[.$Z$5]*MAGNET([.AP$24]+[.$BB73])&#10;+[.AQ$32]*[.$Z$5]*MAGNET([.AQ$24]+[.$BB73])&#10;+[.AR$32]*[.$Z$5]*MAGNET([.AR$24]+[.$BB73])&#10;+[.AS$32]*[.$Z$5]*MAGNET([.AS$24]+[.$BB73])&#10;+[.AT$32]*[.$Z$5]*MAGNET([.AT$24]+[.$BB73])&#10;+[.AU$32]*[.$Z$5]*MAGNET([.AU$24]+[.$BB73])&#10;+[.AV$32]*[.$Z$5]*MAGNET([.AV$24]+[.$BB73])&#10;+[.AW$32]*[.$Z$5]*MAGNET([.AW$24]+[.$BB73])&#10;+[.AX$32]*[.$Z$5]*MAGNET([.AX$24]+[.$BB73])&#10;+[.AY$32]*[.$Z$5]*MAGNET([.AY$24]+[.$BB7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3]+0.002" office:value-type="float" office:value="0.118" calcext:value-type="float">
            <text:p>0.118</text:p>
          </table:table-cell>
          <table:table-cell table:formula="of:=[.BA74]*[.$D$6]" office:value-type="float" office:value="5.93132692997753" calcext:value-type="float">
            <text:p>5.931</text:p>
          </table:table-cell>
          <table:table-cell table:formula="of:=[.D$25]*[.$Z$5]*MAGNET([.D$24]+[.BB74])+[.E$25]*[.$Z$5]*MAGNET([.E$24]+[.BB74])+[.F$25]*[.$Z$5]*MAGNET([.F$24]+[.BB74])+[.G$25]*[.$Z$5]*MAGNET([.G$24]+[.BB74])+[.H$25]*[.$Z$5]*MAGNET([.H$24]+[.BB74])+[.I$25]*[.$Z$5]*MAGNET([.I$24]+[.BB74])+[.J$25]*[.$Z$5]*MAGNET([.J$24]+[.BB74])+[.K$25]*[.$Z$5]*MAGNET([.K$24]+[.BB74])+[.L$25]*[.$Z$5]*MAGNET([.L$24]+[.BB74])+[.M$25]*[.$Z$5]*MAGNET([.M$24]+[.BB74])+[.N$25]*[.$Z$5]*MAGNET([.N$24]+[.BB74])+[.O$25]*[.$Z$5]*MAGNET([.O$24]+[.BB74])+[.P$25]*[.$Z$5]*MAGNET([.P$24]+[.BB74])+[.Q$25]*[.$Z$5]*MAGNET([.Q$24]+[.BB74])+[.R$25]*[.$Z$5]*MAGNET([.R$24]+[.BB74])+[.S$25]*[.$Z$5]*MAGNET([.S$24]+[.BB74])+[.T$25]*[.$Z$5]*MAGNET([.T$24]+[.BB74])+[.U$25]*[.$Z$5]*MAGNET([.U$24]+[.BB74])+[.V$25]*[.$Z$5]*MAGNET([.V$24]+[.BB74])+[.W$25]*[.$Z$5]*MAGNET([.W$24]+[.BB74])+[.X$25]*[.$Z$5]*MAGNET([.X$24]+[.BB74])+[.Y$25]*[.$Z$5]*MAGNET([.Y$24]+[.BB74])+[.Z$25]*[.$Z$5]*MAGNET([.Z$24]+[.BB74])+[.AA$25]*[.$Z$5]*MAGNET([.AA$24]+[.BB74])+[.AB$25]*[.$Z$5]*MAGNET([.AB$24]+[.BB74])+[.AC$25]*[.$Z$5]*MAGNET([.AC$24]+[.BB74])+[.AD$25]*[.$Z$5]*MAGNET([.AD$24]+[.BB74])+[.AE$25]*[.$Z$5]*MAGNET([.AE$24]+[.BB74])+[.AF$25]*[.$Z$5]*MAGNET([.AF$24]+[.BB74])+[.AG$25]*[.$Z$5]*MAGNET([.AG$24]+[.BB74])+[.AH$25]*[.$Z$5]*MAGNET([.AH$24]+[.BB74]) +[.AI$25]*[.$Z$5]*MAGNET([.AI$24]+[.BB74]) +[.AJ$25]*[.$Z$5]*MAGNET([.AJ$24]+[.BB74]) +[.AK$25]*[.$Z$5]*MAGNET([.AK$24]+[.BB74]) +[.AL$25]*[.$Z$5]*MAGNET([.AL$24]+[.BB74]) +[.AM$25]*[.$Z$5]*MAGNET([.AM$24]+[.BB74]) +[.AN$25]*[.$Z$5]*MAGNET([.AN$24]+[.BB74]) +[.AO$25]*[.$Z$5]*MAGNET([.AO$24]+[.BB74])+RAND()*[.$BC$13]+[.AP$25]*[.$Z$5]*MAGNET([.AP$24]+[.BB74])&#10;+[.AQ$25]*[.$Z$5]*MAGNET([.AQ$24]+[.BB74])&#10;+[.AR$25]*[.$Z$5]*MAGNET([.AR$24]+[.BB74])&#10;+[.AS$25]*[.$Z$5]*MAGNET([.AS$24]+[.BB74])&#10;+[.AT$25]*[.$Z$5]*MAGNET([.AT$24]+[.BB74])&#10;+[.AU$25]*[.$Z$5]*MAGNET([.AU$24]+[.BB74])&#10;+[.AV$25]*[.$Z$5]*MAGNET([.AV$24]+[.BB74])&#10;+[.AW$25]*[.$Z$5]*MAGNET([.AW$24]+[.BB74])&#10;+[.AX$25]*[.$Z$5]*MAGNET([.AX$24]+[.BB74])&#10;+[.AY$25]*[.$Z$5]*MAGNET([.AY$24]+[.BB74])" office:value-type="float" office:value="-77.6706070273911" calcext:value-type="float">
            <text:p>-77.67</text:p>
          </table:table-cell>
          <table:table-cell table:style-name="ce70" table:formula="of:=[.E$26]*[.$Z$5]*MAGNET([.E$24]+[.$BB74])+[.F$26]*[.$Z$5]*MAGNET([.F$24]+[.$BB74])+[.G$26]*[.$Z$5]*MAGNET([.G$24]+[.$BB74])+[.H$26]*[.$Z$5]*MAGNET([.H$24]+[.$BB74])+[.I$26]*[.$Z$5]*MAGNET([.I$24]+[.$BB74])+[.J$26]*[.$Z$5]*MAGNET([.J$24]+[.$BB74])+[.K$26]*[.$Z$5]*MAGNET([.K$24]+[.$BB74])+[.L$26]*[.$Z$5]*MAGNET([.L$24]+[.$BB74])+[.M$26]*[.$Z$5]*MAGNET([.M$24]+[.$BB74])+[.N$26]*[.$Z$5]*MAGNET([.N$24]+[.$BB74])+[.O$26]*[.$Z$5]*MAGNET([.O$24]+[.$BB74])+[.P$26]*[.$Z$5]*MAGNET([.P$24]+[.$BB74])+[.Q$26]*[.$Z$5]*MAGNET([.Q$24]+[.$BB74])+[.R$26]*[.$Z$5]*MAGNET([.R$24]+[.$BB74])+[.S$26]*[.$Z$5]*MAGNET([.S$24]+[.$BB74])+[.T$26]*[.$Z$5]*MAGNET([.T$24]+[.$BB74])+[.U$26]*[.$Z$5]*MAGNET([.U$24]+[.$BB74])+[.V$26]*[.$Z$5]*MAGNET([.V$24]+[.$BB74])+[.W$26]*[.$Z$5]*MAGNET([.W$24]+[.$BB74])+[.X$26]*[.$Z$5]*MAGNET([.X$24]+[.$BB74])+[.Y$26]*[.$Z$5]*MAGNET([.Y$24]+[.$BB74])+[.Z$26]*[.$Z$5]*MAGNET([.Z$24]+[.$BB74])+[.AA$26]*[.$Z$5]*MAGNET([.AA$24]+[.$BB74])+[.AB$26]*[.$Z$5]*MAGNET([.AB$24]+[.$BB74])+[.AC$26]*[.$Z$5]*MAGNET([.AC$24]+[.$BB74])+[.AD$26]*[.$Z$5]*MAGNET([.AD$24]+[.$BB74])+[.AE$26]*[.$Z$5]*MAGNET([.AE$24]+[.$BB74])+[.AF$26]*[.$Z$5]*MAGNET([.AF$24]+[.$BB74])+[.AG$26]*[.$Z$5]*MAGNET([.AG$24]+[.$BB74])+[.D$26]*[.$Z$5]*MAGNET([.D$24]+[.$BB74])+[.AH$26]*[.$Z$5]*MAGNET([.AH$24]+[.BB74]) +[.AI$26]*[.$Z$5]*MAGNET([.AI$24]+[.BB74]) +[.AJ$26]*[.$Z$5]*MAGNET([.AJ$24]+[.BB74]) +[.AK$26]*[.$Z$5]*MAGNET([.AK$24]+[.BB74]) +[.AL$26]*[.$Z$5]*MAGNET([.AL$24]+[.BB74]) +[.AM$26]*[.$Z$5]*MAGNET([.AM$24]+[.BB74]) +[.AN$26]*[.$Z$5]*MAGNET([.AN$24]+[.BB74]) +[.AO$26]*[.$Z$5]*MAGNET([.AO$24]+[.BB74]) +[.AP$26]*[.$Z$5]*MAGNET([.AP$24]+[.$BB74])&#10;+[.AQ$26]*[.$Z$5]*MAGNET([.AQ$24]+[.$BB74])&#10;+[.AR$26]*[.$Z$5]*MAGNET([.AR$24]+[.$BB74])&#10;+[.AS$26]*[.$Z$5]*MAGNET([.AS$24]+[.$BB74])&#10;+[.AT$26]*[.$Z$5]*MAGNET([.AT$24]+[.$BB74])&#10;+[.AU$26]*[.$Z$5]*MAGNET([.AU$24]+[.$BB74])&#10;+[.AV$26]*[.$Z$5]*MAGNET([.AV$24]+[.$BB74])&#10;+[.AW$26]*[.$Z$5]*MAGNET([.AW$24]+[.$BB74])&#10;+[.AX$26]*[.$Z$5]*MAGNET([.AX$24]+[.$BB74])&#10;+[.AY$26]*[.$Z$5]*MAGNET([.AY$24]+[.$BB74]) +RAND()*[.$BD$13]" office:value-type="float" office:value="88.6949108984775" calcext:value-type="float">
            <text:p>88.69</text:p>
          </table:table-cell>
          <table:table-cell table:style-name="ce71" table:formula="of:=[.E$27]*[.$Z$5]*MAGNET([.E$24]+[.$BB74])+[.F$27]*[.$Z$5]*MAGNET([.F$24]+[.$BB74])+[.G$27]*[.$Z$5]*MAGNET([.G$24]+[.$BB74])+[.H$27]*[.$Z$5]*MAGNET([.H$24]+[.$BB74])+[.I$27]*[.$Z$5]*MAGNET([.I$24]+[.$BB74])+[.J$27]*[.$Z$5]*MAGNET([.J$24]+[.$BB74])+[.K$27]*[.$Z$5]*MAGNET([.K$24]+[.$BB74])+[.L$27]*[.$Z$5]*MAGNET([.L$24]+[.$BB74])+[.M$27]*[.$Z$5]*MAGNET([.M$24]+[.$BB74])+[.N$27]*[.$Z$5]*MAGNET([.N$24]+[.$BB74])+[.O$27]*[.$Z$5]*MAGNET([.O$24]+[.$BB74])+[.P$27]*[.$Z$5]*MAGNET([.P$24]+[.$BB74])+[.Q$27]*[.$Z$5]*MAGNET([.Q$24]+[.$BB74])+[.R$27]*[.$Z$5]*MAGNET([.R$24]+[.$BB74])+[.S$27]*[.$Z$5]*MAGNET([.S$24]+[.$BB74])+[.T$27]*[.$Z$5]*MAGNET([.T$24]+[.$BB74])+[.U$27]*[.$Z$5]*MAGNET([.U$24]+[.$BB74])+[.V$27]*[.$Z$5]*MAGNET([.V$24]+[.$BB74])+[.W$27]*[.$Z$5]*MAGNET([.W$24]+[.$BB74])+[.X$27]*[.$Z$5]*MAGNET([.X$24]+[.$BB74])+[.Y$27]*[.$Z$5]*MAGNET([.Y$24]+[.$BB74])+[.Z$27]*[.$Z$5]*MAGNET([.Z$24]+[.$BB74])+[.AA$27]*[.$Z$5]*MAGNET([.AA$24]+[.$BB74])+[.AB$27]*[.$Z$5]*MAGNET([.AB$24]+[.$BB74])+[.AC$27]*[.$Z$5]*MAGNET([.AC$24]+[.$BB74])+[.AD$27]*[.$Z$5]*MAGNET([.AD$24]+[.$BB74])+[.AE$27]*[.$Z$5]*MAGNET([.AE$24]+[.$BB74])+[.AF$27]*[.$Z$5]*MAGNET([.AF$24]+[.$BB74])+[.AG$27]*[.$Z$5]*MAGNET([.AG$24]+[.$BB74])+[.D$27]*[.$Z$5]*MAGNET([.D$24]+[.$BB74])+[.AH$27]*[.$Z$5]*MAGNET([.AH$24]+[.BB74]) +[.AI$27]*[.$Z$5]*MAGNET([.AI$24]+[.BB74]) +[.AJ$27]*[.$Z$5]*MAGNET([.AJ$24]+[.BB74]) +[.AK$27]*[.$Z$5]*MAGNET([.AK$24]+[.BB74]) +[.AL$27]*[.$Z$5]*MAGNET([.AL$24]+[.BB74]) +[.AM$27]*[.$Z$5]*MAGNET([.AM$24]+[.BB74]) +[.AN$27]*[.$Z$5]*MAGNET([.AN$24]+[.BB74]) +[.AO$27]*[.$Z$5]*MAGNET([.AO$24]+[.BB74]) +[.AP$27]*[.$Z$5]*MAGNET([.AP$24]+[.$BB74])&#10;+[.AQ$27]*[.$Z$5]*MAGNET([.AQ$24]+[.$BB74])&#10;+[.AR$27]*[.$Z$5]*MAGNET([.AR$24]+[.$BB74])&#10;+[.AS$27]*[.$Z$5]*MAGNET([.AS$24]+[.$BB74])&#10;+[.AT$27]*[.$Z$5]*MAGNET([.AT$24]+[.$BB74])&#10;+[.AU$27]*[.$Z$5]*MAGNET([.AU$24]+[.$BB74])&#10;+[.AV$27]*[.$Z$5]*MAGNET([.AV$24]+[.$BB74])&#10;+[.AW$27]*[.$Z$5]*MAGNET([.AW$24]+[.$BB74])&#10;+[.AX$27]*[.$Z$5]*MAGNET([.AX$24]+[.$BB74])&#10;+[.AY$27]*[.$Z$5]*MAGNET([.AY$24]+[.$BB74]) +RAND()*[.$BE$13]" office:value-type="float" office:value="-14.1373543822896" calcext:value-type="float">
            <text:p>-14.1373543822896</text:p>
          </table:table-cell>
          <table:table-cell table:style-name="ce71" table:formula="of:=[.E$28]*[.$Z$5]*MAGNET([.E$24]+[.$BB74])+[.F$28]*[.$Z$5]*MAGNET([.F$24]+[.$BB74])+[.G$28]*[.$Z$5]*MAGNET([.G$24]+[.$BB74])+[.H$28]*[.$Z$5]*MAGNET([.H$24]+[.$BB74])+[.I$28]*[.$Z$5]*MAGNET([.I$24]+[.$BB74])+[.J$28]*[.$Z$5]*MAGNET([.J$24]+[.$BB74])+[.K$28]*[.$Z$5]*MAGNET([.K$24]+[.$BB74])+[.L$28]*[.$Z$5]*MAGNET([.L$24]+[.$BB74])+[.M$28]*[.$Z$5]*MAGNET([.M$24]+[.$BB74])+[.N$28]*[.$Z$5]*MAGNET([.N$24]+[.$BB74])+[.O$28]*[.$Z$5]*MAGNET([.O$24]+[.$BB74])+[.P$28]*[.$Z$5]*MAGNET([.P$24]+[.$BB74])+[.Q$28]*[.$Z$5]*MAGNET([.Q$24]+[.$BB74])+[.R$28]*[.$Z$5]*MAGNET([.R$24]+[.$BB74])+[.S$28]*[.$Z$5]*MAGNET([.S$24]+[.$BB74])+[.T$28]*[.$Z$5]*MAGNET([.T$24]+[.$BB74])+[.U$28]*[.$Z$5]*MAGNET([.U$24]+[.$BB74])+[.V$28]*[.$Z$5]*MAGNET([.V$24]+[.$BB74])+[.W$28]*[.$Z$5]*MAGNET([.W$24]+[.$BB74])+[.X$28]*[.$Z$5]*MAGNET([.X$24]+[.$BB74])+[.Y$28]*[.$Z$5]*MAGNET([.Y$24]+[.$BB74])+[.Z$28]*[.$Z$5]*MAGNET([.Z$24]+[.$BB74])+[.AA$28]*[.$Z$5]*MAGNET([.AA$24]+[.$BB74])+[.AB$28]*[.$Z$5]*MAGNET([.AB$24]+[.$BB74])+[.AC$28]*[.$Z$5]*MAGNET([.AC$24]+[.$BB74])+[.AD$28]*[.$Z$5]*MAGNET([.AD$24]+[.$BB74])+[.AE$28]*[.$Z$5]*MAGNET([.AE$24]+[.$BB74])+[.AF$28]*[.$Z$5]*MAGNET([.AF$24]+[.$BB74])+[.AG$28]*[.$Z$5]*MAGNET([.AG$24]+[.$BB74])+[.D$28]*[.$Z$5]*MAGNET([.D$24]+[.$BB74])+[.AH$28]*[.$Z$5]*MAGNET([.AH$24]+[.BB74]) +[.AI$28]*[.$Z$5]*MAGNET([.AI$24]+[.BB74]) +[.AJ$28]*[.$Z$5]*MAGNET([.AJ$24]+[.BB74]) +[.AK$28]*[.$Z$5]*MAGNET([.AK$24]+[.BB74]) +[.AL$28]*[.$Z$5]*MAGNET([.AL$24]+[.BB74]) +[.AM$28]*[.$Z$5]*MAGNET([.AM$24]+[.BB74]) +[.AN$28]*[.$Z$5]*MAGNET([.AN$24]+[.BB74]) +[.AO$28]*[.$Z$5]*MAGNET([.AO$24]+[.BB74]) +[.AP$28]*[.$Z$5]*MAGNET([.AP$24]+[.$BB74])&#10;+[.AQ$28]*[.$Z$5]*MAGNET([.AQ$24]+[.$BB74])&#10;+[.AR$28]*[.$Z$5]*MAGNET([.AR$24]+[.$BB74])&#10;+[.AS$28]*[.$Z$5]*MAGNET([.AS$24]+[.$BB74])&#10;+[.AT$28]*[.$Z$5]*MAGNET([.AT$24]+[.$BB74])&#10;+[.AU$28]*[.$Z$5]*MAGNET([.AU$24]+[.$BB74])&#10;+[.AV$28]*[.$Z$5]*MAGNET([.AV$24]+[.$BB74])&#10;+[.AW$28]*[.$Z$5]*MAGNET([.AW$24]+[.$BB74])&#10;+[.AX$28]*[.$Z$5]*MAGNET([.AX$24]+[.$BB74])&#10;+[.AY$28]*[.$Z$5]*MAGNET([.AY$24]+[.$BB74]) +RAND()*[.$BF$13]" office:value-type="float" office:value="-1.55155488664432" calcext:value-type="float">
            <text:p>-1.55155488664432</text:p>
          </table:table-cell>
          <table:table-cell table:style-name="ce71" table:formula="of:=[.E$29]*[.$Z$5]*MAGNET([.E$24]+[.$BB74])+[.F$29]*[.$Z$5]*MAGNET([.F$24]+[.$BB74])+[.G$29]*[.$Z$5]*MAGNET([.G$24]+[.$BB74])+[.H$29]*[.$Z$5]*MAGNET([.H$24]+[.$BB74])+[.I$29]*[.$Z$5]*MAGNET([.I$24]+[.$BB74])+[.J$29]*[.$Z$5]*MAGNET([.J$24]+[.$BB74])+[.K$29]*[.$Z$5]*MAGNET([.K$24]+[.$BB74])+[.L$29]*[.$Z$5]*MAGNET([.L$24]+[.$BB74])+[.M$29]*[.$Z$5]*MAGNET([.M$24]+[.$BB74])+[.N$29]*[.$Z$5]*MAGNET([.N$24]+[.$BB74])+[.O$29]*[.$Z$5]*MAGNET([.O$24]+[.$BB74])+[.P$29]*[.$Z$5]*MAGNET([.P$24]+[.$BB74])+[.Q$29]*[.$Z$5]*MAGNET([.Q$24]+[.$BB74])+[.R$29]*[.$Z$5]*MAGNET([.R$24]+[.$BB74])+[.S$29]*[.$Z$5]*MAGNET([.S$24]+[.$BB74])+[.T$29]*[.$Z$5]*MAGNET([.T$24]+[.$BB74])+[.U$29]*[.$Z$5]*MAGNET([.U$24]+[.$BB74])+[.V$29]*[.$Z$5]*MAGNET([.V$24]+[.$BB74])+[.W$29]*[.$Z$5]*MAGNET([.W$24]+[.$BB74])+[.X$29]*[.$Z$5]*MAGNET([.X$24]+[.$BB74])+[.Y$29]*[.$Z$5]*MAGNET([.Y$24]+[.$BB74])+[.Z$29]*[.$Z$5]*MAGNET([.Z$24]+[.$BB74])+[.AA$29]*[.$Z$5]*MAGNET([.AA$24]+[.$BB74])+[.AB$29]*[.$Z$5]*MAGNET([.AB$24]+[.$BB74])+[.AC$29]*[.$Z$5]*MAGNET([.AC$24]+[.$BB74])+[.AD$29]*[.$Z$5]*MAGNET([.AD$24]+[.$BB74])+[.AE$29]*[.$Z$5]*MAGNET([.AE$24]+[.$BB74])+[.AF$29]*[.$Z$5]*MAGNET([.AF$24]+[.$BB74])+[.AG$29]*[.$Z$5]*MAGNET([.AG$24]+[.$BB74])+[.D$29]*[.$Z$5]*MAGNET([.D$24]+[.$BB74])+[.AH$29]*[.$Z$5]*MAGNET([.AH$24]+[.BB74]) +[.AI$29]*[.$Z$5]*MAGNET([.AI$24]+[.BB74]) +[.AJ$29]*[.$Z$5]*MAGNET([.AJ$24]+[.BB74]) +[.AK$29]*[.$Z$5]*MAGNET([.AK$24]+[.BB74]) +[.AL$29]*[.$Z$5]*MAGNET([.AL$24]+[.BB74]) +[.AM$29]*[.$Z$5]*MAGNET([.AM$24]+[.BB74]) +[.AN$29]*[.$Z$5]*MAGNET([.AN$24]+[.BB74]) +[.AO$29]*[.$Z$5]*MAGNET([.AO$24]+[.BB74]) +[.AP$29]*[.$Z$5]*MAGNET([.AP$24]+[.$BB74])&#10;+[.AQ$29]*[.$Z$5]*MAGNET([.AQ$24]+[.$BB74])&#10;+[.AR$29]*[.$Z$5]*MAGNET([.AR$24]+[.$BB74])&#10;+[.AS$29]*[.$Z$5]*MAGNET([.AS$24]+[.$BB74])&#10;+[.AT$29]*[.$Z$5]*MAGNET([.AT$24]+[.$BB74])&#10;+[.AU$29]*[.$Z$5]*MAGNET([.AU$24]+[.$BB74])&#10;+[.AV$29]*[.$Z$5]*MAGNET([.AV$24]+[.$BB74])&#10;+[.AW$29]*[.$Z$5]*MAGNET([.AW$24]+[.$BB74])&#10;+[.AX$29]*[.$Z$5]*MAGNET([.AX$24]+[.$BB74])&#10;+[.AY$29]*[.$Z$5]*MAGNET([.AY$24]+[.$BB74]) +RAND()*[.$BG$13]" office:value-type="float" office:value="14.849415561087" calcext:value-type="float">
            <text:p>14.849415561087</text:p>
          </table:table-cell>
          <table:table-cell table:style-name="ce71" table:formula="of:=[.E$30]*[.$Z$5]*MAGNET([.E$24]+[.$BB74])+[.F$30]*[.$Z$5]*MAGNET([.F$24]+[.$BB74])+[.G$30]*[.$Z$5]*MAGNET([.G$24]+[.$BB74])+[.H$30]*[.$Z$5]*MAGNET([.H$24]+[.$BB74])+[.I$30]*[.$Z$5]*MAGNET([.I$24]+[.$BB74])+[.J$30]*[.$Z$5]*MAGNET([.J$24]+[.$BB74])+[.K$30]*[.$Z$5]*MAGNET([.K$24]+[.$BB74])+[.L$30]*[.$Z$5]*MAGNET([.L$24]+[.$BB74])+[.M$30]*[.$Z$5]*MAGNET([.M$24]+[.$BB74])+[.N$30]*[.$Z$5]*MAGNET([.N$24]+[.$BB74])+[.O$30]*[.$Z$5]*MAGNET([.O$24]+[.$BB74])+[.P$30]*[.$Z$5]*MAGNET([.P$24]+[.$BB74])+[.Q$30]*[.$Z$5]*MAGNET([.Q$24]+[.$BB74])+[.R$30]*[.$Z$5]*MAGNET([.R$24]+[.$BB74])+[.S$30]*[.$Z$5]*MAGNET([.S$24]+[.$BB74])+[.T$30]*[.$Z$5]*MAGNET([.T$24]+[.$BB74])+[.U$30]*[.$Z$5]*MAGNET([.U$24]+[.$BB74])+[.V$30]*[.$Z$5]*MAGNET([.V$24]+[.$BB74])+[.W$30]*[.$Z$5]*MAGNET([.W$24]+[.$BB74])+[.X$30]*[.$Z$5]*MAGNET([.X$24]+[.$BB74])+[.Y$30]*[.$Z$5]*MAGNET([.Y$24]+[.$BB74])+[.Z$30]*[.$Z$5]*MAGNET([.Z$24]+[.$BB74])+[.AA$30]*[.$Z$5]*MAGNET([.AA$24]+[.$BB74])+[.AB$30]*[.$Z$5]*MAGNET([.AB$24]+[.$BB74])+[.AC$30]*[.$Z$5]*MAGNET([.AC$24]+[.$BB74])+[.AD$30]*[.$Z$5]*MAGNET([.AD$24]+[.$BB74])+[.AE$30]*[.$Z$5]*MAGNET([.AE$24]+[.$BB74])+[.AF$30]*[.$Z$5]*MAGNET([.AF$24]+[.$BB74])+[.AG$30]*[.$Z$5]*MAGNET([.AG$24]+[.$BB74])+[.D$30]*[.$Z$5]*MAGNET([.D$24]+[.$BB74])+[.AH$30]*[.$Z$5]*MAGNET([.AH$24]+[.BB74]) +[.AI$30]*[.$Z$5]*MAGNET([.AI$24]+[.BB74]) +[.AJ$30]*[.$Z$5]*MAGNET([.AJ$24]+[.BB74]) +[.AK$30]*[.$Z$5]*MAGNET([.AK$24]+[.BB74]) +[.AL$30]*[.$Z$5]*MAGNET([.AL$24]+[.BB74]) +[.AM$30]*[.$Z$5]*MAGNET([.AM$24]+[.BB74]) +[.AN$30]*[.$Z$5]*MAGNET([.AN$24]+[.BB74]) +[.AO$30]*[.$Z$5]*MAGNET([.AO$24]+[.BB74]) +[.AP$30]*[.$Z$5]*MAGNET([.AP$24]+[.$BB74])&#10;+[.AQ$30]*[.$Z$5]*MAGNET([.AQ$24]+[.$BB74])&#10;+[.AR$30]*[.$Z$5]*MAGNET([.AR$24]+[.$BB74])&#10;+[.AS$30]*[.$Z$5]*MAGNET([.AS$24]+[.$BB74])&#10;+[.AT$30]*[.$Z$5]*MAGNET([.AT$24]+[.$BB74])&#10;+[.AU$30]*[.$Z$5]*MAGNET([.AU$24]+[.$BB74])&#10;+[.AV$30]*[.$Z$5]*MAGNET([.AV$24]+[.$BB74])&#10;+[.AW$30]*[.$Z$5]*MAGNET([.AW$24]+[.$BB74])&#10;+[.AX$30]*[.$Z$5]*MAGNET([.AX$24]+[.$BB74])&#10;+[.AY$30]*[.$Z$5]*MAGNET([.AY$24]+[.$BB74]) +RAND()*[.$BH$13]" office:value-type="float" office:value="0" calcext:value-type="float">
            <text:p>0</text:p>
          </table:table-cell>
          <table:table-cell table:style-name="ce71" table:formula="of:=[.E$31]*[.$Z$5]*MAGNET([.E$24]+[.$BB74])+[.F$31]*[.$Z$5]*MAGNET([.F$24]+[.$BB74])+[.G$31]*[.$Z$5]*MAGNET([.G$24]+[.$BB74])+[.H$31]*[.$Z$5]*MAGNET([.H$24]+[.$BB74])+[.I$31]*[.$Z$5]*MAGNET([.I$24]+[.$BB74])+[.J$31]*[.$Z$5]*MAGNET([.J$24]+[.$BB74])+[.K$31]*[.$Z$5]*MAGNET([.K$24]+[.$BB74])+[.L$31]*[.$Z$5]*MAGNET([.L$24]+[.$BB74])+[.M$31]*[.$Z$5]*MAGNET([.M$24]+[.$BB74])+[.N$31]*[.$Z$5]*MAGNET([.N$24]+[.$BB74])+[.O$31]*[.$Z$5]*MAGNET([.O$24]+[.$BB74])+[.P$31]*[.$Z$5]*MAGNET([.P$24]+[.$BB74])+[.Q$31]*[.$Z$5]*MAGNET([.Q$24]+[.$BB74])+[.R$31]*[.$Z$5]*MAGNET([.R$24]+[.$BB74])+[.S$31]*[.$Z$5]*MAGNET([.S$24]+[.$BB74])+[.T$31]*[.$Z$5]*MAGNET([.T$24]+[.$BB74])+[.U$31]*[.$Z$5]*MAGNET([.U$24]+[.$BB74])+[.V$31]*[.$Z$5]*MAGNET([.V$24]+[.$BB74])+[.W$31]*[.$Z$5]*MAGNET([.W$24]+[.$BB74])+[.X$31]*[.$Z$5]*MAGNET([.X$24]+[.$BB74])+[.Y$31]*[.$Z$5]*MAGNET([.Y$24]+[.$BB74])+[.Z$31]*[.$Z$5]*MAGNET([.Z$24]+[.$BB74])+[.AA$31]*[.$Z$5]*MAGNET([.AA$24]+[.$BB74])+[.AB$31]*[.$Z$5]*MAGNET([.AB$24]+[.$BB74])+[.AC$31]*[.$Z$5]*MAGNET([.AC$24]+[.$BB74])+[.AD$31]*[.$Z$5]*MAGNET([.AD$24]+[.$BB74])+[.AE$31]*[.$Z$5]*MAGNET([.AE$24]+[.$BB74])+[.AF$31]*[.$Z$5]*MAGNET([.AF$24]+[.$BB74])+[.AG$31]*[.$Z$5]*MAGNET([.AG$24]+[.$BB74])+[.D$31]*[.$Z$5]*MAGNET([.D$24]+[.$BB74])+[.AH$31]*[.$Z$5]*MAGNET([.AH$24]+[.BB74]) +[.AI$31]*[.$Z$5]*MAGNET([.AI$24]+[.BB74]) +[.AJ$31]*[.$Z$5]*MAGNET([.AJ$24]+[.BB74]) +[.AK$31]*[.$Z$5]*MAGNET([.AK$24]+[.BB74]) +[.AL$31]*[.$Z$5]*MAGNET([.AL$24]+[.BB74]) +[.AM$31]*[.$Z$5]*MAGNET([.AM$24]+[.BB74]) +[.AN$31]*[.$Z$5]*MAGNET([.AN$24]+[.BB74]) +[.AO$31]*[.$Z$5]*MAGNET([.AO$24]+[.BB74]) +[.AP$31]*[.$Z$5]*MAGNET([.AP$24]+[.$BB74])&#10;+[.AQ$31]*[.$Z$5]*MAGNET([.AQ$24]+[.$BB74])&#10;+[.AR$31]*[.$Z$5]*MAGNET([.AR$24]+[.$BB74])&#10;+[.AS$31]*[.$Z$5]*MAGNET([.AS$24]+[.$BB74])&#10;+[.AT$31]*[.$Z$5]*MAGNET([.AT$24]+[.$BB74])&#10;+[.AU$31]*[.$Z$5]*MAGNET([.AU$24]+[.$BB74])&#10;+[.AV$31]*[.$Z$5]*MAGNET([.AV$24]+[.$BB74])&#10;+[.AW$31]*[.$Z$5]*MAGNET([.AW$24]+[.$BB74])&#10;+[.AX$31]*[.$Z$5]*MAGNET([.AX$24]+[.$BB74])&#10;+[.AY$31]*[.$Z$5]*MAGNET([.AY$24]+[.$BB74]) +RAND()*[.$BI$13]" office:value-type="float" office:value="0" calcext:value-type="float">
            <text:p>0</text:p>
          </table:table-cell>
          <table:table-cell table:style-name="ce71" table:formula="of:=[.E$32]*[.$Z$5]*MAGNET([.E$24]+[.$BB74])+[.F$32]*[.$Z$5]*MAGNET([.F$24]+[.$BB74])+[.G$32]*[.$Z$5]*MAGNET([.G$24]+[.$BB74])+[.H$32]*[.$Z$5]*MAGNET([.H$24]+[.$BB74])+[.I$32]*[.$Z$5]*MAGNET([.I$24]+[.$BB74])+[.J$32]*[.$Z$5]*MAGNET([.J$24]+[.$BB74])+[.K$32]*[.$Z$5]*MAGNET([.K$24]+[.$BB74])+[.L$32]*[.$Z$5]*MAGNET([.L$24]+[.$BB74])+[.M$32]*[.$Z$5]*MAGNET([.M$24]+[.$BB74])+[.N$32]*[.$Z$5]*MAGNET([.N$24]+[.$BB74])+[.O$32]*[.$Z$5]*MAGNET([.O$24]+[.$BB74])+[.P$32]*[.$Z$5]*MAGNET([.P$24]+[.$BB74])+[.Q$32]*[.$Z$5]*MAGNET([.Q$24]+[.$BB74])+[.R$32]*[.$Z$5]*MAGNET([.R$24]+[.$BB74])+[.S$32]*[.$Z$5]*MAGNET([.S$24]+[.$BB74])+[.T$32]*[.$Z$5]*MAGNET([.T$24]+[.$BB74])+[.U$32]*[.$Z$5]*MAGNET([.U$24]+[.$BB74])+[.V$32]*[.$Z$5]*MAGNET([.V$24]+[.$BB74])+[.W$32]*[.$Z$5]*MAGNET([.W$24]+[.$BB74])+[.X$32]*[.$Z$5]*MAGNET([.X$24]+[.$BB74])+[.Y$32]*[.$Z$5]*MAGNET([.Y$24]+[.$BB74])+[.Z$32]*[.$Z$5]*MAGNET([.Z$24]+[.$BB74])+[.AA$32]*[.$Z$5]*MAGNET([.AA$24]+[.$BB74])+[.AB$32]*[.$Z$5]*MAGNET([.AB$24]+[.$BB74])+[.AC$32]*[.$Z$5]*MAGNET([.AC$24]+[.$BB74])+[.AD$32]*[.$Z$5]*MAGNET([.AD$24]+[.$BB74])+[.AE$32]*[.$Z$5]*MAGNET([.AE$24]+[.$BB74])+[.AF$32]*[.$Z$5]*MAGNET([.AF$24]+[.$BB74])+[.AG$32]*[.$Z$5]*MAGNET([.AG$24]+[.$BB74])+[.D$32]*[.$Z$5]*MAGNET([.D$24]+[.$BB74])+[.AH$32]*[.$Z$5]*MAGNET([.AH$24]+[.BB74]) +[.AI$32]*[.$Z$5]*MAGNET([.AI$24]+[.BB74]) +[.AJ$32]*[.$Z$5]*MAGNET([.AJ$24]+[.BB74]) +[.AK$32]*[.$Z$5]*MAGNET([.AK$24]+[.BB74]) +[.AL$32]*[.$Z$5]*MAGNET([.AL$24]+[.BB74]) +[.AM$32]*[.$Z$5]*MAGNET([.AM$24]+[.BB74]) +[.AN$32]*[.$Z$5]*MAGNET([.AN$24]+[.BB74]) +[.AO$32]*[.$Z$5]*MAGNET([.AO$24]+[.BB74]) +[.AP$32]*[.$Z$5]*MAGNET([.AP$24]+[.$BB74])&#10;+[.AQ$32]*[.$Z$5]*MAGNET([.AQ$24]+[.$BB74])&#10;+[.AR$32]*[.$Z$5]*MAGNET([.AR$24]+[.$BB74])&#10;+[.AS$32]*[.$Z$5]*MAGNET([.AS$24]+[.$BB74])&#10;+[.AT$32]*[.$Z$5]*MAGNET([.AT$24]+[.$BB74])&#10;+[.AU$32]*[.$Z$5]*MAGNET([.AU$24]+[.$BB74])&#10;+[.AV$32]*[.$Z$5]*MAGNET([.AV$24]+[.$BB74])&#10;+[.AW$32]*[.$Z$5]*MAGNET([.AW$24]+[.$BB74])&#10;+[.AX$32]*[.$Z$5]*MAGNET([.AX$24]+[.$BB74])&#10;+[.AY$32]*[.$Z$5]*MAGNET([.AY$24]+[.$BB7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4]+0.002" office:value-type="float" office:value="0.12" calcext:value-type="float">
            <text:p>0.12</text:p>
          </table:table-cell>
          <table:table-cell table:formula="of:=[.BA75]*[.$D$6]" office:value-type="float" office:value="6.03185789489241" calcext:value-type="float">
            <text:p>6.032</text:p>
          </table:table-cell>
          <table:table-cell table:formula="of:=[.D$25]*[.$Z$5]*MAGNET([.D$24]+[.BB75])+[.E$25]*[.$Z$5]*MAGNET([.E$24]+[.BB75])+[.F$25]*[.$Z$5]*MAGNET([.F$24]+[.BB75])+[.G$25]*[.$Z$5]*MAGNET([.G$24]+[.BB75])+[.H$25]*[.$Z$5]*MAGNET([.H$24]+[.BB75])+[.I$25]*[.$Z$5]*MAGNET([.I$24]+[.BB75])+[.J$25]*[.$Z$5]*MAGNET([.J$24]+[.BB75])+[.K$25]*[.$Z$5]*MAGNET([.K$24]+[.BB75])+[.L$25]*[.$Z$5]*MAGNET([.L$24]+[.BB75])+[.M$25]*[.$Z$5]*MAGNET([.M$24]+[.BB75])+[.N$25]*[.$Z$5]*MAGNET([.N$24]+[.BB75])+[.O$25]*[.$Z$5]*MAGNET([.O$24]+[.BB75])+[.P$25]*[.$Z$5]*MAGNET([.P$24]+[.BB75])+[.Q$25]*[.$Z$5]*MAGNET([.Q$24]+[.BB75])+[.R$25]*[.$Z$5]*MAGNET([.R$24]+[.BB75])+[.S$25]*[.$Z$5]*MAGNET([.S$24]+[.BB75])+[.T$25]*[.$Z$5]*MAGNET([.T$24]+[.BB75])+[.U$25]*[.$Z$5]*MAGNET([.U$24]+[.BB75])+[.V$25]*[.$Z$5]*MAGNET([.V$24]+[.BB75])+[.W$25]*[.$Z$5]*MAGNET([.W$24]+[.BB75])+[.X$25]*[.$Z$5]*MAGNET([.X$24]+[.BB75])+[.Y$25]*[.$Z$5]*MAGNET([.Y$24]+[.BB75])+[.Z$25]*[.$Z$5]*MAGNET([.Z$24]+[.BB75])+[.AA$25]*[.$Z$5]*MAGNET([.AA$24]+[.BB75])+[.AB$25]*[.$Z$5]*MAGNET([.AB$24]+[.BB75])+[.AC$25]*[.$Z$5]*MAGNET([.AC$24]+[.BB75])+[.AD$25]*[.$Z$5]*MAGNET([.AD$24]+[.BB75])+[.AE$25]*[.$Z$5]*MAGNET([.AE$24]+[.BB75])+[.AF$25]*[.$Z$5]*MAGNET([.AF$24]+[.BB75])+[.AG$25]*[.$Z$5]*MAGNET([.AG$24]+[.BB75])+[.AH$25]*[.$Z$5]*MAGNET([.AH$24]+[.BB75]) +[.AI$25]*[.$Z$5]*MAGNET([.AI$24]+[.BB75]) +[.AJ$25]*[.$Z$5]*MAGNET([.AJ$24]+[.BB75]) +[.AK$25]*[.$Z$5]*MAGNET([.AK$24]+[.BB75]) +[.AL$25]*[.$Z$5]*MAGNET([.AL$24]+[.BB75]) +[.AM$25]*[.$Z$5]*MAGNET([.AM$24]+[.BB75]) +[.AN$25]*[.$Z$5]*MAGNET([.AN$24]+[.BB75]) +[.AO$25]*[.$Z$5]*MAGNET([.AO$24]+[.BB75])+RAND()*[.$BC$13]+[.AP$25]*[.$Z$5]*MAGNET([.AP$24]+[.BB75])&#10;+[.AQ$25]*[.$Z$5]*MAGNET([.AQ$24]+[.BB75])&#10;+[.AR$25]*[.$Z$5]*MAGNET([.AR$24]+[.BB75])&#10;+[.AS$25]*[.$Z$5]*MAGNET([.AS$24]+[.BB75])&#10;+[.AT$25]*[.$Z$5]*MAGNET([.AT$24]+[.BB75])&#10;+[.AU$25]*[.$Z$5]*MAGNET([.AU$24]+[.BB75])&#10;+[.AV$25]*[.$Z$5]*MAGNET([.AV$24]+[.BB75])&#10;+[.AW$25]*[.$Z$5]*MAGNET([.AW$24]+[.BB75])&#10;+[.AX$25]*[.$Z$5]*MAGNET([.AX$24]+[.BB75])&#10;+[.AY$25]*[.$Z$5]*MAGNET([.AY$24]+[.BB75])" office:value-type="float" office:value="-69.3850965273442" calcext:value-type="float">
            <text:p>-69.39</text:p>
          </table:table-cell>
          <table:table-cell table:style-name="ce70" table:formula="of:=[.E$26]*[.$Z$5]*MAGNET([.E$24]+[.$BB75])+[.F$26]*[.$Z$5]*MAGNET([.F$24]+[.$BB75])+[.G$26]*[.$Z$5]*MAGNET([.G$24]+[.$BB75])+[.H$26]*[.$Z$5]*MAGNET([.H$24]+[.$BB75])+[.I$26]*[.$Z$5]*MAGNET([.I$24]+[.$BB75])+[.J$26]*[.$Z$5]*MAGNET([.J$24]+[.$BB75])+[.K$26]*[.$Z$5]*MAGNET([.K$24]+[.$BB75])+[.L$26]*[.$Z$5]*MAGNET([.L$24]+[.$BB75])+[.M$26]*[.$Z$5]*MAGNET([.M$24]+[.$BB75])+[.N$26]*[.$Z$5]*MAGNET([.N$24]+[.$BB75])+[.O$26]*[.$Z$5]*MAGNET([.O$24]+[.$BB75])+[.P$26]*[.$Z$5]*MAGNET([.P$24]+[.$BB75])+[.Q$26]*[.$Z$5]*MAGNET([.Q$24]+[.$BB75])+[.R$26]*[.$Z$5]*MAGNET([.R$24]+[.$BB75])+[.S$26]*[.$Z$5]*MAGNET([.S$24]+[.$BB75])+[.T$26]*[.$Z$5]*MAGNET([.T$24]+[.$BB75])+[.U$26]*[.$Z$5]*MAGNET([.U$24]+[.$BB75])+[.V$26]*[.$Z$5]*MAGNET([.V$24]+[.$BB75])+[.W$26]*[.$Z$5]*MAGNET([.W$24]+[.$BB75])+[.X$26]*[.$Z$5]*MAGNET([.X$24]+[.$BB75])+[.Y$26]*[.$Z$5]*MAGNET([.Y$24]+[.$BB75])+[.Z$26]*[.$Z$5]*MAGNET([.Z$24]+[.$BB75])+[.AA$26]*[.$Z$5]*MAGNET([.AA$24]+[.$BB75])+[.AB$26]*[.$Z$5]*MAGNET([.AB$24]+[.$BB75])+[.AC$26]*[.$Z$5]*MAGNET([.AC$24]+[.$BB75])+[.AD$26]*[.$Z$5]*MAGNET([.AD$24]+[.$BB75])+[.AE$26]*[.$Z$5]*MAGNET([.AE$24]+[.$BB75])+[.AF$26]*[.$Z$5]*MAGNET([.AF$24]+[.$BB75])+[.AG$26]*[.$Z$5]*MAGNET([.AG$24]+[.$BB75])+[.D$26]*[.$Z$5]*MAGNET([.D$24]+[.$BB75])+[.AH$26]*[.$Z$5]*MAGNET([.AH$24]+[.BB75]) +[.AI$26]*[.$Z$5]*MAGNET([.AI$24]+[.BB75]) +[.AJ$26]*[.$Z$5]*MAGNET([.AJ$24]+[.BB75]) +[.AK$26]*[.$Z$5]*MAGNET([.AK$24]+[.BB75]) +[.AL$26]*[.$Z$5]*MAGNET([.AL$24]+[.BB75]) +[.AM$26]*[.$Z$5]*MAGNET([.AM$24]+[.BB75]) +[.AN$26]*[.$Z$5]*MAGNET([.AN$24]+[.BB75]) +[.AO$26]*[.$Z$5]*MAGNET([.AO$24]+[.BB75]) +[.AP$26]*[.$Z$5]*MAGNET([.AP$24]+[.$BB75])&#10;+[.AQ$26]*[.$Z$5]*MAGNET([.AQ$24]+[.$BB75])&#10;+[.AR$26]*[.$Z$5]*MAGNET([.AR$24]+[.$BB75])&#10;+[.AS$26]*[.$Z$5]*MAGNET([.AS$24]+[.$BB75])&#10;+[.AT$26]*[.$Z$5]*MAGNET([.AT$24]+[.$BB75])&#10;+[.AU$26]*[.$Z$5]*MAGNET([.AU$24]+[.$BB75])&#10;+[.AV$26]*[.$Z$5]*MAGNET([.AV$24]+[.$BB75])&#10;+[.AW$26]*[.$Z$5]*MAGNET([.AW$24]+[.$BB75])&#10;+[.AX$26]*[.$Z$5]*MAGNET([.AX$24]+[.$BB75])&#10;+[.AY$26]*[.$Z$5]*MAGNET([.AY$24]+[.$BB75]) +RAND()*[.$BD$13]" office:value-type="float" office:value="93.743625204127" calcext:value-type="float">
            <text:p>93.74</text:p>
          </table:table-cell>
          <table:table-cell table:style-name="ce71" table:formula="of:=[.E$27]*[.$Z$5]*MAGNET([.E$24]+[.$BB75])+[.F$27]*[.$Z$5]*MAGNET([.F$24]+[.$BB75])+[.G$27]*[.$Z$5]*MAGNET([.G$24]+[.$BB75])+[.H$27]*[.$Z$5]*MAGNET([.H$24]+[.$BB75])+[.I$27]*[.$Z$5]*MAGNET([.I$24]+[.$BB75])+[.J$27]*[.$Z$5]*MAGNET([.J$24]+[.$BB75])+[.K$27]*[.$Z$5]*MAGNET([.K$24]+[.$BB75])+[.L$27]*[.$Z$5]*MAGNET([.L$24]+[.$BB75])+[.M$27]*[.$Z$5]*MAGNET([.M$24]+[.$BB75])+[.N$27]*[.$Z$5]*MAGNET([.N$24]+[.$BB75])+[.O$27]*[.$Z$5]*MAGNET([.O$24]+[.$BB75])+[.P$27]*[.$Z$5]*MAGNET([.P$24]+[.$BB75])+[.Q$27]*[.$Z$5]*MAGNET([.Q$24]+[.$BB75])+[.R$27]*[.$Z$5]*MAGNET([.R$24]+[.$BB75])+[.S$27]*[.$Z$5]*MAGNET([.S$24]+[.$BB75])+[.T$27]*[.$Z$5]*MAGNET([.T$24]+[.$BB75])+[.U$27]*[.$Z$5]*MAGNET([.U$24]+[.$BB75])+[.V$27]*[.$Z$5]*MAGNET([.V$24]+[.$BB75])+[.W$27]*[.$Z$5]*MAGNET([.W$24]+[.$BB75])+[.X$27]*[.$Z$5]*MAGNET([.X$24]+[.$BB75])+[.Y$27]*[.$Z$5]*MAGNET([.Y$24]+[.$BB75])+[.Z$27]*[.$Z$5]*MAGNET([.Z$24]+[.$BB75])+[.AA$27]*[.$Z$5]*MAGNET([.AA$24]+[.$BB75])+[.AB$27]*[.$Z$5]*MAGNET([.AB$24]+[.$BB75])+[.AC$27]*[.$Z$5]*MAGNET([.AC$24]+[.$BB75])+[.AD$27]*[.$Z$5]*MAGNET([.AD$24]+[.$BB75])+[.AE$27]*[.$Z$5]*MAGNET([.AE$24]+[.$BB75])+[.AF$27]*[.$Z$5]*MAGNET([.AF$24]+[.$BB75])+[.AG$27]*[.$Z$5]*MAGNET([.AG$24]+[.$BB75])+[.D$27]*[.$Z$5]*MAGNET([.D$24]+[.$BB75])+[.AH$27]*[.$Z$5]*MAGNET([.AH$24]+[.BB75]) +[.AI$27]*[.$Z$5]*MAGNET([.AI$24]+[.BB75]) +[.AJ$27]*[.$Z$5]*MAGNET([.AJ$24]+[.BB75]) +[.AK$27]*[.$Z$5]*MAGNET([.AK$24]+[.BB75]) +[.AL$27]*[.$Z$5]*MAGNET([.AL$24]+[.BB75]) +[.AM$27]*[.$Z$5]*MAGNET([.AM$24]+[.BB75]) +[.AN$27]*[.$Z$5]*MAGNET([.AN$24]+[.BB75]) +[.AO$27]*[.$Z$5]*MAGNET([.AO$24]+[.BB75]) +[.AP$27]*[.$Z$5]*MAGNET([.AP$24]+[.$BB75])&#10;+[.AQ$27]*[.$Z$5]*MAGNET([.AQ$24]+[.$BB75])&#10;+[.AR$27]*[.$Z$5]*MAGNET([.AR$24]+[.$BB75])&#10;+[.AS$27]*[.$Z$5]*MAGNET([.AS$24]+[.$BB75])&#10;+[.AT$27]*[.$Z$5]*MAGNET([.AT$24]+[.$BB75])&#10;+[.AU$27]*[.$Z$5]*MAGNET([.AU$24]+[.$BB75])&#10;+[.AV$27]*[.$Z$5]*MAGNET([.AV$24]+[.$BB75])&#10;+[.AW$27]*[.$Z$5]*MAGNET([.AW$24]+[.$BB75])&#10;+[.AX$27]*[.$Z$5]*MAGNET([.AX$24]+[.$BB75])&#10;+[.AY$27]*[.$Z$5]*MAGNET([.AY$24]+[.$BB75]) +RAND()*[.$BE$13]" office:value-type="float" office:value="-32.6940573937036" calcext:value-type="float">
            <text:p>-32.6940573937036</text:p>
          </table:table-cell>
          <table:table-cell table:style-name="ce71" table:formula="of:=[.E$28]*[.$Z$5]*MAGNET([.E$24]+[.$BB75])+[.F$28]*[.$Z$5]*MAGNET([.F$24]+[.$BB75])+[.G$28]*[.$Z$5]*MAGNET([.G$24]+[.$BB75])+[.H$28]*[.$Z$5]*MAGNET([.H$24]+[.$BB75])+[.I$28]*[.$Z$5]*MAGNET([.I$24]+[.$BB75])+[.J$28]*[.$Z$5]*MAGNET([.J$24]+[.$BB75])+[.K$28]*[.$Z$5]*MAGNET([.K$24]+[.$BB75])+[.L$28]*[.$Z$5]*MAGNET([.L$24]+[.$BB75])+[.M$28]*[.$Z$5]*MAGNET([.M$24]+[.$BB75])+[.N$28]*[.$Z$5]*MAGNET([.N$24]+[.$BB75])+[.O$28]*[.$Z$5]*MAGNET([.O$24]+[.$BB75])+[.P$28]*[.$Z$5]*MAGNET([.P$24]+[.$BB75])+[.Q$28]*[.$Z$5]*MAGNET([.Q$24]+[.$BB75])+[.R$28]*[.$Z$5]*MAGNET([.R$24]+[.$BB75])+[.S$28]*[.$Z$5]*MAGNET([.S$24]+[.$BB75])+[.T$28]*[.$Z$5]*MAGNET([.T$24]+[.$BB75])+[.U$28]*[.$Z$5]*MAGNET([.U$24]+[.$BB75])+[.V$28]*[.$Z$5]*MAGNET([.V$24]+[.$BB75])+[.W$28]*[.$Z$5]*MAGNET([.W$24]+[.$BB75])+[.X$28]*[.$Z$5]*MAGNET([.X$24]+[.$BB75])+[.Y$28]*[.$Z$5]*MAGNET([.Y$24]+[.$BB75])+[.Z$28]*[.$Z$5]*MAGNET([.Z$24]+[.$BB75])+[.AA$28]*[.$Z$5]*MAGNET([.AA$24]+[.$BB75])+[.AB$28]*[.$Z$5]*MAGNET([.AB$24]+[.$BB75])+[.AC$28]*[.$Z$5]*MAGNET([.AC$24]+[.$BB75])+[.AD$28]*[.$Z$5]*MAGNET([.AD$24]+[.$BB75])+[.AE$28]*[.$Z$5]*MAGNET([.AE$24]+[.$BB75])+[.AF$28]*[.$Z$5]*MAGNET([.AF$24]+[.$BB75])+[.AG$28]*[.$Z$5]*MAGNET([.AG$24]+[.$BB75])+[.D$28]*[.$Z$5]*MAGNET([.D$24]+[.$BB75])+[.AH$28]*[.$Z$5]*MAGNET([.AH$24]+[.BB75]) +[.AI$28]*[.$Z$5]*MAGNET([.AI$24]+[.BB75]) +[.AJ$28]*[.$Z$5]*MAGNET([.AJ$24]+[.BB75]) +[.AK$28]*[.$Z$5]*MAGNET([.AK$24]+[.BB75]) +[.AL$28]*[.$Z$5]*MAGNET([.AL$24]+[.BB75]) +[.AM$28]*[.$Z$5]*MAGNET([.AM$24]+[.BB75]) +[.AN$28]*[.$Z$5]*MAGNET([.AN$24]+[.BB75]) +[.AO$28]*[.$Z$5]*MAGNET([.AO$24]+[.BB75]) +[.AP$28]*[.$Z$5]*MAGNET([.AP$24]+[.$BB75])&#10;+[.AQ$28]*[.$Z$5]*MAGNET([.AQ$24]+[.$BB75])&#10;+[.AR$28]*[.$Z$5]*MAGNET([.AR$24]+[.$BB75])&#10;+[.AS$28]*[.$Z$5]*MAGNET([.AS$24]+[.$BB75])&#10;+[.AT$28]*[.$Z$5]*MAGNET([.AT$24]+[.$BB75])&#10;+[.AU$28]*[.$Z$5]*MAGNET([.AU$24]+[.$BB75])&#10;+[.AV$28]*[.$Z$5]*MAGNET([.AV$24]+[.$BB75])&#10;+[.AW$28]*[.$Z$5]*MAGNET([.AW$24]+[.$BB75])&#10;+[.AX$28]*[.$Z$5]*MAGNET([.AX$24]+[.$BB75])&#10;+[.AY$28]*[.$Z$5]*MAGNET([.AY$24]+[.$BB75]) +RAND()*[.$BF$13]" office:value-type="float" office:value="-3.16556389625375" calcext:value-type="float">
            <text:p>-3.16556389625375</text:p>
          </table:table-cell>
          <table:table-cell table:style-name="ce71" table:formula="of:=[.E$29]*[.$Z$5]*MAGNET([.E$24]+[.$BB75])+[.F$29]*[.$Z$5]*MAGNET([.F$24]+[.$BB75])+[.G$29]*[.$Z$5]*MAGNET([.G$24]+[.$BB75])+[.H$29]*[.$Z$5]*MAGNET([.H$24]+[.$BB75])+[.I$29]*[.$Z$5]*MAGNET([.I$24]+[.$BB75])+[.J$29]*[.$Z$5]*MAGNET([.J$24]+[.$BB75])+[.K$29]*[.$Z$5]*MAGNET([.K$24]+[.$BB75])+[.L$29]*[.$Z$5]*MAGNET([.L$24]+[.$BB75])+[.M$29]*[.$Z$5]*MAGNET([.M$24]+[.$BB75])+[.N$29]*[.$Z$5]*MAGNET([.N$24]+[.$BB75])+[.O$29]*[.$Z$5]*MAGNET([.O$24]+[.$BB75])+[.P$29]*[.$Z$5]*MAGNET([.P$24]+[.$BB75])+[.Q$29]*[.$Z$5]*MAGNET([.Q$24]+[.$BB75])+[.R$29]*[.$Z$5]*MAGNET([.R$24]+[.$BB75])+[.S$29]*[.$Z$5]*MAGNET([.S$24]+[.$BB75])+[.T$29]*[.$Z$5]*MAGNET([.T$24]+[.$BB75])+[.U$29]*[.$Z$5]*MAGNET([.U$24]+[.$BB75])+[.V$29]*[.$Z$5]*MAGNET([.V$24]+[.$BB75])+[.W$29]*[.$Z$5]*MAGNET([.W$24]+[.$BB75])+[.X$29]*[.$Z$5]*MAGNET([.X$24]+[.$BB75])+[.Y$29]*[.$Z$5]*MAGNET([.Y$24]+[.$BB75])+[.Z$29]*[.$Z$5]*MAGNET([.Z$24]+[.$BB75])+[.AA$29]*[.$Z$5]*MAGNET([.AA$24]+[.$BB75])+[.AB$29]*[.$Z$5]*MAGNET([.AB$24]+[.$BB75])+[.AC$29]*[.$Z$5]*MAGNET([.AC$24]+[.$BB75])+[.AD$29]*[.$Z$5]*MAGNET([.AD$24]+[.$BB75])+[.AE$29]*[.$Z$5]*MAGNET([.AE$24]+[.$BB75])+[.AF$29]*[.$Z$5]*MAGNET([.AF$24]+[.$BB75])+[.AG$29]*[.$Z$5]*MAGNET([.AG$24]+[.$BB75])+[.D$29]*[.$Z$5]*MAGNET([.D$24]+[.$BB75])+[.AH$29]*[.$Z$5]*MAGNET([.AH$24]+[.BB75]) +[.AI$29]*[.$Z$5]*MAGNET([.AI$24]+[.BB75]) +[.AJ$29]*[.$Z$5]*MAGNET([.AJ$24]+[.BB75]) +[.AK$29]*[.$Z$5]*MAGNET([.AK$24]+[.BB75]) +[.AL$29]*[.$Z$5]*MAGNET([.AL$24]+[.BB75]) +[.AM$29]*[.$Z$5]*MAGNET([.AM$24]+[.BB75]) +[.AN$29]*[.$Z$5]*MAGNET([.AN$24]+[.BB75]) +[.AO$29]*[.$Z$5]*MAGNET([.AO$24]+[.BB75]) +[.AP$29]*[.$Z$5]*MAGNET([.AP$24]+[.$BB75])&#10;+[.AQ$29]*[.$Z$5]*MAGNET([.AQ$24]+[.$BB75])&#10;+[.AR$29]*[.$Z$5]*MAGNET([.AR$24]+[.$BB75])&#10;+[.AS$29]*[.$Z$5]*MAGNET([.AS$24]+[.$BB75])&#10;+[.AT$29]*[.$Z$5]*MAGNET([.AT$24]+[.$BB75])&#10;+[.AU$29]*[.$Z$5]*MAGNET([.AU$24]+[.$BB75])&#10;+[.AV$29]*[.$Z$5]*MAGNET([.AV$24]+[.$BB75])&#10;+[.AW$29]*[.$Z$5]*MAGNET([.AW$24]+[.$BB75])&#10;+[.AX$29]*[.$Z$5]*MAGNET([.AX$24]+[.$BB75])&#10;+[.AY$29]*[.$Z$5]*MAGNET([.AY$24]+[.$BB75]) +RAND()*[.$BG$13]" office:value-type="float" office:value="18.169498568373" calcext:value-type="float">
            <text:p>18.169498568373</text:p>
          </table:table-cell>
          <table:table-cell table:style-name="ce71" table:formula="of:=[.E$30]*[.$Z$5]*MAGNET([.E$24]+[.$BB75])+[.F$30]*[.$Z$5]*MAGNET([.F$24]+[.$BB75])+[.G$30]*[.$Z$5]*MAGNET([.G$24]+[.$BB75])+[.H$30]*[.$Z$5]*MAGNET([.H$24]+[.$BB75])+[.I$30]*[.$Z$5]*MAGNET([.I$24]+[.$BB75])+[.J$30]*[.$Z$5]*MAGNET([.J$24]+[.$BB75])+[.K$30]*[.$Z$5]*MAGNET([.K$24]+[.$BB75])+[.L$30]*[.$Z$5]*MAGNET([.L$24]+[.$BB75])+[.M$30]*[.$Z$5]*MAGNET([.M$24]+[.$BB75])+[.N$30]*[.$Z$5]*MAGNET([.N$24]+[.$BB75])+[.O$30]*[.$Z$5]*MAGNET([.O$24]+[.$BB75])+[.P$30]*[.$Z$5]*MAGNET([.P$24]+[.$BB75])+[.Q$30]*[.$Z$5]*MAGNET([.Q$24]+[.$BB75])+[.R$30]*[.$Z$5]*MAGNET([.R$24]+[.$BB75])+[.S$30]*[.$Z$5]*MAGNET([.S$24]+[.$BB75])+[.T$30]*[.$Z$5]*MAGNET([.T$24]+[.$BB75])+[.U$30]*[.$Z$5]*MAGNET([.U$24]+[.$BB75])+[.V$30]*[.$Z$5]*MAGNET([.V$24]+[.$BB75])+[.W$30]*[.$Z$5]*MAGNET([.W$24]+[.$BB75])+[.X$30]*[.$Z$5]*MAGNET([.X$24]+[.$BB75])+[.Y$30]*[.$Z$5]*MAGNET([.Y$24]+[.$BB75])+[.Z$30]*[.$Z$5]*MAGNET([.Z$24]+[.$BB75])+[.AA$30]*[.$Z$5]*MAGNET([.AA$24]+[.$BB75])+[.AB$30]*[.$Z$5]*MAGNET([.AB$24]+[.$BB75])+[.AC$30]*[.$Z$5]*MAGNET([.AC$24]+[.$BB75])+[.AD$30]*[.$Z$5]*MAGNET([.AD$24]+[.$BB75])+[.AE$30]*[.$Z$5]*MAGNET([.AE$24]+[.$BB75])+[.AF$30]*[.$Z$5]*MAGNET([.AF$24]+[.$BB75])+[.AG$30]*[.$Z$5]*MAGNET([.AG$24]+[.$BB75])+[.D$30]*[.$Z$5]*MAGNET([.D$24]+[.$BB75])+[.AH$30]*[.$Z$5]*MAGNET([.AH$24]+[.BB75]) +[.AI$30]*[.$Z$5]*MAGNET([.AI$24]+[.BB75]) +[.AJ$30]*[.$Z$5]*MAGNET([.AJ$24]+[.BB75]) +[.AK$30]*[.$Z$5]*MAGNET([.AK$24]+[.BB75]) +[.AL$30]*[.$Z$5]*MAGNET([.AL$24]+[.BB75]) +[.AM$30]*[.$Z$5]*MAGNET([.AM$24]+[.BB75]) +[.AN$30]*[.$Z$5]*MAGNET([.AN$24]+[.BB75]) +[.AO$30]*[.$Z$5]*MAGNET([.AO$24]+[.BB75]) +[.AP$30]*[.$Z$5]*MAGNET([.AP$24]+[.$BB75])&#10;+[.AQ$30]*[.$Z$5]*MAGNET([.AQ$24]+[.$BB75])&#10;+[.AR$30]*[.$Z$5]*MAGNET([.AR$24]+[.$BB75])&#10;+[.AS$30]*[.$Z$5]*MAGNET([.AS$24]+[.$BB75])&#10;+[.AT$30]*[.$Z$5]*MAGNET([.AT$24]+[.$BB75])&#10;+[.AU$30]*[.$Z$5]*MAGNET([.AU$24]+[.$BB75])&#10;+[.AV$30]*[.$Z$5]*MAGNET([.AV$24]+[.$BB75])&#10;+[.AW$30]*[.$Z$5]*MAGNET([.AW$24]+[.$BB75])&#10;+[.AX$30]*[.$Z$5]*MAGNET([.AX$24]+[.$BB75])&#10;+[.AY$30]*[.$Z$5]*MAGNET([.AY$24]+[.$BB75]) +RAND()*[.$BH$13]" office:value-type="float" office:value="0" calcext:value-type="float">
            <text:p>0</text:p>
          </table:table-cell>
          <table:table-cell table:style-name="ce71" table:formula="of:=[.E$31]*[.$Z$5]*MAGNET([.E$24]+[.$BB75])+[.F$31]*[.$Z$5]*MAGNET([.F$24]+[.$BB75])+[.G$31]*[.$Z$5]*MAGNET([.G$24]+[.$BB75])+[.H$31]*[.$Z$5]*MAGNET([.H$24]+[.$BB75])+[.I$31]*[.$Z$5]*MAGNET([.I$24]+[.$BB75])+[.J$31]*[.$Z$5]*MAGNET([.J$24]+[.$BB75])+[.K$31]*[.$Z$5]*MAGNET([.K$24]+[.$BB75])+[.L$31]*[.$Z$5]*MAGNET([.L$24]+[.$BB75])+[.M$31]*[.$Z$5]*MAGNET([.M$24]+[.$BB75])+[.N$31]*[.$Z$5]*MAGNET([.N$24]+[.$BB75])+[.O$31]*[.$Z$5]*MAGNET([.O$24]+[.$BB75])+[.P$31]*[.$Z$5]*MAGNET([.P$24]+[.$BB75])+[.Q$31]*[.$Z$5]*MAGNET([.Q$24]+[.$BB75])+[.R$31]*[.$Z$5]*MAGNET([.R$24]+[.$BB75])+[.S$31]*[.$Z$5]*MAGNET([.S$24]+[.$BB75])+[.T$31]*[.$Z$5]*MAGNET([.T$24]+[.$BB75])+[.U$31]*[.$Z$5]*MAGNET([.U$24]+[.$BB75])+[.V$31]*[.$Z$5]*MAGNET([.V$24]+[.$BB75])+[.W$31]*[.$Z$5]*MAGNET([.W$24]+[.$BB75])+[.X$31]*[.$Z$5]*MAGNET([.X$24]+[.$BB75])+[.Y$31]*[.$Z$5]*MAGNET([.Y$24]+[.$BB75])+[.Z$31]*[.$Z$5]*MAGNET([.Z$24]+[.$BB75])+[.AA$31]*[.$Z$5]*MAGNET([.AA$24]+[.$BB75])+[.AB$31]*[.$Z$5]*MAGNET([.AB$24]+[.$BB75])+[.AC$31]*[.$Z$5]*MAGNET([.AC$24]+[.$BB75])+[.AD$31]*[.$Z$5]*MAGNET([.AD$24]+[.$BB75])+[.AE$31]*[.$Z$5]*MAGNET([.AE$24]+[.$BB75])+[.AF$31]*[.$Z$5]*MAGNET([.AF$24]+[.$BB75])+[.AG$31]*[.$Z$5]*MAGNET([.AG$24]+[.$BB75])+[.D$31]*[.$Z$5]*MAGNET([.D$24]+[.$BB75])+[.AH$31]*[.$Z$5]*MAGNET([.AH$24]+[.BB75]) +[.AI$31]*[.$Z$5]*MAGNET([.AI$24]+[.BB75]) +[.AJ$31]*[.$Z$5]*MAGNET([.AJ$24]+[.BB75]) +[.AK$31]*[.$Z$5]*MAGNET([.AK$24]+[.BB75]) +[.AL$31]*[.$Z$5]*MAGNET([.AL$24]+[.BB75]) +[.AM$31]*[.$Z$5]*MAGNET([.AM$24]+[.BB75]) +[.AN$31]*[.$Z$5]*MAGNET([.AN$24]+[.BB75]) +[.AO$31]*[.$Z$5]*MAGNET([.AO$24]+[.BB75]) +[.AP$31]*[.$Z$5]*MAGNET([.AP$24]+[.$BB75])&#10;+[.AQ$31]*[.$Z$5]*MAGNET([.AQ$24]+[.$BB75])&#10;+[.AR$31]*[.$Z$5]*MAGNET([.AR$24]+[.$BB75])&#10;+[.AS$31]*[.$Z$5]*MAGNET([.AS$24]+[.$BB75])&#10;+[.AT$31]*[.$Z$5]*MAGNET([.AT$24]+[.$BB75])&#10;+[.AU$31]*[.$Z$5]*MAGNET([.AU$24]+[.$BB75])&#10;+[.AV$31]*[.$Z$5]*MAGNET([.AV$24]+[.$BB75])&#10;+[.AW$31]*[.$Z$5]*MAGNET([.AW$24]+[.$BB75])&#10;+[.AX$31]*[.$Z$5]*MAGNET([.AX$24]+[.$BB75])&#10;+[.AY$31]*[.$Z$5]*MAGNET([.AY$24]+[.$BB75]) +RAND()*[.$BI$13]" office:value-type="float" office:value="0" calcext:value-type="float">
            <text:p>0</text:p>
          </table:table-cell>
          <table:table-cell table:style-name="ce71" table:formula="of:=[.E$32]*[.$Z$5]*MAGNET([.E$24]+[.$BB75])+[.F$32]*[.$Z$5]*MAGNET([.F$24]+[.$BB75])+[.G$32]*[.$Z$5]*MAGNET([.G$24]+[.$BB75])+[.H$32]*[.$Z$5]*MAGNET([.H$24]+[.$BB75])+[.I$32]*[.$Z$5]*MAGNET([.I$24]+[.$BB75])+[.J$32]*[.$Z$5]*MAGNET([.J$24]+[.$BB75])+[.K$32]*[.$Z$5]*MAGNET([.K$24]+[.$BB75])+[.L$32]*[.$Z$5]*MAGNET([.L$24]+[.$BB75])+[.M$32]*[.$Z$5]*MAGNET([.M$24]+[.$BB75])+[.N$32]*[.$Z$5]*MAGNET([.N$24]+[.$BB75])+[.O$32]*[.$Z$5]*MAGNET([.O$24]+[.$BB75])+[.P$32]*[.$Z$5]*MAGNET([.P$24]+[.$BB75])+[.Q$32]*[.$Z$5]*MAGNET([.Q$24]+[.$BB75])+[.R$32]*[.$Z$5]*MAGNET([.R$24]+[.$BB75])+[.S$32]*[.$Z$5]*MAGNET([.S$24]+[.$BB75])+[.T$32]*[.$Z$5]*MAGNET([.T$24]+[.$BB75])+[.U$32]*[.$Z$5]*MAGNET([.U$24]+[.$BB75])+[.V$32]*[.$Z$5]*MAGNET([.V$24]+[.$BB75])+[.W$32]*[.$Z$5]*MAGNET([.W$24]+[.$BB75])+[.X$32]*[.$Z$5]*MAGNET([.X$24]+[.$BB75])+[.Y$32]*[.$Z$5]*MAGNET([.Y$24]+[.$BB75])+[.Z$32]*[.$Z$5]*MAGNET([.Z$24]+[.$BB75])+[.AA$32]*[.$Z$5]*MAGNET([.AA$24]+[.$BB75])+[.AB$32]*[.$Z$5]*MAGNET([.AB$24]+[.$BB75])+[.AC$32]*[.$Z$5]*MAGNET([.AC$24]+[.$BB75])+[.AD$32]*[.$Z$5]*MAGNET([.AD$24]+[.$BB75])+[.AE$32]*[.$Z$5]*MAGNET([.AE$24]+[.$BB75])+[.AF$32]*[.$Z$5]*MAGNET([.AF$24]+[.$BB75])+[.AG$32]*[.$Z$5]*MAGNET([.AG$24]+[.$BB75])+[.D$32]*[.$Z$5]*MAGNET([.D$24]+[.$BB75])+[.AH$32]*[.$Z$5]*MAGNET([.AH$24]+[.BB75]) +[.AI$32]*[.$Z$5]*MAGNET([.AI$24]+[.BB75]) +[.AJ$32]*[.$Z$5]*MAGNET([.AJ$24]+[.BB75]) +[.AK$32]*[.$Z$5]*MAGNET([.AK$24]+[.BB75]) +[.AL$32]*[.$Z$5]*MAGNET([.AL$24]+[.BB75]) +[.AM$32]*[.$Z$5]*MAGNET([.AM$24]+[.BB75]) +[.AN$32]*[.$Z$5]*MAGNET([.AN$24]+[.BB75]) +[.AO$32]*[.$Z$5]*MAGNET([.AO$24]+[.BB75]) +[.AP$32]*[.$Z$5]*MAGNET([.AP$24]+[.$BB75])&#10;+[.AQ$32]*[.$Z$5]*MAGNET([.AQ$24]+[.$BB75])&#10;+[.AR$32]*[.$Z$5]*MAGNET([.AR$24]+[.$BB75])&#10;+[.AS$32]*[.$Z$5]*MAGNET([.AS$24]+[.$BB75])&#10;+[.AT$32]*[.$Z$5]*MAGNET([.AT$24]+[.$BB75])&#10;+[.AU$32]*[.$Z$5]*MAGNET([.AU$24]+[.$BB75])&#10;+[.AV$32]*[.$Z$5]*MAGNET([.AV$24]+[.$BB75])&#10;+[.AW$32]*[.$Z$5]*MAGNET([.AW$24]+[.$BB75])&#10;+[.AX$32]*[.$Z$5]*MAGNET([.AX$24]+[.$BB75])&#10;+[.AY$32]*[.$Z$5]*MAGNET([.AY$24]+[.$BB7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5]+0.002" office:value-type="float" office:value="0.122" calcext:value-type="float">
            <text:p>0.122</text:p>
          </table:table-cell>
          <table:table-cell table:formula="of:=[.BA76]*[.$D$6]" office:value-type="float" office:value="6.13238885980728" calcext:value-type="float">
            <text:p>6.132</text:p>
          </table:table-cell>
          <table:table-cell table:formula="of:=[.D$25]*[.$Z$5]*MAGNET([.D$24]+[.BB76])+[.E$25]*[.$Z$5]*MAGNET([.E$24]+[.BB76])+[.F$25]*[.$Z$5]*MAGNET([.F$24]+[.BB76])+[.G$25]*[.$Z$5]*MAGNET([.G$24]+[.BB76])+[.H$25]*[.$Z$5]*MAGNET([.H$24]+[.BB76])+[.I$25]*[.$Z$5]*MAGNET([.I$24]+[.BB76])+[.J$25]*[.$Z$5]*MAGNET([.J$24]+[.BB76])+[.K$25]*[.$Z$5]*MAGNET([.K$24]+[.BB76])+[.L$25]*[.$Z$5]*MAGNET([.L$24]+[.BB76])+[.M$25]*[.$Z$5]*MAGNET([.M$24]+[.BB76])+[.N$25]*[.$Z$5]*MAGNET([.N$24]+[.BB76])+[.O$25]*[.$Z$5]*MAGNET([.O$24]+[.BB76])+[.P$25]*[.$Z$5]*MAGNET([.P$24]+[.BB76])+[.Q$25]*[.$Z$5]*MAGNET([.Q$24]+[.BB76])+[.R$25]*[.$Z$5]*MAGNET([.R$24]+[.BB76])+[.S$25]*[.$Z$5]*MAGNET([.S$24]+[.BB76])+[.T$25]*[.$Z$5]*MAGNET([.T$24]+[.BB76])+[.U$25]*[.$Z$5]*MAGNET([.U$24]+[.BB76])+[.V$25]*[.$Z$5]*MAGNET([.V$24]+[.BB76])+[.W$25]*[.$Z$5]*MAGNET([.W$24]+[.BB76])+[.X$25]*[.$Z$5]*MAGNET([.X$24]+[.BB76])+[.Y$25]*[.$Z$5]*MAGNET([.Y$24]+[.BB76])+[.Z$25]*[.$Z$5]*MAGNET([.Z$24]+[.BB76])+[.AA$25]*[.$Z$5]*MAGNET([.AA$24]+[.BB76])+[.AB$25]*[.$Z$5]*MAGNET([.AB$24]+[.BB76])+[.AC$25]*[.$Z$5]*MAGNET([.AC$24]+[.BB76])+[.AD$25]*[.$Z$5]*MAGNET([.AD$24]+[.BB76])+[.AE$25]*[.$Z$5]*MAGNET([.AE$24]+[.BB76])+[.AF$25]*[.$Z$5]*MAGNET([.AF$24]+[.BB76])+[.AG$25]*[.$Z$5]*MAGNET([.AG$24]+[.BB76])+[.AH$25]*[.$Z$5]*MAGNET([.AH$24]+[.BB76]) +[.AI$25]*[.$Z$5]*MAGNET([.AI$24]+[.BB76]) +[.AJ$25]*[.$Z$5]*MAGNET([.AJ$24]+[.BB76]) +[.AK$25]*[.$Z$5]*MAGNET([.AK$24]+[.BB76]) +[.AL$25]*[.$Z$5]*MAGNET([.AL$24]+[.BB76]) +[.AM$25]*[.$Z$5]*MAGNET([.AM$24]+[.BB76]) +[.AN$25]*[.$Z$5]*MAGNET([.AN$24]+[.BB76]) +[.AO$25]*[.$Z$5]*MAGNET([.AO$24]+[.BB76])+RAND()*[.$BC$13]+[.AP$25]*[.$Z$5]*MAGNET([.AP$24]+[.BB76])&#10;+[.AQ$25]*[.$Z$5]*MAGNET([.AQ$24]+[.BB76])&#10;+[.AR$25]*[.$Z$5]*MAGNET([.AR$24]+[.BB76])&#10;+[.AS$25]*[.$Z$5]*MAGNET([.AS$24]+[.BB76])&#10;+[.AT$25]*[.$Z$5]*MAGNET([.AT$24]+[.BB76])&#10;+[.AU$25]*[.$Z$5]*MAGNET([.AU$24]+[.BB76])&#10;+[.AV$25]*[.$Z$5]*MAGNET([.AV$24]+[.BB76])&#10;+[.AW$25]*[.$Z$5]*MAGNET([.AW$24]+[.BB76])&#10;+[.AX$25]*[.$Z$5]*MAGNET([.AX$24]+[.BB76])&#10;+[.AY$25]*[.$Z$5]*MAGNET([.AY$24]+[.BB76])" office:value-type="float" office:value="-60.7134378976512" calcext:value-type="float">
            <text:p>-60.71</text:p>
          </table:table-cell>
          <table:table-cell table:style-name="ce70" table:formula="of:=[.E$26]*[.$Z$5]*MAGNET([.E$24]+[.$BB76])+[.F$26]*[.$Z$5]*MAGNET([.F$24]+[.$BB76])+[.G$26]*[.$Z$5]*MAGNET([.G$24]+[.$BB76])+[.H$26]*[.$Z$5]*MAGNET([.H$24]+[.$BB76])+[.I$26]*[.$Z$5]*MAGNET([.I$24]+[.$BB76])+[.J$26]*[.$Z$5]*MAGNET([.J$24]+[.$BB76])+[.K$26]*[.$Z$5]*MAGNET([.K$24]+[.$BB76])+[.L$26]*[.$Z$5]*MAGNET([.L$24]+[.$BB76])+[.M$26]*[.$Z$5]*MAGNET([.M$24]+[.$BB76])+[.N$26]*[.$Z$5]*MAGNET([.N$24]+[.$BB76])+[.O$26]*[.$Z$5]*MAGNET([.O$24]+[.$BB76])+[.P$26]*[.$Z$5]*MAGNET([.P$24]+[.$BB76])+[.Q$26]*[.$Z$5]*MAGNET([.Q$24]+[.$BB76])+[.R$26]*[.$Z$5]*MAGNET([.R$24]+[.$BB76])+[.S$26]*[.$Z$5]*MAGNET([.S$24]+[.$BB76])+[.T$26]*[.$Z$5]*MAGNET([.T$24]+[.$BB76])+[.U$26]*[.$Z$5]*MAGNET([.U$24]+[.$BB76])+[.V$26]*[.$Z$5]*MAGNET([.V$24]+[.$BB76])+[.W$26]*[.$Z$5]*MAGNET([.W$24]+[.$BB76])+[.X$26]*[.$Z$5]*MAGNET([.X$24]+[.$BB76])+[.Y$26]*[.$Z$5]*MAGNET([.Y$24]+[.$BB76])+[.Z$26]*[.$Z$5]*MAGNET([.Z$24]+[.$BB76])+[.AA$26]*[.$Z$5]*MAGNET([.AA$24]+[.$BB76])+[.AB$26]*[.$Z$5]*MAGNET([.AB$24]+[.$BB76])+[.AC$26]*[.$Z$5]*MAGNET([.AC$24]+[.$BB76])+[.AD$26]*[.$Z$5]*MAGNET([.AD$24]+[.$BB76])+[.AE$26]*[.$Z$5]*MAGNET([.AE$24]+[.$BB76])+[.AF$26]*[.$Z$5]*MAGNET([.AF$24]+[.$BB76])+[.AG$26]*[.$Z$5]*MAGNET([.AG$24]+[.$BB76])+[.D$26]*[.$Z$5]*MAGNET([.D$24]+[.$BB76])+[.AH$26]*[.$Z$5]*MAGNET([.AH$24]+[.BB76]) +[.AI$26]*[.$Z$5]*MAGNET([.AI$24]+[.BB76]) +[.AJ$26]*[.$Z$5]*MAGNET([.AJ$24]+[.BB76]) +[.AK$26]*[.$Z$5]*MAGNET([.AK$24]+[.BB76]) +[.AL$26]*[.$Z$5]*MAGNET([.AL$24]+[.BB76]) +[.AM$26]*[.$Z$5]*MAGNET([.AM$24]+[.BB76]) +[.AN$26]*[.$Z$5]*MAGNET([.AN$24]+[.BB76]) +[.AO$26]*[.$Z$5]*MAGNET([.AO$24]+[.BB76]) +[.AP$26]*[.$Z$5]*MAGNET([.AP$24]+[.$BB76])&#10;+[.AQ$26]*[.$Z$5]*MAGNET([.AQ$24]+[.$BB76])&#10;+[.AR$26]*[.$Z$5]*MAGNET([.AR$24]+[.$BB76])&#10;+[.AS$26]*[.$Z$5]*MAGNET([.AS$24]+[.$BB76])&#10;+[.AT$26]*[.$Z$5]*MAGNET([.AT$24]+[.$BB76])&#10;+[.AU$26]*[.$Z$5]*MAGNET([.AU$24]+[.$BB76])&#10;+[.AV$26]*[.$Z$5]*MAGNET([.AV$24]+[.$BB76])&#10;+[.AW$26]*[.$Z$5]*MAGNET([.AW$24]+[.$BB76])&#10;+[.AX$26]*[.$Z$5]*MAGNET([.AX$24]+[.$BB76])&#10;+[.AY$26]*[.$Z$5]*MAGNET([.AY$24]+[.$BB76]) +RAND()*[.$BD$13]" office:value-type="float" office:value="90.9990496190089" calcext:value-type="float">
            <text:p>91.00</text:p>
          </table:table-cell>
          <table:table-cell table:style-name="ce71" table:formula="of:=[.E$27]*[.$Z$5]*MAGNET([.E$24]+[.$BB76])+[.F$27]*[.$Z$5]*MAGNET([.F$24]+[.$BB76])+[.G$27]*[.$Z$5]*MAGNET([.G$24]+[.$BB76])+[.H$27]*[.$Z$5]*MAGNET([.H$24]+[.$BB76])+[.I$27]*[.$Z$5]*MAGNET([.I$24]+[.$BB76])+[.J$27]*[.$Z$5]*MAGNET([.J$24]+[.$BB76])+[.K$27]*[.$Z$5]*MAGNET([.K$24]+[.$BB76])+[.L$27]*[.$Z$5]*MAGNET([.L$24]+[.$BB76])+[.M$27]*[.$Z$5]*MAGNET([.M$24]+[.$BB76])+[.N$27]*[.$Z$5]*MAGNET([.N$24]+[.$BB76])+[.O$27]*[.$Z$5]*MAGNET([.O$24]+[.$BB76])+[.P$27]*[.$Z$5]*MAGNET([.P$24]+[.$BB76])+[.Q$27]*[.$Z$5]*MAGNET([.Q$24]+[.$BB76])+[.R$27]*[.$Z$5]*MAGNET([.R$24]+[.$BB76])+[.S$27]*[.$Z$5]*MAGNET([.S$24]+[.$BB76])+[.T$27]*[.$Z$5]*MAGNET([.T$24]+[.$BB76])+[.U$27]*[.$Z$5]*MAGNET([.U$24]+[.$BB76])+[.V$27]*[.$Z$5]*MAGNET([.V$24]+[.$BB76])+[.W$27]*[.$Z$5]*MAGNET([.W$24]+[.$BB76])+[.X$27]*[.$Z$5]*MAGNET([.X$24]+[.$BB76])+[.Y$27]*[.$Z$5]*MAGNET([.Y$24]+[.$BB76])+[.Z$27]*[.$Z$5]*MAGNET([.Z$24]+[.$BB76])+[.AA$27]*[.$Z$5]*MAGNET([.AA$24]+[.$BB76])+[.AB$27]*[.$Z$5]*MAGNET([.AB$24]+[.$BB76])+[.AC$27]*[.$Z$5]*MAGNET([.AC$24]+[.$BB76])+[.AD$27]*[.$Z$5]*MAGNET([.AD$24]+[.$BB76])+[.AE$27]*[.$Z$5]*MAGNET([.AE$24]+[.$BB76])+[.AF$27]*[.$Z$5]*MAGNET([.AF$24]+[.$BB76])+[.AG$27]*[.$Z$5]*MAGNET([.AG$24]+[.$BB76])+[.D$27]*[.$Z$5]*MAGNET([.D$24]+[.$BB76])+[.AH$27]*[.$Z$5]*MAGNET([.AH$24]+[.BB76]) +[.AI$27]*[.$Z$5]*MAGNET([.AI$24]+[.BB76]) +[.AJ$27]*[.$Z$5]*MAGNET([.AJ$24]+[.BB76]) +[.AK$27]*[.$Z$5]*MAGNET([.AK$24]+[.BB76]) +[.AL$27]*[.$Z$5]*MAGNET([.AL$24]+[.BB76]) +[.AM$27]*[.$Z$5]*MAGNET([.AM$24]+[.BB76]) +[.AN$27]*[.$Z$5]*MAGNET([.AN$24]+[.BB76]) +[.AO$27]*[.$Z$5]*MAGNET([.AO$24]+[.BB76]) +[.AP$27]*[.$Z$5]*MAGNET([.AP$24]+[.$BB76])&#10;+[.AQ$27]*[.$Z$5]*MAGNET([.AQ$24]+[.$BB76])&#10;+[.AR$27]*[.$Z$5]*MAGNET([.AR$24]+[.$BB76])&#10;+[.AS$27]*[.$Z$5]*MAGNET([.AS$24]+[.$BB76])&#10;+[.AT$27]*[.$Z$5]*MAGNET([.AT$24]+[.$BB76])&#10;+[.AU$27]*[.$Z$5]*MAGNET([.AU$24]+[.$BB76])&#10;+[.AV$27]*[.$Z$5]*MAGNET([.AV$24]+[.$BB76])&#10;+[.AW$27]*[.$Z$5]*MAGNET([.AW$24]+[.$BB76])&#10;+[.AX$27]*[.$Z$5]*MAGNET([.AX$24]+[.$BB76])&#10;+[.AY$27]*[.$Z$5]*MAGNET([.AY$24]+[.$BB76]) +RAND()*[.$BE$13]" office:value-type="float" office:value="-43.0379212158014" calcext:value-type="float">
            <text:p>-43.0379212158014</text:p>
          </table:table-cell>
          <table:table-cell table:style-name="ce71" table:formula="of:=[.E$28]*[.$Z$5]*MAGNET([.E$24]+[.$BB76])+[.F$28]*[.$Z$5]*MAGNET([.F$24]+[.$BB76])+[.G$28]*[.$Z$5]*MAGNET([.G$24]+[.$BB76])+[.H$28]*[.$Z$5]*MAGNET([.H$24]+[.$BB76])+[.I$28]*[.$Z$5]*MAGNET([.I$24]+[.$BB76])+[.J$28]*[.$Z$5]*MAGNET([.J$24]+[.$BB76])+[.K$28]*[.$Z$5]*MAGNET([.K$24]+[.$BB76])+[.L$28]*[.$Z$5]*MAGNET([.L$24]+[.$BB76])+[.M$28]*[.$Z$5]*MAGNET([.M$24]+[.$BB76])+[.N$28]*[.$Z$5]*MAGNET([.N$24]+[.$BB76])+[.O$28]*[.$Z$5]*MAGNET([.O$24]+[.$BB76])+[.P$28]*[.$Z$5]*MAGNET([.P$24]+[.$BB76])+[.Q$28]*[.$Z$5]*MAGNET([.Q$24]+[.$BB76])+[.R$28]*[.$Z$5]*MAGNET([.R$24]+[.$BB76])+[.S$28]*[.$Z$5]*MAGNET([.S$24]+[.$BB76])+[.T$28]*[.$Z$5]*MAGNET([.T$24]+[.$BB76])+[.U$28]*[.$Z$5]*MAGNET([.U$24]+[.$BB76])+[.V$28]*[.$Z$5]*MAGNET([.V$24]+[.$BB76])+[.W$28]*[.$Z$5]*MAGNET([.W$24]+[.$BB76])+[.X$28]*[.$Z$5]*MAGNET([.X$24]+[.$BB76])+[.Y$28]*[.$Z$5]*MAGNET([.Y$24]+[.$BB76])+[.Z$28]*[.$Z$5]*MAGNET([.Z$24]+[.$BB76])+[.AA$28]*[.$Z$5]*MAGNET([.AA$24]+[.$BB76])+[.AB$28]*[.$Z$5]*MAGNET([.AB$24]+[.$BB76])+[.AC$28]*[.$Z$5]*MAGNET([.AC$24]+[.$BB76])+[.AD$28]*[.$Z$5]*MAGNET([.AD$24]+[.$BB76])+[.AE$28]*[.$Z$5]*MAGNET([.AE$24]+[.$BB76])+[.AF$28]*[.$Z$5]*MAGNET([.AF$24]+[.$BB76])+[.AG$28]*[.$Z$5]*MAGNET([.AG$24]+[.$BB76])+[.D$28]*[.$Z$5]*MAGNET([.D$24]+[.$BB76])+[.AH$28]*[.$Z$5]*MAGNET([.AH$24]+[.BB76]) +[.AI$28]*[.$Z$5]*MAGNET([.AI$24]+[.BB76]) +[.AJ$28]*[.$Z$5]*MAGNET([.AJ$24]+[.BB76]) +[.AK$28]*[.$Z$5]*MAGNET([.AK$24]+[.BB76]) +[.AL$28]*[.$Z$5]*MAGNET([.AL$24]+[.BB76]) +[.AM$28]*[.$Z$5]*MAGNET([.AM$24]+[.BB76]) +[.AN$28]*[.$Z$5]*MAGNET([.AN$24]+[.BB76]) +[.AO$28]*[.$Z$5]*MAGNET([.AO$24]+[.BB76]) +[.AP$28]*[.$Z$5]*MAGNET([.AP$24]+[.$BB76])&#10;+[.AQ$28]*[.$Z$5]*MAGNET([.AQ$24]+[.$BB76])&#10;+[.AR$28]*[.$Z$5]*MAGNET([.AR$24]+[.$BB76])&#10;+[.AS$28]*[.$Z$5]*MAGNET([.AS$24]+[.$BB76])&#10;+[.AT$28]*[.$Z$5]*MAGNET([.AT$24]+[.$BB76])&#10;+[.AU$28]*[.$Z$5]*MAGNET([.AU$24]+[.$BB76])&#10;+[.AV$28]*[.$Z$5]*MAGNET([.AV$24]+[.$BB76])&#10;+[.AW$28]*[.$Z$5]*MAGNET([.AW$24]+[.$BB76])&#10;+[.AX$28]*[.$Z$5]*MAGNET([.AX$24]+[.$BB76])&#10;+[.AY$28]*[.$Z$5]*MAGNET([.AY$24]+[.$BB76]) +RAND()*[.$BF$13]" office:value-type="float" office:value="-4.43210333203275" calcext:value-type="float">
            <text:p>-4.43210333203275</text:p>
          </table:table-cell>
          <table:table-cell table:style-name="ce71" table:formula="of:=[.E$29]*[.$Z$5]*MAGNET([.E$24]+[.$BB76])+[.F$29]*[.$Z$5]*MAGNET([.F$24]+[.$BB76])+[.G$29]*[.$Z$5]*MAGNET([.G$24]+[.$BB76])+[.H$29]*[.$Z$5]*MAGNET([.H$24]+[.$BB76])+[.I$29]*[.$Z$5]*MAGNET([.I$24]+[.$BB76])+[.J$29]*[.$Z$5]*MAGNET([.J$24]+[.$BB76])+[.K$29]*[.$Z$5]*MAGNET([.K$24]+[.$BB76])+[.L$29]*[.$Z$5]*MAGNET([.L$24]+[.$BB76])+[.M$29]*[.$Z$5]*MAGNET([.M$24]+[.$BB76])+[.N$29]*[.$Z$5]*MAGNET([.N$24]+[.$BB76])+[.O$29]*[.$Z$5]*MAGNET([.O$24]+[.$BB76])+[.P$29]*[.$Z$5]*MAGNET([.P$24]+[.$BB76])+[.Q$29]*[.$Z$5]*MAGNET([.Q$24]+[.$BB76])+[.R$29]*[.$Z$5]*MAGNET([.R$24]+[.$BB76])+[.S$29]*[.$Z$5]*MAGNET([.S$24]+[.$BB76])+[.T$29]*[.$Z$5]*MAGNET([.T$24]+[.$BB76])+[.U$29]*[.$Z$5]*MAGNET([.U$24]+[.$BB76])+[.V$29]*[.$Z$5]*MAGNET([.V$24]+[.$BB76])+[.W$29]*[.$Z$5]*MAGNET([.W$24]+[.$BB76])+[.X$29]*[.$Z$5]*MAGNET([.X$24]+[.$BB76])+[.Y$29]*[.$Z$5]*MAGNET([.Y$24]+[.$BB76])+[.Z$29]*[.$Z$5]*MAGNET([.Z$24]+[.$BB76])+[.AA$29]*[.$Z$5]*MAGNET([.AA$24]+[.$BB76])+[.AB$29]*[.$Z$5]*MAGNET([.AB$24]+[.$BB76])+[.AC$29]*[.$Z$5]*MAGNET([.AC$24]+[.$BB76])+[.AD$29]*[.$Z$5]*MAGNET([.AD$24]+[.$BB76])+[.AE$29]*[.$Z$5]*MAGNET([.AE$24]+[.$BB76])+[.AF$29]*[.$Z$5]*MAGNET([.AF$24]+[.$BB76])+[.AG$29]*[.$Z$5]*MAGNET([.AG$24]+[.$BB76])+[.D$29]*[.$Z$5]*MAGNET([.D$24]+[.$BB76])+[.AH$29]*[.$Z$5]*MAGNET([.AH$24]+[.BB76]) +[.AI$29]*[.$Z$5]*MAGNET([.AI$24]+[.BB76]) +[.AJ$29]*[.$Z$5]*MAGNET([.AJ$24]+[.BB76]) +[.AK$29]*[.$Z$5]*MAGNET([.AK$24]+[.BB76]) +[.AL$29]*[.$Z$5]*MAGNET([.AL$24]+[.BB76]) +[.AM$29]*[.$Z$5]*MAGNET([.AM$24]+[.BB76]) +[.AN$29]*[.$Z$5]*MAGNET([.AN$24]+[.BB76]) +[.AO$29]*[.$Z$5]*MAGNET([.AO$24]+[.BB76]) +[.AP$29]*[.$Z$5]*MAGNET([.AP$24]+[.$BB76])&#10;+[.AQ$29]*[.$Z$5]*MAGNET([.AQ$24]+[.$BB76])&#10;+[.AR$29]*[.$Z$5]*MAGNET([.AR$24]+[.$BB76])&#10;+[.AS$29]*[.$Z$5]*MAGNET([.AS$24]+[.$BB76])&#10;+[.AT$29]*[.$Z$5]*MAGNET([.AT$24]+[.$BB76])&#10;+[.AU$29]*[.$Z$5]*MAGNET([.AU$24]+[.$BB76])&#10;+[.AV$29]*[.$Z$5]*MAGNET([.AV$24]+[.$BB76])&#10;+[.AW$29]*[.$Z$5]*MAGNET([.AW$24]+[.$BB76])&#10;+[.AX$29]*[.$Z$5]*MAGNET([.AX$24]+[.$BB76])&#10;+[.AY$29]*[.$Z$5]*MAGNET([.AY$24]+[.$BB76]) +RAND()*[.$BG$13]" office:value-type="float" office:value="23.8999265629201" calcext:value-type="float">
            <text:p>23.8999265629201</text:p>
          </table:table-cell>
          <table:table-cell table:style-name="ce71" table:formula="of:=[.E$30]*[.$Z$5]*MAGNET([.E$24]+[.$BB76])+[.F$30]*[.$Z$5]*MAGNET([.F$24]+[.$BB76])+[.G$30]*[.$Z$5]*MAGNET([.G$24]+[.$BB76])+[.H$30]*[.$Z$5]*MAGNET([.H$24]+[.$BB76])+[.I$30]*[.$Z$5]*MAGNET([.I$24]+[.$BB76])+[.J$30]*[.$Z$5]*MAGNET([.J$24]+[.$BB76])+[.K$30]*[.$Z$5]*MAGNET([.K$24]+[.$BB76])+[.L$30]*[.$Z$5]*MAGNET([.L$24]+[.$BB76])+[.M$30]*[.$Z$5]*MAGNET([.M$24]+[.$BB76])+[.N$30]*[.$Z$5]*MAGNET([.N$24]+[.$BB76])+[.O$30]*[.$Z$5]*MAGNET([.O$24]+[.$BB76])+[.P$30]*[.$Z$5]*MAGNET([.P$24]+[.$BB76])+[.Q$30]*[.$Z$5]*MAGNET([.Q$24]+[.$BB76])+[.R$30]*[.$Z$5]*MAGNET([.R$24]+[.$BB76])+[.S$30]*[.$Z$5]*MAGNET([.S$24]+[.$BB76])+[.T$30]*[.$Z$5]*MAGNET([.T$24]+[.$BB76])+[.U$30]*[.$Z$5]*MAGNET([.U$24]+[.$BB76])+[.V$30]*[.$Z$5]*MAGNET([.V$24]+[.$BB76])+[.W$30]*[.$Z$5]*MAGNET([.W$24]+[.$BB76])+[.X$30]*[.$Z$5]*MAGNET([.X$24]+[.$BB76])+[.Y$30]*[.$Z$5]*MAGNET([.Y$24]+[.$BB76])+[.Z$30]*[.$Z$5]*MAGNET([.Z$24]+[.$BB76])+[.AA$30]*[.$Z$5]*MAGNET([.AA$24]+[.$BB76])+[.AB$30]*[.$Z$5]*MAGNET([.AB$24]+[.$BB76])+[.AC$30]*[.$Z$5]*MAGNET([.AC$24]+[.$BB76])+[.AD$30]*[.$Z$5]*MAGNET([.AD$24]+[.$BB76])+[.AE$30]*[.$Z$5]*MAGNET([.AE$24]+[.$BB76])+[.AF$30]*[.$Z$5]*MAGNET([.AF$24]+[.$BB76])+[.AG$30]*[.$Z$5]*MAGNET([.AG$24]+[.$BB76])+[.D$30]*[.$Z$5]*MAGNET([.D$24]+[.$BB76])+[.AH$30]*[.$Z$5]*MAGNET([.AH$24]+[.BB76]) +[.AI$30]*[.$Z$5]*MAGNET([.AI$24]+[.BB76]) +[.AJ$30]*[.$Z$5]*MAGNET([.AJ$24]+[.BB76]) +[.AK$30]*[.$Z$5]*MAGNET([.AK$24]+[.BB76]) +[.AL$30]*[.$Z$5]*MAGNET([.AL$24]+[.BB76]) +[.AM$30]*[.$Z$5]*MAGNET([.AM$24]+[.BB76]) +[.AN$30]*[.$Z$5]*MAGNET([.AN$24]+[.BB76]) +[.AO$30]*[.$Z$5]*MAGNET([.AO$24]+[.BB76]) +[.AP$30]*[.$Z$5]*MAGNET([.AP$24]+[.$BB76])&#10;+[.AQ$30]*[.$Z$5]*MAGNET([.AQ$24]+[.$BB76])&#10;+[.AR$30]*[.$Z$5]*MAGNET([.AR$24]+[.$BB76])&#10;+[.AS$30]*[.$Z$5]*MAGNET([.AS$24]+[.$BB76])&#10;+[.AT$30]*[.$Z$5]*MAGNET([.AT$24]+[.$BB76])&#10;+[.AU$30]*[.$Z$5]*MAGNET([.AU$24]+[.$BB76])&#10;+[.AV$30]*[.$Z$5]*MAGNET([.AV$24]+[.$BB76])&#10;+[.AW$30]*[.$Z$5]*MAGNET([.AW$24]+[.$BB76])&#10;+[.AX$30]*[.$Z$5]*MAGNET([.AX$24]+[.$BB76])&#10;+[.AY$30]*[.$Z$5]*MAGNET([.AY$24]+[.$BB76]) +RAND()*[.$BH$13]" office:value-type="float" office:value="0" calcext:value-type="float">
            <text:p>0</text:p>
          </table:table-cell>
          <table:table-cell table:style-name="ce71" table:formula="of:=[.E$31]*[.$Z$5]*MAGNET([.E$24]+[.$BB76])+[.F$31]*[.$Z$5]*MAGNET([.F$24]+[.$BB76])+[.G$31]*[.$Z$5]*MAGNET([.G$24]+[.$BB76])+[.H$31]*[.$Z$5]*MAGNET([.H$24]+[.$BB76])+[.I$31]*[.$Z$5]*MAGNET([.I$24]+[.$BB76])+[.J$31]*[.$Z$5]*MAGNET([.J$24]+[.$BB76])+[.K$31]*[.$Z$5]*MAGNET([.K$24]+[.$BB76])+[.L$31]*[.$Z$5]*MAGNET([.L$24]+[.$BB76])+[.M$31]*[.$Z$5]*MAGNET([.M$24]+[.$BB76])+[.N$31]*[.$Z$5]*MAGNET([.N$24]+[.$BB76])+[.O$31]*[.$Z$5]*MAGNET([.O$24]+[.$BB76])+[.P$31]*[.$Z$5]*MAGNET([.P$24]+[.$BB76])+[.Q$31]*[.$Z$5]*MAGNET([.Q$24]+[.$BB76])+[.R$31]*[.$Z$5]*MAGNET([.R$24]+[.$BB76])+[.S$31]*[.$Z$5]*MAGNET([.S$24]+[.$BB76])+[.T$31]*[.$Z$5]*MAGNET([.T$24]+[.$BB76])+[.U$31]*[.$Z$5]*MAGNET([.U$24]+[.$BB76])+[.V$31]*[.$Z$5]*MAGNET([.V$24]+[.$BB76])+[.W$31]*[.$Z$5]*MAGNET([.W$24]+[.$BB76])+[.X$31]*[.$Z$5]*MAGNET([.X$24]+[.$BB76])+[.Y$31]*[.$Z$5]*MAGNET([.Y$24]+[.$BB76])+[.Z$31]*[.$Z$5]*MAGNET([.Z$24]+[.$BB76])+[.AA$31]*[.$Z$5]*MAGNET([.AA$24]+[.$BB76])+[.AB$31]*[.$Z$5]*MAGNET([.AB$24]+[.$BB76])+[.AC$31]*[.$Z$5]*MAGNET([.AC$24]+[.$BB76])+[.AD$31]*[.$Z$5]*MAGNET([.AD$24]+[.$BB76])+[.AE$31]*[.$Z$5]*MAGNET([.AE$24]+[.$BB76])+[.AF$31]*[.$Z$5]*MAGNET([.AF$24]+[.$BB76])+[.AG$31]*[.$Z$5]*MAGNET([.AG$24]+[.$BB76])+[.D$31]*[.$Z$5]*MAGNET([.D$24]+[.$BB76])+[.AH$31]*[.$Z$5]*MAGNET([.AH$24]+[.BB76]) +[.AI$31]*[.$Z$5]*MAGNET([.AI$24]+[.BB76]) +[.AJ$31]*[.$Z$5]*MAGNET([.AJ$24]+[.BB76]) +[.AK$31]*[.$Z$5]*MAGNET([.AK$24]+[.BB76]) +[.AL$31]*[.$Z$5]*MAGNET([.AL$24]+[.BB76]) +[.AM$31]*[.$Z$5]*MAGNET([.AM$24]+[.BB76]) +[.AN$31]*[.$Z$5]*MAGNET([.AN$24]+[.BB76]) +[.AO$31]*[.$Z$5]*MAGNET([.AO$24]+[.BB76]) +[.AP$31]*[.$Z$5]*MAGNET([.AP$24]+[.$BB76])&#10;+[.AQ$31]*[.$Z$5]*MAGNET([.AQ$24]+[.$BB76])&#10;+[.AR$31]*[.$Z$5]*MAGNET([.AR$24]+[.$BB76])&#10;+[.AS$31]*[.$Z$5]*MAGNET([.AS$24]+[.$BB76])&#10;+[.AT$31]*[.$Z$5]*MAGNET([.AT$24]+[.$BB76])&#10;+[.AU$31]*[.$Z$5]*MAGNET([.AU$24]+[.$BB76])&#10;+[.AV$31]*[.$Z$5]*MAGNET([.AV$24]+[.$BB76])&#10;+[.AW$31]*[.$Z$5]*MAGNET([.AW$24]+[.$BB76])&#10;+[.AX$31]*[.$Z$5]*MAGNET([.AX$24]+[.$BB76])&#10;+[.AY$31]*[.$Z$5]*MAGNET([.AY$24]+[.$BB76]) +RAND()*[.$BI$13]" office:value-type="float" office:value="0" calcext:value-type="float">
            <text:p>0</text:p>
          </table:table-cell>
          <table:table-cell table:style-name="ce71" table:formula="of:=[.E$32]*[.$Z$5]*MAGNET([.E$24]+[.$BB76])+[.F$32]*[.$Z$5]*MAGNET([.F$24]+[.$BB76])+[.G$32]*[.$Z$5]*MAGNET([.G$24]+[.$BB76])+[.H$32]*[.$Z$5]*MAGNET([.H$24]+[.$BB76])+[.I$32]*[.$Z$5]*MAGNET([.I$24]+[.$BB76])+[.J$32]*[.$Z$5]*MAGNET([.J$24]+[.$BB76])+[.K$32]*[.$Z$5]*MAGNET([.K$24]+[.$BB76])+[.L$32]*[.$Z$5]*MAGNET([.L$24]+[.$BB76])+[.M$32]*[.$Z$5]*MAGNET([.M$24]+[.$BB76])+[.N$32]*[.$Z$5]*MAGNET([.N$24]+[.$BB76])+[.O$32]*[.$Z$5]*MAGNET([.O$24]+[.$BB76])+[.P$32]*[.$Z$5]*MAGNET([.P$24]+[.$BB76])+[.Q$32]*[.$Z$5]*MAGNET([.Q$24]+[.$BB76])+[.R$32]*[.$Z$5]*MAGNET([.R$24]+[.$BB76])+[.S$32]*[.$Z$5]*MAGNET([.S$24]+[.$BB76])+[.T$32]*[.$Z$5]*MAGNET([.T$24]+[.$BB76])+[.U$32]*[.$Z$5]*MAGNET([.U$24]+[.$BB76])+[.V$32]*[.$Z$5]*MAGNET([.V$24]+[.$BB76])+[.W$32]*[.$Z$5]*MAGNET([.W$24]+[.$BB76])+[.X$32]*[.$Z$5]*MAGNET([.X$24]+[.$BB76])+[.Y$32]*[.$Z$5]*MAGNET([.Y$24]+[.$BB76])+[.Z$32]*[.$Z$5]*MAGNET([.Z$24]+[.$BB76])+[.AA$32]*[.$Z$5]*MAGNET([.AA$24]+[.$BB76])+[.AB$32]*[.$Z$5]*MAGNET([.AB$24]+[.$BB76])+[.AC$32]*[.$Z$5]*MAGNET([.AC$24]+[.$BB76])+[.AD$32]*[.$Z$5]*MAGNET([.AD$24]+[.$BB76])+[.AE$32]*[.$Z$5]*MAGNET([.AE$24]+[.$BB76])+[.AF$32]*[.$Z$5]*MAGNET([.AF$24]+[.$BB76])+[.AG$32]*[.$Z$5]*MAGNET([.AG$24]+[.$BB76])+[.D$32]*[.$Z$5]*MAGNET([.D$24]+[.$BB76])+[.AH$32]*[.$Z$5]*MAGNET([.AH$24]+[.BB76]) +[.AI$32]*[.$Z$5]*MAGNET([.AI$24]+[.BB76]) +[.AJ$32]*[.$Z$5]*MAGNET([.AJ$24]+[.BB76]) +[.AK$32]*[.$Z$5]*MAGNET([.AK$24]+[.BB76]) +[.AL$32]*[.$Z$5]*MAGNET([.AL$24]+[.BB76]) +[.AM$32]*[.$Z$5]*MAGNET([.AM$24]+[.BB76]) +[.AN$32]*[.$Z$5]*MAGNET([.AN$24]+[.BB76]) +[.AO$32]*[.$Z$5]*MAGNET([.AO$24]+[.BB76]) +[.AP$32]*[.$Z$5]*MAGNET([.AP$24]+[.$BB76])&#10;+[.AQ$32]*[.$Z$5]*MAGNET([.AQ$24]+[.$BB76])&#10;+[.AR$32]*[.$Z$5]*MAGNET([.AR$24]+[.$BB76])&#10;+[.AS$32]*[.$Z$5]*MAGNET([.AS$24]+[.$BB76])&#10;+[.AT$32]*[.$Z$5]*MAGNET([.AT$24]+[.$BB76])&#10;+[.AU$32]*[.$Z$5]*MAGNET([.AU$24]+[.$BB76])&#10;+[.AV$32]*[.$Z$5]*MAGNET([.AV$24]+[.$BB76])&#10;+[.AW$32]*[.$Z$5]*MAGNET([.AW$24]+[.$BB76])&#10;+[.AX$32]*[.$Z$5]*MAGNET([.AX$24]+[.$BB76])&#10;+[.AY$32]*[.$Z$5]*MAGNET([.AY$24]+[.$BB7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6]+0.002" office:value-type="float" office:value="0.124" calcext:value-type="float">
            <text:p>0.124</text:p>
          </table:table-cell>
          <table:table-cell table:formula="of:=[.BA77]*[.$D$6]" office:value-type="float" office:value="6.23291982472215" calcext:value-type="float">
            <text:p>6.233</text:p>
          </table:table-cell>
          <table:table-cell table:formula="of:=[.D$25]*[.$Z$5]*MAGNET([.D$24]+[.BB77])+[.E$25]*[.$Z$5]*MAGNET([.E$24]+[.BB77])+[.F$25]*[.$Z$5]*MAGNET([.F$24]+[.BB77])+[.G$25]*[.$Z$5]*MAGNET([.G$24]+[.BB77])+[.H$25]*[.$Z$5]*MAGNET([.H$24]+[.BB77])+[.I$25]*[.$Z$5]*MAGNET([.I$24]+[.BB77])+[.J$25]*[.$Z$5]*MAGNET([.J$24]+[.BB77])+[.K$25]*[.$Z$5]*MAGNET([.K$24]+[.BB77])+[.L$25]*[.$Z$5]*MAGNET([.L$24]+[.BB77])+[.M$25]*[.$Z$5]*MAGNET([.M$24]+[.BB77])+[.N$25]*[.$Z$5]*MAGNET([.N$24]+[.BB77])+[.O$25]*[.$Z$5]*MAGNET([.O$24]+[.BB77])+[.P$25]*[.$Z$5]*MAGNET([.P$24]+[.BB77])+[.Q$25]*[.$Z$5]*MAGNET([.Q$24]+[.BB77])+[.R$25]*[.$Z$5]*MAGNET([.R$24]+[.BB77])+[.S$25]*[.$Z$5]*MAGNET([.S$24]+[.BB77])+[.T$25]*[.$Z$5]*MAGNET([.T$24]+[.BB77])+[.U$25]*[.$Z$5]*MAGNET([.U$24]+[.BB77])+[.V$25]*[.$Z$5]*MAGNET([.V$24]+[.BB77])+[.W$25]*[.$Z$5]*MAGNET([.W$24]+[.BB77])+[.X$25]*[.$Z$5]*MAGNET([.X$24]+[.BB77])+[.Y$25]*[.$Z$5]*MAGNET([.Y$24]+[.BB77])+[.Z$25]*[.$Z$5]*MAGNET([.Z$24]+[.BB77])+[.AA$25]*[.$Z$5]*MAGNET([.AA$24]+[.BB77])+[.AB$25]*[.$Z$5]*MAGNET([.AB$24]+[.BB77])+[.AC$25]*[.$Z$5]*MAGNET([.AC$24]+[.BB77])+[.AD$25]*[.$Z$5]*MAGNET([.AD$24]+[.BB77])+[.AE$25]*[.$Z$5]*MAGNET([.AE$24]+[.BB77])+[.AF$25]*[.$Z$5]*MAGNET([.AF$24]+[.BB77])+[.AG$25]*[.$Z$5]*MAGNET([.AG$24]+[.BB77])+[.AH$25]*[.$Z$5]*MAGNET([.AH$24]+[.BB77]) +[.AI$25]*[.$Z$5]*MAGNET([.AI$24]+[.BB77]) +[.AJ$25]*[.$Z$5]*MAGNET([.AJ$24]+[.BB77]) +[.AK$25]*[.$Z$5]*MAGNET([.AK$24]+[.BB77]) +[.AL$25]*[.$Z$5]*MAGNET([.AL$24]+[.BB77]) +[.AM$25]*[.$Z$5]*MAGNET([.AM$24]+[.BB77]) +[.AN$25]*[.$Z$5]*MAGNET([.AN$24]+[.BB77]) +[.AO$25]*[.$Z$5]*MAGNET([.AO$24]+[.BB77])+RAND()*[.$BC$13]+[.AP$25]*[.$Z$5]*MAGNET([.AP$24]+[.BB77])&#10;+[.AQ$25]*[.$Z$5]*MAGNET([.AQ$24]+[.BB77])&#10;+[.AR$25]*[.$Z$5]*MAGNET([.AR$24]+[.BB77])&#10;+[.AS$25]*[.$Z$5]*MAGNET([.AS$24]+[.BB77])&#10;+[.AT$25]*[.$Z$5]*MAGNET([.AT$24]+[.BB77])&#10;+[.AU$25]*[.$Z$5]*MAGNET([.AU$24]+[.BB77])&#10;+[.AV$25]*[.$Z$5]*MAGNET([.AV$24]+[.BB77])&#10;+[.AW$25]*[.$Z$5]*MAGNET([.AW$24]+[.BB77])&#10;+[.AX$25]*[.$Z$5]*MAGNET([.AX$24]+[.BB77])&#10;+[.AY$25]*[.$Z$5]*MAGNET([.AY$24]+[.BB77])" office:value-type="float" office:value="-48.0960308868199" calcext:value-type="float">
            <text:p>-48.10</text:p>
          </table:table-cell>
          <table:table-cell table:style-name="ce70" table:formula="of:=[.E$26]*[.$Z$5]*MAGNET([.E$24]+[.$BB77])+[.F$26]*[.$Z$5]*MAGNET([.F$24]+[.$BB77])+[.G$26]*[.$Z$5]*MAGNET([.G$24]+[.$BB77])+[.H$26]*[.$Z$5]*MAGNET([.H$24]+[.$BB77])+[.I$26]*[.$Z$5]*MAGNET([.I$24]+[.$BB77])+[.J$26]*[.$Z$5]*MAGNET([.J$24]+[.$BB77])+[.K$26]*[.$Z$5]*MAGNET([.K$24]+[.$BB77])+[.L$26]*[.$Z$5]*MAGNET([.L$24]+[.$BB77])+[.M$26]*[.$Z$5]*MAGNET([.M$24]+[.$BB77])+[.N$26]*[.$Z$5]*MAGNET([.N$24]+[.$BB77])+[.O$26]*[.$Z$5]*MAGNET([.O$24]+[.$BB77])+[.P$26]*[.$Z$5]*MAGNET([.P$24]+[.$BB77])+[.Q$26]*[.$Z$5]*MAGNET([.Q$24]+[.$BB77])+[.R$26]*[.$Z$5]*MAGNET([.R$24]+[.$BB77])+[.S$26]*[.$Z$5]*MAGNET([.S$24]+[.$BB77])+[.T$26]*[.$Z$5]*MAGNET([.T$24]+[.$BB77])+[.U$26]*[.$Z$5]*MAGNET([.U$24]+[.$BB77])+[.V$26]*[.$Z$5]*MAGNET([.V$24]+[.$BB77])+[.W$26]*[.$Z$5]*MAGNET([.W$24]+[.$BB77])+[.X$26]*[.$Z$5]*MAGNET([.X$24]+[.$BB77])+[.Y$26]*[.$Z$5]*MAGNET([.Y$24]+[.$BB77])+[.Z$26]*[.$Z$5]*MAGNET([.Z$24]+[.$BB77])+[.AA$26]*[.$Z$5]*MAGNET([.AA$24]+[.$BB77])+[.AB$26]*[.$Z$5]*MAGNET([.AB$24]+[.$BB77])+[.AC$26]*[.$Z$5]*MAGNET([.AC$24]+[.$BB77])+[.AD$26]*[.$Z$5]*MAGNET([.AD$24]+[.$BB77])+[.AE$26]*[.$Z$5]*MAGNET([.AE$24]+[.$BB77])+[.AF$26]*[.$Z$5]*MAGNET([.AF$24]+[.$BB77])+[.AG$26]*[.$Z$5]*MAGNET([.AG$24]+[.$BB77])+[.D$26]*[.$Z$5]*MAGNET([.D$24]+[.$BB77])+[.AH$26]*[.$Z$5]*MAGNET([.AH$24]+[.BB77]) +[.AI$26]*[.$Z$5]*MAGNET([.AI$24]+[.BB77]) +[.AJ$26]*[.$Z$5]*MAGNET([.AJ$24]+[.BB77]) +[.AK$26]*[.$Z$5]*MAGNET([.AK$24]+[.BB77]) +[.AL$26]*[.$Z$5]*MAGNET([.AL$24]+[.BB77]) +[.AM$26]*[.$Z$5]*MAGNET([.AM$24]+[.BB77]) +[.AN$26]*[.$Z$5]*MAGNET([.AN$24]+[.BB77]) +[.AO$26]*[.$Z$5]*MAGNET([.AO$24]+[.BB77]) +[.AP$26]*[.$Z$5]*MAGNET([.AP$24]+[.$BB77])&#10;+[.AQ$26]*[.$Z$5]*MAGNET([.AQ$24]+[.$BB77])&#10;+[.AR$26]*[.$Z$5]*MAGNET([.AR$24]+[.$BB77])&#10;+[.AS$26]*[.$Z$5]*MAGNET([.AS$24]+[.$BB77])&#10;+[.AT$26]*[.$Z$5]*MAGNET([.AT$24]+[.$BB77])&#10;+[.AU$26]*[.$Z$5]*MAGNET([.AU$24]+[.$BB77])&#10;+[.AV$26]*[.$Z$5]*MAGNET([.AV$24]+[.$BB77])&#10;+[.AW$26]*[.$Z$5]*MAGNET([.AW$24]+[.$BB77])&#10;+[.AX$26]*[.$Z$5]*MAGNET([.AX$24]+[.$BB77])&#10;+[.AY$26]*[.$Z$5]*MAGNET([.AY$24]+[.$BB77]) +RAND()*[.$BD$13]" office:value-type="float" office:value="92.6962164833797" calcext:value-type="float">
            <text:p>92.70</text:p>
          </table:table-cell>
          <table:table-cell table:style-name="ce71" table:formula="of:=[.E$27]*[.$Z$5]*MAGNET([.E$24]+[.$BB77])+[.F$27]*[.$Z$5]*MAGNET([.F$24]+[.$BB77])+[.G$27]*[.$Z$5]*MAGNET([.G$24]+[.$BB77])+[.H$27]*[.$Z$5]*MAGNET([.H$24]+[.$BB77])+[.I$27]*[.$Z$5]*MAGNET([.I$24]+[.$BB77])+[.J$27]*[.$Z$5]*MAGNET([.J$24]+[.$BB77])+[.K$27]*[.$Z$5]*MAGNET([.K$24]+[.$BB77])+[.L$27]*[.$Z$5]*MAGNET([.L$24]+[.$BB77])+[.M$27]*[.$Z$5]*MAGNET([.M$24]+[.$BB77])+[.N$27]*[.$Z$5]*MAGNET([.N$24]+[.$BB77])+[.O$27]*[.$Z$5]*MAGNET([.O$24]+[.$BB77])+[.P$27]*[.$Z$5]*MAGNET([.P$24]+[.$BB77])+[.Q$27]*[.$Z$5]*MAGNET([.Q$24]+[.$BB77])+[.R$27]*[.$Z$5]*MAGNET([.R$24]+[.$BB77])+[.S$27]*[.$Z$5]*MAGNET([.S$24]+[.$BB77])+[.T$27]*[.$Z$5]*MAGNET([.T$24]+[.$BB77])+[.U$27]*[.$Z$5]*MAGNET([.U$24]+[.$BB77])+[.V$27]*[.$Z$5]*MAGNET([.V$24]+[.$BB77])+[.W$27]*[.$Z$5]*MAGNET([.W$24]+[.$BB77])+[.X$27]*[.$Z$5]*MAGNET([.X$24]+[.$BB77])+[.Y$27]*[.$Z$5]*MAGNET([.Y$24]+[.$BB77])+[.Z$27]*[.$Z$5]*MAGNET([.Z$24]+[.$BB77])+[.AA$27]*[.$Z$5]*MAGNET([.AA$24]+[.$BB77])+[.AB$27]*[.$Z$5]*MAGNET([.AB$24]+[.$BB77])+[.AC$27]*[.$Z$5]*MAGNET([.AC$24]+[.$BB77])+[.AD$27]*[.$Z$5]*MAGNET([.AD$24]+[.$BB77])+[.AE$27]*[.$Z$5]*MAGNET([.AE$24]+[.$BB77])+[.AF$27]*[.$Z$5]*MAGNET([.AF$24]+[.$BB77])+[.AG$27]*[.$Z$5]*MAGNET([.AG$24]+[.$BB77])+[.D$27]*[.$Z$5]*MAGNET([.D$24]+[.$BB77])+[.AH$27]*[.$Z$5]*MAGNET([.AH$24]+[.BB77]) +[.AI$27]*[.$Z$5]*MAGNET([.AI$24]+[.BB77]) +[.AJ$27]*[.$Z$5]*MAGNET([.AJ$24]+[.BB77]) +[.AK$27]*[.$Z$5]*MAGNET([.AK$24]+[.BB77]) +[.AL$27]*[.$Z$5]*MAGNET([.AL$24]+[.BB77]) +[.AM$27]*[.$Z$5]*MAGNET([.AM$24]+[.BB77]) +[.AN$27]*[.$Z$5]*MAGNET([.AN$24]+[.BB77]) +[.AO$27]*[.$Z$5]*MAGNET([.AO$24]+[.BB77]) +[.AP$27]*[.$Z$5]*MAGNET([.AP$24]+[.$BB77])&#10;+[.AQ$27]*[.$Z$5]*MAGNET([.AQ$24]+[.$BB77])&#10;+[.AR$27]*[.$Z$5]*MAGNET([.AR$24]+[.$BB77])&#10;+[.AS$27]*[.$Z$5]*MAGNET([.AS$24]+[.$BB77])&#10;+[.AT$27]*[.$Z$5]*MAGNET([.AT$24]+[.$BB77])&#10;+[.AU$27]*[.$Z$5]*MAGNET([.AU$24]+[.$BB77])&#10;+[.AV$27]*[.$Z$5]*MAGNET([.AV$24]+[.$BB77])&#10;+[.AW$27]*[.$Z$5]*MAGNET([.AW$24]+[.$BB77])&#10;+[.AX$27]*[.$Z$5]*MAGNET([.AX$24]+[.$BB77])&#10;+[.AY$27]*[.$Z$5]*MAGNET([.AY$24]+[.$BB77]) +RAND()*[.$BE$13]" office:value-type="float" office:value="-54.0609440695597" calcext:value-type="float">
            <text:p>-54.0609440695597</text:p>
          </table:table-cell>
          <table:table-cell table:style-name="ce71" table:formula="of:=[.E$28]*[.$Z$5]*MAGNET([.E$24]+[.$BB77])+[.F$28]*[.$Z$5]*MAGNET([.F$24]+[.$BB77])+[.G$28]*[.$Z$5]*MAGNET([.G$24]+[.$BB77])+[.H$28]*[.$Z$5]*MAGNET([.H$24]+[.$BB77])+[.I$28]*[.$Z$5]*MAGNET([.I$24]+[.$BB77])+[.J$28]*[.$Z$5]*MAGNET([.J$24]+[.$BB77])+[.K$28]*[.$Z$5]*MAGNET([.K$24]+[.$BB77])+[.L$28]*[.$Z$5]*MAGNET([.L$24]+[.$BB77])+[.M$28]*[.$Z$5]*MAGNET([.M$24]+[.$BB77])+[.N$28]*[.$Z$5]*MAGNET([.N$24]+[.$BB77])+[.O$28]*[.$Z$5]*MAGNET([.O$24]+[.$BB77])+[.P$28]*[.$Z$5]*MAGNET([.P$24]+[.$BB77])+[.Q$28]*[.$Z$5]*MAGNET([.Q$24]+[.$BB77])+[.R$28]*[.$Z$5]*MAGNET([.R$24]+[.$BB77])+[.S$28]*[.$Z$5]*MAGNET([.S$24]+[.$BB77])+[.T$28]*[.$Z$5]*MAGNET([.T$24]+[.$BB77])+[.U$28]*[.$Z$5]*MAGNET([.U$24]+[.$BB77])+[.V$28]*[.$Z$5]*MAGNET([.V$24]+[.$BB77])+[.W$28]*[.$Z$5]*MAGNET([.W$24]+[.$BB77])+[.X$28]*[.$Z$5]*MAGNET([.X$24]+[.$BB77])+[.Y$28]*[.$Z$5]*MAGNET([.Y$24]+[.$BB77])+[.Z$28]*[.$Z$5]*MAGNET([.Z$24]+[.$BB77])+[.AA$28]*[.$Z$5]*MAGNET([.AA$24]+[.$BB77])+[.AB$28]*[.$Z$5]*MAGNET([.AB$24]+[.$BB77])+[.AC$28]*[.$Z$5]*MAGNET([.AC$24]+[.$BB77])+[.AD$28]*[.$Z$5]*MAGNET([.AD$24]+[.$BB77])+[.AE$28]*[.$Z$5]*MAGNET([.AE$24]+[.$BB77])+[.AF$28]*[.$Z$5]*MAGNET([.AF$24]+[.$BB77])+[.AG$28]*[.$Z$5]*MAGNET([.AG$24]+[.$BB77])+[.D$28]*[.$Z$5]*MAGNET([.D$24]+[.$BB77])+[.AH$28]*[.$Z$5]*MAGNET([.AH$24]+[.BB77]) +[.AI$28]*[.$Z$5]*MAGNET([.AI$24]+[.BB77]) +[.AJ$28]*[.$Z$5]*MAGNET([.AJ$24]+[.BB77]) +[.AK$28]*[.$Z$5]*MAGNET([.AK$24]+[.BB77]) +[.AL$28]*[.$Z$5]*MAGNET([.AL$24]+[.BB77]) +[.AM$28]*[.$Z$5]*MAGNET([.AM$24]+[.BB77]) +[.AN$28]*[.$Z$5]*MAGNET([.AN$24]+[.BB77]) +[.AO$28]*[.$Z$5]*MAGNET([.AO$24]+[.BB77]) +[.AP$28]*[.$Z$5]*MAGNET([.AP$24]+[.$BB77])&#10;+[.AQ$28]*[.$Z$5]*MAGNET([.AQ$24]+[.$BB77])&#10;+[.AR$28]*[.$Z$5]*MAGNET([.AR$24]+[.$BB77])&#10;+[.AS$28]*[.$Z$5]*MAGNET([.AS$24]+[.$BB77])&#10;+[.AT$28]*[.$Z$5]*MAGNET([.AT$24]+[.$BB77])&#10;+[.AU$28]*[.$Z$5]*MAGNET([.AU$24]+[.$BB77])&#10;+[.AV$28]*[.$Z$5]*MAGNET([.AV$24]+[.$BB77])&#10;+[.AW$28]*[.$Z$5]*MAGNET([.AW$24]+[.$BB77])&#10;+[.AX$28]*[.$Z$5]*MAGNET([.AX$24]+[.$BB77])&#10;+[.AY$28]*[.$Z$5]*MAGNET([.AY$24]+[.$BB77]) +RAND()*[.$BF$13]" office:value-type="float" office:value="-5.73637094853292" calcext:value-type="float">
            <text:p>-5.73637094853292</text:p>
          </table:table-cell>
          <table:table-cell table:style-name="ce71" table:formula="of:=[.E$29]*[.$Z$5]*MAGNET([.E$24]+[.$BB77])+[.F$29]*[.$Z$5]*MAGNET([.F$24]+[.$BB77])+[.G$29]*[.$Z$5]*MAGNET([.G$24]+[.$BB77])+[.H$29]*[.$Z$5]*MAGNET([.H$24]+[.$BB77])+[.I$29]*[.$Z$5]*MAGNET([.I$24]+[.$BB77])+[.J$29]*[.$Z$5]*MAGNET([.J$24]+[.$BB77])+[.K$29]*[.$Z$5]*MAGNET([.K$24]+[.$BB77])+[.L$29]*[.$Z$5]*MAGNET([.L$24]+[.$BB77])+[.M$29]*[.$Z$5]*MAGNET([.M$24]+[.$BB77])+[.N$29]*[.$Z$5]*MAGNET([.N$24]+[.$BB77])+[.O$29]*[.$Z$5]*MAGNET([.O$24]+[.$BB77])+[.P$29]*[.$Z$5]*MAGNET([.P$24]+[.$BB77])+[.Q$29]*[.$Z$5]*MAGNET([.Q$24]+[.$BB77])+[.R$29]*[.$Z$5]*MAGNET([.R$24]+[.$BB77])+[.S$29]*[.$Z$5]*MAGNET([.S$24]+[.$BB77])+[.T$29]*[.$Z$5]*MAGNET([.T$24]+[.$BB77])+[.U$29]*[.$Z$5]*MAGNET([.U$24]+[.$BB77])+[.V$29]*[.$Z$5]*MAGNET([.V$24]+[.$BB77])+[.W$29]*[.$Z$5]*MAGNET([.W$24]+[.$BB77])+[.X$29]*[.$Z$5]*MAGNET([.X$24]+[.$BB77])+[.Y$29]*[.$Z$5]*MAGNET([.Y$24]+[.$BB77])+[.Z$29]*[.$Z$5]*MAGNET([.Z$24]+[.$BB77])+[.AA$29]*[.$Z$5]*MAGNET([.AA$24]+[.$BB77])+[.AB$29]*[.$Z$5]*MAGNET([.AB$24]+[.$BB77])+[.AC$29]*[.$Z$5]*MAGNET([.AC$24]+[.$BB77])+[.AD$29]*[.$Z$5]*MAGNET([.AD$24]+[.$BB77])+[.AE$29]*[.$Z$5]*MAGNET([.AE$24]+[.$BB77])+[.AF$29]*[.$Z$5]*MAGNET([.AF$24]+[.$BB77])+[.AG$29]*[.$Z$5]*MAGNET([.AG$24]+[.$BB77])+[.D$29]*[.$Z$5]*MAGNET([.D$24]+[.$BB77])+[.AH$29]*[.$Z$5]*MAGNET([.AH$24]+[.BB77]) +[.AI$29]*[.$Z$5]*MAGNET([.AI$24]+[.BB77]) +[.AJ$29]*[.$Z$5]*MAGNET([.AJ$24]+[.BB77]) +[.AK$29]*[.$Z$5]*MAGNET([.AK$24]+[.BB77]) +[.AL$29]*[.$Z$5]*MAGNET([.AL$24]+[.BB77]) +[.AM$29]*[.$Z$5]*MAGNET([.AM$24]+[.BB77]) +[.AN$29]*[.$Z$5]*MAGNET([.AN$24]+[.BB77]) +[.AO$29]*[.$Z$5]*MAGNET([.AO$24]+[.BB77]) +[.AP$29]*[.$Z$5]*MAGNET([.AP$24]+[.$BB77])&#10;+[.AQ$29]*[.$Z$5]*MAGNET([.AQ$24]+[.$BB77])&#10;+[.AR$29]*[.$Z$5]*MAGNET([.AR$24]+[.$BB77])&#10;+[.AS$29]*[.$Z$5]*MAGNET([.AS$24]+[.$BB77])&#10;+[.AT$29]*[.$Z$5]*MAGNET([.AT$24]+[.$BB77])&#10;+[.AU$29]*[.$Z$5]*MAGNET([.AU$24]+[.$BB77])&#10;+[.AV$29]*[.$Z$5]*MAGNET([.AV$24]+[.$BB77])&#10;+[.AW$29]*[.$Z$5]*MAGNET([.AW$24]+[.$BB77])&#10;+[.AX$29]*[.$Z$5]*MAGNET([.AX$24]+[.$BB77])&#10;+[.AY$29]*[.$Z$5]*MAGNET([.AY$24]+[.$BB77]) +RAND()*[.$BG$13]" office:value-type="float" office:value="28.0394944147481" calcext:value-type="float">
            <text:p>28.0394944147481</text:p>
          </table:table-cell>
          <table:table-cell table:style-name="ce71" table:formula="of:=[.E$30]*[.$Z$5]*MAGNET([.E$24]+[.$BB77])+[.F$30]*[.$Z$5]*MAGNET([.F$24]+[.$BB77])+[.G$30]*[.$Z$5]*MAGNET([.G$24]+[.$BB77])+[.H$30]*[.$Z$5]*MAGNET([.H$24]+[.$BB77])+[.I$30]*[.$Z$5]*MAGNET([.I$24]+[.$BB77])+[.J$30]*[.$Z$5]*MAGNET([.J$24]+[.$BB77])+[.K$30]*[.$Z$5]*MAGNET([.K$24]+[.$BB77])+[.L$30]*[.$Z$5]*MAGNET([.L$24]+[.$BB77])+[.M$30]*[.$Z$5]*MAGNET([.M$24]+[.$BB77])+[.N$30]*[.$Z$5]*MAGNET([.N$24]+[.$BB77])+[.O$30]*[.$Z$5]*MAGNET([.O$24]+[.$BB77])+[.P$30]*[.$Z$5]*MAGNET([.P$24]+[.$BB77])+[.Q$30]*[.$Z$5]*MAGNET([.Q$24]+[.$BB77])+[.R$30]*[.$Z$5]*MAGNET([.R$24]+[.$BB77])+[.S$30]*[.$Z$5]*MAGNET([.S$24]+[.$BB77])+[.T$30]*[.$Z$5]*MAGNET([.T$24]+[.$BB77])+[.U$30]*[.$Z$5]*MAGNET([.U$24]+[.$BB77])+[.V$30]*[.$Z$5]*MAGNET([.V$24]+[.$BB77])+[.W$30]*[.$Z$5]*MAGNET([.W$24]+[.$BB77])+[.X$30]*[.$Z$5]*MAGNET([.X$24]+[.$BB77])+[.Y$30]*[.$Z$5]*MAGNET([.Y$24]+[.$BB77])+[.Z$30]*[.$Z$5]*MAGNET([.Z$24]+[.$BB77])+[.AA$30]*[.$Z$5]*MAGNET([.AA$24]+[.$BB77])+[.AB$30]*[.$Z$5]*MAGNET([.AB$24]+[.$BB77])+[.AC$30]*[.$Z$5]*MAGNET([.AC$24]+[.$BB77])+[.AD$30]*[.$Z$5]*MAGNET([.AD$24]+[.$BB77])+[.AE$30]*[.$Z$5]*MAGNET([.AE$24]+[.$BB77])+[.AF$30]*[.$Z$5]*MAGNET([.AF$24]+[.$BB77])+[.AG$30]*[.$Z$5]*MAGNET([.AG$24]+[.$BB77])+[.D$30]*[.$Z$5]*MAGNET([.D$24]+[.$BB77])+[.AH$30]*[.$Z$5]*MAGNET([.AH$24]+[.BB77]) +[.AI$30]*[.$Z$5]*MAGNET([.AI$24]+[.BB77]) +[.AJ$30]*[.$Z$5]*MAGNET([.AJ$24]+[.BB77]) +[.AK$30]*[.$Z$5]*MAGNET([.AK$24]+[.BB77]) +[.AL$30]*[.$Z$5]*MAGNET([.AL$24]+[.BB77]) +[.AM$30]*[.$Z$5]*MAGNET([.AM$24]+[.BB77]) +[.AN$30]*[.$Z$5]*MAGNET([.AN$24]+[.BB77]) +[.AO$30]*[.$Z$5]*MAGNET([.AO$24]+[.BB77]) +[.AP$30]*[.$Z$5]*MAGNET([.AP$24]+[.$BB77])&#10;+[.AQ$30]*[.$Z$5]*MAGNET([.AQ$24]+[.$BB77])&#10;+[.AR$30]*[.$Z$5]*MAGNET([.AR$24]+[.$BB77])&#10;+[.AS$30]*[.$Z$5]*MAGNET([.AS$24]+[.$BB77])&#10;+[.AT$30]*[.$Z$5]*MAGNET([.AT$24]+[.$BB77])&#10;+[.AU$30]*[.$Z$5]*MAGNET([.AU$24]+[.$BB77])&#10;+[.AV$30]*[.$Z$5]*MAGNET([.AV$24]+[.$BB77])&#10;+[.AW$30]*[.$Z$5]*MAGNET([.AW$24]+[.$BB77])&#10;+[.AX$30]*[.$Z$5]*MAGNET([.AX$24]+[.$BB77])&#10;+[.AY$30]*[.$Z$5]*MAGNET([.AY$24]+[.$BB77]) +RAND()*[.$BH$13]" office:value-type="float" office:value="0" calcext:value-type="float">
            <text:p>0</text:p>
          </table:table-cell>
          <table:table-cell table:style-name="ce71" table:formula="of:=[.E$31]*[.$Z$5]*MAGNET([.E$24]+[.$BB77])+[.F$31]*[.$Z$5]*MAGNET([.F$24]+[.$BB77])+[.G$31]*[.$Z$5]*MAGNET([.G$24]+[.$BB77])+[.H$31]*[.$Z$5]*MAGNET([.H$24]+[.$BB77])+[.I$31]*[.$Z$5]*MAGNET([.I$24]+[.$BB77])+[.J$31]*[.$Z$5]*MAGNET([.J$24]+[.$BB77])+[.K$31]*[.$Z$5]*MAGNET([.K$24]+[.$BB77])+[.L$31]*[.$Z$5]*MAGNET([.L$24]+[.$BB77])+[.M$31]*[.$Z$5]*MAGNET([.M$24]+[.$BB77])+[.N$31]*[.$Z$5]*MAGNET([.N$24]+[.$BB77])+[.O$31]*[.$Z$5]*MAGNET([.O$24]+[.$BB77])+[.P$31]*[.$Z$5]*MAGNET([.P$24]+[.$BB77])+[.Q$31]*[.$Z$5]*MAGNET([.Q$24]+[.$BB77])+[.R$31]*[.$Z$5]*MAGNET([.R$24]+[.$BB77])+[.S$31]*[.$Z$5]*MAGNET([.S$24]+[.$BB77])+[.T$31]*[.$Z$5]*MAGNET([.T$24]+[.$BB77])+[.U$31]*[.$Z$5]*MAGNET([.U$24]+[.$BB77])+[.V$31]*[.$Z$5]*MAGNET([.V$24]+[.$BB77])+[.W$31]*[.$Z$5]*MAGNET([.W$24]+[.$BB77])+[.X$31]*[.$Z$5]*MAGNET([.X$24]+[.$BB77])+[.Y$31]*[.$Z$5]*MAGNET([.Y$24]+[.$BB77])+[.Z$31]*[.$Z$5]*MAGNET([.Z$24]+[.$BB77])+[.AA$31]*[.$Z$5]*MAGNET([.AA$24]+[.$BB77])+[.AB$31]*[.$Z$5]*MAGNET([.AB$24]+[.$BB77])+[.AC$31]*[.$Z$5]*MAGNET([.AC$24]+[.$BB77])+[.AD$31]*[.$Z$5]*MAGNET([.AD$24]+[.$BB77])+[.AE$31]*[.$Z$5]*MAGNET([.AE$24]+[.$BB77])+[.AF$31]*[.$Z$5]*MAGNET([.AF$24]+[.$BB77])+[.AG$31]*[.$Z$5]*MAGNET([.AG$24]+[.$BB77])+[.D$31]*[.$Z$5]*MAGNET([.D$24]+[.$BB77])+[.AH$31]*[.$Z$5]*MAGNET([.AH$24]+[.BB77]) +[.AI$31]*[.$Z$5]*MAGNET([.AI$24]+[.BB77]) +[.AJ$31]*[.$Z$5]*MAGNET([.AJ$24]+[.BB77]) +[.AK$31]*[.$Z$5]*MAGNET([.AK$24]+[.BB77]) +[.AL$31]*[.$Z$5]*MAGNET([.AL$24]+[.BB77]) +[.AM$31]*[.$Z$5]*MAGNET([.AM$24]+[.BB77]) +[.AN$31]*[.$Z$5]*MAGNET([.AN$24]+[.BB77]) +[.AO$31]*[.$Z$5]*MAGNET([.AO$24]+[.BB77]) +[.AP$31]*[.$Z$5]*MAGNET([.AP$24]+[.$BB77])&#10;+[.AQ$31]*[.$Z$5]*MAGNET([.AQ$24]+[.$BB77])&#10;+[.AR$31]*[.$Z$5]*MAGNET([.AR$24]+[.$BB77])&#10;+[.AS$31]*[.$Z$5]*MAGNET([.AS$24]+[.$BB77])&#10;+[.AT$31]*[.$Z$5]*MAGNET([.AT$24]+[.$BB77])&#10;+[.AU$31]*[.$Z$5]*MAGNET([.AU$24]+[.$BB77])&#10;+[.AV$31]*[.$Z$5]*MAGNET([.AV$24]+[.$BB77])&#10;+[.AW$31]*[.$Z$5]*MAGNET([.AW$24]+[.$BB77])&#10;+[.AX$31]*[.$Z$5]*MAGNET([.AX$24]+[.$BB77])&#10;+[.AY$31]*[.$Z$5]*MAGNET([.AY$24]+[.$BB77]) +RAND()*[.$BI$13]" office:value-type="float" office:value="0" calcext:value-type="float">
            <text:p>0</text:p>
          </table:table-cell>
          <table:table-cell table:style-name="ce71" table:formula="of:=[.E$32]*[.$Z$5]*MAGNET([.E$24]+[.$BB77])+[.F$32]*[.$Z$5]*MAGNET([.F$24]+[.$BB77])+[.G$32]*[.$Z$5]*MAGNET([.G$24]+[.$BB77])+[.H$32]*[.$Z$5]*MAGNET([.H$24]+[.$BB77])+[.I$32]*[.$Z$5]*MAGNET([.I$24]+[.$BB77])+[.J$32]*[.$Z$5]*MAGNET([.J$24]+[.$BB77])+[.K$32]*[.$Z$5]*MAGNET([.K$24]+[.$BB77])+[.L$32]*[.$Z$5]*MAGNET([.L$24]+[.$BB77])+[.M$32]*[.$Z$5]*MAGNET([.M$24]+[.$BB77])+[.N$32]*[.$Z$5]*MAGNET([.N$24]+[.$BB77])+[.O$32]*[.$Z$5]*MAGNET([.O$24]+[.$BB77])+[.P$32]*[.$Z$5]*MAGNET([.P$24]+[.$BB77])+[.Q$32]*[.$Z$5]*MAGNET([.Q$24]+[.$BB77])+[.R$32]*[.$Z$5]*MAGNET([.R$24]+[.$BB77])+[.S$32]*[.$Z$5]*MAGNET([.S$24]+[.$BB77])+[.T$32]*[.$Z$5]*MAGNET([.T$24]+[.$BB77])+[.U$32]*[.$Z$5]*MAGNET([.U$24]+[.$BB77])+[.V$32]*[.$Z$5]*MAGNET([.V$24]+[.$BB77])+[.W$32]*[.$Z$5]*MAGNET([.W$24]+[.$BB77])+[.X$32]*[.$Z$5]*MAGNET([.X$24]+[.$BB77])+[.Y$32]*[.$Z$5]*MAGNET([.Y$24]+[.$BB77])+[.Z$32]*[.$Z$5]*MAGNET([.Z$24]+[.$BB77])+[.AA$32]*[.$Z$5]*MAGNET([.AA$24]+[.$BB77])+[.AB$32]*[.$Z$5]*MAGNET([.AB$24]+[.$BB77])+[.AC$32]*[.$Z$5]*MAGNET([.AC$24]+[.$BB77])+[.AD$32]*[.$Z$5]*MAGNET([.AD$24]+[.$BB77])+[.AE$32]*[.$Z$5]*MAGNET([.AE$24]+[.$BB77])+[.AF$32]*[.$Z$5]*MAGNET([.AF$24]+[.$BB77])+[.AG$32]*[.$Z$5]*MAGNET([.AG$24]+[.$BB77])+[.D$32]*[.$Z$5]*MAGNET([.D$24]+[.$BB77])+[.AH$32]*[.$Z$5]*MAGNET([.AH$24]+[.BB77]) +[.AI$32]*[.$Z$5]*MAGNET([.AI$24]+[.BB77]) +[.AJ$32]*[.$Z$5]*MAGNET([.AJ$24]+[.BB77]) +[.AK$32]*[.$Z$5]*MAGNET([.AK$24]+[.BB77]) +[.AL$32]*[.$Z$5]*MAGNET([.AL$24]+[.BB77]) +[.AM$32]*[.$Z$5]*MAGNET([.AM$24]+[.BB77]) +[.AN$32]*[.$Z$5]*MAGNET([.AN$24]+[.BB77]) +[.AO$32]*[.$Z$5]*MAGNET([.AO$24]+[.BB77]) +[.AP$32]*[.$Z$5]*MAGNET([.AP$24]+[.$BB77])&#10;+[.AQ$32]*[.$Z$5]*MAGNET([.AQ$24]+[.$BB77])&#10;+[.AR$32]*[.$Z$5]*MAGNET([.AR$24]+[.$BB77])&#10;+[.AS$32]*[.$Z$5]*MAGNET([.AS$24]+[.$BB77])&#10;+[.AT$32]*[.$Z$5]*MAGNET([.AT$24]+[.$BB77])&#10;+[.AU$32]*[.$Z$5]*MAGNET([.AU$24]+[.$BB77])&#10;+[.AV$32]*[.$Z$5]*MAGNET([.AV$24]+[.$BB77])&#10;+[.AW$32]*[.$Z$5]*MAGNET([.AW$24]+[.$BB77])&#10;+[.AX$32]*[.$Z$5]*MAGNET([.AX$24]+[.$BB77])&#10;+[.AY$32]*[.$Z$5]*MAGNET([.AY$24]+[.$BB7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7]+0.002" office:value-type="float" office:value="0.126" calcext:value-type="float">
            <text:p>0.126</text:p>
          </table:table-cell>
          <table:table-cell table:formula="of:=[.BA78]*[.$D$6]" office:value-type="float" office:value="6.33345078963703" calcext:value-type="float">
            <text:p>6.333</text:p>
          </table:table-cell>
          <table:table-cell table:formula="of:=[.D$25]*[.$Z$5]*MAGNET([.D$24]+[.BB78])+[.E$25]*[.$Z$5]*MAGNET([.E$24]+[.BB78])+[.F$25]*[.$Z$5]*MAGNET([.F$24]+[.BB78])+[.G$25]*[.$Z$5]*MAGNET([.G$24]+[.BB78])+[.H$25]*[.$Z$5]*MAGNET([.H$24]+[.BB78])+[.I$25]*[.$Z$5]*MAGNET([.I$24]+[.BB78])+[.J$25]*[.$Z$5]*MAGNET([.J$24]+[.BB78])+[.K$25]*[.$Z$5]*MAGNET([.K$24]+[.BB78])+[.L$25]*[.$Z$5]*MAGNET([.L$24]+[.BB78])+[.M$25]*[.$Z$5]*MAGNET([.M$24]+[.BB78])+[.N$25]*[.$Z$5]*MAGNET([.N$24]+[.BB78])+[.O$25]*[.$Z$5]*MAGNET([.O$24]+[.BB78])+[.P$25]*[.$Z$5]*MAGNET([.P$24]+[.BB78])+[.Q$25]*[.$Z$5]*MAGNET([.Q$24]+[.BB78])+[.R$25]*[.$Z$5]*MAGNET([.R$24]+[.BB78])+[.S$25]*[.$Z$5]*MAGNET([.S$24]+[.BB78])+[.T$25]*[.$Z$5]*MAGNET([.T$24]+[.BB78])+[.U$25]*[.$Z$5]*MAGNET([.U$24]+[.BB78])+[.V$25]*[.$Z$5]*MAGNET([.V$24]+[.BB78])+[.W$25]*[.$Z$5]*MAGNET([.W$24]+[.BB78])+[.X$25]*[.$Z$5]*MAGNET([.X$24]+[.BB78])+[.Y$25]*[.$Z$5]*MAGNET([.Y$24]+[.BB78])+[.Z$25]*[.$Z$5]*MAGNET([.Z$24]+[.BB78])+[.AA$25]*[.$Z$5]*MAGNET([.AA$24]+[.BB78])+[.AB$25]*[.$Z$5]*MAGNET([.AB$24]+[.BB78])+[.AC$25]*[.$Z$5]*MAGNET([.AC$24]+[.BB78])+[.AD$25]*[.$Z$5]*MAGNET([.AD$24]+[.BB78])+[.AE$25]*[.$Z$5]*MAGNET([.AE$24]+[.BB78])+[.AF$25]*[.$Z$5]*MAGNET([.AF$24]+[.BB78])+[.AG$25]*[.$Z$5]*MAGNET([.AG$24]+[.BB78])+[.AH$25]*[.$Z$5]*MAGNET([.AH$24]+[.BB78]) +[.AI$25]*[.$Z$5]*MAGNET([.AI$24]+[.BB78]) +[.AJ$25]*[.$Z$5]*MAGNET([.AJ$24]+[.BB78]) +[.AK$25]*[.$Z$5]*MAGNET([.AK$24]+[.BB78]) +[.AL$25]*[.$Z$5]*MAGNET([.AL$24]+[.BB78]) +[.AM$25]*[.$Z$5]*MAGNET([.AM$24]+[.BB78]) +[.AN$25]*[.$Z$5]*MAGNET([.AN$24]+[.BB78]) +[.AO$25]*[.$Z$5]*MAGNET([.AO$24]+[.BB78])+RAND()*[.$BC$13]+[.AP$25]*[.$Z$5]*MAGNET([.AP$24]+[.BB78])&#10;+[.AQ$25]*[.$Z$5]*MAGNET([.AQ$24]+[.BB78])&#10;+[.AR$25]*[.$Z$5]*MAGNET([.AR$24]+[.BB78])&#10;+[.AS$25]*[.$Z$5]*MAGNET([.AS$24]+[.BB78])&#10;+[.AT$25]*[.$Z$5]*MAGNET([.AT$24]+[.BB78])&#10;+[.AU$25]*[.$Z$5]*MAGNET([.AU$24]+[.BB78])&#10;+[.AV$25]*[.$Z$5]*MAGNET([.AV$24]+[.BB78])&#10;+[.AW$25]*[.$Z$5]*MAGNET([.AW$24]+[.BB78])&#10;+[.AX$25]*[.$Z$5]*MAGNET([.AX$24]+[.BB78])&#10;+[.AY$25]*[.$Z$5]*MAGNET([.AY$24]+[.BB78])" office:value-type="float" office:value="-36.0220026985476" calcext:value-type="float">
            <text:p>-36.02</text:p>
          </table:table-cell>
          <table:table-cell table:style-name="ce70" table:formula="of:=[.E$26]*[.$Z$5]*MAGNET([.E$24]+[.$BB78])+[.F$26]*[.$Z$5]*MAGNET([.F$24]+[.$BB78])+[.G$26]*[.$Z$5]*MAGNET([.G$24]+[.$BB78])+[.H$26]*[.$Z$5]*MAGNET([.H$24]+[.$BB78])+[.I$26]*[.$Z$5]*MAGNET([.I$24]+[.$BB78])+[.J$26]*[.$Z$5]*MAGNET([.J$24]+[.$BB78])+[.K$26]*[.$Z$5]*MAGNET([.K$24]+[.$BB78])+[.L$26]*[.$Z$5]*MAGNET([.L$24]+[.$BB78])+[.M$26]*[.$Z$5]*MAGNET([.M$24]+[.$BB78])+[.N$26]*[.$Z$5]*MAGNET([.N$24]+[.$BB78])+[.O$26]*[.$Z$5]*MAGNET([.O$24]+[.$BB78])+[.P$26]*[.$Z$5]*MAGNET([.P$24]+[.$BB78])+[.Q$26]*[.$Z$5]*MAGNET([.Q$24]+[.$BB78])+[.R$26]*[.$Z$5]*MAGNET([.R$24]+[.$BB78])+[.S$26]*[.$Z$5]*MAGNET([.S$24]+[.$BB78])+[.T$26]*[.$Z$5]*MAGNET([.T$24]+[.$BB78])+[.U$26]*[.$Z$5]*MAGNET([.U$24]+[.$BB78])+[.V$26]*[.$Z$5]*MAGNET([.V$24]+[.$BB78])+[.W$26]*[.$Z$5]*MAGNET([.W$24]+[.$BB78])+[.X$26]*[.$Z$5]*MAGNET([.X$24]+[.$BB78])+[.Y$26]*[.$Z$5]*MAGNET([.Y$24]+[.$BB78])+[.Z$26]*[.$Z$5]*MAGNET([.Z$24]+[.$BB78])+[.AA$26]*[.$Z$5]*MAGNET([.AA$24]+[.$BB78])+[.AB$26]*[.$Z$5]*MAGNET([.AB$24]+[.$BB78])+[.AC$26]*[.$Z$5]*MAGNET([.AC$24]+[.$BB78])+[.AD$26]*[.$Z$5]*MAGNET([.AD$24]+[.$BB78])+[.AE$26]*[.$Z$5]*MAGNET([.AE$24]+[.$BB78])+[.AF$26]*[.$Z$5]*MAGNET([.AF$24]+[.$BB78])+[.AG$26]*[.$Z$5]*MAGNET([.AG$24]+[.$BB78])+[.D$26]*[.$Z$5]*MAGNET([.D$24]+[.$BB78])+[.AH$26]*[.$Z$5]*MAGNET([.AH$24]+[.BB78]) +[.AI$26]*[.$Z$5]*MAGNET([.AI$24]+[.BB78]) +[.AJ$26]*[.$Z$5]*MAGNET([.AJ$24]+[.BB78]) +[.AK$26]*[.$Z$5]*MAGNET([.AK$24]+[.BB78]) +[.AL$26]*[.$Z$5]*MAGNET([.AL$24]+[.BB78]) +[.AM$26]*[.$Z$5]*MAGNET([.AM$24]+[.BB78]) +[.AN$26]*[.$Z$5]*MAGNET([.AN$24]+[.BB78]) +[.AO$26]*[.$Z$5]*MAGNET([.AO$24]+[.BB78]) +[.AP$26]*[.$Z$5]*MAGNET([.AP$24]+[.$BB78])&#10;+[.AQ$26]*[.$Z$5]*MAGNET([.AQ$24]+[.$BB78])&#10;+[.AR$26]*[.$Z$5]*MAGNET([.AR$24]+[.$BB78])&#10;+[.AS$26]*[.$Z$5]*MAGNET([.AS$24]+[.$BB78])&#10;+[.AT$26]*[.$Z$5]*MAGNET([.AT$24]+[.$BB78])&#10;+[.AU$26]*[.$Z$5]*MAGNET([.AU$24]+[.$BB78])&#10;+[.AV$26]*[.$Z$5]*MAGNET([.AV$24]+[.$BB78])&#10;+[.AW$26]*[.$Z$5]*MAGNET([.AW$24]+[.$BB78])&#10;+[.AX$26]*[.$Z$5]*MAGNET([.AX$24]+[.$BB78])&#10;+[.AY$26]*[.$Z$5]*MAGNET([.AY$24]+[.$BB78]) +RAND()*[.$BD$13]" office:value-type="float" office:value="93.2319767307368" calcext:value-type="float">
            <text:p>93.23</text:p>
          </table:table-cell>
          <table:table-cell table:style-name="ce71" table:formula="of:=[.E$27]*[.$Z$5]*MAGNET([.E$24]+[.$BB78])+[.F$27]*[.$Z$5]*MAGNET([.F$24]+[.$BB78])+[.G$27]*[.$Z$5]*MAGNET([.G$24]+[.$BB78])+[.H$27]*[.$Z$5]*MAGNET([.H$24]+[.$BB78])+[.I$27]*[.$Z$5]*MAGNET([.I$24]+[.$BB78])+[.J$27]*[.$Z$5]*MAGNET([.J$24]+[.$BB78])+[.K$27]*[.$Z$5]*MAGNET([.K$24]+[.$BB78])+[.L$27]*[.$Z$5]*MAGNET([.L$24]+[.$BB78])+[.M$27]*[.$Z$5]*MAGNET([.M$24]+[.$BB78])+[.N$27]*[.$Z$5]*MAGNET([.N$24]+[.$BB78])+[.O$27]*[.$Z$5]*MAGNET([.O$24]+[.$BB78])+[.P$27]*[.$Z$5]*MAGNET([.P$24]+[.$BB78])+[.Q$27]*[.$Z$5]*MAGNET([.Q$24]+[.$BB78])+[.R$27]*[.$Z$5]*MAGNET([.R$24]+[.$BB78])+[.S$27]*[.$Z$5]*MAGNET([.S$24]+[.$BB78])+[.T$27]*[.$Z$5]*MAGNET([.T$24]+[.$BB78])+[.U$27]*[.$Z$5]*MAGNET([.U$24]+[.$BB78])+[.V$27]*[.$Z$5]*MAGNET([.V$24]+[.$BB78])+[.W$27]*[.$Z$5]*MAGNET([.W$24]+[.$BB78])+[.X$27]*[.$Z$5]*MAGNET([.X$24]+[.$BB78])+[.Y$27]*[.$Z$5]*MAGNET([.Y$24]+[.$BB78])+[.Z$27]*[.$Z$5]*MAGNET([.Z$24]+[.$BB78])+[.AA$27]*[.$Z$5]*MAGNET([.AA$24]+[.$BB78])+[.AB$27]*[.$Z$5]*MAGNET([.AB$24]+[.$BB78])+[.AC$27]*[.$Z$5]*MAGNET([.AC$24]+[.$BB78])+[.AD$27]*[.$Z$5]*MAGNET([.AD$24]+[.$BB78])+[.AE$27]*[.$Z$5]*MAGNET([.AE$24]+[.$BB78])+[.AF$27]*[.$Z$5]*MAGNET([.AF$24]+[.$BB78])+[.AG$27]*[.$Z$5]*MAGNET([.AG$24]+[.$BB78])+[.D$27]*[.$Z$5]*MAGNET([.D$24]+[.$BB78])+[.AH$27]*[.$Z$5]*MAGNET([.AH$24]+[.BB78]) +[.AI$27]*[.$Z$5]*MAGNET([.AI$24]+[.BB78]) +[.AJ$27]*[.$Z$5]*MAGNET([.AJ$24]+[.BB78]) +[.AK$27]*[.$Z$5]*MAGNET([.AK$24]+[.BB78]) +[.AL$27]*[.$Z$5]*MAGNET([.AL$24]+[.BB78]) +[.AM$27]*[.$Z$5]*MAGNET([.AM$24]+[.BB78]) +[.AN$27]*[.$Z$5]*MAGNET([.AN$24]+[.BB78]) +[.AO$27]*[.$Z$5]*MAGNET([.AO$24]+[.BB78]) +[.AP$27]*[.$Z$5]*MAGNET([.AP$24]+[.$BB78])&#10;+[.AQ$27]*[.$Z$5]*MAGNET([.AQ$24]+[.$BB78])&#10;+[.AR$27]*[.$Z$5]*MAGNET([.AR$24]+[.$BB78])&#10;+[.AS$27]*[.$Z$5]*MAGNET([.AS$24]+[.$BB78])&#10;+[.AT$27]*[.$Z$5]*MAGNET([.AT$24]+[.$BB78])&#10;+[.AU$27]*[.$Z$5]*MAGNET([.AU$24]+[.$BB78])&#10;+[.AV$27]*[.$Z$5]*MAGNET([.AV$24]+[.$BB78])&#10;+[.AW$27]*[.$Z$5]*MAGNET([.AW$24]+[.$BB78])&#10;+[.AX$27]*[.$Z$5]*MAGNET([.AX$24]+[.$BB78])&#10;+[.AY$27]*[.$Z$5]*MAGNET([.AY$24]+[.$BB78]) +RAND()*[.$BE$13]" office:value-type="float" office:value="-62.5810995819062" calcext:value-type="float">
            <text:p>-62.5810995819062</text:p>
          </table:table-cell>
          <table:table-cell table:style-name="ce71" table:formula="of:=[.E$28]*[.$Z$5]*MAGNET([.E$24]+[.$BB78])+[.F$28]*[.$Z$5]*MAGNET([.F$24]+[.$BB78])+[.G$28]*[.$Z$5]*MAGNET([.G$24]+[.$BB78])+[.H$28]*[.$Z$5]*MAGNET([.H$24]+[.$BB78])+[.I$28]*[.$Z$5]*MAGNET([.I$24]+[.$BB78])+[.J$28]*[.$Z$5]*MAGNET([.J$24]+[.$BB78])+[.K$28]*[.$Z$5]*MAGNET([.K$24]+[.$BB78])+[.L$28]*[.$Z$5]*MAGNET([.L$24]+[.$BB78])+[.M$28]*[.$Z$5]*MAGNET([.M$24]+[.$BB78])+[.N$28]*[.$Z$5]*MAGNET([.N$24]+[.$BB78])+[.O$28]*[.$Z$5]*MAGNET([.O$24]+[.$BB78])+[.P$28]*[.$Z$5]*MAGNET([.P$24]+[.$BB78])+[.Q$28]*[.$Z$5]*MAGNET([.Q$24]+[.$BB78])+[.R$28]*[.$Z$5]*MAGNET([.R$24]+[.$BB78])+[.S$28]*[.$Z$5]*MAGNET([.S$24]+[.$BB78])+[.T$28]*[.$Z$5]*MAGNET([.T$24]+[.$BB78])+[.U$28]*[.$Z$5]*MAGNET([.U$24]+[.$BB78])+[.V$28]*[.$Z$5]*MAGNET([.V$24]+[.$BB78])+[.W$28]*[.$Z$5]*MAGNET([.W$24]+[.$BB78])+[.X$28]*[.$Z$5]*MAGNET([.X$24]+[.$BB78])+[.Y$28]*[.$Z$5]*MAGNET([.Y$24]+[.$BB78])+[.Z$28]*[.$Z$5]*MAGNET([.Z$24]+[.$BB78])+[.AA$28]*[.$Z$5]*MAGNET([.AA$24]+[.$BB78])+[.AB$28]*[.$Z$5]*MAGNET([.AB$24]+[.$BB78])+[.AC$28]*[.$Z$5]*MAGNET([.AC$24]+[.$BB78])+[.AD$28]*[.$Z$5]*MAGNET([.AD$24]+[.$BB78])+[.AE$28]*[.$Z$5]*MAGNET([.AE$24]+[.$BB78])+[.AF$28]*[.$Z$5]*MAGNET([.AF$24]+[.$BB78])+[.AG$28]*[.$Z$5]*MAGNET([.AG$24]+[.$BB78])+[.D$28]*[.$Z$5]*MAGNET([.D$24]+[.$BB78])+[.AH$28]*[.$Z$5]*MAGNET([.AH$24]+[.BB78]) +[.AI$28]*[.$Z$5]*MAGNET([.AI$24]+[.BB78]) +[.AJ$28]*[.$Z$5]*MAGNET([.AJ$24]+[.BB78]) +[.AK$28]*[.$Z$5]*MAGNET([.AK$24]+[.BB78]) +[.AL$28]*[.$Z$5]*MAGNET([.AL$24]+[.BB78]) +[.AM$28]*[.$Z$5]*MAGNET([.AM$24]+[.BB78]) +[.AN$28]*[.$Z$5]*MAGNET([.AN$24]+[.BB78]) +[.AO$28]*[.$Z$5]*MAGNET([.AO$24]+[.BB78]) +[.AP$28]*[.$Z$5]*MAGNET([.AP$24]+[.$BB78])&#10;+[.AQ$28]*[.$Z$5]*MAGNET([.AQ$24]+[.$BB78])&#10;+[.AR$28]*[.$Z$5]*MAGNET([.AR$24]+[.$BB78])&#10;+[.AS$28]*[.$Z$5]*MAGNET([.AS$24]+[.$BB78])&#10;+[.AT$28]*[.$Z$5]*MAGNET([.AT$24]+[.$BB78])&#10;+[.AU$28]*[.$Z$5]*MAGNET([.AU$24]+[.$BB78])&#10;+[.AV$28]*[.$Z$5]*MAGNET([.AV$24]+[.$BB78])&#10;+[.AW$28]*[.$Z$5]*MAGNET([.AW$24]+[.$BB78])&#10;+[.AX$28]*[.$Z$5]*MAGNET([.AX$24]+[.$BB78])&#10;+[.AY$28]*[.$Z$5]*MAGNET([.AY$24]+[.$BB78]) +RAND()*[.$BF$13]" office:value-type="float" office:value="-8.19012935394395" calcext:value-type="float">
            <text:p>-8.19012935394395</text:p>
          </table:table-cell>
          <table:table-cell table:style-name="ce71" table:formula="of:=[.E$29]*[.$Z$5]*MAGNET([.E$24]+[.$BB78])+[.F$29]*[.$Z$5]*MAGNET([.F$24]+[.$BB78])+[.G$29]*[.$Z$5]*MAGNET([.G$24]+[.$BB78])+[.H$29]*[.$Z$5]*MAGNET([.H$24]+[.$BB78])+[.I$29]*[.$Z$5]*MAGNET([.I$24]+[.$BB78])+[.J$29]*[.$Z$5]*MAGNET([.J$24]+[.$BB78])+[.K$29]*[.$Z$5]*MAGNET([.K$24]+[.$BB78])+[.L$29]*[.$Z$5]*MAGNET([.L$24]+[.$BB78])+[.M$29]*[.$Z$5]*MAGNET([.M$24]+[.$BB78])+[.N$29]*[.$Z$5]*MAGNET([.N$24]+[.$BB78])+[.O$29]*[.$Z$5]*MAGNET([.O$24]+[.$BB78])+[.P$29]*[.$Z$5]*MAGNET([.P$24]+[.$BB78])+[.Q$29]*[.$Z$5]*MAGNET([.Q$24]+[.$BB78])+[.R$29]*[.$Z$5]*MAGNET([.R$24]+[.$BB78])+[.S$29]*[.$Z$5]*MAGNET([.S$24]+[.$BB78])+[.T$29]*[.$Z$5]*MAGNET([.T$24]+[.$BB78])+[.U$29]*[.$Z$5]*MAGNET([.U$24]+[.$BB78])+[.V$29]*[.$Z$5]*MAGNET([.V$24]+[.$BB78])+[.W$29]*[.$Z$5]*MAGNET([.W$24]+[.$BB78])+[.X$29]*[.$Z$5]*MAGNET([.X$24]+[.$BB78])+[.Y$29]*[.$Z$5]*MAGNET([.Y$24]+[.$BB78])+[.Z$29]*[.$Z$5]*MAGNET([.Z$24]+[.$BB78])+[.AA$29]*[.$Z$5]*MAGNET([.AA$24]+[.$BB78])+[.AB$29]*[.$Z$5]*MAGNET([.AB$24]+[.$BB78])+[.AC$29]*[.$Z$5]*MAGNET([.AC$24]+[.$BB78])+[.AD$29]*[.$Z$5]*MAGNET([.AD$24]+[.$BB78])+[.AE$29]*[.$Z$5]*MAGNET([.AE$24]+[.$BB78])+[.AF$29]*[.$Z$5]*MAGNET([.AF$24]+[.$BB78])+[.AG$29]*[.$Z$5]*MAGNET([.AG$24]+[.$BB78])+[.D$29]*[.$Z$5]*MAGNET([.D$24]+[.$BB78])+[.AH$29]*[.$Z$5]*MAGNET([.AH$24]+[.BB78]) +[.AI$29]*[.$Z$5]*MAGNET([.AI$24]+[.BB78]) +[.AJ$29]*[.$Z$5]*MAGNET([.AJ$24]+[.BB78]) +[.AK$29]*[.$Z$5]*MAGNET([.AK$24]+[.BB78]) +[.AL$29]*[.$Z$5]*MAGNET([.AL$24]+[.BB78]) +[.AM$29]*[.$Z$5]*MAGNET([.AM$24]+[.BB78]) +[.AN$29]*[.$Z$5]*MAGNET([.AN$24]+[.BB78]) +[.AO$29]*[.$Z$5]*MAGNET([.AO$24]+[.BB78]) +[.AP$29]*[.$Z$5]*MAGNET([.AP$24]+[.$BB78])&#10;+[.AQ$29]*[.$Z$5]*MAGNET([.AQ$24]+[.$BB78])&#10;+[.AR$29]*[.$Z$5]*MAGNET([.AR$24]+[.$BB78])&#10;+[.AS$29]*[.$Z$5]*MAGNET([.AS$24]+[.$BB78])&#10;+[.AT$29]*[.$Z$5]*MAGNET([.AT$24]+[.$BB78])&#10;+[.AU$29]*[.$Z$5]*MAGNET([.AU$24]+[.$BB78])&#10;+[.AV$29]*[.$Z$5]*MAGNET([.AV$24]+[.$BB78])&#10;+[.AW$29]*[.$Z$5]*MAGNET([.AW$24]+[.$BB78])&#10;+[.AX$29]*[.$Z$5]*MAGNET([.AX$24]+[.$BB78])&#10;+[.AY$29]*[.$Z$5]*MAGNET([.AY$24]+[.$BB78]) +RAND()*[.$BG$13]" office:value-type="float" office:value="31.0189633628847" calcext:value-type="float">
            <text:p>31.0189633628847</text:p>
          </table:table-cell>
          <table:table-cell table:style-name="ce71" table:formula="of:=[.E$30]*[.$Z$5]*MAGNET([.E$24]+[.$BB78])+[.F$30]*[.$Z$5]*MAGNET([.F$24]+[.$BB78])+[.G$30]*[.$Z$5]*MAGNET([.G$24]+[.$BB78])+[.H$30]*[.$Z$5]*MAGNET([.H$24]+[.$BB78])+[.I$30]*[.$Z$5]*MAGNET([.I$24]+[.$BB78])+[.J$30]*[.$Z$5]*MAGNET([.J$24]+[.$BB78])+[.K$30]*[.$Z$5]*MAGNET([.K$24]+[.$BB78])+[.L$30]*[.$Z$5]*MAGNET([.L$24]+[.$BB78])+[.M$30]*[.$Z$5]*MAGNET([.M$24]+[.$BB78])+[.N$30]*[.$Z$5]*MAGNET([.N$24]+[.$BB78])+[.O$30]*[.$Z$5]*MAGNET([.O$24]+[.$BB78])+[.P$30]*[.$Z$5]*MAGNET([.P$24]+[.$BB78])+[.Q$30]*[.$Z$5]*MAGNET([.Q$24]+[.$BB78])+[.R$30]*[.$Z$5]*MAGNET([.R$24]+[.$BB78])+[.S$30]*[.$Z$5]*MAGNET([.S$24]+[.$BB78])+[.T$30]*[.$Z$5]*MAGNET([.T$24]+[.$BB78])+[.U$30]*[.$Z$5]*MAGNET([.U$24]+[.$BB78])+[.V$30]*[.$Z$5]*MAGNET([.V$24]+[.$BB78])+[.W$30]*[.$Z$5]*MAGNET([.W$24]+[.$BB78])+[.X$30]*[.$Z$5]*MAGNET([.X$24]+[.$BB78])+[.Y$30]*[.$Z$5]*MAGNET([.Y$24]+[.$BB78])+[.Z$30]*[.$Z$5]*MAGNET([.Z$24]+[.$BB78])+[.AA$30]*[.$Z$5]*MAGNET([.AA$24]+[.$BB78])+[.AB$30]*[.$Z$5]*MAGNET([.AB$24]+[.$BB78])+[.AC$30]*[.$Z$5]*MAGNET([.AC$24]+[.$BB78])+[.AD$30]*[.$Z$5]*MAGNET([.AD$24]+[.$BB78])+[.AE$30]*[.$Z$5]*MAGNET([.AE$24]+[.$BB78])+[.AF$30]*[.$Z$5]*MAGNET([.AF$24]+[.$BB78])+[.AG$30]*[.$Z$5]*MAGNET([.AG$24]+[.$BB78])+[.D$30]*[.$Z$5]*MAGNET([.D$24]+[.$BB78])+[.AH$30]*[.$Z$5]*MAGNET([.AH$24]+[.BB78]) +[.AI$30]*[.$Z$5]*MAGNET([.AI$24]+[.BB78]) +[.AJ$30]*[.$Z$5]*MAGNET([.AJ$24]+[.BB78]) +[.AK$30]*[.$Z$5]*MAGNET([.AK$24]+[.BB78]) +[.AL$30]*[.$Z$5]*MAGNET([.AL$24]+[.BB78]) +[.AM$30]*[.$Z$5]*MAGNET([.AM$24]+[.BB78]) +[.AN$30]*[.$Z$5]*MAGNET([.AN$24]+[.BB78]) +[.AO$30]*[.$Z$5]*MAGNET([.AO$24]+[.BB78]) +[.AP$30]*[.$Z$5]*MAGNET([.AP$24]+[.$BB78])&#10;+[.AQ$30]*[.$Z$5]*MAGNET([.AQ$24]+[.$BB78])&#10;+[.AR$30]*[.$Z$5]*MAGNET([.AR$24]+[.$BB78])&#10;+[.AS$30]*[.$Z$5]*MAGNET([.AS$24]+[.$BB78])&#10;+[.AT$30]*[.$Z$5]*MAGNET([.AT$24]+[.$BB78])&#10;+[.AU$30]*[.$Z$5]*MAGNET([.AU$24]+[.$BB78])&#10;+[.AV$30]*[.$Z$5]*MAGNET([.AV$24]+[.$BB78])&#10;+[.AW$30]*[.$Z$5]*MAGNET([.AW$24]+[.$BB78])&#10;+[.AX$30]*[.$Z$5]*MAGNET([.AX$24]+[.$BB78])&#10;+[.AY$30]*[.$Z$5]*MAGNET([.AY$24]+[.$BB78]) +RAND()*[.$BH$13]" office:value-type="float" office:value="0" calcext:value-type="float">
            <text:p>0</text:p>
          </table:table-cell>
          <table:table-cell table:style-name="ce71" table:formula="of:=[.E$31]*[.$Z$5]*MAGNET([.E$24]+[.$BB78])+[.F$31]*[.$Z$5]*MAGNET([.F$24]+[.$BB78])+[.G$31]*[.$Z$5]*MAGNET([.G$24]+[.$BB78])+[.H$31]*[.$Z$5]*MAGNET([.H$24]+[.$BB78])+[.I$31]*[.$Z$5]*MAGNET([.I$24]+[.$BB78])+[.J$31]*[.$Z$5]*MAGNET([.J$24]+[.$BB78])+[.K$31]*[.$Z$5]*MAGNET([.K$24]+[.$BB78])+[.L$31]*[.$Z$5]*MAGNET([.L$24]+[.$BB78])+[.M$31]*[.$Z$5]*MAGNET([.M$24]+[.$BB78])+[.N$31]*[.$Z$5]*MAGNET([.N$24]+[.$BB78])+[.O$31]*[.$Z$5]*MAGNET([.O$24]+[.$BB78])+[.P$31]*[.$Z$5]*MAGNET([.P$24]+[.$BB78])+[.Q$31]*[.$Z$5]*MAGNET([.Q$24]+[.$BB78])+[.R$31]*[.$Z$5]*MAGNET([.R$24]+[.$BB78])+[.S$31]*[.$Z$5]*MAGNET([.S$24]+[.$BB78])+[.T$31]*[.$Z$5]*MAGNET([.T$24]+[.$BB78])+[.U$31]*[.$Z$5]*MAGNET([.U$24]+[.$BB78])+[.V$31]*[.$Z$5]*MAGNET([.V$24]+[.$BB78])+[.W$31]*[.$Z$5]*MAGNET([.W$24]+[.$BB78])+[.X$31]*[.$Z$5]*MAGNET([.X$24]+[.$BB78])+[.Y$31]*[.$Z$5]*MAGNET([.Y$24]+[.$BB78])+[.Z$31]*[.$Z$5]*MAGNET([.Z$24]+[.$BB78])+[.AA$31]*[.$Z$5]*MAGNET([.AA$24]+[.$BB78])+[.AB$31]*[.$Z$5]*MAGNET([.AB$24]+[.$BB78])+[.AC$31]*[.$Z$5]*MAGNET([.AC$24]+[.$BB78])+[.AD$31]*[.$Z$5]*MAGNET([.AD$24]+[.$BB78])+[.AE$31]*[.$Z$5]*MAGNET([.AE$24]+[.$BB78])+[.AF$31]*[.$Z$5]*MAGNET([.AF$24]+[.$BB78])+[.AG$31]*[.$Z$5]*MAGNET([.AG$24]+[.$BB78])+[.D$31]*[.$Z$5]*MAGNET([.D$24]+[.$BB78])+[.AH$31]*[.$Z$5]*MAGNET([.AH$24]+[.BB78]) +[.AI$31]*[.$Z$5]*MAGNET([.AI$24]+[.BB78]) +[.AJ$31]*[.$Z$5]*MAGNET([.AJ$24]+[.BB78]) +[.AK$31]*[.$Z$5]*MAGNET([.AK$24]+[.BB78]) +[.AL$31]*[.$Z$5]*MAGNET([.AL$24]+[.BB78]) +[.AM$31]*[.$Z$5]*MAGNET([.AM$24]+[.BB78]) +[.AN$31]*[.$Z$5]*MAGNET([.AN$24]+[.BB78]) +[.AO$31]*[.$Z$5]*MAGNET([.AO$24]+[.BB78]) +[.AP$31]*[.$Z$5]*MAGNET([.AP$24]+[.$BB78])&#10;+[.AQ$31]*[.$Z$5]*MAGNET([.AQ$24]+[.$BB78])&#10;+[.AR$31]*[.$Z$5]*MAGNET([.AR$24]+[.$BB78])&#10;+[.AS$31]*[.$Z$5]*MAGNET([.AS$24]+[.$BB78])&#10;+[.AT$31]*[.$Z$5]*MAGNET([.AT$24]+[.$BB78])&#10;+[.AU$31]*[.$Z$5]*MAGNET([.AU$24]+[.$BB78])&#10;+[.AV$31]*[.$Z$5]*MAGNET([.AV$24]+[.$BB78])&#10;+[.AW$31]*[.$Z$5]*MAGNET([.AW$24]+[.$BB78])&#10;+[.AX$31]*[.$Z$5]*MAGNET([.AX$24]+[.$BB78])&#10;+[.AY$31]*[.$Z$5]*MAGNET([.AY$24]+[.$BB78]) +RAND()*[.$BI$13]" office:value-type="float" office:value="0" calcext:value-type="float">
            <text:p>0</text:p>
          </table:table-cell>
          <table:table-cell table:style-name="ce71" table:formula="of:=[.E$32]*[.$Z$5]*MAGNET([.E$24]+[.$BB78])+[.F$32]*[.$Z$5]*MAGNET([.F$24]+[.$BB78])+[.G$32]*[.$Z$5]*MAGNET([.G$24]+[.$BB78])+[.H$32]*[.$Z$5]*MAGNET([.H$24]+[.$BB78])+[.I$32]*[.$Z$5]*MAGNET([.I$24]+[.$BB78])+[.J$32]*[.$Z$5]*MAGNET([.J$24]+[.$BB78])+[.K$32]*[.$Z$5]*MAGNET([.K$24]+[.$BB78])+[.L$32]*[.$Z$5]*MAGNET([.L$24]+[.$BB78])+[.M$32]*[.$Z$5]*MAGNET([.M$24]+[.$BB78])+[.N$32]*[.$Z$5]*MAGNET([.N$24]+[.$BB78])+[.O$32]*[.$Z$5]*MAGNET([.O$24]+[.$BB78])+[.P$32]*[.$Z$5]*MAGNET([.P$24]+[.$BB78])+[.Q$32]*[.$Z$5]*MAGNET([.Q$24]+[.$BB78])+[.R$32]*[.$Z$5]*MAGNET([.R$24]+[.$BB78])+[.S$32]*[.$Z$5]*MAGNET([.S$24]+[.$BB78])+[.T$32]*[.$Z$5]*MAGNET([.T$24]+[.$BB78])+[.U$32]*[.$Z$5]*MAGNET([.U$24]+[.$BB78])+[.V$32]*[.$Z$5]*MAGNET([.V$24]+[.$BB78])+[.W$32]*[.$Z$5]*MAGNET([.W$24]+[.$BB78])+[.X$32]*[.$Z$5]*MAGNET([.X$24]+[.$BB78])+[.Y$32]*[.$Z$5]*MAGNET([.Y$24]+[.$BB78])+[.Z$32]*[.$Z$5]*MAGNET([.Z$24]+[.$BB78])+[.AA$32]*[.$Z$5]*MAGNET([.AA$24]+[.$BB78])+[.AB$32]*[.$Z$5]*MAGNET([.AB$24]+[.$BB78])+[.AC$32]*[.$Z$5]*MAGNET([.AC$24]+[.$BB78])+[.AD$32]*[.$Z$5]*MAGNET([.AD$24]+[.$BB78])+[.AE$32]*[.$Z$5]*MAGNET([.AE$24]+[.$BB78])+[.AF$32]*[.$Z$5]*MAGNET([.AF$24]+[.$BB78])+[.AG$32]*[.$Z$5]*MAGNET([.AG$24]+[.$BB78])+[.D$32]*[.$Z$5]*MAGNET([.D$24]+[.$BB78])+[.AH$32]*[.$Z$5]*MAGNET([.AH$24]+[.BB78]) +[.AI$32]*[.$Z$5]*MAGNET([.AI$24]+[.BB78]) +[.AJ$32]*[.$Z$5]*MAGNET([.AJ$24]+[.BB78]) +[.AK$32]*[.$Z$5]*MAGNET([.AK$24]+[.BB78]) +[.AL$32]*[.$Z$5]*MAGNET([.AL$24]+[.BB78]) +[.AM$32]*[.$Z$5]*MAGNET([.AM$24]+[.BB78]) +[.AN$32]*[.$Z$5]*MAGNET([.AN$24]+[.BB78]) +[.AO$32]*[.$Z$5]*MAGNET([.AO$24]+[.BB78]) +[.AP$32]*[.$Z$5]*MAGNET([.AP$24]+[.$BB78])&#10;+[.AQ$32]*[.$Z$5]*MAGNET([.AQ$24]+[.$BB78])&#10;+[.AR$32]*[.$Z$5]*MAGNET([.AR$24]+[.$BB78])&#10;+[.AS$32]*[.$Z$5]*MAGNET([.AS$24]+[.$BB78])&#10;+[.AT$32]*[.$Z$5]*MAGNET([.AT$24]+[.$BB78])&#10;+[.AU$32]*[.$Z$5]*MAGNET([.AU$24]+[.$BB78])&#10;+[.AV$32]*[.$Z$5]*MAGNET([.AV$24]+[.$BB78])&#10;+[.AW$32]*[.$Z$5]*MAGNET([.AW$24]+[.$BB78])&#10;+[.AX$32]*[.$Z$5]*MAGNET([.AX$24]+[.$BB78])&#10;+[.AY$32]*[.$Z$5]*MAGNET([.AY$24]+[.$BB7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8]+0.002" office:value-type="float" office:value="0.128" calcext:value-type="float">
            <text:p>0.128</text:p>
          </table:table-cell>
          <table:table-cell table:formula="of:=[.BA79]*[.$D$6]" office:value-type="float" office:value="6.4339817545519" calcext:value-type="float">
            <text:p>6.434</text:p>
          </table:table-cell>
          <table:table-cell table:formula="of:=[.D$25]*[.$Z$5]*MAGNET([.D$24]+[.BB79])+[.E$25]*[.$Z$5]*MAGNET([.E$24]+[.BB79])+[.F$25]*[.$Z$5]*MAGNET([.F$24]+[.BB79])+[.G$25]*[.$Z$5]*MAGNET([.G$24]+[.BB79])+[.H$25]*[.$Z$5]*MAGNET([.H$24]+[.BB79])+[.I$25]*[.$Z$5]*MAGNET([.I$24]+[.BB79])+[.J$25]*[.$Z$5]*MAGNET([.J$24]+[.BB79])+[.K$25]*[.$Z$5]*MAGNET([.K$24]+[.BB79])+[.L$25]*[.$Z$5]*MAGNET([.L$24]+[.BB79])+[.M$25]*[.$Z$5]*MAGNET([.M$24]+[.BB79])+[.N$25]*[.$Z$5]*MAGNET([.N$24]+[.BB79])+[.O$25]*[.$Z$5]*MAGNET([.O$24]+[.BB79])+[.P$25]*[.$Z$5]*MAGNET([.P$24]+[.BB79])+[.Q$25]*[.$Z$5]*MAGNET([.Q$24]+[.BB79])+[.R$25]*[.$Z$5]*MAGNET([.R$24]+[.BB79])+[.S$25]*[.$Z$5]*MAGNET([.S$24]+[.BB79])+[.T$25]*[.$Z$5]*MAGNET([.T$24]+[.BB79])+[.U$25]*[.$Z$5]*MAGNET([.U$24]+[.BB79])+[.V$25]*[.$Z$5]*MAGNET([.V$24]+[.BB79])+[.W$25]*[.$Z$5]*MAGNET([.W$24]+[.BB79])+[.X$25]*[.$Z$5]*MAGNET([.X$24]+[.BB79])+[.Y$25]*[.$Z$5]*MAGNET([.Y$24]+[.BB79])+[.Z$25]*[.$Z$5]*MAGNET([.Z$24]+[.BB79])+[.AA$25]*[.$Z$5]*MAGNET([.AA$24]+[.BB79])+[.AB$25]*[.$Z$5]*MAGNET([.AB$24]+[.BB79])+[.AC$25]*[.$Z$5]*MAGNET([.AC$24]+[.BB79])+[.AD$25]*[.$Z$5]*MAGNET([.AD$24]+[.BB79])+[.AE$25]*[.$Z$5]*MAGNET([.AE$24]+[.BB79])+[.AF$25]*[.$Z$5]*MAGNET([.AF$24]+[.BB79])+[.AG$25]*[.$Z$5]*MAGNET([.AG$24]+[.BB79])+[.AH$25]*[.$Z$5]*MAGNET([.AH$24]+[.BB79]) +[.AI$25]*[.$Z$5]*MAGNET([.AI$24]+[.BB79]) +[.AJ$25]*[.$Z$5]*MAGNET([.AJ$24]+[.BB79]) +[.AK$25]*[.$Z$5]*MAGNET([.AK$24]+[.BB79]) +[.AL$25]*[.$Z$5]*MAGNET([.AL$24]+[.BB79]) +[.AM$25]*[.$Z$5]*MAGNET([.AM$24]+[.BB79]) +[.AN$25]*[.$Z$5]*MAGNET([.AN$24]+[.BB79]) +[.AO$25]*[.$Z$5]*MAGNET([.AO$24]+[.BB79])+RAND()*[.$BC$13]+[.AP$25]*[.$Z$5]*MAGNET([.AP$24]+[.BB79])&#10;+[.AQ$25]*[.$Z$5]*MAGNET([.AQ$24]+[.BB79])&#10;+[.AR$25]*[.$Z$5]*MAGNET([.AR$24]+[.BB79])&#10;+[.AS$25]*[.$Z$5]*MAGNET([.AS$24]+[.BB79])&#10;+[.AT$25]*[.$Z$5]*MAGNET([.AT$24]+[.BB79])&#10;+[.AU$25]*[.$Z$5]*MAGNET([.AU$24]+[.BB79])&#10;+[.AV$25]*[.$Z$5]*MAGNET([.AV$24]+[.BB79])&#10;+[.AW$25]*[.$Z$5]*MAGNET([.AW$24]+[.BB79])&#10;+[.AX$25]*[.$Z$5]*MAGNET([.AX$24]+[.BB79])&#10;+[.AY$25]*[.$Z$5]*MAGNET([.AY$24]+[.BB79])" office:value-type="float" office:value="-27.6786783637341" calcext:value-type="float">
            <text:p>-27.68</text:p>
          </table:table-cell>
          <table:table-cell table:style-name="ce70" table:formula="of:=[.E$26]*[.$Z$5]*MAGNET([.E$24]+[.$BB79])+[.F$26]*[.$Z$5]*MAGNET([.F$24]+[.$BB79])+[.G$26]*[.$Z$5]*MAGNET([.G$24]+[.$BB79])+[.H$26]*[.$Z$5]*MAGNET([.H$24]+[.$BB79])+[.I$26]*[.$Z$5]*MAGNET([.I$24]+[.$BB79])+[.J$26]*[.$Z$5]*MAGNET([.J$24]+[.$BB79])+[.K$26]*[.$Z$5]*MAGNET([.K$24]+[.$BB79])+[.L$26]*[.$Z$5]*MAGNET([.L$24]+[.$BB79])+[.M$26]*[.$Z$5]*MAGNET([.M$24]+[.$BB79])+[.N$26]*[.$Z$5]*MAGNET([.N$24]+[.$BB79])+[.O$26]*[.$Z$5]*MAGNET([.O$24]+[.$BB79])+[.P$26]*[.$Z$5]*MAGNET([.P$24]+[.$BB79])+[.Q$26]*[.$Z$5]*MAGNET([.Q$24]+[.$BB79])+[.R$26]*[.$Z$5]*MAGNET([.R$24]+[.$BB79])+[.S$26]*[.$Z$5]*MAGNET([.S$24]+[.$BB79])+[.T$26]*[.$Z$5]*MAGNET([.T$24]+[.$BB79])+[.U$26]*[.$Z$5]*MAGNET([.U$24]+[.$BB79])+[.V$26]*[.$Z$5]*MAGNET([.V$24]+[.$BB79])+[.W$26]*[.$Z$5]*MAGNET([.W$24]+[.$BB79])+[.X$26]*[.$Z$5]*MAGNET([.X$24]+[.$BB79])+[.Y$26]*[.$Z$5]*MAGNET([.Y$24]+[.$BB79])+[.Z$26]*[.$Z$5]*MAGNET([.Z$24]+[.$BB79])+[.AA$26]*[.$Z$5]*MAGNET([.AA$24]+[.$BB79])+[.AB$26]*[.$Z$5]*MAGNET([.AB$24]+[.$BB79])+[.AC$26]*[.$Z$5]*MAGNET([.AC$24]+[.$BB79])+[.AD$26]*[.$Z$5]*MAGNET([.AD$24]+[.$BB79])+[.AE$26]*[.$Z$5]*MAGNET([.AE$24]+[.$BB79])+[.AF$26]*[.$Z$5]*MAGNET([.AF$24]+[.$BB79])+[.AG$26]*[.$Z$5]*MAGNET([.AG$24]+[.$BB79])+[.D$26]*[.$Z$5]*MAGNET([.D$24]+[.$BB79])+[.AH$26]*[.$Z$5]*MAGNET([.AH$24]+[.BB79]) +[.AI$26]*[.$Z$5]*MAGNET([.AI$24]+[.BB79]) +[.AJ$26]*[.$Z$5]*MAGNET([.AJ$24]+[.BB79]) +[.AK$26]*[.$Z$5]*MAGNET([.AK$24]+[.BB79]) +[.AL$26]*[.$Z$5]*MAGNET([.AL$24]+[.BB79]) +[.AM$26]*[.$Z$5]*MAGNET([.AM$24]+[.BB79]) +[.AN$26]*[.$Z$5]*MAGNET([.AN$24]+[.BB79]) +[.AO$26]*[.$Z$5]*MAGNET([.AO$24]+[.BB79]) +[.AP$26]*[.$Z$5]*MAGNET([.AP$24]+[.$BB79])&#10;+[.AQ$26]*[.$Z$5]*MAGNET([.AQ$24]+[.$BB79])&#10;+[.AR$26]*[.$Z$5]*MAGNET([.AR$24]+[.$BB79])&#10;+[.AS$26]*[.$Z$5]*MAGNET([.AS$24]+[.$BB79])&#10;+[.AT$26]*[.$Z$5]*MAGNET([.AT$24]+[.$BB79])&#10;+[.AU$26]*[.$Z$5]*MAGNET([.AU$24]+[.$BB79])&#10;+[.AV$26]*[.$Z$5]*MAGNET([.AV$24]+[.$BB79])&#10;+[.AW$26]*[.$Z$5]*MAGNET([.AW$24]+[.$BB79])&#10;+[.AX$26]*[.$Z$5]*MAGNET([.AX$24]+[.$BB79])&#10;+[.AY$26]*[.$Z$5]*MAGNET([.AY$24]+[.$BB79]) +RAND()*[.$BD$13]" office:value-type="float" office:value="87.8379740725433" calcext:value-type="float">
            <text:p>87.84</text:p>
          </table:table-cell>
          <table:table-cell table:style-name="ce71" table:formula="of:=[.E$27]*[.$Z$5]*MAGNET([.E$24]+[.$BB79])+[.F$27]*[.$Z$5]*MAGNET([.F$24]+[.$BB79])+[.G$27]*[.$Z$5]*MAGNET([.G$24]+[.$BB79])+[.H$27]*[.$Z$5]*MAGNET([.H$24]+[.$BB79])+[.I$27]*[.$Z$5]*MAGNET([.I$24]+[.$BB79])+[.J$27]*[.$Z$5]*MAGNET([.J$24]+[.$BB79])+[.K$27]*[.$Z$5]*MAGNET([.K$24]+[.$BB79])+[.L$27]*[.$Z$5]*MAGNET([.L$24]+[.$BB79])+[.M$27]*[.$Z$5]*MAGNET([.M$24]+[.$BB79])+[.N$27]*[.$Z$5]*MAGNET([.N$24]+[.$BB79])+[.O$27]*[.$Z$5]*MAGNET([.O$24]+[.$BB79])+[.P$27]*[.$Z$5]*MAGNET([.P$24]+[.$BB79])+[.Q$27]*[.$Z$5]*MAGNET([.Q$24]+[.$BB79])+[.R$27]*[.$Z$5]*MAGNET([.R$24]+[.$BB79])+[.S$27]*[.$Z$5]*MAGNET([.S$24]+[.$BB79])+[.T$27]*[.$Z$5]*MAGNET([.T$24]+[.$BB79])+[.U$27]*[.$Z$5]*MAGNET([.U$24]+[.$BB79])+[.V$27]*[.$Z$5]*MAGNET([.V$24]+[.$BB79])+[.W$27]*[.$Z$5]*MAGNET([.W$24]+[.$BB79])+[.X$27]*[.$Z$5]*MAGNET([.X$24]+[.$BB79])+[.Y$27]*[.$Z$5]*MAGNET([.Y$24]+[.$BB79])+[.Z$27]*[.$Z$5]*MAGNET([.Z$24]+[.$BB79])+[.AA$27]*[.$Z$5]*MAGNET([.AA$24]+[.$BB79])+[.AB$27]*[.$Z$5]*MAGNET([.AB$24]+[.$BB79])+[.AC$27]*[.$Z$5]*MAGNET([.AC$24]+[.$BB79])+[.AD$27]*[.$Z$5]*MAGNET([.AD$24]+[.$BB79])+[.AE$27]*[.$Z$5]*MAGNET([.AE$24]+[.$BB79])+[.AF$27]*[.$Z$5]*MAGNET([.AF$24]+[.$BB79])+[.AG$27]*[.$Z$5]*MAGNET([.AG$24]+[.$BB79])+[.D$27]*[.$Z$5]*MAGNET([.D$24]+[.$BB79])+[.AH$27]*[.$Z$5]*MAGNET([.AH$24]+[.BB79]) +[.AI$27]*[.$Z$5]*MAGNET([.AI$24]+[.BB79]) +[.AJ$27]*[.$Z$5]*MAGNET([.AJ$24]+[.BB79]) +[.AK$27]*[.$Z$5]*MAGNET([.AK$24]+[.BB79]) +[.AL$27]*[.$Z$5]*MAGNET([.AL$24]+[.BB79]) +[.AM$27]*[.$Z$5]*MAGNET([.AM$24]+[.BB79]) +[.AN$27]*[.$Z$5]*MAGNET([.AN$24]+[.BB79]) +[.AO$27]*[.$Z$5]*MAGNET([.AO$24]+[.BB79]) +[.AP$27]*[.$Z$5]*MAGNET([.AP$24]+[.$BB79])&#10;+[.AQ$27]*[.$Z$5]*MAGNET([.AQ$24]+[.$BB79])&#10;+[.AR$27]*[.$Z$5]*MAGNET([.AR$24]+[.$BB79])&#10;+[.AS$27]*[.$Z$5]*MAGNET([.AS$24]+[.$BB79])&#10;+[.AT$27]*[.$Z$5]*MAGNET([.AT$24]+[.$BB79])&#10;+[.AU$27]*[.$Z$5]*MAGNET([.AU$24]+[.$BB79])&#10;+[.AV$27]*[.$Z$5]*MAGNET([.AV$24]+[.$BB79])&#10;+[.AW$27]*[.$Z$5]*MAGNET([.AW$24]+[.$BB79])&#10;+[.AX$27]*[.$Z$5]*MAGNET([.AX$24]+[.$BB79])&#10;+[.AY$27]*[.$Z$5]*MAGNET([.AY$24]+[.$BB79]) +RAND()*[.$BE$13]" office:value-type="float" office:value="-76.6715409575906" calcext:value-type="float">
            <text:p>-76.6715409575906</text:p>
          </table:table-cell>
          <table:table-cell table:style-name="ce71" table:formula="of:=[.E$28]*[.$Z$5]*MAGNET([.E$24]+[.$BB79])+[.F$28]*[.$Z$5]*MAGNET([.F$24]+[.$BB79])+[.G$28]*[.$Z$5]*MAGNET([.G$24]+[.$BB79])+[.H$28]*[.$Z$5]*MAGNET([.H$24]+[.$BB79])+[.I$28]*[.$Z$5]*MAGNET([.I$24]+[.$BB79])+[.J$28]*[.$Z$5]*MAGNET([.J$24]+[.$BB79])+[.K$28]*[.$Z$5]*MAGNET([.K$24]+[.$BB79])+[.L$28]*[.$Z$5]*MAGNET([.L$24]+[.$BB79])+[.M$28]*[.$Z$5]*MAGNET([.M$24]+[.$BB79])+[.N$28]*[.$Z$5]*MAGNET([.N$24]+[.$BB79])+[.O$28]*[.$Z$5]*MAGNET([.O$24]+[.$BB79])+[.P$28]*[.$Z$5]*MAGNET([.P$24]+[.$BB79])+[.Q$28]*[.$Z$5]*MAGNET([.Q$24]+[.$BB79])+[.R$28]*[.$Z$5]*MAGNET([.R$24]+[.$BB79])+[.S$28]*[.$Z$5]*MAGNET([.S$24]+[.$BB79])+[.T$28]*[.$Z$5]*MAGNET([.T$24]+[.$BB79])+[.U$28]*[.$Z$5]*MAGNET([.U$24]+[.$BB79])+[.V$28]*[.$Z$5]*MAGNET([.V$24]+[.$BB79])+[.W$28]*[.$Z$5]*MAGNET([.W$24]+[.$BB79])+[.X$28]*[.$Z$5]*MAGNET([.X$24]+[.$BB79])+[.Y$28]*[.$Z$5]*MAGNET([.Y$24]+[.$BB79])+[.Z$28]*[.$Z$5]*MAGNET([.Z$24]+[.$BB79])+[.AA$28]*[.$Z$5]*MAGNET([.AA$24]+[.$BB79])+[.AB$28]*[.$Z$5]*MAGNET([.AB$24]+[.$BB79])+[.AC$28]*[.$Z$5]*MAGNET([.AC$24]+[.$BB79])+[.AD$28]*[.$Z$5]*MAGNET([.AD$24]+[.$BB79])+[.AE$28]*[.$Z$5]*MAGNET([.AE$24]+[.$BB79])+[.AF$28]*[.$Z$5]*MAGNET([.AF$24]+[.$BB79])+[.AG$28]*[.$Z$5]*MAGNET([.AG$24]+[.$BB79])+[.D$28]*[.$Z$5]*MAGNET([.D$24]+[.$BB79])+[.AH$28]*[.$Z$5]*MAGNET([.AH$24]+[.BB79]) +[.AI$28]*[.$Z$5]*MAGNET([.AI$24]+[.BB79]) +[.AJ$28]*[.$Z$5]*MAGNET([.AJ$24]+[.BB79]) +[.AK$28]*[.$Z$5]*MAGNET([.AK$24]+[.BB79]) +[.AL$28]*[.$Z$5]*MAGNET([.AL$24]+[.BB79]) +[.AM$28]*[.$Z$5]*MAGNET([.AM$24]+[.BB79]) +[.AN$28]*[.$Z$5]*MAGNET([.AN$24]+[.BB79]) +[.AO$28]*[.$Z$5]*MAGNET([.AO$24]+[.BB79]) +[.AP$28]*[.$Z$5]*MAGNET([.AP$24]+[.$BB79])&#10;+[.AQ$28]*[.$Z$5]*MAGNET([.AQ$24]+[.$BB79])&#10;+[.AR$28]*[.$Z$5]*MAGNET([.AR$24]+[.$BB79])&#10;+[.AS$28]*[.$Z$5]*MAGNET([.AS$24]+[.$BB79])&#10;+[.AT$28]*[.$Z$5]*MAGNET([.AT$24]+[.$BB79])&#10;+[.AU$28]*[.$Z$5]*MAGNET([.AU$24]+[.$BB79])&#10;+[.AV$28]*[.$Z$5]*MAGNET([.AV$24]+[.$BB79])&#10;+[.AW$28]*[.$Z$5]*MAGNET([.AW$24]+[.$BB79])&#10;+[.AX$28]*[.$Z$5]*MAGNET([.AX$24]+[.$BB79])&#10;+[.AY$28]*[.$Z$5]*MAGNET([.AY$24]+[.$BB79]) +RAND()*[.$BF$13]" office:value-type="float" office:value="-9.66426371893181" calcext:value-type="float">
            <text:p>-9.66426371893181</text:p>
          </table:table-cell>
          <table:table-cell table:style-name="ce71" table:formula="of:=[.E$29]*[.$Z$5]*MAGNET([.E$24]+[.$BB79])+[.F$29]*[.$Z$5]*MAGNET([.F$24]+[.$BB79])+[.G$29]*[.$Z$5]*MAGNET([.G$24]+[.$BB79])+[.H$29]*[.$Z$5]*MAGNET([.H$24]+[.$BB79])+[.I$29]*[.$Z$5]*MAGNET([.I$24]+[.$BB79])+[.J$29]*[.$Z$5]*MAGNET([.J$24]+[.$BB79])+[.K$29]*[.$Z$5]*MAGNET([.K$24]+[.$BB79])+[.L$29]*[.$Z$5]*MAGNET([.L$24]+[.$BB79])+[.M$29]*[.$Z$5]*MAGNET([.M$24]+[.$BB79])+[.N$29]*[.$Z$5]*MAGNET([.N$24]+[.$BB79])+[.O$29]*[.$Z$5]*MAGNET([.O$24]+[.$BB79])+[.P$29]*[.$Z$5]*MAGNET([.P$24]+[.$BB79])+[.Q$29]*[.$Z$5]*MAGNET([.Q$24]+[.$BB79])+[.R$29]*[.$Z$5]*MAGNET([.R$24]+[.$BB79])+[.S$29]*[.$Z$5]*MAGNET([.S$24]+[.$BB79])+[.T$29]*[.$Z$5]*MAGNET([.T$24]+[.$BB79])+[.U$29]*[.$Z$5]*MAGNET([.U$24]+[.$BB79])+[.V$29]*[.$Z$5]*MAGNET([.V$24]+[.$BB79])+[.W$29]*[.$Z$5]*MAGNET([.W$24]+[.$BB79])+[.X$29]*[.$Z$5]*MAGNET([.X$24]+[.$BB79])+[.Y$29]*[.$Z$5]*MAGNET([.Y$24]+[.$BB79])+[.Z$29]*[.$Z$5]*MAGNET([.Z$24]+[.$BB79])+[.AA$29]*[.$Z$5]*MAGNET([.AA$24]+[.$BB79])+[.AB$29]*[.$Z$5]*MAGNET([.AB$24]+[.$BB79])+[.AC$29]*[.$Z$5]*MAGNET([.AC$24]+[.$BB79])+[.AD$29]*[.$Z$5]*MAGNET([.AD$24]+[.$BB79])+[.AE$29]*[.$Z$5]*MAGNET([.AE$24]+[.$BB79])+[.AF$29]*[.$Z$5]*MAGNET([.AF$24]+[.$BB79])+[.AG$29]*[.$Z$5]*MAGNET([.AG$24]+[.$BB79])+[.D$29]*[.$Z$5]*MAGNET([.D$24]+[.$BB79])+[.AH$29]*[.$Z$5]*MAGNET([.AH$24]+[.BB79]) +[.AI$29]*[.$Z$5]*MAGNET([.AI$24]+[.BB79]) +[.AJ$29]*[.$Z$5]*MAGNET([.AJ$24]+[.BB79]) +[.AK$29]*[.$Z$5]*MAGNET([.AK$24]+[.BB79]) +[.AL$29]*[.$Z$5]*MAGNET([.AL$24]+[.BB79]) +[.AM$29]*[.$Z$5]*MAGNET([.AM$24]+[.BB79]) +[.AN$29]*[.$Z$5]*MAGNET([.AN$24]+[.BB79]) +[.AO$29]*[.$Z$5]*MAGNET([.AO$24]+[.BB79]) +[.AP$29]*[.$Z$5]*MAGNET([.AP$24]+[.$BB79])&#10;+[.AQ$29]*[.$Z$5]*MAGNET([.AQ$24]+[.$BB79])&#10;+[.AR$29]*[.$Z$5]*MAGNET([.AR$24]+[.$BB79])&#10;+[.AS$29]*[.$Z$5]*MAGNET([.AS$24]+[.$BB79])&#10;+[.AT$29]*[.$Z$5]*MAGNET([.AT$24]+[.$BB79])&#10;+[.AU$29]*[.$Z$5]*MAGNET([.AU$24]+[.$BB79])&#10;+[.AV$29]*[.$Z$5]*MAGNET([.AV$24]+[.$BB79])&#10;+[.AW$29]*[.$Z$5]*MAGNET([.AW$24]+[.$BB79])&#10;+[.AX$29]*[.$Z$5]*MAGNET([.AX$24]+[.$BB79])&#10;+[.AY$29]*[.$Z$5]*MAGNET([.AY$24]+[.$BB79]) +RAND()*[.$BG$13]" office:value-type="float" office:value="35.4938009370738" calcext:value-type="float">
            <text:p>35.4938009370738</text:p>
          </table:table-cell>
          <table:table-cell table:style-name="ce71" table:formula="of:=[.E$30]*[.$Z$5]*MAGNET([.E$24]+[.$BB79])+[.F$30]*[.$Z$5]*MAGNET([.F$24]+[.$BB79])+[.G$30]*[.$Z$5]*MAGNET([.G$24]+[.$BB79])+[.H$30]*[.$Z$5]*MAGNET([.H$24]+[.$BB79])+[.I$30]*[.$Z$5]*MAGNET([.I$24]+[.$BB79])+[.J$30]*[.$Z$5]*MAGNET([.J$24]+[.$BB79])+[.K$30]*[.$Z$5]*MAGNET([.K$24]+[.$BB79])+[.L$30]*[.$Z$5]*MAGNET([.L$24]+[.$BB79])+[.M$30]*[.$Z$5]*MAGNET([.M$24]+[.$BB79])+[.N$30]*[.$Z$5]*MAGNET([.N$24]+[.$BB79])+[.O$30]*[.$Z$5]*MAGNET([.O$24]+[.$BB79])+[.P$30]*[.$Z$5]*MAGNET([.P$24]+[.$BB79])+[.Q$30]*[.$Z$5]*MAGNET([.Q$24]+[.$BB79])+[.R$30]*[.$Z$5]*MAGNET([.R$24]+[.$BB79])+[.S$30]*[.$Z$5]*MAGNET([.S$24]+[.$BB79])+[.T$30]*[.$Z$5]*MAGNET([.T$24]+[.$BB79])+[.U$30]*[.$Z$5]*MAGNET([.U$24]+[.$BB79])+[.V$30]*[.$Z$5]*MAGNET([.V$24]+[.$BB79])+[.W$30]*[.$Z$5]*MAGNET([.W$24]+[.$BB79])+[.X$30]*[.$Z$5]*MAGNET([.X$24]+[.$BB79])+[.Y$30]*[.$Z$5]*MAGNET([.Y$24]+[.$BB79])+[.Z$30]*[.$Z$5]*MAGNET([.Z$24]+[.$BB79])+[.AA$30]*[.$Z$5]*MAGNET([.AA$24]+[.$BB79])+[.AB$30]*[.$Z$5]*MAGNET([.AB$24]+[.$BB79])+[.AC$30]*[.$Z$5]*MAGNET([.AC$24]+[.$BB79])+[.AD$30]*[.$Z$5]*MAGNET([.AD$24]+[.$BB79])+[.AE$30]*[.$Z$5]*MAGNET([.AE$24]+[.$BB79])+[.AF$30]*[.$Z$5]*MAGNET([.AF$24]+[.$BB79])+[.AG$30]*[.$Z$5]*MAGNET([.AG$24]+[.$BB79])+[.D$30]*[.$Z$5]*MAGNET([.D$24]+[.$BB79])+[.AH$30]*[.$Z$5]*MAGNET([.AH$24]+[.BB79]) +[.AI$30]*[.$Z$5]*MAGNET([.AI$24]+[.BB79]) +[.AJ$30]*[.$Z$5]*MAGNET([.AJ$24]+[.BB79]) +[.AK$30]*[.$Z$5]*MAGNET([.AK$24]+[.BB79]) +[.AL$30]*[.$Z$5]*MAGNET([.AL$24]+[.BB79]) +[.AM$30]*[.$Z$5]*MAGNET([.AM$24]+[.BB79]) +[.AN$30]*[.$Z$5]*MAGNET([.AN$24]+[.BB79]) +[.AO$30]*[.$Z$5]*MAGNET([.AO$24]+[.BB79]) +[.AP$30]*[.$Z$5]*MAGNET([.AP$24]+[.$BB79])&#10;+[.AQ$30]*[.$Z$5]*MAGNET([.AQ$24]+[.$BB79])&#10;+[.AR$30]*[.$Z$5]*MAGNET([.AR$24]+[.$BB79])&#10;+[.AS$30]*[.$Z$5]*MAGNET([.AS$24]+[.$BB79])&#10;+[.AT$30]*[.$Z$5]*MAGNET([.AT$24]+[.$BB79])&#10;+[.AU$30]*[.$Z$5]*MAGNET([.AU$24]+[.$BB79])&#10;+[.AV$30]*[.$Z$5]*MAGNET([.AV$24]+[.$BB79])&#10;+[.AW$30]*[.$Z$5]*MAGNET([.AW$24]+[.$BB79])&#10;+[.AX$30]*[.$Z$5]*MAGNET([.AX$24]+[.$BB79])&#10;+[.AY$30]*[.$Z$5]*MAGNET([.AY$24]+[.$BB79]) +RAND()*[.$BH$13]" office:value-type="float" office:value="0" calcext:value-type="float">
            <text:p>0</text:p>
          </table:table-cell>
          <table:table-cell table:style-name="ce71" table:formula="of:=[.E$31]*[.$Z$5]*MAGNET([.E$24]+[.$BB79])+[.F$31]*[.$Z$5]*MAGNET([.F$24]+[.$BB79])+[.G$31]*[.$Z$5]*MAGNET([.G$24]+[.$BB79])+[.H$31]*[.$Z$5]*MAGNET([.H$24]+[.$BB79])+[.I$31]*[.$Z$5]*MAGNET([.I$24]+[.$BB79])+[.J$31]*[.$Z$5]*MAGNET([.J$24]+[.$BB79])+[.K$31]*[.$Z$5]*MAGNET([.K$24]+[.$BB79])+[.L$31]*[.$Z$5]*MAGNET([.L$24]+[.$BB79])+[.M$31]*[.$Z$5]*MAGNET([.M$24]+[.$BB79])+[.N$31]*[.$Z$5]*MAGNET([.N$24]+[.$BB79])+[.O$31]*[.$Z$5]*MAGNET([.O$24]+[.$BB79])+[.P$31]*[.$Z$5]*MAGNET([.P$24]+[.$BB79])+[.Q$31]*[.$Z$5]*MAGNET([.Q$24]+[.$BB79])+[.R$31]*[.$Z$5]*MAGNET([.R$24]+[.$BB79])+[.S$31]*[.$Z$5]*MAGNET([.S$24]+[.$BB79])+[.T$31]*[.$Z$5]*MAGNET([.T$24]+[.$BB79])+[.U$31]*[.$Z$5]*MAGNET([.U$24]+[.$BB79])+[.V$31]*[.$Z$5]*MAGNET([.V$24]+[.$BB79])+[.W$31]*[.$Z$5]*MAGNET([.W$24]+[.$BB79])+[.X$31]*[.$Z$5]*MAGNET([.X$24]+[.$BB79])+[.Y$31]*[.$Z$5]*MAGNET([.Y$24]+[.$BB79])+[.Z$31]*[.$Z$5]*MAGNET([.Z$24]+[.$BB79])+[.AA$31]*[.$Z$5]*MAGNET([.AA$24]+[.$BB79])+[.AB$31]*[.$Z$5]*MAGNET([.AB$24]+[.$BB79])+[.AC$31]*[.$Z$5]*MAGNET([.AC$24]+[.$BB79])+[.AD$31]*[.$Z$5]*MAGNET([.AD$24]+[.$BB79])+[.AE$31]*[.$Z$5]*MAGNET([.AE$24]+[.$BB79])+[.AF$31]*[.$Z$5]*MAGNET([.AF$24]+[.$BB79])+[.AG$31]*[.$Z$5]*MAGNET([.AG$24]+[.$BB79])+[.D$31]*[.$Z$5]*MAGNET([.D$24]+[.$BB79])+[.AH$31]*[.$Z$5]*MAGNET([.AH$24]+[.BB79]) +[.AI$31]*[.$Z$5]*MAGNET([.AI$24]+[.BB79]) +[.AJ$31]*[.$Z$5]*MAGNET([.AJ$24]+[.BB79]) +[.AK$31]*[.$Z$5]*MAGNET([.AK$24]+[.BB79]) +[.AL$31]*[.$Z$5]*MAGNET([.AL$24]+[.BB79]) +[.AM$31]*[.$Z$5]*MAGNET([.AM$24]+[.BB79]) +[.AN$31]*[.$Z$5]*MAGNET([.AN$24]+[.BB79]) +[.AO$31]*[.$Z$5]*MAGNET([.AO$24]+[.BB79]) +[.AP$31]*[.$Z$5]*MAGNET([.AP$24]+[.$BB79])&#10;+[.AQ$31]*[.$Z$5]*MAGNET([.AQ$24]+[.$BB79])&#10;+[.AR$31]*[.$Z$5]*MAGNET([.AR$24]+[.$BB79])&#10;+[.AS$31]*[.$Z$5]*MAGNET([.AS$24]+[.$BB79])&#10;+[.AT$31]*[.$Z$5]*MAGNET([.AT$24]+[.$BB79])&#10;+[.AU$31]*[.$Z$5]*MAGNET([.AU$24]+[.$BB79])&#10;+[.AV$31]*[.$Z$5]*MAGNET([.AV$24]+[.$BB79])&#10;+[.AW$31]*[.$Z$5]*MAGNET([.AW$24]+[.$BB79])&#10;+[.AX$31]*[.$Z$5]*MAGNET([.AX$24]+[.$BB79])&#10;+[.AY$31]*[.$Z$5]*MAGNET([.AY$24]+[.$BB79]) +RAND()*[.$BI$13]" office:value-type="float" office:value="0" calcext:value-type="float">
            <text:p>0</text:p>
          </table:table-cell>
          <table:table-cell table:style-name="ce71" table:formula="of:=[.E$32]*[.$Z$5]*MAGNET([.E$24]+[.$BB79])+[.F$32]*[.$Z$5]*MAGNET([.F$24]+[.$BB79])+[.G$32]*[.$Z$5]*MAGNET([.G$24]+[.$BB79])+[.H$32]*[.$Z$5]*MAGNET([.H$24]+[.$BB79])+[.I$32]*[.$Z$5]*MAGNET([.I$24]+[.$BB79])+[.J$32]*[.$Z$5]*MAGNET([.J$24]+[.$BB79])+[.K$32]*[.$Z$5]*MAGNET([.K$24]+[.$BB79])+[.L$32]*[.$Z$5]*MAGNET([.L$24]+[.$BB79])+[.M$32]*[.$Z$5]*MAGNET([.M$24]+[.$BB79])+[.N$32]*[.$Z$5]*MAGNET([.N$24]+[.$BB79])+[.O$32]*[.$Z$5]*MAGNET([.O$24]+[.$BB79])+[.P$32]*[.$Z$5]*MAGNET([.P$24]+[.$BB79])+[.Q$32]*[.$Z$5]*MAGNET([.Q$24]+[.$BB79])+[.R$32]*[.$Z$5]*MAGNET([.R$24]+[.$BB79])+[.S$32]*[.$Z$5]*MAGNET([.S$24]+[.$BB79])+[.T$32]*[.$Z$5]*MAGNET([.T$24]+[.$BB79])+[.U$32]*[.$Z$5]*MAGNET([.U$24]+[.$BB79])+[.V$32]*[.$Z$5]*MAGNET([.V$24]+[.$BB79])+[.W$32]*[.$Z$5]*MAGNET([.W$24]+[.$BB79])+[.X$32]*[.$Z$5]*MAGNET([.X$24]+[.$BB79])+[.Y$32]*[.$Z$5]*MAGNET([.Y$24]+[.$BB79])+[.Z$32]*[.$Z$5]*MAGNET([.Z$24]+[.$BB79])+[.AA$32]*[.$Z$5]*MAGNET([.AA$24]+[.$BB79])+[.AB$32]*[.$Z$5]*MAGNET([.AB$24]+[.$BB79])+[.AC$32]*[.$Z$5]*MAGNET([.AC$24]+[.$BB79])+[.AD$32]*[.$Z$5]*MAGNET([.AD$24]+[.$BB79])+[.AE$32]*[.$Z$5]*MAGNET([.AE$24]+[.$BB79])+[.AF$32]*[.$Z$5]*MAGNET([.AF$24]+[.$BB79])+[.AG$32]*[.$Z$5]*MAGNET([.AG$24]+[.$BB79])+[.D$32]*[.$Z$5]*MAGNET([.D$24]+[.$BB79])+[.AH$32]*[.$Z$5]*MAGNET([.AH$24]+[.BB79]) +[.AI$32]*[.$Z$5]*MAGNET([.AI$24]+[.BB79]) +[.AJ$32]*[.$Z$5]*MAGNET([.AJ$24]+[.BB79]) +[.AK$32]*[.$Z$5]*MAGNET([.AK$24]+[.BB79]) +[.AL$32]*[.$Z$5]*MAGNET([.AL$24]+[.BB79]) +[.AM$32]*[.$Z$5]*MAGNET([.AM$24]+[.BB79]) +[.AN$32]*[.$Z$5]*MAGNET([.AN$24]+[.BB79]) +[.AO$32]*[.$Z$5]*MAGNET([.AO$24]+[.BB79]) +[.AP$32]*[.$Z$5]*MAGNET([.AP$24]+[.$BB79])&#10;+[.AQ$32]*[.$Z$5]*MAGNET([.AQ$24]+[.$BB79])&#10;+[.AR$32]*[.$Z$5]*MAGNET([.AR$24]+[.$BB79])&#10;+[.AS$32]*[.$Z$5]*MAGNET([.AS$24]+[.$BB79])&#10;+[.AT$32]*[.$Z$5]*MAGNET([.AT$24]+[.$BB79])&#10;+[.AU$32]*[.$Z$5]*MAGNET([.AU$24]+[.$BB79])&#10;+[.AV$32]*[.$Z$5]*MAGNET([.AV$24]+[.$BB79])&#10;+[.AW$32]*[.$Z$5]*MAGNET([.AW$24]+[.$BB79])&#10;+[.AX$32]*[.$Z$5]*MAGNET([.AX$24]+[.$BB79])&#10;+[.AY$32]*[.$Z$5]*MAGNET([.AY$24]+[.$BB7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79]+0.002" office:value-type="float" office:value="0.13" calcext:value-type="float">
            <text:p>0.13</text:p>
          </table:table-cell>
          <table:table-cell table:formula="of:=[.BA80]*[.$D$6]" office:value-type="float" office:value="6.53451271946677" calcext:value-type="float">
            <text:p>6.535</text:p>
          </table:table-cell>
          <table:table-cell table:formula="of:=[.D$25]*[.$Z$5]*MAGNET([.D$24]+[.BB80])+[.E$25]*[.$Z$5]*MAGNET([.E$24]+[.BB80])+[.F$25]*[.$Z$5]*MAGNET([.F$24]+[.BB80])+[.G$25]*[.$Z$5]*MAGNET([.G$24]+[.BB80])+[.H$25]*[.$Z$5]*MAGNET([.H$24]+[.BB80])+[.I$25]*[.$Z$5]*MAGNET([.I$24]+[.BB80])+[.J$25]*[.$Z$5]*MAGNET([.J$24]+[.BB80])+[.K$25]*[.$Z$5]*MAGNET([.K$24]+[.BB80])+[.L$25]*[.$Z$5]*MAGNET([.L$24]+[.BB80])+[.M$25]*[.$Z$5]*MAGNET([.M$24]+[.BB80])+[.N$25]*[.$Z$5]*MAGNET([.N$24]+[.BB80])+[.O$25]*[.$Z$5]*MAGNET([.O$24]+[.BB80])+[.P$25]*[.$Z$5]*MAGNET([.P$24]+[.BB80])+[.Q$25]*[.$Z$5]*MAGNET([.Q$24]+[.BB80])+[.R$25]*[.$Z$5]*MAGNET([.R$24]+[.BB80])+[.S$25]*[.$Z$5]*MAGNET([.S$24]+[.BB80])+[.T$25]*[.$Z$5]*MAGNET([.T$24]+[.BB80])+[.U$25]*[.$Z$5]*MAGNET([.U$24]+[.BB80])+[.V$25]*[.$Z$5]*MAGNET([.V$24]+[.BB80])+[.W$25]*[.$Z$5]*MAGNET([.W$24]+[.BB80])+[.X$25]*[.$Z$5]*MAGNET([.X$24]+[.BB80])+[.Y$25]*[.$Z$5]*MAGNET([.Y$24]+[.BB80])+[.Z$25]*[.$Z$5]*MAGNET([.Z$24]+[.BB80])+[.AA$25]*[.$Z$5]*MAGNET([.AA$24]+[.BB80])+[.AB$25]*[.$Z$5]*MAGNET([.AB$24]+[.BB80])+[.AC$25]*[.$Z$5]*MAGNET([.AC$24]+[.BB80])+[.AD$25]*[.$Z$5]*MAGNET([.AD$24]+[.BB80])+[.AE$25]*[.$Z$5]*MAGNET([.AE$24]+[.BB80])+[.AF$25]*[.$Z$5]*MAGNET([.AF$24]+[.BB80])+[.AG$25]*[.$Z$5]*MAGNET([.AG$24]+[.BB80])+[.AH$25]*[.$Z$5]*MAGNET([.AH$24]+[.BB80]) +[.AI$25]*[.$Z$5]*MAGNET([.AI$24]+[.BB80]) +[.AJ$25]*[.$Z$5]*MAGNET([.AJ$24]+[.BB80]) +[.AK$25]*[.$Z$5]*MAGNET([.AK$24]+[.BB80]) +[.AL$25]*[.$Z$5]*MAGNET([.AL$24]+[.BB80]) +[.AM$25]*[.$Z$5]*MAGNET([.AM$24]+[.BB80]) +[.AN$25]*[.$Z$5]*MAGNET([.AN$24]+[.BB80]) +[.AO$25]*[.$Z$5]*MAGNET([.AO$24]+[.BB80])+RAND()*[.$BC$13]+[.AP$25]*[.$Z$5]*MAGNET([.AP$24]+[.BB80])&#10;+[.AQ$25]*[.$Z$5]*MAGNET([.AQ$24]+[.BB80])&#10;+[.AR$25]*[.$Z$5]*MAGNET([.AR$24]+[.BB80])&#10;+[.AS$25]*[.$Z$5]*MAGNET([.AS$24]+[.BB80])&#10;+[.AT$25]*[.$Z$5]*MAGNET([.AT$24]+[.BB80])&#10;+[.AU$25]*[.$Z$5]*MAGNET([.AU$24]+[.BB80])&#10;+[.AV$25]*[.$Z$5]*MAGNET([.AV$24]+[.BB80])&#10;+[.AW$25]*[.$Z$5]*MAGNET([.AW$24]+[.BB80])&#10;+[.AX$25]*[.$Z$5]*MAGNET([.AX$24]+[.BB80])&#10;+[.AY$25]*[.$Z$5]*MAGNET([.AY$24]+[.BB80])" office:value-type="float" office:value="-19.0817455259236" calcext:value-type="float">
            <text:p>-19.08</text:p>
          </table:table-cell>
          <table:table-cell table:style-name="ce70" table:formula="of:=[.E$26]*[.$Z$5]*MAGNET([.E$24]+[.$BB80])+[.F$26]*[.$Z$5]*MAGNET([.F$24]+[.$BB80])+[.G$26]*[.$Z$5]*MAGNET([.G$24]+[.$BB80])+[.H$26]*[.$Z$5]*MAGNET([.H$24]+[.$BB80])+[.I$26]*[.$Z$5]*MAGNET([.I$24]+[.$BB80])+[.J$26]*[.$Z$5]*MAGNET([.J$24]+[.$BB80])+[.K$26]*[.$Z$5]*MAGNET([.K$24]+[.$BB80])+[.L$26]*[.$Z$5]*MAGNET([.L$24]+[.$BB80])+[.M$26]*[.$Z$5]*MAGNET([.M$24]+[.$BB80])+[.N$26]*[.$Z$5]*MAGNET([.N$24]+[.$BB80])+[.O$26]*[.$Z$5]*MAGNET([.O$24]+[.$BB80])+[.P$26]*[.$Z$5]*MAGNET([.P$24]+[.$BB80])+[.Q$26]*[.$Z$5]*MAGNET([.Q$24]+[.$BB80])+[.R$26]*[.$Z$5]*MAGNET([.R$24]+[.$BB80])+[.S$26]*[.$Z$5]*MAGNET([.S$24]+[.$BB80])+[.T$26]*[.$Z$5]*MAGNET([.T$24]+[.$BB80])+[.U$26]*[.$Z$5]*MAGNET([.U$24]+[.$BB80])+[.V$26]*[.$Z$5]*MAGNET([.V$24]+[.$BB80])+[.W$26]*[.$Z$5]*MAGNET([.W$24]+[.$BB80])+[.X$26]*[.$Z$5]*MAGNET([.X$24]+[.$BB80])+[.Y$26]*[.$Z$5]*MAGNET([.Y$24]+[.$BB80])+[.Z$26]*[.$Z$5]*MAGNET([.Z$24]+[.$BB80])+[.AA$26]*[.$Z$5]*MAGNET([.AA$24]+[.$BB80])+[.AB$26]*[.$Z$5]*MAGNET([.AB$24]+[.$BB80])+[.AC$26]*[.$Z$5]*MAGNET([.AC$24]+[.$BB80])+[.AD$26]*[.$Z$5]*MAGNET([.AD$24]+[.$BB80])+[.AE$26]*[.$Z$5]*MAGNET([.AE$24]+[.$BB80])+[.AF$26]*[.$Z$5]*MAGNET([.AF$24]+[.$BB80])+[.AG$26]*[.$Z$5]*MAGNET([.AG$24]+[.$BB80])+[.D$26]*[.$Z$5]*MAGNET([.D$24]+[.$BB80])+[.AH$26]*[.$Z$5]*MAGNET([.AH$24]+[.BB80]) +[.AI$26]*[.$Z$5]*MAGNET([.AI$24]+[.BB80]) +[.AJ$26]*[.$Z$5]*MAGNET([.AJ$24]+[.BB80]) +[.AK$26]*[.$Z$5]*MAGNET([.AK$24]+[.BB80]) +[.AL$26]*[.$Z$5]*MAGNET([.AL$24]+[.BB80]) +[.AM$26]*[.$Z$5]*MAGNET([.AM$24]+[.BB80]) +[.AN$26]*[.$Z$5]*MAGNET([.AN$24]+[.BB80]) +[.AO$26]*[.$Z$5]*MAGNET([.AO$24]+[.BB80]) +[.AP$26]*[.$Z$5]*MAGNET([.AP$24]+[.$BB80])&#10;+[.AQ$26]*[.$Z$5]*MAGNET([.AQ$24]+[.$BB80])&#10;+[.AR$26]*[.$Z$5]*MAGNET([.AR$24]+[.$BB80])&#10;+[.AS$26]*[.$Z$5]*MAGNET([.AS$24]+[.$BB80])&#10;+[.AT$26]*[.$Z$5]*MAGNET([.AT$24]+[.$BB80])&#10;+[.AU$26]*[.$Z$5]*MAGNET([.AU$24]+[.$BB80])&#10;+[.AV$26]*[.$Z$5]*MAGNET([.AV$24]+[.$BB80])&#10;+[.AW$26]*[.$Z$5]*MAGNET([.AW$24]+[.$BB80])&#10;+[.AX$26]*[.$Z$5]*MAGNET([.AX$24]+[.$BB80])&#10;+[.AY$26]*[.$Z$5]*MAGNET([.AY$24]+[.$BB80]) +RAND()*[.$BD$13]" office:value-type="float" office:value="89.2401857579426" calcext:value-type="float">
            <text:p>89.24</text:p>
          </table:table-cell>
          <table:table-cell table:style-name="ce71" table:formula="of:=[.E$27]*[.$Z$5]*MAGNET([.E$24]+[.$BB80])+[.F$27]*[.$Z$5]*MAGNET([.F$24]+[.$BB80])+[.G$27]*[.$Z$5]*MAGNET([.G$24]+[.$BB80])+[.H$27]*[.$Z$5]*MAGNET([.H$24]+[.$BB80])+[.I$27]*[.$Z$5]*MAGNET([.I$24]+[.$BB80])+[.J$27]*[.$Z$5]*MAGNET([.J$24]+[.$BB80])+[.K$27]*[.$Z$5]*MAGNET([.K$24]+[.$BB80])+[.L$27]*[.$Z$5]*MAGNET([.L$24]+[.$BB80])+[.M$27]*[.$Z$5]*MAGNET([.M$24]+[.$BB80])+[.N$27]*[.$Z$5]*MAGNET([.N$24]+[.$BB80])+[.O$27]*[.$Z$5]*MAGNET([.O$24]+[.$BB80])+[.P$27]*[.$Z$5]*MAGNET([.P$24]+[.$BB80])+[.Q$27]*[.$Z$5]*MAGNET([.Q$24]+[.$BB80])+[.R$27]*[.$Z$5]*MAGNET([.R$24]+[.$BB80])+[.S$27]*[.$Z$5]*MAGNET([.S$24]+[.$BB80])+[.T$27]*[.$Z$5]*MAGNET([.T$24]+[.$BB80])+[.U$27]*[.$Z$5]*MAGNET([.U$24]+[.$BB80])+[.V$27]*[.$Z$5]*MAGNET([.V$24]+[.$BB80])+[.W$27]*[.$Z$5]*MAGNET([.W$24]+[.$BB80])+[.X$27]*[.$Z$5]*MAGNET([.X$24]+[.$BB80])+[.Y$27]*[.$Z$5]*MAGNET([.Y$24]+[.$BB80])+[.Z$27]*[.$Z$5]*MAGNET([.Z$24]+[.$BB80])+[.AA$27]*[.$Z$5]*MAGNET([.AA$24]+[.$BB80])+[.AB$27]*[.$Z$5]*MAGNET([.AB$24]+[.$BB80])+[.AC$27]*[.$Z$5]*MAGNET([.AC$24]+[.$BB80])+[.AD$27]*[.$Z$5]*MAGNET([.AD$24]+[.$BB80])+[.AE$27]*[.$Z$5]*MAGNET([.AE$24]+[.$BB80])+[.AF$27]*[.$Z$5]*MAGNET([.AF$24]+[.$BB80])+[.AG$27]*[.$Z$5]*MAGNET([.AG$24]+[.$BB80])+[.D$27]*[.$Z$5]*MAGNET([.D$24]+[.$BB80])+[.AH$27]*[.$Z$5]*MAGNET([.AH$24]+[.BB80]) +[.AI$27]*[.$Z$5]*MAGNET([.AI$24]+[.BB80]) +[.AJ$27]*[.$Z$5]*MAGNET([.AJ$24]+[.BB80]) +[.AK$27]*[.$Z$5]*MAGNET([.AK$24]+[.BB80]) +[.AL$27]*[.$Z$5]*MAGNET([.AL$24]+[.BB80]) +[.AM$27]*[.$Z$5]*MAGNET([.AM$24]+[.BB80]) +[.AN$27]*[.$Z$5]*MAGNET([.AN$24]+[.BB80]) +[.AO$27]*[.$Z$5]*MAGNET([.AO$24]+[.BB80]) +[.AP$27]*[.$Z$5]*MAGNET([.AP$24]+[.$BB80])&#10;+[.AQ$27]*[.$Z$5]*MAGNET([.AQ$24]+[.$BB80])&#10;+[.AR$27]*[.$Z$5]*MAGNET([.AR$24]+[.$BB80])&#10;+[.AS$27]*[.$Z$5]*MAGNET([.AS$24]+[.$BB80])&#10;+[.AT$27]*[.$Z$5]*MAGNET([.AT$24]+[.$BB80])&#10;+[.AU$27]*[.$Z$5]*MAGNET([.AU$24]+[.$BB80])&#10;+[.AV$27]*[.$Z$5]*MAGNET([.AV$24]+[.$BB80])&#10;+[.AW$27]*[.$Z$5]*MAGNET([.AW$24]+[.$BB80])&#10;+[.AX$27]*[.$Z$5]*MAGNET([.AX$24]+[.$BB80])&#10;+[.AY$27]*[.$Z$5]*MAGNET([.AY$24]+[.$BB80]) +RAND()*[.$BE$13]" office:value-type="float" office:value="-80.9466173951275" calcext:value-type="float">
            <text:p>-80.9466173951275</text:p>
          </table:table-cell>
          <table:table-cell table:style-name="ce71" table:formula="of:=[.E$28]*[.$Z$5]*MAGNET([.E$24]+[.$BB80])+[.F$28]*[.$Z$5]*MAGNET([.F$24]+[.$BB80])+[.G$28]*[.$Z$5]*MAGNET([.G$24]+[.$BB80])+[.H$28]*[.$Z$5]*MAGNET([.H$24]+[.$BB80])+[.I$28]*[.$Z$5]*MAGNET([.I$24]+[.$BB80])+[.J$28]*[.$Z$5]*MAGNET([.J$24]+[.$BB80])+[.K$28]*[.$Z$5]*MAGNET([.K$24]+[.$BB80])+[.L$28]*[.$Z$5]*MAGNET([.L$24]+[.$BB80])+[.M$28]*[.$Z$5]*MAGNET([.M$24]+[.$BB80])+[.N$28]*[.$Z$5]*MAGNET([.N$24]+[.$BB80])+[.O$28]*[.$Z$5]*MAGNET([.O$24]+[.$BB80])+[.P$28]*[.$Z$5]*MAGNET([.P$24]+[.$BB80])+[.Q$28]*[.$Z$5]*MAGNET([.Q$24]+[.$BB80])+[.R$28]*[.$Z$5]*MAGNET([.R$24]+[.$BB80])+[.S$28]*[.$Z$5]*MAGNET([.S$24]+[.$BB80])+[.T$28]*[.$Z$5]*MAGNET([.T$24]+[.$BB80])+[.U$28]*[.$Z$5]*MAGNET([.U$24]+[.$BB80])+[.V$28]*[.$Z$5]*MAGNET([.V$24]+[.$BB80])+[.W$28]*[.$Z$5]*MAGNET([.W$24]+[.$BB80])+[.X$28]*[.$Z$5]*MAGNET([.X$24]+[.$BB80])+[.Y$28]*[.$Z$5]*MAGNET([.Y$24]+[.$BB80])+[.Z$28]*[.$Z$5]*MAGNET([.Z$24]+[.$BB80])+[.AA$28]*[.$Z$5]*MAGNET([.AA$24]+[.$BB80])+[.AB$28]*[.$Z$5]*MAGNET([.AB$24]+[.$BB80])+[.AC$28]*[.$Z$5]*MAGNET([.AC$24]+[.$BB80])+[.AD$28]*[.$Z$5]*MAGNET([.AD$24]+[.$BB80])+[.AE$28]*[.$Z$5]*MAGNET([.AE$24]+[.$BB80])+[.AF$28]*[.$Z$5]*MAGNET([.AF$24]+[.$BB80])+[.AG$28]*[.$Z$5]*MAGNET([.AG$24]+[.$BB80])+[.D$28]*[.$Z$5]*MAGNET([.D$24]+[.$BB80])+[.AH$28]*[.$Z$5]*MAGNET([.AH$24]+[.BB80]) +[.AI$28]*[.$Z$5]*MAGNET([.AI$24]+[.BB80]) +[.AJ$28]*[.$Z$5]*MAGNET([.AJ$24]+[.BB80]) +[.AK$28]*[.$Z$5]*MAGNET([.AK$24]+[.BB80]) +[.AL$28]*[.$Z$5]*MAGNET([.AL$24]+[.BB80]) +[.AM$28]*[.$Z$5]*MAGNET([.AM$24]+[.BB80]) +[.AN$28]*[.$Z$5]*MAGNET([.AN$24]+[.BB80]) +[.AO$28]*[.$Z$5]*MAGNET([.AO$24]+[.BB80]) +[.AP$28]*[.$Z$5]*MAGNET([.AP$24]+[.$BB80])&#10;+[.AQ$28]*[.$Z$5]*MAGNET([.AQ$24]+[.$BB80])&#10;+[.AR$28]*[.$Z$5]*MAGNET([.AR$24]+[.$BB80])&#10;+[.AS$28]*[.$Z$5]*MAGNET([.AS$24]+[.$BB80])&#10;+[.AT$28]*[.$Z$5]*MAGNET([.AT$24]+[.$BB80])&#10;+[.AU$28]*[.$Z$5]*MAGNET([.AU$24]+[.$BB80])&#10;+[.AV$28]*[.$Z$5]*MAGNET([.AV$24]+[.$BB80])&#10;+[.AW$28]*[.$Z$5]*MAGNET([.AW$24]+[.$BB80])&#10;+[.AX$28]*[.$Z$5]*MAGNET([.AX$24]+[.$BB80])&#10;+[.AY$28]*[.$Z$5]*MAGNET([.AY$24]+[.$BB80]) +RAND()*[.$BF$13]" office:value-type="float" office:value="-11.1671797871164" calcext:value-type="float">
            <text:p>-11.1671797871164</text:p>
          </table:table-cell>
          <table:table-cell table:style-name="ce71" table:formula="of:=[.E$29]*[.$Z$5]*MAGNET([.E$24]+[.$BB80])+[.F$29]*[.$Z$5]*MAGNET([.F$24]+[.$BB80])+[.G$29]*[.$Z$5]*MAGNET([.G$24]+[.$BB80])+[.H$29]*[.$Z$5]*MAGNET([.H$24]+[.$BB80])+[.I$29]*[.$Z$5]*MAGNET([.I$24]+[.$BB80])+[.J$29]*[.$Z$5]*MAGNET([.J$24]+[.$BB80])+[.K$29]*[.$Z$5]*MAGNET([.K$24]+[.$BB80])+[.L$29]*[.$Z$5]*MAGNET([.L$24]+[.$BB80])+[.M$29]*[.$Z$5]*MAGNET([.M$24]+[.$BB80])+[.N$29]*[.$Z$5]*MAGNET([.N$24]+[.$BB80])+[.O$29]*[.$Z$5]*MAGNET([.O$24]+[.$BB80])+[.P$29]*[.$Z$5]*MAGNET([.P$24]+[.$BB80])+[.Q$29]*[.$Z$5]*MAGNET([.Q$24]+[.$BB80])+[.R$29]*[.$Z$5]*MAGNET([.R$24]+[.$BB80])+[.S$29]*[.$Z$5]*MAGNET([.S$24]+[.$BB80])+[.T$29]*[.$Z$5]*MAGNET([.T$24]+[.$BB80])+[.U$29]*[.$Z$5]*MAGNET([.U$24]+[.$BB80])+[.V$29]*[.$Z$5]*MAGNET([.V$24]+[.$BB80])+[.W$29]*[.$Z$5]*MAGNET([.W$24]+[.$BB80])+[.X$29]*[.$Z$5]*MAGNET([.X$24]+[.$BB80])+[.Y$29]*[.$Z$5]*MAGNET([.Y$24]+[.$BB80])+[.Z$29]*[.$Z$5]*MAGNET([.Z$24]+[.$BB80])+[.AA$29]*[.$Z$5]*MAGNET([.AA$24]+[.$BB80])+[.AB$29]*[.$Z$5]*MAGNET([.AB$24]+[.$BB80])+[.AC$29]*[.$Z$5]*MAGNET([.AC$24]+[.$BB80])+[.AD$29]*[.$Z$5]*MAGNET([.AD$24]+[.$BB80])+[.AE$29]*[.$Z$5]*MAGNET([.AE$24]+[.$BB80])+[.AF$29]*[.$Z$5]*MAGNET([.AF$24]+[.$BB80])+[.AG$29]*[.$Z$5]*MAGNET([.AG$24]+[.$BB80])+[.D$29]*[.$Z$5]*MAGNET([.D$24]+[.$BB80])+[.AH$29]*[.$Z$5]*MAGNET([.AH$24]+[.BB80]) +[.AI$29]*[.$Z$5]*MAGNET([.AI$24]+[.BB80]) +[.AJ$29]*[.$Z$5]*MAGNET([.AJ$24]+[.BB80]) +[.AK$29]*[.$Z$5]*MAGNET([.AK$24]+[.BB80]) +[.AL$29]*[.$Z$5]*MAGNET([.AL$24]+[.BB80]) +[.AM$29]*[.$Z$5]*MAGNET([.AM$24]+[.BB80]) +[.AN$29]*[.$Z$5]*MAGNET([.AN$24]+[.BB80]) +[.AO$29]*[.$Z$5]*MAGNET([.AO$24]+[.BB80]) +[.AP$29]*[.$Z$5]*MAGNET([.AP$24]+[.$BB80])&#10;+[.AQ$29]*[.$Z$5]*MAGNET([.AQ$24]+[.$BB80])&#10;+[.AR$29]*[.$Z$5]*MAGNET([.AR$24]+[.$BB80])&#10;+[.AS$29]*[.$Z$5]*MAGNET([.AS$24]+[.$BB80])&#10;+[.AT$29]*[.$Z$5]*MAGNET([.AT$24]+[.$BB80])&#10;+[.AU$29]*[.$Z$5]*MAGNET([.AU$24]+[.$BB80])&#10;+[.AV$29]*[.$Z$5]*MAGNET([.AV$24]+[.$BB80])&#10;+[.AW$29]*[.$Z$5]*MAGNET([.AW$24]+[.$BB80])&#10;+[.AX$29]*[.$Z$5]*MAGNET([.AX$24]+[.$BB80])&#10;+[.AY$29]*[.$Z$5]*MAGNET([.AY$24]+[.$BB80]) +RAND()*[.$BG$13]" office:value-type="float" office:value="38.8305048514396" calcext:value-type="float">
            <text:p>38.8305048514396</text:p>
          </table:table-cell>
          <table:table-cell table:style-name="ce71" table:formula="of:=[.E$30]*[.$Z$5]*MAGNET([.E$24]+[.$BB80])+[.F$30]*[.$Z$5]*MAGNET([.F$24]+[.$BB80])+[.G$30]*[.$Z$5]*MAGNET([.G$24]+[.$BB80])+[.H$30]*[.$Z$5]*MAGNET([.H$24]+[.$BB80])+[.I$30]*[.$Z$5]*MAGNET([.I$24]+[.$BB80])+[.J$30]*[.$Z$5]*MAGNET([.J$24]+[.$BB80])+[.K$30]*[.$Z$5]*MAGNET([.K$24]+[.$BB80])+[.L$30]*[.$Z$5]*MAGNET([.L$24]+[.$BB80])+[.M$30]*[.$Z$5]*MAGNET([.M$24]+[.$BB80])+[.N$30]*[.$Z$5]*MAGNET([.N$24]+[.$BB80])+[.O$30]*[.$Z$5]*MAGNET([.O$24]+[.$BB80])+[.P$30]*[.$Z$5]*MAGNET([.P$24]+[.$BB80])+[.Q$30]*[.$Z$5]*MAGNET([.Q$24]+[.$BB80])+[.R$30]*[.$Z$5]*MAGNET([.R$24]+[.$BB80])+[.S$30]*[.$Z$5]*MAGNET([.S$24]+[.$BB80])+[.T$30]*[.$Z$5]*MAGNET([.T$24]+[.$BB80])+[.U$30]*[.$Z$5]*MAGNET([.U$24]+[.$BB80])+[.V$30]*[.$Z$5]*MAGNET([.V$24]+[.$BB80])+[.W$30]*[.$Z$5]*MAGNET([.W$24]+[.$BB80])+[.X$30]*[.$Z$5]*MAGNET([.X$24]+[.$BB80])+[.Y$30]*[.$Z$5]*MAGNET([.Y$24]+[.$BB80])+[.Z$30]*[.$Z$5]*MAGNET([.Z$24]+[.$BB80])+[.AA$30]*[.$Z$5]*MAGNET([.AA$24]+[.$BB80])+[.AB$30]*[.$Z$5]*MAGNET([.AB$24]+[.$BB80])+[.AC$30]*[.$Z$5]*MAGNET([.AC$24]+[.$BB80])+[.AD$30]*[.$Z$5]*MAGNET([.AD$24]+[.$BB80])+[.AE$30]*[.$Z$5]*MAGNET([.AE$24]+[.$BB80])+[.AF$30]*[.$Z$5]*MAGNET([.AF$24]+[.$BB80])+[.AG$30]*[.$Z$5]*MAGNET([.AG$24]+[.$BB80])+[.D$30]*[.$Z$5]*MAGNET([.D$24]+[.$BB80])+[.AH$30]*[.$Z$5]*MAGNET([.AH$24]+[.BB80]) +[.AI$30]*[.$Z$5]*MAGNET([.AI$24]+[.BB80]) +[.AJ$30]*[.$Z$5]*MAGNET([.AJ$24]+[.BB80]) +[.AK$30]*[.$Z$5]*MAGNET([.AK$24]+[.BB80]) +[.AL$30]*[.$Z$5]*MAGNET([.AL$24]+[.BB80]) +[.AM$30]*[.$Z$5]*MAGNET([.AM$24]+[.BB80]) +[.AN$30]*[.$Z$5]*MAGNET([.AN$24]+[.BB80]) +[.AO$30]*[.$Z$5]*MAGNET([.AO$24]+[.BB80]) +[.AP$30]*[.$Z$5]*MAGNET([.AP$24]+[.$BB80])&#10;+[.AQ$30]*[.$Z$5]*MAGNET([.AQ$24]+[.$BB80])&#10;+[.AR$30]*[.$Z$5]*MAGNET([.AR$24]+[.$BB80])&#10;+[.AS$30]*[.$Z$5]*MAGNET([.AS$24]+[.$BB80])&#10;+[.AT$30]*[.$Z$5]*MAGNET([.AT$24]+[.$BB80])&#10;+[.AU$30]*[.$Z$5]*MAGNET([.AU$24]+[.$BB80])&#10;+[.AV$30]*[.$Z$5]*MAGNET([.AV$24]+[.$BB80])&#10;+[.AW$30]*[.$Z$5]*MAGNET([.AW$24]+[.$BB80])&#10;+[.AX$30]*[.$Z$5]*MAGNET([.AX$24]+[.$BB80])&#10;+[.AY$30]*[.$Z$5]*MAGNET([.AY$24]+[.$BB80]) +RAND()*[.$BH$13]" office:value-type="float" office:value="0" calcext:value-type="float">
            <text:p>0</text:p>
          </table:table-cell>
          <table:table-cell table:style-name="ce71" table:formula="of:=[.E$31]*[.$Z$5]*MAGNET([.E$24]+[.$BB80])+[.F$31]*[.$Z$5]*MAGNET([.F$24]+[.$BB80])+[.G$31]*[.$Z$5]*MAGNET([.G$24]+[.$BB80])+[.H$31]*[.$Z$5]*MAGNET([.H$24]+[.$BB80])+[.I$31]*[.$Z$5]*MAGNET([.I$24]+[.$BB80])+[.J$31]*[.$Z$5]*MAGNET([.J$24]+[.$BB80])+[.K$31]*[.$Z$5]*MAGNET([.K$24]+[.$BB80])+[.L$31]*[.$Z$5]*MAGNET([.L$24]+[.$BB80])+[.M$31]*[.$Z$5]*MAGNET([.M$24]+[.$BB80])+[.N$31]*[.$Z$5]*MAGNET([.N$24]+[.$BB80])+[.O$31]*[.$Z$5]*MAGNET([.O$24]+[.$BB80])+[.P$31]*[.$Z$5]*MAGNET([.P$24]+[.$BB80])+[.Q$31]*[.$Z$5]*MAGNET([.Q$24]+[.$BB80])+[.R$31]*[.$Z$5]*MAGNET([.R$24]+[.$BB80])+[.S$31]*[.$Z$5]*MAGNET([.S$24]+[.$BB80])+[.T$31]*[.$Z$5]*MAGNET([.T$24]+[.$BB80])+[.U$31]*[.$Z$5]*MAGNET([.U$24]+[.$BB80])+[.V$31]*[.$Z$5]*MAGNET([.V$24]+[.$BB80])+[.W$31]*[.$Z$5]*MAGNET([.W$24]+[.$BB80])+[.X$31]*[.$Z$5]*MAGNET([.X$24]+[.$BB80])+[.Y$31]*[.$Z$5]*MAGNET([.Y$24]+[.$BB80])+[.Z$31]*[.$Z$5]*MAGNET([.Z$24]+[.$BB80])+[.AA$31]*[.$Z$5]*MAGNET([.AA$24]+[.$BB80])+[.AB$31]*[.$Z$5]*MAGNET([.AB$24]+[.$BB80])+[.AC$31]*[.$Z$5]*MAGNET([.AC$24]+[.$BB80])+[.AD$31]*[.$Z$5]*MAGNET([.AD$24]+[.$BB80])+[.AE$31]*[.$Z$5]*MAGNET([.AE$24]+[.$BB80])+[.AF$31]*[.$Z$5]*MAGNET([.AF$24]+[.$BB80])+[.AG$31]*[.$Z$5]*MAGNET([.AG$24]+[.$BB80])+[.D$31]*[.$Z$5]*MAGNET([.D$24]+[.$BB80])+[.AH$31]*[.$Z$5]*MAGNET([.AH$24]+[.BB80]) +[.AI$31]*[.$Z$5]*MAGNET([.AI$24]+[.BB80]) +[.AJ$31]*[.$Z$5]*MAGNET([.AJ$24]+[.BB80]) +[.AK$31]*[.$Z$5]*MAGNET([.AK$24]+[.BB80]) +[.AL$31]*[.$Z$5]*MAGNET([.AL$24]+[.BB80]) +[.AM$31]*[.$Z$5]*MAGNET([.AM$24]+[.BB80]) +[.AN$31]*[.$Z$5]*MAGNET([.AN$24]+[.BB80]) +[.AO$31]*[.$Z$5]*MAGNET([.AO$24]+[.BB80]) +[.AP$31]*[.$Z$5]*MAGNET([.AP$24]+[.$BB80])&#10;+[.AQ$31]*[.$Z$5]*MAGNET([.AQ$24]+[.$BB80])&#10;+[.AR$31]*[.$Z$5]*MAGNET([.AR$24]+[.$BB80])&#10;+[.AS$31]*[.$Z$5]*MAGNET([.AS$24]+[.$BB80])&#10;+[.AT$31]*[.$Z$5]*MAGNET([.AT$24]+[.$BB80])&#10;+[.AU$31]*[.$Z$5]*MAGNET([.AU$24]+[.$BB80])&#10;+[.AV$31]*[.$Z$5]*MAGNET([.AV$24]+[.$BB80])&#10;+[.AW$31]*[.$Z$5]*MAGNET([.AW$24]+[.$BB80])&#10;+[.AX$31]*[.$Z$5]*MAGNET([.AX$24]+[.$BB80])&#10;+[.AY$31]*[.$Z$5]*MAGNET([.AY$24]+[.$BB80]) +RAND()*[.$BI$13]" office:value-type="float" office:value="0" calcext:value-type="float">
            <text:p>0</text:p>
          </table:table-cell>
          <table:table-cell table:style-name="ce71" table:formula="of:=[.E$32]*[.$Z$5]*MAGNET([.E$24]+[.$BB80])+[.F$32]*[.$Z$5]*MAGNET([.F$24]+[.$BB80])+[.G$32]*[.$Z$5]*MAGNET([.G$24]+[.$BB80])+[.H$32]*[.$Z$5]*MAGNET([.H$24]+[.$BB80])+[.I$32]*[.$Z$5]*MAGNET([.I$24]+[.$BB80])+[.J$32]*[.$Z$5]*MAGNET([.J$24]+[.$BB80])+[.K$32]*[.$Z$5]*MAGNET([.K$24]+[.$BB80])+[.L$32]*[.$Z$5]*MAGNET([.L$24]+[.$BB80])+[.M$32]*[.$Z$5]*MAGNET([.M$24]+[.$BB80])+[.N$32]*[.$Z$5]*MAGNET([.N$24]+[.$BB80])+[.O$32]*[.$Z$5]*MAGNET([.O$24]+[.$BB80])+[.P$32]*[.$Z$5]*MAGNET([.P$24]+[.$BB80])+[.Q$32]*[.$Z$5]*MAGNET([.Q$24]+[.$BB80])+[.R$32]*[.$Z$5]*MAGNET([.R$24]+[.$BB80])+[.S$32]*[.$Z$5]*MAGNET([.S$24]+[.$BB80])+[.T$32]*[.$Z$5]*MAGNET([.T$24]+[.$BB80])+[.U$32]*[.$Z$5]*MAGNET([.U$24]+[.$BB80])+[.V$32]*[.$Z$5]*MAGNET([.V$24]+[.$BB80])+[.W$32]*[.$Z$5]*MAGNET([.W$24]+[.$BB80])+[.X$32]*[.$Z$5]*MAGNET([.X$24]+[.$BB80])+[.Y$32]*[.$Z$5]*MAGNET([.Y$24]+[.$BB80])+[.Z$32]*[.$Z$5]*MAGNET([.Z$24]+[.$BB80])+[.AA$32]*[.$Z$5]*MAGNET([.AA$24]+[.$BB80])+[.AB$32]*[.$Z$5]*MAGNET([.AB$24]+[.$BB80])+[.AC$32]*[.$Z$5]*MAGNET([.AC$24]+[.$BB80])+[.AD$32]*[.$Z$5]*MAGNET([.AD$24]+[.$BB80])+[.AE$32]*[.$Z$5]*MAGNET([.AE$24]+[.$BB80])+[.AF$32]*[.$Z$5]*MAGNET([.AF$24]+[.$BB80])+[.AG$32]*[.$Z$5]*MAGNET([.AG$24]+[.$BB80])+[.D$32]*[.$Z$5]*MAGNET([.D$24]+[.$BB80])+[.AH$32]*[.$Z$5]*MAGNET([.AH$24]+[.BB80]) +[.AI$32]*[.$Z$5]*MAGNET([.AI$24]+[.BB80]) +[.AJ$32]*[.$Z$5]*MAGNET([.AJ$24]+[.BB80]) +[.AK$32]*[.$Z$5]*MAGNET([.AK$24]+[.BB80]) +[.AL$32]*[.$Z$5]*MAGNET([.AL$24]+[.BB80]) +[.AM$32]*[.$Z$5]*MAGNET([.AM$24]+[.BB80]) +[.AN$32]*[.$Z$5]*MAGNET([.AN$24]+[.BB80]) +[.AO$32]*[.$Z$5]*MAGNET([.AO$24]+[.BB80]) +[.AP$32]*[.$Z$5]*MAGNET([.AP$24]+[.$BB80])&#10;+[.AQ$32]*[.$Z$5]*MAGNET([.AQ$24]+[.$BB80])&#10;+[.AR$32]*[.$Z$5]*MAGNET([.AR$24]+[.$BB80])&#10;+[.AS$32]*[.$Z$5]*MAGNET([.AS$24]+[.$BB80])&#10;+[.AT$32]*[.$Z$5]*MAGNET([.AT$24]+[.$BB80])&#10;+[.AU$32]*[.$Z$5]*MAGNET([.AU$24]+[.$BB80])&#10;+[.AV$32]*[.$Z$5]*MAGNET([.AV$24]+[.$BB80])&#10;+[.AW$32]*[.$Z$5]*MAGNET([.AW$24]+[.$BB80])&#10;+[.AX$32]*[.$Z$5]*MAGNET([.AX$24]+[.$BB80])&#10;+[.AY$32]*[.$Z$5]*MAGNET([.AY$24]+[.$BB8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0]+0.002" office:value-type="float" office:value="0.132" calcext:value-type="float">
            <text:p>0.132</text:p>
          </table:table-cell>
          <table:table-cell table:formula="of:=[.BA81]*[.$D$6]" office:value-type="float" office:value="6.63504368438165" calcext:value-type="float">
            <text:p>6.635</text:p>
          </table:table-cell>
          <table:table-cell table:formula="of:=[.D$25]*[.$Z$5]*MAGNET([.D$24]+[.BB81])+[.E$25]*[.$Z$5]*MAGNET([.E$24]+[.BB81])+[.F$25]*[.$Z$5]*MAGNET([.F$24]+[.BB81])+[.G$25]*[.$Z$5]*MAGNET([.G$24]+[.BB81])+[.H$25]*[.$Z$5]*MAGNET([.H$24]+[.BB81])+[.I$25]*[.$Z$5]*MAGNET([.I$24]+[.BB81])+[.J$25]*[.$Z$5]*MAGNET([.J$24]+[.BB81])+[.K$25]*[.$Z$5]*MAGNET([.K$24]+[.BB81])+[.L$25]*[.$Z$5]*MAGNET([.L$24]+[.BB81])+[.M$25]*[.$Z$5]*MAGNET([.M$24]+[.BB81])+[.N$25]*[.$Z$5]*MAGNET([.N$24]+[.BB81])+[.O$25]*[.$Z$5]*MAGNET([.O$24]+[.BB81])+[.P$25]*[.$Z$5]*MAGNET([.P$24]+[.BB81])+[.Q$25]*[.$Z$5]*MAGNET([.Q$24]+[.BB81])+[.R$25]*[.$Z$5]*MAGNET([.R$24]+[.BB81])+[.S$25]*[.$Z$5]*MAGNET([.S$24]+[.BB81])+[.T$25]*[.$Z$5]*MAGNET([.T$24]+[.BB81])+[.U$25]*[.$Z$5]*MAGNET([.U$24]+[.BB81])+[.V$25]*[.$Z$5]*MAGNET([.V$24]+[.BB81])+[.W$25]*[.$Z$5]*MAGNET([.W$24]+[.BB81])+[.X$25]*[.$Z$5]*MAGNET([.X$24]+[.BB81])+[.Y$25]*[.$Z$5]*MAGNET([.Y$24]+[.BB81])+[.Z$25]*[.$Z$5]*MAGNET([.Z$24]+[.BB81])+[.AA$25]*[.$Z$5]*MAGNET([.AA$24]+[.BB81])+[.AB$25]*[.$Z$5]*MAGNET([.AB$24]+[.BB81])+[.AC$25]*[.$Z$5]*MAGNET([.AC$24]+[.BB81])+[.AD$25]*[.$Z$5]*MAGNET([.AD$24]+[.BB81])+[.AE$25]*[.$Z$5]*MAGNET([.AE$24]+[.BB81])+[.AF$25]*[.$Z$5]*MAGNET([.AF$24]+[.BB81])+[.AG$25]*[.$Z$5]*MAGNET([.AG$24]+[.BB81])+[.AH$25]*[.$Z$5]*MAGNET([.AH$24]+[.BB81]) +[.AI$25]*[.$Z$5]*MAGNET([.AI$24]+[.BB81]) +[.AJ$25]*[.$Z$5]*MAGNET([.AJ$24]+[.BB81]) +[.AK$25]*[.$Z$5]*MAGNET([.AK$24]+[.BB81]) +[.AL$25]*[.$Z$5]*MAGNET([.AL$24]+[.BB81]) +[.AM$25]*[.$Z$5]*MAGNET([.AM$24]+[.BB81]) +[.AN$25]*[.$Z$5]*MAGNET([.AN$24]+[.BB81]) +[.AO$25]*[.$Z$5]*MAGNET([.AO$24]+[.BB81])+RAND()*[.$BC$13]+[.AP$25]*[.$Z$5]*MAGNET([.AP$24]+[.BB81])&#10;+[.AQ$25]*[.$Z$5]*MAGNET([.AQ$24]+[.BB81])&#10;+[.AR$25]*[.$Z$5]*MAGNET([.AR$24]+[.BB81])&#10;+[.AS$25]*[.$Z$5]*MAGNET([.AS$24]+[.BB81])&#10;+[.AT$25]*[.$Z$5]*MAGNET([.AT$24]+[.BB81])&#10;+[.AU$25]*[.$Z$5]*MAGNET([.AU$24]+[.BB81])&#10;+[.AV$25]*[.$Z$5]*MAGNET([.AV$24]+[.BB81])&#10;+[.AW$25]*[.$Z$5]*MAGNET([.AW$24]+[.BB81])&#10;+[.AX$25]*[.$Z$5]*MAGNET([.AX$24]+[.BB81])&#10;+[.AY$25]*[.$Z$5]*MAGNET([.AY$24]+[.BB81])" office:value-type="float" office:value="-3.37171958834697" calcext:value-type="float">
            <text:p>-3.37</text:p>
          </table:table-cell>
          <table:table-cell table:style-name="ce70" table:formula="of:=[.E$26]*[.$Z$5]*MAGNET([.E$24]+[.$BB81])+[.F$26]*[.$Z$5]*MAGNET([.F$24]+[.$BB81])+[.G$26]*[.$Z$5]*MAGNET([.G$24]+[.$BB81])+[.H$26]*[.$Z$5]*MAGNET([.H$24]+[.$BB81])+[.I$26]*[.$Z$5]*MAGNET([.I$24]+[.$BB81])+[.J$26]*[.$Z$5]*MAGNET([.J$24]+[.$BB81])+[.K$26]*[.$Z$5]*MAGNET([.K$24]+[.$BB81])+[.L$26]*[.$Z$5]*MAGNET([.L$24]+[.$BB81])+[.M$26]*[.$Z$5]*MAGNET([.M$24]+[.$BB81])+[.N$26]*[.$Z$5]*MAGNET([.N$24]+[.$BB81])+[.O$26]*[.$Z$5]*MAGNET([.O$24]+[.$BB81])+[.P$26]*[.$Z$5]*MAGNET([.P$24]+[.$BB81])+[.Q$26]*[.$Z$5]*MAGNET([.Q$24]+[.$BB81])+[.R$26]*[.$Z$5]*MAGNET([.R$24]+[.$BB81])+[.S$26]*[.$Z$5]*MAGNET([.S$24]+[.$BB81])+[.T$26]*[.$Z$5]*MAGNET([.T$24]+[.$BB81])+[.U$26]*[.$Z$5]*MAGNET([.U$24]+[.$BB81])+[.V$26]*[.$Z$5]*MAGNET([.V$24]+[.$BB81])+[.W$26]*[.$Z$5]*MAGNET([.W$24]+[.$BB81])+[.X$26]*[.$Z$5]*MAGNET([.X$24]+[.$BB81])+[.Y$26]*[.$Z$5]*MAGNET([.Y$24]+[.$BB81])+[.Z$26]*[.$Z$5]*MAGNET([.Z$24]+[.$BB81])+[.AA$26]*[.$Z$5]*MAGNET([.AA$24]+[.$BB81])+[.AB$26]*[.$Z$5]*MAGNET([.AB$24]+[.$BB81])+[.AC$26]*[.$Z$5]*MAGNET([.AC$24]+[.$BB81])+[.AD$26]*[.$Z$5]*MAGNET([.AD$24]+[.$BB81])+[.AE$26]*[.$Z$5]*MAGNET([.AE$24]+[.$BB81])+[.AF$26]*[.$Z$5]*MAGNET([.AF$24]+[.$BB81])+[.AG$26]*[.$Z$5]*MAGNET([.AG$24]+[.$BB81])+[.D$26]*[.$Z$5]*MAGNET([.D$24]+[.$BB81])+[.AH$26]*[.$Z$5]*MAGNET([.AH$24]+[.BB81]) +[.AI$26]*[.$Z$5]*MAGNET([.AI$24]+[.BB81]) +[.AJ$26]*[.$Z$5]*MAGNET([.AJ$24]+[.BB81]) +[.AK$26]*[.$Z$5]*MAGNET([.AK$24]+[.BB81]) +[.AL$26]*[.$Z$5]*MAGNET([.AL$24]+[.BB81]) +[.AM$26]*[.$Z$5]*MAGNET([.AM$24]+[.BB81]) +[.AN$26]*[.$Z$5]*MAGNET([.AN$24]+[.BB81]) +[.AO$26]*[.$Z$5]*MAGNET([.AO$24]+[.BB81]) +[.AP$26]*[.$Z$5]*MAGNET([.AP$24]+[.$BB81])&#10;+[.AQ$26]*[.$Z$5]*MAGNET([.AQ$24]+[.$BB81])&#10;+[.AR$26]*[.$Z$5]*MAGNET([.AR$24]+[.$BB81])&#10;+[.AS$26]*[.$Z$5]*MAGNET([.AS$24]+[.$BB81])&#10;+[.AT$26]*[.$Z$5]*MAGNET([.AT$24]+[.$BB81])&#10;+[.AU$26]*[.$Z$5]*MAGNET([.AU$24]+[.$BB81])&#10;+[.AV$26]*[.$Z$5]*MAGNET([.AV$24]+[.$BB81])&#10;+[.AW$26]*[.$Z$5]*MAGNET([.AW$24]+[.$BB81])&#10;+[.AX$26]*[.$Z$5]*MAGNET([.AX$24]+[.$BB81])&#10;+[.AY$26]*[.$Z$5]*MAGNET([.AY$24]+[.$BB81]) +RAND()*[.$BD$13]" office:value-type="float" office:value="85.274401377591" calcext:value-type="float">
            <text:p>85.27</text:p>
          </table:table-cell>
          <table:table-cell table:style-name="ce71" table:formula="of:=[.E$27]*[.$Z$5]*MAGNET([.E$24]+[.$BB81])+[.F$27]*[.$Z$5]*MAGNET([.F$24]+[.$BB81])+[.G$27]*[.$Z$5]*MAGNET([.G$24]+[.$BB81])+[.H$27]*[.$Z$5]*MAGNET([.H$24]+[.$BB81])+[.I$27]*[.$Z$5]*MAGNET([.I$24]+[.$BB81])+[.J$27]*[.$Z$5]*MAGNET([.J$24]+[.$BB81])+[.K$27]*[.$Z$5]*MAGNET([.K$24]+[.$BB81])+[.L$27]*[.$Z$5]*MAGNET([.L$24]+[.$BB81])+[.M$27]*[.$Z$5]*MAGNET([.M$24]+[.$BB81])+[.N$27]*[.$Z$5]*MAGNET([.N$24]+[.$BB81])+[.O$27]*[.$Z$5]*MAGNET([.O$24]+[.$BB81])+[.P$27]*[.$Z$5]*MAGNET([.P$24]+[.$BB81])+[.Q$27]*[.$Z$5]*MAGNET([.Q$24]+[.$BB81])+[.R$27]*[.$Z$5]*MAGNET([.R$24]+[.$BB81])+[.S$27]*[.$Z$5]*MAGNET([.S$24]+[.$BB81])+[.T$27]*[.$Z$5]*MAGNET([.T$24]+[.$BB81])+[.U$27]*[.$Z$5]*MAGNET([.U$24]+[.$BB81])+[.V$27]*[.$Z$5]*MAGNET([.V$24]+[.$BB81])+[.W$27]*[.$Z$5]*MAGNET([.W$24]+[.$BB81])+[.X$27]*[.$Z$5]*MAGNET([.X$24]+[.$BB81])+[.Y$27]*[.$Z$5]*MAGNET([.Y$24]+[.$BB81])+[.Z$27]*[.$Z$5]*MAGNET([.Z$24]+[.$BB81])+[.AA$27]*[.$Z$5]*MAGNET([.AA$24]+[.$BB81])+[.AB$27]*[.$Z$5]*MAGNET([.AB$24]+[.$BB81])+[.AC$27]*[.$Z$5]*MAGNET([.AC$24]+[.$BB81])+[.AD$27]*[.$Z$5]*MAGNET([.AD$24]+[.$BB81])+[.AE$27]*[.$Z$5]*MAGNET([.AE$24]+[.$BB81])+[.AF$27]*[.$Z$5]*MAGNET([.AF$24]+[.$BB81])+[.AG$27]*[.$Z$5]*MAGNET([.AG$24]+[.$BB81])+[.D$27]*[.$Z$5]*MAGNET([.D$24]+[.$BB81])+[.AH$27]*[.$Z$5]*MAGNET([.AH$24]+[.BB81]) +[.AI$27]*[.$Z$5]*MAGNET([.AI$24]+[.BB81]) +[.AJ$27]*[.$Z$5]*MAGNET([.AJ$24]+[.BB81]) +[.AK$27]*[.$Z$5]*MAGNET([.AK$24]+[.BB81]) +[.AL$27]*[.$Z$5]*MAGNET([.AL$24]+[.BB81]) +[.AM$27]*[.$Z$5]*MAGNET([.AM$24]+[.BB81]) +[.AN$27]*[.$Z$5]*MAGNET([.AN$24]+[.BB81]) +[.AO$27]*[.$Z$5]*MAGNET([.AO$24]+[.BB81]) +[.AP$27]*[.$Z$5]*MAGNET([.AP$24]+[.$BB81])&#10;+[.AQ$27]*[.$Z$5]*MAGNET([.AQ$24]+[.$BB81])&#10;+[.AR$27]*[.$Z$5]*MAGNET([.AR$24]+[.$BB81])&#10;+[.AS$27]*[.$Z$5]*MAGNET([.AS$24]+[.$BB81])&#10;+[.AT$27]*[.$Z$5]*MAGNET([.AT$24]+[.$BB81])&#10;+[.AU$27]*[.$Z$5]*MAGNET([.AU$24]+[.$BB81])&#10;+[.AV$27]*[.$Z$5]*MAGNET([.AV$24]+[.$BB81])&#10;+[.AW$27]*[.$Z$5]*MAGNET([.AW$24]+[.$BB81])&#10;+[.AX$27]*[.$Z$5]*MAGNET([.AX$24]+[.$BB81])&#10;+[.AY$27]*[.$Z$5]*MAGNET([.AY$24]+[.$BB81]) +RAND()*[.$BE$13]" office:value-type="float" office:value="-88.1083737736587" calcext:value-type="float">
            <text:p>-88.1083737736587</text:p>
          </table:table-cell>
          <table:table-cell table:style-name="ce71" table:formula="of:=[.E$28]*[.$Z$5]*MAGNET([.E$24]+[.$BB81])+[.F$28]*[.$Z$5]*MAGNET([.F$24]+[.$BB81])+[.G$28]*[.$Z$5]*MAGNET([.G$24]+[.$BB81])+[.H$28]*[.$Z$5]*MAGNET([.H$24]+[.$BB81])+[.I$28]*[.$Z$5]*MAGNET([.I$24]+[.$BB81])+[.J$28]*[.$Z$5]*MAGNET([.J$24]+[.$BB81])+[.K$28]*[.$Z$5]*MAGNET([.K$24]+[.$BB81])+[.L$28]*[.$Z$5]*MAGNET([.L$24]+[.$BB81])+[.M$28]*[.$Z$5]*MAGNET([.M$24]+[.$BB81])+[.N$28]*[.$Z$5]*MAGNET([.N$24]+[.$BB81])+[.O$28]*[.$Z$5]*MAGNET([.O$24]+[.$BB81])+[.P$28]*[.$Z$5]*MAGNET([.P$24]+[.$BB81])+[.Q$28]*[.$Z$5]*MAGNET([.Q$24]+[.$BB81])+[.R$28]*[.$Z$5]*MAGNET([.R$24]+[.$BB81])+[.S$28]*[.$Z$5]*MAGNET([.S$24]+[.$BB81])+[.T$28]*[.$Z$5]*MAGNET([.T$24]+[.$BB81])+[.U$28]*[.$Z$5]*MAGNET([.U$24]+[.$BB81])+[.V$28]*[.$Z$5]*MAGNET([.V$24]+[.$BB81])+[.W$28]*[.$Z$5]*MAGNET([.W$24]+[.$BB81])+[.X$28]*[.$Z$5]*MAGNET([.X$24]+[.$BB81])+[.Y$28]*[.$Z$5]*MAGNET([.Y$24]+[.$BB81])+[.Z$28]*[.$Z$5]*MAGNET([.Z$24]+[.$BB81])+[.AA$28]*[.$Z$5]*MAGNET([.AA$24]+[.$BB81])+[.AB$28]*[.$Z$5]*MAGNET([.AB$24]+[.$BB81])+[.AC$28]*[.$Z$5]*MAGNET([.AC$24]+[.$BB81])+[.AD$28]*[.$Z$5]*MAGNET([.AD$24]+[.$BB81])+[.AE$28]*[.$Z$5]*MAGNET([.AE$24]+[.$BB81])+[.AF$28]*[.$Z$5]*MAGNET([.AF$24]+[.$BB81])+[.AG$28]*[.$Z$5]*MAGNET([.AG$24]+[.$BB81])+[.D$28]*[.$Z$5]*MAGNET([.D$24]+[.$BB81])+[.AH$28]*[.$Z$5]*MAGNET([.AH$24]+[.BB81]) +[.AI$28]*[.$Z$5]*MAGNET([.AI$24]+[.BB81]) +[.AJ$28]*[.$Z$5]*MAGNET([.AJ$24]+[.BB81]) +[.AK$28]*[.$Z$5]*MAGNET([.AK$24]+[.BB81]) +[.AL$28]*[.$Z$5]*MAGNET([.AL$24]+[.BB81]) +[.AM$28]*[.$Z$5]*MAGNET([.AM$24]+[.BB81]) +[.AN$28]*[.$Z$5]*MAGNET([.AN$24]+[.BB81]) +[.AO$28]*[.$Z$5]*MAGNET([.AO$24]+[.BB81]) +[.AP$28]*[.$Z$5]*MAGNET([.AP$24]+[.$BB81])&#10;+[.AQ$28]*[.$Z$5]*MAGNET([.AQ$24]+[.$BB81])&#10;+[.AR$28]*[.$Z$5]*MAGNET([.AR$24]+[.$BB81])&#10;+[.AS$28]*[.$Z$5]*MAGNET([.AS$24]+[.$BB81])&#10;+[.AT$28]*[.$Z$5]*MAGNET([.AT$24]+[.$BB81])&#10;+[.AU$28]*[.$Z$5]*MAGNET([.AU$24]+[.$BB81])&#10;+[.AV$28]*[.$Z$5]*MAGNET([.AV$24]+[.$BB81])&#10;+[.AW$28]*[.$Z$5]*MAGNET([.AW$24]+[.$BB81])&#10;+[.AX$28]*[.$Z$5]*MAGNET([.AX$24]+[.$BB81])&#10;+[.AY$28]*[.$Z$5]*MAGNET([.AY$24]+[.$BB81]) +RAND()*[.$BF$13]" office:value-type="float" office:value="-11.835949231298" calcext:value-type="float">
            <text:p>-11.835949231298</text:p>
          </table:table-cell>
          <table:table-cell table:style-name="ce71" table:formula="of:=[.E$29]*[.$Z$5]*MAGNET([.E$24]+[.$BB81])+[.F$29]*[.$Z$5]*MAGNET([.F$24]+[.$BB81])+[.G$29]*[.$Z$5]*MAGNET([.G$24]+[.$BB81])+[.H$29]*[.$Z$5]*MAGNET([.H$24]+[.$BB81])+[.I$29]*[.$Z$5]*MAGNET([.I$24]+[.$BB81])+[.J$29]*[.$Z$5]*MAGNET([.J$24]+[.$BB81])+[.K$29]*[.$Z$5]*MAGNET([.K$24]+[.$BB81])+[.L$29]*[.$Z$5]*MAGNET([.L$24]+[.$BB81])+[.M$29]*[.$Z$5]*MAGNET([.M$24]+[.$BB81])+[.N$29]*[.$Z$5]*MAGNET([.N$24]+[.$BB81])+[.O$29]*[.$Z$5]*MAGNET([.O$24]+[.$BB81])+[.P$29]*[.$Z$5]*MAGNET([.P$24]+[.$BB81])+[.Q$29]*[.$Z$5]*MAGNET([.Q$24]+[.$BB81])+[.R$29]*[.$Z$5]*MAGNET([.R$24]+[.$BB81])+[.S$29]*[.$Z$5]*MAGNET([.S$24]+[.$BB81])+[.T$29]*[.$Z$5]*MAGNET([.T$24]+[.$BB81])+[.U$29]*[.$Z$5]*MAGNET([.U$24]+[.$BB81])+[.V$29]*[.$Z$5]*MAGNET([.V$24]+[.$BB81])+[.W$29]*[.$Z$5]*MAGNET([.W$24]+[.$BB81])+[.X$29]*[.$Z$5]*MAGNET([.X$24]+[.$BB81])+[.Y$29]*[.$Z$5]*MAGNET([.Y$24]+[.$BB81])+[.Z$29]*[.$Z$5]*MAGNET([.Z$24]+[.$BB81])+[.AA$29]*[.$Z$5]*MAGNET([.AA$24]+[.$BB81])+[.AB$29]*[.$Z$5]*MAGNET([.AB$24]+[.$BB81])+[.AC$29]*[.$Z$5]*MAGNET([.AC$24]+[.$BB81])+[.AD$29]*[.$Z$5]*MAGNET([.AD$24]+[.$BB81])+[.AE$29]*[.$Z$5]*MAGNET([.AE$24]+[.$BB81])+[.AF$29]*[.$Z$5]*MAGNET([.AF$24]+[.$BB81])+[.AG$29]*[.$Z$5]*MAGNET([.AG$24]+[.$BB81])+[.D$29]*[.$Z$5]*MAGNET([.D$24]+[.$BB81])+[.AH$29]*[.$Z$5]*MAGNET([.AH$24]+[.BB81]) +[.AI$29]*[.$Z$5]*MAGNET([.AI$24]+[.BB81]) +[.AJ$29]*[.$Z$5]*MAGNET([.AJ$24]+[.BB81]) +[.AK$29]*[.$Z$5]*MAGNET([.AK$24]+[.BB81]) +[.AL$29]*[.$Z$5]*MAGNET([.AL$24]+[.BB81]) +[.AM$29]*[.$Z$5]*MAGNET([.AM$24]+[.BB81]) +[.AN$29]*[.$Z$5]*MAGNET([.AN$24]+[.BB81]) +[.AO$29]*[.$Z$5]*MAGNET([.AO$24]+[.BB81]) +[.AP$29]*[.$Z$5]*MAGNET([.AP$24]+[.$BB81])&#10;+[.AQ$29]*[.$Z$5]*MAGNET([.AQ$24]+[.$BB81])&#10;+[.AR$29]*[.$Z$5]*MAGNET([.AR$24]+[.$BB81])&#10;+[.AS$29]*[.$Z$5]*MAGNET([.AS$24]+[.$BB81])&#10;+[.AT$29]*[.$Z$5]*MAGNET([.AT$24]+[.$BB81])&#10;+[.AU$29]*[.$Z$5]*MAGNET([.AU$24]+[.$BB81])&#10;+[.AV$29]*[.$Z$5]*MAGNET([.AV$24]+[.$BB81])&#10;+[.AW$29]*[.$Z$5]*MAGNET([.AW$24]+[.$BB81])&#10;+[.AX$29]*[.$Z$5]*MAGNET([.AX$24]+[.$BB81])&#10;+[.AY$29]*[.$Z$5]*MAGNET([.AY$24]+[.$BB81]) +RAND()*[.$BG$13]" office:value-type="float" office:value="42.6227973093048" calcext:value-type="float">
            <text:p>42.6227973093048</text:p>
          </table:table-cell>
          <table:table-cell table:style-name="ce71" table:formula="of:=[.E$30]*[.$Z$5]*MAGNET([.E$24]+[.$BB81])+[.F$30]*[.$Z$5]*MAGNET([.F$24]+[.$BB81])+[.G$30]*[.$Z$5]*MAGNET([.G$24]+[.$BB81])+[.H$30]*[.$Z$5]*MAGNET([.H$24]+[.$BB81])+[.I$30]*[.$Z$5]*MAGNET([.I$24]+[.$BB81])+[.J$30]*[.$Z$5]*MAGNET([.J$24]+[.$BB81])+[.K$30]*[.$Z$5]*MAGNET([.K$24]+[.$BB81])+[.L$30]*[.$Z$5]*MAGNET([.L$24]+[.$BB81])+[.M$30]*[.$Z$5]*MAGNET([.M$24]+[.$BB81])+[.N$30]*[.$Z$5]*MAGNET([.N$24]+[.$BB81])+[.O$30]*[.$Z$5]*MAGNET([.O$24]+[.$BB81])+[.P$30]*[.$Z$5]*MAGNET([.P$24]+[.$BB81])+[.Q$30]*[.$Z$5]*MAGNET([.Q$24]+[.$BB81])+[.R$30]*[.$Z$5]*MAGNET([.R$24]+[.$BB81])+[.S$30]*[.$Z$5]*MAGNET([.S$24]+[.$BB81])+[.T$30]*[.$Z$5]*MAGNET([.T$24]+[.$BB81])+[.U$30]*[.$Z$5]*MAGNET([.U$24]+[.$BB81])+[.V$30]*[.$Z$5]*MAGNET([.V$24]+[.$BB81])+[.W$30]*[.$Z$5]*MAGNET([.W$24]+[.$BB81])+[.X$30]*[.$Z$5]*MAGNET([.X$24]+[.$BB81])+[.Y$30]*[.$Z$5]*MAGNET([.Y$24]+[.$BB81])+[.Z$30]*[.$Z$5]*MAGNET([.Z$24]+[.$BB81])+[.AA$30]*[.$Z$5]*MAGNET([.AA$24]+[.$BB81])+[.AB$30]*[.$Z$5]*MAGNET([.AB$24]+[.$BB81])+[.AC$30]*[.$Z$5]*MAGNET([.AC$24]+[.$BB81])+[.AD$30]*[.$Z$5]*MAGNET([.AD$24]+[.$BB81])+[.AE$30]*[.$Z$5]*MAGNET([.AE$24]+[.$BB81])+[.AF$30]*[.$Z$5]*MAGNET([.AF$24]+[.$BB81])+[.AG$30]*[.$Z$5]*MAGNET([.AG$24]+[.$BB81])+[.D$30]*[.$Z$5]*MAGNET([.D$24]+[.$BB81])+[.AH$30]*[.$Z$5]*MAGNET([.AH$24]+[.BB81]) +[.AI$30]*[.$Z$5]*MAGNET([.AI$24]+[.BB81]) +[.AJ$30]*[.$Z$5]*MAGNET([.AJ$24]+[.BB81]) +[.AK$30]*[.$Z$5]*MAGNET([.AK$24]+[.BB81]) +[.AL$30]*[.$Z$5]*MAGNET([.AL$24]+[.BB81]) +[.AM$30]*[.$Z$5]*MAGNET([.AM$24]+[.BB81]) +[.AN$30]*[.$Z$5]*MAGNET([.AN$24]+[.BB81]) +[.AO$30]*[.$Z$5]*MAGNET([.AO$24]+[.BB81]) +[.AP$30]*[.$Z$5]*MAGNET([.AP$24]+[.$BB81])&#10;+[.AQ$30]*[.$Z$5]*MAGNET([.AQ$24]+[.$BB81])&#10;+[.AR$30]*[.$Z$5]*MAGNET([.AR$24]+[.$BB81])&#10;+[.AS$30]*[.$Z$5]*MAGNET([.AS$24]+[.$BB81])&#10;+[.AT$30]*[.$Z$5]*MAGNET([.AT$24]+[.$BB81])&#10;+[.AU$30]*[.$Z$5]*MAGNET([.AU$24]+[.$BB81])&#10;+[.AV$30]*[.$Z$5]*MAGNET([.AV$24]+[.$BB81])&#10;+[.AW$30]*[.$Z$5]*MAGNET([.AW$24]+[.$BB81])&#10;+[.AX$30]*[.$Z$5]*MAGNET([.AX$24]+[.$BB81])&#10;+[.AY$30]*[.$Z$5]*MAGNET([.AY$24]+[.$BB81]) +RAND()*[.$BH$13]" office:value-type="float" office:value="0" calcext:value-type="float">
            <text:p>0</text:p>
          </table:table-cell>
          <table:table-cell table:style-name="ce71" table:formula="of:=[.E$31]*[.$Z$5]*MAGNET([.E$24]+[.$BB81])+[.F$31]*[.$Z$5]*MAGNET([.F$24]+[.$BB81])+[.G$31]*[.$Z$5]*MAGNET([.G$24]+[.$BB81])+[.H$31]*[.$Z$5]*MAGNET([.H$24]+[.$BB81])+[.I$31]*[.$Z$5]*MAGNET([.I$24]+[.$BB81])+[.J$31]*[.$Z$5]*MAGNET([.J$24]+[.$BB81])+[.K$31]*[.$Z$5]*MAGNET([.K$24]+[.$BB81])+[.L$31]*[.$Z$5]*MAGNET([.L$24]+[.$BB81])+[.M$31]*[.$Z$5]*MAGNET([.M$24]+[.$BB81])+[.N$31]*[.$Z$5]*MAGNET([.N$24]+[.$BB81])+[.O$31]*[.$Z$5]*MAGNET([.O$24]+[.$BB81])+[.P$31]*[.$Z$5]*MAGNET([.P$24]+[.$BB81])+[.Q$31]*[.$Z$5]*MAGNET([.Q$24]+[.$BB81])+[.R$31]*[.$Z$5]*MAGNET([.R$24]+[.$BB81])+[.S$31]*[.$Z$5]*MAGNET([.S$24]+[.$BB81])+[.T$31]*[.$Z$5]*MAGNET([.T$24]+[.$BB81])+[.U$31]*[.$Z$5]*MAGNET([.U$24]+[.$BB81])+[.V$31]*[.$Z$5]*MAGNET([.V$24]+[.$BB81])+[.W$31]*[.$Z$5]*MAGNET([.W$24]+[.$BB81])+[.X$31]*[.$Z$5]*MAGNET([.X$24]+[.$BB81])+[.Y$31]*[.$Z$5]*MAGNET([.Y$24]+[.$BB81])+[.Z$31]*[.$Z$5]*MAGNET([.Z$24]+[.$BB81])+[.AA$31]*[.$Z$5]*MAGNET([.AA$24]+[.$BB81])+[.AB$31]*[.$Z$5]*MAGNET([.AB$24]+[.$BB81])+[.AC$31]*[.$Z$5]*MAGNET([.AC$24]+[.$BB81])+[.AD$31]*[.$Z$5]*MAGNET([.AD$24]+[.$BB81])+[.AE$31]*[.$Z$5]*MAGNET([.AE$24]+[.$BB81])+[.AF$31]*[.$Z$5]*MAGNET([.AF$24]+[.$BB81])+[.AG$31]*[.$Z$5]*MAGNET([.AG$24]+[.$BB81])+[.D$31]*[.$Z$5]*MAGNET([.D$24]+[.$BB81])+[.AH$31]*[.$Z$5]*MAGNET([.AH$24]+[.BB81]) +[.AI$31]*[.$Z$5]*MAGNET([.AI$24]+[.BB81]) +[.AJ$31]*[.$Z$5]*MAGNET([.AJ$24]+[.BB81]) +[.AK$31]*[.$Z$5]*MAGNET([.AK$24]+[.BB81]) +[.AL$31]*[.$Z$5]*MAGNET([.AL$24]+[.BB81]) +[.AM$31]*[.$Z$5]*MAGNET([.AM$24]+[.BB81]) +[.AN$31]*[.$Z$5]*MAGNET([.AN$24]+[.BB81]) +[.AO$31]*[.$Z$5]*MAGNET([.AO$24]+[.BB81]) +[.AP$31]*[.$Z$5]*MAGNET([.AP$24]+[.$BB81])&#10;+[.AQ$31]*[.$Z$5]*MAGNET([.AQ$24]+[.$BB81])&#10;+[.AR$31]*[.$Z$5]*MAGNET([.AR$24]+[.$BB81])&#10;+[.AS$31]*[.$Z$5]*MAGNET([.AS$24]+[.$BB81])&#10;+[.AT$31]*[.$Z$5]*MAGNET([.AT$24]+[.$BB81])&#10;+[.AU$31]*[.$Z$5]*MAGNET([.AU$24]+[.$BB81])&#10;+[.AV$31]*[.$Z$5]*MAGNET([.AV$24]+[.$BB81])&#10;+[.AW$31]*[.$Z$5]*MAGNET([.AW$24]+[.$BB81])&#10;+[.AX$31]*[.$Z$5]*MAGNET([.AX$24]+[.$BB81])&#10;+[.AY$31]*[.$Z$5]*MAGNET([.AY$24]+[.$BB81]) +RAND()*[.$BI$13]" office:value-type="float" office:value="0" calcext:value-type="float">
            <text:p>0</text:p>
          </table:table-cell>
          <table:table-cell table:style-name="ce71" table:formula="of:=[.E$32]*[.$Z$5]*MAGNET([.E$24]+[.$BB81])+[.F$32]*[.$Z$5]*MAGNET([.F$24]+[.$BB81])+[.G$32]*[.$Z$5]*MAGNET([.G$24]+[.$BB81])+[.H$32]*[.$Z$5]*MAGNET([.H$24]+[.$BB81])+[.I$32]*[.$Z$5]*MAGNET([.I$24]+[.$BB81])+[.J$32]*[.$Z$5]*MAGNET([.J$24]+[.$BB81])+[.K$32]*[.$Z$5]*MAGNET([.K$24]+[.$BB81])+[.L$32]*[.$Z$5]*MAGNET([.L$24]+[.$BB81])+[.M$32]*[.$Z$5]*MAGNET([.M$24]+[.$BB81])+[.N$32]*[.$Z$5]*MAGNET([.N$24]+[.$BB81])+[.O$32]*[.$Z$5]*MAGNET([.O$24]+[.$BB81])+[.P$32]*[.$Z$5]*MAGNET([.P$24]+[.$BB81])+[.Q$32]*[.$Z$5]*MAGNET([.Q$24]+[.$BB81])+[.R$32]*[.$Z$5]*MAGNET([.R$24]+[.$BB81])+[.S$32]*[.$Z$5]*MAGNET([.S$24]+[.$BB81])+[.T$32]*[.$Z$5]*MAGNET([.T$24]+[.$BB81])+[.U$32]*[.$Z$5]*MAGNET([.U$24]+[.$BB81])+[.V$32]*[.$Z$5]*MAGNET([.V$24]+[.$BB81])+[.W$32]*[.$Z$5]*MAGNET([.W$24]+[.$BB81])+[.X$32]*[.$Z$5]*MAGNET([.X$24]+[.$BB81])+[.Y$32]*[.$Z$5]*MAGNET([.Y$24]+[.$BB81])+[.Z$32]*[.$Z$5]*MAGNET([.Z$24]+[.$BB81])+[.AA$32]*[.$Z$5]*MAGNET([.AA$24]+[.$BB81])+[.AB$32]*[.$Z$5]*MAGNET([.AB$24]+[.$BB81])+[.AC$32]*[.$Z$5]*MAGNET([.AC$24]+[.$BB81])+[.AD$32]*[.$Z$5]*MAGNET([.AD$24]+[.$BB81])+[.AE$32]*[.$Z$5]*MAGNET([.AE$24]+[.$BB81])+[.AF$32]*[.$Z$5]*MAGNET([.AF$24]+[.$BB81])+[.AG$32]*[.$Z$5]*MAGNET([.AG$24]+[.$BB81])+[.D$32]*[.$Z$5]*MAGNET([.D$24]+[.$BB81])+[.AH$32]*[.$Z$5]*MAGNET([.AH$24]+[.BB81]) +[.AI$32]*[.$Z$5]*MAGNET([.AI$24]+[.BB81]) +[.AJ$32]*[.$Z$5]*MAGNET([.AJ$24]+[.BB81]) +[.AK$32]*[.$Z$5]*MAGNET([.AK$24]+[.BB81]) +[.AL$32]*[.$Z$5]*MAGNET([.AL$24]+[.BB81]) +[.AM$32]*[.$Z$5]*MAGNET([.AM$24]+[.BB81]) +[.AN$32]*[.$Z$5]*MAGNET([.AN$24]+[.BB81]) +[.AO$32]*[.$Z$5]*MAGNET([.AO$24]+[.BB81]) +[.AP$32]*[.$Z$5]*MAGNET([.AP$24]+[.$BB81])&#10;+[.AQ$32]*[.$Z$5]*MAGNET([.AQ$24]+[.$BB81])&#10;+[.AR$32]*[.$Z$5]*MAGNET([.AR$24]+[.$BB81])&#10;+[.AS$32]*[.$Z$5]*MAGNET([.AS$24]+[.$BB81])&#10;+[.AT$32]*[.$Z$5]*MAGNET([.AT$24]+[.$BB81])&#10;+[.AU$32]*[.$Z$5]*MAGNET([.AU$24]+[.$BB81])&#10;+[.AV$32]*[.$Z$5]*MAGNET([.AV$24]+[.$BB81])&#10;+[.AW$32]*[.$Z$5]*MAGNET([.AW$24]+[.$BB81])&#10;+[.AX$32]*[.$Z$5]*MAGNET([.AX$24]+[.$BB81])&#10;+[.AY$32]*[.$Z$5]*MAGNET([.AY$24]+[.$BB8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1]+0.002" office:value-type="float" office:value="0.134" calcext:value-type="float">
            <text:p>0.134</text:p>
          </table:table-cell>
          <table:table-cell table:formula="of:=[.BA82]*[.$D$6]" office:value-type="float" office:value="6.73557464929652" calcext:value-type="float">
            <text:p>6.736</text:p>
          </table:table-cell>
          <table:table-cell table:formula="of:=[.D$25]*[.$Z$5]*MAGNET([.D$24]+[.BB82])+[.E$25]*[.$Z$5]*MAGNET([.E$24]+[.BB82])+[.F$25]*[.$Z$5]*MAGNET([.F$24]+[.BB82])+[.G$25]*[.$Z$5]*MAGNET([.G$24]+[.BB82])+[.H$25]*[.$Z$5]*MAGNET([.H$24]+[.BB82])+[.I$25]*[.$Z$5]*MAGNET([.I$24]+[.BB82])+[.J$25]*[.$Z$5]*MAGNET([.J$24]+[.BB82])+[.K$25]*[.$Z$5]*MAGNET([.K$24]+[.BB82])+[.L$25]*[.$Z$5]*MAGNET([.L$24]+[.BB82])+[.M$25]*[.$Z$5]*MAGNET([.M$24]+[.BB82])+[.N$25]*[.$Z$5]*MAGNET([.N$24]+[.BB82])+[.O$25]*[.$Z$5]*MAGNET([.O$24]+[.BB82])+[.P$25]*[.$Z$5]*MAGNET([.P$24]+[.BB82])+[.Q$25]*[.$Z$5]*MAGNET([.Q$24]+[.BB82])+[.R$25]*[.$Z$5]*MAGNET([.R$24]+[.BB82])+[.S$25]*[.$Z$5]*MAGNET([.S$24]+[.BB82])+[.T$25]*[.$Z$5]*MAGNET([.T$24]+[.BB82])+[.U$25]*[.$Z$5]*MAGNET([.U$24]+[.BB82])+[.V$25]*[.$Z$5]*MAGNET([.V$24]+[.BB82])+[.W$25]*[.$Z$5]*MAGNET([.W$24]+[.BB82])+[.X$25]*[.$Z$5]*MAGNET([.X$24]+[.BB82])+[.Y$25]*[.$Z$5]*MAGNET([.Y$24]+[.BB82])+[.Z$25]*[.$Z$5]*MAGNET([.Z$24]+[.BB82])+[.AA$25]*[.$Z$5]*MAGNET([.AA$24]+[.BB82])+[.AB$25]*[.$Z$5]*MAGNET([.AB$24]+[.BB82])+[.AC$25]*[.$Z$5]*MAGNET([.AC$24]+[.BB82])+[.AD$25]*[.$Z$5]*MAGNET([.AD$24]+[.BB82])+[.AE$25]*[.$Z$5]*MAGNET([.AE$24]+[.BB82])+[.AF$25]*[.$Z$5]*MAGNET([.AF$24]+[.BB82])+[.AG$25]*[.$Z$5]*MAGNET([.AG$24]+[.BB82])+[.AH$25]*[.$Z$5]*MAGNET([.AH$24]+[.BB82]) +[.AI$25]*[.$Z$5]*MAGNET([.AI$24]+[.BB82]) +[.AJ$25]*[.$Z$5]*MAGNET([.AJ$24]+[.BB82]) +[.AK$25]*[.$Z$5]*MAGNET([.AK$24]+[.BB82]) +[.AL$25]*[.$Z$5]*MAGNET([.AL$24]+[.BB82]) +[.AM$25]*[.$Z$5]*MAGNET([.AM$24]+[.BB82]) +[.AN$25]*[.$Z$5]*MAGNET([.AN$24]+[.BB82]) +[.AO$25]*[.$Z$5]*MAGNET([.AO$24]+[.BB82])+RAND()*[.$BC$13]+[.AP$25]*[.$Z$5]*MAGNET([.AP$24]+[.BB82])&#10;+[.AQ$25]*[.$Z$5]*MAGNET([.AQ$24]+[.BB82])&#10;+[.AR$25]*[.$Z$5]*MAGNET([.AR$24]+[.BB82])&#10;+[.AS$25]*[.$Z$5]*MAGNET([.AS$24]+[.BB82])&#10;+[.AT$25]*[.$Z$5]*MAGNET([.AT$24]+[.BB82])&#10;+[.AU$25]*[.$Z$5]*MAGNET([.AU$24]+[.BB82])&#10;+[.AV$25]*[.$Z$5]*MAGNET([.AV$24]+[.BB82])&#10;+[.AW$25]*[.$Z$5]*MAGNET([.AW$24]+[.BB82])&#10;+[.AX$25]*[.$Z$5]*MAGNET([.AX$24]+[.BB82])&#10;+[.AY$25]*[.$Z$5]*MAGNET([.AY$24]+[.BB82])" office:value-type="float" office:value="5.98050535051582" calcext:value-type="float">
            <text:p>5.98</text:p>
          </table:table-cell>
          <table:table-cell table:style-name="ce70" table:formula="of:=[.E$26]*[.$Z$5]*MAGNET([.E$24]+[.$BB82])+[.F$26]*[.$Z$5]*MAGNET([.F$24]+[.$BB82])+[.G$26]*[.$Z$5]*MAGNET([.G$24]+[.$BB82])+[.H$26]*[.$Z$5]*MAGNET([.H$24]+[.$BB82])+[.I$26]*[.$Z$5]*MAGNET([.I$24]+[.$BB82])+[.J$26]*[.$Z$5]*MAGNET([.J$24]+[.$BB82])+[.K$26]*[.$Z$5]*MAGNET([.K$24]+[.$BB82])+[.L$26]*[.$Z$5]*MAGNET([.L$24]+[.$BB82])+[.M$26]*[.$Z$5]*MAGNET([.M$24]+[.$BB82])+[.N$26]*[.$Z$5]*MAGNET([.N$24]+[.$BB82])+[.O$26]*[.$Z$5]*MAGNET([.O$24]+[.$BB82])+[.P$26]*[.$Z$5]*MAGNET([.P$24]+[.$BB82])+[.Q$26]*[.$Z$5]*MAGNET([.Q$24]+[.$BB82])+[.R$26]*[.$Z$5]*MAGNET([.R$24]+[.$BB82])+[.S$26]*[.$Z$5]*MAGNET([.S$24]+[.$BB82])+[.T$26]*[.$Z$5]*MAGNET([.T$24]+[.$BB82])+[.U$26]*[.$Z$5]*MAGNET([.U$24]+[.$BB82])+[.V$26]*[.$Z$5]*MAGNET([.V$24]+[.$BB82])+[.W$26]*[.$Z$5]*MAGNET([.W$24]+[.$BB82])+[.X$26]*[.$Z$5]*MAGNET([.X$24]+[.$BB82])+[.Y$26]*[.$Z$5]*MAGNET([.Y$24]+[.$BB82])+[.Z$26]*[.$Z$5]*MAGNET([.Z$24]+[.$BB82])+[.AA$26]*[.$Z$5]*MAGNET([.AA$24]+[.$BB82])+[.AB$26]*[.$Z$5]*MAGNET([.AB$24]+[.$BB82])+[.AC$26]*[.$Z$5]*MAGNET([.AC$24]+[.$BB82])+[.AD$26]*[.$Z$5]*MAGNET([.AD$24]+[.$BB82])+[.AE$26]*[.$Z$5]*MAGNET([.AE$24]+[.$BB82])+[.AF$26]*[.$Z$5]*MAGNET([.AF$24]+[.$BB82])+[.AG$26]*[.$Z$5]*MAGNET([.AG$24]+[.$BB82])+[.D$26]*[.$Z$5]*MAGNET([.D$24]+[.$BB82])+[.AH$26]*[.$Z$5]*MAGNET([.AH$24]+[.BB82]) +[.AI$26]*[.$Z$5]*MAGNET([.AI$24]+[.BB82]) +[.AJ$26]*[.$Z$5]*MAGNET([.AJ$24]+[.BB82]) +[.AK$26]*[.$Z$5]*MAGNET([.AK$24]+[.BB82]) +[.AL$26]*[.$Z$5]*MAGNET([.AL$24]+[.BB82]) +[.AM$26]*[.$Z$5]*MAGNET([.AM$24]+[.BB82]) +[.AN$26]*[.$Z$5]*MAGNET([.AN$24]+[.BB82]) +[.AO$26]*[.$Z$5]*MAGNET([.AO$24]+[.BB82]) +[.AP$26]*[.$Z$5]*MAGNET([.AP$24]+[.$BB82])&#10;+[.AQ$26]*[.$Z$5]*MAGNET([.AQ$24]+[.$BB82])&#10;+[.AR$26]*[.$Z$5]*MAGNET([.AR$24]+[.$BB82])&#10;+[.AS$26]*[.$Z$5]*MAGNET([.AS$24]+[.$BB82])&#10;+[.AT$26]*[.$Z$5]*MAGNET([.AT$24]+[.$BB82])&#10;+[.AU$26]*[.$Z$5]*MAGNET([.AU$24]+[.$BB82])&#10;+[.AV$26]*[.$Z$5]*MAGNET([.AV$24]+[.$BB82])&#10;+[.AW$26]*[.$Z$5]*MAGNET([.AW$24]+[.$BB82])&#10;+[.AX$26]*[.$Z$5]*MAGNET([.AX$24]+[.$BB82])&#10;+[.AY$26]*[.$Z$5]*MAGNET([.AY$24]+[.$BB82]) +RAND()*[.$BD$13]" office:value-type="float" office:value="79.9937552317354" calcext:value-type="float">
            <text:p>79.99</text:p>
          </table:table-cell>
          <table:table-cell table:style-name="ce71" table:formula="of:=[.E$27]*[.$Z$5]*MAGNET([.E$24]+[.$BB82])+[.F$27]*[.$Z$5]*MAGNET([.F$24]+[.$BB82])+[.G$27]*[.$Z$5]*MAGNET([.G$24]+[.$BB82])+[.H$27]*[.$Z$5]*MAGNET([.H$24]+[.$BB82])+[.I$27]*[.$Z$5]*MAGNET([.I$24]+[.$BB82])+[.J$27]*[.$Z$5]*MAGNET([.J$24]+[.$BB82])+[.K$27]*[.$Z$5]*MAGNET([.K$24]+[.$BB82])+[.L$27]*[.$Z$5]*MAGNET([.L$24]+[.$BB82])+[.M$27]*[.$Z$5]*MAGNET([.M$24]+[.$BB82])+[.N$27]*[.$Z$5]*MAGNET([.N$24]+[.$BB82])+[.O$27]*[.$Z$5]*MAGNET([.O$24]+[.$BB82])+[.P$27]*[.$Z$5]*MAGNET([.P$24]+[.$BB82])+[.Q$27]*[.$Z$5]*MAGNET([.Q$24]+[.$BB82])+[.R$27]*[.$Z$5]*MAGNET([.R$24]+[.$BB82])+[.S$27]*[.$Z$5]*MAGNET([.S$24]+[.$BB82])+[.T$27]*[.$Z$5]*MAGNET([.T$24]+[.$BB82])+[.U$27]*[.$Z$5]*MAGNET([.U$24]+[.$BB82])+[.V$27]*[.$Z$5]*MAGNET([.V$24]+[.$BB82])+[.W$27]*[.$Z$5]*MAGNET([.W$24]+[.$BB82])+[.X$27]*[.$Z$5]*MAGNET([.X$24]+[.$BB82])+[.Y$27]*[.$Z$5]*MAGNET([.Y$24]+[.$BB82])+[.Z$27]*[.$Z$5]*MAGNET([.Z$24]+[.$BB82])+[.AA$27]*[.$Z$5]*MAGNET([.AA$24]+[.$BB82])+[.AB$27]*[.$Z$5]*MAGNET([.AB$24]+[.$BB82])+[.AC$27]*[.$Z$5]*MAGNET([.AC$24]+[.$BB82])+[.AD$27]*[.$Z$5]*MAGNET([.AD$24]+[.$BB82])+[.AE$27]*[.$Z$5]*MAGNET([.AE$24]+[.$BB82])+[.AF$27]*[.$Z$5]*MAGNET([.AF$24]+[.$BB82])+[.AG$27]*[.$Z$5]*MAGNET([.AG$24]+[.$BB82])+[.D$27]*[.$Z$5]*MAGNET([.D$24]+[.$BB82])+[.AH$27]*[.$Z$5]*MAGNET([.AH$24]+[.BB82]) +[.AI$27]*[.$Z$5]*MAGNET([.AI$24]+[.BB82]) +[.AJ$27]*[.$Z$5]*MAGNET([.AJ$24]+[.BB82]) +[.AK$27]*[.$Z$5]*MAGNET([.AK$24]+[.BB82]) +[.AL$27]*[.$Z$5]*MAGNET([.AL$24]+[.BB82]) +[.AM$27]*[.$Z$5]*MAGNET([.AM$24]+[.BB82]) +[.AN$27]*[.$Z$5]*MAGNET([.AN$24]+[.BB82]) +[.AO$27]*[.$Z$5]*MAGNET([.AO$24]+[.BB82]) +[.AP$27]*[.$Z$5]*MAGNET([.AP$24]+[.$BB82])&#10;+[.AQ$27]*[.$Z$5]*MAGNET([.AQ$24]+[.$BB82])&#10;+[.AR$27]*[.$Z$5]*MAGNET([.AR$24]+[.$BB82])&#10;+[.AS$27]*[.$Z$5]*MAGNET([.AS$24]+[.$BB82])&#10;+[.AT$27]*[.$Z$5]*MAGNET([.AT$24]+[.$BB82])&#10;+[.AU$27]*[.$Z$5]*MAGNET([.AU$24]+[.$BB82])&#10;+[.AV$27]*[.$Z$5]*MAGNET([.AV$24]+[.$BB82])&#10;+[.AW$27]*[.$Z$5]*MAGNET([.AW$24]+[.$BB82])&#10;+[.AX$27]*[.$Z$5]*MAGNET([.AX$24]+[.$BB82])&#10;+[.AY$27]*[.$Z$5]*MAGNET([.AY$24]+[.$BB82]) +RAND()*[.$BE$13]" office:value-type="float" office:value="-99.3917306838969" calcext:value-type="float">
            <text:p>-99.3917306838969</text:p>
          </table:table-cell>
          <table:table-cell table:style-name="ce71" table:formula="of:=[.E$28]*[.$Z$5]*MAGNET([.E$24]+[.$BB82])+[.F$28]*[.$Z$5]*MAGNET([.F$24]+[.$BB82])+[.G$28]*[.$Z$5]*MAGNET([.G$24]+[.$BB82])+[.H$28]*[.$Z$5]*MAGNET([.H$24]+[.$BB82])+[.I$28]*[.$Z$5]*MAGNET([.I$24]+[.$BB82])+[.J$28]*[.$Z$5]*MAGNET([.J$24]+[.$BB82])+[.K$28]*[.$Z$5]*MAGNET([.K$24]+[.$BB82])+[.L$28]*[.$Z$5]*MAGNET([.L$24]+[.$BB82])+[.M$28]*[.$Z$5]*MAGNET([.M$24]+[.$BB82])+[.N$28]*[.$Z$5]*MAGNET([.N$24]+[.$BB82])+[.O$28]*[.$Z$5]*MAGNET([.O$24]+[.$BB82])+[.P$28]*[.$Z$5]*MAGNET([.P$24]+[.$BB82])+[.Q$28]*[.$Z$5]*MAGNET([.Q$24]+[.$BB82])+[.R$28]*[.$Z$5]*MAGNET([.R$24]+[.$BB82])+[.S$28]*[.$Z$5]*MAGNET([.S$24]+[.$BB82])+[.T$28]*[.$Z$5]*MAGNET([.T$24]+[.$BB82])+[.U$28]*[.$Z$5]*MAGNET([.U$24]+[.$BB82])+[.V$28]*[.$Z$5]*MAGNET([.V$24]+[.$BB82])+[.W$28]*[.$Z$5]*MAGNET([.W$24]+[.$BB82])+[.X$28]*[.$Z$5]*MAGNET([.X$24]+[.$BB82])+[.Y$28]*[.$Z$5]*MAGNET([.Y$24]+[.$BB82])+[.Z$28]*[.$Z$5]*MAGNET([.Z$24]+[.$BB82])+[.AA$28]*[.$Z$5]*MAGNET([.AA$24]+[.$BB82])+[.AB$28]*[.$Z$5]*MAGNET([.AB$24]+[.$BB82])+[.AC$28]*[.$Z$5]*MAGNET([.AC$24]+[.$BB82])+[.AD$28]*[.$Z$5]*MAGNET([.AD$24]+[.$BB82])+[.AE$28]*[.$Z$5]*MAGNET([.AE$24]+[.$BB82])+[.AF$28]*[.$Z$5]*MAGNET([.AF$24]+[.$BB82])+[.AG$28]*[.$Z$5]*MAGNET([.AG$24]+[.$BB82])+[.D$28]*[.$Z$5]*MAGNET([.D$24]+[.$BB82])+[.AH$28]*[.$Z$5]*MAGNET([.AH$24]+[.BB82]) +[.AI$28]*[.$Z$5]*MAGNET([.AI$24]+[.BB82]) +[.AJ$28]*[.$Z$5]*MAGNET([.AJ$24]+[.BB82]) +[.AK$28]*[.$Z$5]*MAGNET([.AK$24]+[.BB82]) +[.AL$28]*[.$Z$5]*MAGNET([.AL$24]+[.BB82]) +[.AM$28]*[.$Z$5]*MAGNET([.AM$24]+[.BB82]) +[.AN$28]*[.$Z$5]*MAGNET([.AN$24]+[.BB82]) +[.AO$28]*[.$Z$5]*MAGNET([.AO$24]+[.BB82]) +[.AP$28]*[.$Z$5]*MAGNET([.AP$24]+[.$BB82])&#10;+[.AQ$28]*[.$Z$5]*MAGNET([.AQ$24]+[.$BB82])&#10;+[.AR$28]*[.$Z$5]*MAGNET([.AR$24]+[.$BB82])&#10;+[.AS$28]*[.$Z$5]*MAGNET([.AS$24]+[.$BB82])&#10;+[.AT$28]*[.$Z$5]*MAGNET([.AT$24]+[.$BB82])&#10;+[.AU$28]*[.$Z$5]*MAGNET([.AU$24]+[.$BB82])&#10;+[.AV$28]*[.$Z$5]*MAGNET([.AV$24]+[.$BB82])&#10;+[.AW$28]*[.$Z$5]*MAGNET([.AW$24]+[.$BB82])&#10;+[.AX$28]*[.$Z$5]*MAGNET([.AX$24]+[.$BB82])&#10;+[.AY$28]*[.$Z$5]*MAGNET([.AY$24]+[.$BB82]) +RAND()*[.$BF$13]" office:value-type="float" office:value="-12.8971612936503" calcext:value-type="float">
            <text:p>-12.8971612936503</text:p>
          </table:table-cell>
          <table:table-cell table:style-name="ce71" table:formula="of:=[.E$29]*[.$Z$5]*MAGNET([.E$24]+[.$BB82])+[.F$29]*[.$Z$5]*MAGNET([.F$24]+[.$BB82])+[.G$29]*[.$Z$5]*MAGNET([.G$24]+[.$BB82])+[.H$29]*[.$Z$5]*MAGNET([.H$24]+[.$BB82])+[.I$29]*[.$Z$5]*MAGNET([.I$24]+[.$BB82])+[.J$29]*[.$Z$5]*MAGNET([.J$24]+[.$BB82])+[.K$29]*[.$Z$5]*MAGNET([.K$24]+[.$BB82])+[.L$29]*[.$Z$5]*MAGNET([.L$24]+[.$BB82])+[.M$29]*[.$Z$5]*MAGNET([.M$24]+[.$BB82])+[.N$29]*[.$Z$5]*MAGNET([.N$24]+[.$BB82])+[.O$29]*[.$Z$5]*MAGNET([.O$24]+[.$BB82])+[.P$29]*[.$Z$5]*MAGNET([.P$24]+[.$BB82])+[.Q$29]*[.$Z$5]*MAGNET([.Q$24]+[.$BB82])+[.R$29]*[.$Z$5]*MAGNET([.R$24]+[.$BB82])+[.S$29]*[.$Z$5]*MAGNET([.S$24]+[.$BB82])+[.T$29]*[.$Z$5]*MAGNET([.T$24]+[.$BB82])+[.U$29]*[.$Z$5]*MAGNET([.U$24]+[.$BB82])+[.V$29]*[.$Z$5]*MAGNET([.V$24]+[.$BB82])+[.W$29]*[.$Z$5]*MAGNET([.W$24]+[.$BB82])+[.X$29]*[.$Z$5]*MAGNET([.X$24]+[.$BB82])+[.Y$29]*[.$Z$5]*MAGNET([.Y$24]+[.$BB82])+[.Z$29]*[.$Z$5]*MAGNET([.Z$24]+[.$BB82])+[.AA$29]*[.$Z$5]*MAGNET([.AA$24]+[.$BB82])+[.AB$29]*[.$Z$5]*MAGNET([.AB$24]+[.$BB82])+[.AC$29]*[.$Z$5]*MAGNET([.AC$24]+[.$BB82])+[.AD$29]*[.$Z$5]*MAGNET([.AD$24]+[.$BB82])+[.AE$29]*[.$Z$5]*MAGNET([.AE$24]+[.$BB82])+[.AF$29]*[.$Z$5]*MAGNET([.AF$24]+[.$BB82])+[.AG$29]*[.$Z$5]*MAGNET([.AG$24]+[.$BB82])+[.D$29]*[.$Z$5]*MAGNET([.D$24]+[.$BB82])+[.AH$29]*[.$Z$5]*MAGNET([.AH$24]+[.BB82]) +[.AI$29]*[.$Z$5]*MAGNET([.AI$24]+[.BB82]) +[.AJ$29]*[.$Z$5]*MAGNET([.AJ$24]+[.BB82]) +[.AK$29]*[.$Z$5]*MAGNET([.AK$24]+[.BB82]) +[.AL$29]*[.$Z$5]*MAGNET([.AL$24]+[.BB82]) +[.AM$29]*[.$Z$5]*MAGNET([.AM$24]+[.BB82]) +[.AN$29]*[.$Z$5]*MAGNET([.AN$24]+[.BB82]) +[.AO$29]*[.$Z$5]*MAGNET([.AO$24]+[.BB82]) +[.AP$29]*[.$Z$5]*MAGNET([.AP$24]+[.$BB82])&#10;+[.AQ$29]*[.$Z$5]*MAGNET([.AQ$24]+[.$BB82])&#10;+[.AR$29]*[.$Z$5]*MAGNET([.AR$24]+[.$BB82])&#10;+[.AS$29]*[.$Z$5]*MAGNET([.AS$24]+[.$BB82])&#10;+[.AT$29]*[.$Z$5]*MAGNET([.AT$24]+[.$BB82])&#10;+[.AU$29]*[.$Z$5]*MAGNET([.AU$24]+[.$BB82])&#10;+[.AV$29]*[.$Z$5]*MAGNET([.AV$24]+[.$BB82])&#10;+[.AW$29]*[.$Z$5]*MAGNET([.AW$24]+[.$BB82])&#10;+[.AX$29]*[.$Z$5]*MAGNET([.AX$24]+[.$BB82])&#10;+[.AY$29]*[.$Z$5]*MAGNET([.AY$24]+[.$BB82]) +RAND()*[.$BG$13]" office:value-type="float" office:value="44.5477588630556" calcext:value-type="float">
            <text:p>44.5477588630556</text:p>
          </table:table-cell>
          <table:table-cell table:style-name="ce71" table:formula="of:=[.E$30]*[.$Z$5]*MAGNET([.E$24]+[.$BB82])+[.F$30]*[.$Z$5]*MAGNET([.F$24]+[.$BB82])+[.G$30]*[.$Z$5]*MAGNET([.G$24]+[.$BB82])+[.H$30]*[.$Z$5]*MAGNET([.H$24]+[.$BB82])+[.I$30]*[.$Z$5]*MAGNET([.I$24]+[.$BB82])+[.J$30]*[.$Z$5]*MAGNET([.J$24]+[.$BB82])+[.K$30]*[.$Z$5]*MAGNET([.K$24]+[.$BB82])+[.L$30]*[.$Z$5]*MAGNET([.L$24]+[.$BB82])+[.M$30]*[.$Z$5]*MAGNET([.M$24]+[.$BB82])+[.N$30]*[.$Z$5]*MAGNET([.N$24]+[.$BB82])+[.O$30]*[.$Z$5]*MAGNET([.O$24]+[.$BB82])+[.P$30]*[.$Z$5]*MAGNET([.P$24]+[.$BB82])+[.Q$30]*[.$Z$5]*MAGNET([.Q$24]+[.$BB82])+[.R$30]*[.$Z$5]*MAGNET([.R$24]+[.$BB82])+[.S$30]*[.$Z$5]*MAGNET([.S$24]+[.$BB82])+[.T$30]*[.$Z$5]*MAGNET([.T$24]+[.$BB82])+[.U$30]*[.$Z$5]*MAGNET([.U$24]+[.$BB82])+[.V$30]*[.$Z$5]*MAGNET([.V$24]+[.$BB82])+[.W$30]*[.$Z$5]*MAGNET([.W$24]+[.$BB82])+[.X$30]*[.$Z$5]*MAGNET([.X$24]+[.$BB82])+[.Y$30]*[.$Z$5]*MAGNET([.Y$24]+[.$BB82])+[.Z$30]*[.$Z$5]*MAGNET([.Z$24]+[.$BB82])+[.AA$30]*[.$Z$5]*MAGNET([.AA$24]+[.$BB82])+[.AB$30]*[.$Z$5]*MAGNET([.AB$24]+[.$BB82])+[.AC$30]*[.$Z$5]*MAGNET([.AC$24]+[.$BB82])+[.AD$30]*[.$Z$5]*MAGNET([.AD$24]+[.$BB82])+[.AE$30]*[.$Z$5]*MAGNET([.AE$24]+[.$BB82])+[.AF$30]*[.$Z$5]*MAGNET([.AF$24]+[.$BB82])+[.AG$30]*[.$Z$5]*MAGNET([.AG$24]+[.$BB82])+[.D$30]*[.$Z$5]*MAGNET([.D$24]+[.$BB82])+[.AH$30]*[.$Z$5]*MAGNET([.AH$24]+[.BB82]) +[.AI$30]*[.$Z$5]*MAGNET([.AI$24]+[.BB82]) +[.AJ$30]*[.$Z$5]*MAGNET([.AJ$24]+[.BB82]) +[.AK$30]*[.$Z$5]*MAGNET([.AK$24]+[.BB82]) +[.AL$30]*[.$Z$5]*MAGNET([.AL$24]+[.BB82]) +[.AM$30]*[.$Z$5]*MAGNET([.AM$24]+[.BB82]) +[.AN$30]*[.$Z$5]*MAGNET([.AN$24]+[.BB82]) +[.AO$30]*[.$Z$5]*MAGNET([.AO$24]+[.BB82]) +[.AP$30]*[.$Z$5]*MAGNET([.AP$24]+[.$BB82])&#10;+[.AQ$30]*[.$Z$5]*MAGNET([.AQ$24]+[.$BB82])&#10;+[.AR$30]*[.$Z$5]*MAGNET([.AR$24]+[.$BB82])&#10;+[.AS$30]*[.$Z$5]*MAGNET([.AS$24]+[.$BB82])&#10;+[.AT$30]*[.$Z$5]*MAGNET([.AT$24]+[.$BB82])&#10;+[.AU$30]*[.$Z$5]*MAGNET([.AU$24]+[.$BB82])&#10;+[.AV$30]*[.$Z$5]*MAGNET([.AV$24]+[.$BB82])&#10;+[.AW$30]*[.$Z$5]*MAGNET([.AW$24]+[.$BB82])&#10;+[.AX$30]*[.$Z$5]*MAGNET([.AX$24]+[.$BB82])&#10;+[.AY$30]*[.$Z$5]*MAGNET([.AY$24]+[.$BB82]) +RAND()*[.$BH$13]" office:value-type="float" office:value="0" calcext:value-type="float">
            <text:p>0</text:p>
          </table:table-cell>
          <table:table-cell table:style-name="ce71" table:formula="of:=[.E$31]*[.$Z$5]*MAGNET([.E$24]+[.$BB82])+[.F$31]*[.$Z$5]*MAGNET([.F$24]+[.$BB82])+[.G$31]*[.$Z$5]*MAGNET([.G$24]+[.$BB82])+[.H$31]*[.$Z$5]*MAGNET([.H$24]+[.$BB82])+[.I$31]*[.$Z$5]*MAGNET([.I$24]+[.$BB82])+[.J$31]*[.$Z$5]*MAGNET([.J$24]+[.$BB82])+[.K$31]*[.$Z$5]*MAGNET([.K$24]+[.$BB82])+[.L$31]*[.$Z$5]*MAGNET([.L$24]+[.$BB82])+[.M$31]*[.$Z$5]*MAGNET([.M$24]+[.$BB82])+[.N$31]*[.$Z$5]*MAGNET([.N$24]+[.$BB82])+[.O$31]*[.$Z$5]*MAGNET([.O$24]+[.$BB82])+[.P$31]*[.$Z$5]*MAGNET([.P$24]+[.$BB82])+[.Q$31]*[.$Z$5]*MAGNET([.Q$24]+[.$BB82])+[.R$31]*[.$Z$5]*MAGNET([.R$24]+[.$BB82])+[.S$31]*[.$Z$5]*MAGNET([.S$24]+[.$BB82])+[.T$31]*[.$Z$5]*MAGNET([.T$24]+[.$BB82])+[.U$31]*[.$Z$5]*MAGNET([.U$24]+[.$BB82])+[.V$31]*[.$Z$5]*MAGNET([.V$24]+[.$BB82])+[.W$31]*[.$Z$5]*MAGNET([.W$24]+[.$BB82])+[.X$31]*[.$Z$5]*MAGNET([.X$24]+[.$BB82])+[.Y$31]*[.$Z$5]*MAGNET([.Y$24]+[.$BB82])+[.Z$31]*[.$Z$5]*MAGNET([.Z$24]+[.$BB82])+[.AA$31]*[.$Z$5]*MAGNET([.AA$24]+[.$BB82])+[.AB$31]*[.$Z$5]*MAGNET([.AB$24]+[.$BB82])+[.AC$31]*[.$Z$5]*MAGNET([.AC$24]+[.$BB82])+[.AD$31]*[.$Z$5]*MAGNET([.AD$24]+[.$BB82])+[.AE$31]*[.$Z$5]*MAGNET([.AE$24]+[.$BB82])+[.AF$31]*[.$Z$5]*MAGNET([.AF$24]+[.$BB82])+[.AG$31]*[.$Z$5]*MAGNET([.AG$24]+[.$BB82])+[.D$31]*[.$Z$5]*MAGNET([.D$24]+[.$BB82])+[.AH$31]*[.$Z$5]*MAGNET([.AH$24]+[.BB82]) +[.AI$31]*[.$Z$5]*MAGNET([.AI$24]+[.BB82]) +[.AJ$31]*[.$Z$5]*MAGNET([.AJ$24]+[.BB82]) +[.AK$31]*[.$Z$5]*MAGNET([.AK$24]+[.BB82]) +[.AL$31]*[.$Z$5]*MAGNET([.AL$24]+[.BB82]) +[.AM$31]*[.$Z$5]*MAGNET([.AM$24]+[.BB82]) +[.AN$31]*[.$Z$5]*MAGNET([.AN$24]+[.BB82]) +[.AO$31]*[.$Z$5]*MAGNET([.AO$24]+[.BB82]) +[.AP$31]*[.$Z$5]*MAGNET([.AP$24]+[.$BB82])&#10;+[.AQ$31]*[.$Z$5]*MAGNET([.AQ$24]+[.$BB82])&#10;+[.AR$31]*[.$Z$5]*MAGNET([.AR$24]+[.$BB82])&#10;+[.AS$31]*[.$Z$5]*MAGNET([.AS$24]+[.$BB82])&#10;+[.AT$31]*[.$Z$5]*MAGNET([.AT$24]+[.$BB82])&#10;+[.AU$31]*[.$Z$5]*MAGNET([.AU$24]+[.$BB82])&#10;+[.AV$31]*[.$Z$5]*MAGNET([.AV$24]+[.$BB82])&#10;+[.AW$31]*[.$Z$5]*MAGNET([.AW$24]+[.$BB82])&#10;+[.AX$31]*[.$Z$5]*MAGNET([.AX$24]+[.$BB82])&#10;+[.AY$31]*[.$Z$5]*MAGNET([.AY$24]+[.$BB82]) +RAND()*[.$BI$13]" office:value-type="float" office:value="0" calcext:value-type="float">
            <text:p>0</text:p>
          </table:table-cell>
          <table:table-cell table:style-name="ce71" table:formula="of:=[.E$32]*[.$Z$5]*MAGNET([.E$24]+[.$BB82])+[.F$32]*[.$Z$5]*MAGNET([.F$24]+[.$BB82])+[.G$32]*[.$Z$5]*MAGNET([.G$24]+[.$BB82])+[.H$32]*[.$Z$5]*MAGNET([.H$24]+[.$BB82])+[.I$32]*[.$Z$5]*MAGNET([.I$24]+[.$BB82])+[.J$32]*[.$Z$5]*MAGNET([.J$24]+[.$BB82])+[.K$32]*[.$Z$5]*MAGNET([.K$24]+[.$BB82])+[.L$32]*[.$Z$5]*MAGNET([.L$24]+[.$BB82])+[.M$32]*[.$Z$5]*MAGNET([.M$24]+[.$BB82])+[.N$32]*[.$Z$5]*MAGNET([.N$24]+[.$BB82])+[.O$32]*[.$Z$5]*MAGNET([.O$24]+[.$BB82])+[.P$32]*[.$Z$5]*MAGNET([.P$24]+[.$BB82])+[.Q$32]*[.$Z$5]*MAGNET([.Q$24]+[.$BB82])+[.R$32]*[.$Z$5]*MAGNET([.R$24]+[.$BB82])+[.S$32]*[.$Z$5]*MAGNET([.S$24]+[.$BB82])+[.T$32]*[.$Z$5]*MAGNET([.T$24]+[.$BB82])+[.U$32]*[.$Z$5]*MAGNET([.U$24]+[.$BB82])+[.V$32]*[.$Z$5]*MAGNET([.V$24]+[.$BB82])+[.W$32]*[.$Z$5]*MAGNET([.W$24]+[.$BB82])+[.X$32]*[.$Z$5]*MAGNET([.X$24]+[.$BB82])+[.Y$32]*[.$Z$5]*MAGNET([.Y$24]+[.$BB82])+[.Z$32]*[.$Z$5]*MAGNET([.Z$24]+[.$BB82])+[.AA$32]*[.$Z$5]*MAGNET([.AA$24]+[.$BB82])+[.AB$32]*[.$Z$5]*MAGNET([.AB$24]+[.$BB82])+[.AC$32]*[.$Z$5]*MAGNET([.AC$24]+[.$BB82])+[.AD$32]*[.$Z$5]*MAGNET([.AD$24]+[.$BB82])+[.AE$32]*[.$Z$5]*MAGNET([.AE$24]+[.$BB82])+[.AF$32]*[.$Z$5]*MAGNET([.AF$24]+[.$BB82])+[.AG$32]*[.$Z$5]*MAGNET([.AG$24]+[.$BB82])+[.D$32]*[.$Z$5]*MAGNET([.D$24]+[.$BB82])+[.AH$32]*[.$Z$5]*MAGNET([.AH$24]+[.BB82]) +[.AI$32]*[.$Z$5]*MAGNET([.AI$24]+[.BB82]) +[.AJ$32]*[.$Z$5]*MAGNET([.AJ$24]+[.BB82]) +[.AK$32]*[.$Z$5]*MAGNET([.AK$24]+[.BB82]) +[.AL$32]*[.$Z$5]*MAGNET([.AL$24]+[.BB82]) +[.AM$32]*[.$Z$5]*MAGNET([.AM$24]+[.BB82]) +[.AN$32]*[.$Z$5]*MAGNET([.AN$24]+[.BB82]) +[.AO$32]*[.$Z$5]*MAGNET([.AO$24]+[.BB82]) +[.AP$32]*[.$Z$5]*MAGNET([.AP$24]+[.$BB82])&#10;+[.AQ$32]*[.$Z$5]*MAGNET([.AQ$24]+[.$BB82])&#10;+[.AR$32]*[.$Z$5]*MAGNET([.AR$24]+[.$BB82])&#10;+[.AS$32]*[.$Z$5]*MAGNET([.AS$24]+[.$BB82])&#10;+[.AT$32]*[.$Z$5]*MAGNET([.AT$24]+[.$BB82])&#10;+[.AU$32]*[.$Z$5]*MAGNET([.AU$24]+[.$BB82])&#10;+[.AV$32]*[.$Z$5]*MAGNET([.AV$24]+[.$BB82])&#10;+[.AW$32]*[.$Z$5]*MAGNET([.AW$24]+[.$BB82])&#10;+[.AX$32]*[.$Z$5]*MAGNET([.AX$24]+[.$BB82])&#10;+[.AY$32]*[.$Z$5]*MAGNET([.AY$24]+[.$BB8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2]+0.002" office:value-type="float" office:value="0.136" calcext:value-type="float">
            <text:p>0.136</text:p>
          </table:table-cell>
          <table:table-cell table:formula="of:=[.BA83]*[.$D$6]" office:value-type="float" office:value="6.83610561421139" calcext:value-type="float">
            <text:p>6.836</text:p>
          </table:table-cell>
          <table:table-cell table:formula="of:=[.D$25]*[.$Z$5]*MAGNET([.D$24]+[.BB83])+[.E$25]*[.$Z$5]*MAGNET([.E$24]+[.BB83])+[.F$25]*[.$Z$5]*MAGNET([.F$24]+[.BB83])+[.G$25]*[.$Z$5]*MAGNET([.G$24]+[.BB83])+[.H$25]*[.$Z$5]*MAGNET([.H$24]+[.BB83])+[.I$25]*[.$Z$5]*MAGNET([.I$24]+[.BB83])+[.J$25]*[.$Z$5]*MAGNET([.J$24]+[.BB83])+[.K$25]*[.$Z$5]*MAGNET([.K$24]+[.BB83])+[.L$25]*[.$Z$5]*MAGNET([.L$24]+[.BB83])+[.M$25]*[.$Z$5]*MAGNET([.M$24]+[.BB83])+[.N$25]*[.$Z$5]*MAGNET([.N$24]+[.BB83])+[.O$25]*[.$Z$5]*MAGNET([.O$24]+[.BB83])+[.P$25]*[.$Z$5]*MAGNET([.P$24]+[.BB83])+[.Q$25]*[.$Z$5]*MAGNET([.Q$24]+[.BB83])+[.R$25]*[.$Z$5]*MAGNET([.R$24]+[.BB83])+[.S$25]*[.$Z$5]*MAGNET([.S$24]+[.BB83])+[.T$25]*[.$Z$5]*MAGNET([.T$24]+[.BB83])+[.U$25]*[.$Z$5]*MAGNET([.U$24]+[.BB83])+[.V$25]*[.$Z$5]*MAGNET([.V$24]+[.BB83])+[.W$25]*[.$Z$5]*MAGNET([.W$24]+[.BB83])+[.X$25]*[.$Z$5]*MAGNET([.X$24]+[.BB83])+[.Y$25]*[.$Z$5]*MAGNET([.Y$24]+[.BB83])+[.Z$25]*[.$Z$5]*MAGNET([.Z$24]+[.BB83])+[.AA$25]*[.$Z$5]*MAGNET([.AA$24]+[.BB83])+[.AB$25]*[.$Z$5]*MAGNET([.AB$24]+[.BB83])+[.AC$25]*[.$Z$5]*MAGNET([.AC$24]+[.BB83])+[.AD$25]*[.$Z$5]*MAGNET([.AD$24]+[.BB83])+[.AE$25]*[.$Z$5]*MAGNET([.AE$24]+[.BB83])+[.AF$25]*[.$Z$5]*MAGNET([.AF$24]+[.BB83])+[.AG$25]*[.$Z$5]*MAGNET([.AG$24]+[.BB83])+[.AH$25]*[.$Z$5]*MAGNET([.AH$24]+[.BB83]) +[.AI$25]*[.$Z$5]*MAGNET([.AI$24]+[.BB83]) +[.AJ$25]*[.$Z$5]*MAGNET([.AJ$24]+[.BB83]) +[.AK$25]*[.$Z$5]*MAGNET([.AK$24]+[.BB83]) +[.AL$25]*[.$Z$5]*MAGNET([.AL$24]+[.BB83]) +[.AM$25]*[.$Z$5]*MAGNET([.AM$24]+[.BB83]) +[.AN$25]*[.$Z$5]*MAGNET([.AN$24]+[.BB83]) +[.AO$25]*[.$Z$5]*MAGNET([.AO$24]+[.BB83])+RAND()*[.$BC$13]+[.AP$25]*[.$Z$5]*MAGNET([.AP$24]+[.BB83])&#10;+[.AQ$25]*[.$Z$5]*MAGNET([.AQ$24]+[.BB83])&#10;+[.AR$25]*[.$Z$5]*MAGNET([.AR$24]+[.BB83])&#10;+[.AS$25]*[.$Z$5]*MAGNET([.AS$24]+[.BB83])&#10;+[.AT$25]*[.$Z$5]*MAGNET([.AT$24]+[.BB83])&#10;+[.AU$25]*[.$Z$5]*MAGNET([.AU$24]+[.BB83])&#10;+[.AV$25]*[.$Z$5]*MAGNET([.AV$24]+[.BB83])&#10;+[.AW$25]*[.$Z$5]*MAGNET([.AW$24]+[.BB83])&#10;+[.AX$25]*[.$Z$5]*MAGNET([.AX$24]+[.BB83])&#10;+[.AY$25]*[.$Z$5]*MAGNET([.AY$24]+[.BB83])" office:value-type="float" office:value="16.8349411880689" calcext:value-type="float">
            <text:p>16.83</text:p>
          </table:table-cell>
          <table:table-cell table:style-name="ce70" table:formula="of:=[.E$26]*[.$Z$5]*MAGNET([.E$24]+[.$BB83])+[.F$26]*[.$Z$5]*MAGNET([.F$24]+[.$BB83])+[.G$26]*[.$Z$5]*MAGNET([.G$24]+[.$BB83])+[.H$26]*[.$Z$5]*MAGNET([.H$24]+[.$BB83])+[.I$26]*[.$Z$5]*MAGNET([.I$24]+[.$BB83])+[.J$26]*[.$Z$5]*MAGNET([.J$24]+[.$BB83])+[.K$26]*[.$Z$5]*MAGNET([.K$24]+[.$BB83])+[.L$26]*[.$Z$5]*MAGNET([.L$24]+[.$BB83])+[.M$26]*[.$Z$5]*MAGNET([.M$24]+[.$BB83])+[.N$26]*[.$Z$5]*MAGNET([.N$24]+[.$BB83])+[.O$26]*[.$Z$5]*MAGNET([.O$24]+[.$BB83])+[.P$26]*[.$Z$5]*MAGNET([.P$24]+[.$BB83])+[.Q$26]*[.$Z$5]*MAGNET([.Q$24]+[.$BB83])+[.R$26]*[.$Z$5]*MAGNET([.R$24]+[.$BB83])+[.S$26]*[.$Z$5]*MAGNET([.S$24]+[.$BB83])+[.T$26]*[.$Z$5]*MAGNET([.T$24]+[.$BB83])+[.U$26]*[.$Z$5]*MAGNET([.U$24]+[.$BB83])+[.V$26]*[.$Z$5]*MAGNET([.V$24]+[.$BB83])+[.W$26]*[.$Z$5]*MAGNET([.W$24]+[.$BB83])+[.X$26]*[.$Z$5]*MAGNET([.X$24]+[.$BB83])+[.Y$26]*[.$Z$5]*MAGNET([.Y$24]+[.$BB83])+[.Z$26]*[.$Z$5]*MAGNET([.Z$24]+[.$BB83])+[.AA$26]*[.$Z$5]*MAGNET([.AA$24]+[.$BB83])+[.AB$26]*[.$Z$5]*MAGNET([.AB$24]+[.$BB83])+[.AC$26]*[.$Z$5]*MAGNET([.AC$24]+[.$BB83])+[.AD$26]*[.$Z$5]*MAGNET([.AD$24]+[.$BB83])+[.AE$26]*[.$Z$5]*MAGNET([.AE$24]+[.$BB83])+[.AF$26]*[.$Z$5]*MAGNET([.AF$24]+[.$BB83])+[.AG$26]*[.$Z$5]*MAGNET([.AG$24]+[.$BB83])+[.D$26]*[.$Z$5]*MAGNET([.D$24]+[.$BB83])+[.AH$26]*[.$Z$5]*MAGNET([.AH$24]+[.BB83]) +[.AI$26]*[.$Z$5]*MAGNET([.AI$24]+[.BB83]) +[.AJ$26]*[.$Z$5]*MAGNET([.AJ$24]+[.BB83]) +[.AK$26]*[.$Z$5]*MAGNET([.AK$24]+[.BB83]) +[.AL$26]*[.$Z$5]*MAGNET([.AL$24]+[.BB83]) +[.AM$26]*[.$Z$5]*MAGNET([.AM$24]+[.BB83]) +[.AN$26]*[.$Z$5]*MAGNET([.AN$24]+[.BB83]) +[.AO$26]*[.$Z$5]*MAGNET([.AO$24]+[.BB83]) +[.AP$26]*[.$Z$5]*MAGNET([.AP$24]+[.$BB83])&#10;+[.AQ$26]*[.$Z$5]*MAGNET([.AQ$24]+[.$BB83])&#10;+[.AR$26]*[.$Z$5]*MAGNET([.AR$24]+[.$BB83])&#10;+[.AS$26]*[.$Z$5]*MAGNET([.AS$24]+[.$BB83])&#10;+[.AT$26]*[.$Z$5]*MAGNET([.AT$24]+[.$BB83])&#10;+[.AU$26]*[.$Z$5]*MAGNET([.AU$24]+[.$BB83])&#10;+[.AV$26]*[.$Z$5]*MAGNET([.AV$24]+[.$BB83])&#10;+[.AW$26]*[.$Z$5]*MAGNET([.AW$24]+[.$BB83])&#10;+[.AX$26]*[.$Z$5]*MAGNET([.AX$24]+[.$BB83])&#10;+[.AY$26]*[.$Z$5]*MAGNET([.AY$24]+[.$BB83]) +RAND()*[.$BD$13]" office:value-type="float" office:value="74.5853018756045" calcext:value-type="float">
            <text:p>74.59</text:p>
          </table:table-cell>
          <table:table-cell table:style-name="ce71" table:formula="of:=[.E$27]*[.$Z$5]*MAGNET([.E$24]+[.$BB83])+[.F$27]*[.$Z$5]*MAGNET([.F$24]+[.$BB83])+[.G$27]*[.$Z$5]*MAGNET([.G$24]+[.$BB83])+[.H$27]*[.$Z$5]*MAGNET([.H$24]+[.$BB83])+[.I$27]*[.$Z$5]*MAGNET([.I$24]+[.$BB83])+[.J$27]*[.$Z$5]*MAGNET([.J$24]+[.$BB83])+[.K$27]*[.$Z$5]*MAGNET([.K$24]+[.$BB83])+[.L$27]*[.$Z$5]*MAGNET([.L$24]+[.$BB83])+[.M$27]*[.$Z$5]*MAGNET([.M$24]+[.$BB83])+[.N$27]*[.$Z$5]*MAGNET([.N$24]+[.$BB83])+[.O$27]*[.$Z$5]*MAGNET([.O$24]+[.$BB83])+[.P$27]*[.$Z$5]*MAGNET([.P$24]+[.$BB83])+[.Q$27]*[.$Z$5]*MAGNET([.Q$24]+[.$BB83])+[.R$27]*[.$Z$5]*MAGNET([.R$24]+[.$BB83])+[.S$27]*[.$Z$5]*MAGNET([.S$24]+[.$BB83])+[.T$27]*[.$Z$5]*MAGNET([.T$24]+[.$BB83])+[.U$27]*[.$Z$5]*MAGNET([.U$24]+[.$BB83])+[.V$27]*[.$Z$5]*MAGNET([.V$24]+[.$BB83])+[.W$27]*[.$Z$5]*MAGNET([.W$24]+[.$BB83])+[.X$27]*[.$Z$5]*MAGNET([.X$24]+[.$BB83])+[.Y$27]*[.$Z$5]*MAGNET([.Y$24]+[.$BB83])+[.Z$27]*[.$Z$5]*MAGNET([.Z$24]+[.$BB83])+[.AA$27]*[.$Z$5]*MAGNET([.AA$24]+[.$BB83])+[.AB$27]*[.$Z$5]*MAGNET([.AB$24]+[.$BB83])+[.AC$27]*[.$Z$5]*MAGNET([.AC$24]+[.$BB83])+[.AD$27]*[.$Z$5]*MAGNET([.AD$24]+[.$BB83])+[.AE$27]*[.$Z$5]*MAGNET([.AE$24]+[.$BB83])+[.AF$27]*[.$Z$5]*MAGNET([.AF$24]+[.$BB83])+[.AG$27]*[.$Z$5]*MAGNET([.AG$24]+[.$BB83])+[.D$27]*[.$Z$5]*MAGNET([.D$24]+[.$BB83])+[.AH$27]*[.$Z$5]*MAGNET([.AH$24]+[.BB83]) +[.AI$27]*[.$Z$5]*MAGNET([.AI$24]+[.BB83]) +[.AJ$27]*[.$Z$5]*MAGNET([.AJ$24]+[.BB83]) +[.AK$27]*[.$Z$5]*MAGNET([.AK$24]+[.BB83]) +[.AL$27]*[.$Z$5]*MAGNET([.AL$24]+[.BB83]) +[.AM$27]*[.$Z$5]*MAGNET([.AM$24]+[.BB83]) +[.AN$27]*[.$Z$5]*MAGNET([.AN$24]+[.BB83]) +[.AO$27]*[.$Z$5]*MAGNET([.AO$24]+[.BB83]) +[.AP$27]*[.$Z$5]*MAGNET([.AP$24]+[.$BB83])&#10;+[.AQ$27]*[.$Z$5]*MAGNET([.AQ$24]+[.$BB83])&#10;+[.AR$27]*[.$Z$5]*MAGNET([.AR$24]+[.$BB83])&#10;+[.AS$27]*[.$Z$5]*MAGNET([.AS$24]+[.$BB83])&#10;+[.AT$27]*[.$Z$5]*MAGNET([.AT$24]+[.$BB83])&#10;+[.AU$27]*[.$Z$5]*MAGNET([.AU$24]+[.$BB83])&#10;+[.AV$27]*[.$Z$5]*MAGNET([.AV$24]+[.$BB83])&#10;+[.AW$27]*[.$Z$5]*MAGNET([.AW$24]+[.$BB83])&#10;+[.AX$27]*[.$Z$5]*MAGNET([.AX$24]+[.$BB83])&#10;+[.AY$27]*[.$Z$5]*MAGNET([.AY$24]+[.$BB83]) +RAND()*[.$BE$13]" office:value-type="float" office:value="-105.138216326228" calcext:value-type="float">
            <text:p>-105.138216326228</text:p>
          </table:table-cell>
          <table:table-cell table:style-name="ce71" table:formula="of:=[.E$28]*[.$Z$5]*MAGNET([.E$24]+[.$BB83])+[.F$28]*[.$Z$5]*MAGNET([.F$24]+[.$BB83])+[.G$28]*[.$Z$5]*MAGNET([.G$24]+[.$BB83])+[.H$28]*[.$Z$5]*MAGNET([.H$24]+[.$BB83])+[.I$28]*[.$Z$5]*MAGNET([.I$24]+[.$BB83])+[.J$28]*[.$Z$5]*MAGNET([.J$24]+[.$BB83])+[.K$28]*[.$Z$5]*MAGNET([.K$24]+[.$BB83])+[.L$28]*[.$Z$5]*MAGNET([.L$24]+[.$BB83])+[.M$28]*[.$Z$5]*MAGNET([.M$24]+[.$BB83])+[.N$28]*[.$Z$5]*MAGNET([.N$24]+[.$BB83])+[.O$28]*[.$Z$5]*MAGNET([.O$24]+[.$BB83])+[.P$28]*[.$Z$5]*MAGNET([.P$24]+[.$BB83])+[.Q$28]*[.$Z$5]*MAGNET([.Q$24]+[.$BB83])+[.R$28]*[.$Z$5]*MAGNET([.R$24]+[.$BB83])+[.S$28]*[.$Z$5]*MAGNET([.S$24]+[.$BB83])+[.T$28]*[.$Z$5]*MAGNET([.T$24]+[.$BB83])+[.U$28]*[.$Z$5]*MAGNET([.U$24]+[.$BB83])+[.V$28]*[.$Z$5]*MAGNET([.V$24]+[.$BB83])+[.W$28]*[.$Z$5]*MAGNET([.W$24]+[.$BB83])+[.X$28]*[.$Z$5]*MAGNET([.X$24]+[.$BB83])+[.Y$28]*[.$Z$5]*MAGNET([.Y$24]+[.$BB83])+[.Z$28]*[.$Z$5]*MAGNET([.Z$24]+[.$BB83])+[.AA$28]*[.$Z$5]*MAGNET([.AA$24]+[.$BB83])+[.AB$28]*[.$Z$5]*MAGNET([.AB$24]+[.$BB83])+[.AC$28]*[.$Z$5]*MAGNET([.AC$24]+[.$BB83])+[.AD$28]*[.$Z$5]*MAGNET([.AD$24]+[.$BB83])+[.AE$28]*[.$Z$5]*MAGNET([.AE$24]+[.$BB83])+[.AF$28]*[.$Z$5]*MAGNET([.AF$24]+[.$BB83])+[.AG$28]*[.$Z$5]*MAGNET([.AG$24]+[.$BB83])+[.D$28]*[.$Z$5]*MAGNET([.D$24]+[.$BB83])+[.AH$28]*[.$Z$5]*MAGNET([.AH$24]+[.BB83]) +[.AI$28]*[.$Z$5]*MAGNET([.AI$24]+[.BB83]) +[.AJ$28]*[.$Z$5]*MAGNET([.AJ$24]+[.BB83]) +[.AK$28]*[.$Z$5]*MAGNET([.AK$24]+[.BB83]) +[.AL$28]*[.$Z$5]*MAGNET([.AL$24]+[.BB83]) +[.AM$28]*[.$Z$5]*MAGNET([.AM$24]+[.BB83]) +[.AN$28]*[.$Z$5]*MAGNET([.AN$24]+[.BB83]) +[.AO$28]*[.$Z$5]*MAGNET([.AO$24]+[.BB83]) +[.AP$28]*[.$Z$5]*MAGNET([.AP$24]+[.$BB83])&#10;+[.AQ$28]*[.$Z$5]*MAGNET([.AQ$24]+[.$BB83])&#10;+[.AR$28]*[.$Z$5]*MAGNET([.AR$24]+[.$BB83])&#10;+[.AS$28]*[.$Z$5]*MAGNET([.AS$24]+[.$BB83])&#10;+[.AT$28]*[.$Z$5]*MAGNET([.AT$24]+[.$BB83])&#10;+[.AU$28]*[.$Z$5]*MAGNET([.AU$24]+[.$BB83])&#10;+[.AV$28]*[.$Z$5]*MAGNET([.AV$24]+[.$BB83])&#10;+[.AW$28]*[.$Z$5]*MAGNET([.AW$24]+[.$BB83])&#10;+[.AX$28]*[.$Z$5]*MAGNET([.AX$24]+[.$BB83])&#10;+[.AY$28]*[.$Z$5]*MAGNET([.AY$24]+[.$BB83]) +RAND()*[.$BF$13]" office:value-type="float" office:value="-15.0160111288469" calcext:value-type="float">
            <text:p>-15.0160111288469</text:p>
          </table:table-cell>
          <table:table-cell table:style-name="ce71" table:formula="of:=[.E$29]*[.$Z$5]*MAGNET([.E$24]+[.$BB83])+[.F$29]*[.$Z$5]*MAGNET([.F$24]+[.$BB83])+[.G$29]*[.$Z$5]*MAGNET([.G$24]+[.$BB83])+[.H$29]*[.$Z$5]*MAGNET([.H$24]+[.$BB83])+[.I$29]*[.$Z$5]*MAGNET([.I$24]+[.$BB83])+[.J$29]*[.$Z$5]*MAGNET([.J$24]+[.$BB83])+[.K$29]*[.$Z$5]*MAGNET([.K$24]+[.$BB83])+[.L$29]*[.$Z$5]*MAGNET([.L$24]+[.$BB83])+[.M$29]*[.$Z$5]*MAGNET([.M$24]+[.$BB83])+[.N$29]*[.$Z$5]*MAGNET([.N$24]+[.$BB83])+[.O$29]*[.$Z$5]*MAGNET([.O$24]+[.$BB83])+[.P$29]*[.$Z$5]*MAGNET([.P$24]+[.$BB83])+[.Q$29]*[.$Z$5]*MAGNET([.Q$24]+[.$BB83])+[.R$29]*[.$Z$5]*MAGNET([.R$24]+[.$BB83])+[.S$29]*[.$Z$5]*MAGNET([.S$24]+[.$BB83])+[.T$29]*[.$Z$5]*MAGNET([.T$24]+[.$BB83])+[.U$29]*[.$Z$5]*MAGNET([.U$24]+[.$BB83])+[.V$29]*[.$Z$5]*MAGNET([.V$24]+[.$BB83])+[.W$29]*[.$Z$5]*MAGNET([.W$24]+[.$BB83])+[.X$29]*[.$Z$5]*MAGNET([.X$24]+[.$BB83])+[.Y$29]*[.$Z$5]*MAGNET([.Y$24]+[.$BB83])+[.Z$29]*[.$Z$5]*MAGNET([.Z$24]+[.$BB83])+[.AA$29]*[.$Z$5]*MAGNET([.AA$24]+[.$BB83])+[.AB$29]*[.$Z$5]*MAGNET([.AB$24]+[.$BB83])+[.AC$29]*[.$Z$5]*MAGNET([.AC$24]+[.$BB83])+[.AD$29]*[.$Z$5]*MAGNET([.AD$24]+[.$BB83])+[.AE$29]*[.$Z$5]*MAGNET([.AE$24]+[.$BB83])+[.AF$29]*[.$Z$5]*MAGNET([.AF$24]+[.$BB83])+[.AG$29]*[.$Z$5]*MAGNET([.AG$24]+[.$BB83])+[.D$29]*[.$Z$5]*MAGNET([.D$24]+[.$BB83])+[.AH$29]*[.$Z$5]*MAGNET([.AH$24]+[.BB83]) +[.AI$29]*[.$Z$5]*MAGNET([.AI$24]+[.BB83]) +[.AJ$29]*[.$Z$5]*MAGNET([.AJ$24]+[.BB83]) +[.AK$29]*[.$Z$5]*MAGNET([.AK$24]+[.BB83]) +[.AL$29]*[.$Z$5]*MAGNET([.AL$24]+[.BB83]) +[.AM$29]*[.$Z$5]*MAGNET([.AM$24]+[.BB83]) +[.AN$29]*[.$Z$5]*MAGNET([.AN$24]+[.BB83]) +[.AO$29]*[.$Z$5]*MAGNET([.AO$24]+[.BB83]) +[.AP$29]*[.$Z$5]*MAGNET([.AP$24]+[.$BB83])&#10;+[.AQ$29]*[.$Z$5]*MAGNET([.AQ$24]+[.$BB83])&#10;+[.AR$29]*[.$Z$5]*MAGNET([.AR$24]+[.$BB83])&#10;+[.AS$29]*[.$Z$5]*MAGNET([.AS$24]+[.$BB83])&#10;+[.AT$29]*[.$Z$5]*MAGNET([.AT$24]+[.$BB83])&#10;+[.AU$29]*[.$Z$5]*MAGNET([.AU$24]+[.$BB83])&#10;+[.AV$29]*[.$Z$5]*MAGNET([.AV$24]+[.$BB83])&#10;+[.AW$29]*[.$Z$5]*MAGNET([.AW$24]+[.$BB83])&#10;+[.AX$29]*[.$Z$5]*MAGNET([.AX$24]+[.$BB83])&#10;+[.AY$29]*[.$Z$5]*MAGNET([.AY$24]+[.$BB83]) +RAND()*[.$BG$13]" office:value-type="float" office:value="45.7844706531182" calcext:value-type="float">
            <text:p>45.7844706531182</text:p>
          </table:table-cell>
          <table:table-cell table:style-name="ce71" table:formula="of:=[.E$30]*[.$Z$5]*MAGNET([.E$24]+[.$BB83])+[.F$30]*[.$Z$5]*MAGNET([.F$24]+[.$BB83])+[.G$30]*[.$Z$5]*MAGNET([.G$24]+[.$BB83])+[.H$30]*[.$Z$5]*MAGNET([.H$24]+[.$BB83])+[.I$30]*[.$Z$5]*MAGNET([.I$24]+[.$BB83])+[.J$30]*[.$Z$5]*MAGNET([.J$24]+[.$BB83])+[.K$30]*[.$Z$5]*MAGNET([.K$24]+[.$BB83])+[.L$30]*[.$Z$5]*MAGNET([.L$24]+[.$BB83])+[.M$30]*[.$Z$5]*MAGNET([.M$24]+[.$BB83])+[.N$30]*[.$Z$5]*MAGNET([.N$24]+[.$BB83])+[.O$30]*[.$Z$5]*MAGNET([.O$24]+[.$BB83])+[.P$30]*[.$Z$5]*MAGNET([.P$24]+[.$BB83])+[.Q$30]*[.$Z$5]*MAGNET([.Q$24]+[.$BB83])+[.R$30]*[.$Z$5]*MAGNET([.R$24]+[.$BB83])+[.S$30]*[.$Z$5]*MAGNET([.S$24]+[.$BB83])+[.T$30]*[.$Z$5]*MAGNET([.T$24]+[.$BB83])+[.U$30]*[.$Z$5]*MAGNET([.U$24]+[.$BB83])+[.V$30]*[.$Z$5]*MAGNET([.V$24]+[.$BB83])+[.W$30]*[.$Z$5]*MAGNET([.W$24]+[.$BB83])+[.X$30]*[.$Z$5]*MAGNET([.X$24]+[.$BB83])+[.Y$30]*[.$Z$5]*MAGNET([.Y$24]+[.$BB83])+[.Z$30]*[.$Z$5]*MAGNET([.Z$24]+[.$BB83])+[.AA$30]*[.$Z$5]*MAGNET([.AA$24]+[.$BB83])+[.AB$30]*[.$Z$5]*MAGNET([.AB$24]+[.$BB83])+[.AC$30]*[.$Z$5]*MAGNET([.AC$24]+[.$BB83])+[.AD$30]*[.$Z$5]*MAGNET([.AD$24]+[.$BB83])+[.AE$30]*[.$Z$5]*MAGNET([.AE$24]+[.$BB83])+[.AF$30]*[.$Z$5]*MAGNET([.AF$24]+[.$BB83])+[.AG$30]*[.$Z$5]*MAGNET([.AG$24]+[.$BB83])+[.D$30]*[.$Z$5]*MAGNET([.D$24]+[.$BB83])+[.AH$30]*[.$Z$5]*MAGNET([.AH$24]+[.BB83]) +[.AI$30]*[.$Z$5]*MAGNET([.AI$24]+[.BB83]) +[.AJ$30]*[.$Z$5]*MAGNET([.AJ$24]+[.BB83]) +[.AK$30]*[.$Z$5]*MAGNET([.AK$24]+[.BB83]) +[.AL$30]*[.$Z$5]*MAGNET([.AL$24]+[.BB83]) +[.AM$30]*[.$Z$5]*MAGNET([.AM$24]+[.BB83]) +[.AN$30]*[.$Z$5]*MAGNET([.AN$24]+[.BB83]) +[.AO$30]*[.$Z$5]*MAGNET([.AO$24]+[.BB83]) +[.AP$30]*[.$Z$5]*MAGNET([.AP$24]+[.$BB83])&#10;+[.AQ$30]*[.$Z$5]*MAGNET([.AQ$24]+[.$BB83])&#10;+[.AR$30]*[.$Z$5]*MAGNET([.AR$24]+[.$BB83])&#10;+[.AS$30]*[.$Z$5]*MAGNET([.AS$24]+[.$BB83])&#10;+[.AT$30]*[.$Z$5]*MAGNET([.AT$24]+[.$BB83])&#10;+[.AU$30]*[.$Z$5]*MAGNET([.AU$24]+[.$BB83])&#10;+[.AV$30]*[.$Z$5]*MAGNET([.AV$24]+[.$BB83])&#10;+[.AW$30]*[.$Z$5]*MAGNET([.AW$24]+[.$BB83])&#10;+[.AX$30]*[.$Z$5]*MAGNET([.AX$24]+[.$BB83])&#10;+[.AY$30]*[.$Z$5]*MAGNET([.AY$24]+[.$BB83]) +RAND()*[.$BH$13]" office:value-type="float" office:value="0" calcext:value-type="float">
            <text:p>0</text:p>
          </table:table-cell>
          <table:table-cell table:style-name="ce71" table:formula="of:=[.E$31]*[.$Z$5]*MAGNET([.E$24]+[.$BB83])+[.F$31]*[.$Z$5]*MAGNET([.F$24]+[.$BB83])+[.G$31]*[.$Z$5]*MAGNET([.G$24]+[.$BB83])+[.H$31]*[.$Z$5]*MAGNET([.H$24]+[.$BB83])+[.I$31]*[.$Z$5]*MAGNET([.I$24]+[.$BB83])+[.J$31]*[.$Z$5]*MAGNET([.J$24]+[.$BB83])+[.K$31]*[.$Z$5]*MAGNET([.K$24]+[.$BB83])+[.L$31]*[.$Z$5]*MAGNET([.L$24]+[.$BB83])+[.M$31]*[.$Z$5]*MAGNET([.M$24]+[.$BB83])+[.N$31]*[.$Z$5]*MAGNET([.N$24]+[.$BB83])+[.O$31]*[.$Z$5]*MAGNET([.O$24]+[.$BB83])+[.P$31]*[.$Z$5]*MAGNET([.P$24]+[.$BB83])+[.Q$31]*[.$Z$5]*MAGNET([.Q$24]+[.$BB83])+[.R$31]*[.$Z$5]*MAGNET([.R$24]+[.$BB83])+[.S$31]*[.$Z$5]*MAGNET([.S$24]+[.$BB83])+[.T$31]*[.$Z$5]*MAGNET([.T$24]+[.$BB83])+[.U$31]*[.$Z$5]*MAGNET([.U$24]+[.$BB83])+[.V$31]*[.$Z$5]*MAGNET([.V$24]+[.$BB83])+[.W$31]*[.$Z$5]*MAGNET([.W$24]+[.$BB83])+[.X$31]*[.$Z$5]*MAGNET([.X$24]+[.$BB83])+[.Y$31]*[.$Z$5]*MAGNET([.Y$24]+[.$BB83])+[.Z$31]*[.$Z$5]*MAGNET([.Z$24]+[.$BB83])+[.AA$31]*[.$Z$5]*MAGNET([.AA$24]+[.$BB83])+[.AB$31]*[.$Z$5]*MAGNET([.AB$24]+[.$BB83])+[.AC$31]*[.$Z$5]*MAGNET([.AC$24]+[.$BB83])+[.AD$31]*[.$Z$5]*MAGNET([.AD$24]+[.$BB83])+[.AE$31]*[.$Z$5]*MAGNET([.AE$24]+[.$BB83])+[.AF$31]*[.$Z$5]*MAGNET([.AF$24]+[.$BB83])+[.AG$31]*[.$Z$5]*MAGNET([.AG$24]+[.$BB83])+[.D$31]*[.$Z$5]*MAGNET([.D$24]+[.$BB83])+[.AH$31]*[.$Z$5]*MAGNET([.AH$24]+[.BB83]) +[.AI$31]*[.$Z$5]*MAGNET([.AI$24]+[.BB83]) +[.AJ$31]*[.$Z$5]*MAGNET([.AJ$24]+[.BB83]) +[.AK$31]*[.$Z$5]*MAGNET([.AK$24]+[.BB83]) +[.AL$31]*[.$Z$5]*MAGNET([.AL$24]+[.BB83]) +[.AM$31]*[.$Z$5]*MAGNET([.AM$24]+[.BB83]) +[.AN$31]*[.$Z$5]*MAGNET([.AN$24]+[.BB83]) +[.AO$31]*[.$Z$5]*MAGNET([.AO$24]+[.BB83]) +[.AP$31]*[.$Z$5]*MAGNET([.AP$24]+[.$BB83])&#10;+[.AQ$31]*[.$Z$5]*MAGNET([.AQ$24]+[.$BB83])&#10;+[.AR$31]*[.$Z$5]*MAGNET([.AR$24]+[.$BB83])&#10;+[.AS$31]*[.$Z$5]*MAGNET([.AS$24]+[.$BB83])&#10;+[.AT$31]*[.$Z$5]*MAGNET([.AT$24]+[.$BB83])&#10;+[.AU$31]*[.$Z$5]*MAGNET([.AU$24]+[.$BB83])&#10;+[.AV$31]*[.$Z$5]*MAGNET([.AV$24]+[.$BB83])&#10;+[.AW$31]*[.$Z$5]*MAGNET([.AW$24]+[.$BB83])&#10;+[.AX$31]*[.$Z$5]*MAGNET([.AX$24]+[.$BB83])&#10;+[.AY$31]*[.$Z$5]*MAGNET([.AY$24]+[.$BB83]) +RAND()*[.$BI$13]" office:value-type="float" office:value="0" calcext:value-type="float">
            <text:p>0</text:p>
          </table:table-cell>
          <table:table-cell table:style-name="ce71" table:formula="of:=[.E$32]*[.$Z$5]*MAGNET([.E$24]+[.$BB83])+[.F$32]*[.$Z$5]*MAGNET([.F$24]+[.$BB83])+[.G$32]*[.$Z$5]*MAGNET([.G$24]+[.$BB83])+[.H$32]*[.$Z$5]*MAGNET([.H$24]+[.$BB83])+[.I$32]*[.$Z$5]*MAGNET([.I$24]+[.$BB83])+[.J$32]*[.$Z$5]*MAGNET([.J$24]+[.$BB83])+[.K$32]*[.$Z$5]*MAGNET([.K$24]+[.$BB83])+[.L$32]*[.$Z$5]*MAGNET([.L$24]+[.$BB83])+[.M$32]*[.$Z$5]*MAGNET([.M$24]+[.$BB83])+[.N$32]*[.$Z$5]*MAGNET([.N$24]+[.$BB83])+[.O$32]*[.$Z$5]*MAGNET([.O$24]+[.$BB83])+[.P$32]*[.$Z$5]*MAGNET([.P$24]+[.$BB83])+[.Q$32]*[.$Z$5]*MAGNET([.Q$24]+[.$BB83])+[.R$32]*[.$Z$5]*MAGNET([.R$24]+[.$BB83])+[.S$32]*[.$Z$5]*MAGNET([.S$24]+[.$BB83])+[.T$32]*[.$Z$5]*MAGNET([.T$24]+[.$BB83])+[.U$32]*[.$Z$5]*MAGNET([.U$24]+[.$BB83])+[.V$32]*[.$Z$5]*MAGNET([.V$24]+[.$BB83])+[.W$32]*[.$Z$5]*MAGNET([.W$24]+[.$BB83])+[.X$32]*[.$Z$5]*MAGNET([.X$24]+[.$BB83])+[.Y$32]*[.$Z$5]*MAGNET([.Y$24]+[.$BB83])+[.Z$32]*[.$Z$5]*MAGNET([.Z$24]+[.$BB83])+[.AA$32]*[.$Z$5]*MAGNET([.AA$24]+[.$BB83])+[.AB$32]*[.$Z$5]*MAGNET([.AB$24]+[.$BB83])+[.AC$32]*[.$Z$5]*MAGNET([.AC$24]+[.$BB83])+[.AD$32]*[.$Z$5]*MAGNET([.AD$24]+[.$BB83])+[.AE$32]*[.$Z$5]*MAGNET([.AE$24]+[.$BB83])+[.AF$32]*[.$Z$5]*MAGNET([.AF$24]+[.$BB83])+[.AG$32]*[.$Z$5]*MAGNET([.AG$24]+[.$BB83])+[.D$32]*[.$Z$5]*MAGNET([.D$24]+[.$BB83])+[.AH$32]*[.$Z$5]*MAGNET([.AH$24]+[.BB83]) +[.AI$32]*[.$Z$5]*MAGNET([.AI$24]+[.BB83]) +[.AJ$32]*[.$Z$5]*MAGNET([.AJ$24]+[.BB83]) +[.AK$32]*[.$Z$5]*MAGNET([.AK$24]+[.BB83]) +[.AL$32]*[.$Z$5]*MAGNET([.AL$24]+[.BB83]) +[.AM$32]*[.$Z$5]*MAGNET([.AM$24]+[.BB83]) +[.AN$32]*[.$Z$5]*MAGNET([.AN$24]+[.BB83]) +[.AO$32]*[.$Z$5]*MAGNET([.AO$24]+[.BB83]) +[.AP$32]*[.$Z$5]*MAGNET([.AP$24]+[.$BB83])&#10;+[.AQ$32]*[.$Z$5]*MAGNET([.AQ$24]+[.$BB83])&#10;+[.AR$32]*[.$Z$5]*MAGNET([.AR$24]+[.$BB83])&#10;+[.AS$32]*[.$Z$5]*MAGNET([.AS$24]+[.$BB83])&#10;+[.AT$32]*[.$Z$5]*MAGNET([.AT$24]+[.$BB83])&#10;+[.AU$32]*[.$Z$5]*MAGNET([.AU$24]+[.$BB83])&#10;+[.AV$32]*[.$Z$5]*MAGNET([.AV$24]+[.$BB83])&#10;+[.AW$32]*[.$Z$5]*MAGNET([.AW$24]+[.$BB83])&#10;+[.AX$32]*[.$Z$5]*MAGNET([.AX$24]+[.$BB83])&#10;+[.AY$32]*[.$Z$5]*MAGNET([.AY$24]+[.$BB8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3]+0.002" office:value-type="float" office:value="0.138" calcext:value-type="float">
            <text:p>0.138</text:p>
          </table:table-cell>
          <table:table-cell table:formula="of:=[.BA84]*[.$D$6]" office:value-type="float" office:value="6.93663657912627" calcext:value-type="float">
            <text:p>6.937</text:p>
          </table:table-cell>
          <table:table-cell table:formula="of:=[.D$25]*[.$Z$5]*MAGNET([.D$24]+[.BB84])+[.E$25]*[.$Z$5]*MAGNET([.E$24]+[.BB84])+[.F$25]*[.$Z$5]*MAGNET([.F$24]+[.BB84])+[.G$25]*[.$Z$5]*MAGNET([.G$24]+[.BB84])+[.H$25]*[.$Z$5]*MAGNET([.H$24]+[.BB84])+[.I$25]*[.$Z$5]*MAGNET([.I$24]+[.BB84])+[.J$25]*[.$Z$5]*MAGNET([.J$24]+[.BB84])+[.K$25]*[.$Z$5]*MAGNET([.K$24]+[.BB84])+[.L$25]*[.$Z$5]*MAGNET([.L$24]+[.BB84])+[.M$25]*[.$Z$5]*MAGNET([.M$24]+[.BB84])+[.N$25]*[.$Z$5]*MAGNET([.N$24]+[.BB84])+[.O$25]*[.$Z$5]*MAGNET([.O$24]+[.BB84])+[.P$25]*[.$Z$5]*MAGNET([.P$24]+[.BB84])+[.Q$25]*[.$Z$5]*MAGNET([.Q$24]+[.BB84])+[.R$25]*[.$Z$5]*MAGNET([.R$24]+[.BB84])+[.S$25]*[.$Z$5]*MAGNET([.S$24]+[.BB84])+[.T$25]*[.$Z$5]*MAGNET([.T$24]+[.BB84])+[.U$25]*[.$Z$5]*MAGNET([.U$24]+[.BB84])+[.V$25]*[.$Z$5]*MAGNET([.V$24]+[.BB84])+[.W$25]*[.$Z$5]*MAGNET([.W$24]+[.BB84])+[.X$25]*[.$Z$5]*MAGNET([.X$24]+[.BB84])+[.Y$25]*[.$Z$5]*MAGNET([.Y$24]+[.BB84])+[.Z$25]*[.$Z$5]*MAGNET([.Z$24]+[.BB84])+[.AA$25]*[.$Z$5]*MAGNET([.AA$24]+[.BB84])+[.AB$25]*[.$Z$5]*MAGNET([.AB$24]+[.BB84])+[.AC$25]*[.$Z$5]*MAGNET([.AC$24]+[.BB84])+[.AD$25]*[.$Z$5]*MAGNET([.AD$24]+[.BB84])+[.AE$25]*[.$Z$5]*MAGNET([.AE$24]+[.BB84])+[.AF$25]*[.$Z$5]*MAGNET([.AF$24]+[.BB84])+[.AG$25]*[.$Z$5]*MAGNET([.AG$24]+[.BB84])+[.AH$25]*[.$Z$5]*MAGNET([.AH$24]+[.BB84]) +[.AI$25]*[.$Z$5]*MAGNET([.AI$24]+[.BB84]) +[.AJ$25]*[.$Z$5]*MAGNET([.AJ$24]+[.BB84]) +[.AK$25]*[.$Z$5]*MAGNET([.AK$24]+[.BB84]) +[.AL$25]*[.$Z$5]*MAGNET([.AL$24]+[.BB84]) +[.AM$25]*[.$Z$5]*MAGNET([.AM$24]+[.BB84]) +[.AN$25]*[.$Z$5]*MAGNET([.AN$24]+[.BB84]) +[.AO$25]*[.$Z$5]*MAGNET([.AO$24]+[.BB84])+RAND()*[.$BC$13]+[.AP$25]*[.$Z$5]*MAGNET([.AP$24]+[.BB84])&#10;+[.AQ$25]*[.$Z$5]*MAGNET([.AQ$24]+[.BB84])&#10;+[.AR$25]*[.$Z$5]*MAGNET([.AR$24]+[.BB84])&#10;+[.AS$25]*[.$Z$5]*MAGNET([.AS$24]+[.BB84])&#10;+[.AT$25]*[.$Z$5]*MAGNET([.AT$24]+[.BB84])&#10;+[.AU$25]*[.$Z$5]*MAGNET([.AU$24]+[.BB84])&#10;+[.AV$25]*[.$Z$5]*MAGNET([.AV$24]+[.BB84])&#10;+[.AW$25]*[.$Z$5]*MAGNET([.AW$24]+[.BB84])&#10;+[.AX$25]*[.$Z$5]*MAGNET([.AX$24]+[.BB84])&#10;+[.AY$25]*[.$Z$5]*MAGNET([.AY$24]+[.BB84])" office:value-type="float" office:value="30.2157899110843" calcext:value-type="float">
            <text:p>30.22</text:p>
          </table:table-cell>
          <table:table-cell table:style-name="ce70" table:formula="of:=[.E$26]*[.$Z$5]*MAGNET([.E$24]+[.$BB84])+[.F$26]*[.$Z$5]*MAGNET([.F$24]+[.$BB84])+[.G$26]*[.$Z$5]*MAGNET([.G$24]+[.$BB84])+[.H$26]*[.$Z$5]*MAGNET([.H$24]+[.$BB84])+[.I$26]*[.$Z$5]*MAGNET([.I$24]+[.$BB84])+[.J$26]*[.$Z$5]*MAGNET([.J$24]+[.$BB84])+[.K$26]*[.$Z$5]*MAGNET([.K$24]+[.$BB84])+[.L$26]*[.$Z$5]*MAGNET([.L$24]+[.$BB84])+[.M$26]*[.$Z$5]*MAGNET([.M$24]+[.$BB84])+[.N$26]*[.$Z$5]*MAGNET([.N$24]+[.$BB84])+[.O$26]*[.$Z$5]*MAGNET([.O$24]+[.$BB84])+[.P$26]*[.$Z$5]*MAGNET([.P$24]+[.$BB84])+[.Q$26]*[.$Z$5]*MAGNET([.Q$24]+[.$BB84])+[.R$26]*[.$Z$5]*MAGNET([.R$24]+[.$BB84])+[.S$26]*[.$Z$5]*MAGNET([.S$24]+[.$BB84])+[.T$26]*[.$Z$5]*MAGNET([.T$24]+[.$BB84])+[.U$26]*[.$Z$5]*MAGNET([.U$24]+[.$BB84])+[.V$26]*[.$Z$5]*MAGNET([.V$24]+[.$BB84])+[.W$26]*[.$Z$5]*MAGNET([.W$24]+[.$BB84])+[.X$26]*[.$Z$5]*MAGNET([.X$24]+[.$BB84])+[.Y$26]*[.$Z$5]*MAGNET([.Y$24]+[.$BB84])+[.Z$26]*[.$Z$5]*MAGNET([.Z$24]+[.$BB84])+[.AA$26]*[.$Z$5]*MAGNET([.AA$24]+[.$BB84])+[.AB$26]*[.$Z$5]*MAGNET([.AB$24]+[.$BB84])+[.AC$26]*[.$Z$5]*MAGNET([.AC$24]+[.$BB84])+[.AD$26]*[.$Z$5]*MAGNET([.AD$24]+[.$BB84])+[.AE$26]*[.$Z$5]*MAGNET([.AE$24]+[.$BB84])+[.AF$26]*[.$Z$5]*MAGNET([.AF$24]+[.$BB84])+[.AG$26]*[.$Z$5]*MAGNET([.AG$24]+[.$BB84])+[.D$26]*[.$Z$5]*MAGNET([.D$24]+[.$BB84])+[.AH$26]*[.$Z$5]*MAGNET([.AH$24]+[.BB84]) +[.AI$26]*[.$Z$5]*MAGNET([.AI$24]+[.BB84]) +[.AJ$26]*[.$Z$5]*MAGNET([.AJ$24]+[.BB84]) +[.AK$26]*[.$Z$5]*MAGNET([.AK$24]+[.BB84]) +[.AL$26]*[.$Z$5]*MAGNET([.AL$24]+[.BB84]) +[.AM$26]*[.$Z$5]*MAGNET([.AM$24]+[.BB84]) +[.AN$26]*[.$Z$5]*MAGNET([.AN$24]+[.BB84]) +[.AO$26]*[.$Z$5]*MAGNET([.AO$24]+[.BB84]) +[.AP$26]*[.$Z$5]*MAGNET([.AP$24]+[.$BB84])&#10;+[.AQ$26]*[.$Z$5]*MAGNET([.AQ$24]+[.$BB84])&#10;+[.AR$26]*[.$Z$5]*MAGNET([.AR$24]+[.$BB84])&#10;+[.AS$26]*[.$Z$5]*MAGNET([.AS$24]+[.$BB84])&#10;+[.AT$26]*[.$Z$5]*MAGNET([.AT$24]+[.$BB84])&#10;+[.AU$26]*[.$Z$5]*MAGNET([.AU$24]+[.$BB84])&#10;+[.AV$26]*[.$Z$5]*MAGNET([.AV$24]+[.$BB84])&#10;+[.AW$26]*[.$Z$5]*MAGNET([.AW$24]+[.$BB84])&#10;+[.AX$26]*[.$Z$5]*MAGNET([.AX$24]+[.$BB84])&#10;+[.AY$26]*[.$Z$5]*MAGNET([.AY$24]+[.$BB84]) +RAND()*[.$BD$13]" office:value-type="float" office:value="66.2805008952633" calcext:value-type="float">
            <text:p>66.28</text:p>
          </table:table-cell>
          <table:table-cell table:style-name="ce71" table:formula="of:=[.E$27]*[.$Z$5]*MAGNET([.E$24]+[.$BB84])+[.F$27]*[.$Z$5]*MAGNET([.F$24]+[.$BB84])+[.G$27]*[.$Z$5]*MAGNET([.G$24]+[.$BB84])+[.H$27]*[.$Z$5]*MAGNET([.H$24]+[.$BB84])+[.I$27]*[.$Z$5]*MAGNET([.I$24]+[.$BB84])+[.J$27]*[.$Z$5]*MAGNET([.J$24]+[.$BB84])+[.K$27]*[.$Z$5]*MAGNET([.K$24]+[.$BB84])+[.L$27]*[.$Z$5]*MAGNET([.L$24]+[.$BB84])+[.M$27]*[.$Z$5]*MAGNET([.M$24]+[.$BB84])+[.N$27]*[.$Z$5]*MAGNET([.N$24]+[.$BB84])+[.O$27]*[.$Z$5]*MAGNET([.O$24]+[.$BB84])+[.P$27]*[.$Z$5]*MAGNET([.P$24]+[.$BB84])+[.Q$27]*[.$Z$5]*MAGNET([.Q$24]+[.$BB84])+[.R$27]*[.$Z$5]*MAGNET([.R$24]+[.$BB84])+[.S$27]*[.$Z$5]*MAGNET([.S$24]+[.$BB84])+[.T$27]*[.$Z$5]*MAGNET([.T$24]+[.$BB84])+[.U$27]*[.$Z$5]*MAGNET([.U$24]+[.$BB84])+[.V$27]*[.$Z$5]*MAGNET([.V$24]+[.$BB84])+[.W$27]*[.$Z$5]*MAGNET([.W$24]+[.$BB84])+[.X$27]*[.$Z$5]*MAGNET([.X$24]+[.$BB84])+[.Y$27]*[.$Z$5]*MAGNET([.Y$24]+[.$BB84])+[.Z$27]*[.$Z$5]*MAGNET([.Z$24]+[.$BB84])+[.AA$27]*[.$Z$5]*MAGNET([.AA$24]+[.$BB84])+[.AB$27]*[.$Z$5]*MAGNET([.AB$24]+[.$BB84])+[.AC$27]*[.$Z$5]*MAGNET([.AC$24]+[.$BB84])+[.AD$27]*[.$Z$5]*MAGNET([.AD$24]+[.$BB84])+[.AE$27]*[.$Z$5]*MAGNET([.AE$24]+[.$BB84])+[.AF$27]*[.$Z$5]*MAGNET([.AF$24]+[.$BB84])+[.AG$27]*[.$Z$5]*MAGNET([.AG$24]+[.$BB84])+[.D$27]*[.$Z$5]*MAGNET([.D$24]+[.$BB84])+[.AH$27]*[.$Z$5]*MAGNET([.AH$24]+[.BB84]) +[.AI$27]*[.$Z$5]*MAGNET([.AI$24]+[.BB84]) +[.AJ$27]*[.$Z$5]*MAGNET([.AJ$24]+[.BB84]) +[.AK$27]*[.$Z$5]*MAGNET([.AK$24]+[.BB84]) +[.AL$27]*[.$Z$5]*MAGNET([.AL$24]+[.BB84]) +[.AM$27]*[.$Z$5]*MAGNET([.AM$24]+[.BB84]) +[.AN$27]*[.$Z$5]*MAGNET([.AN$24]+[.BB84]) +[.AO$27]*[.$Z$5]*MAGNET([.AO$24]+[.BB84]) +[.AP$27]*[.$Z$5]*MAGNET([.AP$24]+[.$BB84])&#10;+[.AQ$27]*[.$Z$5]*MAGNET([.AQ$24]+[.$BB84])&#10;+[.AR$27]*[.$Z$5]*MAGNET([.AR$24]+[.$BB84])&#10;+[.AS$27]*[.$Z$5]*MAGNET([.AS$24]+[.$BB84])&#10;+[.AT$27]*[.$Z$5]*MAGNET([.AT$24]+[.$BB84])&#10;+[.AU$27]*[.$Z$5]*MAGNET([.AU$24]+[.$BB84])&#10;+[.AV$27]*[.$Z$5]*MAGNET([.AV$24]+[.$BB84])&#10;+[.AW$27]*[.$Z$5]*MAGNET([.AW$24]+[.$BB84])&#10;+[.AX$27]*[.$Z$5]*MAGNET([.AX$24]+[.$BB84])&#10;+[.AY$27]*[.$Z$5]*MAGNET([.AY$24]+[.$BB84]) +RAND()*[.$BE$13]" office:value-type="float" office:value="-111.395893878354" calcext:value-type="float">
            <text:p>-111.395893878354</text:p>
          </table:table-cell>
          <table:table-cell table:style-name="ce71" table:formula="of:=[.E$28]*[.$Z$5]*MAGNET([.E$24]+[.$BB84])+[.F$28]*[.$Z$5]*MAGNET([.F$24]+[.$BB84])+[.G$28]*[.$Z$5]*MAGNET([.G$24]+[.$BB84])+[.H$28]*[.$Z$5]*MAGNET([.H$24]+[.$BB84])+[.I$28]*[.$Z$5]*MAGNET([.I$24]+[.$BB84])+[.J$28]*[.$Z$5]*MAGNET([.J$24]+[.$BB84])+[.K$28]*[.$Z$5]*MAGNET([.K$24]+[.$BB84])+[.L$28]*[.$Z$5]*MAGNET([.L$24]+[.$BB84])+[.M$28]*[.$Z$5]*MAGNET([.M$24]+[.$BB84])+[.N$28]*[.$Z$5]*MAGNET([.N$24]+[.$BB84])+[.O$28]*[.$Z$5]*MAGNET([.O$24]+[.$BB84])+[.P$28]*[.$Z$5]*MAGNET([.P$24]+[.$BB84])+[.Q$28]*[.$Z$5]*MAGNET([.Q$24]+[.$BB84])+[.R$28]*[.$Z$5]*MAGNET([.R$24]+[.$BB84])+[.S$28]*[.$Z$5]*MAGNET([.S$24]+[.$BB84])+[.T$28]*[.$Z$5]*MAGNET([.T$24]+[.$BB84])+[.U$28]*[.$Z$5]*MAGNET([.U$24]+[.$BB84])+[.V$28]*[.$Z$5]*MAGNET([.V$24]+[.$BB84])+[.W$28]*[.$Z$5]*MAGNET([.W$24]+[.$BB84])+[.X$28]*[.$Z$5]*MAGNET([.X$24]+[.$BB84])+[.Y$28]*[.$Z$5]*MAGNET([.Y$24]+[.$BB84])+[.Z$28]*[.$Z$5]*MAGNET([.Z$24]+[.$BB84])+[.AA$28]*[.$Z$5]*MAGNET([.AA$24]+[.$BB84])+[.AB$28]*[.$Z$5]*MAGNET([.AB$24]+[.$BB84])+[.AC$28]*[.$Z$5]*MAGNET([.AC$24]+[.$BB84])+[.AD$28]*[.$Z$5]*MAGNET([.AD$24]+[.$BB84])+[.AE$28]*[.$Z$5]*MAGNET([.AE$24]+[.$BB84])+[.AF$28]*[.$Z$5]*MAGNET([.AF$24]+[.$BB84])+[.AG$28]*[.$Z$5]*MAGNET([.AG$24]+[.$BB84])+[.D$28]*[.$Z$5]*MAGNET([.D$24]+[.$BB84])+[.AH$28]*[.$Z$5]*MAGNET([.AH$24]+[.BB84]) +[.AI$28]*[.$Z$5]*MAGNET([.AI$24]+[.BB84]) +[.AJ$28]*[.$Z$5]*MAGNET([.AJ$24]+[.BB84]) +[.AK$28]*[.$Z$5]*MAGNET([.AK$24]+[.BB84]) +[.AL$28]*[.$Z$5]*MAGNET([.AL$24]+[.BB84]) +[.AM$28]*[.$Z$5]*MAGNET([.AM$24]+[.BB84]) +[.AN$28]*[.$Z$5]*MAGNET([.AN$24]+[.BB84]) +[.AO$28]*[.$Z$5]*MAGNET([.AO$24]+[.BB84]) +[.AP$28]*[.$Z$5]*MAGNET([.AP$24]+[.$BB84])&#10;+[.AQ$28]*[.$Z$5]*MAGNET([.AQ$24]+[.$BB84])&#10;+[.AR$28]*[.$Z$5]*MAGNET([.AR$24]+[.$BB84])&#10;+[.AS$28]*[.$Z$5]*MAGNET([.AS$24]+[.$BB84])&#10;+[.AT$28]*[.$Z$5]*MAGNET([.AT$24]+[.$BB84])&#10;+[.AU$28]*[.$Z$5]*MAGNET([.AU$24]+[.$BB84])&#10;+[.AV$28]*[.$Z$5]*MAGNET([.AV$24]+[.$BB84])&#10;+[.AW$28]*[.$Z$5]*MAGNET([.AW$24]+[.$BB84])&#10;+[.AX$28]*[.$Z$5]*MAGNET([.AX$24]+[.$BB84])&#10;+[.AY$28]*[.$Z$5]*MAGNET([.AY$24]+[.$BB84]) +RAND()*[.$BF$13]" office:value-type="float" office:value="-16.1332370156808" calcext:value-type="float">
            <text:p>-16.1332370156808</text:p>
          </table:table-cell>
          <table:table-cell table:style-name="ce71" table:formula="of:=[.E$29]*[.$Z$5]*MAGNET([.E$24]+[.$BB84])+[.F$29]*[.$Z$5]*MAGNET([.F$24]+[.$BB84])+[.G$29]*[.$Z$5]*MAGNET([.G$24]+[.$BB84])+[.H$29]*[.$Z$5]*MAGNET([.H$24]+[.$BB84])+[.I$29]*[.$Z$5]*MAGNET([.I$24]+[.$BB84])+[.J$29]*[.$Z$5]*MAGNET([.J$24]+[.$BB84])+[.K$29]*[.$Z$5]*MAGNET([.K$24]+[.$BB84])+[.L$29]*[.$Z$5]*MAGNET([.L$24]+[.$BB84])+[.M$29]*[.$Z$5]*MAGNET([.M$24]+[.$BB84])+[.N$29]*[.$Z$5]*MAGNET([.N$24]+[.$BB84])+[.O$29]*[.$Z$5]*MAGNET([.O$24]+[.$BB84])+[.P$29]*[.$Z$5]*MAGNET([.P$24]+[.$BB84])+[.Q$29]*[.$Z$5]*MAGNET([.Q$24]+[.$BB84])+[.R$29]*[.$Z$5]*MAGNET([.R$24]+[.$BB84])+[.S$29]*[.$Z$5]*MAGNET([.S$24]+[.$BB84])+[.T$29]*[.$Z$5]*MAGNET([.T$24]+[.$BB84])+[.U$29]*[.$Z$5]*MAGNET([.U$24]+[.$BB84])+[.V$29]*[.$Z$5]*MAGNET([.V$24]+[.$BB84])+[.W$29]*[.$Z$5]*MAGNET([.W$24]+[.$BB84])+[.X$29]*[.$Z$5]*MAGNET([.X$24]+[.$BB84])+[.Y$29]*[.$Z$5]*MAGNET([.Y$24]+[.$BB84])+[.Z$29]*[.$Z$5]*MAGNET([.Z$24]+[.$BB84])+[.AA$29]*[.$Z$5]*MAGNET([.AA$24]+[.$BB84])+[.AB$29]*[.$Z$5]*MAGNET([.AB$24]+[.$BB84])+[.AC$29]*[.$Z$5]*MAGNET([.AC$24]+[.$BB84])+[.AD$29]*[.$Z$5]*MAGNET([.AD$24]+[.$BB84])+[.AE$29]*[.$Z$5]*MAGNET([.AE$24]+[.$BB84])+[.AF$29]*[.$Z$5]*MAGNET([.AF$24]+[.$BB84])+[.AG$29]*[.$Z$5]*MAGNET([.AG$24]+[.$BB84])+[.D$29]*[.$Z$5]*MAGNET([.D$24]+[.$BB84])+[.AH$29]*[.$Z$5]*MAGNET([.AH$24]+[.BB84]) +[.AI$29]*[.$Z$5]*MAGNET([.AI$24]+[.BB84]) +[.AJ$29]*[.$Z$5]*MAGNET([.AJ$24]+[.BB84]) +[.AK$29]*[.$Z$5]*MAGNET([.AK$24]+[.BB84]) +[.AL$29]*[.$Z$5]*MAGNET([.AL$24]+[.BB84]) +[.AM$29]*[.$Z$5]*MAGNET([.AM$24]+[.BB84]) +[.AN$29]*[.$Z$5]*MAGNET([.AN$24]+[.BB84]) +[.AO$29]*[.$Z$5]*MAGNET([.AO$24]+[.BB84]) +[.AP$29]*[.$Z$5]*MAGNET([.AP$24]+[.$BB84])&#10;+[.AQ$29]*[.$Z$5]*MAGNET([.AQ$24]+[.$BB84])&#10;+[.AR$29]*[.$Z$5]*MAGNET([.AR$24]+[.$BB84])&#10;+[.AS$29]*[.$Z$5]*MAGNET([.AS$24]+[.$BB84])&#10;+[.AT$29]*[.$Z$5]*MAGNET([.AT$24]+[.$BB84])&#10;+[.AU$29]*[.$Z$5]*MAGNET([.AU$24]+[.$BB84])&#10;+[.AV$29]*[.$Z$5]*MAGNET([.AV$24]+[.$BB84])&#10;+[.AW$29]*[.$Z$5]*MAGNET([.AW$24]+[.$BB84])&#10;+[.AX$29]*[.$Z$5]*MAGNET([.AX$24]+[.$BB84])&#10;+[.AY$29]*[.$Z$5]*MAGNET([.AY$24]+[.$BB84]) +RAND()*[.$BG$13]" office:value-type="float" office:value="46.3565592390973" calcext:value-type="float">
            <text:p>46.3565592390973</text:p>
          </table:table-cell>
          <table:table-cell table:style-name="ce71" table:formula="of:=[.E$30]*[.$Z$5]*MAGNET([.E$24]+[.$BB84])+[.F$30]*[.$Z$5]*MAGNET([.F$24]+[.$BB84])+[.G$30]*[.$Z$5]*MAGNET([.G$24]+[.$BB84])+[.H$30]*[.$Z$5]*MAGNET([.H$24]+[.$BB84])+[.I$30]*[.$Z$5]*MAGNET([.I$24]+[.$BB84])+[.J$30]*[.$Z$5]*MAGNET([.J$24]+[.$BB84])+[.K$30]*[.$Z$5]*MAGNET([.K$24]+[.$BB84])+[.L$30]*[.$Z$5]*MAGNET([.L$24]+[.$BB84])+[.M$30]*[.$Z$5]*MAGNET([.M$24]+[.$BB84])+[.N$30]*[.$Z$5]*MAGNET([.N$24]+[.$BB84])+[.O$30]*[.$Z$5]*MAGNET([.O$24]+[.$BB84])+[.P$30]*[.$Z$5]*MAGNET([.P$24]+[.$BB84])+[.Q$30]*[.$Z$5]*MAGNET([.Q$24]+[.$BB84])+[.R$30]*[.$Z$5]*MAGNET([.R$24]+[.$BB84])+[.S$30]*[.$Z$5]*MAGNET([.S$24]+[.$BB84])+[.T$30]*[.$Z$5]*MAGNET([.T$24]+[.$BB84])+[.U$30]*[.$Z$5]*MAGNET([.U$24]+[.$BB84])+[.V$30]*[.$Z$5]*MAGNET([.V$24]+[.$BB84])+[.W$30]*[.$Z$5]*MAGNET([.W$24]+[.$BB84])+[.X$30]*[.$Z$5]*MAGNET([.X$24]+[.$BB84])+[.Y$30]*[.$Z$5]*MAGNET([.Y$24]+[.$BB84])+[.Z$30]*[.$Z$5]*MAGNET([.Z$24]+[.$BB84])+[.AA$30]*[.$Z$5]*MAGNET([.AA$24]+[.$BB84])+[.AB$30]*[.$Z$5]*MAGNET([.AB$24]+[.$BB84])+[.AC$30]*[.$Z$5]*MAGNET([.AC$24]+[.$BB84])+[.AD$30]*[.$Z$5]*MAGNET([.AD$24]+[.$BB84])+[.AE$30]*[.$Z$5]*MAGNET([.AE$24]+[.$BB84])+[.AF$30]*[.$Z$5]*MAGNET([.AF$24]+[.$BB84])+[.AG$30]*[.$Z$5]*MAGNET([.AG$24]+[.$BB84])+[.D$30]*[.$Z$5]*MAGNET([.D$24]+[.$BB84])+[.AH$30]*[.$Z$5]*MAGNET([.AH$24]+[.BB84]) +[.AI$30]*[.$Z$5]*MAGNET([.AI$24]+[.BB84]) +[.AJ$30]*[.$Z$5]*MAGNET([.AJ$24]+[.BB84]) +[.AK$30]*[.$Z$5]*MAGNET([.AK$24]+[.BB84]) +[.AL$30]*[.$Z$5]*MAGNET([.AL$24]+[.BB84]) +[.AM$30]*[.$Z$5]*MAGNET([.AM$24]+[.BB84]) +[.AN$30]*[.$Z$5]*MAGNET([.AN$24]+[.BB84]) +[.AO$30]*[.$Z$5]*MAGNET([.AO$24]+[.BB84]) +[.AP$30]*[.$Z$5]*MAGNET([.AP$24]+[.$BB84])&#10;+[.AQ$30]*[.$Z$5]*MAGNET([.AQ$24]+[.$BB84])&#10;+[.AR$30]*[.$Z$5]*MAGNET([.AR$24]+[.$BB84])&#10;+[.AS$30]*[.$Z$5]*MAGNET([.AS$24]+[.$BB84])&#10;+[.AT$30]*[.$Z$5]*MAGNET([.AT$24]+[.$BB84])&#10;+[.AU$30]*[.$Z$5]*MAGNET([.AU$24]+[.$BB84])&#10;+[.AV$30]*[.$Z$5]*MAGNET([.AV$24]+[.$BB84])&#10;+[.AW$30]*[.$Z$5]*MAGNET([.AW$24]+[.$BB84])&#10;+[.AX$30]*[.$Z$5]*MAGNET([.AX$24]+[.$BB84])&#10;+[.AY$30]*[.$Z$5]*MAGNET([.AY$24]+[.$BB84]) +RAND()*[.$BH$13]" office:value-type="float" office:value="0" calcext:value-type="float">
            <text:p>0</text:p>
          </table:table-cell>
          <table:table-cell table:style-name="ce71" table:formula="of:=[.E$31]*[.$Z$5]*MAGNET([.E$24]+[.$BB84])+[.F$31]*[.$Z$5]*MAGNET([.F$24]+[.$BB84])+[.G$31]*[.$Z$5]*MAGNET([.G$24]+[.$BB84])+[.H$31]*[.$Z$5]*MAGNET([.H$24]+[.$BB84])+[.I$31]*[.$Z$5]*MAGNET([.I$24]+[.$BB84])+[.J$31]*[.$Z$5]*MAGNET([.J$24]+[.$BB84])+[.K$31]*[.$Z$5]*MAGNET([.K$24]+[.$BB84])+[.L$31]*[.$Z$5]*MAGNET([.L$24]+[.$BB84])+[.M$31]*[.$Z$5]*MAGNET([.M$24]+[.$BB84])+[.N$31]*[.$Z$5]*MAGNET([.N$24]+[.$BB84])+[.O$31]*[.$Z$5]*MAGNET([.O$24]+[.$BB84])+[.P$31]*[.$Z$5]*MAGNET([.P$24]+[.$BB84])+[.Q$31]*[.$Z$5]*MAGNET([.Q$24]+[.$BB84])+[.R$31]*[.$Z$5]*MAGNET([.R$24]+[.$BB84])+[.S$31]*[.$Z$5]*MAGNET([.S$24]+[.$BB84])+[.T$31]*[.$Z$5]*MAGNET([.T$24]+[.$BB84])+[.U$31]*[.$Z$5]*MAGNET([.U$24]+[.$BB84])+[.V$31]*[.$Z$5]*MAGNET([.V$24]+[.$BB84])+[.W$31]*[.$Z$5]*MAGNET([.W$24]+[.$BB84])+[.X$31]*[.$Z$5]*MAGNET([.X$24]+[.$BB84])+[.Y$31]*[.$Z$5]*MAGNET([.Y$24]+[.$BB84])+[.Z$31]*[.$Z$5]*MAGNET([.Z$24]+[.$BB84])+[.AA$31]*[.$Z$5]*MAGNET([.AA$24]+[.$BB84])+[.AB$31]*[.$Z$5]*MAGNET([.AB$24]+[.$BB84])+[.AC$31]*[.$Z$5]*MAGNET([.AC$24]+[.$BB84])+[.AD$31]*[.$Z$5]*MAGNET([.AD$24]+[.$BB84])+[.AE$31]*[.$Z$5]*MAGNET([.AE$24]+[.$BB84])+[.AF$31]*[.$Z$5]*MAGNET([.AF$24]+[.$BB84])+[.AG$31]*[.$Z$5]*MAGNET([.AG$24]+[.$BB84])+[.D$31]*[.$Z$5]*MAGNET([.D$24]+[.$BB84])+[.AH$31]*[.$Z$5]*MAGNET([.AH$24]+[.BB84]) +[.AI$31]*[.$Z$5]*MAGNET([.AI$24]+[.BB84]) +[.AJ$31]*[.$Z$5]*MAGNET([.AJ$24]+[.BB84]) +[.AK$31]*[.$Z$5]*MAGNET([.AK$24]+[.BB84]) +[.AL$31]*[.$Z$5]*MAGNET([.AL$24]+[.BB84]) +[.AM$31]*[.$Z$5]*MAGNET([.AM$24]+[.BB84]) +[.AN$31]*[.$Z$5]*MAGNET([.AN$24]+[.BB84]) +[.AO$31]*[.$Z$5]*MAGNET([.AO$24]+[.BB84]) +[.AP$31]*[.$Z$5]*MAGNET([.AP$24]+[.$BB84])&#10;+[.AQ$31]*[.$Z$5]*MAGNET([.AQ$24]+[.$BB84])&#10;+[.AR$31]*[.$Z$5]*MAGNET([.AR$24]+[.$BB84])&#10;+[.AS$31]*[.$Z$5]*MAGNET([.AS$24]+[.$BB84])&#10;+[.AT$31]*[.$Z$5]*MAGNET([.AT$24]+[.$BB84])&#10;+[.AU$31]*[.$Z$5]*MAGNET([.AU$24]+[.$BB84])&#10;+[.AV$31]*[.$Z$5]*MAGNET([.AV$24]+[.$BB84])&#10;+[.AW$31]*[.$Z$5]*MAGNET([.AW$24]+[.$BB84])&#10;+[.AX$31]*[.$Z$5]*MAGNET([.AX$24]+[.$BB84])&#10;+[.AY$31]*[.$Z$5]*MAGNET([.AY$24]+[.$BB84]) +RAND()*[.$BI$13]" office:value-type="float" office:value="0" calcext:value-type="float">
            <text:p>0</text:p>
          </table:table-cell>
          <table:table-cell table:style-name="ce71" table:formula="of:=[.E$32]*[.$Z$5]*MAGNET([.E$24]+[.$BB84])+[.F$32]*[.$Z$5]*MAGNET([.F$24]+[.$BB84])+[.G$32]*[.$Z$5]*MAGNET([.G$24]+[.$BB84])+[.H$32]*[.$Z$5]*MAGNET([.H$24]+[.$BB84])+[.I$32]*[.$Z$5]*MAGNET([.I$24]+[.$BB84])+[.J$32]*[.$Z$5]*MAGNET([.J$24]+[.$BB84])+[.K$32]*[.$Z$5]*MAGNET([.K$24]+[.$BB84])+[.L$32]*[.$Z$5]*MAGNET([.L$24]+[.$BB84])+[.M$32]*[.$Z$5]*MAGNET([.M$24]+[.$BB84])+[.N$32]*[.$Z$5]*MAGNET([.N$24]+[.$BB84])+[.O$32]*[.$Z$5]*MAGNET([.O$24]+[.$BB84])+[.P$32]*[.$Z$5]*MAGNET([.P$24]+[.$BB84])+[.Q$32]*[.$Z$5]*MAGNET([.Q$24]+[.$BB84])+[.R$32]*[.$Z$5]*MAGNET([.R$24]+[.$BB84])+[.S$32]*[.$Z$5]*MAGNET([.S$24]+[.$BB84])+[.T$32]*[.$Z$5]*MAGNET([.T$24]+[.$BB84])+[.U$32]*[.$Z$5]*MAGNET([.U$24]+[.$BB84])+[.V$32]*[.$Z$5]*MAGNET([.V$24]+[.$BB84])+[.W$32]*[.$Z$5]*MAGNET([.W$24]+[.$BB84])+[.X$32]*[.$Z$5]*MAGNET([.X$24]+[.$BB84])+[.Y$32]*[.$Z$5]*MAGNET([.Y$24]+[.$BB84])+[.Z$32]*[.$Z$5]*MAGNET([.Z$24]+[.$BB84])+[.AA$32]*[.$Z$5]*MAGNET([.AA$24]+[.$BB84])+[.AB$32]*[.$Z$5]*MAGNET([.AB$24]+[.$BB84])+[.AC$32]*[.$Z$5]*MAGNET([.AC$24]+[.$BB84])+[.AD$32]*[.$Z$5]*MAGNET([.AD$24]+[.$BB84])+[.AE$32]*[.$Z$5]*MAGNET([.AE$24]+[.$BB84])+[.AF$32]*[.$Z$5]*MAGNET([.AF$24]+[.$BB84])+[.AG$32]*[.$Z$5]*MAGNET([.AG$24]+[.$BB84])+[.D$32]*[.$Z$5]*MAGNET([.D$24]+[.$BB84])+[.AH$32]*[.$Z$5]*MAGNET([.AH$24]+[.BB84]) +[.AI$32]*[.$Z$5]*MAGNET([.AI$24]+[.BB84]) +[.AJ$32]*[.$Z$5]*MAGNET([.AJ$24]+[.BB84]) +[.AK$32]*[.$Z$5]*MAGNET([.AK$24]+[.BB84]) +[.AL$32]*[.$Z$5]*MAGNET([.AL$24]+[.BB84]) +[.AM$32]*[.$Z$5]*MAGNET([.AM$24]+[.BB84]) +[.AN$32]*[.$Z$5]*MAGNET([.AN$24]+[.BB84]) +[.AO$32]*[.$Z$5]*MAGNET([.AO$24]+[.BB84]) +[.AP$32]*[.$Z$5]*MAGNET([.AP$24]+[.$BB84])&#10;+[.AQ$32]*[.$Z$5]*MAGNET([.AQ$24]+[.$BB84])&#10;+[.AR$32]*[.$Z$5]*MAGNET([.AR$24]+[.$BB84])&#10;+[.AS$32]*[.$Z$5]*MAGNET([.AS$24]+[.$BB84])&#10;+[.AT$32]*[.$Z$5]*MAGNET([.AT$24]+[.$BB84])&#10;+[.AU$32]*[.$Z$5]*MAGNET([.AU$24]+[.$BB84])&#10;+[.AV$32]*[.$Z$5]*MAGNET([.AV$24]+[.$BB84])&#10;+[.AW$32]*[.$Z$5]*MAGNET([.AW$24]+[.$BB84])&#10;+[.AX$32]*[.$Z$5]*MAGNET([.AX$24]+[.$BB84])&#10;+[.AY$32]*[.$Z$5]*MAGNET([.AY$24]+[.$BB8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4]+0.002" office:value-type="float" office:value="0.14" calcext:value-type="float">
            <text:p>0.14</text:p>
          </table:table-cell>
          <table:table-cell table:formula="of:=[.BA85]*[.$D$6]" office:value-type="float" office:value="7.03716754404114" calcext:value-type="float">
            <text:p>7.037</text:p>
          </table:table-cell>
          <table:table-cell table:formula="of:=[.D$25]*[.$Z$5]*MAGNET([.D$24]+[.BB85])+[.E$25]*[.$Z$5]*MAGNET([.E$24]+[.BB85])+[.F$25]*[.$Z$5]*MAGNET([.F$24]+[.BB85])+[.G$25]*[.$Z$5]*MAGNET([.G$24]+[.BB85])+[.H$25]*[.$Z$5]*MAGNET([.H$24]+[.BB85])+[.I$25]*[.$Z$5]*MAGNET([.I$24]+[.BB85])+[.J$25]*[.$Z$5]*MAGNET([.J$24]+[.BB85])+[.K$25]*[.$Z$5]*MAGNET([.K$24]+[.BB85])+[.L$25]*[.$Z$5]*MAGNET([.L$24]+[.BB85])+[.M$25]*[.$Z$5]*MAGNET([.M$24]+[.BB85])+[.N$25]*[.$Z$5]*MAGNET([.N$24]+[.BB85])+[.O$25]*[.$Z$5]*MAGNET([.O$24]+[.BB85])+[.P$25]*[.$Z$5]*MAGNET([.P$24]+[.BB85])+[.Q$25]*[.$Z$5]*MAGNET([.Q$24]+[.BB85])+[.R$25]*[.$Z$5]*MAGNET([.R$24]+[.BB85])+[.S$25]*[.$Z$5]*MAGNET([.S$24]+[.BB85])+[.T$25]*[.$Z$5]*MAGNET([.T$24]+[.BB85])+[.U$25]*[.$Z$5]*MAGNET([.U$24]+[.BB85])+[.V$25]*[.$Z$5]*MAGNET([.V$24]+[.BB85])+[.W$25]*[.$Z$5]*MAGNET([.W$24]+[.BB85])+[.X$25]*[.$Z$5]*MAGNET([.X$24]+[.BB85])+[.Y$25]*[.$Z$5]*MAGNET([.Y$24]+[.BB85])+[.Z$25]*[.$Z$5]*MAGNET([.Z$24]+[.BB85])+[.AA$25]*[.$Z$5]*MAGNET([.AA$24]+[.BB85])+[.AB$25]*[.$Z$5]*MAGNET([.AB$24]+[.BB85])+[.AC$25]*[.$Z$5]*MAGNET([.AC$24]+[.BB85])+[.AD$25]*[.$Z$5]*MAGNET([.AD$24]+[.BB85])+[.AE$25]*[.$Z$5]*MAGNET([.AE$24]+[.BB85])+[.AF$25]*[.$Z$5]*MAGNET([.AF$24]+[.BB85])+[.AG$25]*[.$Z$5]*MAGNET([.AG$24]+[.BB85])+[.AH$25]*[.$Z$5]*MAGNET([.AH$24]+[.BB85]) +[.AI$25]*[.$Z$5]*MAGNET([.AI$24]+[.BB85]) +[.AJ$25]*[.$Z$5]*MAGNET([.AJ$24]+[.BB85]) +[.AK$25]*[.$Z$5]*MAGNET([.AK$24]+[.BB85]) +[.AL$25]*[.$Z$5]*MAGNET([.AL$24]+[.BB85]) +[.AM$25]*[.$Z$5]*MAGNET([.AM$24]+[.BB85]) +[.AN$25]*[.$Z$5]*MAGNET([.AN$24]+[.BB85]) +[.AO$25]*[.$Z$5]*MAGNET([.AO$24]+[.BB85])+RAND()*[.$BC$13]+[.AP$25]*[.$Z$5]*MAGNET([.AP$24]+[.BB85])&#10;+[.AQ$25]*[.$Z$5]*MAGNET([.AQ$24]+[.BB85])&#10;+[.AR$25]*[.$Z$5]*MAGNET([.AR$24]+[.BB85])&#10;+[.AS$25]*[.$Z$5]*MAGNET([.AS$24]+[.BB85])&#10;+[.AT$25]*[.$Z$5]*MAGNET([.AT$24]+[.BB85])&#10;+[.AU$25]*[.$Z$5]*MAGNET([.AU$24]+[.BB85])&#10;+[.AV$25]*[.$Z$5]*MAGNET([.AV$24]+[.BB85])&#10;+[.AW$25]*[.$Z$5]*MAGNET([.AW$24]+[.BB85])&#10;+[.AX$25]*[.$Z$5]*MAGNET([.AX$24]+[.BB85])&#10;+[.AY$25]*[.$Z$5]*MAGNET([.AY$24]+[.BB85])" office:value-type="float" office:value="40.8055622806832" calcext:value-type="float">
            <text:p>40.81</text:p>
          </table:table-cell>
          <table:table-cell table:style-name="ce70" table:formula="of:=[.E$26]*[.$Z$5]*MAGNET([.E$24]+[.$BB85])+[.F$26]*[.$Z$5]*MAGNET([.F$24]+[.$BB85])+[.G$26]*[.$Z$5]*MAGNET([.G$24]+[.$BB85])+[.H$26]*[.$Z$5]*MAGNET([.H$24]+[.$BB85])+[.I$26]*[.$Z$5]*MAGNET([.I$24]+[.$BB85])+[.J$26]*[.$Z$5]*MAGNET([.J$24]+[.$BB85])+[.K$26]*[.$Z$5]*MAGNET([.K$24]+[.$BB85])+[.L$26]*[.$Z$5]*MAGNET([.L$24]+[.$BB85])+[.M$26]*[.$Z$5]*MAGNET([.M$24]+[.$BB85])+[.N$26]*[.$Z$5]*MAGNET([.N$24]+[.$BB85])+[.O$26]*[.$Z$5]*MAGNET([.O$24]+[.$BB85])+[.P$26]*[.$Z$5]*MAGNET([.P$24]+[.$BB85])+[.Q$26]*[.$Z$5]*MAGNET([.Q$24]+[.$BB85])+[.R$26]*[.$Z$5]*MAGNET([.R$24]+[.$BB85])+[.S$26]*[.$Z$5]*MAGNET([.S$24]+[.$BB85])+[.T$26]*[.$Z$5]*MAGNET([.T$24]+[.$BB85])+[.U$26]*[.$Z$5]*MAGNET([.U$24]+[.$BB85])+[.V$26]*[.$Z$5]*MAGNET([.V$24]+[.$BB85])+[.W$26]*[.$Z$5]*MAGNET([.W$24]+[.$BB85])+[.X$26]*[.$Z$5]*MAGNET([.X$24]+[.$BB85])+[.Y$26]*[.$Z$5]*MAGNET([.Y$24]+[.$BB85])+[.Z$26]*[.$Z$5]*MAGNET([.Z$24]+[.$BB85])+[.AA$26]*[.$Z$5]*MAGNET([.AA$24]+[.$BB85])+[.AB$26]*[.$Z$5]*MAGNET([.AB$24]+[.$BB85])+[.AC$26]*[.$Z$5]*MAGNET([.AC$24]+[.$BB85])+[.AD$26]*[.$Z$5]*MAGNET([.AD$24]+[.$BB85])+[.AE$26]*[.$Z$5]*MAGNET([.AE$24]+[.$BB85])+[.AF$26]*[.$Z$5]*MAGNET([.AF$24]+[.$BB85])+[.AG$26]*[.$Z$5]*MAGNET([.AG$24]+[.$BB85])+[.D$26]*[.$Z$5]*MAGNET([.D$24]+[.$BB85])+[.AH$26]*[.$Z$5]*MAGNET([.AH$24]+[.BB85]) +[.AI$26]*[.$Z$5]*MAGNET([.AI$24]+[.BB85]) +[.AJ$26]*[.$Z$5]*MAGNET([.AJ$24]+[.BB85]) +[.AK$26]*[.$Z$5]*MAGNET([.AK$24]+[.BB85]) +[.AL$26]*[.$Z$5]*MAGNET([.AL$24]+[.BB85]) +[.AM$26]*[.$Z$5]*MAGNET([.AM$24]+[.BB85]) +[.AN$26]*[.$Z$5]*MAGNET([.AN$24]+[.BB85]) +[.AO$26]*[.$Z$5]*MAGNET([.AO$24]+[.BB85]) +[.AP$26]*[.$Z$5]*MAGNET([.AP$24]+[.$BB85])&#10;+[.AQ$26]*[.$Z$5]*MAGNET([.AQ$24]+[.$BB85])&#10;+[.AR$26]*[.$Z$5]*MAGNET([.AR$24]+[.$BB85])&#10;+[.AS$26]*[.$Z$5]*MAGNET([.AS$24]+[.$BB85])&#10;+[.AT$26]*[.$Z$5]*MAGNET([.AT$24]+[.$BB85])&#10;+[.AU$26]*[.$Z$5]*MAGNET([.AU$24]+[.$BB85])&#10;+[.AV$26]*[.$Z$5]*MAGNET([.AV$24]+[.$BB85])&#10;+[.AW$26]*[.$Z$5]*MAGNET([.AW$24]+[.$BB85])&#10;+[.AX$26]*[.$Z$5]*MAGNET([.AX$24]+[.$BB85])&#10;+[.AY$26]*[.$Z$5]*MAGNET([.AY$24]+[.$BB85]) +RAND()*[.$BD$13]" office:value-type="float" office:value="57.4339218660054" calcext:value-type="float">
            <text:p>57.43</text:p>
          </table:table-cell>
          <table:table-cell table:style-name="ce71" table:formula="of:=[.E$27]*[.$Z$5]*MAGNET([.E$24]+[.$BB85])+[.F$27]*[.$Z$5]*MAGNET([.F$24]+[.$BB85])+[.G$27]*[.$Z$5]*MAGNET([.G$24]+[.$BB85])+[.H$27]*[.$Z$5]*MAGNET([.H$24]+[.$BB85])+[.I$27]*[.$Z$5]*MAGNET([.I$24]+[.$BB85])+[.J$27]*[.$Z$5]*MAGNET([.J$24]+[.$BB85])+[.K$27]*[.$Z$5]*MAGNET([.K$24]+[.$BB85])+[.L$27]*[.$Z$5]*MAGNET([.L$24]+[.$BB85])+[.M$27]*[.$Z$5]*MAGNET([.M$24]+[.$BB85])+[.N$27]*[.$Z$5]*MAGNET([.N$24]+[.$BB85])+[.O$27]*[.$Z$5]*MAGNET([.O$24]+[.$BB85])+[.P$27]*[.$Z$5]*MAGNET([.P$24]+[.$BB85])+[.Q$27]*[.$Z$5]*MAGNET([.Q$24]+[.$BB85])+[.R$27]*[.$Z$5]*MAGNET([.R$24]+[.$BB85])+[.S$27]*[.$Z$5]*MAGNET([.S$24]+[.$BB85])+[.T$27]*[.$Z$5]*MAGNET([.T$24]+[.$BB85])+[.U$27]*[.$Z$5]*MAGNET([.U$24]+[.$BB85])+[.V$27]*[.$Z$5]*MAGNET([.V$24]+[.$BB85])+[.W$27]*[.$Z$5]*MAGNET([.W$24]+[.$BB85])+[.X$27]*[.$Z$5]*MAGNET([.X$24]+[.$BB85])+[.Y$27]*[.$Z$5]*MAGNET([.Y$24]+[.$BB85])+[.Z$27]*[.$Z$5]*MAGNET([.Z$24]+[.$BB85])+[.AA$27]*[.$Z$5]*MAGNET([.AA$24]+[.$BB85])+[.AB$27]*[.$Z$5]*MAGNET([.AB$24]+[.$BB85])+[.AC$27]*[.$Z$5]*MAGNET([.AC$24]+[.$BB85])+[.AD$27]*[.$Z$5]*MAGNET([.AD$24]+[.$BB85])+[.AE$27]*[.$Z$5]*MAGNET([.AE$24]+[.$BB85])+[.AF$27]*[.$Z$5]*MAGNET([.AF$24]+[.$BB85])+[.AG$27]*[.$Z$5]*MAGNET([.AG$24]+[.$BB85])+[.D$27]*[.$Z$5]*MAGNET([.D$24]+[.$BB85])+[.AH$27]*[.$Z$5]*MAGNET([.AH$24]+[.BB85]) +[.AI$27]*[.$Z$5]*MAGNET([.AI$24]+[.BB85]) +[.AJ$27]*[.$Z$5]*MAGNET([.AJ$24]+[.BB85]) +[.AK$27]*[.$Z$5]*MAGNET([.AK$24]+[.BB85]) +[.AL$27]*[.$Z$5]*MAGNET([.AL$24]+[.BB85]) +[.AM$27]*[.$Z$5]*MAGNET([.AM$24]+[.BB85]) +[.AN$27]*[.$Z$5]*MAGNET([.AN$24]+[.BB85]) +[.AO$27]*[.$Z$5]*MAGNET([.AO$24]+[.BB85]) +[.AP$27]*[.$Z$5]*MAGNET([.AP$24]+[.$BB85])&#10;+[.AQ$27]*[.$Z$5]*MAGNET([.AQ$24]+[.$BB85])&#10;+[.AR$27]*[.$Z$5]*MAGNET([.AR$24]+[.$BB85])&#10;+[.AS$27]*[.$Z$5]*MAGNET([.AS$24]+[.$BB85])&#10;+[.AT$27]*[.$Z$5]*MAGNET([.AT$24]+[.$BB85])&#10;+[.AU$27]*[.$Z$5]*MAGNET([.AU$24]+[.$BB85])&#10;+[.AV$27]*[.$Z$5]*MAGNET([.AV$24]+[.$BB85])&#10;+[.AW$27]*[.$Z$5]*MAGNET([.AW$24]+[.$BB85])&#10;+[.AX$27]*[.$Z$5]*MAGNET([.AX$24]+[.$BB85])&#10;+[.AY$27]*[.$Z$5]*MAGNET([.AY$24]+[.$BB85]) +RAND()*[.$BE$13]" office:value-type="float" office:value="-115.941581748965" calcext:value-type="float">
            <text:p>-115.941581748965</text:p>
          </table:table-cell>
          <table:table-cell table:style-name="ce71" table:formula="of:=[.E$28]*[.$Z$5]*MAGNET([.E$24]+[.$BB85])+[.F$28]*[.$Z$5]*MAGNET([.F$24]+[.$BB85])+[.G$28]*[.$Z$5]*MAGNET([.G$24]+[.$BB85])+[.H$28]*[.$Z$5]*MAGNET([.H$24]+[.$BB85])+[.I$28]*[.$Z$5]*MAGNET([.I$24]+[.$BB85])+[.J$28]*[.$Z$5]*MAGNET([.J$24]+[.$BB85])+[.K$28]*[.$Z$5]*MAGNET([.K$24]+[.$BB85])+[.L$28]*[.$Z$5]*MAGNET([.L$24]+[.$BB85])+[.M$28]*[.$Z$5]*MAGNET([.M$24]+[.$BB85])+[.N$28]*[.$Z$5]*MAGNET([.N$24]+[.$BB85])+[.O$28]*[.$Z$5]*MAGNET([.O$24]+[.$BB85])+[.P$28]*[.$Z$5]*MAGNET([.P$24]+[.$BB85])+[.Q$28]*[.$Z$5]*MAGNET([.Q$24]+[.$BB85])+[.R$28]*[.$Z$5]*MAGNET([.R$24]+[.$BB85])+[.S$28]*[.$Z$5]*MAGNET([.S$24]+[.$BB85])+[.T$28]*[.$Z$5]*MAGNET([.T$24]+[.$BB85])+[.U$28]*[.$Z$5]*MAGNET([.U$24]+[.$BB85])+[.V$28]*[.$Z$5]*MAGNET([.V$24]+[.$BB85])+[.W$28]*[.$Z$5]*MAGNET([.W$24]+[.$BB85])+[.X$28]*[.$Z$5]*MAGNET([.X$24]+[.$BB85])+[.Y$28]*[.$Z$5]*MAGNET([.Y$24]+[.$BB85])+[.Z$28]*[.$Z$5]*MAGNET([.Z$24]+[.$BB85])+[.AA$28]*[.$Z$5]*MAGNET([.AA$24]+[.$BB85])+[.AB$28]*[.$Z$5]*MAGNET([.AB$24]+[.$BB85])+[.AC$28]*[.$Z$5]*MAGNET([.AC$24]+[.$BB85])+[.AD$28]*[.$Z$5]*MAGNET([.AD$24]+[.$BB85])+[.AE$28]*[.$Z$5]*MAGNET([.AE$24]+[.$BB85])+[.AF$28]*[.$Z$5]*MAGNET([.AF$24]+[.$BB85])+[.AG$28]*[.$Z$5]*MAGNET([.AG$24]+[.$BB85])+[.D$28]*[.$Z$5]*MAGNET([.D$24]+[.$BB85])+[.AH$28]*[.$Z$5]*MAGNET([.AH$24]+[.BB85]) +[.AI$28]*[.$Z$5]*MAGNET([.AI$24]+[.BB85]) +[.AJ$28]*[.$Z$5]*MAGNET([.AJ$24]+[.BB85]) +[.AK$28]*[.$Z$5]*MAGNET([.AK$24]+[.BB85]) +[.AL$28]*[.$Z$5]*MAGNET([.AL$24]+[.BB85]) +[.AM$28]*[.$Z$5]*MAGNET([.AM$24]+[.BB85]) +[.AN$28]*[.$Z$5]*MAGNET([.AN$24]+[.BB85]) +[.AO$28]*[.$Z$5]*MAGNET([.AO$24]+[.BB85]) +[.AP$28]*[.$Z$5]*MAGNET([.AP$24]+[.$BB85])&#10;+[.AQ$28]*[.$Z$5]*MAGNET([.AQ$24]+[.$BB85])&#10;+[.AR$28]*[.$Z$5]*MAGNET([.AR$24]+[.$BB85])&#10;+[.AS$28]*[.$Z$5]*MAGNET([.AS$24]+[.$BB85])&#10;+[.AT$28]*[.$Z$5]*MAGNET([.AT$24]+[.$BB85])&#10;+[.AU$28]*[.$Z$5]*MAGNET([.AU$24]+[.$BB85])&#10;+[.AV$28]*[.$Z$5]*MAGNET([.AV$24]+[.$BB85])&#10;+[.AW$28]*[.$Z$5]*MAGNET([.AW$24]+[.$BB85])&#10;+[.AX$28]*[.$Z$5]*MAGNET([.AX$24]+[.$BB85])&#10;+[.AY$28]*[.$Z$5]*MAGNET([.AY$24]+[.$BB85]) +RAND()*[.$BF$13]" office:value-type="float" office:value="-17.4432885684893" calcext:value-type="float">
            <text:p>-17.4432885684893</text:p>
          </table:table-cell>
          <table:table-cell table:style-name="ce71" table:formula="of:=[.E$29]*[.$Z$5]*MAGNET([.E$24]+[.$BB85])+[.F$29]*[.$Z$5]*MAGNET([.F$24]+[.$BB85])+[.G$29]*[.$Z$5]*MAGNET([.G$24]+[.$BB85])+[.H$29]*[.$Z$5]*MAGNET([.H$24]+[.$BB85])+[.I$29]*[.$Z$5]*MAGNET([.I$24]+[.$BB85])+[.J$29]*[.$Z$5]*MAGNET([.J$24]+[.$BB85])+[.K$29]*[.$Z$5]*MAGNET([.K$24]+[.$BB85])+[.L$29]*[.$Z$5]*MAGNET([.L$24]+[.$BB85])+[.M$29]*[.$Z$5]*MAGNET([.M$24]+[.$BB85])+[.N$29]*[.$Z$5]*MAGNET([.N$24]+[.$BB85])+[.O$29]*[.$Z$5]*MAGNET([.O$24]+[.$BB85])+[.P$29]*[.$Z$5]*MAGNET([.P$24]+[.$BB85])+[.Q$29]*[.$Z$5]*MAGNET([.Q$24]+[.$BB85])+[.R$29]*[.$Z$5]*MAGNET([.R$24]+[.$BB85])+[.S$29]*[.$Z$5]*MAGNET([.S$24]+[.$BB85])+[.T$29]*[.$Z$5]*MAGNET([.T$24]+[.$BB85])+[.U$29]*[.$Z$5]*MAGNET([.U$24]+[.$BB85])+[.V$29]*[.$Z$5]*MAGNET([.V$24]+[.$BB85])+[.W$29]*[.$Z$5]*MAGNET([.W$24]+[.$BB85])+[.X$29]*[.$Z$5]*MAGNET([.X$24]+[.$BB85])+[.Y$29]*[.$Z$5]*MAGNET([.Y$24]+[.$BB85])+[.Z$29]*[.$Z$5]*MAGNET([.Z$24]+[.$BB85])+[.AA$29]*[.$Z$5]*MAGNET([.AA$24]+[.$BB85])+[.AB$29]*[.$Z$5]*MAGNET([.AB$24]+[.$BB85])+[.AC$29]*[.$Z$5]*MAGNET([.AC$24]+[.$BB85])+[.AD$29]*[.$Z$5]*MAGNET([.AD$24]+[.$BB85])+[.AE$29]*[.$Z$5]*MAGNET([.AE$24]+[.$BB85])+[.AF$29]*[.$Z$5]*MAGNET([.AF$24]+[.$BB85])+[.AG$29]*[.$Z$5]*MAGNET([.AG$24]+[.$BB85])+[.D$29]*[.$Z$5]*MAGNET([.D$24]+[.$BB85])+[.AH$29]*[.$Z$5]*MAGNET([.AH$24]+[.BB85]) +[.AI$29]*[.$Z$5]*MAGNET([.AI$24]+[.BB85]) +[.AJ$29]*[.$Z$5]*MAGNET([.AJ$24]+[.BB85]) +[.AK$29]*[.$Z$5]*MAGNET([.AK$24]+[.BB85]) +[.AL$29]*[.$Z$5]*MAGNET([.AL$24]+[.BB85]) +[.AM$29]*[.$Z$5]*MAGNET([.AM$24]+[.BB85]) +[.AN$29]*[.$Z$5]*MAGNET([.AN$24]+[.BB85]) +[.AO$29]*[.$Z$5]*MAGNET([.AO$24]+[.BB85]) +[.AP$29]*[.$Z$5]*MAGNET([.AP$24]+[.$BB85])&#10;+[.AQ$29]*[.$Z$5]*MAGNET([.AQ$24]+[.$BB85])&#10;+[.AR$29]*[.$Z$5]*MAGNET([.AR$24]+[.$BB85])&#10;+[.AS$29]*[.$Z$5]*MAGNET([.AS$24]+[.$BB85])&#10;+[.AT$29]*[.$Z$5]*MAGNET([.AT$24]+[.$BB85])&#10;+[.AU$29]*[.$Z$5]*MAGNET([.AU$24]+[.$BB85])&#10;+[.AV$29]*[.$Z$5]*MAGNET([.AV$24]+[.$BB85])&#10;+[.AW$29]*[.$Z$5]*MAGNET([.AW$24]+[.$BB85])&#10;+[.AX$29]*[.$Z$5]*MAGNET([.AX$24]+[.$BB85])&#10;+[.AY$29]*[.$Z$5]*MAGNET([.AY$24]+[.$BB85]) +RAND()*[.$BG$13]" office:value-type="float" office:value="47.52669174474" calcext:value-type="float">
            <text:p>47.52669174474</text:p>
          </table:table-cell>
          <table:table-cell table:style-name="ce71" table:formula="of:=[.E$30]*[.$Z$5]*MAGNET([.E$24]+[.$BB85])+[.F$30]*[.$Z$5]*MAGNET([.F$24]+[.$BB85])+[.G$30]*[.$Z$5]*MAGNET([.G$24]+[.$BB85])+[.H$30]*[.$Z$5]*MAGNET([.H$24]+[.$BB85])+[.I$30]*[.$Z$5]*MAGNET([.I$24]+[.$BB85])+[.J$30]*[.$Z$5]*MAGNET([.J$24]+[.$BB85])+[.K$30]*[.$Z$5]*MAGNET([.K$24]+[.$BB85])+[.L$30]*[.$Z$5]*MAGNET([.L$24]+[.$BB85])+[.M$30]*[.$Z$5]*MAGNET([.M$24]+[.$BB85])+[.N$30]*[.$Z$5]*MAGNET([.N$24]+[.$BB85])+[.O$30]*[.$Z$5]*MAGNET([.O$24]+[.$BB85])+[.P$30]*[.$Z$5]*MAGNET([.P$24]+[.$BB85])+[.Q$30]*[.$Z$5]*MAGNET([.Q$24]+[.$BB85])+[.R$30]*[.$Z$5]*MAGNET([.R$24]+[.$BB85])+[.S$30]*[.$Z$5]*MAGNET([.S$24]+[.$BB85])+[.T$30]*[.$Z$5]*MAGNET([.T$24]+[.$BB85])+[.U$30]*[.$Z$5]*MAGNET([.U$24]+[.$BB85])+[.V$30]*[.$Z$5]*MAGNET([.V$24]+[.$BB85])+[.W$30]*[.$Z$5]*MAGNET([.W$24]+[.$BB85])+[.X$30]*[.$Z$5]*MAGNET([.X$24]+[.$BB85])+[.Y$30]*[.$Z$5]*MAGNET([.Y$24]+[.$BB85])+[.Z$30]*[.$Z$5]*MAGNET([.Z$24]+[.$BB85])+[.AA$30]*[.$Z$5]*MAGNET([.AA$24]+[.$BB85])+[.AB$30]*[.$Z$5]*MAGNET([.AB$24]+[.$BB85])+[.AC$30]*[.$Z$5]*MAGNET([.AC$24]+[.$BB85])+[.AD$30]*[.$Z$5]*MAGNET([.AD$24]+[.$BB85])+[.AE$30]*[.$Z$5]*MAGNET([.AE$24]+[.$BB85])+[.AF$30]*[.$Z$5]*MAGNET([.AF$24]+[.$BB85])+[.AG$30]*[.$Z$5]*MAGNET([.AG$24]+[.$BB85])+[.D$30]*[.$Z$5]*MAGNET([.D$24]+[.$BB85])+[.AH$30]*[.$Z$5]*MAGNET([.AH$24]+[.BB85]) +[.AI$30]*[.$Z$5]*MAGNET([.AI$24]+[.BB85]) +[.AJ$30]*[.$Z$5]*MAGNET([.AJ$24]+[.BB85]) +[.AK$30]*[.$Z$5]*MAGNET([.AK$24]+[.BB85]) +[.AL$30]*[.$Z$5]*MAGNET([.AL$24]+[.BB85]) +[.AM$30]*[.$Z$5]*MAGNET([.AM$24]+[.BB85]) +[.AN$30]*[.$Z$5]*MAGNET([.AN$24]+[.BB85]) +[.AO$30]*[.$Z$5]*MAGNET([.AO$24]+[.BB85]) +[.AP$30]*[.$Z$5]*MAGNET([.AP$24]+[.$BB85])&#10;+[.AQ$30]*[.$Z$5]*MAGNET([.AQ$24]+[.$BB85])&#10;+[.AR$30]*[.$Z$5]*MAGNET([.AR$24]+[.$BB85])&#10;+[.AS$30]*[.$Z$5]*MAGNET([.AS$24]+[.$BB85])&#10;+[.AT$30]*[.$Z$5]*MAGNET([.AT$24]+[.$BB85])&#10;+[.AU$30]*[.$Z$5]*MAGNET([.AU$24]+[.$BB85])&#10;+[.AV$30]*[.$Z$5]*MAGNET([.AV$24]+[.$BB85])&#10;+[.AW$30]*[.$Z$5]*MAGNET([.AW$24]+[.$BB85])&#10;+[.AX$30]*[.$Z$5]*MAGNET([.AX$24]+[.$BB85])&#10;+[.AY$30]*[.$Z$5]*MAGNET([.AY$24]+[.$BB85]) +RAND()*[.$BH$13]" office:value-type="float" office:value="0" calcext:value-type="float">
            <text:p>0</text:p>
          </table:table-cell>
          <table:table-cell table:style-name="ce71" table:formula="of:=[.E$31]*[.$Z$5]*MAGNET([.E$24]+[.$BB85])+[.F$31]*[.$Z$5]*MAGNET([.F$24]+[.$BB85])+[.G$31]*[.$Z$5]*MAGNET([.G$24]+[.$BB85])+[.H$31]*[.$Z$5]*MAGNET([.H$24]+[.$BB85])+[.I$31]*[.$Z$5]*MAGNET([.I$24]+[.$BB85])+[.J$31]*[.$Z$5]*MAGNET([.J$24]+[.$BB85])+[.K$31]*[.$Z$5]*MAGNET([.K$24]+[.$BB85])+[.L$31]*[.$Z$5]*MAGNET([.L$24]+[.$BB85])+[.M$31]*[.$Z$5]*MAGNET([.M$24]+[.$BB85])+[.N$31]*[.$Z$5]*MAGNET([.N$24]+[.$BB85])+[.O$31]*[.$Z$5]*MAGNET([.O$24]+[.$BB85])+[.P$31]*[.$Z$5]*MAGNET([.P$24]+[.$BB85])+[.Q$31]*[.$Z$5]*MAGNET([.Q$24]+[.$BB85])+[.R$31]*[.$Z$5]*MAGNET([.R$24]+[.$BB85])+[.S$31]*[.$Z$5]*MAGNET([.S$24]+[.$BB85])+[.T$31]*[.$Z$5]*MAGNET([.T$24]+[.$BB85])+[.U$31]*[.$Z$5]*MAGNET([.U$24]+[.$BB85])+[.V$31]*[.$Z$5]*MAGNET([.V$24]+[.$BB85])+[.W$31]*[.$Z$5]*MAGNET([.W$24]+[.$BB85])+[.X$31]*[.$Z$5]*MAGNET([.X$24]+[.$BB85])+[.Y$31]*[.$Z$5]*MAGNET([.Y$24]+[.$BB85])+[.Z$31]*[.$Z$5]*MAGNET([.Z$24]+[.$BB85])+[.AA$31]*[.$Z$5]*MAGNET([.AA$24]+[.$BB85])+[.AB$31]*[.$Z$5]*MAGNET([.AB$24]+[.$BB85])+[.AC$31]*[.$Z$5]*MAGNET([.AC$24]+[.$BB85])+[.AD$31]*[.$Z$5]*MAGNET([.AD$24]+[.$BB85])+[.AE$31]*[.$Z$5]*MAGNET([.AE$24]+[.$BB85])+[.AF$31]*[.$Z$5]*MAGNET([.AF$24]+[.$BB85])+[.AG$31]*[.$Z$5]*MAGNET([.AG$24]+[.$BB85])+[.D$31]*[.$Z$5]*MAGNET([.D$24]+[.$BB85])+[.AH$31]*[.$Z$5]*MAGNET([.AH$24]+[.BB85]) +[.AI$31]*[.$Z$5]*MAGNET([.AI$24]+[.BB85]) +[.AJ$31]*[.$Z$5]*MAGNET([.AJ$24]+[.BB85]) +[.AK$31]*[.$Z$5]*MAGNET([.AK$24]+[.BB85]) +[.AL$31]*[.$Z$5]*MAGNET([.AL$24]+[.BB85]) +[.AM$31]*[.$Z$5]*MAGNET([.AM$24]+[.BB85]) +[.AN$31]*[.$Z$5]*MAGNET([.AN$24]+[.BB85]) +[.AO$31]*[.$Z$5]*MAGNET([.AO$24]+[.BB85]) +[.AP$31]*[.$Z$5]*MAGNET([.AP$24]+[.$BB85])&#10;+[.AQ$31]*[.$Z$5]*MAGNET([.AQ$24]+[.$BB85])&#10;+[.AR$31]*[.$Z$5]*MAGNET([.AR$24]+[.$BB85])&#10;+[.AS$31]*[.$Z$5]*MAGNET([.AS$24]+[.$BB85])&#10;+[.AT$31]*[.$Z$5]*MAGNET([.AT$24]+[.$BB85])&#10;+[.AU$31]*[.$Z$5]*MAGNET([.AU$24]+[.$BB85])&#10;+[.AV$31]*[.$Z$5]*MAGNET([.AV$24]+[.$BB85])&#10;+[.AW$31]*[.$Z$5]*MAGNET([.AW$24]+[.$BB85])&#10;+[.AX$31]*[.$Z$5]*MAGNET([.AX$24]+[.$BB85])&#10;+[.AY$31]*[.$Z$5]*MAGNET([.AY$24]+[.$BB85]) +RAND()*[.$BI$13]" office:value-type="float" office:value="0" calcext:value-type="float">
            <text:p>0</text:p>
          </table:table-cell>
          <table:table-cell table:style-name="ce71" table:formula="of:=[.E$32]*[.$Z$5]*MAGNET([.E$24]+[.$BB85])+[.F$32]*[.$Z$5]*MAGNET([.F$24]+[.$BB85])+[.G$32]*[.$Z$5]*MAGNET([.G$24]+[.$BB85])+[.H$32]*[.$Z$5]*MAGNET([.H$24]+[.$BB85])+[.I$32]*[.$Z$5]*MAGNET([.I$24]+[.$BB85])+[.J$32]*[.$Z$5]*MAGNET([.J$24]+[.$BB85])+[.K$32]*[.$Z$5]*MAGNET([.K$24]+[.$BB85])+[.L$32]*[.$Z$5]*MAGNET([.L$24]+[.$BB85])+[.M$32]*[.$Z$5]*MAGNET([.M$24]+[.$BB85])+[.N$32]*[.$Z$5]*MAGNET([.N$24]+[.$BB85])+[.O$32]*[.$Z$5]*MAGNET([.O$24]+[.$BB85])+[.P$32]*[.$Z$5]*MAGNET([.P$24]+[.$BB85])+[.Q$32]*[.$Z$5]*MAGNET([.Q$24]+[.$BB85])+[.R$32]*[.$Z$5]*MAGNET([.R$24]+[.$BB85])+[.S$32]*[.$Z$5]*MAGNET([.S$24]+[.$BB85])+[.T$32]*[.$Z$5]*MAGNET([.T$24]+[.$BB85])+[.U$32]*[.$Z$5]*MAGNET([.U$24]+[.$BB85])+[.V$32]*[.$Z$5]*MAGNET([.V$24]+[.$BB85])+[.W$32]*[.$Z$5]*MAGNET([.W$24]+[.$BB85])+[.X$32]*[.$Z$5]*MAGNET([.X$24]+[.$BB85])+[.Y$32]*[.$Z$5]*MAGNET([.Y$24]+[.$BB85])+[.Z$32]*[.$Z$5]*MAGNET([.Z$24]+[.$BB85])+[.AA$32]*[.$Z$5]*MAGNET([.AA$24]+[.$BB85])+[.AB$32]*[.$Z$5]*MAGNET([.AB$24]+[.$BB85])+[.AC$32]*[.$Z$5]*MAGNET([.AC$24]+[.$BB85])+[.AD$32]*[.$Z$5]*MAGNET([.AD$24]+[.$BB85])+[.AE$32]*[.$Z$5]*MAGNET([.AE$24]+[.$BB85])+[.AF$32]*[.$Z$5]*MAGNET([.AF$24]+[.$BB85])+[.AG$32]*[.$Z$5]*MAGNET([.AG$24]+[.$BB85])+[.D$32]*[.$Z$5]*MAGNET([.D$24]+[.$BB85])+[.AH$32]*[.$Z$5]*MAGNET([.AH$24]+[.BB85]) +[.AI$32]*[.$Z$5]*MAGNET([.AI$24]+[.BB85]) +[.AJ$32]*[.$Z$5]*MAGNET([.AJ$24]+[.BB85]) +[.AK$32]*[.$Z$5]*MAGNET([.AK$24]+[.BB85]) +[.AL$32]*[.$Z$5]*MAGNET([.AL$24]+[.BB85]) +[.AM$32]*[.$Z$5]*MAGNET([.AM$24]+[.BB85]) +[.AN$32]*[.$Z$5]*MAGNET([.AN$24]+[.BB85]) +[.AO$32]*[.$Z$5]*MAGNET([.AO$24]+[.BB85]) +[.AP$32]*[.$Z$5]*MAGNET([.AP$24]+[.$BB85])&#10;+[.AQ$32]*[.$Z$5]*MAGNET([.AQ$24]+[.$BB85])&#10;+[.AR$32]*[.$Z$5]*MAGNET([.AR$24]+[.$BB85])&#10;+[.AS$32]*[.$Z$5]*MAGNET([.AS$24]+[.$BB85])&#10;+[.AT$32]*[.$Z$5]*MAGNET([.AT$24]+[.$BB85])&#10;+[.AU$32]*[.$Z$5]*MAGNET([.AU$24]+[.$BB85])&#10;+[.AV$32]*[.$Z$5]*MAGNET([.AV$24]+[.$BB85])&#10;+[.AW$32]*[.$Z$5]*MAGNET([.AW$24]+[.$BB85])&#10;+[.AX$32]*[.$Z$5]*MAGNET([.AX$24]+[.$BB85])&#10;+[.AY$32]*[.$Z$5]*MAGNET([.AY$24]+[.$BB8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5]+0.002" office:value-type="float" office:value="0.142" calcext:value-type="float">
            <text:p>0.142</text:p>
          </table:table-cell>
          <table:table-cell table:formula="of:=[.BA86]*[.$D$6]" office:value-type="float" office:value="7.13769850895601" calcext:value-type="float">
            <text:p>7.138</text:p>
          </table:table-cell>
          <table:table-cell table:formula="of:=[.D$25]*[.$Z$5]*MAGNET([.D$24]+[.BB86])+[.E$25]*[.$Z$5]*MAGNET([.E$24]+[.BB86])+[.F$25]*[.$Z$5]*MAGNET([.F$24]+[.BB86])+[.G$25]*[.$Z$5]*MAGNET([.G$24]+[.BB86])+[.H$25]*[.$Z$5]*MAGNET([.H$24]+[.BB86])+[.I$25]*[.$Z$5]*MAGNET([.I$24]+[.BB86])+[.J$25]*[.$Z$5]*MAGNET([.J$24]+[.BB86])+[.K$25]*[.$Z$5]*MAGNET([.K$24]+[.BB86])+[.L$25]*[.$Z$5]*MAGNET([.L$24]+[.BB86])+[.M$25]*[.$Z$5]*MAGNET([.M$24]+[.BB86])+[.N$25]*[.$Z$5]*MAGNET([.N$24]+[.BB86])+[.O$25]*[.$Z$5]*MAGNET([.O$24]+[.BB86])+[.P$25]*[.$Z$5]*MAGNET([.P$24]+[.BB86])+[.Q$25]*[.$Z$5]*MAGNET([.Q$24]+[.BB86])+[.R$25]*[.$Z$5]*MAGNET([.R$24]+[.BB86])+[.S$25]*[.$Z$5]*MAGNET([.S$24]+[.BB86])+[.T$25]*[.$Z$5]*MAGNET([.T$24]+[.BB86])+[.U$25]*[.$Z$5]*MAGNET([.U$24]+[.BB86])+[.V$25]*[.$Z$5]*MAGNET([.V$24]+[.BB86])+[.W$25]*[.$Z$5]*MAGNET([.W$24]+[.BB86])+[.X$25]*[.$Z$5]*MAGNET([.X$24]+[.BB86])+[.Y$25]*[.$Z$5]*MAGNET([.Y$24]+[.BB86])+[.Z$25]*[.$Z$5]*MAGNET([.Z$24]+[.BB86])+[.AA$25]*[.$Z$5]*MAGNET([.AA$24]+[.BB86])+[.AB$25]*[.$Z$5]*MAGNET([.AB$24]+[.BB86])+[.AC$25]*[.$Z$5]*MAGNET([.AC$24]+[.BB86])+[.AD$25]*[.$Z$5]*MAGNET([.AD$24]+[.BB86])+[.AE$25]*[.$Z$5]*MAGNET([.AE$24]+[.BB86])+[.AF$25]*[.$Z$5]*MAGNET([.AF$24]+[.BB86])+[.AG$25]*[.$Z$5]*MAGNET([.AG$24]+[.BB86])+[.AH$25]*[.$Z$5]*MAGNET([.AH$24]+[.BB86]) +[.AI$25]*[.$Z$5]*MAGNET([.AI$24]+[.BB86]) +[.AJ$25]*[.$Z$5]*MAGNET([.AJ$24]+[.BB86]) +[.AK$25]*[.$Z$5]*MAGNET([.AK$24]+[.BB86]) +[.AL$25]*[.$Z$5]*MAGNET([.AL$24]+[.BB86]) +[.AM$25]*[.$Z$5]*MAGNET([.AM$24]+[.BB86]) +[.AN$25]*[.$Z$5]*MAGNET([.AN$24]+[.BB86]) +[.AO$25]*[.$Z$5]*MAGNET([.AO$24]+[.BB86])+RAND()*[.$BC$13]+[.AP$25]*[.$Z$5]*MAGNET([.AP$24]+[.BB86])&#10;+[.AQ$25]*[.$Z$5]*MAGNET([.AQ$24]+[.BB86])&#10;+[.AR$25]*[.$Z$5]*MAGNET([.AR$24]+[.BB86])&#10;+[.AS$25]*[.$Z$5]*MAGNET([.AS$24]+[.BB86])&#10;+[.AT$25]*[.$Z$5]*MAGNET([.AT$24]+[.BB86])&#10;+[.AU$25]*[.$Z$5]*MAGNET([.AU$24]+[.BB86])&#10;+[.AV$25]*[.$Z$5]*MAGNET([.AV$24]+[.BB86])&#10;+[.AW$25]*[.$Z$5]*MAGNET([.AW$24]+[.BB86])&#10;+[.AX$25]*[.$Z$5]*MAGNET([.AX$24]+[.BB86])&#10;+[.AY$25]*[.$Z$5]*MAGNET([.AY$24]+[.BB86])" office:value-type="float" office:value="52.9903320732553" calcext:value-type="float">
            <text:p>52.99</text:p>
          </table:table-cell>
          <table:table-cell table:style-name="ce70" table:formula="of:=[.E$26]*[.$Z$5]*MAGNET([.E$24]+[.$BB86])+[.F$26]*[.$Z$5]*MAGNET([.F$24]+[.$BB86])+[.G$26]*[.$Z$5]*MAGNET([.G$24]+[.$BB86])+[.H$26]*[.$Z$5]*MAGNET([.H$24]+[.$BB86])+[.I$26]*[.$Z$5]*MAGNET([.I$24]+[.$BB86])+[.J$26]*[.$Z$5]*MAGNET([.J$24]+[.$BB86])+[.K$26]*[.$Z$5]*MAGNET([.K$24]+[.$BB86])+[.L$26]*[.$Z$5]*MAGNET([.L$24]+[.$BB86])+[.M$26]*[.$Z$5]*MAGNET([.M$24]+[.$BB86])+[.N$26]*[.$Z$5]*MAGNET([.N$24]+[.$BB86])+[.O$26]*[.$Z$5]*MAGNET([.O$24]+[.$BB86])+[.P$26]*[.$Z$5]*MAGNET([.P$24]+[.$BB86])+[.Q$26]*[.$Z$5]*MAGNET([.Q$24]+[.$BB86])+[.R$26]*[.$Z$5]*MAGNET([.R$24]+[.$BB86])+[.S$26]*[.$Z$5]*MAGNET([.S$24]+[.$BB86])+[.T$26]*[.$Z$5]*MAGNET([.T$24]+[.$BB86])+[.U$26]*[.$Z$5]*MAGNET([.U$24]+[.$BB86])+[.V$26]*[.$Z$5]*MAGNET([.V$24]+[.$BB86])+[.W$26]*[.$Z$5]*MAGNET([.W$24]+[.$BB86])+[.X$26]*[.$Z$5]*MAGNET([.X$24]+[.$BB86])+[.Y$26]*[.$Z$5]*MAGNET([.Y$24]+[.$BB86])+[.Z$26]*[.$Z$5]*MAGNET([.Z$24]+[.$BB86])+[.AA$26]*[.$Z$5]*MAGNET([.AA$24]+[.$BB86])+[.AB$26]*[.$Z$5]*MAGNET([.AB$24]+[.$BB86])+[.AC$26]*[.$Z$5]*MAGNET([.AC$24]+[.$BB86])+[.AD$26]*[.$Z$5]*MAGNET([.AD$24]+[.$BB86])+[.AE$26]*[.$Z$5]*MAGNET([.AE$24]+[.$BB86])+[.AF$26]*[.$Z$5]*MAGNET([.AF$24]+[.$BB86])+[.AG$26]*[.$Z$5]*MAGNET([.AG$24]+[.$BB86])+[.D$26]*[.$Z$5]*MAGNET([.D$24]+[.$BB86])+[.AH$26]*[.$Z$5]*MAGNET([.AH$24]+[.BB86]) +[.AI$26]*[.$Z$5]*MAGNET([.AI$24]+[.BB86]) +[.AJ$26]*[.$Z$5]*MAGNET([.AJ$24]+[.BB86]) +[.AK$26]*[.$Z$5]*MAGNET([.AK$24]+[.BB86]) +[.AL$26]*[.$Z$5]*MAGNET([.AL$24]+[.BB86]) +[.AM$26]*[.$Z$5]*MAGNET([.AM$24]+[.BB86]) +[.AN$26]*[.$Z$5]*MAGNET([.AN$24]+[.BB86]) +[.AO$26]*[.$Z$5]*MAGNET([.AO$24]+[.BB86]) +[.AP$26]*[.$Z$5]*MAGNET([.AP$24]+[.$BB86])&#10;+[.AQ$26]*[.$Z$5]*MAGNET([.AQ$24]+[.$BB86])&#10;+[.AR$26]*[.$Z$5]*MAGNET([.AR$24]+[.$BB86])&#10;+[.AS$26]*[.$Z$5]*MAGNET([.AS$24]+[.$BB86])&#10;+[.AT$26]*[.$Z$5]*MAGNET([.AT$24]+[.$BB86])&#10;+[.AU$26]*[.$Z$5]*MAGNET([.AU$24]+[.$BB86])&#10;+[.AV$26]*[.$Z$5]*MAGNET([.AV$24]+[.$BB86])&#10;+[.AW$26]*[.$Z$5]*MAGNET([.AW$24]+[.$BB86])&#10;+[.AX$26]*[.$Z$5]*MAGNET([.AX$24]+[.$BB86])&#10;+[.AY$26]*[.$Z$5]*MAGNET([.AY$24]+[.$BB86]) +RAND()*[.$BD$13]" office:value-type="float" office:value="49.2409239777394" calcext:value-type="float">
            <text:p>49.24</text:p>
          </table:table-cell>
          <table:table-cell table:style-name="ce71" table:formula="of:=[.E$27]*[.$Z$5]*MAGNET([.E$24]+[.$BB86])+[.F$27]*[.$Z$5]*MAGNET([.F$24]+[.$BB86])+[.G$27]*[.$Z$5]*MAGNET([.G$24]+[.$BB86])+[.H$27]*[.$Z$5]*MAGNET([.H$24]+[.$BB86])+[.I$27]*[.$Z$5]*MAGNET([.I$24]+[.$BB86])+[.J$27]*[.$Z$5]*MAGNET([.J$24]+[.$BB86])+[.K$27]*[.$Z$5]*MAGNET([.K$24]+[.$BB86])+[.L$27]*[.$Z$5]*MAGNET([.L$24]+[.$BB86])+[.M$27]*[.$Z$5]*MAGNET([.M$24]+[.$BB86])+[.N$27]*[.$Z$5]*MAGNET([.N$24]+[.$BB86])+[.O$27]*[.$Z$5]*MAGNET([.O$24]+[.$BB86])+[.P$27]*[.$Z$5]*MAGNET([.P$24]+[.$BB86])+[.Q$27]*[.$Z$5]*MAGNET([.Q$24]+[.$BB86])+[.R$27]*[.$Z$5]*MAGNET([.R$24]+[.$BB86])+[.S$27]*[.$Z$5]*MAGNET([.S$24]+[.$BB86])+[.T$27]*[.$Z$5]*MAGNET([.T$24]+[.$BB86])+[.U$27]*[.$Z$5]*MAGNET([.U$24]+[.$BB86])+[.V$27]*[.$Z$5]*MAGNET([.V$24]+[.$BB86])+[.W$27]*[.$Z$5]*MAGNET([.W$24]+[.$BB86])+[.X$27]*[.$Z$5]*MAGNET([.X$24]+[.$BB86])+[.Y$27]*[.$Z$5]*MAGNET([.Y$24]+[.$BB86])+[.Z$27]*[.$Z$5]*MAGNET([.Z$24]+[.$BB86])+[.AA$27]*[.$Z$5]*MAGNET([.AA$24]+[.$BB86])+[.AB$27]*[.$Z$5]*MAGNET([.AB$24]+[.$BB86])+[.AC$27]*[.$Z$5]*MAGNET([.AC$24]+[.$BB86])+[.AD$27]*[.$Z$5]*MAGNET([.AD$24]+[.$BB86])+[.AE$27]*[.$Z$5]*MAGNET([.AE$24]+[.$BB86])+[.AF$27]*[.$Z$5]*MAGNET([.AF$24]+[.$BB86])+[.AG$27]*[.$Z$5]*MAGNET([.AG$24]+[.$BB86])+[.D$27]*[.$Z$5]*MAGNET([.D$24]+[.$BB86])+[.AH$27]*[.$Z$5]*MAGNET([.AH$24]+[.BB86]) +[.AI$27]*[.$Z$5]*MAGNET([.AI$24]+[.BB86]) +[.AJ$27]*[.$Z$5]*MAGNET([.AJ$24]+[.BB86]) +[.AK$27]*[.$Z$5]*MAGNET([.AK$24]+[.BB86]) +[.AL$27]*[.$Z$5]*MAGNET([.AL$24]+[.BB86]) +[.AM$27]*[.$Z$5]*MAGNET([.AM$24]+[.BB86]) +[.AN$27]*[.$Z$5]*MAGNET([.AN$24]+[.BB86]) +[.AO$27]*[.$Z$5]*MAGNET([.AO$24]+[.BB86]) +[.AP$27]*[.$Z$5]*MAGNET([.AP$24]+[.$BB86])&#10;+[.AQ$27]*[.$Z$5]*MAGNET([.AQ$24]+[.$BB86])&#10;+[.AR$27]*[.$Z$5]*MAGNET([.AR$24]+[.$BB86])&#10;+[.AS$27]*[.$Z$5]*MAGNET([.AS$24]+[.$BB86])&#10;+[.AT$27]*[.$Z$5]*MAGNET([.AT$24]+[.$BB86])&#10;+[.AU$27]*[.$Z$5]*MAGNET([.AU$24]+[.$BB86])&#10;+[.AV$27]*[.$Z$5]*MAGNET([.AV$24]+[.$BB86])&#10;+[.AW$27]*[.$Z$5]*MAGNET([.AW$24]+[.$BB86])&#10;+[.AX$27]*[.$Z$5]*MAGNET([.AX$24]+[.$BB86])&#10;+[.AY$27]*[.$Z$5]*MAGNET([.AY$24]+[.$BB86]) +RAND()*[.$BE$13]" office:value-type="float" office:value="-118.84976152044" calcext:value-type="float">
            <text:p>-118.84976152044</text:p>
          </table:table-cell>
          <table:table-cell table:style-name="ce71" table:formula="of:=[.E$28]*[.$Z$5]*MAGNET([.E$24]+[.$BB86])+[.F$28]*[.$Z$5]*MAGNET([.F$24]+[.$BB86])+[.G$28]*[.$Z$5]*MAGNET([.G$24]+[.$BB86])+[.H$28]*[.$Z$5]*MAGNET([.H$24]+[.$BB86])+[.I$28]*[.$Z$5]*MAGNET([.I$24]+[.$BB86])+[.J$28]*[.$Z$5]*MAGNET([.J$24]+[.$BB86])+[.K$28]*[.$Z$5]*MAGNET([.K$24]+[.$BB86])+[.L$28]*[.$Z$5]*MAGNET([.L$24]+[.$BB86])+[.M$28]*[.$Z$5]*MAGNET([.M$24]+[.$BB86])+[.N$28]*[.$Z$5]*MAGNET([.N$24]+[.$BB86])+[.O$28]*[.$Z$5]*MAGNET([.O$24]+[.$BB86])+[.P$28]*[.$Z$5]*MAGNET([.P$24]+[.$BB86])+[.Q$28]*[.$Z$5]*MAGNET([.Q$24]+[.$BB86])+[.R$28]*[.$Z$5]*MAGNET([.R$24]+[.$BB86])+[.S$28]*[.$Z$5]*MAGNET([.S$24]+[.$BB86])+[.T$28]*[.$Z$5]*MAGNET([.T$24]+[.$BB86])+[.U$28]*[.$Z$5]*MAGNET([.U$24]+[.$BB86])+[.V$28]*[.$Z$5]*MAGNET([.V$24]+[.$BB86])+[.W$28]*[.$Z$5]*MAGNET([.W$24]+[.$BB86])+[.X$28]*[.$Z$5]*MAGNET([.X$24]+[.$BB86])+[.Y$28]*[.$Z$5]*MAGNET([.Y$24]+[.$BB86])+[.Z$28]*[.$Z$5]*MAGNET([.Z$24]+[.$BB86])+[.AA$28]*[.$Z$5]*MAGNET([.AA$24]+[.$BB86])+[.AB$28]*[.$Z$5]*MAGNET([.AB$24]+[.$BB86])+[.AC$28]*[.$Z$5]*MAGNET([.AC$24]+[.$BB86])+[.AD$28]*[.$Z$5]*MAGNET([.AD$24]+[.$BB86])+[.AE$28]*[.$Z$5]*MAGNET([.AE$24]+[.$BB86])+[.AF$28]*[.$Z$5]*MAGNET([.AF$24]+[.$BB86])+[.AG$28]*[.$Z$5]*MAGNET([.AG$24]+[.$BB86])+[.D$28]*[.$Z$5]*MAGNET([.D$24]+[.$BB86])+[.AH$28]*[.$Z$5]*MAGNET([.AH$24]+[.BB86]) +[.AI$28]*[.$Z$5]*MAGNET([.AI$24]+[.BB86]) +[.AJ$28]*[.$Z$5]*MAGNET([.AJ$24]+[.BB86]) +[.AK$28]*[.$Z$5]*MAGNET([.AK$24]+[.BB86]) +[.AL$28]*[.$Z$5]*MAGNET([.AL$24]+[.BB86]) +[.AM$28]*[.$Z$5]*MAGNET([.AM$24]+[.BB86]) +[.AN$28]*[.$Z$5]*MAGNET([.AN$24]+[.BB86]) +[.AO$28]*[.$Z$5]*MAGNET([.AO$24]+[.BB86]) +[.AP$28]*[.$Z$5]*MAGNET([.AP$24]+[.$BB86])&#10;+[.AQ$28]*[.$Z$5]*MAGNET([.AQ$24]+[.$BB86])&#10;+[.AR$28]*[.$Z$5]*MAGNET([.AR$24]+[.$BB86])&#10;+[.AS$28]*[.$Z$5]*MAGNET([.AS$24]+[.$BB86])&#10;+[.AT$28]*[.$Z$5]*MAGNET([.AT$24]+[.$BB86])&#10;+[.AU$28]*[.$Z$5]*MAGNET([.AU$24]+[.$BB86])&#10;+[.AV$28]*[.$Z$5]*MAGNET([.AV$24]+[.$BB86])&#10;+[.AW$28]*[.$Z$5]*MAGNET([.AW$24]+[.$BB86])&#10;+[.AX$28]*[.$Z$5]*MAGNET([.AX$24]+[.$BB86])&#10;+[.AY$28]*[.$Z$5]*MAGNET([.AY$24]+[.$BB86]) +RAND()*[.$BF$13]" office:value-type="float" office:value="-17.6231591223842" calcext:value-type="float">
            <text:p>-17.6231591223842</text:p>
          </table:table-cell>
          <table:table-cell table:style-name="ce71" table:formula="of:=[.E$29]*[.$Z$5]*MAGNET([.E$24]+[.$BB86])+[.F$29]*[.$Z$5]*MAGNET([.F$24]+[.$BB86])+[.G$29]*[.$Z$5]*MAGNET([.G$24]+[.$BB86])+[.H$29]*[.$Z$5]*MAGNET([.H$24]+[.$BB86])+[.I$29]*[.$Z$5]*MAGNET([.I$24]+[.$BB86])+[.J$29]*[.$Z$5]*MAGNET([.J$24]+[.$BB86])+[.K$29]*[.$Z$5]*MAGNET([.K$24]+[.$BB86])+[.L$29]*[.$Z$5]*MAGNET([.L$24]+[.$BB86])+[.M$29]*[.$Z$5]*MAGNET([.M$24]+[.$BB86])+[.N$29]*[.$Z$5]*MAGNET([.N$24]+[.$BB86])+[.O$29]*[.$Z$5]*MAGNET([.O$24]+[.$BB86])+[.P$29]*[.$Z$5]*MAGNET([.P$24]+[.$BB86])+[.Q$29]*[.$Z$5]*MAGNET([.Q$24]+[.$BB86])+[.R$29]*[.$Z$5]*MAGNET([.R$24]+[.$BB86])+[.S$29]*[.$Z$5]*MAGNET([.S$24]+[.$BB86])+[.T$29]*[.$Z$5]*MAGNET([.T$24]+[.$BB86])+[.U$29]*[.$Z$5]*MAGNET([.U$24]+[.$BB86])+[.V$29]*[.$Z$5]*MAGNET([.V$24]+[.$BB86])+[.W$29]*[.$Z$5]*MAGNET([.W$24]+[.$BB86])+[.X$29]*[.$Z$5]*MAGNET([.X$24]+[.$BB86])+[.Y$29]*[.$Z$5]*MAGNET([.Y$24]+[.$BB86])+[.Z$29]*[.$Z$5]*MAGNET([.Z$24]+[.$BB86])+[.AA$29]*[.$Z$5]*MAGNET([.AA$24]+[.$BB86])+[.AB$29]*[.$Z$5]*MAGNET([.AB$24]+[.$BB86])+[.AC$29]*[.$Z$5]*MAGNET([.AC$24]+[.$BB86])+[.AD$29]*[.$Z$5]*MAGNET([.AD$24]+[.$BB86])+[.AE$29]*[.$Z$5]*MAGNET([.AE$24]+[.$BB86])+[.AF$29]*[.$Z$5]*MAGNET([.AF$24]+[.$BB86])+[.AG$29]*[.$Z$5]*MAGNET([.AG$24]+[.$BB86])+[.D$29]*[.$Z$5]*MAGNET([.D$24]+[.$BB86])+[.AH$29]*[.$Z$5]*MAGNET([.AH$24]+[.BB86]) +[.AI$29]*[.$Z$5]*MAGNET([.AI$24]+[.BB86]) +[.AJ$29]*[.$Z$5]*MAGNET([.AJ$24]+[.BB86]) +[.AK$29]*[.$Z$5]*MAGNET([.AK$24]+[.BB86]) +[.AL$29]*[.$Z$5]*MAGNET([.AL$24]+[.BB86]) +[.AM$29]*[.$Z$5]*MAGNET([.AM$24]+[.BB86]) +[.AN$29]*[.$Z$5]*MAGNET([.AN$24]+[.BB86]) +[.AO$29]*[.$Z$5]*MAGNET([.AO$24]+[.BB86]) +[.AP$29]*[.$Z$5]*MAGNET([.AP$24]+[.$BB86])&#10;+[.AQ$29]*[.$Z$5]*MAGNET([.AQ$24]+[.$BB86])&#10;+[.AR$29]*[.$Z$5]*MAGNET([.AR$24]+[.$BB86])&#10;+[.AS$29]*[.$Z$5]*MAGNET([.AS$24]+[.$BB86])&#10;+[.AT$29]*[.$Z$5]*MAGNET([.AT$24]+[.$BB86])&#10;+[.AU$29]*[.$Z$5]*MAGNET([.AU$24]+[.$BB86])&#10;+[.AV$29]*[.$Z$5]*MAGNET([.AV$24]+[.$BB86])&#10;+[.AW$29]*[.$Z$5]*MAGNET([.AW$24]+[.$BB86])&#10;+[.AX$29]*[.$Z$5]*MAGNET([.AX$24]+[.$BB86])&#10;+[.AY$29]*[.$Z$5]*MAGNET([.AY$24]+[.$BB86]) +RAND()*[.$BG$13]" office:value-type="float" office:value="46.6142553999647" calcext:value-type="float">
            <text:p>46.6142553999647</text:p>
          </table:table-cell>
          <table:table-cell table:style-name="ce71" table:formula="of:=[.E$30]*[.$Z$5]*MAGNET([.E$24]+[.$BB86])+[.F$30]*[.$Z$5]*MAGNET([.F$24]+[.$BB86])+[.G$30]*[.$Z$5]*MAGNET([.G$24]+[.$BB86])+[.H$30]*[.$Z$5]*MAGNET([.H$24]+[.$BB86])+[.I$30]*[.$Z$5]*MAGNET([.I$24]+[.$BB86])+[.J$30]*[.$Z$5]*MAGNET([.J$24]+[.$BB86])+[.K$30]*[.$Z$5]*MAGNET([.K$24]+[.$BB86])+[.L$30]*[.$Z$5]*MAGNET([.L$24]+[.$BB86])+[.M$30]*[.$Z$5]*MAGNET([.M$24]+[.$BB86])+[.N$30]*[.$Z$5]*MAGNET([.N$24]+[.$BB86])+[.O$30]*[.$Z$5]*MAGNET([.O$24]+[.$BB86])+[.P$30]*[.$Z$5]*MAGNET([.P$24]+[.$BB86])+[.Q$30]*[.$Z$5]*MAGNET([.Q$24]+[.$BB86])+[.R$30]*[.$Z$5]*MAGNET([.R$24]+[.$BB86])+[.S$30]*[.$Z$5]*MAGNET([.S$24]+[.$BB86])+[.T$30]*[.$Z$5]*MAGNET([.T$24]+[.$BB86])+[.U$30]*[.$Z$5]*MAGNET([.U$24]+[.$BB86])+[.V$30]*[.$Z$5]*MAGNET([.V$24]+[.$BB86])+[.W$30]*[.$Z$5]*MAGNET([.W$24]+[.$BB86])+[.X$30]*[.$Z$5]*MAGNET([.X$24]+[.$BB86])+[.Y$30]*[.$Z$5]*MAGNET([.Y$24]+[.$BB86])+[.Z$30]*[.$Z$5]*MAGNET([.Z$24]+[.$BB86])+[.AA$30]*[.$Z$5]*MAGNET([.AA$24]+[.$BB86])+[.AB$30]*[.$Z$5]*MAGNET([.AB$24]+[.$BB86])+[.AC$30]*[.$Z$5]*MAGNET([.AC$24]+[.$BB86])+[.AD$30]*[.$Z$5]*MAGNET([.AD$24]+[.$BB86])+[.AE$30]*[.$Z$5]*MAGNET([.AE$24]+[.$BB86])+[.AF$30]*[.$Z$5]*MAGNET([.AF$24]+[.$BB86])+[.AG$30]*[.$Z$5]*MAGNET([.AG$24]+[.$BB86])+[.D$30]*[.$Z$5]*MAGNET([.D$24]+[.$BB86])+[.AH$30]*[.$Z$5]*MAGNET([.AH$24]+[.BB86]) +[.AI$30]*[.$Z$5]*MAGNET([.AI$24]+[.BB86]) +[.AJ$30]*[.$Z$5]*MAGNET([.AJ$24]+[.BB86]) +[.AK$30]*[.$Z$5]*MAGNET([.AK$24]+[.BB86]) +[.AL$30]*[.$Z$5]*MAGNET([.AL$24]+[.BB86]) +[.AM$30]*[.$Z$5]*MAGNET([.AM$24]+[.BB86]) +[.AN$30]*[.$Z$5]*MAGNET([.AN$24]+[.BB86]) +[.AO$30]*[.$Z$5]*MAGNET([.AO$24]+[.BB86]) +[.AP$30]*[.$Z$5]*MAGNET([.AP$24]+[.$BB86])&#10;+[.AQ$30]*[.$Z$5]*MAGNET([.AQ$24]+[.$BB86])&#10;+[.AR$30]*[.$Z$5]*MAGNET([.AR$24]+[.$BB86])&#10;+[.AS$30]*[.$Z$5]*MAGNET([.AS$24]+[.$BB86])&#10;+[.AT$30]*[.$Z$5]*MAGNET([.AT$24]+[.$BB86])&#10;+[.AU$30]*[.$Z$5]*MAGNET([.AU$24]+[.$BB86])&#10;+[.AV$30]*[.$Z$5]*MAGNET([.AV$24]+[.$BB86])&#10;+[.AW$30]*[.$Z$5]*MAGNET([.AW$24]+[.$BB86])&#10;+[.AX$30]*[.$Z$5]*MAGNET([.AX$24]+[.$BB86])&#10;+[.AY$30]*[.$Z$5]*MAGNET([.AY$24]+[.$BB86]) +RAND()*[.$BH$13]" office:value-type="float" office:value="0" calcext:value-type="float">
            <text:p>0</text:p>
          </table:table-cell>
          <table:table-cell table:style-name="ce71" table:formula="of:=[.E$31]*[.$Z$5]*MAGNET([.E$24]+[.$BB86])+[.F$31]*[.$Z$5]*MAGNET([.F$24]+[.$BB86])+[.G$31]*[.$Z$5]*MAGNET([.G$24]+[.$BB86])+[.H$31]*[.$Z$5]*MAGNET([.H$24]+[.$BB86])+[.I$31]*[.$Z$5]*MAGNET([.I$24]+[.$BB86])+[.J$31]*[.$Z$5]*MAGNET([.J$24]+[.$BB86])+[.K$31]*[.$Z$5]*MAGNET([.K$24]+[.$BB86])+[.L$31]*[.$Z$5]*MAGNET([.L$24]+[.$BB86])+[.M$31]*[.$Z$5]*MAGNET([.M$24]+[.$BB86])+[.N$31]*[.$Z$5]*MAGNET([.N$24]+[.$BB86])+[.O$31]*[.$Z$5]*MAGNET([.O$24]+[.$BB86])+[.P$31]*[.$Z$5]*MAGNET([.P$24]+[.$BB86])+[.Q$31]*[.$Z$5]*MAGNET([.Q$24]+[.$BB86])+[.R$31]*[.$Z$5]*MAGNET([.R$24]+[.$BB86])+[.S$31]*[.$Z$5]*MAGNET([.S$24]+[.$BB86])+[.T$31]*[.$Z$5]*MAGNET([.T$24]+[.$BB86])+[.U$31]*[.$Z$5]*MAGNET([.U$24]+[.$BB86])+[.V$31]*[.$Z$5]*MAGNET([.V$24]+[.$BB86])+[.W$31]*[.$Z$5]*MAGNET([.W$24]+[.$BB86])+[.X$31]*[.$Z$5]*MAGNET([.X$24]+[.$BB86])+[.Y$31]*[.$Z$5]*MAGNET([.Y$24]+[.$BB86])+[.Z$31]*[.$Z$5]*MAGNET([.Z$24]+[.$BB86])+[.AA$31]*[.$Z$5]*MAGNET([.AA$24]+[.$BB86])+[.AB$31]*[.$Z$5]*MAGNET([.AB$24]+[.$BB86])+[.AC$31]*[.$Z$5]*MAGNET([.AC$24]+[.$BB86])+[.AD$31]*[.$Z$5]*MAGNET([.AD$24]+[.$BB86])+[.AE$31]*[.$Z$5]*MAGNET([.AE$24]+[.$BB86])+[.AF$31]*[.$Z$5]*MAGNET([.AF$24]+[.$BB86])+[.AG$31]*[.$Z$5]*MAGNET([.AG$24]+[.$BB86])+[.D$31]*[.$Z$5]*MAGNET([.D$24]+[.$BB86])+[.AH$31]*[.$Z$5]*MAGNET([.AH$24]+[.BB86]) +[.AI$31]*[.$Z$5]*MAGNET([.AI$24]+[.BB86]) +[.AJ$31]*[.$Z$5]*MAGNET([.AJ$24]+[.BB86]) +[.AK$31]*[.$Z$5]*MAGNET([.AK$24]+[.BB86]) +[.AL$31]*[.$Z$5]*MAGNET([.AL$24]+[.BB86]) +[.AM$31]*[.$Z$5]*MAGNET([.AM$24]+[.BB86]) +[.AN$31]*[.$Z$5]*MAGNET([.AN$24]+[.BB86]) +[.AO$31]*[.$Z$5]*MAGNET([.AO$24]+[.BB86]) +[.AP$31]*[.$Z$5]*MAGNET([.AP$24]+[.$BB86])&#10;+[.AQ$31]*[.$Z$5]*MAGNET([.AQ$24]+[.$BB86])&#10;+[.AR$31]*[.$Z$5]*MAGNET([.AR$24]+[.$BB86])&#10;+[.AS$31]*[.$Z$5]*MAGNET([.AS$24]+[.$BB86])&#10;+[.AT$31]*[.$Z$5]*MAGNET([.AT$24]+[.$BB86])&#10;+[.AU$31]*[.$Z$5]*MAGNET([.AU$24]+[.$BB86])&#10;+[.AV$31]*[.$Z$5]*MAGNET([.AV$24]+[.$BB86])&#10;+[.AW$31]*[.$Z$5]*MAGNET([.AW$24]+[.$BB86])&#10;+[.AX$31]*[.$Z$5]*MAGNET([.AX$24]+[.$BB86])&#10;+[.AY$31]*[.$Z$5]*MAGNET([.AY$24]+[.$BB86]) +RAND()*[.$BI$13]" office:value-type="float" office:value="0" calcext:value-type="float">
            <text:p>0</text:p>
          </table:table-cell>
          <table:table-cell table:style-name="ce71" table:formula="of:=[.E$32]*[.$Z$5]*MAGNET([.E$24]+[.$BB86])+[.F$32]*[.$Z$5]*MAGNET([.F$24]+[.$BB86])+[.G$32]*[.$Z$5]*MAGNET([.G$24]+[.$BB86])+[.H$32]*[.$Z$5]*MAGNET([.H$24]+[.$BB86])+[.I$32]*[.$Z$5]*MAGNET([.I$24]+[.$BB86])+[.J$32]*[.$Z$5]*MAGNET([.J$24]+[.$BB86])+[.K$32]*[.$Z$5]*MAGNET([.K$24]+[.$BB86])+[.L$32]*[.$Z$5]*MAGNET([.L$24]+[.$BB86])+[.M$32]*[.$Z$5]*MAGNET([.M$24]+[.$BB86])+[.N$32]*[.$Z$5]*MAGNET([.N$24]+[.$BB86])+[.O$32]*[.$Z$5]*MAGNET([.O$24]+[.$BB86])+[.P$32]*[.$Z$5]*MAGNET([.P$24]+[.$BB86])+[.Q$32]*[.$Z$5]*MAGNET([.Q$24]+[.$BB86])+[.R$32]*[.$Z$5]*MAGNET([.R$24]+[.$BB86])+[.S$32]*[.$Z$5]*MAGNET([.S$24]+[.$BB86])+[.T$32]*[.$Z$5]*MAGNET([.T$24]+[.$BB86])+[.U$32]*[.$Z$5]*MAGNET([.U$24]+[.$BB86])+[.V$32]*[.$Z$5]*MAGNET([.V$24]+[.$BB86])+[.W$32]*[.$Z$5]*MAGNET([.W$24]+[.$BB86])+[.X$32]*[.$Z$5]*MAGNET([.X$24]+[.$BB86])+[.Y$32]*[.$Z$5]*MAGNET([.Y$24]+[.$BB86])+[.Z$32]*[.$Z$5]*MAGNET([.Z$24]+[.$BB86])+[.AA$32]*[.$Z$5]*MAGNET([.AA$24]+[.$BB86])+[.AB$32]*[.$Z$5]*MAGNET([.AB$24]+[.$BB86])+[.AC$32]*[.$Z$5]*MAGNET([.AC$24]+[.$BB86])+[.AD$32]*[.$Z$5]*MAGNET([.AD$24]+[.$BB86])+[.AE$32]*[.$Z$5]*MAGNET([.AE$24]+[.$BB86])+[.AF$32]*[.$Z$5]*MAGNET([.AF$24]+[.$BB86])+[.AG$32]*[.$Z$5]*MAGNET([.AG$24]+[.$BB86])+[.D$32]*[.$Z$5]*MAGNET([.D$24]+[.$BB86])+[.AH$32]*[.$Z$5]*MAGNET([.AH$24]+[.BB86]) +[.AI$32]*[.$Z$5]*MAGNET([.AI$24]+[.BB86]) +[.AJ$32]*[.$Z$5]*MAGNET([.AJ$24]+[.BB86]) +[.AK$32]*[.$Z$5]*MAGNET([.AK$24]+[.BB86]) +[.AL$32]*[.$Z$5]*MAGNET([.AL$24]+[.BB86]) +[.AM$32]*[.$Z$5]*MAGNET([.AM$24]+[.BB86]) +[.AN$32]*[.$Z$5]*MAGNET([.AN$24]+[.BB86]) +[.AO$32]*[.$Z$5]*MAGNET([.AO$24]+[.BB86]) +[.AP$32]*[.$Z$5]*MAGNET([.AP$24]+[.$BB86])&#10;+[.AQ$32]*[.$Z$5]*MAGNET([.AQ$24]+[.$BB86])&#10;+[.AR$32]*[.$Z$5]*MAGNET([.AR$24]+[.$BB86])&#10;+[.AS$32]*[.$Z$5]*MAGNET([.AS$24]+[.$BB86])&#10;+[.AT$32]*[.$Z$5]*MAGNET([.AT$24]+[.$BB86])&#10;+[.AU$32]*[.$Z$5]*MAGNET([.AU$24]+[.$BB86])&#10;+[.AV$32]*[.$Z$5]*MAGNET([.AV$24]+[.$BB86])&#10;+[.AW$32]*[.$Z$5]*MAGNET([.AW$24]+[.$BB86])&#10;+[.AX$32]*[.$Z$5]*MAGNET([.AX$24]+[.$BB86])&#10;+[.AY$32]*[.$Z$5]*MAGNET([.AY$24]+[.$BB8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6]+0.002" office:value-type="float" office:value="0.144" calcext:value-type="float">
            <text:p>0.144</text:p>
          </table:table-cell>
          <table:table-cell table:formula="of:=[.BA87]*[.$D$6]" office:value-type="float" office:value="7.23822947387089" calcext:value-type="float">
            <text:p>7.238</text:p>
          </table:table-cell>
          <table:table-cell table:formula="of:=[.D$25]*[.$Z$5]*MAGNET([.D$24]+[.BB87])+[.E$25]*[.$Z$5]*MAGNET([.E$24]+[.BB87])+[.F$25]*[.$Z$5]*MAGNET([.F$24]+[.BB87])+[.G$25]*[.$Z$5]*MAGNET([.G$24]+[.BB87])+[.H$25]*[.$Z$5]*MAGNET([.H$24]+[.BB87])+[.I$25]*[.$Z$5]*MAGNET([.I$24]+[.BB87])+[.J$25]*[.$Z$5]*MAGNET([.J$24]+[.BB87])+[.K$25]*[.$Z$5]*MAGNET([.K$24]+[.BB87])+[.L$25]*[.$Z$5]*MAGNET([.L$24]+[.BB87])+[.M$25]*[.$Z$5]*MAGNET([.M$24]+[.BB87])+[.N$25]*[.$Z$5]*MAGNET([.N$24]+[.BB87])+[.O$25]*[.$Z$5]*MAGNET([.O$24]+[.BB87])+[.P$25]*[.$Z$5]*MAGNET([.P$24]+[.BB87])+[.Q$25]*[.$Z$5]*MAGNET([.Q$24]+[.BB87])+[.R$25]*[.$Z$5]*MAGNET([.R$24]+[.BB87])+[.S$25]*[.$Z$5]*MAGNET([.S$24]+[.BB87])+[.T$25]*[.$Z$5]*MAGNET([.T$24]+[.BB87])+[.U$25]*[.$Z$5]*MAGNET([.U$24]+[.BB87])+[.V$25]*[.$Z$5]*MAGNET([.V$24]+[.BB87])+[.W$25]*[.$Z$5]*MAGNET([.W$24]+[.BB87])+[.X$25]*[.$Z$5]*MAGNET([.X$24]+[.BB87])+[.Y$25]*[.$Z$5]*MAGNET([.Y$24]+[.BB87])+[.Z$25]*[.$Z$5]*MAGNET([.Z$24]+[.BB87])+[.AA$25]*[.$Z$5]*MAGNET([.AA$24]+[.BB87])+[.AB$25]*[.$Z$5]*MAGNET([.AB$24]+[.BB87])+[.AC$25]*[.$Z$5]*MAGNET([.AC$24]+[.BB87])+[.AD$25]*[.$Z$5]*MAGNET([.AD$24]+[.BB87])+[.AE$25]*[.$Z$5]*MAGNET([.AE$24]+[.BB87])+[.AF$25]*[.$Z$5]*MAGNET([.AF$24]+[.BB87])+[.AG$25]*[.$Z$5]*MAGNET([.AG$24]+[.BB87])+[.AH$25]*[.$Z$5]*MAGNET([.AH$24]+[.BB87]) +[.AI$25]*[.$Z$5]*MAGNET([.AI$24]+[.BB87]) +[.AJ$25]*[.$Z$5]*MAGNET([.AJ$24]+[.BB87]) +[.AK$25]*[.$Z$5]*MAGNET([.AK$24]+[.BB87]) +[.AL$25]*[.$Z$5]*MAGNET([.AL$24]+[.BB87]) +[.AM$25]*[.$Z$5]*MAGNET([.AM$24]+[.BB87]) +[.AN$25]*[.$Z$5]*MAGNET([.AN$24]+[.BB87]) +[.AO$25]*[.$Z$5]*MAGNET([.AO$24]+[.BB87])+RAND()*[.$BC$13]+[.AP$25]*[.$Z$5]*MAGNET([.AP$24]+[.BB87])&#10;+[.AQ$25]*[.$Z$5]*MAGNET([.AQ$24]+[.BB87])&#10;+[.AR$25]*[.$Z$5]*MAGNET([.AR$24]+[.BB87])&#10;+[.AS$25]*[.$Z$5]*MAGNET([.AS$24]+[.BB87])&#10;+[.AT$25]*[.$Z$5]*MAGNET([.AT$24]+[.BB87])&#10;+[.AU$25]*[.$Z$5]*MAGNET([.AU$24]+[.BB87])&#10;+[.AV$25]*[.$Z$5]*MAGNET([.AV$24]+[.BB87])&#10;+[.AW$25]*[.$Z$5]*MAGNET([.AW$24]+[.BB87])&#10;+[.AX$25]*[.$Z$5]*MAGNET([.AX$24]+[.BB87])&#10;+[.AY$25]*[.$Z$5]*MAGNET([.AY$24]+[.BB87])" office:value-type="float" office:value="61.2236949925067" calcext:value-type="float">
            <text:p>61.22</text:p>
          </table:table-cell>
          <table:table-cell table:style-name="ce70" table:formula="of:=[.E$26]*[.$Z$5]*MAGNET([.E$24]+[.$BB87])+[.F$26]*[.$Z$5]*MAGNET([.F$24]+[.$BB87])+[.G$26]*[.$Z$5]*MAGNET([.G$24]+[.$BB87])+[.H$26]*[.$Z$5]*MAGNET([.H$24]+[.$BB87])+[.I$26]*[.$Z$5]*MAGNET([.I$24]+[.$BB87])+[.J$26]*[.$Z$5]*MAGNET([.J$24]+[.$BB87])+[.K$26]*[.$Z$5]*MAGNET([.K$24]+[.$BB87])+[.L$26]*[.$Z$5]*MAGNET([.L$24]+[.$BB87])+[.M$26]*[.$Z$5]*MAGNET([.M$24]+[.$BB87])+[.N$26]*[.$Z$5]*MAGNET([.N$24]+[.$BB87])+[.O$26]*[.$Z$5]*MAGNET([.O$24]+[.$BB87])+[.P$26]*[.$Z$5]*MAGNET([.P$24]+[.$BB87])+[.Q$26]*[.$Z$5]*MAGNET([.Q$24]+[.$BB87])+[.R$26]*[.$Z$5]*MAGNET([.R$24]+[.$BB87])+[.S$26]*[.$Z$5]*MAGNET([.S$24]+[.$BB87])+[.T$26]*[.$Z$5]*MAGNET([.T$24]+[.$BB87])+[.U$26]*[.$Z$5]*MAGNET([.U$24]+[.$BB87])+[.V$26]*[.$Z$5]*MAGNET([.V$24]+[.$BB87])+[.W$26]*[.$Z$5]*MAGNET([.W$24]+[.$BB87])+[.X$26]*[.$Z$5]*MAGNET([.X$24]+[.$BB87])+[.Y$26]*[.$Z$5]*MAGNET([.Y$24]+[.$BB87])+[.Z$26]*[.$Z$5]*MAGNET([.Z$24]+[.$BB87])+[.AA$26]*[.$Z$5]*MAGNET([.AA$24]+[.$BB87])+[.AB$26]*[.$Z$5]*MAGNET([.AB$24]+[.$BB87])+[.AC$26]*[.$Z$5]*MAGNET([.AC$24]+[.$BB87])+[.AD$26]*[.$Z$5]*MAGNET([.AD$24]+[.$BB87])+[.AE$26]*[.$Z$5]*MAGNET([.AE$24]+[.$BB87])+[.AF$26]*[.$Z$5]*MAGNET([.AF$24]+[.$BB87])+[.AG$26]*[.$Z$5]*MAGNET([.AG$24]+[.$BB87])+[.D$26]*[.$Z$5]*MAGNET([.D$24]+[.$BB87])+[.AH$26]*[.$Z$5]*MAGNET([.AH$24]+[.BB87]) +[.AI$26]*[.$Z$5]*MAGNET([.AI$24]+[.BB87]) +[.AJ$26]*[.$Z$5]*MAGNET([.AJ$24]+[.BB87]) +[.AK$26]*[.$Z$5]*MAGNET([.AK$24]+[.BB87]) +[.AL$26]*[.$Z$5]*MAGNET([.AL$24]+[.BB87]) +[.AM$26]*[.$Z$5]*MAGNET([.AM$24]+[.BB87]) +[.AN$26]*[.$Z$5]*MAGNET([.AN$24]+[.BB87]) +[.AO$26]*[.$Z$5]*MAGNET([.AO$24]+[.BB87]) +[.AP$26]*[.$Z$5]*MAGNET([.AP$24]+[.$BB87])&#10;+[.AQ$26]*[.$Z$5]*MAGNET([.AQ$24]+[.$BB87])&#10;+[.AR$26]*[.$Z$5]*MAGNET([.AR$24]+[.$BB87])&#10;+[.AS$26]*[.$Z$5]*MAGNET([.AS$24]+[.$BB87])&#10;+[.AT$26]*[.$Z$5]*MAGNET([.AT$24]+[.$BB87])&#10;+[.AU$26]*[.$Z$5]*MAGNET([.AU$24]+[.$BB87])&#10;+[.AV$26]*[.$Z$5]*MAGNET([.AV$24]+[.$BB87])&#10;+[.AW$26]*[.$Z$5]*MAGNET([.AW$24]+[.$BB87])&#10;+[.AX$26]*[.$Z$5]*MAGNET([.AX$24]+[.$BB87])&#10;+[.AY$26]*[.$Z$5]*MAGNET([.AY$24]+[.$BB87]) +RAND()*[.$BD$13]" office:value-type="float" office:value="39.9368821753823" calcext:value-type="float">
            <text:p>39.94</text:p>
          </table:table-cell>
          <table:table-cell table:style-name="ce71" table:formula="of:=[.E$27]*[.$Z$5]*MAGNET([.E$24]+[.$BB87])+[.F$27]*[.$Z$5]*MAGNET([.F$24]+[.$BB87])+[.G$27]*[.$Z$5]*MAGNET([.G$24]+[.$BB87])+[.H$27]*[.$Z$5]*MAGNET([.H$24]+[.$BB87])+[.I$27]*[.$Z$5]*MAGNET([.I$24]+[.$BB87])+[.J$27]*[.$Z$5]*MAGNET([.J$24]+[.$BB87])+[.K$27]*[.$Z$5]*MAGNET([.K$24]+[.$BB87])+[.L$27]*[.$Z$5]*MAGNET([.L$24]+[.$BB87])+[.M$27]*[.$Z$5]*MAGNET([.M$24]+[.$BB87])+[.N$27]*[.$Z$5]*MAGNET([.N$24]+[.$BB87])+[.O$27]*[.$Z$5]*MAGNET([.O$24]+[.$BB87])+[.P$27]*[.$Z$5]*MAGNET([.P$24]+[.$BB87])+[.Q$27]*[.$Z$5]*MAGNET([.Q$24]+[.$BB87])+[.R$27]*[.$Z$5]*MAGNET([.R$24]+[.$BB87])+[.S$27]*[.$Z$5]*MAGNET([.S$24]+[.$BB87])+[.T$27]*[.$Z$5]*MAGNET([.T$24]+[.$BB87])+[.U$27]*[.$Z$5]*MAGNET([.U$24]+[.$BB87])+[.V$27]*[.$Z$5]*MAGNET([.V$24]+[.$BB87])+[.W$27]*[.$Z$5]*MAGNET([.W$24]+[.$BB87])+[.X$27]*[.$Z$5]*MAGNET([.X$24]+[.$BB87])+[.Y$27]*[.$Z$5]*MAGNET([.Y$24]+[.$BB87])+[.Z$27]*[.$Z$5]*MAGNET([.Z$24]+[.$BB87])+[.AA$27]*[.$Z$5]*MAGNET([.AA$24]+[.$BB87])+[.AB$27]*[.$Z$5]*MAGNET([.AB$24]+[.$BB87])+[.AC$27]*[.$Z$5]*MAGNET([.AC$24]+[.$BB87])+[.AD$27]*[.$Z$5]*MAGNET([.AD$24]+[.$BB87])+[.AE$27]*[.$Z$5]*MAGNET([.AE$24]+[.$BB87])+[.AF$27]*[.$Z$5]*MAGNET([.AF$24]+[.$BB87])+[.AG$27]*[.$Z$5]*MAGNET([.AG$24]+[.$BB87])+[.D$27]*[.$Z$5]*MAGNET([.D$24]+[.$BB87])+[.AH$27]*[.$Z$5]*MAGNET([.AH$24]+[.BB87]) +[.AI$27]*[.$Z$5]*MAGNET([.AI$24]+[.BB87]) +[.AJ$27]*[.$Z$5]*MAGNET([.AJ$24]+[.BB87]) +[.AK$27]*[.$Z$5]*MAGNET([.AK$24]+[.BB87]) +[.AL$27]*[.$Z$5]*MAGNET([.AL$24]+[.BB87]) +[.AM$27]*[.$Z$5]*MAGNET([.AM$24]+[.BB87]) +[.AN$27]*[.$Z$5]*MAGNET([.AN$24]+[.BB87]) +[.AO$27]*[.$Z$5]*MAGNET([.AO$24]+[.BB87]) +[.AP$27]*[.$Z$5]*MAGNET([.AP$24]+[.$BB87])&#10;+[.AQ$27]*[.$Z$5]*MAGNET([.AQ$24]+[.$BB87])&#10;+[.AR$27]*[.$Z$5]*MAGNET([.AR$24]+[.$BB87])&#10;+[.AS$27]*[.$Z$5]*MAGNET([.AS$24]+[.$BB87])&#10;+[.AT$27]*[.$Z$5]*MAGNET([.AT$24]+[.$BB87])&#10;+[.AU$27]*[.$Z$5]*MAGNET([.AU$24]+[.$BB87])&#10;+[.AV$27]*[.$Z$5]*MAGNET([.AV$24]+[.$BB87])&#10;+[.AW$27]*[.$Z$5]*MAGNET([.AW$24]+[.$BB87])&#10;+[.AX$27]*[.$Z$5]*MAGNET([.AX$24]+[.$BB87])&#10;+[.AY$27]*[.$Z$5]*MAGNET([.AY$24]+[.$BB87]) +RAND()*[.$BE$13]" office:value-type="float" office:value="-124.358354516768" calcext:value-type="float">
            <text:p>-124.358354516768</text:p>
          </table:table-cell>
          <table:table-cell table:style-name="ce71" table:formula="of:=[.E$28]*[.$Z$5]*MAGNET([.E$24]+[.$BB87])+[.F$28]*[.$Z$5]*MAGNET([.F$24]+[.$BB87])+[.G$28]*[.$Z$5]*MAGNET([.G$24]+[.$BB87])+[.H$28]*[.$Z$5]*MAGNET([.H$24]+[.$BB87])+[.I$28]*[.$Z$5]*MAGNET([.I$24]+[.$BB87])+[.J$28]*[.$Z$5]*MAGNET([.J$24]+[.$BB87])+[.K$28]*[.$Z$5]*MAGNET([.K$24]+[.$BB87])+[.L$28]*[.$Z$5]*MAGNET([.L$24]+[.$BB87])+[.M$28]*[.$Z$5]*MAGNET([.M$24]+[.$BB87])+[.N$28]*[.$Z$5]*MAGNET([.N$24]+[.$BB87])+[.O$28]*[.$Z$5]*MAGNET([.O$24]+[.$BB87])+[.P$28]*[.$Z$5]*MAGNET([.P$24]+[.$BB87])+[.Q$28]*[.$Z$5]*MAGNET([.Q$24]+[.$BB87])+[.R$28]*[.$Z$5]*MAGNET([.R$24]+[.$BB87])+[.S$28]*[.$Z$5]*MAGNET([.S$24]+[.$BB87])+[.T$28]*[.$Z$5]*MAGNET([.T$24]+[.$BB87])+[.U$28]*[.$Z$5]*MAGNET([.U$24]+[.$BB87])+[.V$28]*[.$Z$5]*MAGNET([.V$24]+[.$BB87])+[.W$28]*[.$Z$5]*MAGNET([.W$24]+[.$BB87])+[.X$28]*[.$Z$5]*MAGNET([.X$24]+[.$BB87])+[.Y$28]*[.$Z$5]*MAGNET([.Y$24]+[.$BB87])+[.Z$28]*[.$Z$5]*MAGNET([.Z$24]+[.$BB87])+[.AA$28]*[.$Z$5]*MAGNET([.AA$24]+[.$BB87])+[.AB$28]*[.$Z$5]*MAGNET([.AB$24]+[.$BB87])+[.AC$28]*[.$Z$5]*MAGNET([.AC$24]+[.$BB87])+[.AD$28]*[.$Z$5]*MAGNET([.AD$24]+[.$BB87])+[.AE$28]*[.$Z$5]*MAGNET([.AE$24]+[.$BB87])+[.AF$28]*[.$Z$5]*MAGNET([.AF$24]+[.$BB87])+[.AG$28]*[.$Z$5]*MAGNET([.AG$24]+[.$BB87])+[.D$28]*[.$Z$5]*MAGNET([.D$24]+[.$BB87])+[.AH$28]*[.$Z$5]*MAGNET([.AH$24]+[.BB87]) +[.AI$28]*[.$Z$5]*MAGNET([.AI$24]+[.BB87]) +[.AJ$28]*[.$Z$5]*MAGNET([.AJ$24]+[.BB87]) +[.AK$28]*[.$Z$5]*MAGNET([.AK$24]+[.BB87]) +[.AL$28]*[.$Z$5]*MAGNET([.AL$24]+[.BB87]) +[.AM$28]*[.$Z$5]*MAGNET([.AM$24]+[.BB87]) +[.AN$28]*[.$Z$5]*MAGNET([.AN$24]+[.BB87]) +[.AO$28]*[.$Z$5]*MAGNET([.AO$24]+[.BB87]) +[.AP$28]*[.$Z$5]*MAGNET([.AP$24]+[.$BB87])&#10;+[.AQ$28]*[.$Z$5]*MAGNET([.AQ$24]+[.$BB87])&#10;+[.AR$28]*[.$Z$5]*MAGNET([.AR$24]+[.$BB87])&#10;+[.AS$28]*[.$Z$5]*MAGNET([.AS$24]+[.$BB87])&#10;+[.AT$28]*[.$Z$5]*MAGNET([.AT$24]+[.$BB87])&#10;+[.AU$28]*[.$Z$5]*MAGNET([.AU$24]+[.$BB87])&#10;+[.AV$28]*[.$Z$5]*MAGNET([.AV$24]+[.$BB87])&#10;+[.AW$28]*[.$Z$5]*MAGNET([.AW$24]+[.$BB87])&#10;+[.AX$28]*[.$Z$5]*MAGNET([.AX$24]+[.$BB87])&#10;+[.AY$28]*[.$Z$5]*MAGNET([.AY$24]+[.$BB87]) +RAND()*[.$BF$13]" office:value-type="float" office:value="-18.2614178940157" calcext:value-type="float">
            <text:p>-18.2614178940157</text:p>
          </table:table-cell>
          <table:table-cell table:style-name="ce71" table:formula="of:=[.E$29]*[.$Z$5]*MAGNET([.E$24]+[.$BB87])+[.F$29]*[.$Z$5]*MAGNET([.F$24]+[.$BB87])+[.G$29]*[.$Z$5]*MAGNET([.G$24]+[.$BB87])+[.H$29]*[.$Z$5]*MAGNET([.H$24]+[.$BB87])+[.I$29]*[.$Z$5]*MAGNET([.I$24]+[.$BB87])+[.J$29]*[.$Z$5]*MAGNET([.J$24]+[.$BB87])+[.K$29]*[.$Z$5]*MAGNET([.K$24]+[.$BB87])+[.L$29]*[.$Z$5]*MAGNET([.L$24]+[.$BB87])+[.M$29]*[.$Z$5]*MAGNET([.M$24]+[.$BB87])+[.N$29]*[.$Z$5]*MAGNET([.N$24]+[.$BB87])+[.O$29]*[.$Z$5]*MAGNET([.O$24]+[.$BB87])+[.P$29]*[.$Z$5]*MAGNET([.P$24]+[.$BB87])+[.Q$29]*[.$Z$5]*MAGNET([.Q$24]+[.$BB87])+[.R$29]*[.$Z$5]*MAGNET([.R$24]+[.$BB87])+[.S$29]*[.$Z$5]*MAGNET([.S$24]+[.$BB87])+[.T$29]*[.$Z$5]*MAGNET([.T$24]+[.$BB87])+[.U$29]*[.$Z$5]*MAGNET([.U$24]+[.$BB87])+[.V$29]*[.$Z$5]*MAGNET([.V$24]+[.$BB87])+[.W$29]*[.$Z$5]*MAGNET([.W$24]+[.$BB87])+[.X$29]*[.$Z$5]*MAGNET([.X$24]+[.$BB87])+[.Y$29]*[.$Z$5]*MAGNET([.Y$24]+[.$BB87])+[.Z$29]*[.$Z$5]*MAGNET([.Z$24]+[.$BB87])+[.AA$29]*[.$Z$5]*MAGNET([.AA$24]+[.$BB87])+[.AB$29]*[.$Z$5]*MAGNET([.AB$24]+[.$BB87])+[.AC$29]*[.$Z$5]*MAGNET([.AC$24]+[.$BB87])+[.AD$29]*[.$Z$5]*MAGNET([.AD$24]+[.$BB87])+[.AE$29]*[.$Z$5]*MAGNET([.AE$24]+[.$BB87])+[.AF$29]*[.$Z$5]*MAGNET([.AF$24]+[.$BB87])+[.AG$29]*[.$Z$5]*MAGNET([.AG$24]+[.$BB87])+[.D$29]*[.$Z$5]*MAGNET([.D$24]+[.$BB87])+[.AH$29]*[.$Z$5]*MAGNET([.AH$24]+[.BB87]) +[.AI$29]*[.$Z$5]*MAGNET([.AI$24]+[.BB87]) +[.AJ$29]*[.$Z$5]*MAGNET([.AJ$24]+[.BB87]) +[.AK$29]*[.$Z$5]*MAGNET([.AK$24]+[.BB87]) +[.AL$29]*[.$Z$5]*MAGNET([.AL$24]+[.BB87]) +[.AM$29]*[.$Z$5]*MAGNET([.AM$24]+[.BB87]) +[.AN$29]*[.$Z$5]*MAGNET([.AN$24]+[.BB87]) +[.AO$29]*[.$Z$5]*MAGNET([.AO$24]+[.BB87]) +[.AP$29]*[.$Z$5]*MAGNET([.AP$24]+[.$BB87])&#10;+[.AQ$29]*[.$Z$5]*MAGNET([.AQ$24]+[.$BB87])&#10;+[.AR$29]*[.$Z$5]*MAGNET([.AR$24]+[.$BB87])&#10;+[.AS$29]*[.$Z$5]*MAGNET([.AS$24]+[.$BB87])&#10;+[.AT$29]*[.$Z$5]*MAGNET([.AT$24]+[.$BB87])&#10;+[.AU$29]*[.$Z$5]*MAGNET([.AU$24]+[.$BB87])&#10;+[.AV$29]*[.$Z$5]*MAGNET([.AV$24]+[.$BB87])&#10;+[.AW$29]*[.$Z$5]*MAGNET([.AW$24]+[.$BB87])&#10;+[.AX$29]*[.$Z$5]*MAGNET([.AX$24]+[.$BB87])&#10;+[.AY$29]*[.$Z$5]*MAGNET([.AY$24]+[.$BB87]) +RAND()*[.$BG$13]" office:value-type="float" office:value="46.9980187166492" calcext:value-type="float">
            <text:p>46.9980187166492</text:p>
          </table:table-cell>
          <table:table-cell table:style-name="ce71" table:formula="of:=[.E$30]*[.$Z$5]*MAGNET([.E$24]+[.$BB87])+[.F$30]*[.$Z$5]*MAGNET([.F$24]+[.$BB87])+[.G$30]*[.$Z$5]*MAGNET([.G$24]+[.$BB87])+[.H$30]*[.$Z$5]*MAGNET([.H$24]+[.$BB87])+[.I$30]*[.$Z$5]*MAGNET([.I$24]+[.$BB87])+[.J$30]*[.$Z$5]*MAGNET([.J$24]+[.$BB87])+[.K$30]*[.$Z$5]*MAGNET([.K$24]+[.$BB87])+[.L$30]*[.$Z$5]*MAGNET([.L$24]+[.$BB87])+[.M$30]*[.$Z$5]*MAGNET([.M$24]+[.$BB87])+[.N$30]*[.$Z$5]*MAGNET([.N$24]+[.$BB87])+[.O$30]*[.$Z$5]*MAGNET([.O$24]+[.$BB87])+[.P$30]*[.$Z$5]*MAGNET([.P$24]+[.$BB87])+[.Q$30]*[.$Z$5]*MAGNET([.Q$24]+[.$BB87])+[.R$30]*[.$Z$5]*MAGNET([.R$24]+[.$BB87])+[.S$30]*[.$Z$5]*MAGNET([.S$24]+[.$BB87])+[.T$30]*[.$Z$5]*MAGNET([.T$24]+[.$BB87])+[.U$30]*[.$Z$5]*MAGNET([.U$24]+[.$BB87])+[.V$30]*[.$Z$5]*MAGNET([.V$24]+[.$BB87])+[.W$30]*[.$Z$5]*MAGNET([.W$24]+[.$BB87])+[.X$30]*[.$Z$5]*MAGNET([.X$24]+[.$BB87])+[.Y$30]*[.$Z$5]*MAGNET([.Y$24]+[.$BB87])+[.Z$30]*[.$Z$5]*MAGNET([.Z$24]+[.$BB87])+[.AA$30]*[.$Z$5]*MAGNET([.AA$24]+[.$BB87])+[.AB$30]*[.$Z$5]*MAGNET([.AB$24]+[.$BB87])+[.AC$30]*[.$Z$5]*MAGNET([.AC$24]+[.$BB87])+[.AD$30]*[.$Z$5]*MAGNET([.AD$24]+[.$BB87])+[.AE$30]*[.$Z$5]*MAGNET([.AE$24]+[.$BB87])+[.AF$30]*[.$Z$5]*MAGNET([.AF$24]+[.$BB87])+[.AG$30]*[.$Z$5]*MAGNET([.AG$24]+[.$BB87])+[.D$30]*[.$Z$5]*MAGNET([.D$24]+[.$BB87])+[.AH$30]*[.$Z$5]*MAGNET([.AH$24]+[.BB87]) +[.AI$30]*[.$Z$5]*MAGNET([.AI$24]+[.BB87]) +[.AJ$30]*[.$Z$5]*MAGNET([.AJ$24]+[.BB87]) +[.AK$30]*[.$Z$5]*MAGNET([.AK$24]+[.BB87]) +[.AL$30]*[.$Z$5]*MAGNET([.AL$24]+[.BB87]) +[.AM$30]*[.$Z$5]*MAGNET([.AM$24]+[.BB87]) +[.AN$30]*[.$Z$5]*MAGNET([.AN$24]+[.BB87]) +[.AO$30]*[.$Z$5]*MAGNET([.AO$24]+[.BB87]) +[.AP$30]*[.$Z$5]*MAGNET([.AP$24]+[.$BB87])&#10;+[.AQ$30]*[.$Z$5]*MAGNET([.AQ$24]+[.$BB87])&#10;+[.AR$30]*[.$Z$5]*MAGNET([.AR$24]+[.$BB87])&#10;+[.AS$30]*[.$Z$5]*MAGNET([.AS$24]+[.$BB87])&#10;+[.AT$30]*[.$Z$5]*MAGNET([.AT$24]+[.$BB87])&#10;+[.AU$30]*[.$Z$5]*MAGNET([.AU$24]+[.$BB87])&#10;+[.AV$30]*[.$Z$5]*MAGNET([.AV$24]+[.$BB87])&#10;+[.AW$30]*[.$Z$5]*MAGNET([.AW$24]+[.$BB87])&#10;+[.AX$30]*[.$Z$5]*MAGNET([.AX$24]+[.$BB87])&#10;+[.AY$30]*[.$Z$5]*MAGNET([.AY$24]+[.$BB87]) +RAND()*[.$BH$13]" office:value-type="float" office:value="0" calcext:value-type="float">
            <text:p>0</text:p>
          </table:table-cell>
          <table:table-cell table:style-name="ce71" table:formula="of:=[.E$31]*[.$Z$5]*MAGNET([.E$24]+[.$BB87])+[.F$31]*[.$Z$5]*MAGNET([.F$24]+[.$BB87])+[.G$31]*[.$Z$5]*MAGNET([.G$24]+[.$BB87])+[.H$31]*[.$Z$5]*MAGNET([.H$24]+[.$BB87])+[.I$31]*[.$Z$5]*MAGNET([.I$24]+[.$BB87])+[.J$31]*[.$Z$5]*MAGNET([.J$24]+[.$BB87])+[.K$31]*[.$Z$5]*MAGNET([.K$24]+[.$BB87])+[.L$31]*[.$Z$5]*MAGNET([.L$24]+[.$BB87])+[.M$31]*[.$Z$5]*MAGNET([.M$24]+[.$BB87])+[.N$31]*[.$Z$5]*MAGNET([.N$24]+[.$BB87])+[.O$31]*[.$Z$5]*MAGNET([.O$24]+[.$BB87])+[.P$31]*[.$Z$5]*MAGNET([.P$24]+[.$BB87])+[.Q$31]*[.$Z$5]*MAGNET([.Q$24]+[.$BB87])+[.R$31]*[.$Z$5]*MAGNET([.R$24]+[.$BB87])+[.S$31]*[.$Z$5]*MAGNET([.S$24]+[.$BB87])+[.T$31]*[.$Z$5]*MAGNET([.T$24]+[.$BB87])+[.U$31]*[.$Z$5]*MAGNET([.U$24]+[.$BB87])+[.V$31]*[.$Z$5]*MAGNET([.V$24]+[.$BB87])+[.W$31]*[.$Z$5]*MAGNET([.W$24]+[.$BB87])+[.X$31]*[.$Z$5]*MAGNET([.X$24]+[.$BB87])+[.Y$31]*[.$Z$5]*MAGNET([.Y$24]+[.$BB87])+[.Z$31]*[.$Z$5]*MAGNET([.Z$24]+[.$BB87])+[.AA$31]*[.$Z$5]*MAGNET([.AA$24]+[.$BB87])+[.AB$31]*[.$Z$5]*MAGNET([.AB$24]+[.$BB87])+[.AC$31]*[.$Z$5]*MAGNET([.AC$24]+[.$BB87])+[.AD$31]*[.$Z$5]*MAGNET([.AD$24]+[.$BB87])+[.AE$31]*[.$Z$5]*MAGNET([.AE$24]+[.$BB87])+[.AF$31]*[.$Z$5]*MAGNET([.AF$24]+[.$BB87])+[.AG$31]*[.$Z$5]*MAGNET([.AG$24]+[.$BB87])+[.D$31]*[.$Z$5]*MAGNET([.D$24]+[.$BB87])+[.AH$31]*[.$Z$5]*MAGNET([.AH$24]+[.BB87]) +[.AI$31]*[.$Z$5]*MAGNET([.AI$24]+[.BB87]) +[.AJ$31]*[.$Z$5]*MAGNET([.AJ$24]+[.BB87]) +[.AK$31]*[.$Z$5]*MAGNET([.AK$24]+[.BB87]) +[.AL$31]*[.$Z$5]*MAGNET([.AL$24]+[.BB87]) +[.AM$31]*[.$Z$5]*MAGNET([.AM$24]+[.BB87]) +[.AN$31]*[.$Z$5]*MAGNET([.AN$24]+[.BB87]) +[.AO$31]*[.$Z$5]*MAGNET([.AO$24]+[.BB87]) +[.AP$31]*[.$Z$5]*MAGNET([.AP$24]+[.$BB87])&#10;+[.AQ$31]*[.$Z$5]*MAGNET([.AQ$24]+[.$BB87])&#10;+[.AR$31]*[.$Z$5]*MAGNET([.AR$24]+[.$BB87])&#10;+[.AS$31]*[.$Z$5]*MAGNET([.AS$24]+[.$BB87])&#10;+[.AT$31]*[.$Z$5]*MAGNET([.AT$24]+[.$BB87])&#10;+[.AU$31]*[.$Z$5]*MAGNET([.AU$24]+[.$BB87])&#10;+[.AV$31]*[.$Z$5]*MAGNET([.AV$24]+[.$BB87])&#10;+[.AW$31]*[.$Z$5]*MAGNET([.AW$24]+[.$BB87])&#10;+[.AX$31]*[.$Z$5]*MAGNET([.AX$24]+[.$BB87])&#10;+[.AY$31]*[.$Z$5]*MAGNET([.AY$24]+[.$BB87]) +RAND()*[.$BI$13]" office:value-type="float" office:value="0" calcext:value-type="float">
            <text:p>0</text:p>
          </table:table-cell>
          <table:table-cell table:style-name="ce71" table:formula="of:=[.E$32]*[.$Z$5]*MAGNET([.E$24]+[.$BB87])+[.F$32]*[.$Z$5]*MAGNET([.F$24]+[.$BB87])+[.G$32]*[.$Z$5]*MAGNET([.G$24]+[.$BB87])+[.H$32]*[.$Z$5]*MAGNET([.H$24]+[.$BB87])+[.I$32]*[.$Z$5]*MAGNET([.I$24]+[.$BB87])+[.J$32]*[.$Z$5]*MAGNET([.J$24]+[.$BB87])+[.K$32]*[.$Z$5]*MAGNET([.K$24]+[.$BB87])+[.L$32]*[.$Z$5]*MAGNET([.L$24]+[.$BB87])+[.M$32]*[.$Z$5]*MAGNET([.M$24]+[.$BB87])+[.N$32]*[.$Z$5]*MAGNET([.N$24]+[.$BB87])+[.O$32]*[.$Z$5]*MAGNET([.O$24]+[.$BB87])+[.P$32]*[.$Z$5]*MAGNET([.P$24]+[.$BB87])+[.Q$32]*[.$Z$5]*MAGNET([.Q$24]+[.$BB87])+[.R$32]*[.$Z$5]*MAGNET([.R$24]+[.$BB87])+[.S$32]*[.$Z$5]*MAGNET([.S$24]+[.$BB87])+[.T$32]*[.$Z$5]*MAGNET([.T$24]+[.$BB87])+[.U$32]*[.$Z$5]*MAGNET([.U$24]+[.$BB87])+[.V$32]*[.$Z$5]*MAGNET([.V$24]+[.$BB87])+[.W$32]*[.$Z$5]*MAGNET([.W$24]+[.$BB87])+[.X$32]*[.$Z$5]*MAGNET([.X$24]+[.$BB87])+[.Y$32]*[.$Z$5]*MAGNET([.Y$24]+[.$BB87])+[.Z$32]*[.$Z$5]*MAGNET([.Z$24]+[.$BB87])+[.AA$32]*[.$Z$5]*MAGNET([.AA$24]+[.$BB87])+[.AB$32]*[.$Z$5]*MAGNET([.AB$24]+[.$BB87])+[.AC$32]*[.$Z$5]*MAGNET([.AC$24]+[.$BB87])+[.AD$32]*[.$Z$5]*MAGNET([.AD$24]+[.$BB87])+[.AE$32]*[.$Z$5]*MAGNET([.AE$24]+[.$BB87])+[.AF$32]*[.$Z$5]*MAGNET([.AF$24]+[.$BB87])+[.AG$32]*[.$Z$5]*MAGNET([.AG$24]+[.$BB87])+[.D$32]*[.$Z$5]*MAGNET([.D$24]+[.$BB87])+[.AH$32]*[.$Z$5]*MAGNET([.AH$24]+[.BB87]) +[.AI$32]*[.$Z$5]*MAGNET([.AI$24]+[.BB87]) +[.AJ$32]*[.$Z$5]*MAGNET([.AJ$24]+[.BB87]) +[.AK$32]*[.$Z$5]*MAGNET([.AK$24]+[.BB87]) +[.AL$32]*[.$Z$5]*MAGNET([.AL$24]+[.BB87]) +[.AM$32]*[.$Z$5]*MAGNET([.AM$24]+[.BB87]) +[.AN$32]*[.$Z$5]*MAGNET([.AN$24]+[.BB87]) +[.AO$32]*[.$Z$5]*MAGNET([.AO$24]+[.BB87]) +[.AP$32]*[.$Z$5]*MAGNET([.AP$24]+[.$BB87])&#10;+[.AQ$32]*[.$Z$5]*MAGNET([.AQ$24]+[.$BB87])&#10;+[.AR$32]*[.$Z$5]*MAGNET([.AR$24]+[.$BB87])&#10;+[.AS$32]*[.$Z$5]*MAGNET([.AS$24]+[.$BB87])&#10;+[.AT$32]*[.$Z$5]*MAGNET([.AT$24]+[.$BB87])&#10;+[.AU$32]*[.$Z$5]*MAGNET([.AU$24]+[.$BB87])&#10;+[.AV$32]*[.$Z$5]*MAGNET([.AV$24]+[.$BB87])&#10;+[.AW$32]*[.$Z$5]*MAGNET([.AW$24]+[.$BB87])&#10;+[.AX$32]*[.$Z$5]*MAGNET([.AX$24]+[.$BB87])&#10;+[.AY$32]*[.$Z$5]*MAGNET([.AY$24]+[.$BB8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7]+0.002" office:value-type="float" office:value="0.146" calcext:value-type="float">
            <text:p>0.146</text:p>
          </table:table-cell>
          <table:table-cell table:formula="of:=[.BA88]*[.$D$6]" office:value-type="float" office:value="7.33876043878576" calcext:value-type="float">
            <text:p>7.339</text:p>
          </table:table-cell>
          <table:table-cell table:formula="of:=[.D$25]*[.$Z$5]*MAGNET([.D$24]+[.BB88])+[.E$25]*[.$Z$5]*MAGNET([.E$24]+[.BB88])+[.F$25]*[.$Z$5]*MAGNET([.F$24]+[.BB88])+[.G$25]*[.$Z$5]*MAGNET([.G$24]+[.BB88])+[.H$25]*[.$Z$5]*MAGNET([.H$24]+[.BB88])+[.I$25]*[.$Z$5]*MAGNET([.I$24]+[.BB88])+[.J$25]*[.$Z$5]*MAGNET([.J$24]+[.BB88])+[.K$25]*[.$Z$5]*MAGNET([.K$24]+[.BB88])+[.L$25]*[.$Z$5]*MAGNET([.L$24]+[.BB88])+[.M$25]*[.$Z$5]*MAGNET([.M$24]+[.BB88])+[.N$25]*[.$Z$5]*MAGNET([.N$24]+[.BB88])+[.O$25]*[.$Z$5]*MAGNET([.O$24]+[.BB88])+[.P$25]*[.$Z$5]*MAGNET([.P$24]+[.BB88])+[.Q$25]*[.$Z$5]*MAGNET([.Q$24]+[.BB88])+[.R$25]*[.$Z$5]*MAGNET([.R$24]+[.BB88])+[.S$25]*[.$Z$5]*MAGNET([.S$24]+[.BB88])+[.T$25]*[.$Z$5]*MAGNET([.T$24]+[.BB88])+[.U$25]*[.$Z$5]*MAGNET([.U$24]+[.BB88])+[.V$25]*[.$Z$5]*MAGNET([.V$24]+[.BB88])+[.W$25]*[.$Z$5]*MAGNET([.W$24]+[.BB88])+[.X$25]*[.$Z$5]*MAGNET([.X$24]+[.BB88])+[.Y$25]*[.$Z$5]*MAGNET([.Y$24]+[.BB88])+[.Z$25]*[.$Z$5]*MAGNET([.Z$24]+[.BB88])+[.AA$25]*[.$Z$5]*MAGNET([.AA$24]+[.BB88])+[.AB$25]*[.$Z$5]*MAGNET([.AB$24]+[.BB88])+[.AC$25]*[.$Z$5]*MAGNET([.AC$24]+[.BB88])+[.AD$25]*[.$Z$5]*MAGNET([.AD$24]+[.BB88])+[.AE$25]*[.$Z$5]*MAGNET([.AE$24]+[.BB88])+[.AF$25]*[.$Z$5]*MAGNET([.AF$24]+[.BB88])+[.AG$25]*[.$Z$5]*MAGNET([.AG$24]+[.BB88])+[.AH$25]*[.$Z$5]*MAGNET([.AH$24]+[.BB88]) +[.AI$25]*[.$Z$5]*MAGNET([.AI$24]+[.BB88]) +[.AJ$25]*[.$Z$5]*MAGNET([.AJ$24]+[.BB88]) +[.AK$25]*[.$Z$5]*MAGNET([.AK$24]+[.BB88]) +[.AL$25]*[.$Z$5]*MAGNET([.AL$24]+[.BB88]) +[.AM$25]*[.$Z$5]*MAGNET([.AM$24]+[.BB88]) +[.AN$25]*[.$Z$5]*MAGNET([.AN$24]+[.BB88]) +[.AO$25]*[.$Z$5]*MAGNET([.AO$24]+[.BB88])+RAND()*[.$BC$13]+[.AP$25]*[.$Z$5]*MAGNET([.AP$24]+[.BB88])&#10;+[.AQ$25]*[.$Z$5]*MAGNET([.AQ$24]+[.BB88])&#10;+[.AR$25]*[.$Z$5]*MAGNET([.AR$24]+[.BB88])&#10;+[.AS$25]*[.$Z$5]*MAGNET([.AS$24]+[.BB88])&#10;+[.AT$25]*[.$Z$5]*MAGNET([.AT$24]+[.BB88])&#10;+[.AU$25]*[.$Z$5]*MAGNET([.AU$24]+[.BB88])&#10;+[.AV$25]*[.$Z$5]*MAGNET([.AV$24]+[.BB88])&#10;+[.AW$25]*[.$Z$5]*MAGNET([.AW$24]+[.BB88])&#10;+[.AX$25]*[.$Z$5]*MAGNET([.AX$24]+[.BB88])&#10;+[.AY$25]*[.$Z$5]*MAGNET([.AY$24]+[.BB88])" office:value-type="float" office:value="71.1608426148829" calcext:value-type="float">
            <text:p>71.16</text:p>
          </table:table-cell>
          <table:table-cell table:style-name="ce70" table:formula="of:=[.E$26]*[.$Z$5]*MAGNET([.E$24]+[.$BB88])+[.F$26]*[.$Z$5]*MAGNET([.F$24]+[.$BB88])+[.G$26]*[.$Z$5]*MAGNET([.G$24]+[.$BB88])+[.H$26]*[.$Z$5]*MAGNET([.H$24]+[.$BB88])+[.I$26]*[.$Z$5]*MAGNET([.I$24]+[.$BB88])+[.J$26]*[.$Z$5]*MAGNET([.J$24]+[.$BB88])+[.K$26]*[.$Z$5]*MAGNET([.K$24]+[.$BB88])+[.L$26]*[.$Z$5]*MAGNET([.L$24]+[.$BB88])+[.M$26]*[.$Z$5]*MAGNET([.M$24]+[.$BB88])+[.N$26]*[.$Z$5]*MAGNET([.N$24]+[.$BB88])+[.O$26]*[.$Z$5]*MAGNET([.O$24]+[.$BB88])+[.P$26]*[.$Z$5]*MAGNET([.P$24]+[.$BB88])+[.Q$26]*[.$Z$5]*MAGNET([.Q$24]+[.$BB88])+[.R$26]*[.$Z$5]*MAGNET([.R$24]+[.$BB88])+[.S$26]*[.$Z$5]*MAGNET([.S$24]+[.$BB88])+[.T$26]*[.$Z$5]*MAGNET([.T$24]+[.$BB88])+[.U$26]*[.$Z$5]*MAGNET([.U$24]+[.$BB88])+[.V$26]*[.$Z$5]*MAGNET([.V$24]+[.$BB88])+[.W$26]*[.$Z$5]*MAGNET([.W$24]+[.$BB88])+[.X$26]*[.$Z$5]*MAGNET([.X$24]+[.$BB88])+[.Y$26]*[.$Z$5]*MAGNET([.Y$24]+[.$BB88])+[.Z$26]*[.$Z$5]*MAGNET([.Z$24]+[.$BB88])+[.AA$26]*[.$Z$5]*MAGNET([.AA$24]+[.$BB88])+[.AB$26]*[.$Z$5]*MAGNET([.AB$24]+[.$BB88])+[.AC$26]*[.$Z$5]*MAGNET([.AC$24]+[.$BB88])+[.AD$26]*[.$Z$5]*MAGNET([.AD$24]+[.$BB88])+[.AE$26]*[.$Z$5]*MAGNET([.AE$24]+[.$BB88])+[.AF$26]*[.$Z$5]*MAGNET([.AF$24]+[.$BB88])+[.AG$26]*[.$Z$5]*MAGNET([.AG$24]+[.$BB88])+[.D$26]*[.$Z$5]*MAGNET([.D$24]+[.$BB88])+[.AH$26]*[.$Z$5]*MAGNET([.AH$24]+[.BB88]) +[.AI$26]*[.$Z$5]*MAGNET([.AI$24]+[.BB88]) +[.AJ$26]*[.$Z$5]*MAGNET([.AJ$24]+[.BB88]) +[.AK$26]*[.$Z$5]*MAGNET([.AK$24]+[.BB88]) +[.AL$26]*[.$Z$5]*MAGNET([.AL$24]+[.BB88]) +[.AM$26]*[.$Z$5]*MAGNET([.AM$24]+[.BB88]) +[.AN$26]*[.$Z$5]*MAGNET([.AN$24]+[.BB88]) +[.AO$26]*[.$Z$5]*MAGNET([.AO$24]+[.BB88]) +[.AP$26]*[.$Z$5]*MAGNET([.AP$24]+[.$BB88])&#10;+[.AQ$26]*[.$Z$5]*MAGNET([.AQ$24]+[.$BB88])&#10;+[.AR$26]*[.$Z$5]*MAGNET([.AR$24]+[.$BB88])&#10;+[.AS$26]*[.$Z$5]*MAGNET([.AS$24]+[.$BB88])&#10;+[.AT$26]*[.$Z$5]*MAGNET([.AT$24]+[.$BB88])&#10;+[.AU$26]*[.$Z$5]*MAGNET([.AU$24]+[.$BB88])&#10;+[.AV$26]*[.$Z$5]*MAGNET([.AV$24]+[.$BB88])&#10;+[.AW$26]*[.$Z$5]*MAGNET([.AW$24]+[.$BB88])&#10;+[.AX$26]*[.$Z$5]*MAGNET([.AX$24]+[.$BB88])&#10;+[.AY$26]*[.$Z$5]*MAGNET([.AY$24]+[.$BB88]) +RAND()*[.$BD$13]" office:value-type="float" office:value="32.0428622785477" calcext:value-type="float">
            <text:p>32.04</text:p>
          </table:table-cell>
          <table:table-cell table:style-name="ce71" table:formula="of:=[.E$27]*[.$Z$5]*MAGNET([.E$24]+[.$BB88])+[.F$27]*[.$Z$5]*MAGNET([.F$24]+[.$BB88])+[.G$27]*[.$Z$5]*MAGNET([.G$24]+[.$BB88])+[.H$27]*[.$Z$5]*MAGNET([.H$24]+[.$BB88])+[.I$27]*[.$Z$5]*MAGNET([.I$24]+[.$BB88])+[.J$27]*[.$Z$5]*MAGNET([.J$24]+[.$BB88])+[.K$27]*[.$Z$5]*MAGNET([.K$24]+[.$BB88])+[.L$27]*[.$Z$5]*MAGNET([.L$24]+[.$BB88])+[.M$27]*[.$Z$5]*MAGNET([.M$24]+[.$BB88])+[.N$27]*[.$Z$5]*MAGNET([.N$24]+[.$BB88])+[.O$27]*[.$Z$5]*MAGNET([.O$24]+[.$BB88])+[.P$27]*[.$Z$5]*MAGNET([.P$24]+[.$BB88])+[.Q$27]*[.$Z$5]*MAGNET([.Q$24]+[.$BB88])+[.R$27]*[.$Z$5]*MAGNET([.R$24]+[.$BB88])+[.S$27]*[.$Z$5]*MAGNET([.S$24]+[.$BB88])+[.T$27]*[.$Z$5]*MAGNET([.T$24]+[.$BB88])+[.U$27]*[.$Z$5]*MAGNET([.U$24]+[.$BB88])+[.V$27]*[.$Z$5]*MAGNET([.V$24]+[.$BB88])+[.W$27]*[.$Z$5]*MAGNET([.W$24]+[.$BB88])+[.X$27]*[.$Z$5]*MAGNET([.X$24]+[.$BB88])+[.Y$27]*[.$Z$5]*MAGNET([.Y$24]+[.$BB88])+[.Z$27]*[.$Z$5]*MAGNET([.Z$24]+[.$BB88])+[.AA$27]*[.$Z$5]*MAGNET([.AA$24]+[.$BB88])+[.AB$27]*[.$Z$5]*MAGNET([.AB$24]+[.$BB88])+[.AC$27]*[.$Z$5]*MAGNET([.AC$24]+[.$BB88])+[.AD$27]*[.$Z$5]*MAGNET([.AD$24]+[.$BB88])+[.AE$27]*[.$Z$5]*MAGNET([.AE$24]+[.$BB88])+[.AF$27]*[.$Z$5]*MAGNET([.AF$24]+[.$BB88])+[.AG$27]*[.$Z$5]*MAGNET([.AG$24]+[.$BB88])+[.D$27]*[.$Z$5]*MAGNET([.D$24]+[.$BB88])+[.AH$27]*[.$Z$5]*MAGNET([.AH$24]+[.BB88]) +[.AI$27]*[.$Z$5]*MAGNET([.AI$24]+[.BB88]) +[.AJ$27]*[.$Z$5]*MAGNET([.AJ$24]+[.BB88]) +[.AK$27]*[.$Z$5]*MAGNET([.AK$24]+[.BB88]) +[.AL$27]*[.$Z$5]*MAGNET([.AL$24]+[.BB88]) +[.AM$27]*[.$Z$5]*MAGNET([.AM$24]+[.BB88]) +[.AN$27]*[.$Z$5]*MAGNET([.AN$24]+[.BB88]) +[.AO$27]*[.$Z$5]*MAGNET([.AO$24]+[.BB88]) +[.AP$27]*[.$Z$5]*MAGNET([.AP$24]+[.$BB88])&#10;+[.AQ$27]*[.$Z$5]*MAGNET([.AQ$24]+[.$BB88])&#10;+[.AR$27]*[.$Z$5]*MAGNET([.AR$24]+[.$BB88])&#10;+[.AS$27]*[.$Z$5]*MAGNET([.AS$24]+[.$BB88])&#10;+[.AT$27]*[.$Z$5]*MAGNET([.AT$24]+[.$BB88])&#10;+[.AU$27]*[.$Z$5]*MAGNET([.AU$24]+[.$BB88])&#10;+[.AV$27]*[.$Z$5]*MAGNET([.AV$24]+[.$BB88])&#10;+[.AW$27]*[.$Z$5]*MAGNET([.AW$24]+[.$BB88])&#10;+[.AX$27]*[.$Z$5]*MAGNET([.AX$24]+[.$BB88])&#10;+[.AY$27]*[.$Z$5]*MAGNET([.AY$24]+[.$BB88]) +RAND()*[.$BE$13]" office:value-type="float" office:value="-124.965178201954" calcext:value-type="float">
            <text:p>-124.965178201954</text:p>
          </table:table-cell>
          <table:table-cell table:style-name="ce71" table:formula="of:=[.E$28]*[.$Z$5]*MAGNET([.E$24]+[.$BB88])+[.F$28]*[.$Z$5]*MAGNET([.F$24]+[.$BB88])+[.G$28]*[.$Z$5]*MAGNET([.G$24]+[.$BB88])+[.H$28]*[.$Z$5]*MAGNET([.H$24]+[.$BB88])+[.I$28]*[.$Z$5]*MAGNET([.I$24]+[.$BB88])+[.J$28]*[.$Z$5]*MAGNET([.J$24]+[.$BB88])+[.K$28]*[.$Z$5]*MAGNET([.K$24]+[.$BB88])+[.L$28]*[.$Z$5]*MAGNET([.L$24]+[.$BB88])+[.M$28]*[.$Z$5]*MAGNET([.M$24]+[.$BB88])+[.N$28]*[.$Z$5]*MAGNET([.N$24]+[.$BB88])+[.O$28]*[.$Z$5]*MAGNET([.O$24]+[.$BB88])+[.P$28]*[.$Z$5]*MAGNET([.P$24]+[.$BB88])+[.Q$28]*[.$Z$5]*MAGNET([.Q$24]+[.$BB88])+[.R$28]*[.$Z$5]*MAGNET([.R$24]+[.$BB88])+[.S$28]*[.$Z$5]*MAGNET([.S$24]+[.$BB88])+[.T$28]*[.$Z$5]*MAGNET([.T$24]+[.$BB88])+[.U$28]*[.$Z$5]*MAGNET([.U$24]+[.$BB88])+[.V$28]*[.$Z$5]*MAGNET([.V$24]+[.$BB88])+[.W$28]*[.$Z$5]*MAGNET([.W$24]+[.$BB88])+[.X$28]*[.$Z$5]*MAGNET([.X$24]+[.$BB88])+[.Y$28]*[.$Z$5]*MAGNET([.Y$24]+[.$BB88])+[.Z$28]*[.$Z$5]*MAGNET([.Z$24]+[.$BB88])+[.AA$28]*[.$Z$5]*MAGNET([.AA$24]+[.$BB88])+[.AB$28]*[.$Z$5]*MAGNET([.AB$24]+[.$BB88])+[.AC$28]*[.$Z$5]*MAGNET([.AC$24]+[.$BB88])+[.AD$28]*[.$Z$5]*MAGNET([.AD$24]+[.$BB88])+[.AE$28]*[.$Z$5]*MAGNET([.AE$24]+[.$BB88])+[.AF$28]*[.$Z$5]*MAGNET([.AF$24]+[.$BB88])+[.AG$28]*[.$Z$5]*MAGNET([.AG$24]+[.$BB88])+[.D$28]*[.$Z$5]*MAGNET([.D$24]+[.$BB88])+[.AH$28]*[.$Z$5]*MAGNET([.AH$24]+[.BB88]) +[.AI$28]*[.$Z$5]*MAGNET([.AI$24]+[.BB88]) +[.AJ$28]*[.$Z$5]*MAGNET([.AJ$24]+[.BB88]) +[.AK$28]*[.$Z$5]*MAGNET([.AK$24]+[.BB88]) +[.AL$28]*[.$Z$5]*MAGNET([.AL$24]+[.BB88]) +[.AM$28]*[.$Z$5]*MAGNET([.AM$24]+[.BB88]) +[.AN$28]*[.$Z$5]*MAGNET([.AN$24]+[.BB88]) +[.AO$28]*[.$Z$5]*MAGNET([.AO$24]+[.BB88]) +[.AP$28]*[.$Z$5]*MAGNET([.AP$24]+[.$BB88])&#10;+[.AQ$28]*[.$Z$5]*MAGNET([.AQ$24]+[.$BB88])&#10;+[.AR$28]*[.$Z$5]*MAGNET([.AR$24]+[.$BB88])&#10;+[.AS$28]*[.$Z$5]*MAGNET([.AS$24]+[.$BB88])&#10;+[.AT$28]*[.$Z$5]*MAGNET([.AT$24]+[.$BB88])&#10;+[.AU$28]*[.$Z$5]*MAGNET([.AU$24]+[.$BB88])&#10;+[.AV$28]*[.$Z$5]*MAGNET([.AV$24]+[.$BB88])&#10;+[.AW$28]*[.$Z$5]*MAGNET([.AW$24]+[.$BB88])&#10;+[.AX$28]*[.$Z$5]*MAGNET([.AX$24]+[.$BB88])&#10;+[.AY$28]*[.$Z$5]*MAGNET([.AY$24]+[.$BB88]) +RAND()*[.$BF$13]" office:value-type="float" office:value="-17.9014341519902" calcext:value-type="float">
            <text:p>-17.9014341519902</text:p>
          </table:table-cell>
          <table:table-cell table:style-name="ce71" table:formula="of:=[.E$29]*[.$Z$5]*MAGNET([.E$24]+[.$BB88])+[.F$29]*[.$Z$5]*MAGNET([.F$24]+[.$BB88])+[.G$29]*[.$Z$5]*MAGNET([.G$24]+[.$BB88])+[.H$29]*[.$Z$5]*MAGNET([.H$24]+[.$BB88])+[.I$29]*[.$Z$5]*MAGNET([.I$24]+[.$BB88])+[.J$29]*[.$Z$5]*MAGNET([.J$24]+[.$BB88])+[.K$29]*[.$Z$5]*MAGNET([.K$24]+[.$BB88])+[.L$29]*[.$Z$5]*MAGNET([.L$24]+[.$BB88])+[.M$29]*[.$Z$5]*MAGNET([.M$24]+[.$BB88])+[.N$29]*[.$Z$5]*MAGNET([.N$24]+[.$BB88])+[.O$29]*[.$Z$5]*MAGNET([.O$24]+[.$BB88])+[.P$29]*[.$Z$5]*MAGNET([.P$24]+[.$BB88])+[.Q$29]*[.$Z$5]*MAGNET([.Q$24]+[.$BB88])+[.R$29]*[.$Z$5]*MAGNET([.R$24]+[.$BB88])+[.S$29]*[.$Z$5]*MAGNET([.S$24]+[.$BB88])+[.T$29]*[.$Z$5]*MAGNET([.T$24]+[.$BB88])+[.U$29]*[.$Z$5]*MAGNET([.U$24]+[.$BB88])+[.V$29]*[.$Z$5]*MAGNET([.V$24]+[.$BB88])+[.W$29]*[.$Z$5]*MAGNET([.W$24]+[.$BB88])+[.X$29]*[.$Z$5]*MAGNET([.X$24]+[.$BB88])+[.Y$29]*[.$Z$5]*MAGNET([.Y$24]+[.$BB88])+[.Z$29]*[.$Z$5]*MAGNET([.Z$24]+[.$BB88])+[.AA$29]*[.$Z$5]*MAGNET([.AA$24]+[.$BB88])+[.AB$29]*[.$Z$5]*MAGNET([.AB$24]+[.$BB88])+[.AC$29]*[.$Z$5]*MAGNET([.AC$24]+[.$BB88])+[.AD$29]*[.$Z$5]*MAGNET([.AD$24]+[.$BB88])+[.AE$29]*[.$Z$5]*MAGNET([.AE$24]+[.$BB88])+[.AF$29]*[.$Z$5]*MAGNET([.AF$24]+[.$BB88])+[.AG$29]*[.$Z$5]*MAGNET([.AG$24]+[.$BB88])+[.D$29]*[.$Z$5]*MAGNET([.D$24]+[.$BB88])+[.AH$29]*[.$Z$5]*MAGNET([.AH$24]+[.BB88]) +[.AI$29]*[.$Z$5]*MAGNET([.AI$24]+[.BB88]) +[.AJ$29]*[.$Z$5]*MAGNET([.AJ$24]+[.BB88]) +[.AK$29]*[.$Z$5]*MAGNET([.AK$24]+[.BB88]) +[.AL$29]*[.$Z$5]*MAGNET([.AL$24]+[.BB88]) +[.AM$29]*[.$Z$5]*MAGNET([.AM$24]+[.BB88]) +[.AN$29]*[.$Z$5]*MAGNET([.AN$24]+[.BB88]) +[.AO$29]*[.$Z$5]*MAGNET([.AO$24]+[.BB88]) +[.AP$29]*[.$Z$5]*MAGNET([.AP$24]+[.$BB88])&#10;+[.AQ$29]*[.$Z$5]*MAGNET([.AQ$24]+[.$BB88])&#10;+[.AR$29]*[.$Z$5]*MAGNET([.AR$24]+[.$BB88])&#10;+[.AS$29]*[.$Z$5]*MAGNET([.AS$24]+[.$BB88])&#10;+[.AT$29]*[.$Z$5]*MAGNET([.AT$24]+[.$BB88])&#10;+[.AU$29]*[.$Z$5]*MAGNET([.AU$24]+[.$BB88])&#10;+[.AV$29]*[.$Z$5]*MAGNET([.AV$24]+[.$BB88])&#10;+[.AW$29]*[.$Z$5]*MAGNET([.AW$24]+[.$BB88])&#10;+[.AX$29]*[.$Z$5]*MAGNET([.AX$24]+[.$BB88])&#10;+[.AY$29]*[.$Z$5]*MAGNET([.AY$24]+[.$BB88]) +RAND()*[.$BG$13]" office:value-type="float" office:value="47.6032907660445" calcext:value-type="float">
            <text:p>47.6032907660445</text:p>
          </table:table-cell>
          <table:table-cell table:style-name="ce71" table:formula="of:=[.E$30]*[.$Z$5]*MAGNET([.E$24]+[.$BB88])+[.F$30]*[.$Z$5]*MAGNET([.F$24]+[.$BB88])+[.G$30]*[.$Z$5]*MAGNET([.G$24]+[.$BB88])+[.H$30]*[.$Z$5]*MAGNET([.H$24]+[.$BB88])+[.I$30]*[.$Z$5]*MAGNET([.I$24]+[.$BB88])+[.J$30]*[.$Z$5]*MAGNET([.J$24]+[.$BB88])+[.K$30]*[.$Z$5]*MAGNET([.K$24]+[.$BB88])+[.L$30]*[.$Z$5]*MAGNET([.L$24]+[.$BB88])+[.M$30]*[.$Z$5]*MAGNET([.M$24]+[.$BB88])+[.N$30]*[.$Z$5]*MAGNET([.N$24]+[.$BB88])+[.O$30]*[.$Z$5]*MAGNET([.O$24]+[.$BB88])+[.P$30]*[.$Z$5]*MAGNET([.P$24]+[.$BB88])+[.Q$30]*[.$Z$5]*MAGNET([.Q$24]+[.$BB88])+[.R$30]*[.$Z$5]*MAGNET([.R$24]+[.$BB88])+[.S$30]*[.$Z$5]*MAGNET([.S$24]+[.$BB88])+[.T$30]*[.$Z$5]*MAGNET([.T$24]+[.$BB88])+[.U$30]*[.$Z$5]*MAGNET([.U$24]+[.$BB88])+[.V$30]*[.$Z$5]*MAGNET([.V$24]+[.$BB88])+[.W$30]*[.$Z$5]*MAGNET([.W$24]+[.$BB88])+[.X$30]*[.$Z$5]*MAGNET([.X$24]+[.$BB88])+[.Y$30]*[.$Z$5]*MAGNET([.Y$24]+[.$BB88])+[.Z$30]*[.$Z$5]*MAGNET([.Z$24]+[.$BB88])+[.AA$30]*[.$Z$5]*MAGNET([.AA$24]+[.$BB88])+[.AB$30]*[.$Z$5]*MAGNET([.AB$24]+[.$BB88])+[.AC$30]*[.$Z$5]*MAGNET([.AC$24]+[.$BB88])+[.AD$30]*[.$Z$5]*MAGNET([.AD$24]+[.$BB88])+[.AE$30]*[.$Z$5]*MAGNET([.AE$24]+[.$BB88])+[.AF$30]*[.$Z$5]*MAGNET([.AF$24]+[.$BB88])+[.AG$30]*[.$Z$5]*MAGNET([.AG$24]+[.$BB88])+[.D$30]*[.$Z$5]*MAGNET([.D$24]+[.$BB88])+[.AH$30]*[.$Z$5]*MAGNET([.AH$24]+[.BB88]) +[.AI$30]*[.$Z$5]*MAGNET([.AI$24]+[.BB88]) +[.AJ$30]*[.$Z$5]*MAGNET([.AJ$24]+[.BB88]) +[.AK$30]*[.$Z$5]*MAGNET([.AK$24]+[.BB88]) +[.AL$30]*[.$Z$5]*MAGNET([.AL$24]+[.BB88]) +[.AM$30]*[.$Z$5]*MAGNET([.AM$24]+[.BB88]) +[.AN$30]*[.$Z$5]*MAGNET([.AN$24]+[.BB88]) +[.AO$30]*[.$Z$5]*MAGNET([.AO$24]+[.BB88]) +[.AP$30]*[.$Z$5]*MAGNET([.AP$24]+[.$BB88])&#10;+[.AQ$30]*[.$Z$5]*MAGNET([.AQ$24]+[.$BB88])&#10;+[.AR$30]*[.$Z$5]*MAGNET([.AR$24]+[.$BB88])&#10;+[.AS$30]*[.$Z$5]*MAGNET([.AS$24]+[.$BB88])&#10;+[.AT$30]*[.$Z$5]*MAGNET([.AT$24]+[.$BB88])&#10;+[.AU$30]*[.$Z$5]*MAGNET([.AU$24]+[.$BB88])&#10;+[.AV$30]*[.$Z$5]*MAGNET([.AV$24]+[.$BB88])&#10;+[.AW$30]*[.$Z$5]*MAGNET([.AW$24]+[.$BB88])&#10;+[.AX$30]*[.$Z$5]*MAGNET([.AX$24]+[.$BB88])&#10;+[.AY$30]*[.$Z$5]*MAGNET([.AY$24]+[.$BB88]) +RAND()*[.$BH$13]" office:value-type="float" office:value="0" calcext:value-type="float">
            <text:p>0</text:p>
          </table:table-cell>
          <table:table-cell table:style-name="ce71" table:formula="of:=[.E$31]*[.$Z$5]*MAGNET([.E$24]+[.$BB88])+[.F$31]*[.$Z$5]*MAGNET([.F$24]+[.$BB88])+[.G$31]*[.$Z$5]*MAGNET([.G$24]+[.$BB88])+[.H$31]*[.$Z$5]*MAGNET([.H$24]+[.$BB88])+[.I$31]*[.$Z$5]*MAGNET([.I$24]+[.$BB88])+[.J$31]*[.$Z$5]*MAGNET([.J$24]+[.$BB88])+[.K$31]*[.$Z$5]*MAGNET([.K$24]+[.$BB88])+[.L$31]*[.$Z$5]*MAGNET([.L$24]+[.$BB88])+[.M$31]*[.$Z$5]*MAGNET([.M$24]+[.$BB88])+[.N$31]*[.$Z$5]*MAGNET([.N$24]+[.$BB88])+[.O$31]*[.$Z$5]*MAGNET([.O$24]+[.$BB88])+[.P$31]*[.$Z$5]*MAGNET([.P$24]+[.$BB88])+[.Q$31]*[.$Z$5]*MAGNET([.Q$24]+[.$BB88])+[.R$31]*[.$Z$5]*MAGNET([.R$24]+[.$BB88])+[.S$31]*[.$Z$5]*MAGNET([.S$24]+[.$BB88])+[.T$31]*[.$Z$5]*MAGNET([.T$24]+[.$BB88])+[.U$31]*[.$Z$5]*MAGNET([.U$24]+[.$BB88])+[.V$31]*[.$Z$5]*MAGNET([.V$24]+[.$BB88])+[.W$31]*[.$Z$5]*MAGNET([.W$24]+[.$BB88])+[.X$31]*[.$Z$5]*MAGNET([.X$24]+[.$BB88])+[.Y$31]*[.$Z$5]*MAGNET([.Y$24]+[.$BB88])+[.Z$31]*[.$Z$5]*MAGNET([.Z$24]+[.$BB88])+[.AA$31]*[.$Z$5]*MAGNET([.AA$24]+[.$BB88])+[.AB$31]*[.$Z$5]*MAGNET([.AB$24]+[.$BB88])+[.AC$31]*[.$Z$5]*MAGNET([.AC$24]+[.$BB88])+[.AD$31]*[.$Z$5]*MAGNET([.AD$24]+[.$BB88])+[.AE$31]*[.$Z$5]*MAGNET([.AE$24]+[.$BB88])+[.AF$31]*[.$Z$5]*MAGNET([.AF$24]+[.$BB88])+[.AG$31]*[.$Z$5]*MAGNET([.AG$24]+[.$BB88])+[.D$31]*[.$Z$5]*MAGNET([.D$24]+[.$BB88])+[.AH$31]*[.$Z$5]*MAGNET([.AH$24]+[.BB88]) +[.AI$31]*[.$Z$5]*MAGNET([.AI$24]+[.BB88]) +[.AJ$31]*[.$Z$5]*MAGNET([.AJ$24]+[.BB88]) +[.AK$31]*[.$Z$5]*MAGNET([.AK$24]+[.BB88]) +[.AL$31]*[.$Z$5]*MAGNET([.AL$24]+[.BB88]) +[.AM$31]*[.$Z$5]*MAGNET([.AM$24]+[.BB88]) +[.AN$31]*[.$Z$5]*MAGNET([.AN$24]+[.BB88]) +[.AO$31]*[.$Z$5]*MAGNET([.AO$24]+[.BB88]) +[.AP$31]*[.$Z$5]*MAGNET([.AP$24]+[.$BB88])&#10;+[.AQ$31]*[.$Z$5]*MAGNET([.AQ$24]+[.$BB88])&#10;+[.AR$31]*[.$Z$5]*MAGNET([.AR$24]+[.$BB88])&#10;+[.AS$31]*[.$Z$5]*MAGNET([.AS$24]+[.$BB88])&#10;+[.AT$31]*[.$Z$5]*MAGNET([.AT$24]+[.$BB88])&#10;+[.AU$31]*[.$Z$5]*MAGNET([.AU$24]+[.$BB88])&#10;+[.AV$31]*[.$Z$5]*MAGNET([.AV$24]+[.$BB88])&#10;+[.AW$31]*[.$Z$5]*MAGNET([.AW$24]+[.$BB88])&#10;+[.AX$31]*[.$Z$5]*MAGNET([.AX$24]+[.$BB88])&#10;+[.AY$31]*[.$Z$5]*MAGNET([.AY$24]+[.$BB88]) +RAND()*[.$BI$13]" office:value-type="float" office:value="0" calcext:value-type="float">
            <text:p>0</text:p>
          </table:table-cell>
          <table:table-cell table:style-name="ce71" table:formula="of:=[.E$32]*[.$Z$5]*MAGNET([.E$24]+[.$BB88])+[.F$32]*[.$Z$5]*MAGNET([.F$24]+[.$BB88])+[.G$32]*[.$Z$5]*MAGNET([.G$24]+[.$BB88])+[.H$32]*[.$Z$5]*MAGNET([.H$24]+[.$BB88])+[.I$32]*[.$Z$5]*MAGNET([.I$24]+[.$BB88])+[.J$32]*[.$Z$5]*MAGNET([.J$24]+[.$BB88])+[.K$32]*[.$Z$5]*MAGNET([.K$24]+[.$BB88])+[.L$32]*[.$Z$5]*MAGNET([.L$24]+[.$BB88])+[.M$32]*[.$Z$5]*MAGNET([.M$24]+[.$BB88])+[.N$32]*[.$Z$5]*MAGNET([.N$24]+[.$BB88])+[.O$32]*[.$Z$5]*MAGNET([.O$24]+[.$BB88])+[.P$32]*[.$Z$5]*MAGNET([.P$24]+[.$BB88])+[.Q$32]*[.$Z$5]*MAGNET([.Q$24]+[.$BB88])+[.R$32]*[.$Z$5]*MAGNET([.R$24]+[.$BB88])+[.S$32]*[.$Z$5]*MAGNET([.S$24]+[.$BB88])+[.T$32]*[.$Z$5]*MAGNET([.T$24]+[.$BB88])+[.U$32]*[.$Z$5]*MAGNET([.U$24]+[.$BB88])+[.V$32]*[.$Z$5]*MAGNET([.V$24]+[.$BB88])+[.W$32]*[.$Z$5]*MAGNET([.W$24]+[.$BB88])+[.X$32]*[.$Z$5]*MAGNET([.X$24]+[.$BB88])+[.Y$32]*[.$Z$5]*MAGNET([.Y$24]+[.$BB88])+[.Z$32]*[.$Z$5]*MAGNET([.Z$24]+[.$BB88])+[.AA$32]*[.$Z$5]*MAGNET([.AA$24]+[.$BB88])+[.AB$32]*[.$Z$5]*MAGNET([.AB$24]+[.$BB88])+[.AC$32]*[.$Z$5]*MAGNET([.AC$24]+[.$BB88])+[.AD$32]*[.$Z$5]*MAGNET([.AD$24]+[.$BB88])+[.AE$32]*[.$Z$5]*MAGNET([.AE$24]+[.$BB88])+[.AF$32]*[.$Z$5]*MAGNET([.AF$24]+[.$BB88])+[.AG$32]*[.$Z$5]*MAGNET([.AG$24]+[.$BB88])+[.D$32]*[.$Z$5]*MAGNET([.D$24]+[.$BB88])+[.AH$32]*[.$Z$5]*MAGNET([.AH$24]+[.BB88]) +[.AI$32]*[.$Z$5]*MAGNET([.AI$24]+[.BB88]) +[.AJ$32]*[.$Z$5]*MAGNET([.AJ$24]+[.BB88]) +[.AK$32]*[.$Z$5]*MAGNET([.AK$24]+[.BB88]) +[.AL$32]*[.$Z$5]*MAGNET([.AL$24]+[.BB88]) +[.AM$32]*[.$Z$5]*MAGNET([.AM$24]+[.BB88]) +[.AN$32]*[.$Z$5]*MAGNET([.AN$24]+[.BB88]) +[.AO$32]*[.$Z$5]*MAGNET([.AO$24]+[.BB88]) +[.AP$32]*[.$Z$5]*MAGNET([.AP$24]+[.$BB88])&#10;+[.AQ$32]*[.$Z$5]*MAGNET([.AQ$24]+[.$BB88])&#10;+[.AR$32]*[.$Z$5]*MAGNET([.AR$24]+[.$BB88])&#10;+[.AS$32]*[.$Z$5]*MAGNET([.AS$24]+[.$BB88])&#10;+[.AT$32]*[.$Z$5]*MAGNET([.AT$24]+[.$BB88])&#10;+[.AU$32]*[.$Z$5]*MAGNET([.AU$24]+[.$BB88])&#10;+[.AV$32]*[.$Z$5]*MAGNET([.AV$24]+[.$BB88])&#10;+[.AW$32]*[.$Z$5]*MAGNET([.AW$24]+[.$BB88])&#10;+[.AX$32]*[.$Z$5]*MAGNET([.AX$24]+[.$BB88])&#10;+[.AY$32]*[.$Z$5]*MAGNET([.AY$24]+[.$BB8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8]+0.002" office:value-type="float" office:value="0.148" calcext:value-type="float">
            <text:p>0.148</text:p>
          </table:table-cell>
          <table:table-cell table:formula="of:=[.BA89]*[.$D$6]" office:value-type="float" office:value="7.43929140370064" calcext:value-type="float">
            <text:p>7.439</text:p>
          </table:table-cell>
          <table:table-cell table:formula="of:=[.D$25]*[.$Z$5]*MAGNET([.D$24]+[.BB89])+[.E$25]*[.$Z$5]*MAGNET([.E$24]+[.BB89])+[.F$25]*[.$Z$5]*MAGNET([.F$24]+[.BB89])+[.G$25]*[.$Z$5]*MAGNET([.G$24]+[.BB89])+[.H$25]*[.$Z$5]*MAGNET([.H$24]+[.BB89])+[.I$25]*[.$Z$5]*MAGNET([.I$24]+[.BB89])+[.J$25]*[.$Z$5]*MAGNET([.J$24]+[.BB89])+[.K$25]*[.$Z$5]*MAGNET([.K$24]+[.BB89])+[.L$25]*[.$Z$5]*MAGNET([.L$24]+[.BB89])+[.M$25]*[.$Z$5]*MAGNET([.M$24]+[.BB89])+[.N$25]*[.$Z$5]*MAGNET([.N$24]+[.BB89])+[.O$25]*[.$Z$5]*MAGNET([.O$24]+[.BB89])+[.P$25]*[.$Z$5]*MAGNET([.P$24]+[.BB89])+[.Q$25]*[.$Z$5]*MAGNET([.Q$24]+[.BB89])+[.R$25]*[.$Z$5]*MAGNET([.R$24]+[.BB89])+[.S$25]*[.$Z$5]*MAGNET([.S$24]+[.BB89])+[.T$25]*[.$Z$5]*MAGNET([.T$24]+[.BB89])+[.U$25]*[.$Z$5]*MAGNET([.U$24]+[.BB89])+[.V$25]*[.$Z$5]*MAGNET([.V$24]+[.BB89])+[.W$25]*[.$Z$5]*MAGNET([.W$24]+[.BB89])+[.X$25]*[.$Z$5]*MAGNET([.X$24]+[.BB89])+[.Y$25]*[.$Z$5]*MAGNET([.Y$24]+[.BB89])+[.Z$25]*[.$Z$5]*MAGNET([.Z$24]+[.BB89])+[.AA$25]*[.$Z$5]*MAGNET([.AA$24]+[.BB89])+[.AB$25]*[.$Z$5]*MAGNET([.AB$24]+[.BB89])+[.AC$25]*[.$Z$5]*MAGNET([.AC$24]+[.BB89])+[.AD$25]*[.$Z$5]*MAGNET([.AD$24]+[.BB89])+[.AE$25]*[.$Z$5]*MAGNET([.AE$24]+[.BB89])+[.AF$25]*[.$Z$5]*MAGNET([.AF$24]+[.BB89])+[.AG$25]*[.$Z$5]*MAGNET([.AG$24]+[.BB89])+[.AH$25]*[.$Z$5]*MAGNET([.AH$24]+[.BB89]) +[.AI$25]*[.$Z$5]*MAGNET([.AI$24]+[.BB89]) +[.AJ$25]*[.$Z$5]*MAGNET([.AJ$24]+[.BB89]) +[.AK$25]*[.$Z$5]*MAGNET([.AK$24]+[.BB89]) +[.AL$25]*[.$Z$5]*MAGNET([.AL$24]+[.BB89]) +[.AM$25]*[.$Z$5]*MAGNET([.AM$24]+[.BB89]) +[.AN$25]*[.$Z$5]*MAGNET([.AN$24]+[.BB89]) +[.AO$25]*[.$Z$5]*MAGNET([.AO$24]+[.BB89])+RAND()*[.$BC$13]+[.AP$25]*[.$Z$5]*MAGNET([.AP$24]+[.BB89])&#10;+[.AQ$25]*[.$Z$5]*MAGNET([.AQ$24]+[.BB89])&#10;+[.AR$25]*[.$Z$5]*MAGNET([.AR$24]+[.BB89])&#10;+[.AS$25]*[.$Z$5]*MAGNET([.AS$24]+[.BB89])&#10;+[.AT$25]*[.$Z$5]*MAGNET([.AT$24]+[.BB89])&#10;+[.AU$25]*[.$Z$5]*MAGNET([.AU$24]+[.BB89])&#10;+[.AV$25]*[.$Z$5]*MAGNET([.AV$24]+[.BB89])&#10;+[.AW$25]*[.$Z$5]*MAGNET([.AW$24]+[.BB89])&#10;+[.AX$25]*[.$Z$5]*MAGNET([.AX$24]+[.BB89])&#10;+[.AY$25]*[.$Z$5]*MAGNET([.AY$24]+[.BB89])" office:value-type="float" office:value="85.1248996269233" calcext:value-type="float">
            <text:p>85.12</text:p>
          </table:table-cell>
          <table:table-cell table:style-name="ce70" table:formula="of:=[.E$26]*[.$Z$5]*MAGNET([.E$24]+[.$BB89])+[.F$26]*[.$Z$5]*MAGNET([.F$24]+[.$BB89])+[.G$26]*[.$Z$5]*MAGNET([.G$24]+[.$BB89])+[.H$26]*[.$Z$5]*MAGNET([.H$24]+[.$BB89])+[.I$26]*[.$Z$5]*MAGNET([.I$24]+[.$BB89])+[.J$26]*[.$Z$5]*MAGNET([.J$24]+[.$BB89])+[.K$26]*[.$Z$5]*MAGNET([.K$24]+[.$BB89])+[.L$26]*[.$Z$5]*MAGNET([.L$24]+[.$BB89])+[.M$26]*[.$Z$5]*MAGNET([.M$24]+[.$BB89])+[.N$26]*[.$Z$5]*MAGNET([.N$24]+[.$BB89])+[.O$26]*[.$Z$5]*MAGNET([.O$24]+[.$BB89])+[.P$26]*[.$Z$5]*MAGNET([.P$24]+[.$BB89])+[.Q$26]*[.$Z$5]*MAGNET([.Q$24]+[.$BB89])+[.R$26]*[.$Z$5]*MAGNET([.R$24]+[.$BB89])+[.S$26]*[.$Z$5]*MAGNET([.S$24]+[.$BB89])+[.T$26]*[.$Z$5]*MAGNET([.T$24]+[.$BB89])+[.U$26]*[.$Z$5]*MAGNET([.U$24]+[.$BB89])+[.V$26]*[.$Z$5]*MAGNET([.V$24]+[.$BB89])+[.W$26]*[.$Z$5]*MAGNET([.W$24]+[.$BB89])+[.X$26]*[.$Z$5]*MAGNET([.X$24]+[.$BB89])+[.Y$26]*[.$Z$5]*MAGNET([.Y$24]+[.$BB89])+[.Z$26]*[.$Z$5]*MAGNET([.Z$24]+[.$BB89])+[.AA$26]*[.$Z$5]*MAGNET([.AA$24]+[.$BB89])+[.AB$26]*[.$Z$5]*MAGNET([.AB$24]+[.$BB89])+[.AC$26]*[.$Z$5]*MAGNET([.AC$24]+[.$BB89])+[.AD$26]*[.$Z$5]*MAGNET([.AD$24]+[.$BB89])+[.AE$26]*[.$Z$5]*MAGNET([.AE$24]+[.$BB89])+[.AF$26]*[.$Z$5]*MAGNET([.AF$24]+[.$BB89])+[.AG$26]*[.$Z$5]*MAGNET([.AG$24]+[.$BB89])+[.D$26]*[.$Z$5]*MAGNET([.D$24]+[.$BB89])+[.AH$26]*[.$Z$5]*MAGNET([.AH$24]+[.BB89]) +[.AI$26]*[.$Z$5]*MAGNET([.AI$24]+[.BB89]) +[.AJ$26]*[.$Z$5]*MAGNET([.AJ$24]+[.BB89]) +[.AK$26]*[.$Z$5]*MAGNET([.AK$24]+[.BB89]) +[.AL$26]*[.$Z$5]*MAGNET([.AL$24]+[.BB89]) +[.AM$26]*[.$Z$5]*MAGNET([.AM$24]+[.BB89]) +[.AN$26]*[.$Z$5]*MAGNET([.AN$24]+[.BB89]) +[.AO$26]*[.$Z$5]*MAGNET([.AO$24]+[.BB89]) +[.AP$26]*[.$Z$5]*MAGNET([.AP$24]+[.$BB89])&#10;+[.AQ$26]*[.$Z$5]*MAGNET([.AQ$24]+[.$BB89])&#10;+[.AR$26]*[.$Z$5]*MAGNET([.AR$24]+[.$BB89])&#10;+[.AS$26]*[.$Z$5]*MAGNET([.AS$24]+[.$BB89])&#10;+[.AT$26]*[.$Z$5]*MAGNET([.AT$24]+[.$BB89])&#10;+[.AU$26]*[.$Z$5]*MAGNET([.AU$24]+[.$BB89])&#10;+[.AV$26]*[.$Z$5]*MAGNET([.AV$24]+[.$BB89])&#10;+[.AW$26]*[.$Z$5]*MAGNET([.AW$24]+[.$BB89])&#10;+[.AX$26]*[.$Z$5]*MAGNET([.AX$24]+[.$BB89])&#10;+[.AY$26]*[.$Z$5]*MAGNET([.AY$24]+[.$BB89]) +RAND()*[.$BD$13]" office:value-type="float" office:value="20.5712062461724" calcext:value-type="float">
            <text:p>20.57</text:p>
          </table:table-cell>
          <table:table-cell table:style-name="ce71" table:formula="of:=[.E$27]*[.$Z$5]*MAGNET([.E$24]+[.$BB89])+[.F$27]*[.$Z$5]*MAGNET([.F$24]+[.$BB89])+[.G$27]*[.$Z$5]*MAGNET([.G$24]+[.$BB89])+[.H$27]*[.$Z$5]*MAGNET([.H$24]+[.$BB89])+[.I$27]*[.$Z$5]*MAGNET([.I$24]+[.$BB89])+[.J$27]*[.$Z$5]*MAGNET([.J$24]+[.$BB89])+[.K$27]*[.$Z$5]*MAGNET([.K$24]+[.$BB89])+[.L$27]*[.$Z$5]*MAGNET([.L$24]+[.$BB89])+[.M$27]*[.$Z$5]*MAGNET([.M$24]+[.$BB89])+[.N$27]*[.$Z$5]*MAGNET([.N$24]+[.$BB89])+[.O$27]*[.$Z$5]*MAGNET([.O$24]+[.$BB89])+[.P$27]*[.$Z$5]*MAGNET([.P$24]+[.$BB89])+[.Q$27]*[.$Z$5]*MAGNET([.Q$24]+[.$BB89])+[.R$27]*[.$Z$5]*MAGNET([.R$24]+[.$BB89])+[.S$27]*[.$Z$5]*MAGNET([.S$24]+[.$BB89])+[.T$27]*[.$Z$5]*MAGNET([.T$24]+[.$BB89])+[.U$27]*[.$Z$5]*MAGNET([.U$24]+[.$BB89])+[.V$27]*[.$Z$5]*MAGNET([.V$24]+[.$BB89])+[.W$27]*[.$Z$5]*MAGNET([.W$24]+[.$BB89])+[.X$27]*[.$Z$5]*MAGNET([.X$24]+[.$BB89])+[.Y$27]*[.$Z$5]*MAGNET([.Y$24]+[.$BB89])+[.Z$27]*[.$Z$5]*MAGNET([.Z$24]+[.$BB89])+[.AA$27]*[.$Z$5]*MAGNET([.AA$24]+[.$BB89])+[.AB$27]*[.$Z$5]*MAGNET([.AB$24]+[.$BB89])+[.AC$27]*[.$Z$5]*MAGNET([.AC$24]+[.$BB89])+[.AD$27]*[.$Z$5]*MAGNET([.AD$24]+[.$BB89])+[.AE$27]*[.$Z$5]*MAGNET([.AE$24]+[.$BB89])+[.AF$27]*[.$Z$5]*MAGNET([.AF$24]+[.$BB89])+[.AG$27]*[.$Z$5]*MAGNET([.AG$24]+[.$BB89])+[.D$27]*[.$Z$5]*MAGNET([.D$24]+[.$BB89])+[.AH$27]*[.$Z$5]*MAGNET([.AH$24]+[.BB89]) +[.AI$27]*[.$Z$5]*MAGNET([.AI$24]+[.BB89]) +[.AJ$27]*[.$Z$5]*MAGNET([.AJ$24]+[.BB89]) +[.AK$27]*[.$Z$5]*MAGNET([.AK$24]+[.BB89]) +[.AL$27]*[.$Z$5]*MAGNET([.AL$24]+[.BB89]) +[.AM$27]*[.$Z$5]*MAGNET([.AM$24]+[.BB89]) +[.AN$27]*[.$Z$5]*MAGNET([.AN$24]+[.BB89]) +[.AO$27]*[.$Z$5]*MAGNET([.AO$24]+[.BB89]) +[.AP$27]*[.$Z$5]*MAGNET([.AP$24]+[.$BB89])&#10;+[.AQ$27]*[.$Z$5]*MAGNET([.AQ$24]+[.$BB89])&#10;+[.AR$27]*[.$Z$5]*MAGNET([.AR$24]+[.$BB89])&#10;+[.AS$27]*[.$Z$5]*MAGNET([.AS$24]+[.$BB89])&#10;+[.AT$27]*[.$Z$5]*MAGNET([.AT$24]+[.$BB89])&#10;+[.AU$27]*[.$Z$5]*MAGNET([.AU$24]+[.$BB89])&#10;+[.AV$27]*[.$Z$5]*MAGNET([.AV$24]+[.$BB89])&#10;+[.AW$27]*[.$Z$5]*MAGNET([.AW$24]+[.$BB89])&#10;+[.AX$27]*[.$Z$5]*MAGNET([.AX$24]+[.$BB89])&#10;+[.AY$27]*[.$Z$5]*MAGNET([.AY$24]+[.$BB89]) +RAND()*[.$BE$13]" office:value-type="float" office:value="-127.589324694261" calcext:value-type="float">
            <text:p>-127.589324694261</text:p>
          </table:table-cell>
          <table:table-cell table:style-name="ce71" table:formula="of:=[.E$28]*[.$Z$5]*MAGNET([.E$24]+[.$BB89])+[.F$28]*[.$Z$5]*MAGNET([.F$24]+[.$BB89])+[.G$28]*[.$Z$5]*MAGNET([.G$24]+[.$BB89])+[.H$28]*[.$Z$5]*MAGNET([.H$24]+[.$BB89])+[.I$28]*[.$Z$5]*MAGNET([.I$24]+[.$BB89])+[.J$28]*[.$Z$5]*MAGNET([.J$24]+[.$BB89])+[.K$28]*[.$Z$5]*MAGNET([.K$24]+[.$BB89])+[.L$28]*[.$Z$5]*MAGNET([.L$24]+[.$BB89])+[.M$28]*[.$Z$5]*MAGNET([.M$24]+[.$BB89])+[.N$28]*[.$Z$5]*MAGNET([.N$24]+[.$BB89])+[.O$28]*[.$Z$5]*MAGNET([.O$24]+[.$BB89])+[.P$28]*[.$Z$5]*MAGNET([.P$24]+[.$BB89])+[.Q$28]*[.$Z$5]*MAGNET([.Q$24]+[.$BB89])+[.R$28]*[.$Z$5]*MAGNET([.R$24]+[.$BB89])+[.S$28]*[.$Z$5]*MAGNET([.S$24]+[.$BB89])+[.T$28]*[.$Z$5]*MAGNET([.T$24]+[.$BB89])+[.U$28]*[.$Z$5]*MAGNET([.U$24]+[.$BB89])+[.V$28]*[.$Z$5]*MAGNET([.V$24]+[.$BB89])+[.W$28]*[.$Z$5]*MAGNET([.W$24]+[.$BB89])+[.X$28]*[.$Z$5]*MAGNET([.X$24]+[.$BB89])+[.Y$28]*[.$Z$5]*MAGNET([.Y$24]+[.$BB89])+[.Z$28]*[.$Z$5]*MAGNET([.Z$24]+[.$BB89])+[.AA$28]*[.$Z$5]*MAGNET([.AA$24]+[.$BB89])+[.AB$28]*[.$Z$5]*MAGNET([.AB$24]+[.$BB89])+[.AC$28]*[.$Z$5]*MAGNET([.AC$24]+[.$BB89])+[.AD$28]*[.$Z$5]*MAGNET([.AD$24]+[.$BB89])+[.AE$28]*[.$Z$5]*MAGNET([.AE$24]+[.$BB89])+[.AF$28]*[.$Z$5]*MAGNET([.AF$24]+[.$BB89])+[.AG$28]*[.$Z$5]*MAGNET([.AG$24]+[.$BB89])+[.D$28]*[.$Z$5]*MAGNET([.D$24]+[.$BB89])+[.AH$28]*[.$Z$5]*MAGNET([.AH$24]+[.BB89]) +[.AI$28]*[.$Z$5]*MAGNET([.AI$24]+[.BB89]) +[.AJ$28]*[.$Z$5]*MAGNET([.AJ$24]+[.BB89]) +[.AK$28]*[.$Z$5]*MAGNET([.AK$24]+[.BB89]) +[.AL$28]*[.$Z$5]*MAGNET([.AL$24]+[.BB89]) +[.AM$28]*[.$Z$5]*MAGNET([.AM$24]+[.BB89]) +[.AN$28]*[.$Z$5]*MAGNET([.AN$24]+[.BB89]) +[.AO$28]*[.$Z$5]*MAGNET([.AO$24]+[.BB89]) +[.AP$28]*[.$Z$5]*MAGNET([.AP$24]+[.$BB89])&#10;+[.AQ$28]*[.$Z$5]*MAGNET([.AQ$24]+[.$BB89])&#10;+[.AR$28]*[.$Z$5]*MAGNET([.AR$24]+[.$BB89])&#10;+[.AS$28]*[.$Z$5]*MAGNET([.AS$24]+[.$BB89])&#10;+[.AT$28]*[.$Z$5]*MAGNET([.AT$24]+[.$BB89])&#10;+[.AU$28]*[.$Z$5]*MAGNET([.AU$24]+[.$BB89])&#10;+[.AV$28]*[.$Z$5]*MAGNET([.AV$24]+[.$BB89])&#10;+[.AW$28]*[.$Z$5]*MAGNET([.AW$24]+[.$BB89])&#10;+[.AX$28]*[.$Z$5]*MAGNET([.AX$24]+[.$BB89])&#10;+[.AY$28]*[.$Z$5]*MAGNET([.AY$24]+[.$BB89]) +RAND()*[.$BF$13]" office:value-type="float" office:value="-17.9413394178359" calcext:value-type="float">
            <text:p>-17.9413394178359</text:p>
          </table:table-cell>
          <table:table-cell table:style-name="ce71" table:formula="of:=[.E$29]*[.$Z$5]*MAGNET([.E$24]+[.$BB89])+[.F$29]*[.$Z$5]*MAGNET([.F$24]+[.$BB89])+[.G$29]*[.$Z$5]*MAGNET([.G$24]+[.$BB89])+[.H$29]*[.$Z$5]*MAGNET([.H$24]+[.$BB89])+[.I$29]*[.$Z$5]*MAGNET([.I$24]+[.$BB89])+[.J$29]*[.$Z$5]*MAGNET([.J$24]+[.$BB89])+[.K$29]*[.$Z$5]*MAGNET([.K$24]+[.$BB89])+[.L$29]*[.$Z$5]*MAGNET([.L$24]+[.$BB89])+[.M$29]*[.$Z$5]*MAGNET([.M$24]+[.$BB89])+[.N$29]*[.$Z$5]*MAGNET([.N$24]+[.$BB89])+[.O$29]*[.$Z$5]*MAGNET([.O$24]+[.$BB89])+[.P$29]*[.$Z$5]*MAGNET([.P$24]+[.$BB89])+[.Q$29]*[.$Z$5]*MAGNET([.Q$24]+[.$BB89])+[.R$29]*[.$Z$5]*MAGNET([.R$24]+[.$BB89])+[.S$29]*[.$Z$5]*MAGNET([.S$24]+[.$BB89])+[.T$29]*[.$Z$5]*MAGNET([.T$24]+[.$BB89])+[.U$29]*[.$Z$5]*MAGNET([.U$24]+[.$BB89])+[.V$29]*[.$Z$5]*MAGNET([.V$24]+[.$BB89])+[.W$29]*[.$Z$5]*MAGNET([.W$24]+[.$BB89])+[.X$29]*[.$Z$5]*MAGNET([.X$24]+[.$BB89])+[.Y$29]*[.$Z$5]*MAGNET([.Y$24]+[.$BB89])+[.Z$29]*[.$Z$5]*MAGNET([.Z$24]+[.$BB89])+[.AA$29]*[.$Z$5]*MAGNET([.AA$24]+[.$BB89])+[.AB$29]*[.$Z$5]*MAGNET([.AB$24]+[.$BB89])+[.AC$29]*[.$Z$5]*MAGNET([.AC$24]+[.$BB89])+[.AD$29]*[.$Z$5]*MAGNET([.AD$24]+[.$BB89])+[.AE$29]*[.$Z$5]*MAGNET([.AE$24]+[.$BB89])+[.AF$29]*[.$Z$5]*MAGNET([.AF$24]+[.$BB89])+[.AG$29]*[.$Z$5]*MAGNET([.AG$24]+[.$BB89])+[.D$29]*[.$Z$5]*MAGNET([.D$24]+[.$BB89])+[.AH$29]*[.$Z$5]*MAGNET([.AH$24]+[.BB89]) +[.AI$29]*[.$Z$5]*MAGNET([.AI$24]+[.BB89]) +[.AJ$29]*[.$Z$5]*MAGNET([.AJ$24]+[.BB89]) +[.AK$29]*[.$Z$5]*MAGNET([.AK$24]+[.BB89]) +[.AL$29]*[.$Z$5]*MAGNET([.AL$24]+[.BB89]) +[.AM$29]*[.$Z$5]*MAGNET([.AM$24]+[.BB89]) +[.AN$29]*[.$Z$5]*MAGNET([.AN$24]+[.BB89]) +[.AO$29]*[.$Z$5]*MAGNET([.AO$24]+[.BB89]) +[.AP$29]*[.$Z$5]*MAGNET([.AP$24]+[.$BB89])&#10;+[.AQ$29]*[.$Z$5]*MAGNET([.AQ$24]+[.$BB89])&#10;+[.AR$29]*[.$Z$5]*MAGNET([.AR$24]+[.$BB89])&#10;+[.AS$29]*[.$Z$5]*MAGNET([.AS$24]+[.$BB89])&#10;+[.AT$29]*[.$Z$5]*MAGNET([.AT$24]+[.$BB89])&#10;+[.AU$29]*[.$Z$5]*MAGNET([.AU$24]+[.$BB89])&#10;+[.AV$29]*[.$Z$5]*MAGNET([.AV$24]+[.$BB89])&#10;+[.AW$29]*[.$Z$5]*MAGNET([.AW$24]+[.$BB89])&#10;+[.AX$29]*[.$Z$5]*MAGNET([.AX$24]+[.$BB89])&#10;+[.AY$29]*[.$Z$5]*MAGNET([.AY$24]+[.$BB89]) +RAND()*[.$BG$13]" office:value-type="float" office:value="46.9354508790846" calcext:value-type="float">
            <text:p>46.9354508790846</text:p>
          </table:table-cell>
          <table:table-cell table:style-name="ce71" table:formula="of:=[.E$30]*[.$Z$5]*MAGNET([.E$24]+[.$BB89])+[.F$30]*[.$Z$5]*MAGNET([.F$24]+[.$BB89])+[.G$30]*[.$Z$5]*MAGNET([.G$24]+[.$BB89])+[.H$30]*[.$Z$5]*MAGNET([.H$24]+[.$BB89])+[.I$30]*[.$Z$5]*MAGNET([.I$24]+[.$BB89])+[.J$30]*[.$Z$5]*MAGNET([.J$24]+[.$BB89])+[.K$30]*[.$Z$5]*MAGNET([.K$24]+[.$BB89])+[.L$30]*[.$Z$5]*MAGNET([.L$24]+[.$BB89])+[.M$30]*[.$Z$5]*MAGNET([.M$24]+[.$BB89])+[.N$30]*[.$Z$5]*MAGNET([.N$24]+[.$BB89])+[.O$30]*[.$Z$5]*MAGNET([.O$24]+[.$BB89])+[.P$30]*[.$Z$5]*MAGNET([.P$24]+[.$BB89])+[.Q$30]*[.$Z$5]*MAGNET([.Q$24]+[.$BB89])+[.R$30]*[.$Z$5]*MAGNET([.R$24]+[.$BB89])+[.S$30]*[.$Z$5]*MAGNET([.S$24]+[.$BB89])+[.T$30]*[.$Z$5]*MAGNET([.T$24]+[.$BB89])+[.U$30]*[.$Z$5]*MAGNET([.U$24]+[.$BB89])+[.V$30]*[.$Z$5]*MAGNET([.V$24]+[.$BB89])+[.W$30]*[.$Z$5]*MAGNET([.W$24]+[.$BB89])+[.X$30]*[.$Z$5]*MAGNET([.X$24]+[.$BB89])+[.Y$30]*[.$Z$5]*MAGNET([.Y$24]+[.$BB89])+[.Z$30]*[.$Z$5]*MAGNET([.Z$24]+[.$BB89])+[.AA$30]*[.$Z$5]*MAGNET([.AA$24]+[.$BB89])+[.AB$30]*[.$Z$5]*MAGNET([.AB$24]+[.$BB89])+[.AC$30]*[.$Z$5]*MAGNET([.AC$24]+[.$BB89])+[.AD$30]*[.$Z$5]*MAGNET([.AD$24]+[.$BB89])+[.AE$30]*[.$Z$5]*MAGNET([.AE$24]+[.$BB89])+[.AF$30]*[.$Z$5]*MAGNET([.AF$24]+[.$BB89])+[.AG$30]*[.$Z$5]*MAGNET([.AG$24]+[.$BB89])+[.D$30]*[.$Z$5]*MAGNET([.D$24]+[.$BB89])+[.AH$30]*[.$Z$5]*MAGNET([.AH$24]+[.BB89]) +[.AI$30]*[.$Z$5]*MAGNET([.AI$24]+[.BB89]) +[.AJ$30]*[.$Z$5]*MAGNET([.AJ$24]+[.BB89]) +[.AK$30]*[.$Z$5]*MAGNET([.AK$24]+[.BB89]) +[.AL$30]*[.$Z$5]*MAGNET([.AL$24]+[.BB89]) +[.AM$30]*[.$Z$5]*MAGNET([.AM$24]+[.BB89]) +[.AN$30]*[.$Z$5]*MAGNET([.AN$24]+[.BB89]) +[.AO$30]*[.$Z$5]*MAGNET([.AO$24]+[.BB89]) +[.AP$30]*[.$Z$5]*MAGNET([.AP$24]+[.$BB89])&#10;+[.AQ$30]*[.$Z$5]*MAGNET([.AQ$24]+[.$BB89])&#10;+[.AR$30]*[.$Z$5]*MAGNET([.AR$24]+[.$BB89])&#10;+[.AS$30]*[.$Z$5]*MAGNET([.AS$24]+[.$BB89])&#10;+[.AT$30]*[.$Z$5]*MAGNET([.AT$24]+[.$BB89])&#10;+[.AU$30]*[.$Z$5]*MAGNET([.AU$24]+[.$BB89])&#10;+[.AV$30]*[.$Z$5]*MAGNET([.AV$24]+[.$BB89])&#10;+[.AW$30]*[.$Z$5]*MAGNET([.AW$24]+[.$BB89])&#10;+[.AX$30]*[.$Z$5]*MAGNET([.AX$24]+[.$BB89])&#10;+[.AY$30]*[.$Z$5]*MAGNET([.AY$24]+[.$BB89]) +RAND()*[.$BH$13]" office:value-type="float" office:value="0" calcext:value-type="float">
            <text:p>0</text:p>
          </table:table-cell>
          <table:table-cell table:style-name="ce71" table:formula="of:=[.E$31]*[.$Z$5]*MAGNET([.E$24]+[.$BB89])+[.F$31]*[.$Z$5]*MAGNET([.F$24]+[.$BB89])+[.G$31]*[.$Z$5]*MAGNET([.G$24]+[.$BB89])+[.H$31]*[.$Z$5]*MAGNET([.H$24]+[.$BB89])+[.I$31]*[.$Z$5]*MAGNET([.I$24]+[.$BB89])+[.J$31]*[.$Z$5]*MAGNET([.J$24]+[.$BB89])+[.K$31]*[.$Z$5]*MAGNET([.K$24]+[.$BB89])+[.L$31]*[.$Z$5]*MAGNET([.L$24]+[.$BB89])+[.M$31]*[.$Z$5]*MAGNET([.M$24]+[.$BB89])+[.N$31]*[.$Z$5]*MAGNET([.N$24]+[.$BB89])+[.O$31]*[.$Z$5]*MAGNET([.O$24]+[.$BB89])+[.P$31]*[.$Z$5]*MAGNET([.P$24]+[.$BB89])+[.Q$31]*[.$Z$5]*MAGNET([.Q$24]+[.$BB89])+[.R$31]*[.$Z$5]*MAGNET([.R$24]+[.$BB89])+[.S$31]*[.$Z$5]*MAGNET([.S$24]+[.$BB89])+[.T$31]*[.$Z$5]*MAGNET([.T$24]+[.$BB89])+[.U$31]*[.$Z$5]*MAGNET([.U$24]+[.$BB89])+[.V$31]*[.$Z$5]*MAGNET([.V$24]+[.$BB89])+[.W$31]*[.$Z$5]*MAGNET([.W$24]+[.$BB89])+[.X$31]*[.$Z$5]*MAGNET([.X$24]+[.$BB89])+[.Y$31]*[.$Z$5]*MAGNET([.Y$24]+[.$BB89])+[.Z$31]*[.$Z$5]*MAGNET([.Z$24]+[.$BB89])+[.AA$31]*[.$Z$5]*MAGNET([.AA$24]+[.$BB89])+[.AB$31]*[.$Z$5]*MAGNET([.AB$24]+[.$BB89])+[.AC$31]*[.$Z$5]*MAGNET([.AC$24]+[.$BB89])+[.AD$31]*[.$Z$5]*MAGNET([.AD$24]+[.$BB89])+[.AE$31]*[.$Z$5]*MAGNET([.AE$24]+[.$BB89])+[.AF$31]*[.$Z$5]*MAGNET([.AF$24]+[.$BB89])+[.AG$31]*[.$Z$5]*MAGNET([.AG$24]+[.$BB89])+[.D$31]*[.$Z$5]*MAGNET([.D$24]+[.$BB89])+[.AH$31]*[.$Z$5]*MAGNET([.AH$24]+[.BB89]) +[.AI$31]*[.$Z$5]*MAGNET([.AI$24]+[.BB89]) +[.AJ$31]*[.$Z$5]*MAGNET([.AJ$24]+[.BB89]) +[.AK$31]*[.$Z$5]*MAGNET([.AK$24]+[.BB89]) +[.AL$31]*[.$Z$5]*MAGNET([.AL$24]+[.BB89]) +[.AM$31]*[.$Z$5]*MAGNET([.AM$24]+[.BB89]) +[.AN$31]*[.$Z$5]*MAGNET([.AN$24]+[.BB89]) +[.AO$31]*[.$Z$5]*MAGNET([.AO$24]+[.BB89]) +[.AP$31]*[.$Z$5]*MAGNET([.AP$24]+[.$BB89])&#10;+[.AQ$31]*[.$Z$5]*MAGNET([.AQ$24]+[.$BB89])&#10;+[.AR$31]*[.$Z$5]*MAGNET([.AR$24]+[.$BB89])&#10;+[.AS$31]*[.$Z$5]*MAGNET([.AS$24]+[.$BB89])&#10;+[.AT$31]*[.$Z$5]*MAGNET([.AT$24]+[.$BB89])&#10;+[.AU$31]*[.$Z$5]*MAGNET([.AU$24]+[.$BB89])&#10;+[.AV$31]*[.$Z$5]*MAGNET([.AV$24]+[.$BB89])&#10;+[.AW$31]*[.$Z$5]*MAGNET([.AW$24]+[.$BB89])&#10;+[.AX$31]*[.$Z$5]*MAGNET([.AX$24]+[.$BB89])&#10;+[.AY$31]*[.$Z$5]*MAGNET([.AY$24]+[.$BB89]) +RAND()*[.$BI$13]" office:value-type="float" office:value="0" calcext:value-type="float">
            <text:p>0</text:p>
          </table:table-cell>
          <table:table-cell table:style-name="ce71" table:formula="of:=[.E$32]*[.$Z$5]*MAGNET([.E$24]+[.$BB89])+[.F$32]*[.$Z$5]*MAGNET([.F$24]+[.$BB89])+[.G$32]*[.$Z$5]*MAGNET([.G$24]+[.$BB89])+[.H$32]*[.$Z$5]*MAGNET([.H$24]+[.$BB89])+[.I$32]*[.$Z$5]*MAGNET([.I$24]+[.$BB89])+[.J$32]*[.$Z$5]*MAGNET([.J$24]+[.$BB89])+[.K$32]*[.$Z$5]*MAGNET([.K$24]+[.$BB89])+[.L$32]*[.$Z$5]*MAGNET([.L$24]+[.$BB89])+[.M$32]*[.$Z$5]*MAGNET([.M$24]+[.$BB89])+[.N$32]*[.$Z$5]*MAGNET([.N$24]+[.$BB89])+[.O$32]*[.$Z$5]*MAGNET([.O$24]+[.$BB89])+[.P$32]*[.$Z$5]*MAGNET([.P$24]+[.$BB89])+[.Q$32]*[.$Z$5]*MAGNET([.Q$24]+[.$BB89])+[.R$32]*[.$Z$5]*MAGNET([.R$24]+[.$BB89])+[.S$32]*[.$Z$5]*MAGNET([.S$24]+[.$BB89])+[.T$32]*[.$Z$5]*MAGNET([.T$24]+[.$BB89])+[.U$32]*[.$Z$5]*MAGNET([.U$24]+[.$BB89])+[.V$32]*[.$Z$5]*MAGNET([.V$24]+[.$BB89])+[.W$32]*[.$Z$5]*MAGNET([.W$24]+[.$BB89])+[.X$32]*[.$Z$5]*MAGNET([.X$24]+[.$BB89])+[.Y$32]*[.$Z$5]*MAGNET([.Y$24]+[.$BB89])+[.Z$32]*[.$Z$5]*MAGNET([.Z$24]+[.$BB89])+[.AA$32]*[.$Z$5]*MAGNET([.AA$24]+[.$BB89])+[.AB$32]*[.$Z$5]*MAGNET([.AB$24]+[.$BB89])+[.AC$32]*[.$Z$5]*MAGNET([.AC$24]+[.$BB89])+[.AD$32]*[.$Z$5]*MAGNET([.AD$24]+[.$BB89])+[.AE$32]*[.$Z$5]*MAGNET([.AE$24]+[.$BB89])+[.AF$32]*[.$Z$5]*MAGNET([.AF$24]+[.$BB89])+[.AG$32]*[.$Z$5]*MAGNET([.AG$24]+[.$BB89])+[.D$32]*[.$Z$5]*MAGNET([.D$24]+[.$BB89])+[.AH$32]*[.$Z$5]*MAGNET([.AH$24]+[.BB89]) +[.AI$32]*[.$Z$5]*MAGNET([.AI$24]+[.BB89]) +[.AJ$32]*[.$Z$5]*MAGNET([.AJ$24]+[.BB89]) +[.AK$32]*[.$Z$5]*MAGNET([.AK$24]+[.BB89]) +[.AL$32]*[.$Z$5]*MAGNET([.AL$24]+[.BB89]) +[.AM$32]*[.$Z$5]*MAGNET([.AM$24]+[.BB89]) +[.AN$32]*[.$Z$5]*MAGNET([.AN$24]+[.BB89]) +[.AO$32]*[.$Z$5]*MAGNET([.AO$24]+[.BB89]) +[.AP$32]*[.$Z$5]*MAGNET([.AP$24]+[.$BB89])&#10;+[.AQ$32]*[.$Z$5]*MAGNET([.AQ$24]+[.$BB89])&#10;+[.AR$32]*[.$Z$5]*MAGNET([.AR$24]+[.$BB89])&#10;+[.AS$32]*[.$Z$5]*MAGNET([.AS$24]+[.$BB89])&#10;+[.AT$32]*[.$Z$5]*MAGNET([.AT$24]+[.$BB89])&#10;+[.AU$32]*[.$Z$5]*MAGNET([.AU$24]+[.$BB89])&#10;+[.AV$32]*[.$Z$5]*MAGNET([.AV$24]+[.$BB89])&#10;+[.AW$32]*[.$Z$5]*MAGNET([.AW$24]+[.$BB89])&#10;+[.AX$32]*[.$Z$5]*MAGNET([.AX$24]+[.$BB89])&#10;+[.AY$32]*[.$Z$5]*MAGNET([.AY$24]+[.$BB8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89]+0.002" office:value-type="float" office:value="0.15" calcext:value-type="float">
            <text:p>0.15</text:p>
          </table:table-cell>
          <table:table-cell table:formula="of:=[.BA90]*[.$D$6]" office:value-type="float" office:value="7.53982236861551" calcext:value-type="float">
            <text:p>7.540</text:p>
          </table:table-cell>
          <table:table-cell table:formula="of:=[.D$25]*[.$Z$5]*MAGNET([.D$24]+[.BB90])+[.E$25]*[.$Z$5]*MAGNET([.E$24]+[.BB90])+[.F$25]*[.$Z$5]*MAGNET([.F$24]+[.BB90])+[.G$25]*[.$Z$5]*MAGNET([.G$24]+[.BB90])+[.H$25]*[.$Z$5]*MAGNET([.H$24]+[.BB90])+[.I$25]*[.$Z$5]*MAGNET([.I$24]+[.BB90])+[.J$25]*[.$Z$5]*MAGNET([.J$24]+[.BB90])+[.K$25]*[.$Z$5]*MAGNET([.K$24]+[.BB90])+[.L$25]*[.$Z$5]*MAGNET([.L$24]+[.BB90])+[.M$25]*[.$Z$5]*MAGNET([.M$24]+[.BB90])+[.N$25]*[.$Z$5]*MAGNET([.N$24]+[.BB90])+[.O$25]*[.$Z$5]*MAGNET([.O$24]+[.BB90])+[.P$25]*[.$Z$5]*MAGNET([.P$24]+[.BB90])+[.Q$25]*[.$Z$5]*MAGNET([.Q$24]+[.BB90])+[.R$25]*[.$Z$5]*MAGNET([.R$24]+[.BB90])+[.S$25]*[.$Z$5]*MAGNET([.S$24]+[.BB90])+[.T$25]*[.$Z$5]*MAGNET([.T$24]+[.BB90])+[.U$25]*[.$Z$5]*MAGNET([.U$24]+[.BB90])+[.V$25]*[.$Z$5]*MAGNET([.V$24]+[.BB90])+[.W$25]*[.$Z$5]*MAGNET([.W$24]+[.BB90])+[.X$25]*[.$Z$5]*MAGNET([.X$24]+[.BB90])+[.Y$25]*[.$Z$5]*MAGNET([.Y$24]+[.BB90])+[.Z$25]*[.$Z$5]*MAGNET([.Z$24]+[.BB90])+[.AA$25]*[.$Z$5]*MAGNET([.AA$24]+[.BB90])+[.AB$25]*[.$Z$5]*MAGNET([.AB$24]+[.BB90])+[.AC$25]*[.$Z$5]*MAGNET([.AC$24]+[.BB90])+[.AD$25]*[.$Z$5]*MAGNET([.AD$24]+[.BB90])+[.AE$25]*[.$Z$5]*MAGNET([.AE$24]+[.BB90])+[.AF$25]*[.$Z$5]*MAGNET([.AF$24]+[.BB90])+[.AG$25]*[.$Z$5]*MAGNET([.AG$24]+[.BB90])+[.AH$25]*[.$Z$5]*MAGNET([.AH$24]+[.BB90]) +[.AI$25]*[.$Z$5]*MAGNET([.AI$24]+[.BB90]) +[.AJ$25]*[.$Z$5]*MAGNET([.AJ$24]+[.BB90]) +[.AK$25]*[.$Z$5]*MAGNET([.AK$24]+[.BB90]) +[.AL$25]*[.$Z$5]*MAGNET([.AL$24]+[.BB90]) +[.AM$25]*[.$Z$5]*MAGNET([.AM$24]+[.BB90]) +[.AN$25]*[.$Z$5]*MAGNET([.AN$24]+[.BB90]) +[.AO$25]*[.$Z$5]*MAGNET([.AO$24]+[.BB90])+RAND()*[.$BC$13]+[.AP$25]*[.$Z$5]*MAGNET([.AP$24]+[.BB90])&#10;+[.AQ$25]*[.$Z$5]*MAGNET([.AQ$24]+[.BB90])&#10;+[.AR$25]*[.$Z$5]*MAGNET([.AR$24]+[.BB90])&#10;+[.AS$25]*[.$Z$5]*MAGNET([.AS$24]+[.BB90])&#10;+[.AT$25]*[.$Z$5]*MAGNET([.AT$24]+[.BB90])&#10;+[.AU$25]*[.$Z$5]*MAGNET([.AU$24]+[.BB90])&#10;+[.AV$25]*[.$Z$5]*MAGNET([.AV$24]+[.BB90])&#10;+[.AW$25]*[.$Z$5]*MAGNET([.AW$24]+[.BB90])&#10;+[.AX$25]*[.$Z$5]*MAGNET([.AX$24]+[.BB90])&#10;+[.AY$25]*[.$Z$5]*MAGNET([.AY$24]+[.BB90])" office:value-type="float" office:value="94.187348013452" calcext:value-type="float">
            <text:p>94.19</text:p>
          </table:table-cell>
          <table:table-cell table:style-name="ce70" table:formula="of:=[.E$26]*[.$Z$5]*MAGNET([.E$24]+[.$BB90])+[.F$26]*[.$Z$5]*MAGNET([.F$24]+[.$BB90])+[.G$26]*[.$Z$5]*MAGNET([.G$24]+[.$BB90])+[.H$26]*[.$Z$5]*MAGNET([.H$24]+[.$BB90])+[.I$26]*[.$Z$5]*MAGNET([.I$24]+[.$BB90])+[.J$26]*[.$Z$5]*MAGNET([.J$24]+[.$BB90])+[.K$26]*[.$Z$5]*MAGNET([.K$24]+[.$BB90])+[.L$26]*[.$Z$5]*MAGNET([.L$24]+[.$BB90])+[.M$26]*[.$Z$5]*MAGNET([.M$24]+[.$BB90])+[.N$26]*[.$Z$5]*MAGNET([.N$24]+[.$BB90])+[.O$26]*[.$Z$5]*MAGNET([.O$24]+[.$BB90])+[.P$26]*[.$Z$5]*MAGNET([.P$24]+[.$BB90])+[.Q$26]*[.$Z$5]*MAGNET([.Q$24]+[.$BB90])+[.R$26]*[.$Z$5]*MAGNET([.R$24]+[.$BB90])+[.S$26]*[.$Z$5]*MAGNET([.S$24]+[.$BB90])+[.T$26]*[.$Z$5]*MAGNET([.T$24]+[.$BB90])+[.U$26]*[.$Z$5]*MAGNET([.U$24]+[.$BB90])+[.V$26]*[.$Z$5]*MAGNET([.V$24]+[.$BB90])+[.W$26]*[.$Z$5]*MAGNET([.W$24]+[.$BB90])+[.X$26]*[.$Z$5]*MAGNET([.X$24]+[.$BB90])+[.Y$26]*[.$Z$5]*MAGNET([.Y$24]+[.$BB90])+[.Z$26]*[.$Z$5]*MAGNET([.Z$24]+[.$BB90])+[.AA$26]*[.$Z$5]*MAGNET([.AA$24]+[.$BB90])+[.AB$26]*[.$Z$5]*MAGNET([.AB$24]+[.$BB90])+[.AC$26]*[.$Z$5]*MAGNET([.AC$24]+[.$BB90])+[.AD$26]*[.$Z$5]*MAGNET([.AD$24]+[.$BB90])+[.AE$26]*[.$Z$5]*MAGNET([.AE$24]+[.$BB90])+[.AF$26]*[.$Z$5]*MAGNET([.AF$24]+[.$BB90])+[.AG$26]*[.$Z$5]*MAGNET([.AG$24]+[.$BB90])+[.D$26]*[.$Z$5]*MAGNET([.D$24]+[.$BB90])+[.AH$26]*[.$Z$5]*MAGNET([.AH$24]+[.BB90]) +[.AI$26]*[.$Z$5]*MAGNET([.AI$24]+[.BB90]) +[.AJ$26]*[.$Z$5]*MAGNET([.AJ$24]+[.BB90]) +[.AK$26]*[.$Z$5]*MAGNET([.AK$24]+[.BB90]) +[.AL$26]*[.$Z$5]*MAGNET([.AL$24]+[.BB90]) +[.AM$26]*[.$Z$5]*MAGNET([.AM$24]+[.BB90]) +[.AN$26]*[.$Z$5]*MAGNET([.AN$24]+[.BB90]) +[.AO$26]*[.$Z$5]*MAGNET([.AO$24]+[.BB90]) +[.AP$26]*[.$Z$5]*MAGNET([.AP$24]+[.$BB90])&#10;+[.AQ$26]*[.$Z$5]*MAGNET([.AQ$24]+[.$BB90])&#10;+[.AR$26]*[.$Z$5]*MAGNET([.AR$24]+[.$BB90])&#10;+[.AS$26]*[.$Z$5]*MAGNET([.AS$24]+[.$BB90])&#10;+[.AT$26]*[.$Z$5]*MAGNET([.AT$24]+[.$BB90])&#10;+[.AU$26]*[.$Z$5]*MAGNET([.AU$24]+[.$BB90])&#10;+[.AV$26]*[.$Z$5]*MAGNET([.AV$24]+[.$BB90])&#10;+[.AW$26]*[.$Z$5]*MAGNET([.AW$24]+[.$BB90])&#10;+[.AX$26]*[.$Z$5]*MAGNET([.AX$24]+[.$BB90])&#10;+[.AY$26]*[.$Z$5]*MAGNET([.AY$24]+[.$BB90]) +RAND()*[.$BD$13]" office:value-type="float" office:value="13.0442160847488" calcext:value-type="float">
            <text:p>13.04</text:p>
          </table:table-cell>
          <table:table-cell table:style-name="ce71" table:formula="of:=[.E$27]*[.$Z$5]*MAGNET([.E$24]+[.$BB90])+[.F$27]*[.$Z$5]*MAGNET([.F$24]+[.$BB90])+[.G$27]*[.$Z$5]*MAGNET([.G$24]+[.$BB90])+[.H$27]*[.$Z$5]*MAGNET([.H$24]+[.$BB90])+[.I$27]*[.$Z$5]*MAGNET([.I$24]+[.$BB90])+[.J$27]*[.$Z$5]*MAGNET([.J$24]+[.$BB90])+[.K$27]*[.$Z$5]*MAGNET([.K$24]+[.$BB90])+[.L$27]*[.$Z$5]*MAGNET([.L$24]+[.$BB90])+[.M$27]*[.$Z$5]*MAGNET([.M$24]+[.$BB90])+[.N$27]*[.$Z$5]*MAGNET([.N$24]+[.$BB90])+[.O$27]*[.$Z$5]*MAGNET([.O$24]+[.$BB90])+[.P$27]*[.$Z$5]*MAGNET([.P$24]+[.$BB90])+[.Q$27]*[.$Z$5]*MAGNET([.Q$24]+[.$BB90])+[.R$27]*[.$Z$5]*MAGNET([.R$24]+[.$BB90])+[.S$27]*[.$Z$5]*MAGNET([.S$24]+[.$BB90])+[.T$27]*[.$Z$5]*MAGNET([.T$24]+[.$BB90])+[.U$27]*[.$Z$5]*MAGNET([.U$24]+[.$BB90])+[.V$27]*[.$Z$5]*MAGNET([.V$24]+[.$BB90])+[.W$27]*[.$Z$5]*MAGNET([.W$24]+[.$BB90])+[.X$27]*[.$Z$5]*MAGNET([.X$24]+[.$BB90])+[.Y$27]*[.$Z$5]*MAGNET([.Y$24]+[.$BB90])+[.Z$27]*[.$Z$5]*MAGNET([.Z$24]+[.$BB90])+[.AA$27]*[.$Z$5]*MAGNET([.AA$24]+[.$BB90])+[.AB$27]*[.$Z$5]*MAGNET([.AB$24]+[.$BB90])+[.AC$27]*[.$Z$5]*MAGNET([.AC$24]+[.$BB90])+[.AD$27]*[.$Z$5]*MAGNET([.AD$24]+[.$BB90])+[.AE$27]*[.$Z$5]*MAGNET([.AE$24]+[.$BB90])+[.AF$27]*[.$Z$5]*MAGNET([.AF$24]+[.$BB90])+[.AG$27]*[.$Z$5]*MAGNET([.AG$24]+[.$BB90])+[.D$27]*[.$Z$5]*MAGNET([.D$24]+[.$BB90])+[.AH$27]*[.$Z$5]*MAGNET([.AH$24]+[.BB90]) +[.AI$27]*[.$Z$5]*MAGNET([.AI$24]+[.BB90]) +[.AJ$27]*[.$Z$5]*MAGNET([.AJ$24]+[.BB90]) +[.AK$27]*[.$Z$5]*MAGNET([.AK$24]+[.BB90]) +[.AL$27]*[.$Z$5]*MAGNET([.AL$24]+[.BB90]) +[.AM$27]*[.$Z$5]*MAGNET([.AM$24]+[.BB90]) +[.AN$27]*[.$Z$5]*MAGNET([.AN$24]+[.BB90]) +[.AO$27]*[.$Z$5]*MAGNET([.AO$24]+[.BB90]) +[.AP$27]*[.$Z$5]*MAGNET([.AP$24]+[.$BB90])&#10;+[.AQ$27]*[.$Z$5]*MAGNET([.AQ$24]+[.$BB90])&#10;+[.AR$27]*[.$Z$5]*MAGNET([.AR$24]+[.$BB90])&#10;+[.AS$27]*[.$Z$5]*MAGNET([.AS$24]+[.$BB90])&#10;+[.AT$27]*[.$Z$5]*MAGNET([.AT$24]+[.$BB90])&#10;+[.AU$27]*[.$Z$5]*MAGNET([.AU$24]+[.$BB90])&#10;+[.AV$27]*[.$Z$5]*MAGNET([.AV$24]+[.$BB90])&#10;+[.AW$27]*[.$Z$5]*MAGNET([.AW$24]+[.$BB90])&#10;+[.AX$27]*[.$Z$5]*MAGNET([.AX$24]+[.$BB90])&#10;+[.AY$27]*[.$Z$5]*MAGNET([.AY$24]+[.$BB90]) +RAND()*[.$BE$13]" office:value-type="float" office:value="-125.371646856382" calcext:value-type="float">
            <text:p>-125.371646856382</text:p>
          </table:table-cell>
          <table:table-cell table:style-name="ce71" table:formula="of:=[.E$28]*[.$Z$5]*MAGNET([.E$24]+[.$BB90])+[.F$28]*[.$Z$5]*MAGNET([.F$24]+[.$BB90])+[.G$28]*[.$Z$5]*MAGNET([.G$24]+[.$BB90])+[.H$28]*[.$Z$5]*MAGNET([.H$24]+[.$BB90])+[.I$28]*[.$Z$5]*MAGNET([.I$24]+[.$BB90])+[.J$28]*[.$Z$5]*MAGNET([.J$24]+[.$BB90])+[.K$28]*[.$Z$5]*MAGNET([.K$24]+[.$BB90])+[.L$28]*[.$Z$5]*MAGNET([.L$24]+[.$BB90])+[.M$28]*[.$Z$5]*MAGNET([.M$24]+[.$BB90])+[.N$28]*[.$Z$5]*MAGNET([.N$24]+[.$BB90])+[.O$28]*[.$Z$5]*MAGNET([.O$24]+[.$BB90])+[.P$28]*[.$Z$5]*MAGNET([.P$24]+[.$BB90])+[.Q$28]*[.$Z$5]*MAGNET([.Q$24]+[.$BB90])+[.R$28]*[.$Z$5]*MAGNET([.R$24]+[.$BB90])+[.S$28]*[.$Z$5]*MAGNET([.S$24]+[.$BB90])+[.T$28]*[.$Z$5]*MAGNET([.T$24]+[.$BB90])+[.U$28]*[.$Z$5]*MAGNET([.U$24]+[.$BB90])+[.V$28]*[.$Z$5]*MAGNET([.V$24]+[.$BB90])+[.W$28]*[.$Z$5]*MAGNET([.W$24]+[.$BB90])+[.X$28]*[.$Z$5]*MAGNET([.X$24]+[.$BB90])+[.Y$28]*[.$Z$5]*MAGNET([.Y$24]+[.$BB90])+[.Z$28]*[.$Z$5]*MAGNET([.Z$24]+[.$BB90])+[.AA$28]*[.$Z$5]*MAGNET([.AA$24]+[.$BB90])+[.AB$28]*[.$Z$5]*MAGNET([.AB$24]+[.$BB90])+[.AC$28]*[.$Z$5]*MAGNET([.AC$24]+[.$BB90])+[.AD$28]*[.$Z$5]*MAGNET([.AD$24]+[.$BB90])+[.AE$28]*[.$Z$5]*MAGNET([.AE$24]+[.$BB90])+[.AF$28]*[.$Z$5]*MAGNET([.AF$24]+[.$BB90])+[.AG$28]*[.$Z$5]*MAGNET([.AG$24]+[.$BB90])+[.D$28]*[.$Z$5]*MAGNET([.D$24]+[.$BB90])+[.AH$28]*[.$Z$5]*MAGNET([.AH$24]+[.BB90]) +[.AI$28]*[.$Z$5]*MAGNET([.AI$24]+[.BB90]) +[.AJ$28]*[.$Z$5]*MAGNET([.AJ$24]+[.BB90]) +[.AK$28]*[.$Z$5]*MAGNET([.AK$24]+[.BB90]) +[.AL$28]*[.$Z$5]*MAGNET([.AL$24]+[.BB90]) +[.AM$28]*[.$Z$5]*MAGNET([.AM$24]+[.BB90]) +[.AN$28]*[.$Z$5]*MAGNET([.AN$24]+[.BB90]) +[.AO$28]*[.$Z$5]*MAGNET([.AO$24]+[.BB90]) +[.AP$28]*[.$Z$5]*MAGNET([.AP$24]+[.$BB90])&#10;+[.AQ$28]*[.$Z$5]*MAGNET([.AQ$24]+[.$BB90])&#10;+[.AR$28]*[.$Z$5]*MAGNET([.AR$24]+[.$BB90])&#10;+[.AS$28]*[.$Z$5]*MAGNET([.AS$24]+[.$BB90])&#10;+[.AT$28]*[.$Z$5]*MAGNET([.AT$24]+[.$BB90])&#10;+[.AU$28]*[.$Z$5]*MAGNET([.AU$24]+[.$BB90])&#10;+[.AV$28]*[.$Z$5]*MAGNET([.AV$24]+[.$BB90])&#10;+[.AW$28]*[.$Z$5]*MAGNET([.AW$24]+[.$BB90])&#10;+[.AX$28]*[.$Z$5]*MAGNET([.AX$24]+[.$BB90])&#10;+[.AY$28]*[.$Z$5]*MAGNET([.AY$24]+[.$BB90]) +RAND()*[.$BF$13]" office:value-type="float" office:value="-16.7480572311979" calcext:value-type="float">
            <text:p>-16.7480572311979</text:p>
          </table:table-cell>
          <table:table-cell table:style-name="ce71" table:formula="of:=[.E$29]*[.$Z$5]*MAGNET([.E$24]+[.$BB90])+[.F$29]*[.$Z$5]*MAGNET([.F$24]+[.$BB90])+[.G$29]*[.$Z$5]*MAGNET([.G$24]+[.$BB90])+[.H$29]*[.$Z$5]*MAGNET([.H$24]+[.$BB90])+[.I$29]*[.$Z$5]*MAGNET([.I$24]+[.$BB90])+[.J$29]*[.$Z$5]*MAGNET([.J$24]+[.$BB90])+[.K$29]*[.$Z$5]*MAGNET([.K$24]+[.$BB90])+[.L$29]*[.$Z$5]*MAGNET([.L$24]+[.$BB90])+[.M$29]*[.$Z$5]*MAGNET([.M$24]+[.$BB90])+[.N$29]*[.$Z$5]*MAGNET([.N$24]+[.$BB90])+[.O$29]*[.$Z$5]*MAGNET([.O$24]+[.$BB90])+[.P$29]*[.$Z$5]*MAGNET([.P$24]+[.$BB90])+[.Q$29]*[.$Z$5]*MAGNET([.Q$24]+[.$BB90])+[.R$29]*[.$Z$5]*MAGNET([.R$24]+[.$BB90])+[.S$29]*[.$Z$5]*MAGNET([.S$24]+[.$BB90])+[.T$29]*[.$Z$5]*MAGNET([.T$24]+[.$BB90])+[.U$29]*[.$Z$5]*MAGNET([.U$24]+[.$BB90])+[.V$29]*[.$Z$5]*MAGNET([.V$24]+[.$BB90])+[.W$29]*[.$Z$5]*MAGNET([.W$24]+[.$BB90])+[.X$29]*[.$Z$5]*MAGNET([.X$24]+[.$BB90])+[.Y$29]*[.$Z$5]*MAGNET([.Y$24]+[.$BB90])+[.Z$29]*[.$Z$5]*MAGNET([.Z$24]+[.$BB90])+[.AA$29]*[.$Z$5]*MAGNET([.AA$24]+[.$BB90])+[.AB$29]*[.$Z$5]*MAGNET([.AB$24]+[.$BB90])+[.AC$29]*[.$Z$5]*MAGNET([.AC$24]+[.$BB90])+[.AD$29]*[.$Z$5]*MAGNET([.AD$24]+[.$BB90])+[.AE$29]*[.$Z$5]*MAGNET([.AE$24]+[.$BB90])+[.AF$29]*[.$Z$5]*MAGNET([.AF$24]+[.$BB90])+[.AG$29]*[.$Z$5]*MAGNET([.AG$24]+[.$BB90])+[.D$29]*[.$Z$5]*MAGNET([.D$24]+[.$BB90])+[.AH$29]*[.$Z$5]*MAGNET([.AH$24]+[.BB90]) +[.AI$29]*[.$Z$5]*MAGNET([.AI$24]+[.BB90]) +[.AJ$29]*[.$Z$5]*MAGNET([.AJ$24]+[.BB90]) +[.AK$29]*[.$Z$5]*MAGNET([.AK$24]+[.BB90]) +[.AL$29]*[.$Z$5]*MAGNET([.AL$24]+[.BB90]) +[.AM$29]*[.$Z$5]*MAGNET([.AM$24]+[.BB90]) +[.AN$29]*[.$Z$5]*MAGNET([.AN$24]+[.BB90]) +[.AO$29]*[.$Z$5]*MAGNET([.AO$24]+[.BB90]) +[.AP$29]*[.$Z$5]*MAGNET([.AP$24]+[.$BB90])&#10;+[.AQ$29]*[.$Z$5]*MAGNET([.AQ$24]+[.$BB90])&#10;+[.AR$29]*[.$Z$5]*MAGNET([.AR$24]+[.$BB90])&#10;+[.AS$29]*[.$Z$5]*MAGNET([.AS$24]+[.$BB90])&#10;+[.AT$29]*[.$Z$5]*MAGNET([.AT$24]+[.$BB90])&#10;+[.AU$29]*[.$Z$5]*MAGNET([.AU$24]+[.$BB90])&#10;+[.AV$29]*[.$Z$5]*MAGNET([.AV$24]+[.$BB90])&#10;+[.AW$29]*[.$Z$5]*MAGNET([.AW$24]+[.$BB90])&#10;+[.AX$29]*[.$Z$5]*MAGNET([.AX$24]+[.$BB90])&#10;+[.AY$29]*[.$Z$5]*MAGNET([.AY$24]+[.$BB90]) +RAND()*[.$BG$13]" office:value-type="float" office:value="47.6745331034011" calcext:value-type="float">
            <text:p>47.6745331034011</text:p>
          </table:table-cell>
          <table:table-cell table:style-name="ce71" table:formula="of:=[.E$30]*[.$Z$5]*MAGNET([.E$24]+[.$BB90])+[.F$30]*[.$Z$5]*MAGNET([.F$24]+[.$BB90])+[.G$30]*[.$Z$5]*MAGNET([.G$24]+[.$BB90])+[.H$30]*[.$Z$5]*MAGNET([.H$24]+[.$BB90])+[.I$30]*[.$Z$5]*MAGNET([.I$24]+[.$BB90])+[.J$30]*[.$Z$5]*MAGNET([.J$24]+[.$BB90])+[.K$30]*[.$Z$5]*MAGNET([.K$24]+[.$BB90])+[.L$30]*[.$Z$5]*MAGNET([.L$24]+[.$BB90])+[.M$30]*[.$Z$5]*MAGNET([.M$24]+[.$BB90])+[.N$30]*[.$Z$5]*MAGNET([.N$24]+[.$BB90])+[.O$30]*[.$Z$5]*MAGNET([.O$24]+[.$BB90])+[.P$30]*[.$Z$5]*MAGNET([.P$24]+[.$BB90])+[.Q$30]*[.$Z$5]*MAGNET([.Q$24]+[.$BB90])+[.R$30]*[.$Z$5]*MAGNET([.R$24]+[.$BB90])+[.S$30]*[.$Z$5]*MAGNET([.S$24]+[.$BB90])+[.T$30]*[.$Z$5]*MAGNET([.T$24]+[.$BB90])+[.U$30]*[.$Z$5]*MAGNET([.U$24]+[.$BB90])+[.V$30]*[.$Z$5]*MAGNET([.V$24]+[.$BB90])+[.W$30]*[.$Z$5]*MAGNET([.W$24]+[.$BB90])+[.X$30]*[.$Z$5]*MAGNET([.X$24]+[.$BB90])+[.Y$30]*[.$Z$5]*MAGNET([.Y$24]+[.$BB90])+[.Z$30]*[.$Z$5]*MAGNET([.Z$24]+[.$BB90])+[.AA$30]*[.$Z$5]*MAGNET([.AA$24]+[.$BB90])+[.AB$30]*[.$Z$5]*MAGNET([.AB$24]+[.$BB90])+[.AC$30]*[.$Z$5]*MAGNET([.AC$24]+[.$BB90])+[.AD$30]*[.$Z$5]*MAGNET([.AD$24]+[.$BB90])+[.AE$30]*[.$Z$5]*MAGNET([.AE$24]+[.$BB90])+[.AF$30]*[.$Z$5]*MAGNET([.AF$24]+[.$BB90])+[.AG$30]*[.$Z$5]*MAGNET([.AG$24]+[.$BB90])+[.D$30]*[.$Z$5]*MAGNET([.D$24]+[.$BB90])+[.AH$30]*[.$Z$5]*MAGNET([.AH$24]+[.BB90]) +[.AI$30]*[.$Z$5]*MAGNET([.AI$24]+[.BB90]) +[.AJ$30]*[.$Z$5]*MAGNET([.AJ$24]+[.BB90]) +[.AK$30]*[.$Z$5]*MAGNET([.AK$24]+[.BB90]) +[.AL$30]*[.$Z$5]*MAGNET([.AL$24]+[.BB90]) +[.AM$30]*[.$Z$5]*MAGNET([.AM$24]+[.BB90]) +[.AN$30]*[.$Z$5]*MAGNET([.AN$24]+[.BB90]) +[.AO$30]*[.$Z$5]*MAGNET([.AO$24]+[.BB90]) +[.AP$30]*[.$Z$5]*MAGNET([.AP$24]+[.$BB90])&#10;+[.AQ$30]*[.$Z$5]*MAGNET([.AQ$24]+[.$BB90])&#10;+[.AR$30]*[.$Z$5]*MAGNET([.AR$24]+[.$BB90])&#10;+[.AS$30]*[.$Z$5]*MAGNET([.AS$24]+[.$BB90])&#10;+[.AT$30]*[.$Z$5]*MAGNET([.AT$24]+[.$BB90])&#10;+[.AU$30]*[.$Z$5]*MAGNET([.AU$24]+[.$BB90])&#10;+[.AV$30]*[.$Z$5]*MAGNET([.AV$24]+[.$BB90])&#10;+[.AW$30]*[.$Z$5]*MAGNET([.AW$24]+[.$BB90])&#10;+[.AX$30]*[.$Z$5]*MAGNET([.AX$24]+[.$BB90])&#10;+[.AY$30]*[.$Z$5]*MAGNET([.AY$24]+[.$BB90]) +RAND()*[.$BH$13]" office:value-type="float" office:value="0" calcext:value-type="float">
            <text:p>0</text:p>
          </table:table-cell>
          <table:table-cell table:style-name="ce71" table:formula="of:=[.E$31]*[.$Z$5]*MAGNET([.E$24]+[.$BB90])+[.F$31]*[.$Z$5]*MAGNET([.F$24]+[.$BB90])+[.G$31]*[.$Z$5]*MAGNET([.G$24]+[.$BB90])+[.H$31]*[.$Z$5]*MAGNET([.H$24]+[.$BB90])+[.I$31]*[.$Z$5]*MAGNET([.I$24]+[.$BB90])+[.J$31]*[.$Z$5]*MAGNET([.J$24]+[.$BB90])+[.K$31]*[.$Z$5]*MAGNET([.K$24]+[.$BB90])+[.L$31]*[.$Z$5]*MAGNET([.L$24]+[.$BB90])+[.M$31]*[.$Z$5]*MAGNET([.M$24]+[.$BB90])+[.N$31]*[.$Z$5]*MAGNET([.N$24]+[.$BB90])+[.O$31]*[.$Z$5]*MAGNET([.O$24]+[.$BB90])+[.P$31]*[.$Z$5]*MAGNET([.P$24]+[.$BB90])+[.Q$31]*[.$Z$5]*MAGNET([.Q$24]+[.$BB90])+[.R$31]*[.$Z$5]*MAGNET([.R$24]+[.$BB90])+[.S$31]*[.$Z$5]*MAGNET([.S$24]+[.$BB90])+[.T$31]*[.$Z$5]*MAGNET([.T$24]+[.$BB90])+[.U$31]*[.$Z$5]*MAGNET([.U$24]+[.$BB90])+[.V$31]*[.$Z$5]*MAGNET([.V$24]+[.$BB90])+[.W$31]*[.$Z$5]*MAGNET([.W$24]+[.$BB90])+[.X$31]*[.$Z$5]*MAGNET([.X$24]+[.$BB90])+[.Y$31]*[.$Z$5]*MAGNET([.Y$24]+[.$BB90])+[.Z$31]*[.$Z$5]*MAGNET([.Z$24]+[.$BB90])+[.AA$31]*[.$Z$5]*MAGNET([.AA$24]+[.$BB90])+[.AB$31]*[.$Z$5]*MAGNET([.AB$24]+[.$BB90])+[.AC$31]*[.$Z$5]*MAGNET([.AC$24]+[.$BB90])+[.AD$31]*[.$Z$5]*MAGNET([.AD$24]+[.$BB90])+[.AE$31]*[.$Z$5]*MAGNET([.AE$24]+[.$BB90])+[.AF$31]*[.$Z$5]*MAGNET([.AF$24]+[.$BB90])+[.AG$31]*[.$Z$5]*MAGNET([.AG$24]+[.$BB90])+[.D$31]*[.$Z$5]*MAGNET([.D$24]+[.$BB90])+[.AH$31]*[.$Z$5]*MAGNET([.AH$24]+[.BB90]) +[.AI$31]*[.$Z$5]*MAGNET([.AI$24]+[.BB90]) +[.AJ$31]*[.$Z$5]*MAGNET([.AJ$24]+[.BB90]) +[.AK$31]*[.$Z$5]*MAGNET([.AK$24]+[.BB90]) +[.AL$31]*[.$Z$5]*MAGNET([.AL$24]+[.BB90]) +[.AM$31]*[.$Z$5]*MAGNET([.AM$24]+[.BB90]) +[.AN$31]*[.$Z$5]*MAGNET([.AN$24]+[.BB90]) +[.AO$31]*[.$Z$5]*MAGNET([.AO$24]+[.BB90]) +[.AP$31]*[.$Z$5]*MAGNET([.AP$24]+[.$BB90])&#10;+[.AQ$31]*[.$Z$5]*MAGNET([.AQ$24]+[.$BB90])&#10;+[.AR$31]*[.$Z$5]*MAGNET([.AR$24]+[.$BB90])&#10;+[.AS$31]*[.$Z$5]*MAGNET([.AS$24]+[.$BB90])&#10;+[.AT$31]*[.$Z$5]*MAGNET([.AT$24]+[.$BB90])&#10;+[.AU$31]*[.$Z$5]*MAGNET([.AU$24]+[.$BB90])&#10;+[.AV$31]*[.$Z$5]*MAGNET([.AV$24]+[.$BB90])&#10;+[.AW$31]*[.$Z$5]*MAGNET([.AW$24]+[.$BB90])&#10;+[.AX$31]*[.$Z$5]*MAGNET([.AX$24]+[.$BB90])&#10;+[.AY$31]*[.$Z$5]*MAGNET([.AY$24]+[.$BB90]) +RAND()*[.$BI$13]" office:value-type="float" office:value="0" calcext:value-type="float">
            <text:p>0</text:p>
          </table:table-cell>
          <table:table-cell table:style-name="ce71" table:formula="of:=[.E$32]*[.$Z$5]*MAGNET([.E$24]+[.$BB90])+[.F$32]*[.$Z$5]*MAGNET([.F$24]+[.$BB90])+[.G$32]*[.$Z$5]*MAGNET([.G$24]+[.$BB90])+[.H$32]*[.$Z$5]*MAGNET([.H$24]+[.$BB90])+[.I$32]*[.$Z$5]*MAGNET([.I$24]+[.$BB90])+[.J$32]*[.$Z$5]*MAGNET([.J$24]+[.$BB90])+[.K$32]*[.$Z$5]*MAGNET([.K$24]+[.$BB90])+[.L$32]*[.$Z$5]*MAGNET([.L$24]+[.$BB90])+[.M$32]*[.$Z$5]*MAGNET([.M$24]+[.$BB90])+[.N$32]*[.$Z$5]*MAGNET([.N$24]+[.$BB90])+[.O$32]*[.$Z$5]*MAGNET([.O$24]+[.$BB90])+[.P$32]*[.$Z$5]*MAGNET([.P$24]+[.$BB90])+[.Q$32]*[.$Z$5]*MAGNET([.Q$24]+[.$BB90])+[.R$32]*[.$Z$5]*MAGNET([.R$24]+[.$BB90])+[.S$32]*[.$Z$5]*MAGNET([.S$24]+[.$BB90])+[.T$32]*[.$Z$5]*MAGNET([.T$24]+[.$BB90])+[.U$32]*[.$Z$5]*MAGNET([.U$24]+[.$BB90])+[.V$32]*[.$Z$5]*MAGNET([.V$24]+[.$BB90])+[.W$32]*[.$Z$5]*MAGNET([.W$24]+[.$BB90])+[.X$32]*[.$Z$5]*MAGNET([.X$24]+[.$BB90])+[.Y$32]*[.$Z$5]*MAGNET([.Y$24]+[.$BB90])+[.Z$32]*[.$Z$5]*MAGNET([.Z$24]+[.$BB90])+[.AA$32]*[.$Z$5]*MAGNET([.AA$24]+[.$BB90])+[.AB$32]*[.$Z$5]*MAGNET([.AB$24]+[.$BB90])+[.AC$32]*[.$Z$5]*MAGNET([.AC$24]+[.$BB90])+[.AD$32]*[.$Z$5]*MAGNET([.AD$24]+[.$BB90])+[.AE$32]*[.$Z$5]*MAGNET([.AE$24]+[.$BB90])+[.AF$32]*[.$Z$5]*MAGNET([.AF$24]+[.$BB90])+[.AG$32]*[.$Z$5]*MAGNET([.AG$24]+[.$BB90])+[.D$32]*[.$Z$5]*MAGNET([.D$24]+[.$BB90])+[.AH$32]*[.$Z$5]*MAGNET([.AH$24]+[.BB90]) +[.AI$32]*[.$Z$5]*MAGNET([.AI$24]+[.BB90]) +[.AJ$32]*[.$Z$5]*MAGNET([.AJ$24]+[.BB90]) +[.AK$32]*[.$Z$5]*MAGNET([.AK$24]+[.BB90]) +[.AL$32]*[.$Z$5]*MAGNET([.AL$24]+[.BB90]) +[.AM$32]*[.$Z$5]*MAGNET([.AM$24]+[.BB90]) +[.AN$32]*[.$Z$5]*MAGNET([.AN$24]+[.BB90]) +[.AO$32]*[.$Z$5]*MAGNET([.AO$24]+[.BB90]) +[.AP$32]*[.$Z$5]*MAGNET([.AP$24]+[.$BB90])&#10;+[.AQ$32]*[.$Z$5]*MAGNET([.AQ$24]+[.$BB90])&#10;+[.AR$32]*[.$Z$5]*MAGNET([.AR$24]+[.$BB90])&#10;+[.AS$32]*[.$Z$5]*MAGNET([.AS$24]+[.$BB90])&#10;+[.AT$32]*[.$Z$5]*MAGNET([.AT$24]+[.$BB90])&#10;+[.AU$32]*[.$Z$5]*MAGNET([.AU$24]+[.$BB90])&#10;+[.AV$32]*[.$Z$5]*MAGNET([.AV$24]+[.$BB90])&#10;+[.AW$32]*[.$Z$5]*MAGNET([.AW$24]+[.$BB90])&#10;+[.AX$32]*[.$Z$5]*MAGNET([.AX$24]+[.$BB90])&#10;+[.AY$32]*[.$Z$5]*MAGNET([.AY$24]+[.$BB9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0]+0.002" office:value-type="float" office:value="0.152" calcext:value-type="float">
            <text:p>0.152</text:p>
          </table:table-cell>
          <table:table-cell table:formula="of:=[.BA91]*[.$D$6]" office:value-type="float" office:value="7.64035333353038" calcext:value-type="float">
            <text:p>7.640</text:p>
          </table:table-cell>
          <table:table-cell table:formula="of:=[.D$25]*[.$Z$5]*MAGNET([.D$24]+[.BB91])+[.E$25]*[.$Z$5]*MAGNET([.E$24]+[.BB91])+[.F$25]*[.$Z$5]*MAGNET([.F$24]+[.BB91])+[.G$25]*[.$Z$5]*MAGNET([.G$24]+[.BB91])+[.H$25]*[.$Z$5]*MAGNET([.H$24]+[.BB91])+[.I$25]*[.$Z$5]*MAGNET([.I$24]+[.BB91])+[.J$25]*[.$Z$5]*MAGNET([.J$24]+[.BB91])+[.K$25]*[.$Z$5]*MAGNET([.K$24]+[.BB91])+[.L$25]*[.$Z$5]*MAGNET([.L$24]+[.BB91])+[.M$25]*[.$Z$5]*MAGNET([.M$24]+[.BB91])+[.N$25]*[.$Z$5]*MAGNET([.N$24]+[.BB91])+[.O$25]*[.$Z$5]*MAGNET([.O$24]+[.BB91])+[.P$25]*[.$Z$5]*MAGNET([.P$24]+[.BB91])+[.Q$25]*[.$Z$5]*MAGNET([.Q$24]+[.BB91])+[.R$25]*[.$Z$5]*MAGNET([.R$24]+[.BB91])+[.S$25]*[.$Z$5]*MAGNET([.S$24]+[.BB91])+[.T$25]*[.$Z$5]*MAGNET([.T$24]+[.BB91])+[.U$25]*[.$Z$5]*MAGNET([.U$24]+[.BB91])+[.V$25]*[.$Z$5]*MAGNET([.V$24]+[.BB91])+[.W$25]*[.$Z$5]*MAGNET([.W$24]+[.BB91])+[.X$25]*[.$Z$5]*MAGNET([.X$24]+[.BB91])+[.Y$25]*[.$Z$5]*MAGNET([.Y$24]+[.BB91])+[.Z$25]*[.$Z$5]*MAGNET([.Z$24]+[.BB91])+[.AA$25]*[.$Z$5]*MAGNET([.AA$24]+[.BB91])+[.AB$25]*[.$Z$5]*MAGNET([.AB$24]+[.BB91])+[.AC$25]*[.$Z$5]*MAGNET([.AC$24]+[.BB91])+[.AD$25]*[.$Z$5]*MAGNET([.AD$24]+[.BB91])+[.AE$25]*[.$Z$5]*MAGNET([.AE$24]+[.BB91])+[.AF$25]*[.$Z$5]*MAGNET([.AF$24]+[.BB91])+[.AG$25]*[.$Z$5]*MAGNET([.AG$24]+[.BB91])+[.AH$25]*[.$Z$5]*MAGNET([.AH$24]+[.BB91]) +[.AI$25]*[.$Z$5]*MAGNET([.AI$24]+[.BB91]) +[.AJ$25]*[.$Z$5]*MAGNET([.AJ$24]+[.BB91]) +[.AK$25]*[.$Z$5]*MAGNET([.AK$24]+[.BB91]) +[.AL$25]*[.$Z$5]*MAGNET([.AL$24]+[.BB91]) +[.AM$25]*[.$Z$5]*MAGNET([.AM$24]+[.BB91]) +[.AN$25]*[.$Z$5]*MAGNET([.AN$24]+[.BB91]) +[.AO$25]*[.$Z$5]*MAGNET([.AO$24]+[.BB91])+RAND()*[.$BC$13]+[.AP$25]*[.$Z$5]*MAGNET([.AP$24]+[.BB91])&#10;+[.AQ$25]*[.$Z$5]*MAGNET([.AQ$24]+[.BB91])&#10;+[.AR$25]*[.$Z$5]*MAGNET([.AR$24]+[.BB91])&#10;+[.AS$25]*[.$Z$5]*MAGNET([.AS$24]+[.BB91])&#10;+[.AT$25]*[.$Z$5]*MAGNET([.AT$24]+[.BB91])&#10;+[.AU$25]*[.$Z$5]*MAGNET([.AU$24]+[.BB91])&#10;+[.AV$25]*[.$Z$5]*MAGNET([.AV$24]+[.BB91])&#10;+[.AW$25]*[.$Z$5]*MAGNET([.AW$24]+[.BB91])&#10;+[.AX$25]*[.$Z$5]*MAGNET([.AX$24]+[.BB91])&#10;+[.AY$25]*[.$Z$5]*MAGNET([.AY$24]+[.BB91])" office:value-type="float" office:value="95.6757111246447" calcext:value-type="float">
            <text:p>95.68</text:p>
          </table:table-cell>
          <table:table-cell table:style-name="ce70" table:formula="of:=[.E$26]*[.$Z$5]*MAGNET([.E$24]+[.$BB91])+[.F$26]*[.$Z$5]*MAGNET([.F$24]+[.$BB91])+[.G$26]*[.$Z$5]*MAGNET([.G$24]+[.$BB91])+[.H$26]*[.$Z$5]*MAGNET([.H$24]+[.$BB91])+[.I$26]*[.$Z$5]*MAGNET([.I$24]+[.$BB91])+[.J$26]*[.$Z$5]*MAGNET([.J$24]+[.$BB91])+[.K$26]*[.$Z$5]*MAGNET([.K$24]+[.$BB91])+[.L$26]*[.$Z$5]*MAGNET([.L$24]+[.$BB91])+[.M$26]*[.$Z$5]*MAGNET([.M$24]+[.$BB91])+[.N$26]*[.$Z$5]*MAGNET([.N$24]+[.$BB91])+[.O$26]*[.$Z$5]*MAGNET([.O$24]+[.$BB91])+[.P$26]*[.$Z$5]*MAGNET([.P$24]+[.$BB91])+[.Q$26]*[.$Z$5]*MAGNET([.Q$24]+[.$BB91])+[.R$26]*[.$Z$5]*MAGNET([.R$24]+[.$BB91])+[.S$26]*[.$Z$5]*MAGNET([.S$24]+[.$BB91])+[.T$26]*[.$Z$5]*MAGNET([.T$24]+[.$BB91])+[.U$26]*[.$Z$5]*MAGNET([.U$24]+[.$BB91])+[.V$26]*[.$Z$5]*MAGNET([.V$24]+[.$BB91])+[.W$26]*[.$Z$5]*MAGNET([.W$24]+[.$BB91])+[.X$26]*[.$Z$5]*MAGNET([.X$24]+[.$BB91])+[.Y$26]*[.$Z$5]*MAGNET([.Y$24]+[.$BB91])+[.Z$26]*[.$Z$5]*MAGNET([.Z$24]+[.$BB91])+[.AA$26]*[.$Z$5]*MAGNET([.AA$24]+[.$BB91])+[.AB$26]*[.$Z$5]*MAGNET([.AB$24]+[.$BB91])+[.AC$26]*[.$Z$5]*MAGNET([.AC$24]+[.$BB91])+[.AD$26]*[.$Z$5]*MAGNET([.AD$24]+[.$BB91])+[.AE$26]*[.$Z$5]*MAGNET([.AE$24]+[.$BB91])+[.AF$26]*[.$Z$5]*MAGNET([.AF$24]+[.$BB91])+[.AG$26]*[.$Z$5]*MAGNET([.AG$24]+[.$BB91])+[.D$26]*[.$Z$5]*MAGNET([.D$24]+[.$BB91])+[.AH$26]*[.$Z$5]*MAGNET([.AH$24]+[.BB91]) +[.AI$26]*[.$Z$5]*MAGNET([.AI$24]+[.BB91]) +[.AJ$26]*[.$Z$5]*MAGNET([.AJ$24]+[.BB91]) +[.AK$26]*[.$Z$5]*MAGNET([.AK$24]+[.BB91]) +[.AL$26]*[.$Z$5]*MAGNET([.AL$24]+[.BB91]) +[.AM$26]*[.$Z$5]*MAGNET([.AM$24]+[.BB91]) +[.AN$26]*[.$Z$5]*MAGNET([.AN$24]+[.BB91]) +[.AO$26]*[.$Z$5]*MAGNET([.AO$24]+[.BB91]) +[.AP$26]*[.$Z$5]*MAGNET([.AP$24]+[.$BB91])&#10;+[.AQ$26]*[.$Z$5]*MAGNET([.AQ$24]+[.$BB91])&#10;+[.AR$26]*[.$Z$5]*MAGNET([.AR$24]+[.$BB91])&#10;+[.AS$26]*[.$Z$5]*MAGNET([.AS$24]+[.$BB91])&#10;+[.AT$26]*[.$Z$5]*MAGNET([.AT$24]+[.$BB91])&#10;+[.AU$26]*[.$Z$5]*MAGNET([.AU$24]+[.$BB91])&#10;+[.AV$26]*[.$Z$5]*MAGNET([.AV$24]+[.$BB91])&#10;+[.AW$26]*[.$Z$5]*MAGNET([.AW$24]+[.$BB91])&#10;+[.AX$26]*[.$Z$5]*MAGNET([.AX$24]+[.$BB91])&#10;+[.AY$26]*[.$Z$5]*MAGNET([.AY$24]+[.$BB91]) +RAND()*[.$BD$13]" office:value-type="float" office:value="1.32294985023987" calcext:value-type="float">
            <text:p>1.32</text:p>
          </table:table-cell>
          <table:table-cell table:style-name="ce71" table:formula="of:=[.E$27]*[.$Z$5]*MAGNET([.E$24]+[.$BB91])+[.F$27]*[.$Z$5]*MAGNET([.F$24]+[.$BB91])+[.G$27]*[.$Z$5]*MAGNET([.G$24]+[.$BB91])+[.H$27]*[.$Z$5]*MAGNET([.H$24]+[.$BB91])+[.I$27]*[.$Z$5]*MAGNET([.I$24]+[.$BB91])+[.J$27]*[.$Z$5]*MAGNET([.J$24]+[.$BB91])+[.K$27]*[.$Z$5]*MAGNET([.K$24]+[.$BB91])+[.L$27]*[.$Z$5]*MAGNET([.L$24]+[.$BB91])+[.M$27]*[.$Z$5]*MAGNET([.M$24]+[.$BB91])+[.N$27]*[.$Z$5]*MAGNET([.N$24]+[.$BB91])+[.O$27]*[.$Z$5]*MAGNET([.O$24]+[.$BB91])+[.P$27]*[.$Z$5]*MAGNET([.P$24]+[.$BB91])+[.Q$27]*[.$Z$5]*MAGNET([.Q$24]+[.$BB91])+[.R$27]*[.$Z$5]*MAGNET([.R$24]+[.$BB91])+[.S$27]*[.$Z$5]*MAGNET([.S$24]+[.$BB91])+[.T$27]*[.$Z$5]*MAGNET([.T$24]+[.$BB91])+[.U$27]*[.$Z$5]*MAGNET([.U$24]+[.$BB91])+[.V$27]*[.$Z$5]*MAGNET([.V$24]+[.$BB91])+[.W$27]*[.$Z$5]*MAGNET([.W$24]+[.$BB91])+[.X$27]*[.$Z$5]*MAGNET([.X$24]+[.$BB91])+[.Y$27]*[.$Z$5]*MAGNET([.Y$24]+[.$BB91])+[.Z$27]*[.$Z$5]*MAGNET([.Z$24]+[.$BB91])+[.AA$27]*[.$Z$5]*MAGNET([.AA$24]+[.$BB91])+[.AB$27]*[.$Z$5]*MAGNET([.AB$24]+[.$BB91])+[.AC$27]*[.$Z$5]*MAGNET([.AC$24]+[.$BB91])+[.AD$27]*[.$Z$5]*MAGNET([.AD$24]+[.$BB91])+[.AE$27]*[.$Z$5]*MAGNET([.AE$24]+[.$BB91])+[.AF$27]*[.$Z$5]*MAGNET([.AF$24]+[.$BB91])+[.AG$27]*[.$Z$5]*MAGNET([.AG$24]+[.$BB91])+[.D$27]*[.$Z$5]*MAGNET([.D$24]+[.$BB91])+[.AH$27]*[.$Z$5]*MAGNET([.AH$24]+[.BB91]) +[.AI$27]*[.$Z$5]*MAGNET([.AI$24]+[.BB91]) +[.AJ$27]*[.$Z$5]*MAGNET([.AJ$24]+[.BB91]) +[.AK$27]*[.$Z$5]*MAGNET([.AK$24]+[.BB91]) +[.AL$27]*[.$Z$5]*MAGNET([.AL$24]+[.BB91]) +[.AM$27]*[.$Z$5]*MAGNET([.AM$24]+[.BB91]) +[.AN$27]*[.$Z$5]*MAGNET([.AN$24]+[.BB91]) +[.AO$27]*[.$Z$5]*MAGNET([.AO$24]+[.BB91]) +[.AP$27]*[.$Z$5]*MAGNET([.AP$24]+[.$BB91])&#10;+[.AQ$27]*[.$Z$5]*MAGNET([.AQ$24]+[.$BB91])&#10;+[.AR$27]*[.$Z$5]*MAGNET([.AR$24]+[.$BB91])&#10;+[.AS$27]*[.$Z$5]*MAGNET([.AS$24]+[.$BB91])&#10;+[.AT$27]*[.$Z$5]*MAGNET([.AT$24]+[.$BB91])&#10;+[.AU$27]*[.$Z$5]*MAGNET([.AU$24]+[.$BB91])&#10;+[.AV$27]*[.$Z$5]*MAGNET([.AV$24]+[.$BB91])&#10;+[.AW$27]*[.$Z$5]*MAGNET([.AW$24]+[.$BB91])&#10;+[.AX$27]*[.$Z$5]*MAGNET([.AX$24]+[.$BB91])&#10;+[.AY$27]*[.$Z$5]*MAGNET([.AY$24]+[.$BB91]) +RAND()*[.$BE$13]" office:value-type="float" office:value="-124.056514863383" calcext:value-type="float">
            <text:p>-124.056514863383</text:p>
          </table:table-cell>
          <table:table-cell table:style-name="ce71" table:formula="of:=[.E$28]*[.$Z$5]*MAGNET([.E$24]+[.$BB91])+[.F$28]*[.$Z$5]*MAGNET([.F$24]+[.$BB91])+[.G$28]*[.$Z$5]*MAGNET([.G$24]+[.$BB91])+[.H$28]*[.$Z$5]*MAGNET([.H$24]+[.$BB91])+[.I$28]*[.$Z$5]*MAGNET([.I$24]+[.$BB91])+[.J$28]*[.$Z$5]*MAGNET([.J$24]+[.$BB91])+[.K$28]*[.$Z$5]*MAGNET([.K$24]+[.$BB91])+[.L$28]*[.$Z$5]*MAGNET([.L$24]+[.$BB91])+[.M$28]*[.$Z$5]*MAGNET([.M$24]+[.$BB91])+[.N$28]*[.$Z$5]*MAGNET([.N$24]+[.$BB91])+[.O$28]*[.$Z$5]*MAGNET([.O$24]+[.$BB91])+[.P$28]*[.$Z$5]*MAGNET([.P$24]+[.$BB91])+[.Q$28]*[.$Z$5]*MAGNET([.Q$24]+[.$BB91])+[.R$28]*[.$Z$5]*MAGNET([.R$24]+[.$BB91])+[.S$28]*[.$Z$5]*MAGNET([.S$24]+[.$BB91])+[.T$28]*[.$Z$5]*MAGNET([.T$24]+[.$BB91])+[.U$28]*[.$Z$5]*MAGNET([.U$24]+[.$BB91])+[.V$28]*[.$Z$5]*MAGNET([.V$24]+[.$BB91])+[.W$28]*[.$Z$5]*MAGNET([.W$24]+[.$BB91])+[.X$28]*[.$Z$5]*MAGNET([.X$24]+[.$BB91])+[.Y$28]*[.$Z$5]*MAGNET([.Y$24]+[.$BB91])+[.Z$28]*[.$Z$5]*MAGNET([.Z$24]+[.$BB91])+[.AA$28]*[.$Z$5]*MAGNET([.AA$24]+[.$BB91])+[.AB$28]*[.$Z$5]*MAGNET([.AB$24]+[.$BB91])+[.AC$28]*[.$Z$5]*MAGNET([.AC$24]+[.$BB91])+[.AD$28]*[.$Z$5]*MAGNET([.AD$24]+[.$BB91])+[.AE$28]*[.$Z$5]*MAGNET([.AE$24]+[.$BB91])+[.AF$28]*[.$Z$5]*MAGNET([.AF$24]+[.$BB91])+[.AG$28]*[.$Z$5]*MAGNET([.AG$24]+[.$BB91])+[.D$28]*[.$Z$5]*MAGNET([.D$24]+[.$BB91])+[.AH$28]*[.$Z$5]*MAGNET([.AH$24]+[.BB91]) +[.AI$28]*[.$Z$5]*MAGNET([.AI$24]+[.BB91]) +[.AJ$28]*[.$Z$5]*MAGNET([.AJ$24]+[.BB91]) +[.AK$28]*[.$Z$5]*MAGNET([.AK$24]+[.BB91]) +[.AL$28]*[.$Z$5]*MAGNET([.AL$24]+[.BB91]) +[.AM$28]*[.$Z$5]*MAGNET([.AM$24]+[.BB91]) +[.AN$28]*[.$Z$5]*MAGNET([.AN$24]+[.BB91]) +[.AO$28]*[.$Z$5]*MAGNET([.AO$24]+[.BB91]) +[.AP$28]*[.$Z$5]*MAGNET([.AP$24]+[.$BB91])&#10;+[.AQ$28]*[.$Z$5]*MAGNET([.AQ$24]+[.$BB91])&#10;+[.AR$28]*[.$Z$5]*MAGNET([.AR$24]+[.$BB91])&#10;+[.AS$28]*[.$Z$5]*MAGNET([.AS$24]+[.$BB91])&#10;+[.AT$28]*[.$Z$5]*MAGNET([.AT$24]+[.$BB91])&#10;+[.AU$28]*[.$Z$5]*MAGNET([.AU$24]+[.$BB91])&#10;+[.AV$28]*[.$Z$5]*MAGNET([.AV$24]+[.$BB91])&#10;+[.AW$28]*[.$Z$5]*MAGNET([.AW$24]+[.$BB91])&#10;+[.AX$28]*[.$Z$5]*MAGNET([.AX$24]+[.$BB91])&#10;+[.AY$28]*[.$Z$5]*MAGNET([.AY$24]+[.$BB91]) +RAND()*[.$BF$13]" office:value-type="float" office:value="-16.1733469400543" calcext:value-type="float">
            <text:p>-16.1733469400543</text:p>
          </table:table-cell>
          <table:table-cell table:style-name="ce71" table:formula="of:=[.E$29]*[.$Z$5]*MAGNET([.E$24]+[.$BB91])+[.F$29]*[.$Z$5]*MAGNET([.F$24]+[.$BB91])+[.G$29]*[.$Z$5]*MAGNET([.G$24]+[.$BB91])+[.H$29]*[.$Z$5]*MAGNET([.H$24]+[.$BB91])+[.I$29]*[.$Z$5]*MAGNET([.I$24]+[.$BB91])+[.J$29]*[.$Z$5]*MAGNET([.J$24]+[.$BB91])+[.K$29]*[.$Z$5]*MAGNET([.K$24]+[.$BB91])+[.L$29]*[.$Z$5]*MAGNET([.L$24]+[.$BB91])+[.M$29]*[.$Z$5]*MAGNET([.M$24]+[.$BB91])+[.N$29]*[.$Z$5]*MAGNET([.N$24]+[.$BB91])+[.O$29]*[.$Z$5]*MAGNET([.O$24]+[.$BB91])+[.P$29]*[.$Z$5]*MAGNET([.P$24]+[.$BB91])+[.Q$29]*[.$Z$5]*MAGNET([.Q$24]+[.$BB91])+[.R$29]*[.$Z$5]*MAGNET([.R$24]+[.$BB91])+[.S$29]*[.$Z$5]*MAGNET([.S$24]+[.$BB91])+[.T$29]*[.$Z$5]*MAGNET([.T$24]+[.$BB91])+[.U$29]*[.$Z$5]*MAGNET([.U$24]+[.$BB91])+[.V$29]*[.$Z$5]*MAGNET([.V$24]+[.$BB91])+[.W$29]*[.$Z$5]*MAGNET([.W$24]+[.$BB91])+[.X$29]*[.$Z$5]*MAGNET([.X$24]+[.$BB91])+[.Y$29]*[.$Z$5]*MAGNET([.Y$24]+[.$BB91])+[.Z$29]*[.$Z$5]*MAGNET([.Z$24]+[.$BB91])+[.AA$29]*[.$Z$5]*MAGNET([.AA$24]+[.$BB91])+[.AB$29]*[.$Z$5]*MAGNET([.AB$24]+[.$BB91])+[.AC$29]*[.$Z$5]*MAGNET([.AC$24]+[.$BB91])+[.AD$29]*[.$Z$5]*MAGNET([.AD$24]+[.$BB91])+[.AE$29]*[.$Z$5]*MAGNET([.AE$24]+[.$BB91])+[.AF$29]*[.$Z$5]*MAGNET([.AF$24]+[.$BB91])+[.AG$29]*[.$Z$5]*MAGNET([.AG$24]+[.$BB91])+[.D$29]*[.$Z$5]*MAGNET([.D$24]+[.$BB91])+[.AH$29]*[.$Z$5]*MAGNET([.AH$24]+[.BB91]) +[.AI$29]*[.$Z$5]*MAGNET([.AI$24]+[.BB91]) +[.AJ$29]*[.$Z$5]*MAGNET([.AJ$24]+[.BB91]) +[.AK$29]*[.$Z$5]*MAGNET([.AK$24]+[.BB91]) +[.AL$29]*[.$Z$5]*MAGNET([.AL$24]+[.BB91]) +[.AM$29]*[.$Z$5]*MAGNET([.AM$24]+[.BB91]) +[.AN$29]*[.$Z$5]*MAGNET([.AN$24]+[.BB91]) +[.AO$29]*[.$Z$5]*MAGNET([.AO$24]+[.BB91]) +[.AP$29]*[.$Z$5]*MAGNET([.AP$24]+[.$BB91])&#10;+[.AQ$29]*[.$Z$5]*MAGNET([.AQ$24]+[.$BB91])&#10;+[.AR$29]*[.$Z$5]*MAGNET([.AR$24]+[.$BB91])&#10;+[.AS$29]*[.$Z$5]*MAGNET([.AS$24]+[.$BB91])&#10;+[.AT$29]*[.$Z$5]*MAGNET([.AT$24]+[.$BB91])&#10;+[.AU$29]*[.$Z$5]*MAGNET([.AU$24]+[.$BB91])&#10;+[.AV$29]*[.$Z$5]*MAGNET([.AV$24]+[.$BB91])&#10;+[.AW$29]*[.$Z$5]*MAGNET([.AW$24]+[.$BB91])&#10;+[.AX$29]*[.$Z$5]*MAGNET([.AX$24]+[.$BB91])&#10;+[.AY$29]*[.$Z$5]*MAGNET([.AY$24]+[.$BB91]) +RAND()*[.$BG$13]" office:value-type="float" office:value="46.8899076144893" calcext:value-type="float">
            <text:p>46.8899076144893</text:p>
          </table:table-cell>
          <table:table-cell table:style-name="ce71" table:formula="of:=[.E$30]*[.$Z$5]*MAGNET([.E$24]+[.$BB91])+[.F$30]*[.$Z$5]*MAGNET([.F$24]+[.$BB91])+[.G$30]*[.$Z$5]*MAGNET([.G$24]+[.$BB91])+[.H$30]*[.$Z$5]*MAGNET([.H$24]+[.$BB91])+[.I$30]*[.$Z$5]*MAGNET([.I$24]+[.$BB91])+[.J$30]*[.$Z$5]*MAGNET([.J$24]+[.$BB91])+[.K$30]*[.$Z$5]*MAGNET([.K$24]+[.$BB91])+[.L$30]*[.$Z$5]*MAGNET([.L$24]+[.$BB91])+[.M$30]*[.$Z$5]*MAGNET([.M$24]+[.$BB91])+[.N$30]*[.$Z$5]*MAGNET([.N$24]+[.$BB91])+[.O$30]*[.$Z$5]*MAGNET([.O$24]+[.$BB91])+[.P$30]*[.$Z$5]*MAGNET([.P$24]+[.$BB91])+[.Q$30]*[.$Z$5]*MAGNET([.Q$24]+[.$BB91])+[.R$30]*[.$Z$5]*MAGNET([.R$24]+[.$BB91])+[.S$30]*[.$Z$5]*MAGNET([.S$24]+[.$BB91])+[.T$30]*[.$Z$5]*MAGNET([.T$24]+[.$BB91])+[.U$30]*[.$Z$5]*MAGNET([.U$24]+[.$BB91])+[.V$30]*[.$Z$5]*MAGNET([.V$24]+[.$BB91])+[.W$30]*[.$Z$5]*MAGNET([.W$24]+[.$BB91])+[.X$30]*[.$Z$5]*MAGNET([.X$24]+[.$BB91])+[.Y$30]*[.$Z$5]*MAGNET([.Y$24]+[.$BB91])+[.Z$30]*[.$Z$5]*MAGNET([.Z$24]+[.$BB91])+[.AA$30]*[.$Z$5]*MAGNET([.AA$24]+[.$BB91])+[.AB$30]*[.$Z$5]*MAGNET([.AB$24]+[.$BB91])+[.AC$30]*[.$Z$5]*MAGNET([.AC$24]+[.$BB91])+[.AD$30]*[.$Z$5]*MAGNET([.AD$24]+[.$BB91])+[.AE$30]*[.$Z$5]*MAGNET([.AE$24]+[.$BB91])+[.AF$30]*[.$Z$5]*MAGNET([.AF$24]+[.$BB91])+[.AG$30]*[.$Z$5]*MAGNET([.AG$24]+[.$BB91])+[.D$30]*[.$Z$5]*MAGNET([.D$24]+[.$BB91])+[.AH$30]*[.$Z$5]*MAGNET([.AH$24]+[.BB91]) +[.AI$30]*[.$Z$5]*MAGNET([.AI$24]+[.BB91]) +[.AJ$30]*[.$Z$5]*MAGNET([.AJ$24]+[.BB91]) +[.AK$30]*[.$Z$5]*MAGNET([.AK$24]+[.BB91]) +[.AL$30]*[.$Z$5]*MAGNET([.AL$24]+[.BB91]) +[.AM$30]*[.$Z$5]*MAGNET([.AM$24]+[.BB91]) +[.AN$30]*[.$Z$5]*MAGNET([.AN$24]+[.BB91]) +[.AO$30]*[.$Z$5]*MAGNET([.AO$24]+[.BB91]) +[.AP$30]*[.$Z$5]*MAGNET([.AP$24]+[.$BB91])&#10;+[.AQ$30]*[.$Z$5]*MAGNET([.AQ$24]+[.$BB91])&#10;+[.AR$30]*[.$Z$5]*MAGNET([.AR$24]+[.$BB91])&#10;+[.AS$30]*[.$Z$5]*MAGNET([.AS$24]+[.$BB91])&#10;+[.AT$30]*[.$Z$5]*MAGNET([.AT$24]+[.$BB91])&#10;+[.AU$30]*[.$Z$5]*MAGNET([.AU$24]+[.$BB91])&#10;+[.AV$30]*[.$Z$5]*MAGNET([.AV$24]+[.$BB91])&#10;+[.AW$30]*[.$Z$5]*MAGNET([.AW$24]+[.$BB91])&#10;+[.AX$30]*[.$Z$5]*MAGNET([.AX$24]+[.$BB91])&#10;+[.AY$30]*[.$Z$5]*MAGNET([.AY$24]+[.$BB91]) +RAND()*[.$BH$13]" office:value-type="float" office:value="0" calcext:value-type="float">
            <text:p>0</text:p>
          </table:table-cell>
          <table:table-cell table:style-name="ce71" table:formula="of:=[.E$31]*[.$Z$5]*MAGNET([.E$24]+[.$BB91])+[.F$31]*[.$Z$5]*MAGNET([.F$24]+[.$BB91])+[.G$31]*[.$Z$5]*MAGNET([.G$24]+[.$BB91])+[.H$31]*[.$Z$5]*MAGNET([.H$24]+[.$BB91])+[.I$31]*[.$Z$5]*MAGNET([.I$24]+[.$BB91])+[.J$31]*[.$Z$5]*MAGNET([.J$24]+[.$BB91])+[.K$31]*[.$Z$5]*MAGNET([.K$24]+[.$BB91])+[.L$31]*[.$Z$5]*MAGNET([.L$24]+[.$BB91])+[.M$31]*[.$Z$5]*MAGNET([.M$24]+[.$BB91])+[.N$31]*[.$Z$5]*MAGNET([.N$24]+[.$BB91])+[.O$31]*[.$Z$5]*MAGNET([.O$24]+[.$BB91])+[.P$31]*[.$Z$5]*MAGNET([.P$24]+[.$BB91])+[.Q$31]*[.$Z$5]*MAGNET([.Q$24]+[.$BB91])+[.R$31]*[.$Z$5]*MAGNET([.R$24]+[.$BB91])+[.S$31]*[.$Z$5]*MAGNET([.S$24]+[.$BB91])+[.T$31]*[.$Z$5]*MAGNET([.T$24]+[.$BB91])+[.U$31]*[.$Z$5]*MAGNET([.U$24]+[.$BB91])+[.V$31]*[.$Z$5]*MAGNET([.V$24]+[.$BB91])+[.W$31]*[.$Z$5]*MAGNET([.W$24]+[.$BB91])+[.X$31]*[.$Z$5]*MAGNET([.X$24]+[.$BB91])+[.Y$31]*[.$Z$5]*MAGNET([.Y$24]+[.$BB91])+[.Z$31]*[.$Z$5]*MAGNET([.Z$24]+[.$BB91])+[.AA$31]*[.$Z$5]*MAGNET([.AA$24]+[.$BB91])+[.AB$31]*[.$Z$5]*MAGNET([.AB$24]+[.$BB91])+[.AC$31]*[.$Z$5]*MAGNET([.AC$24]+[.$BB91])+[.AD$31]*[.$Z$5]*MAGNET([.AD$24]+[.$BB91])+[.AE$31]*[.$Z$5]*MAGNET([.AE$24]+[.$BB91])+[.AF$31]*[.$Z$5]*MAGNET([.AF$24]+[.$BB91])+[.AG$31]*[.$Z$5]*MAGNET([.AG$24]+[.$BB91])+[.D$31]*[.$Z$5]*MAGNET([.D$24]+[.$BB91])+[.AH$31]*[.$Z$5]*MAGNET([.AH$24]+[.BB91]) +[.AI$31]*[.$Z$5]*MAGNET([.AI$24]+[.BB91]) +[.AJ$31]*[.$Z$5]*MAGNET([.AJ$24]+[.BB91]) +[.AK$31]*[.$Z$5]*MAGNET([.AK$24]+[.BB91]) +[.AL$31]*[.$Z$5]*MAGNET([.AL$24]+[.BB91]) +[.AM$31]*[.$Z$5]*MAGNET([.AM$24]+[.BB91]) +[.AN$31]*[.$Z$5]*MAGNET([.AN$24]+[.BB91]) +[.AO$31]*[.$Z$5]*MAGNET([.AO$24]+[.BB91]) +[.AP$31]*[.$Z$5]*MAGNET([.AP$24]+[.$BB91])&#10;+[.AQ$31]*[.$Z$5]*MAGNET([.AQ$24]+[.$BB91])&#10;+[.AR$31]*[.$Z$5]*MAGNET([.AR$24]+[.$BB91])&#10;+[.AS$31]*[.$Z$5]*MAGNET([.AS$24]+[.$BB91])&#10;+[.AT$31]*[.$Z$5]*MAGNET([.AT$24]+[.$BB91])&#10;+[.AU$31]*[.$Z$5]*MAGNET([.AU$24]+[.$BB91])&#10;+[.AV$31]*[.$Z$5]*MAGNET([.AV$24]+[.$BB91])&#10;+[.AW$31]*[.$Z$5]*MAGNET([.AW$24]+[.$BB91])&#10;+[.AX$31]*[.$Z$5]*MAGNET([.AX$24]+[.$BB91])&#10;+[.AY$31]*[.$Z$5]*MAGNET([.AY$24]+[.$BB91]) +RAND()*[.$BI$13]" office:value-type="float" office:value="0" calcext:value-type="float">
            <text:p>0</text:p>
          </table:table-cell>
          <table:table-cell table:style-name="ce71" table:formula="of:=[.E$32]*[.$Z$5]*MAGNET([.E$24]+[.$BB91])+[.F$32]*[.$Z$5]*MAGNET([.F$24]+[.$BB91])+[.G$32]*[.$Z$5]*MAGNET([.G$24]+[.$BB91])+[.H$32]*[.$Z$5]*MAGNET([.H$24]+[.$BB91])+[.I$32]*[.$Z$5]*MAGNET([.I$24]+[.$BB91])+[.J$32]*[.$Z$5]*MAGNET([.J$24]+[.$BB91])+[.K$32]*[.$Z$5]*MAGNET([.K$24]+[.$BB91])+[.L$32]*[.$Z$5]*MAGNET([.L$24]+[.$BB91])+[.M$32]*[.$Z$5]*MAGNET([.M$24]+[.$BB91])+[.N$32]*[.$Z$5]*MAGNET([.N$24]+[.$BB91])+[.O$32]*[.$Z$5]*MAGNET([.O$24]+[.$BB91])+[.P$32]*[.$Z$5]*MAGNET([.P$24]+[.$BB91])+[.Q$32]*[.$Z$5]*MAGNET([.Q$24]+[.$BB91])+[.R$32]*[.$Z$5]*MAGNET([.R$24]+[.$BB91])+[.S$32]*[.$Z$5]*MAGNET([.S$24]+[.$BB91])+[.T$32]*[.$Z$5]*MAGNET([.T$24]+[.$BB91])+[.U$32]*[.$Z$5]*MAGNET([.U$24]+[.$BB91])+[.V$32]*[.$Z$5]*MAGNET([.V$24]+[.$BB91])+[.W$32]*[.$Z$5]*MAGNET([.W$24]+[.$BB91])+[.X$32]*[.$Z$5]*MAGNET([.X$24]+[.$BB91])+[.Y$32]*[.$Z$5]*MAGNET([.Y$24]+[.$BB91])+[.Z$32]*[.$Z$5]*MAGNET([.Z$24]+[.$BB91])+[.AA$32]*[.$Z$5]*MAGNET([.AA$24]+[.$BB91])+[.AB$32]*[.$Z$5]*MAGNET([.AB$24]+[.$BB91])+[.AC$32]*[.$Z$5]*MAGNET([.AC$24]+[.$BB91])+[.AD$32]*[.$Z$5]*MAGNET([.AD$24]+[.$BB91])+[.AE$32]*[.$Z$5]*MAGNET([.AE$24]+[.$BB91])+[.AF$32]*[.$Z$5]*MAGNET([.AF$24]+[.$BB91])+[.AG$32]*[.$Z$5]*MAGNET([.AG$24]+[.$BB91])+[.D$32]*[.$Z$5]*MAGNET([.D$24]+[.$BB91])+[.AH$32]*[.$Z$5]*MAGNET([.AH$24]+[.BB91]) +[.AI$32]*[.$Z$5]*MAGNET([.AI$24]+[.BB91]) +[.AJ$32]*[.$Z$5]*MAGNET([.AJ$24]+[.BB91]) +[.AK$32]*[.$Z$5]*MAGNET([.AK$24]+[.BB91]) +[.AL$32]*[.$Z$5]*MAGNET([.AL$24]+[.BB91]) +[.AM$32]*[.$Z$5]*MAGNET([.AM$24]+[.BB91]) +[.AN$32]*[.$Z$5]*MAGNET([.AN$24]+[.BB91]) +[.AO$32]*[.$Z$5]*MAGNET([.AO$24]+[.BB91]) +[.AP$32]*[.$Z$5]*MAGNET([.AP$24]+[.$BB91])&#10;+[.AQ$32]*[.$Z$5]*MAGNET([.AQ$24]+[.$BB91])&#10;+[.AR$32]*[.$Z$5]*MAGNET([.AR$24]+[.$BB91])&#10;+[.AS$32]*[.$Z$5]*MAGNET([.AS$24]+[.$BB91])&#10;+[.AT$32]*[.$Z$5]*MAGNET([.AT$24]+[.$BB91])&#10;+[.AU$32]*[.$Z$5]*MAGNET([.AU$24]+[.$BB91])&#10;+[.AV$32]*[.$Z$5]*MAGNET([.AV$24]+[.$BB91])&#10;+[.AW$32]*[.$Z$5]*MAGNET([.AW$24]+[.$BB91])&#10;+[.AX$32]*[.$Z$5]*MAGNET([.AX$24]+[.$BB91])&#10;+[.AY$32]*[.$Z$5]*MAGNET([.AY$24]+[.$BB9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1]+0.002" office:value-type="float" office:value="0.154" calcext:value-type="float">
            <text:p>0.154</text:p>
          </table:table-cell>
          <table:table-cell table:formula="of:=[.BA92]*[.$D$6]" office:value-type="float" office:value="7.74088429844526" calcext:value-type="float">
            <text:p>7.741</text:p>
          </table:table-cell>
          <table:table-cell table:formula="of:=[.D$25]*[.$Z$5]*MAGNET([.D$24]+[.BB92])+[.E$25]*[.$Z$5]*MAGNET([.E$24]+[.BB92])+[.F$25]*[.$Z$5]*MAGNET([.F$24]+[.BB92])+[.G$25]*[.$Z$5]*MAGNET([.G$24]+[.BB92])+[.H$25]*[.$Z$5]*MAGNET([.H$24]+[.BB92])+[.I$25]*[.$Z$5]*MAGNET([.I$24]+[.BB92])+[.J$25]*[.$Z$5]*MAGNET([.J$24]+[.BB92])+[.K$25]*[.$Z$5]*MAGNET([.K$24]+[.BB92])+[.L$25]*[.$Z$5]*MAGNET([.L$24]+[.BB92])+[.M$25]*[.$Z$5]*MAGNET([.M$24]+[.BB92])+[.N$25]*[.$Z$5]*MAGNET([.N$24]+[.BB92])+[.O$25]*[.$Z$5]*MAGNET([.O$24]+[.BB92])+[.P$25]*[.$Z$5]*MAGNET([.P$24]+[.BB92])+[.Q$25]*[.$Z$5]*MAGNET([.Q$24]+[.BB92])+[.R$25]*[.$Z$5]*MAGNET([.R$24]+[.BB92])+[.S$25]*[.$Z$5]*MAGNET([.S$24]+[.BB92])+[.T$25]*[.$Z$5]*MAGNET([.T$24]+[.BB92])+[.U$25]*[.$Z$5]*MAGNET([.U$24]+[.BB92])+[.V$25]*[.$Z$5]*MAGNET([.V$24]+[.BB92])+[.W$25]*[.$Z$5]*MAGNET([.W$24]+[.BB92])+[.X$25]*[.$Z$5]*MAGNET([.X$24]+[.BB92])+[.Y$25]*[.$Z$5]*MAGNET([.Y$24]+[.BB92])+[.Z$25]*[.$Z$5]*MAGNET([.Z$24]+[.BB92])+[.AA$25]*[.$Z$5]*MAGNET([.AA$24]+[.BB92])+[.AB$25]*[.$Z$5]*MAGNET([.AB$24]+[.BB92])+[.AC$25]*[.$Z$5]*MAGNET([.AC$24]+[.BB92])+[.AD$25]*[.$Z$5]*MAGNET([.AD$24]+[.BB92])+[.AE$25]*[.$Z$5]*MAGNET([.AE$24]+[.BB92])+[.AF$25]*[.$Z$5]*MAGNET([.AF$24]+[.BB92])+[.AG$25]*[.$Z$5]*MAGNET([.AG$24]+[.BB92])+[.AH$25]*[.$Z$5]*MAGNET([.AH$24]+[.BB92]) +[.AI$25]*[.$Z$5]*MAGNET([.AI$24]+[.BB92]) +[.AJ$25]*[.$Z$5]*MAGNET([.AJ$24]+[.BB92]) +[.AK$25]*[.$Z$5]*MAGNET([.AK$24]+[.BB92]) +[.AL$25]*[.$Z$5]*MAGNET([.AL$24]+[.BB92]) +[.AM$25]*[.$Z$5]*MAGNET([.AM$24]+[.BB92]) +[.AN$25]*[.$Z$5]*MAGNET([.AN$24]+[.BB92]) +[.AO$25]*[.$Z$5]*MAGNET([.AO$24]+[.BB92])+RAND()*[.$BC$13]+[.AP$25]*[.$Z$5]*MAGNET([.AP$24]+[.BB92])&#10;+[.AQ$25]*[.$Z$5]*MAGNET([.AQ$24]+[.BB92])&#10;+[.AR$25]*[.$Z$5]*MAGNET([.AR$24]+[.BB92])&#10;+[.AS$25]*[.$Z$5]*MAGNET([.AS$24]+[.BB92])&#10;+[.AT$25]*[.$Z$5]*MAGNET([.AT$24]+[.BB92])&#10;+[.AU$25]*[.$Z$5]*MAGNET([.AU$24]+[.BB92])&#10;+[.AV$25]*[.$Z$5]*MAGNET([.AV$24]+[.BB92])&#10;+[.AW$25]*[.$Z$5]*MAGNET([.AW$24]+[.BB92])&#10;+[.AX$25]*[.$Z$5]*MAGNET([.AX$24]+[.BB92])&#10;+[.AY$25]*[.$Z$5]*MAGNET([.AY$24]+[.BB92])" office:value-type="float" office:value="102.795308325526" calcext:value-type="float">
            <text:p>102.80</text:p>
          </table:table-cell>
          <table:table-cell table:style-name="ce70" table:formula="of:=[.E$26]*[.$Z$5]*MAGNET([.E$24]+[.$BB92])+[.F$26]*[.$Z$5]*MAGNET([.F$24]+[.$BB92])+[.G$26]*[.$Z$5]*MAGNET([.G$24]+[.$BB92])+[.H$26]*[.$Z$5]*MAGNET([.H$24]+[.$BB92])+[.I$26]*[.$Z$5]*MAGNET([.I$24]+[.$BB92])+[.J$26]*[.$Z$5]*MAGNET([.J$24]+[.$BB92])+[.K$26]*[.$Z$5]*MAGNET([.K$24]+[.$BB92])+[.L$26]*[.$Z$5]*MAGNET([.L$24]+[.$BB92])+[.M$26]*[.$Z$5]*MAGNET([.M$24]+[.$BB92])+[.N$26]*[.$Z$5]*MAGNET([.N$24]+[.$BB92])+[.O$26]*[.$Z$5]*MAGNET([.O$24]+[.$BB92])+[.P$26]*[.$Z$5]*MAGNET([.P$24]+[.$BB92])+[.Q$26]*[.$Z$5]*MAGNET([.Q$24]+[.$BB92])+[.R$26]*[.$Z$5]*MAGNET([.R$24]+[.$BB92])+[.S$26]*[.$Z$5]*MAGNET([.S$24]+[.$BB92])+[.T$26]*[.$Z$5]*MAGNET([.T$24]+[.$BB92])+[.U$26]*[.$Z$5]*MAGNET([.U$24]+[.$BB92])+[.V$26]*[.$Z$5]*MAGNET([.V$24]+[.$BB92])+[.W$26]*[.$Z$5]*MAGNET([.W$24]+[.$BB92])+[.X$26]*[.$Z$5]*MAGNET([.X$24]+[.$BB92])+[.Y$26]*[.$Z$5]*MAGNET([.Y$24]+[.$BB92])+[.Z$26]*[.$Z$5]*MAGNET([.Z$24]+[.$BB92])+[.AA$26]*[.$Z$5]*MAGNET([.AA$24]+[.$BB92])+[.AB$26]*[.$Z$5]*MAGNET([.AB$24]+[.$BB92])+[.AC$26]*[.$Z$5]*MAGNET([.AC$24]+[.$BB92])+[.AD$26]*[.$Z$5]*MAGNET([.AD$24]+[.$BB92])+[.AE$26]*[.$Z$5]*MAGNET([.AE$24]+[.$BB92])+[.AF$26]*[.$Z$5]*MAGNET([.AF$24]+[.$BB92])+[.AG$26]*[.$Z$5]*MAGNET([.AG$24]+[.$BB92])+[.D$26]*[.$Z$5]*MAGNET([.D$24]+[.$BB92])+[.AH$26]*[.$Z$5]*MAGNET([.AH$24]+[.BB92]) +[.AI$26]*[.$Z$5]*MAGNET([.AI$24]+[.BB92]) +[.AJ$26]*[.$Z$5]*MAGNET([.AJ$24]+[.BB92]) +[.AK$26]*[.$Z$5]*MAGNET([.AK$24]+[.BB92]) +[.AL$26]*[.$Z$5]*MAGNET([.AL$24]+[.BB92]) +[.AM$26]*[.$Z$5]*MAGNET([.AM$24]+[.BB92]) +[.AN$26]*[.$Z$5]*MAGNET([.AN$24]+[.BB92]) +[.AO$26]*[.$Z$5]*MAGNET([.AO$24]+[.BB92]) +[.AP$26]*[.$Z$5]*MAGNET([.AP$24]+[.$BB92])&#10;+[.AQ$26]*[.$Z$5]*MAGNET([.AQ$24]+[.$BB92])&#10;+[.AR$26]*[.$Z$5]*MAGNET([.AR$24]+[.$BB92])&#10;+[.AS$26]*[.$Z$5]*MAGNET([.AS$24]+[.$BB92])&#10;+[.AT$26]*[.$Z$5]*MAGNET([.AT$24]+[.$BB92])&#10;+[.AU$26]*[.$Z$5]*MAGNET([.AU$24]+[.$BB92])&#10;+[.AV$26]*[.$Z$5]*MAGNET([.AV$24]+[.$BB92])&#10;+[.AW$26]*[.$Z$5]*MAGNET([.AW$24]+[.$BB92])&#10;+[.AX$26]*[.$Z$5]*MAGNET([.AX$24]+[.$BB92])&#10;+[.AY$26]*[.$Z$5]*MAGNET([.AY$24]+[.$BB92]) +RAND()*[.$BD$13]" office:value-type="float" office:value="-7.46044386112409" calcext:value-type="float">
            <text:p>-7.46</text:p>
          </table:table-cell>
          <table:table-cell table:style-name="ce71" table:formula="of:=[.E$27]*[.$Z$5]*MAGNET([.E$24]+[.$BB92])+[.F$27]*[.$Z$5]*MAGNET([.F$24]+[.$BB92])+[.G$27]*[.$Z$5]*MAGNET([.G$24]+[.$BB92])+[.H$27]*[.$Z$5]*MAGNET([.H$24]+[.$BB92])+[.I$27]*[.$Z$5]*MAGNET([.I$24]+[.$BB92])+[.J$27]*[.$Z$5]*MAGNET([.J$24]+[.$BB92])+[.K$27]*[.$Z$5]*MAGNET([.K$24]+[.$BB92])+[.L$27]*[.$Z$5]*MAGNET([.L$24]+[.$BB92])+[.M$27]*[.$Z$5]*MAGNET([.M$24]+[.$BB92])+[.N$27]*[.$Z$5]*MAGNET([.N$24]+[.$BB92])+[.O$27]*[.$Z$5]*MAGNET([.O$24]+[.$BB92])+[.P$27]*[.$Z$5]*MAGNET([.P$24]+[.$BB92])+[.Q$27]*[.$Z$5]*MAGNET([.Q$24]+[.$BB92])+[.R$27]*[.$Z$5]*MAGNET([.R$24]+[.$BB92])+[.S$27]*[.$Z$5]*MAGNET([.S$24]+[.$BB92])+[.T$27]*[.$Z$5]*MAGNET([.T$24]+[.$BB92])+[.U$27]*[.$Z$5]*MAGNET([.U$24]+[.$BB92])+[.V$27]*[.$Z$5]*MAGNET([.V$24]+[.$BB92])+[.W$27]*[.$Z$5]*MAGNET([.W$24]+[.$BB92])+[.X$27]*[.$Z$5]*MAGNET([.X$24]+[.$BB92])+[.Y$27]*[.$Z$5]*MAGNET([.Y$24]+[.$BB92])+[.Z$27]*[.$Z$5]*MAGNET([.Z$24]+[.$BB92])+[.AA$27]*[.$Z$5]*MAGNET([.AA$24]+[.$BB92])+[.AB$27]*[.$Z$5]*MAGNET([.AB$24]+[.$BB92])+[.AC$27]*[.$Z$5]*MAGNET([.AC$24]+[.$BB92])+[.AD$27]*[.$Z$5]*MAGNET([.AD$24]+[.$BB92])+[.AE$27]*[.$Z$5]*MAGNET([.AE$24]+[.$BB92])+[.AF$27]*[.$Z$5]*MAGNET([.AF$24]+[.$BB92])+[.AG$27]*[.$Z$5]*MAGNET([.AG$24]+[.$BB92])+[.D$27]*[.$Z$5]*MAGNET([.D$24]+[.$BB92])+[.AH$27]*[.$Z$5]*MAGNET([.AH$24]+[.BB92]) +[.AI$27]*[.$Z$5]*MAGNET([.AI$24]+[.BB92]) +[.AJ$27]*[.$Z$5]*MAGNET([.AJ$24]+[.BB92]) +[.AK$27]*[.$Z$5]*MAGNET([.AK$24]+[.BB92]) +[.AL$27]*[.$Z$5]*MAGNET([.AL$24]+[.BB92]) +[.AM$27]*[.$Z$5]*MAGNET([.AM$24]+[.BB92]) +[.AN$27]*[.$Z$5]*MAGNET([.AN$24]+[.BB92]) +[.AO$27]*[.$Z$5]*MAGNET([.AO$24]+[.BB92]) +[.AP$27]*[.$Z$5]*MAGNET([.AP$24]+[.$BB92])&#10;+[.AQ$27]*[.$Z$5]*MAGNET([.AQ$24]+[.$BB92])&#10;+[.AR$27]*[.$Z$5]*MAGNET([.AR$24]+[.$BB92])&#10;+[.AS$27]*[.$Z$5]*MAGNET([.AS$24]+[.$BB92])&#10;+[.AT$27]*[.$Z$5]*MAGNET([.AT$24]+[.$BB92])&#10;+[.AU$27]*[.$Z$5]*MAGNET([.AU$24]+[.$BB92])&#10;+[.AV$27]*[.$Z$5]*MAGNET([.AV$24]+[.$BB92])&#10;+[.AW$27]*[.$Z$5]*MAGNET([.AW$24]+[.$BB92])&#10;+[.AX$27]*[.$Z$5]*MAGNET([.AX$24]+[.$BB92])&#10;+[.AY$27]*[.$Z$5]*MAGNET([.AY$24]+[.$BB92]) +RAND()*[.$BE$13]" office:value-type="float" office:value="-118.675246823465" calcext:value-type="float">
            <text:p>-118.675246823465</text:p>
          </table:table-cell>
          <table:table-cell table:style-name="ce71" table:formula="of:=[.E$28]*[.$Z$5]*MAGNET([.E$24]+[.$BB92])+[.F$28]*[.$Z$5]*MAGNET([.F$24]+[.$BB92])+[.G$28]*[.$Z$5]*MAGNET([.G$24]+[.$BB92])+[.H$28]*[.$Z$5]*MAGNET([.H$24]+[.$BB92])+[.I$28]*[.$Z$5]*MAGNET([.I$24]+[.$BB92])+[.J$28]*[.$Z$5]*MAGNET([.J$24]+[.$BB92])+[.K$28]*[.$Z$5]*MAGNET([.K$24]+[.$BB92])+[.L$28]*[.$Z$5]*MAGNET([.L$24]+[.$BB92])+[.M$28]*[.$Z$5]*MAGNET([.M$24]+[.$BB92])+[.N$28]*[.$Z$5]*MAGNET([.N$24]+[.$BB92])+[.O$28]*[.$Z$5]*MAGNET([.O$24]+[.$BB92])+[.P$28]*[.$Z$5]*MAGNET([.P$24]+[.$BB92])+[.Q$28]*[.$Z$5]*MAGNET([.Q$24]+[.$BB92])+[.R$28]*[.$Z$5]*MAGNET([.R$24]+[.$BB92])+[.S$28]*[.$Z$5]*MAGNET([.S$24]+[.$BB92])+[.T$28]*[.$Z$5]*MAGNET([.T$24]+[.$BB92])+[.U$28]*[.$Z$5]*MAGNET([.U$24]+[.$BB92])+[.V$28]*[.$Z$5]*MAGNET([.V$24]+[.$BB92])+[.W$28]*[.$Z$5]*MAGNET([.W$24]+[.$BB92])+[.X$28]*[.$Z$5]*MAGNET([.X$24]+[.$BB92])+[.Y$28]*[.$Z$5]*MAGNET([.Y$24]+[.$BB92])+[.Z$28]*[.$Z$5]*MAGNET([.Z$24]+[.$BB92])+[.AA$28]*[.$Z$5]*MAGNET([.AA$24]+[.$BB92])+[.AB$28]*[.$Z$5]*MAGNET([.AB$24]+[.$BB92])+[.AC$28]*[.$Z$5]*MAGNET([.AC$24]+[.$BB92])+[.AD$28]*[.$Z$5]*MAGNET([.AD$24]+[.$BB92])+[.AE$28]*[.$Z$5]*MAGNET([.AE$24]+[.$BB92])+[.AF$28]*[.$Z$5]*MAGNET([.AF$24]+[.$BB92])+[.AG$28]*[.$Z$5]*MAGNET([.AG$24]+[.$BB92])+[.D$28]*[.$Z$5]*MAGNET([.D$24]+[.$BB92])+[.AH$28]*[.$Z$5]*MAGNET([.AH$24]+[.BB92]) +[.AI$28]*[.$Z$5]*MAGNET([.AI$24]+[.BB92]) +[.AJ$28]*[.$Z$5]*MAGNET([.AJ$24]+[.BB92]) +[.AK$28]*[.$Z$5]*MAGNET([.AK$24]+[.BB92]) +[.AL$28]*[.$Z$5]*MAGNET([.AL$24]+[.BB92]) +[.AM$28]*[.$Z$5]*MAGNET([.AM$24]+[.BB92]) +[.AN$28]*[.$Z$5]*MAGNET([.AN$24]+[.BB92]) +[.AO$28]*[.$Z$5]*MAGNET([.AO$24]+[.BB92]) +[.AP$28]*[.$Z$5]*MAGNET([.AP$24]+[.$BB92])&#10;+[.AQ$28]*[.$Z$5]*MAGNET([.AQ$24]+[.$BB92])&#10;+[.AR$28]*[.$Z$5]*MAGNET([.AR$24]+[.$BB92])&#10;+[.AS$28]*[.$Z$5]*MAGNET([.AS$24]+[.$BB92])&#10;+[.AT$28]*[.$Z$5]*MAGNET([.AT$24]+[.$BB92])&#10;+[.AU$28]*[.$Z$5]*MAGNET([.AU$24]+[.$BB92])&#10;+[.AV$28]*[.$Z$5]*MAGNET([.AV$24]+[.$BB92])&#10;+[.AW$28]*[.$Z$5]*MAGNET([.AW$24]+[.$BB92])&#10;+[.AX$28]*[.$Z$5]*MAGNET([.AX$24]+[.$BB92])&#10;+[.AY$28]*[.$Z$5]*MAGNET([.AY$24]+[.$BB92]) +RAND()*[.$BF$13]" office:value-type="float" office:value="-13.9706311299727" calcext:value-type="float">
            <text:p>-13.9706311299727</text:p>
          </table:table-cell>
          <table:table-cell table:style-name="ce71" table:formula="of:=[.E$29]*[.$Z$5]*MAGNET([.E$24]+[.$BB92])+[.F$29]*[.$Z$5]*MAGNET([.F$24]+[.$BB92])+[.G$29]*[.$Z$5]*MAGNET([.G$24]+[.$BB92])+[.H$29]*[.$Z$5]*MAGNET([.H$24]+[.$BB92])+[.I$29]*[.$Z$5]*MAGNET([.I$24]+[.$BB92])+[.J$29]*[.$Z$5]*MAGNET([.J$24]+[.$BB92])+[.K$29]*[.$Z$5]*MAGNET([.K$24]+[.$BB92])+[.L$29]*[.$Z$5]*MAGNET([.L$24]+[.$BB92])+[.M$29]*[.$Z$5]*MAGNET([.M$24]+[.$BB92])+[.N$29]*[.$Z$5]*MAGNET([.N$24]+[.$BB92])+[.O$29]*[.$Z$5]*MAGNET([.O$24]+[.$BB92])+[.P$29]*[.$Z$5]*MAGNET([.P$24]+[.$BB92])+[.Q$29]*[.$Z$5]*MAGNET([.Q$24]+[.$BB92])+[.R$29]*[.$Z$5]*MAGNET([.R$24]+[.$BB92])+[.S$29]*[.$Z$5]*MAGNET([.S$24]+[.$BB92])+[.T$29]*[.$Z$5]*MAGNET([.T$24]+[.$BB92])+[.U$29]*[.$Z$5]*MAGNET([.U$24]+[.$BB92])+[.V$29]*[.$Z$5]*MAGNET([.V$24]+[.$BB92])+[.W$29]*[.$Z$5]*MAGNET([.W$24]+[.$BB92])+[.X$29]*[.$Z$5]*MAGNET([.X$24]+[.$BB92])+[.Y$29]*[.$Z$5]*MAGNET([.Y$24]+[.$BB92])+[.Z$29]*[.$Z$5]*MAGNET([.Z$24]+[.$BB92])+[.AA$29]*[.$Z$5]*MAGNET([.AA$24]+[.$BB92])+[.AB$29]*[.$Z$5]*MAGNET([.AB$24]+[.$BB92])+[.AC$29]*[.$Z$5]*MAGNET([.AC$24]+[.$BB92])+[.AD$29]*[.$Z$5]*MAGNET([.AD$24]+[.$BB92])+[.AE$29]*[.$Z$5]*MAGNET([.AE$24]+[.$BB92])+[.AF$29]*[.$Z$5]*MAGNET([.AF$24]+[.$BB92])+[.AG$29]*[.$Z$5]*MAGNET([.AG$24]+[.$BB92])+[.D$29]*[.$Z$5]*MAGNET([.D$24]+[.$BB92])+[.AH$29]*[.$Z$5]*MAGNET([.AH$24]+[.BB92]) +[.AI$29]*[.$Z$5]*MAGNET([.AI$24]+[.BB92]) +[.AJ$29]*[.$Z$5]*MAGNET([.AJ$24]+[.BB92]) +[.AK$29]*[.$Z$5]*MAGNET([.AK$24]+[.BB92]) +[.AL$29]*[.$Z$5]*MAGNET([.AL$24]+[.BB92]) +[.AM$29]*[.$Z$5]*MAGNET([.AM$24]+[.BB92]) +[.AN$29]*[.$Z$5]*MAGNET([.AN$24]+[.BB92]) +[.AO$29]*[.$Z$5]*MAGNET([.AO$24]+[.BB92]) +[.AP$29]*[.$Z$5]*MAGNET([.AP$24]+[.$BB92])&#10;+[.AQ$29]*[.$Z$5]*MAGNET([.AQ$24]+[.$BB92])&#10;+[.AR$29]*[.$Z$5]*MAGNET([.AR$24]+[.$BB92])&#10;+[.AS$29]*[.$Z$5]*MAGNET([.AS$24]+[.$BB92])&#10;+[.AT$29]*[.$Z$5]*MAGNET([.AT$24]+[.$BB92])&#10;+[.AU$29]*[.$Z$5]*MAGNET([.AU$24]+[.$BB92])&#10;+[.AV$29]*[.$Z$5]*MAGNET([.AV$24]+[.$BB92])&#10;+[.AW$29]*[.$Z$5]*MAGNET([.AW$24]+[.$BB92])&#10;+[.AX$29]*[.$Z$5]*MAGNET([.AX$24]+[.$BB92])&#10;+[.AY$29]*[.$Z$5]*MAGNET([.AY$24]+[.$BB92]) +RAND()*[.$BG$13]" office:value-type="float" office:value="45.2205325658359" calcext:value-type="float">
            <text:p>45.2205325658359</text:p>
          </table:table-cell>
          <table:table-cell table:style-name="ce71" table:formula="of:=[.E$30]*[.$Z$5]*MAGNET([.E$24]+[.$BB92])+[.F$30]*[.$Z$5]*MAGNET([.F$24]+[.$BB92])+[.G$30]*[.$Z$5]*MAGNET([.G$24]+[.$BB92])+[.H$30]*[.$Z$5]*MAGNET([.H$24]+[.$BB92])+[.I$30]*[.$Z$5]*MAGNET([.I$24]+[.$BB92])+[.J$30]*[.$Z$5]*MAGNET([.J$24]+[.$BB92])+[.K$30]*[.$Z$5]*MAGNET([.K$24]+[.$BB92])+[.L$30]*[.$Z$5]*MAGNET([.L$24]+[.$BB92])+[.M$30]*[.$Z$5]*MAGNET([.M$24]+[.$BB92])+[.N$30]*[.$Z$5]*MAGNET([.N$24]+[.$BB92])+[.O$30]*[.$Z$5]*MAGNET([.O$24]+[.$BB92])+[.P$30]*[.$Z$5]*MAGNET([.P$24]+[.$BB92])+[.Q$30]*[.$Z$5]*MAGNET([.Q$24]+[.$BB92])+[.R$30]*[.$Z$5]*MAGNET([.R$24]+[.$BB92])+[.S$30]*[.$Z$5]*MAGNET([.S$24]+[.$BB92])+[.T$30]*[.$Z$5]*MAGNET([.T$24]+[.$BB92])+[.U$30]*[.$Z$5]*MAGNET([.U$24]+[.$BB92])+[.V$30]*[.$Z$5]*MAGNET([.V$24]+[.$BB92])+[.W$30]*[.$Z$5]*MAGNET([.W$24]+[.$BB92])+[.X$30]*[.$Z$5]*MAGNET([.X$24]+[.$BB92])+[.Y$30]*[.$Z$5]*MAGNET([.Y$24]+[.$BB92])+[.Z$30]*[.$Z$5]*MAGNET([.Z$24]+[.$BB92])+[.AA$30]*[.$Z$5]*MAGNET([.AA$24]+[.$BB92])+[.AB$30]*[.$Z$5]*MAGNET([.AB$24]+[.$BB92])+[.AC$30]*[.$Z$5]*MAGNET([.AC$24]+[.$BB92])+[.AD$30]*[.$Z$5]*MAGNET([.AD$24]+[.$BB92])+[.AE$30]*[.$Z$5]*MAGNET([.AE$24]+[.$BB92])+[.AF$30]*[.$Z$5]*MAGNET([.AF$24]+[.$BB92])+[.AG$30]*[.$Z$5]*MAGNET([.AG$24]+[.$BB92])+[.D$30]*[.$Z$5]*MAGNET([.D$24]+[.$BB92])+[.AH$30]*[.$Z$5]*MAGNET([.AH$24]+[.BB92]) +[.AI$30]*[.$Z$5]*MAGNET([.AI$24]+[.BB92]) +[.AJ$30]*[.$Z$5]*MAGNET([.AJ$24]+[.BB92]) +[.AK$30]*[.$Z$5]*MAGNET([.AK$24]+[.BB92]) +[.AL$30]*[.$Z$5]*MAGNET([.AL$24]+[.BB92]) +[.AM$30]*[.$Z$5]*MAGNET([.AM$24]+[.BB92]) +[.AN$30]*[.$Z$5]*MAGNET([.AN$24]+[.BB92]) +[.AO$30]*[.$Z$5]*MAGNET([.AO$24]+[.BB92]) +[.AP$30]*[.$Z$5]*MAGNET([.AP$24]+[.$BB92])&#10;+[.AQ$30]*[.$Z$5]*MAGNET([.AQ$24]+[.$BB92])&#10;+[.AR$30]*[.$Z$5]*MAGNET([.AR$24]+[.$BB92])&#10;+[.AS$30]*[.$Z$5]*MAGNET([.AS$24]+[.$BB92])&#10;+[.AT$30]*[.$Z$5]*MAGNET([.AT$24]+[.$BB92])&#10;+[.AU$30]*[.$Z$5]*MAGNET([.AU$24]+[.$BB92])&#10;+[.AV$30]*[.$Z$5]*MAGNET([.AV$24]+[.$BB92])&#10;+[.AW$30]*[.$Z$5]*MAGNET([.AW$24]+[.$BB92])&#10;+[.AX$30]*[.$Z$5]*MAGNET([.AX$24]+[.$BB92])&#10;+[.AY$30]*[.$Z$5]*MAGNET([.AY$24]+[.$BB92]) +RAND()*[.$BH$13]" office:value-type="float" office:value="0" calcext:value-type="float">
            <text:p>0</text:p>
          </table:table-cell>
          <table:table-cell table:style-name="ce71" table:formula="of:=[.E$31]*[.$Z$5]*MAGNET([.E$24]+[.$BB92])+[.F$31]*[.$Z$5]*MAGNET([.F$24]+[.$BB92])+[.G$31]*[.$Z$5]*MAGNET([.G$24]+[.$BB92])+[.H$31]*[.$Z$5]*MAGNET([.H$24]+[.$BB92])+[.I$31]*[.$Z$5]*MAGNET([.I$24]+[.$BB92])+[.J$31]*[.$Z$5]*MAGNET([.J$24]+[.$BB92])+[.K$31]*[.$Z$5]*MAGNET([.K$24]+[.$BB92])+[.L$31]*[.$Z$5]*MAGNET([.L$24]+[.$BB92])+[.M$31]*[.$Z$5]*MAGNET([.M$24]+[.$BB92])+[.N$31]*[.$Z$5]*MAGNET([.N$24]+[.$BB92])+[.O$31]*[.$Z$5]*MAGNET([.O$24]+[.$BB92])+[.P$31]*[.$Z$5]*MAGNET([.P$24]+[.$BB92])+[.Q$31]*[.$Z$5]*MAGNET([.Q$24]+[.$BB92])+[.R$31]*[.$Z$5]*MAGNET([.R$24]+[.$BB92])+[.S$31]*[.$Z$5]*MAGNET([.S$24]+[.$BB92])+[.T$31]*[.$Z$5]*MAGNET([.T$24]+[.$BB92])+[.U$31]*[.$Z$5]*MAGNET([.U$24]+[.$BB92])+[.V$31]*[.$Z$5]*MAGNET([.V$24]+[.$BB92])+[.W$31]*[.$Z$5]*MAGNET([.W$24]+[.$BB92])+[.X$31]*[.$Z$5]*MAGNET([.X$24]+[.$BB92])+[.Y$31]*[.$Z$5]*MAGNET([.Y$24]+[.$BB92])+[.Z$31]*[.$Z$5]*MAGNET([.Z$24]+[.$BB92])+[.AA$31]*[.$Z$5]*MAGNET([.AA$24]+[.$BB92])+[.AB$31]*[.$Z$5]*MAGNET([.AB$24]+[.$BB92])+[.AC$31]*[.$Z$5]*MAGNET([.AC$24]+[.$BB92])+[.AD$31]*[.$Z$5]*MAGNET([.AD$24]+[.$BB92])+[.AE$31]*[.$Z$5]*MAGNET([.AE$24]+[.$BB92])+[.AF$31]*[.$Z$5]*MAGNET([.AF$24]+[.$BB92])+[.AG$31]*[.$Z$5]*MAGNET([.AG$24]+[.$BB92])+[.D$31]*[.$Z$5]*MAGNET([.D$24]+[.$BB92])+[.AH$31]*[.$Z$5]*MAGNET([.AH$24]+[.BB92]) +[.AI$31]*[.$Z$5]*MAGNET([.AI$24]+[.BB92]) +[.AJ$31]*[.$Z$5]*MAGNET([.AJ$24]+[.BB92]) +[.AK$31]*[.$Z$5]*MAGNET([.AK$24]+[.BB92]) +[.AL$31]*[.$Z$5]*MAGNET([.AL$24]+[.BB92]) +[.AM$31]*[.$Z$5]*MAGNET([.AM$24]+[.BB92]) +[.AN$31]*[.$Z$5]*MAGNET([.AN$24]+[.BB92]) +[.AO$31]*[.$Z$5]*MAGNET([.AO$24]+[.BB92]) +[.AP$31]*[.$Z$5]*MAGNET([.AP$24]+[.$BB92])&#10;+[.AQ$31]*[.$Z$5]*MAGNET([.AQ$24]+[.$BB92])&#10;+[.AR$31]*[.$Z$5]*MAGNET([.AR$24]+[.$BB92])&#10;+[.AS$31]*[.$Z$5]*MAGNET([.AS$24]+[.$BB92])&#10;+[.AT$31]*[.$Z$5]*MAGNET([.AT$24]+[.$BB92])&#10;+[.AU$31]*[.$Z$5]*MAGNET([.AU$24]+[.$BB92])&#10;+[.AV$31]*[.$Z$5]*MAGNET([.AV$24]+[.$BB92])&#10;+[.AW$31]*[.$Z$5]*MAGNET([.AW$24]+[.$BB92])&#10;+[.AX$31]*[.$Z$5]*MAGNET([.AX$24]+[.$BB92])&#10;+[.AY$31]*[.$Z$5]*MAGNET([.AY$24]+[.$BB92]) +RAND()*[.$BI$13]" office:value-type="float" office:value="0" calcext:value-type="float">
            <text:p>0</text:p>
          </table:table-cell>
          <table:table-cell table:style-name="ce71" table:formula="of:=[.E$32]*[.$Z$5]*MAGNET([.E$24]+[.$BB92])+[.F$32]*[.$Z$5]*MAGNET([.F$24]+[.$BB92])+[.G$32]*[.$Z$5]*MAGNET([.G$24]+[.$BB92])+[.H$32]*[.$Z$5]*MAGNET([.H$24]+[.$BB92])+[.I$32]*[.$Z$5]*MAGNET([.I$24]+[.$BB92])+[.J$32]*[.$Z$5]*MAGNET([.J$24]+[.$BB92])+[.K$32]*[.$Z$5]*MAGNET([.K$24]+[.$BB92])+[.L$32]*[.$Z$5]*MAGNET([.L$24]+[.$BB92])+[.M$32]*[.$Z$5]*MAGNET([.M$24]+[.$BB92])+[.N$32]*[.$Z$5]*MAGNET([.N$24]+[.$BB92])+[.O$32]*[.$Z$5]*MAGNET([.O$24]+[.$BB92])+[.P$32]*[.$Z$5]*MAGNET([.P$24]+[.$BB92])+[.Q$32]*[.$Z$5]*MAGNET([.Q$24]+[.$BB92])+[.R$32]*[.$Z$5]*MAGNET([.R$24]+[.$BB92])+[.S$32]*[.$Z$5]*MAGNET([.S$24]+[.$BB92])+[.T$32]*[.$Z$5]*MAGNET([.T$24]+[.$BB92])+[.U$32]*[.$Z$5]*MAGNET([.U$24]+[.$BB92])+[.V$32]*[.$Z$5]*MAGNET([.V$24]+[.$BB92])+[.W$32]*[.$Z$5]*MAGNET([.W$24]+[.$BB92])+[.X$32]*[.$Z$5]*MAGNET([.X$24]+[.$BB92])+[.Y$32]*[.$Z$5]*MAGNET([.Y$24]+[.$BB92])+[.Z$32]*[.$Z$5]*MAGNET([.Z$24]+[.$BB92])+[.AA$32]*[.$Z$5]*MAGNET([.AA$24]+[.$BB92])+[.AB$32]*[.$Z$5]*MAGNET([.AB$24]+[.$BB92])+[.AC$32]*[.$Z$5]*MAGNET([.AC$24]+[.$BB92])+[.AD$32]*[.$Z$5]*MAGNET([.AD$24]+[.$BB92])+[.AE$32]*[.$Z$5]*MAGNET([.AE$24]+[.$BB92])+[.AF$32]*[.$Z$5]*MAGNET([.AF$24]+[.$BB92])+[.AG$32]*[.$Z$5]*MAGNET([.AG$24]+[.$BB92])+[.D$32]*[.$Z$5]*MAGNET([.D$24]+[.$BB92])+[.AH$32]*[.$Z$5]*MAGNET([.AH$24]+[.BB92]) +[.AI$32]*[.$Z$5]*MAGNET([.AI$24]+[.BB92]) +[.AJ$32]*[.$Z$5]*MAGNET([.AJ$24]+[.BB92]) +[.AK$32]*[.$Z$5]*MAGNET([.AK$24]+[.BB92]) +[.AL$32]*[.$Z$5]*MAGNET([.AL$24]+[.BB92]) +[.AM$32]*[.$Z$5]*MAGNET([.AM$24]+[.BB92]) +[.AN$32]*[.$Z$5]*MAGNET([.AN$24]+[.BB92]) +[.AO$32]*[.$Z$5]*MAGNET([.AO$24]+[.BB92]) +[.AP$32]*[.$Z$5]*MAGNET([.AP$24]+[.$BB92])&#10;+[.AQ$32]*[.$Z$5]*MAGNET([.AQ$24]+[.$BB92])&#10;+[.AR$32]*[.$Z$5]*MAGNET([.AR$24]+[.$BB92])&#10;+[.AS$32]*[.$Z$5]*MAGNET([.AS$24]+[.$BB92])&#10;+[.AT$32]*[.$Z$5]*MAGNET([.AT$24]+[.$BB92])&#10;+[.AU$32]*[.$Z$5]*MAGNET([.AU$24]+[.$BB92])&#10;+[.AV$32]*[.$Z$5]*MAGNET([.AV$24]+[.$BB92])&#10;+[.AW$32]*[.$Z$5]*MAGNET([.AW$24]+[.$BB92])&#10;+[.AX$32]*[.$Z$5]*MAGNET([.AX$24]+[.$BB92])&#10;+[.AY$32]*[.$Z$5]*MAGNET([.AY$24]+[.$BB9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2]+0.002" office:value-type="float" office:value="0.156" calcext:value-type="float">
            <text:p>0.156</text:p>
          </table:table-cell>
          <table:table-cell table:formula="of:=[.BA93]*[.$D$6]" office:value-type="float" office:value="7.84141526336013" calcext:value-type="float">
            <text:p>7.841</text:p>
          </table:table-cell>
          <table:table-cell table:formula="of:=[.D$25]*[.$Z$5]*MAGNET([.D$24]+[.BB93])+[.E$25]*[.$Z$5]*MAGNET([.E$24]+[.BB93])+[.F$25]*[.$Z$5]*MAGNET([.F$24]+[.BB93])+[.G$25]*[.$Z$5]*MAGNET([.G$24]+[.BB93])+[.H$25]*[.$Z$5]*MAGNET([.H$24]+[.BB93])+[.I$25]*[.$Z$5]*MAGNET([.I$24]+[.BB93])+[.J$25]*[.$Z$5]*MAGNET([.J$24]+[.BB93])+[.K$25]*[.$Z$5]*MAGNET([.K$24]+[.BB93])+[.L$25]*[.$Z$5]*MAGNET([.L$24]+[.BB93])+[.M$25]*[.$Z$5]*MAGNET([.M$24]+[.BB93])+[.N$25]*[.$Z$5]*MAGNET([.N$24]+[.BB93])+[.O$25]*[.$Z$5]*MAGNET([.O$24]+[.BB93])+[.P$25]*[.$Z$5]*MAGNET([.P$24]+[.BB93])+[.Q$25]*[.$Z$5]*MAGNET([.Q$24]+[.BB93])+[.R$25]*[.$Z$5]*MAGNET([.R$24]+[.BB93])+[.S$25]*[.$Z$5]*MAGNET([.S$24]+[.BB93])+[.T$25]*[.$Z$5]*MAGNET([.T$24]+[.BB93])+[.U$25]*[.$Z$5]*MAGNET([.U$24]+[.BB93])+[.V$25]*[.$Z$5]*MAGNET([.V$24]+[.BB93])+[.W$25]*[.$Z$5]*MAGNET([.W$24]+[.BB93])+[.X$25]*[.$Z$5]*MAGNET([.X$24]+[.BB93])+[.Y$25]*[.$Z$5]*MAGNET([.Y$24]+[.BB93])+[.Z$25]*[.$Z$5]*MAGNET([.Z$24]+[.BB93])+[.AA$25]*[.$Z$5]*MAGNET([.AA$24]+[.BB93])+[.AB$25]*[.$Z$5]*MAGNET([.AB$24]+[.BB93])+[.AC$25]*[.$Z$5]*MAGNET([.AC$24]+[.BB93])+[.AD$25]*[.$Z$5]*MAGNET([.AD$24]+[.BB93])+[.AE$25]*[.$Z$5]*MAGNET([.AE$24]+[.BB93])+[.AF$25]*[.$Z$5]*MAGNET([.AF$24]+[.BB93])+[.AG$25]*[.$Z$5]*MAGNET([.AG$24]+[.BB93])+[.AH$25]*[.$Z$5]*MAGNET([.AH$24]+[.BB93]) +[.AI$25]*[.$Z$5]*MAGNET([.AI$24]+[.BB93]) +[.AJ$25]*[.$Z$5]*MAGNET([.AJ$24]+[.BB93]) +[.AK$25]*[.$Z$5]*MAGNET([.AK$24]+[.BB93]) +[.AL$25]*[.$Z$5]*MAGNET([.AL$24]+[.BB93]) +[.AM$25]*[.$Z$5]*MAGNET([.AM$24]+[.BB93]) +[.AN$25]*[.$Z$5]*MAGNET([.AN$24]+[.BB93]) +[.AO$25]*[.$Z$5]*MAGNET([.AO$24]+[.BB93])+RAND()*[.$BC$13]+[.AP$25]*[.$Z$5]*MAGNET([.AP$24]+[.BB93])&#10;+[.AQ$25]*[.$Z$5]*MAGNET([.AQ$24]+[.BB93])&#10;+[.AR$25]*[.$Z$5]*MAGNET([.AR$24]+[.BB93])&#10;+[.AS$25]*[.$Z$5]*MAGNET([.AS$24]+[.BB93])&#10;+[.AT$25]*[.$Z$5]*MAGNET([.AT$24]+[.BB93])&#10;+[.AU$25]*[.$Z$5]*MAGNET([.AU$24]+[.BB93])&#10;+[.AV$25]*[.$Z$5]*MAGNET([.AV$24]+[.BB93])&#10;+[.AW$25]*[.$Z$5]*MAGNET([.AW$24]+[.BB93])&#10;+[.AX$25]*[.$Z$5]*MAGNET([.AX$24]+[.BB93])&#10;+[.AY$25]*[.$Z$5]*MAGNET([.AY$24]+[.BB93])" office:value-type="float" office:value="114.413733521165" calcext:value-type="float">
            <text:p>114.41</text:p>
          </table:table-cell>
          <table:table-cell table:style-name="ce70" table:formula="of:=[.E$26]*[.$Z$5]*MAGNET([.E$24]+[.$BB93])+[.F$26]*[.$Z$5]*MAGNET([.F$24]+[.$BB93])+[.G$26]*[.$Z$5]*MAGNET([.G$24]+[.$BB93])+[.H$26]*[.$Z$5]*MAGNET([.H$24]+[.$BB93])+[.I$26]*[.$Z$5]*MAGNET([.I$24]+[.$BB93])+[.J$26]*[.$Z$5]*MAGNET([.J$24]+[.$BB93])+[.K$26]*[.$Z$5]*MAGNET([.K$24]+[.$BB93])+[.L$26]*[.$Z$5]*MAGNET([.L$24]+[.$BB93])+[.M$26]*[.$Z$5]*MAGNET([.M$24]+[.$BB93])+[.N$26]*[.$Z$5]*MAGNET([.N$24]+[.$BB93])+[.O$26]*[.$Z$5]*MAGNET([.O$24]+[.$BB93])+[.P$26]*[.$Z$5]*MAGNET([.P$24]+[.$BB93])+[.Q$26]*[.$Z$5]*MAGNET([.Q$24]+[.$BB93])+[.R$26]*[.$Z$5]*MAGNET([.R$24]+[.$BB93])+[.S$26]*[.$Z$5]*MAGNET([.S$24]+[.$BB93])+[.T$26]*[.$Z$5]*MAGNET([.T$24]+[.$BB93])+[.U$26]*[.$Z$5]*MAGNET([.U$24]+[.$BB93])+[.V$26]*[.$Z$5]*MAGNET([.V$24]+[.$BB93])+[.W$26]*[.$Z$5]*MAGNET([.W$24]+[.$BB93])+[.X$26]*[.$Z$5]*MAGNET([.X$24]+[.$BB93])+[.Y$26]*[.$Z$5]*MAGNET([.Y$24]+[.$BB93])+[.Z$26]*[.$Z$5]*MAGNET([.Z$24]+[.$BB93])+[.AA$26]*[.$Z$5]*MAGNET([.AA$24]+[.$BB93])+[.AB$26]*[.$Z$5]*MAGNET([.AB$24]+[.$BB93])+[.AC$26]*[.$Z$5]*MAGNET([.AC$24]+[.$BB93])+[.AD$26]*[.$Z$5]*MAGNET([.AD$24]+[.$BB93])+[.AE$26]*[.$Z$5]*MAGNET([.AE$24]+[.$BB93])+[.AF$26]*[.$Z$5]*MAGNET([.AF$24]+[.$BB93])+[.AG$26]*[.$Z$5]*MAGNET([.AG$24]+[.$BB93])+[.D$26]*[.$Z$5]*MAGNET([.D$24]+[.$BB93])+[.AH$26]*[.$Z$5]*MAGNET([.AH$24]+[.BB93]) +[.AI$26]*[.$Z$5]*MAGNET([.AI$24]+[.BB93]) +[.AJ$26]*[.$Z$5]*MAGNET([.AJ$24]+[.BB93]) +[.AK$26]*[.$Z$5]*MAGNET([.AK$24]+[.BB93]) +[.AL$26]*[.$Z$5]*MAGNET([.AL$24]+[.BB93]) +[.AM$26]*[.$Z$5]*MAGNET([.AM$24]+[.BB93]) +[.AN$26]*[.$Z$5]*MAGNET([.AN$24]+[.BB93]) +[.AO$26]*[.$Z$5]*MAGNET([.AO$24]+[.BB93]) +[.AP$26]*[.$Z$5]*MAGNET([.AP$24]+[.$BB93])&#10;+[.AQ$26]*[.$Z$5]*MAGNET([.AQ$24]+[.$BB93])&#10;+[.AR$26]*[.$Z$5]*MAGNET([.AR$24]+[.$BB93])&#10;+[.AS$26]*[.$Z$5]*MAGNET([.AS$24]+[.$BB93])&#10;+[.AT$26]*[.$Z$5]*MAGNET([.AT$24]+[.$BB93])&#10;+[.AU$26]*[.$Z$5]*MAGNET([.AU$24]+[.$BB93])&#10;+[.AV$26]*[.$Z$5]*MAGNET([.AV$24]+[.$BB93])&#10;+[.AW$26]*[.$Z$5]*MAGNET([.AW$24]+[.$BB93])&#10;+[.AX$26]*[.$Z$5]*MAGNET([.AX$24]+[.$BB93])&#10;+[.AY$26]*[.$Z$5]*MAGNET([.AY$24]+[.$BB93]) +RAND()*[.$BD$13]" office:value-type="float" office:value="-17.6095982553537" calcext:value-type="float">
            <text:p>-17.61</text:p>
          </table:table-cell>
          <table:table-cell table:style-name="ce71" table:formula="of:=[.E$27]*[.$Z$5]*MAGNET([.E$24]+[.$BB93])+[.F$27]*[.$Z$5]*MAGNET([.F$24]+[.$BB93])+[.G$27]*[.$Z$5]*MAGNET([.G$24]+[.$BB93])+[.H$27]*[.$Z$5]*MAGNET([.H$24]+[.$BB93])+[.I$27]*[.$Z$5]*MAGNET([.I$24]+[.$BB93])+[.J$27]*[.$Z$5]*MAGNET([.J$24]+[.$BB93])+[.K$27]*[.$Z$5]*MAGNET([.K$24]+[.$BB93])+[.L$27]*[.$Z$5]*MAGNET([.L$24]+[.$BB93])+[.M$27]*[.$Z$5]*MAGNET([.M$24]+[.$BB93])+[.N$27]*[.$Z$5]*MAGNET([.N$24]+[.$BB93])+[.O$27]*[.$Z$5]*MAGNET([.O$24]+[.$BB93])+[.P$27]*[.$Z$5]*MAGNET([.P$24]+[.$BB93])+[.Q$27]*[.$Z$5]*MAGNET([.Q$24]+[.$BB93])+[.R$27]*[.$Z$5]*MAGNET([.R$24]+[.$BB93])+[.S$27]*[.$Z$5]*MAGNET([.S$24]+[.$BB93])+[.T$27]*[.$Z$5]*MAGNET([.T$24]+[.$BB93])+[.U$27]*[.$Z$5]*MAGNET([.U$24]+[.$BB93])+[.V$27]*[.$Z$5]*MAGNET([.V$24]+[.$BB93])+[.W$27]*[.$Z$5]*MAGNET([.W$24]+[.$BB93])+[.X$27]*[.$Z$5]*MAGNET([.X$24]+[.$BB93])+[.Y$27]*[.$Z$5]*MAGNET([.Y$24]+[.$BB93])+[.Z$27]*[.$Z$5]*MAGNET([.Z$24]+[.$BB93])+[.AA$27]*[.$Z$5]*MAGNET([.AA$24]+[.$BB93])+[.AB$27]*[.$Z$5]*MAGNET([.AB$24]+[.$BB93])+[.AC$27]*[.$Z$5]*MAGNET([.AC$24]+[.$BB93])+[.AD$27]*[.$Z$5]*MAGNET([.AD$24]+[.$BB93])+[.AE$27]*[.$Z$5]*MAGNET([.AE$24]+[.$BB93])+[.AF$27]*[.$Z$5]*MAGNET([.AF$24]+[.$BB93])+[.AG$27]*[.$Z$5]*MAGNET([.AG$24]+[.$BB93])+[.D$27]*[.$Z$5]*MAGNET([.D$24]+[.$BB93])+[.AH$27]*[.$Z$5]*MAGNET([.AH$24]+[.BB93]) +[.AI$27]*[.$Z$5]*MAGNET([.AI$24]+[.BB93]) +[.AJ$27]*[.$Z$5]*MAGNET([.AJ$24]+[.BB93]) +[.AK$27]*[.$Z$5]*MAGNET([.AK$24]+[.BB93]) +[.AL$27]*[.$Z$5]*MAGNET([.AL$24]+[.BB93]) +[.AM$27]*[.$Z$5]*MAGNET([.AM$24]+[.BB93]) +[.AN$27]*[.$Z$5]*MAGNET([.AN$24]+[.BB93]) +[.AO$27]*[.$Z$5]*MAGNET([.AO$24]+[.BB93]) +[.AP$27]*[.$Z$5]*MAGNET([.AP$24]+[.$BB93])&#10;+[.AQ$27]*[.$Z$5]*MAGNET([.AQ$24]+[.$BB93])&#10;+[.AR$27]*[.$Z$5]*MAGNET([.AR$24]+[.$BB93])&#10;+[.AS$27]*[.$Z$5]*MAGNET([.AS$24]+[.$BB93])&#10;+[.AT$27]*[.$Z$5]*MAGNET([.AT$24]+[.$BB93])&#10;+[.AU$27]*[.$Z$5]*MAGNET([.AU$24]+[.$BB93])&#10;+[.AV$27]*[.$Z$5]*MAGNET([.AV$24]+[.$BB93])&#10;+[.AW$27]*[.$Z$5]*MAGNET([.AW$24]+[.$BB93])&#10;+[.AX$27]*[.$Z$5]*MAGNET([.AX$24]+[.$BB93])&#10;+[.AY$27]*[.$Z$5]*MAGNET([.AY$24]+[.$BB93]) +RAND()*[.$BE$13]" office:value-type="float" office:value="-110.591271424558" calcext:value-type="float">
            <text:p>-110.591271424558</text:p>
          </table:table-cell>
          <table:table-cell table:style-name="ce71" table:formula="of:=[.E$28]*[.$Z$5]*MAGNET([.E$24]+[.$BB93])+[.F$28]*[.$Z$5]*MAGNET([.F$24]+[.$BB93])+[.G$28]*[.$Z$5]*MAGNET([.G$24]+[.$BB93])+[.H$28]*[.$Z$5]*MAGNET([.H$24]+[.$BB93])+[.I$28]*[.$Z$5]*MAGNET([.I$24]+[.$BB93])+[.J$28]*[.$Z$5]*MAGNET([.J$24]+[.$BB93])+[.K$28]*[.$Z$5]*MAGNET([.K$24]+[.$BB93])+[.L$28]*[.$Z$5]*MAGNET([.L$24]+[.$BB93])+[.M$28]*[.$Z$5]*MAGNET([.M$24]+[.$BB93])+[.N$28]*[.$Z$5]*MAGNET([.N$24]+[.$BB93])+[.O$28]*[.$Z$5]*MAGNET([.O$24]+[.$BB93])+[.P$28]*[.$Z$5]*MAGNET([.P$24]+[.$BB93])+[.Q$28]*[.$Z$5]*MAGNET([.Q$24]+[.$BB93])+[.R$28]*[.$Z$5]*MAGNET([.R$24]+[.$BB93])+[.S$28]*[.$Z$5]*MAGNET([.S$24]+[.$BB93])+[.T$28]*[.$Z$5]*MAGNET([.T$24]+[.$BB93])+[.U$28]*[.$Z$5]*MAGNET([.U$24]+[.$BB93])+[.V$28]*[.$Z$5]*MAGNET([.V$24]+[.$BB93])+[.W$28]*[.$Z$5]*MAGNET([.W$24]+[.$BB93])+[.X$28]*[.$Z$5]*MAGNET([.X$24]+[.$BB93])+[.Y$28]*[.$Z$5]*MAGNET([.Y$24]+[.$BB93])+[.Z$28]*[.$Z$5]*MAGNET([.Z$24]+[.$BB93])+[.AA$28]*[.$Z$5]*MAGNET([.AA$24]+[.$BB93])+[.AB$28]*[.$Z$5]*MAGNET([.AB$24]+[.$BB93])+[.AC$28]*[.$Z$5]*MAGNET([.AC$24]+[.$BB93])+[.AD$28]*[.$Z$5]*MAGNET([.AD$24]+[.$BB93])+[.AE$28]*[.$Z$5]*MAGNET([.AE$24]+[.$BB93])+[.AF$28]*[.$Z$5]*MAGNET([.AF$24]+[.$BB93])+[.AG$28]*[.$Z$5]*MAGNET([.AG$24]+[.$BB93])+[.D$28]*[.$Z$5]*MAGNET([.D$24]+[.$BB93])+[.AH$28]*[.$Z$5]*MAGNET([.AH$24]+[.BB93]) +[.AI$28]*[.$Z$5]*MAGNET([.AI$24]+[.BB93]) +[.AJ$28]*[.$Z$5]*MAGNET([.AJ$24]+[.BB93]) +[.AK$28]*[.$Z$5]*MAGNET([.AK$24]+[.BB93]) +[.AL$28]*[.$Z$5]*MAGNET([.AL$24]+[.BB93]) +[.AM$28]*[.$Z$5]*MAGNET([.AM$24]+[.BB93]) +[.AN$28]*[.$Z$5]*MAGNET([.AN$24]+[.BB93]) +[.AO$28]*[.$Z$5]*MAGNET([.AO$24]+[.BB93]) +[.AP$28]*[.$Z$5]*MAGNET([.AP$24]+[.$BB93])&#10;+[.AQ$28]*[.$Z$5]*MAGNET([.AQ$24]+[.$BB93])&#10;+[.AR$28]*[.$Z$5]*MAGNET([.AR$24]+[.$BB93])&#10;+[.AS$28]*[.$Z$5]*MAGNET([.AS$24]+[.$BB93])&#10;+[.AT$28]*[.$Z$5]*MAGNET([.AT$24]+[.$BB93])&#10;+[.AU$28]*[.$Z$5]*MAGNET([.AU$24]+[.$BB93])&#10;+[.AV$28]*[.$Z$5]*MAGNET([.AV$24]+[.$BB93])&#10;+[.AW$28]*[.$Z$5]*MAGNET([.AW$24]+[.$BB93])&#10;+[.AX$28]*[.$Z$5]*MAGNET([.AX$24]+[.$BB93])&#10;+[.AY$28]*[.$Z$5]*MAGNET([.AY$24]+[.$BB93]) +RAND()*[.$BF$13]" office:value-type="float" office:value="-12.3896620738951" calcext:value-type="float">
            <text:p>-12.3896620738951</text:p>
          </table:table-cell>
          <table:table-cell table:style-name="ce71" table:formula="of:=[.E$29]*[.$Z$5]*MAGNET([.E$24]+[.$BB93])+[.F$29]*[.$Z$5]*MAGNET([.F$24]+[.$BB93])+[.G$29]*[.$Z$5]*MAGNET([.G$24]+[.$BB93])+[.H$29]*[.$Z$5]*MAGNET([.H$24]+[.$BB93])+[.I$29]*[.$Z$5]*MAGNET([.I$24]+[.$BB93])+[.J$29]*[.$Z$5]*MAGNET([.J$24]+[.$BB93])+[.K$29]*[.$Z$5]*MAGNET([.K$24]+[.$BB93])+[.L$29]*[.$Z$5]*MAGNET([.L$24]+[.$BB93])+[.M$29]*[.$Z$5]*MAGNET([.M$24]+[.$BB93])+[.N$29]*[.$Z$5]*MAGNET([.N$24]+[.$BB93])+[.O$29]*[.$Z$5]*MAGNET([.O$24]+[.$BB93])+[.P$29]*[.$Z$5]*MAGNET([.P$24]+[.$BB93])+[.Q$29]*[.$Z$5]*MAGNET([.Q$24]+[.$BB93])+[.R$29]*[.$Z$5]*MAGNET([.R$24]+[.$BB93])+[.S$29]*[.$Z$5]*MAGNET([.S$24]+[.$BB93])+[.T$29]*[.$Z$5]*MAGNET([.T$24]+[.$BB93])+[.U$29]*[.$Z$5]*MAGNET([.U$24]+[.$BB93])+[.V$29]*[.$Z$5]*MAGNET([.V$24]+[.$BB93])+[.W$29]*[.$Z$5]*MAGNET([.W$24]+[.$BB93])+[.X$29]*[.$Z$5]*MAGNET([.X$24]+[.$BB93])+[.Y$29]*[.$Z$5]*MAGNET([.Y$24]+[.$BB93])+[.Z$29]*[.$Z$5]*MAGNET([.Z$24]+[.$BB93])+[.AA$29]*[.$Z$5]*MAGNET([.AA$24]+[.$BB93])+[.AB$29]*[.$Z$5]*MAGNET([.AB$24]+[.$BB93])+[.AC$29]*[.$Z$5]*MAGNET([.AC$24]+[.$BB93])+[.AD$29]*[.$Z$5]*MAGNET([.AD$24]+[.$BB93])+[.AE$29]*[.$Z$5]*MAGNET([.AE$24]+[.$BB93])+[.AF$29]*[.$Z$5]*MAGNET([.AF$24]+[.$BB93])+[.AG$29]*[.$Z$5]*MAGNET([.AG$24]+[.$BB93])+[.D$29]*[.$Z$5]*MAGNET([.D$24]+[.$BB93])+[.AH$29]*[.$Z$5]*MAGNET([.AH$24]+[.BB93]) +[.AI$29]*[.$Z$5]*MAGNET([.AI$24]+[.BB93]) +[.AJ$29]*[.$Z$5]*MAGNET([.AJ$24]+[.BB93]) +[.AK$29]*[.$Z$5]*MAGNET([.AK$24]+[.BB93]) +[.AL$29]*[.$Z$5]*MAGNET([.AL$24]+[.BB93]) +[.AM$29]*[.$Z$5]*MAGNET([.AM$24]+[.BB93]) +[.AN$29]*[.$Z$5]*MAGNET([.AN$24]+[.BB93]) +[.AO$29]*[.$Z$5]*MAGNET([.AO$24]+[.BB93]) +[.AP$29]*[.$Z$5]*MAGNET([.AP$24]+[.$BB93])&#10;+[.AQ$29]*[.$Z$5]*MAGNET([.AQ$24]+[.$BB93])&#10;+[.AR$29]*[.$Z$5]*MAGNET([.AR$24]+[.$BB93])&#10;+[.AS$29]*[.$Z$5]*MAGNET([.AS$24]+[.$BB93])&#10;+[.AT$29]*[.$Z$5]*MAGNET([.AT$24]+[.$BB93])&#10;+[.AU$29]*[.$Z$5]*MAGNET([.AU$24]+[.$BB93])&#10;+[.AV$29]*[.$Z$5]*MAGNET([.AV$24]+[.$BB93])&#10;+[.AW$29]*[.$Z$5]*MAGNET([.AW$24]+[.$BB93])&#10;+[.AX$29]*[.$Z$5]*MAGNET([.AX$24]+[.$BB93])&#10;+[.AY$29]*[.$Z$5]*MAGNET([.AY$24]+[.$BB93]) +RAND()*[.$BG$13]" office:value-type="float" office:value="42.0151367756361" calcext:value-type="float">
            <text:p>42.0151367756361</text:p>
          </table:table-cell>
          <table:table-cell table:style-name="ce71" table:formula="of:=[.E$30]*[.$Z$5]*MAGNET([.E$24]+[.$BB93])+[.F$30]*[.$Z$5]*MAGNET([.F$24]+[.$BB93])+[.G$30]*[.$Z$5]*MAGNET([.G$24]+[.$BB93])+[.H$30]*[.$Z$5]*MAGNET([.H$24]+[.$BB93])+[.I$30]*[.$Z$5]*MAGNET([.I$24]+[.$BB93])+[.J$30]*[.$Z$5]*MAGNET([.J$24]+[.$BB93])+[.K$30]*[.$Z$5]*MAGNET([.K$24]+[.$BB93])+[.L$30]*[.$Z$5]*MAGNET([.L$24]+[.$BB93])+[.M$30]*[.$Z$5]*MAGNET([.M$24]+[.$BB93])+[.N$30]*[.$Z$5]*MAGNET([.N$24]+[.$BB93])+[.O$30]*[.$Z$5]*MAGNET([.O$24]+[.$BB93])+[.P$30]*[.$Z$5]*MAGNET([.P$24]+[.$BB93])+[.Q$30]*[.$Z$5]*MAGNET([.Q$24]+[.$BB93])+[.R$30]*[.$Z$5]*MAGNET([.R$24]+[.$BB93])+[.S$30]*[.$Z$5]*MAGNET([.S$24]+[.$BB93])+[.T$30]*[.$Z$5]*MAGNET([.T$24]+[.$BB93])+[.U$30]*[.$Z$5]*MAGNET([.U$24]+[.$BB93])+[.V$30]*[.$Z$5]*MAGNET([.V$24]+[.$BB93])+[.W$30]*[.$Z$5]*MAGNET([.W$24]+[.$BB93])+[.X$30]*[.$Z$5]*MAGNET([.X$24]+[.$BB93])+[.Y$30]*[.$Z$5]*MAGNET([.Y$24]+[.$BB93])+[.Z$30]*[.$Z$5]*MAGNET([.Z$24]+[.$BB93])+[.AA$30]*[.$Z$5]*MAGNET([.AA$24]+[.$BB93])+[.AB$30]*[.$Z$5]*MAGNET([.AB$24]+[.$BB93])+[.AC$30]*[.$Z$5]*MAGNET([.AC$24]+[.$BB93])+[.AD$30]*[.$Z$5]*MAGNET([.AD$24]+[.$BB93])+[.AE$30]*[.$Z$5]*MAGNET([.AE$24]+[.$BB93])+[.AF$30]*[.$Z$5]*MAGNET([.AF$24]+[.$BB93])+[.AG$30]*[.$Z$5]*MAGNET([.AG$24]+[.$BB93])+[.D$30]*[.$Z$5]*MAGNET([.D$24]+[.$BB93])+[.AH$30]*[.$Z$5]*MAGNET([.AH$24]+[.BB93]) +[.AI$30]*[.$Z$5]*MAGNET([.AI$24]+[.BB93]) +[.AJ$30]*[.$Z$5]*MAGNET([.AJ$24]+[.BB93]) +[.AK$30]*[.$Z$5]*MAGNET([.AK$24]+[.BB93]) +[.AL$30]*[.$Z$5]*MAGNET([.AL$24]+[.BB93]) +[.AM$30]*[.$Z$5]*MAGNET([.AM$24]+[.BB93]) +[.AN$30]*[.$Z$5]*MAGNET([.AN$24]+[.BB93]) +[.AO$30]*[.$Z$5]*MAGNET([.AO$24]+[.BB93]) +[.AP$30]*[.$Z$5]*MAGNET([.AP$24]+[.$BB93])&#10;+[.AQ$30]*[.$Z$5]*MAGNET([.AQ$24]+[.$BB93])&#10;+[.AR$30]*[.$Z$5]*MAGNET([.AR$24]+[.$BB93])&#10;+[.AS$30]*[.$Z$5]*MAGNET([.AS$24]+[.$BB93])&#10;+[.AT$30]*[.$Z$5]*MAGNET([.AT$24]+[.$BB93])&#10;+[.AU$30]*[.$Z$5]*MAGNET([.AU$24]+[.$BB93])&#10;+[.AV$30]*[.$Z$5]*MAGNET([.AV$24]+[.$BB93])&#10;+[.AW$30]*[.$Z$5]*MAGNET([.AW$24]+[.$BB93])&#10;+[.AX$30]*[.$Z$5]*MAGNET([.AX$24]+[.$BB93])&#10;+[.AY$30]*[.$Z$5]*MAGNET([.AY$24]+[.$BB93]) +RAND()*[.$BH$13]" office:value-type="float" office:value="0" calcext:value-type="float">
            <text:p>0</text:p>
          </table:table-cell>
          <table:table-cell table:style-name="ce71" table:formula="of:=[.E$31]*[.$Z$5]*MAGNET([.E$24]+[.$BB93])+[.F$31]*[.$Z$5]*MAGNET([.F$24]+[.$BB93])+[.G$31]*[.$Z$5]*MAGNET([.G$24]+[.$BB93])+[.H$31]*[.$Z$5]*MAGNET([.H$24]+[.$BB93])+[.I$31]*[.$Z$5]*MAGNET([.I$24]+[.$BB93])+[.J$31]*[.$Z$5]*MAGNET([.J$24]+[.$BB93])+[.K$31]*[.$Z$5]*MAGNET([.K$24]+[.$BB93])+[.L$31]*[.$Z$5]*MAGNET([.L$24]+[.$BB93])+[.M$31]*[.$Z$5]*MAGNET([.M$24]+[.$BB93])+[.N$31]*[.$Z$5]*MAGNET([.N$24]+[.$BB93])+[.O$31]*[.$Z$5]*MAGNET([.O$24]+[.$BB93])+[.P$31]*[.$Z$5]*MAGNET([.P$24]+[.$BB93])+[.Q$31]*[.$Z$5]*MAGNET([.Q$24]+[.$BB93])+[.R$31]*[.$Z$5]*MAGNET([.R$24]+[.$BB93])+[.S$31]*[.$Z$5]*MAGNET([.S$24]+[.$BB93])+[.T$31]*[.$Z$5]*MAGNET([.T$24]+[.$BB93])+[.U$31]*[.$Z$5]*MAGNET([.U$24]+[.$BB93])+[.V$31]*[.$Z$5]*MAGNET([.V$24]+[.$BB93])+[.W$31]*[.$Z$5]*MAGNET([.W$24]+[.$BB93])+[.X$31]*[.$Z$5]*MAGNET([.X$24]+[.$BB93])+[.Y$31]*[.$Z$5]*MAGNET([.Y$24]+[.$BB93])+[.Z$31]*[.$Z$5]*MAGNET([.Z$24]+[.$BB93])+[.AA$31]*[.$Z$5]*MAGNET([.AA$24]+[.$BB93])+[.AB$31]*[.$Z$5]*MAGNET([.AB$24]+[.$BB93])+[.AC$31]*[.$Z$5]*MAGNET([.AC$24]+[.$BB93])+[.AD$31]*[.$Z$5]*MAGNET([.AD$24]+[.$BB93])+[.AE$31]*[.$Z$5]*MAGNET([.AE$24]+[.$BB93])+[.AF$31]*[.$Z$5]*MAGNET([.AF$24]+[.$BB93])+[.AG$31]*[.$Z$5]*MAGNET([.AG$24]+[.$BB93])+[.D$31]*[.$Z$5]*MAGNET([.D$24]+[.$BB93])+[.AH$31]*[.$Z$5]*MAGNET([.AH$24]+[.BB93]) +[.AI$31]*[.$Z$5]*MAGNET([.AI$24]+[.BB93]) +[.AJ$31]*[.$Z$5]*MAGNET([.AJ$24]+[.BB93]) +[.AK$31]*[.$Z$5]*MAGNET([.AK$24]+[.BB93]) +[.AL$31]*[.$Z$5]*MAGNET([.AL$24]+[.BB93]) +[.AM$31]*[.$Z$5]*MAGNET([.AM$24]+[.BB93]) +[.AN$31]*[.$Z$5]*MAGNET([.AN$24]+[.BB93]) +[.AO$31]*[.$Z$5]*MAGNET([.AO$24]+[.BB93]) +[.AP$31]*[.$Z$5]*MAGNET([.AP$24]+[.$BB93])&#10;+[.AQ$31]*[.$Z$5]*MAGNET([.AQ$24]+[.$BB93])&#10;+[.AR$31]*[.$Z$5]*MAGNET([.AR$24]+[.$BB93])&#10;+[.AS$31]*[.$Z$5]*MAGNET([.AS$24]+[.$BB93])&#10;+[.AT$31]*[.$Z$5]*MAGNET([.AT$24]+[.$BB93])&#10;+[.AU$31]*[.$Z$5]*MAGNET([.AU$24]+[.$BB93])&#10;+[.AV$31]*[.$Z$5]*MAGNET([.AV$24]+[.$BB93])&#10;+[.AW$31]*[.$Z$5]*MAGNET([.AW$24]+[.$BB93])&#10;+[.AX$31]*[.$Z$5]*MAGNET([.AX$24]+[.$BB93])&#10;+[.AY$31]*[.$Z$5]*MAGNET([.AY$24]+[.$BB93]) +RAND()*[.$BI$13]" office:value-type="float" office:value="0" calcext:value-type="float">
            <text:p>0</text:p>
          </table:table-cell>
          <table:table-cell table:style-name="ce71" table:formula="of:=[.E$32]*[.$Z$5]*MAGNET([.E$24]+[.$BB93])+[.F$32]*[.$Z$5]*MAGNET([.F$24]+[.$BB93])+[.G$32]*[.$Z$5]*MAGNET([.G$24]+[.$BB93])+[.H$32]*[.$Z$5]*MAGNET([.H$24]+[.$BB93])+[.I$32]*[.$Z$5]*MAGNET([.I$24]+[.$BB93])+[.J$32]*[.$Z$5]*MAGNET([.J$24]+[.$BB93])+[.K$32]*[.$Z$5]*MAGNET([.K$24]+[.$BB93])+[.L$32]*[.$Z$5]*MAGNET([.L$24]+[.$BB93])+[.M$32]*[.$Z$5]*MAGNET([.M$24]+[.$BB93])+[.N$32]*[.$Z$5]*MAGNET([.N$24]+[.$BB93])+[.O$32]*[.$Z$5]*MAGNET([.O$24]+[.$BB93])+[.P$32]*[.$Z$5]*MAGNET([.P$24]+[.$BB93])+[.Q$32]*[.$Z$5]*MAGNET([.Q$24]+[.$BB93])+[.R$32]*[.$Z$5]*MAGNET([.R$24]+[.$BB93])+[.S$32]*[.$Z$5]*MAGNET([.S$24]+[.$BB93])+[.T$32]*[.$Z$5]*MAGNET([.T$24]+[.$BB93])+[.U$32]*[.$Z$5]*MAGNET([.U$24]+[.$BB93])+[.V$32]*[.$Z$5]*MAGNET([.V$24]+[.$BB93])+[.W$32]*[.$Z$5]*MAGNET([.W$24]+[.$BB93])+[.X$32]*[.$Z$5]*MAGNET([.X$24]+[.$BB93])+[.Y$32]*[.$Z$5]*MAGNET([.Y$24]+[.$BB93])+[.Z$32]*[.$Z$5]*MAGNET([.Z$24]+[.$BB93])+[.AA$32]*[.$Z$5]*MAGNET([.AA$24]+[.$BB93])+[.AB$32]*[.$Z$5]*MAGNET([.AB$24]+[.$BB93])+[.AC$32]*[.$Z$5]*MAGNET([.AC$24]+[.$BB93])+[.AD$32]*[.$Z$5]*MAGNET([.AD$24]+[.$BB93])+[.AE$32]*[.$Z$5]*MAGNET([.AE$24]+[.$BB93])+[.AF$32]*[.$Z$5]*MAGNET([.AF$24]+[.$BB93])+[.AG$32]*[.$Z$5]*MAGNET([.AG$24]+[.$BB93])+[.D$32]*[.$Z$5]*MAGNET([.D$24]+[.$BB93])+[.AH$32]*[.$Z$5]*MAGNET([.AH$24]+[.BB93]) +[.AI$32]*[.$Z$5]*MAGNET([.AI$24]+[.BB93]) +[.AJ$32]*[.$Z$5]*MAGNET([.AJ$24]+[.BB93]) +[.AK$32]*[.$Z$5]*MAGNET([.AK$24]+[.BB93]) +[.AL$32]*[.$Z$5]*MAGNET([.AL$24]+[.BB93]) +[.AM$32]*[.$Z$5]*MAGNET([.AM$24]+[.BB93]) +[.AN$32]*[.$Z$5]*MAGNET([.AN$24]+[.BB93]) +[.AO$32]*[.$Z$5]*MAGNET([.AO$24]+[.BB93]) +[.AP$32]*[.$Z$5]*MAGNET([.AP$24]+[.$BB93])&#10;+[.AQ$32]*[.$Z$5]*MAGNET([.AQ$24]+[.$BB93])&#10;+[.AR$32]*[.$Z$5]*MAGNET([.AR$24]+[.$BB93])&#10;+[.AS$32]*[.$Z$5]*MAGNET([.AS$24]+[.$BB93])&#10;+[.AT$32]*[.$Z$5]*MAGNET([.AT$24]+[.$BB93])&#10;+[.AU$32]*[.$Z$5]*MAGNET([.AU$24]+[.$BB93])&#10;+[.AV$32]*[.$Z$5]*MAGNET([.AV$24]+[.$BB93])&#10;+[.AW$32]*[.$Z$5]*MAGNET([.AW$24]+[.$BB93])&#10;+[.AX$32]*[.$Z$5]*MAGNET([.AX$24]+[.$BB93])&#10;+[.AY$32]*[.$Z$5]*MAGNET([.AY$24]+[.$BB9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3]+0.002" office:value-type="float" office:value="0.158" calcext:value-type="float">
            <text:p>0.158</text:p>
          </table:table-cell>
          <table:table-cell table:formula="of:=[.BA94]*[.$D$6]" office:value-type="float" office:value="7.941946228275" calcext:value-type="float">
            <text:p>7.942</text:p>
          </table:table-cell>
          <table:table-cell table:formula="of:=[.D$25]*[.$Z$5]*MAGNET([.D$24]+[.BB94])+[.E$25]*[.$Z$5]*MAGNET([.E$24]+[.BB94])+[.F$25]*[.$Z$5]*MAGNET([.F$24]+[.BB94])+[.G$25]*[.$Z$5]*MAGNET([.G$24]+[.BB94])+[.H$25]*[.$Z$5]*MAGNET([.H$24]+[.BB94])+[.I$25]*[.$Z$5]*MAGNET([.I$24]+[.BB94])+[.J$25]*[.$Z$5]*MAGNET([.J$24]+[.BB94])+[.K$25]*[.$Z$5]*MAGNET([.K$24]+[.BB94])+[.L$25]*[.$Z$5]*MAGNET([.L$24]+[.BB94])+[.M$25]*[.$Z$5]*MAGNET([.M$24]+[.BB94])+[.N$25]*[.$Z$5]*MAGNET([.N$24]+[.BB94])+[.O$25]*[.$Z$5]*MAGNET([.O$24]+[.BB94])+[.P$25]*[.$Z$5]*MAGNET([.P$24]+[.BB94])+[.Q$25]*[.$Z$5]*MAGNET([.Q$24]+[.BB94])+[.R$25]*[.$Z$5]*MAGNET([.R$24]+[.BB94])+[.S$25]*[.$Z$5]*MAGNET([.S$24]+[.BB94])+[.T$25]*[.$Z$5]*MAGNET([.T$24]+[.BB94])+[.U$25]*[.$Z$5]*MAGNET([.U$24]+[.BB94])+[.V$25]*[.$Z$5]*MAGNET([.V$24]+[.BB94])+[.W$25]*[.$Z$5]*MAGNET([.W$24]+[.BB94])+[.X$25]*[.$Z$5]*MAGNET([.X$24]+[.BB94])+[.Y$25]*[.$Z$5]*MAGNET([.Y$24]+[.BB94])+[.Z$25]*[.$Z$5]*MAGNET([.Z$24]+[.BB94])+[.AA$25]*[.$Z$5]*MAGNET([.AA$24]+[.BB94])+[.AB$25]*[.$Z$5]*MAGNET([.AB$24]+[.BB94])+[.AC$25]*[.$Z$5]*MAGNET([.AC$24]+[.BB94])+[.AD$25]*[.$Z$5]*MAGNET([.AD$24]+[.BB94])+[.AE$25]*[.$Z$5]*MAGNET([.AE$24]+[.BB94])+[.AF$25]*[.$Z$5]*MAGNET([.AF$24]+[.BB94])+[.AG$25]*[.$Z$5]*MAGNET([.AG$24]+[.BB94])+[.AH$25]*[.$Z$5]*MAGNET([.AH$24]+[.BB94]) +[.AI$25]*[.$Z$5]*MAGNET([.AI$24]+[.BB94]) +[.AJ$25]*[.$Z$5]*MAGNET([.AJ$24]+[.BB94]) +[.AK$25]*[.$Z$5]*MAGNET([.AK$24]+[.BB94]) +[.AL$25]*[.$Z$5]*MAGNET([.AL$24]+[.BB94]) +[.AM$25]*[.$Z$5]*MAGNET([.AM$24]+[.BB94]) +[.AN$25]*[.$Z$5]*MAGNET([.AN$24]+[.BB94]) +[.AO$25]*[.$Z$5]*MAGNET([.AO$24]+[.BB94])+RAND()*[.$BC$13]+[.AP$25]*[.$Z$5]*MAGNET([.AP$24]+[.BB94])&#10;+[.AQ$25]*[.$Z$5]*MAGNET([.AQ$24]+[.BB94])&#10;+[.AR$25]*[.$Z$5]*MAGNET([.AR$24]+[.BB94])&#10;+[.AS$25]*[.$Z$5]*MAGNET([.AS$24]+[.BB94])&#10;+[.AT$25]*[.$Z$5]*MAGNET([.AT$24]+[.BB94])&#10;+[.AU$25]*[.$Z$5]*MAGNET([.AU$24]+[.BB94])&#10;+[.AV$25]*[.$Z$5]*MAGNET([.AV$24]+[.BB94])&#10;+[.AW$25]*[.$Z$5]*MAGNET([.AW$24]+[.BB94])&#10;+[.AX$25]*[.$Z$5]*MAGNET([.AX$24]+[.BB94])&#10;+[.AY$25]*[.$Z$5]*MAGNET([.AY$24]+[.BB94])" office:value-type="float" office:value="118.405169382495" calcext:value-type="float">
            <text:p>118.41</text:p>
          </table:table-cell>
          <table:table-cell table:style-name="ce70" table:formula="of:=[.E$26]*[.$Z$5]*MAGNET([.E$24]+[.$BB94])+[.F$26]*[.$Z$5]*MAGNET([.F$24]+[.$BB94])+[.G$26]*[.$Z$5]*MAGNET([.G$24]+[.$BB94])+[.H$26]*[.$Z$5]*MAGNET([.H$24]+[.$BB94])+[.I$26]*[.$Z$5]*MAGNET([.I$24]+[.$BB94])+[.J$26]*[.$Z$5]*MAGNET([.J$24]+[.$BB94])+[.K$26]*[.$Z$5]*MAGNET([.K$24]+[.$BB94])+[.L$26]*[.$Z$5]*MAGNET([.L$24]+[.$BB94])+[.M$26]*[.$Z$5]*MAGNET([.M$24]+[.$BB94])+[.N$26]*[.$Z$5]*MAGNET([.N$24]+[.$BB94])+[.O$26]*[.$Z$5]*MAGNET([.O$24]+[.$BB94])+[.P$26]*[.$Z$5]*MAGNET([.P$24]+[.$BB94])+[.Q$26]*[.$Z$5]*MAGNET([.Q$24]+[.$BB94])+[.R$26]*[.$Z$5]*MAGNET([.R$24]+[.$BB94])+[.S$26]*[.$Z$5]*MAGNET([.S$24]+[.$BB94])+[.T$26]*[.$Z$5]*MAGNET([.T$24]+[.$BB94])+[.U$26]*[.$Z$5]*MAGNET([.U$24]+[.$BB94])+[.V$26]*[.$Z$5]*MAGNET([.V$24]+[.$BB94])+[.W$26]*[.$Z$5]*MAGNET([.W$24]+[.$BB94])+[.X$26]*[.$Z$5]*MAGNET([.X$24]+[.$BB94])+[.Y$26]*[.$Z$5]*MAGNET([.Y$24]+[.$BB94])+[.Z$26]*[.$Z$5]*MAGNET([.Z$24]+[.$BB94])+[.AA$26]*[.$Z$5]*MAGNET([.AA$24]+[.$BB94])+[.AB$26]*[.$Z$5]*MAGNET([.AB$24]+[.$BB94])+[.AC$26]*[.$Z$5]*MAGNET([.AC$24]+[.$BB94])+[.AD$26]*[.$Z$5]*MAGNET([.AD$24]+[.$BB94])+[.AE$26]*[.$Z$5]*MAGNET([.AE$24]+[.$BB94])+[.AF$26]*[.$Z$5]*MAGNET([.AF$24]+[.$BB94])+[.AG$26]*[.$Z$5]*MAGNET([.AG$24]+[.$BB94])+[.D$26]*[.$Z$5]*MAGNET([.D$24]+[.$BB94])+[.AH$26]*[.$Z$5]*MAGNET([.AH$24]+[.BB94]) +[.AI$26]*[.$Z$5]*MAGNET([.AI$24]+[.BB94]) +[.AJ$26]*[.$Z$5]*MAGNET([.AJ$24]+[.BB94]) +[.AK$26]*[.$Z$5]*MAGNET([.AK$24]+[.BB94]) +[.AL$26]*[.$Z$5]*MAGNET([.AL$24]+[.BB94]) +[.AM$26]*[.$Z$5]*MAGNET([.AM$24]+[.BB94]) +[.AN$26]*[.$Z$5]*MAGNET([.AN$24]+[.BB94]) +[.AO$26]*[.$Z$5]*MAGNET([.AO$24]+[.BB94]) +[.AP$26]*[.$Z$5]*MAGNET([.AP$24]+[.$BB94])&#10;+[.AQ$26]*[.$Z$5]*MAGNET([.AQ$24]+[.$BB94])&#10;+[.AR$26]*[.$Z$5]*MAGNET([.AR$24]+[.$BB94])&#10;+[.AS$26]*[.$Z$5]*MAGNET([.AS$24]+[.$BB94])&#10;+[.AT$26]*[.$Z$5]*MAGNET([.AT$24]+[.$BB94])&#10;+[.AU$26]*[.$Z$5]*MAGNET([.AU$24]+[.$BB94])&#10;+[.AV$26]*[.$Z$5]*MAGNET([.AV$24]+[.$BB94])&#10;+[.AW$26]*[.$Z$5]*MAGNET([.AW$24]+[.$BB94])&#10;+[.AX$26]*[.$Z$5]*MAGNET([.AX$24]+[.$BB94])&#10;+[.AY$26]*[.$Z$5]*MAGNET([.AY$24]+[.$BB94]) +RAND()*[.$BD$13]" office:value-type="float" office:value="-31.1866471657948" calcext:value-type="float">
            <text:p>-31.19</text:p>
          </table:table-cell>
          <table:table-cell table:style-name="ce71" table:formula="of:=[.E$27]*[.$Z$5]*MAGNET([.E$24]+[.$BB94])+[.F$27]*[.$Z$5]*MAGNET([.F$24]+[.$BB94])+[.G$27]*[.$Z$5]*MAGNET([.G$24]+[.$BB94])+[.H$27]*[.$Z$5]*MAGNET([.H$24]+[.$BB94])+[.I$27]*[.$Z$5]*MAGNET([.I$24]+[.$BB94])+[.J$27]*[.$Z$5]*MAGNET([.J$24]+[.$BB94])+[.K$27]*[.$Z$5]*MAGNET([.K$24]+[.$BB94])+[.L$27]*[.$Z$5]*MAGNET([.L$24]+[.$BB94])+[.M$27]*[.$Z$5]*MAGNET([.M$24]+[.$BB94])+[.N$27]*[.$Z$5]*MAGNET([.N$24]+[.$BB94])+[.O$27]*[.$Z$5]*MAGNET([.O$24]+[.$BB94])+[.P$27]*[.$Z$5]*MAGNET([.P$24]+[.$BB94])+[.Q$27]*[.$Z$5]*MAGNET([.Q$24]+[.$BB94])+[.R$27]*[.$Z$5]*MAGNET([.R$24]+[.$BB94])+[.S$27]*[.$Z$5]*MAGNET([.S$24]+[.$BB94])+[.T$27]*[.$Z$5]*MAGNET([.T$24]+[.$BB94])+[.U$27]*[.$Z$5]*MAGNET([.U$24]+[.$BB94])+[.V$27]*[.$Z$5]*MAGNET([.V$24]+[.$BB94])+[.W$27]*[.$Z$5]*MAGNET([.W$24]+[.$BB94])+[.X$27]*[.$Z$5]*MAGNET([.X$24]+[.$BB94])+[.Y$27]*[.$Z$5]*MAGNET([.Y$24]+[.$BB94])+[.Z$27]*[.$Z$5]*MAGNET([.Z$24]+[.$BB94])+[.AA$27]*[.$Z$5]*MAGNET([.AA$24]+[.$BB94])+[.AB$27]*[.$Z$5]*MAGNET([.AB$24]+[.$BB94])+[.AC$27]*[.$Z$5]*MAGNET([.AC$24]+[.$BB94])+[.AD$27]*[.$Z$5]*MAGNET([.AD$24]+[.$BB94])+[.AE$27]*[.$Z$5]*MAGNET([.AE$24]+[.$BB94])+[.AF$27]*[.$Z$5]*MAGNET([.AF$24]+[.$BB94])+[.AG$27]*[.$Z$5]*MAGNET([.AG$24]+[.$BB94])+[.D$27]*[.$Z$5]*MAGNET([.D$24]+[.$BB94])+[.AH$27]*[.$Z$5]*MAGNET([.AH$24]+[.BB94]) +[.AI$27]*[.$Z$5]*MAGNET([.AI$24]+[.BB94]) +[.AJ$27]*[.$Z$5]*MAGNET([.AJ$24]+[.BB94]) +[.AK$27]*[.$Z$5]*MAGNET([.AK$24]+[.BB94]) +[.AL$27]*[.$Z$5]*MAGNET([.AL$24]+[.BB94]) +[.AM$27]*[.$Z$5]*MAGNET([.AM$24]+[.BB94]) +[.AN$27]*[.$Z$5]*MAGNET([.AN$24]+[.BB94]) +[.AO$27]*[.$Z$5]*MAGNET([.AO$24]+[.BB94]) +[.AP$27]*[.$Z$5]*MAGNET([.AP$24]+[.$BB94])&#10;+[.AQ$27]*[.$Z$5]*MAGNET([.AQ$24]+[.$BB94])&#10;+[.AR$27]*[.$Z$5]*MAGNET([.AR$24]+[.$BB94])&#10;+[.AS$27]*[.$Z$5]*MAGNET([.AS$24]+[.$BB94])&#10;+[.AT$27]*[.$Z$5]*MAGNET([.AT$24]+[.$BB94])&#10;+[.AU$27]*[.$Z$5]*MAGNET([.AU$24]+[.$BB94])&#10;+[.AV$27]*[.$Z$5]*MAGNET([.AV$24]+[.$BB94])&#10;+[.AW$27]*[.$Z$5]*MAGNET([.AW$24]+[.$BB94])&#10;+[.AX$27]*[.$Z$5]*MAGNET([.AX$24]+[.$BB94])&#10;+[.AY$27]*[.$Z$5]*MAGNET([.AY$24]+[.$BB94]) +RAND()*[.$BE$13]" office:value-type="float" office:value="-101.089767446385" calcext:value-type="float">
            <text:p>-101.089767446385</text:p>
          </table:table-cell>
          <table:table-cell table:style-name="ce71" table:formula="of:=[.E$28]*[.$Z$5]*MAGNET([.E$24]+[.$BB94])+[.F$28]*[.$Z$5]*MAGNET([.F$24]+[.$BB94])+[.G$28]*[.$Z$5]*MAGNET([.G$24]+[.$BB94])+[.H$28]*[.$Z$5]*MAGNET([.H$24]+[.$BB94])+[.I$28]*[.$Z$5]*MAGNET([.I$24]+[.$BB94])+[.J$28]*[.$Z$5]*MAGNET([.J$24]+[.$BB94])+[.K$28]*[.$Z$5]*MAGNET([.K$24]+[.$BB94])+[.L$28]*[.$Z$5]*MAGNET([.L$24]+[.$BB94])+[.M$28]*[.$Z$5]*MAGNET([.M$24]+[.$BB94])+[.N$28]*[.$Z$5]*MAGNET([.N$24]+[.$BB94])+[.O$28]*[.$Z$5]*MAGNET([.O$24]+[.$BB94])+[.P$28]*[.$Z$5]*MAGNET([.P$24]+[.$BB94])+[.Q$28]*[.$Z$5]*MAGNET([.Q$24]+[.$BB94])+[.R$28]*[.$Z$5]*MAGNET([.R$24]+[.$BB94])+[.S$28]*[.$Z$5]*MAGNET([.S$24]+[.$BB94])+[.T$28]*[.$Z$5]*MAGNET([.T$24]+[.$BB94])+[.U$28]*[.$Z$5]*MAGNET([.U$24]+[.$BB94])+[.V$28]*[.$Z$5]*MAGNET([.V$24]+[.$BB94])+[.W$28]*[.$Z$5]*MAGNET([.W$24]+[.$BB94])+[.X$28]*[.$Z$5]*MAGNET([.X$24]+[.$BB94])+[.Y$28]*[.$Z$5]*MAGNET([.Y$24]+[.$BB94])+[.Z$28]*[.$Z$5]*MAGNET([.Z$24]+[.$BB94])+[.AA$28]*[.$Z$5]*MAGNET([.AA$24]+[.$BB94])+[.AB$28]*[.$Z$5]*MAGNET([.AB$24]+[.$BB94])+[.AC$28]*[.$Z$5]*MAGNET([.AC$24]+[.$BB94])+[.AD$28]*[.$Z$5]*MAGNET([.AD$24]+[.$BB94])+[.AE$28]*[.$Z$5]*MAGNET([.AE$24]+[.$BB94])+[.AF$28]*[.$Z$5]*MAGNET([.AF$24]+[.$BB94])+[.AG$28]*[.$Z$5]*MAGNET([.AG$24]+[.$BB94])+[.D$28]*[.$Z$5]*MAGNET([.D$24]+[.$BB94])+[.AH$28]*[.$Z$5]*MAGNET([.AH$24]+[.BB94]) +[.AI$28]*[.$Z$5]*MAGNET([.AI$24]+[.BB94]) +[.AJ$28]*[.$Z$5]*MAGNET([.AJ$24]+[.BB94]) +[.AK$28]*[.$Z$5]*MAGNET([.AK$24]+[.BB94]) +[.AL$28]*[.$Z$5]*MAGNET([.AL$24]+[.BB94]) +[.AM$28]*[.$Z$5]*MAGNET([.AM$24]+[.BB94]) +[.AN$28]*[.$Z$5]*MAGNET([.AN$24]+[.BB94]) +[.AO$28]*[.$Z$5]*MAGNET([.AO$24]+[.BB94]) +[.AP$28]*[.$Z$5]*MAGNET([.AP$24]+[.$BB94])&#10;+[.AQ$28]*[.$Z$5]*MAGNET([.AQ$24]+[.$BB94])&#10;+[.AR$28]*[.$Z$5]*MAGNET([.AR$24]+[.$BB94])&#10;+[.AS$28]*[.$Z$5]*MAGNET([.AS$24]+[.$BB94])&#10;+[.AT$28]*[.$Z$5]*MAGNET([.AT$24]+[.$BB94])&#10;+[.AU$28]*[.$Z$5]*MAGNET([.AU$24]+[.$BB94])&#10;+[.AV$28]*[.$Z$5]*MAGNET([.AV$24]+[.$BB94])&#10;+[.AW$28]*[.$Z$5]*MAGNET([.AW$24]+[.$BB94])&#10;+[.AX$28]*[.$Z$5]*MAGNET([.AX$24]+[.$BB94])&#10;+[.AY$28]*[.$Z$5]*MAGNET([.AY$24]+[.$BB94]) +RAND()*[.$BF$13]" office:value-type="float" office:value="-11.5830948416436" calcext:value-type="float">
            <text:p>-11.5830948416436</text:p>
          </table:table-cell>
          <table:table-cell table:style-name="ce71" table:formula="of:=[.E$29]*[.$Z$5]*MAGNET([.E$24]+[.$BB94])+[.F$29]*[.$Z$5]*MAGNET([.F$24]+[.$BB94])+[.G$29]*[.$Z$5]*MAGNET([.G$24]+[.$BB94])+[.H$29]*[.$Z$5]*MAGNET([.H$24]+[.$BB94])+[.I$29]*[.$Z$5]*MAGNET([.I$24]+[.$BB94])+[.J$29]*[.$Z$5]*MAGNET([.J$24]+[.$BB94])+[.K$29]*[.$Z$5]*MAGNET([.K$24]+[.$BB94])+[.L$29]*[.$Z$5]*MAGNET([.L$24]+[.$BB94])+[.M$29]*[.$Z$5]*MAGNET([.M$24]+[.$BB94])+[.N$29]*[.$Z$5]*MAGNET([.N$24]+[.$BB94])+[.O$29]*[.$Z$5]*MAGNET([.O$24]+[.$BB94])+[.P$29]*[.$Z$5]*MAGNET([.P$24]+[.$BB94])+[.Q$29]*[.$Z$5]*MAGNET([.Q$24]+[.$BB94])+[.R$29]*[.$Z$5]*MAGNET([.R$24]+[.$BB94])+[.S$29]*[.$Z$5]*MAGNET([.S$24]+[.$BB94])+[.T$29]*[.$Z$5]*MAGNET([.T$24]+[.$BB94])+[.U$29]*[.$Z$5]*MAGNET([.U$24]+[.$BB94])+[.V$29]*[.$Z$5]*MAGNET([.V$24]+[.$BB94])+[.W$29]*[.$Z$5]*MAGNET([.W$24]+[.$BB94])+[.X$29]*[.$Z$5]*MAGNET([.X$24]+[.$BB94])+[.Y$29]*[.$Z$5]*MAGNET([.Y$24]+[.$BB94])+[.Z$29]*[.$Z$5]*MAGNET([.Z$24]+[.$BB94])+[.AA$29]*[.$Z$5]*MAGNET([.AA$24]+[.$BB94])+[.AB$29]*[.$Z$5]*MAGNET([.AB$24]+[.$BB94])+[.AC$29]*[.$Z$5]*MAGNET([.AC$24]+[.$BB94])+[.AD$29]*[.$Z$5]*MAGNET([.AD$24]+[.$BB94])+[.AE$29]*[.$Z$5]*MAGNET([.AE$24]+[.$BB94])+[.AF$29]*[.$Z$5]*MAGNET([.AF$24]+[.$BB94])+[.AG$29]*[.$Z$5]*MAGNET([.AG$24]+[.$BB94])+[.D$29]*[.$Z$5]*MAGNET([.D$24]+[.$BB94])+[.AH$29]*[.$Z$5]*MAGNET([.AH$24]+[.BB94]) +[.AI$29]*[.$Z$5]*MAGNET([.AI$24]+[.BB94]) +[.AJ$29]*[.$Z$5]*MAGNET([.AJ$24]+[.BB94]) +[.AK$29]*[.$Z$5]*MAGNET([.AK$24]+[.BB94]) +[.AL$29]*[.$Z$5]*MAGNET([.AL$24]+[.BB94]) +[.AM$29]*[.$Z$5]*MAGNET([.AM$24]+[.BB94]) +[.AN$29]*[.$Z$5]*MAGNET([.AN$24]+[.BB94]) +[.AO$29]*[.$Z$5]*MAGNET([.AO$24]+[.BB94]) +[.AP$29]*[.$Z$5]*MAGNET([.AP$24]+[.$BB94])&#10;+[.AQ$29]*[.$Z$5]*MAGNET([.AQ$24]+[.$BB94])&#10;+[.AR$29]*[.$Z$5]*MAGNET([.AR$24]+[.$BB94])&#10;+[.AS$29]*[.$Z$5]*MAGNET([.AS$24]+[.$BB94])&#10;+[.AT$29]*[.$Z$5]*MAGNET([.AT$24]+[.$BB94])&#10;+[.AU$29]*[.$Z$5]*MAGNET([.AU$24]+[.$BB94])&#10;+[.AV$29]*[.$Z$5]*MAGNET([.AV$24]+[.$BB94])&#10;+[.AW$29]*[.$Z$5]*MAGNET([.AW$24]+[.$BB94])&#10;+[.AX$29]*[.$Z$5]*MAGNET([.AX$24]+[.$BB94])&#10;+[.AY$29]*[.$Z$5]*MAGNET([.AY$24]+[.$BB94]) +RAND()*[.$BG$13]" office:value-type="float" office:value="41.3517008130784" calcext:value-type="float">
            <text:p>41.3517008130784</text:p>
          </table:table-cell>
          <table:table-cell table:style-name="ce71" table:formula="of:=[.E$30]*[.$Z$5]*MAGNET([.E$24]+[.$BB94])+[.F$30]*[.$Z$5]*MAGNET([.F$24]+[.$BB94])+[.G$30]*[.$Z$5]*MAGNET([.G$24]+[.$BB94])+[.H$30]*[.$Z$5]*MAGNET([.H$24]+[.$BB94])+[.I$30]*[.$Z$5]*MAGNET([.I$24]+[.$BB94])+[.J$30]*[.$Z$5]*MAGNET([.J$24]+[.$BB94])+[.K$30]*[.$Z$5]*MAGNET([.K$24]+[.$BB94])+[.L$30]*[.$Z$5]*MAGNET([.L$24]+[.$BB94])+[.M$30]*[.$Z$5]*MAGNET([.M$24]+[.$BB94])+[.N$30]*[.$Z$5]*MAGNET([.N$24]+[.$BB94])+[.O$30]*[.$Z$5]*MAGNET([.O$24]+[.$BB94])+[.P$30]*[.$Z$5]*MAGNET([.P$24]+[.$BB94])+[.Q$30]*[.$Z$5]*MAGNET([.Q$24]+[.$BB94])+[.R$30]*[.$Z$5]*MAGNET([.R$24]+[.$BB94])+[.S$30]*[.$Z$5]*MAGNET([.S$24]+[.$BB94])+[.T$30]*[.$Z$5]*MAGNET([.T$24]+[.$BB94])+[.U$30]*[.$Z$5]*MAGNET([.U$24]+[.$BB94])+[.V$30]*[.$Z$5]*MAGNET([.V$24]+[.$BB94])+[.W$30]*[.$Z$5]*MAGNET([.W$24]+[.$BB94])+[.X$30]*[.$Z$5]*MAGNET([.X$24]+[.$BB94])+[.Y$30]*[.$Z$5]*MAGNET([.Y$24]+[.$BB94])+[.Z$30]*[.$Z$5]*MAGNET([.Z$24]+[.$BB94])+[.AA$30]*[.$Z$5]*MAGNET([.AA$24]+[.$BB94])+[.AB$30]*[.$Z$5]*MAGNET([.AB$24]+[.$BB94])+[.AC$30]*[.$Z$5]*MAGNET([.AC$24]+[.$BB94])+[.AD$30]*[.$Z$5]*MAGNET([.AD$24]+[.$BB94])+[.AE$30]*[.$Z$5]*MAGNET([.AE$24]+[.$BB94])+[.AF$30]*[.$Z$5]*MAGNET([.AF$24]+[.$BB94])+[.AG$30]*[.$Z$5]*MAGNET([.AG$24]+[.$BB94])+[.D$30]*[.$Z$5]*MAGNET([.D$24]+[.$BB94])+[.AH$30]*[.$Z$5]*MAGNET([.AH$24]+[.BB94]) +[.AI$30]*[.$Z$5]*MAGNET([.AI$24]+[.BB94]) +[.AJ$30]*[.$Z$5]*MAGNET([.AJ$24]+[.BB94]) +[.AK$30]*[.$Z$5]*MAGNET([.AK$24]+[.BB94]) +[.AL$30]*[.$Z$5]*MAGNET([.AL$24]+[.BB94]) +[.AM$30]*[.$Z$5]*MAGNET([.AM$24]+[.BB94]) +[.AN$30]*[.$Z$5]*MAGNET([.AN$24]+[.BB94]) +[.AO$30]*[.$Z$5]*MAGNET([.AO$24]+[.BB94]) +[.AP$30]*[.$Z$5]*MAGNET([.AP$24]+[.$BB94])&#10;+[.AQ$30]*[.$Z$5]*MAGNET([.AQ$24]+[.$BB94])&#10;+[.AR$30]*[.$Z$5]*MAGNET([.AR$24]+[.$BB94])&#10;+[.AS$30]*[.$Z$5]*MAGNET([.AS$24]+[.$BB94])&#10;+[.AT$30]*[.$Z$5]*MAGNET([.AT$24]+[.$BB94])&#10;+[.AU$30]*[.$Z$5]*MAGNET([.AU$24]+[.$BB94])&#10;+[.AV$30]*[.$Z$5]*MAGNET([.AV$24]+[.$BB94])&#10;+[.AW$30]*[.$Z$5]*MAGNET([.AW$24]+[.$BB94])&#10;+[.AX$30]*[.$Z$5]*MAGNET([.AX$24]+[.$BB94])&#10;+[.AY$30]*[.$Z$5]*MAGNET([.AY$24]+[.$BB94]) +RAND()*[.$BH$13]" office:value-type="float" office:value="0" calcext:value-type="float">
            <text:p>0</text:p>
          </table:table-cell>
          <table:table-cell table:style-name="ce71" table:formula="of:=[.E$31]*[.$Z$5]*MAGNET([.E$24]+[.$BB94])+[.F$31]*[.$Z$5]*MAGNET([.F$24]+[.$BB94])+[.G$31]*[.$Z$5]*MAGNET([.G$24]+[.$BB94])+[.H$31]*[.$Z$5]*MAGNET([.H$24]+[.$BB94])+[.I$31]*[.$Z$5]*MAGNET([.I$24]+[.$BB94])+[.J$31]*[.$Z$5]*MAGNET([.J$24]+[.$BB94])+[.K$31]*[.$Z$5]*MAGNET([.K$24]+[.$BB94])+[.L$31]*[.$Z$5]*MAGNET([.L$24]+[.$BB94])+[.M$31]*[.$Z$5]*MAGNET([.M$24]+[.$BB94])+[.N$31]*[.$Z$5]*MAGNET([.N$24]+[.$BB94])+[.O$31]*[.$Z$5]*MAGNET([.O$24]+[.$BB94])+[.P$31]*[.$Z$5]*MAGNET([.P$24]+[.$BB94])+[.Q$31]*[.$Z$5]*MAGNET([.Q$24]+[.$BB94])+[.R$31]*[.$Z$5]*MAGNET([.R$24]+[.$BB94])+[.S$31]*[.$Z$5]*MAGNET([.S$24]+[.$BB94])+[.T$31]*[.$Z$5]*MAGNET([.T$24]+[.$BB94])+[.U$31]*[.$Z$5]*MAGNET([.U$24]+[.$BB94])+[.V$31]*[.$Z$5]*MAGNET([.V$24]+[.$BB94])+[.W$31]*[.$Z$5]*MAGNET([.W$24]+[.$BB94])+[.X$31]*[.$Z$5]*MAGNET([.X$24]+[.$BB94])+[.Y$31]*[.$Z$5]*MAGNET([.Y$24]+[.$BB94])+[.Z$31]*[.$Z$5]*MAGNET([.Z$24]+[.$BB94])+[.AA$31]*[.$Z$5]*MAGNET([.AA$24]+[.$BB94])+[.AB$31]*[.$Z$5]*MAGNET([.AB$24]+[.$BB94])+[.AC$31]*[.$Z$5]*MAGNET([.AC$24]+[.$BB94])+[.AD$31]*[.$Z$5]*MAGNET([.AD$24]+[.$BB94])+[.AE$31]*[.$Z$5]*MAGNET([.AE$24]+[.$BB94])+[.AF$31]*[.$Z$5]*MAGNET([.AF$24]+[.$BB94])+[.AG$31]*[.$Z$5]*MAGNET([.AG$24]+[.$BB94])+[.D$31]*[.$Z$5]*MAGNET([.D$24]+[.$BB94])+[.AH$31]*[.$Z$5]*MAGNET([.AH$24]+[.BB94]) +[.AI$31]*[.$Z$5]*MAGNET([.AI$24]+[.BB94]) +[.AJ$31]*[.$Z$5]*MAGNET([.AJ$24]+[.BB94]) +[.AK$31]*[.$Z$5]*MAGNET([.AK$24]+[.BB94]) +[.AL$31]*[.$Z$5]*MAGNET([.AL$24]+[.BB94]) +[.AM$31]*[.$Z$5]*MAGNET([.AM$24]+[.BB94]) +[.AN$31]*[.$Z$5]*MAGNET([.AN$24]+[.BB94]) +[.AO$31]*[.$Z$5]*MAGNET([.AO$24]+[.BB94]) +[.AP$31]*[.$Z$5]*MAGNET([.AP$24]+[.$BB94])&#10;+[.AQ$31]*[.$Z$5]*MAGNET([.AQ$24]+[.$BB94])&#10;+[.AR$31]*[.$Z$5]*MAGNET([.AR$24]+[.$BB94])&#10;+[.AS$31]*[.$Z$5]*MAGNET([.AS$24]+[.$BB94])&#10;+[.AT$31]*[.$Z$5]*MAGNET([.AT$24]+[.$BB94])&#10;+[.AU$31]*[.$Z$5]*MAGNET([.AU$24]+[.$BB94])&#10;+[.AV$31]*[.$Z$5]*MAGNET([.AV$24]+[.$BB94])&#10;+[.AW$31]*[.$Z$5]*MAGNET([.AW$24]+[.$BB94])&#10;+[.AX$31]*[.$Z$5]*MAGNET([.AX$24]+[.$BB94])&#10;+[.AY$31]*[.$Z$5]*MAGNET([.AY$24]+[.$BB94]) +RAND()*[.$BI$13]" office:value-type="float" office:value="0" calcext:value-type="float">
            <text:p>0</text:p>
          </table:table-cell>
          <table:table-cell table:style-name="ce71" table:formula="of:=[.E$32]*[.$Z$5]*MAGNET([.E$24]+[.$BB94])+[.F$32]*[.$Z$5]*MAGNET([.F$24]+[.$BB94])+[.G$32]*[.$Z$5]*MAGNET([.G$24]+[.$BB94])+[.H$32]*[.$Z$5]*MAGNET([.H$24]+[.$BB94])+[.I$32]*[.$Z$5]*MAGNET([.I$24]+[.$BB94])+[.J$32]*[.$Z$5]*MAGNET([.J$24]+[.$BB94])+[.K$32]*[.$Z$5]*MAGNET([.K$24]+[.$BB94])+[.L$32]*[.$Z$5]*MAGNET([.L$24]+[.$BB94])+[.M$32]*[.$Z$5]*MAGNET([.M$24]+[.$BB94])+[.N$32]*[.$Z$5]*MAGNET([.N$24]+[.$BB94])+[.O$32]*[.$Z$5]*MAGNET([.O$24]+[.$BB94])+[.P$32]*[.$Z$5]*MAGNET([.P$24]+[.$BB94])+[.Q$32]*[.$Z$5]*MAGNET([.Q$24]+[.$BB94])+[.R$32]*[.$Z$5]*MAGNET([.R$24]+[.$BB94])+[.S$32]*[.$Z$5]*MAGNET([.S$24]+[.$BB94])+[.T$32]*[.$Z$5]*MAGNET([.T$24]+[.$BB94])+[.U$32]*[.$Z$5]*MAGNET([.U$24]+[.$BB94])+[.V$32]*[.$Z$5]*MAGNET([.V$24]+[.$BB94])+[.W$32]*[.$Z$5]*MAGNET([.W$24]+[.$BB94])+[.X$32]*[.$Z$5]*MAGNET([.X$24]+[.$BB94])+[.Y$32]*[.$Z$5]*MAGNET([.Y$24]+[.$BB94])+[.Z$32]*[.$Z$5]*MAGNET([.Z$24]+[.$BB94])+[.AA$32]*[.$Z$5]*MAGNET([.AA$24]+[.$BB94])+[.AB$32]*[.$Z$5]*MAGNET([.AB$24]+[.$BB94])+[.AC$32]*[.$Z$5]*MAGNET([.AC$24]+[.$BB94])+[.AD$32]*[.$Z$5]*MAGNET([.AD$24]+[.$BB94])+[.AE$32]*[.$Z$5]*MAGNET([.AE$24]+[.$BB94])+[.AF$32]*[.$Z$5]*MAGNET([.AF$24]+[.$BB94])+[.AG$32]*[.$Z$5]*MAGNET([.AG$24]+[.$BB94])+[.D$32]*[.$Z$5]*MAGNET([.D$24]+[.$BB94])+[.AH$32]*[.$Z$5]*MAGNET([.AH$24]+[.BB94]) +[.AI$32]*[.$Z$5]*MAGNET([.AI$24]+[.BB94]) +[.AJ$32]*[.$Z$5]*MAGNET([.AJ$24]+[.BB94]) +[.AK$32]*[.$Z$5]*MAGNET([.AK$24]+[.BB94]) +[.AL$32]*[.$Z$5]*MAGNET([.AL$24]+[.BB94]) +[.AM$32]*[.$Z$5]*MAGNET([.AM$24]+[.BB94]) +[.AN$32]*[.$Z$5]*MAGNET([.AN$24]+[.BB94]) +[.AO$32]*[.$Z$5]*MAGNET([.AO$24]+[.BB94]) +[.AP$32]*[.$Z$5]*MAGNET([.AP$24]+[.$BB94])&#10;+[.AQ$32]*[.$Z$5]*MAGNET([.AQ$24]+[.$BB94])&#10;+[.AR$32]*[.$Z$5]*MAGNET([.AR$24]+[.$BB94])&#10;+[.AS$32]*[.$Z$5]*MAGNET([.AS$24]+[.$BB94])&#10;+[.AT$32]*[.$Z$5]*MAGNET([.AT$24]+[.$BB94])&#10;+[.AU$32]*[.$Z$5]*MAGNET([.AU$24]+[.$BB94])&#10;+[.AV$32]*[.$Z$5]*MAGNET([.AV$24]+[.$BB94])&#10;+[.AW$32]*[.$Z$5]*MAGNET([.AW$24]+[.$BB94])&#10;+[.AX$32]*[.$Z$5]*MAGNET([.AX$24]+[.$BB94])&#10;+[.AY$32]*[.$Z$5]*MAGNET([.AY$24]+[.$BB9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4]+0.002" office:value-type="float" office:value="0.16" calcext:value-type="float">
            <text:p>0.16</text:p>
          </table:table-cell>
          <table:table-cell table:formula="of:=[.BA95]*[.$D$6]" office:value-type="float" office:value="8.04247719318988" calcext:value-type="float">
            <text:p>8.042</text:p>
          </table:table-cell>
          <table:table-cell table:formula="of:=[.D$25]*[.$Z$5]*MAGNET([.D$24]+[.BB95])+[.E$25]*[.$Z$5]*MAGNET([.E$24]+[.BB95])+[.F$25]*[.$Z$5]*MAGNET([.F$24]+[.BB95])+[.G$25]*[.$Z$5]*MAGNET([.G$24]+[.BB95])+[.H$25]*[.$Z$5]*MAGNET([.H$24]+[.BB95])+[.I$25]*[.$Z$5]*MAGNET([.I$24]+[.BB95])+[.J$25]*[.$Z$5]*MAGNET([.J$24]+[.BB95])+[.K$25]*[.$Z$5]*MAGNET([.K$24]+[.BB95])+[.L$25]*[.$Z$5]*MAGNET([.L$24]+[.BB95])+[.M$25]*[.$Z$5]*MAGNET([.M$24]+[.BB95])+[.N$25]*[.$Z$5]*MAGNET([.N$24]+[.BB95])+[.O$25]*[.$Z$5]*MAGNET([.O$24]+[.BB95])+[.P$25]*[.$Z$5]*MAGNET([.P$24]+[.BB95])+[.Q$25]*[.$Z$5]*MAGNET([.Q$24]+[.BB95])+[.R$25]*[.$Z$5]*MAGNET([.R$24]+[.BB95])+[.S$25]*[.$Z$5]*MAGNET([.S$24]+[.BB95])+[.T$25]*[.$Z$5]*MAGNET([.T$24]+[.BB95])+[.U$25]*[.$Z$5]*MAGNET([.U$24]+[.BB95])+[.V$25]*[.$Z$5]*MAGNET([.V$24]+[.BB95])+[.W$25]*[.$Z$5]*MAGNET([.W$24]+[.BB95])+[.X$25]*[.$Z$5]*MAGNET([.X$24]+[.BB95])+[.Y$25]*[.$Z$5]*MAGNET([.Y$24]+[.BB95])+[.Z$25]*[.$Z$5]*MAGNET([.Z$24]+[.BB95])+[.AA$25]*[.$Z$5]*MAGNET([.AA$24]+[.BB95])+[.AB$25]*[.$Z$5]*MAGNET([.AB$24]+[.BB95])+[.AC$25]*[.$Z$5]*MAGNET([.AC$24]+[.BB95])+[.AD$25]*[.$Z$5]*MAGNET([.AD$24]+[.BB95])+[.AE$25]*[.$Z$5]*MAGNET([.AE$24]+[.BB95])+[.AF$25]*[.$Z$5]*MAGNET([.AF$24]+[.BB95])+[.AG$25]*[.$Z$5]*MAGNET([.AG$24]+[.BB95])+[.AH$25]*[.$Z$5]*MAGNET([.AH$24]+[.BB95]) +[.AI$25]*[.$Z$5]*MAGNET([.AI$24]+[.BB95]) +[.AJ$25]*[.$Z$5]*MAGNET([.AJ$24]+[.BB95]) +[.AK$25]*[.$Z$5]*MAGNET([.AK$24]+[.BB95]) +[.AL$25]*[.$Z$5]*MAGNET([.AL$24]+[.BB95]) +[.AM$25]*[.$Z$5]*MAGNET([.AM$24]+[.BB95]) +[.AN$25]*[.$Z$5]*MAGNET([.AN$24]+[.BB95]) +[.AO$25]*[.$Z$5]*MAGNET([.AO$24]+[.BB95])+RAND()*[.$BC$13]+[.AP$25]*[.$Z$5]*MAGNET([.AP$24]+[.BB95])&#10;+[.AQ$25]*[.$Z$5]*MAGNET([.AQ$24]+[.BB95])&#10;+[.AR$25]*[.$Z$5]*MAGNET([.AR$24]+[.BB95])&#10;+[.AS$25]*[.$Z$5]*MAGNET([.AS$24]+[.BB95])&#10;+[.AT$25]*[.$Z$5]*MAGNET([.AT$24]+[.BB95])&#10;+[.AU$25]*[.$Z$5]*MAGNET([.AU$24]+[.BB95])&#10;+[.AV$25]*[.$Z$5]*MAGNET([.AV$24]+[.BB95])&#10;+[.AW$25]*[.$Z$5]*MAGNET([.AW$24]+[.BB95])&#10;+[.AX$25]*[.$Z$5]*MAGNET([.AX$24]+[.BB95])&#10;+[.AY$25]*[.$Z$5]*MAGNET([.AY$24]+[.BB95])" office:value-type="float" office:value="119.476216800694" calcext:value-type="float">
            <text:p>119.48</text:p>
          </table:table-cell>
          <table:table-cell table:style-name="ce70" table:formula="of:=[.E$26]*[.$Z$5]*MAGNET([.E$24]+[.$BB95])+[.F$26]*[.$Z$5]*MAGNET([.F$24]+[.$BB95])+[.G$26]*[.$Z$5]*MAGNET([.G$24]+[.$BB95])+[.H$26]*[.$Z$5]*MAGNET([.H$24]+[.$BB95])+[.I$26]*[.$Z$5]*MAGNET([.I$24]+[.$BB95])+[.J$26]*[.$Z$5]*MAGNET([.J$24]+[.$BB95])+[.K$26]*[.$Z$5]*MAGNET([.K$24]+[.$BB95])+[.L$26]*[.$Z$5]*MAGNET([.L$24]+[.$BB95])+[.M$26]*[.$Z$5]*MAGNET([.M$24]+[.$BB95])+[.N$26]*[.$Z$5]*MAGNET([.N$24]+[.$BB95])+[.O$26]*[.$Z$5]*MAGNET([.O$24]+[.$BB95])+[.P$26]*[.$Z$5]*MAGNET([.P$24]+[.$BB95])+[.Q$26]*[.$Z$5]*MAGNET([.Q$24]+[.$BB95])+[.R$26]*[.$Z$5]*MAGNET([.R$24]+[.$BB95])+[.S$26]*[.$Z$5]*MAGNET([.S$24]+[.$BB95])+[.T$26]*[.$Z$5]*MAGNET([.T$24]+[.$BB95])+[.U$26]*[.$Z$5]*MAGNET([.U$24]+[.$BB95])+[.V$26]*[.$Z$5]*MAGNET([.V$24]+[.$BB95])+[.W$26]*[.$Z$5]*MAGNET([.W$24]+[.$BB95])+[.X$26]*[.$Z$5]*MAGNET([.X$24]+[.$BB95])+[.Y$26]*[.$Z$5]*MAGNET([.Y$24]+[.$BB95])+[.Z$26]*[.$Z$5]*MAGNET([.Z$24]+[.$BB95])+[.AA$26]*[.$Z$5]*MAGNET([.AA$24]+[.$BB95])+[.AB$26]*[.$Z$5]*MAGNET([.AB$24]+[.$BB95])+[.AC$26]*[.$Z$5]*MAGNET([.AC$24]+[.$BB95])+[.AD$26]*[.$Z$5]*MAGNET([.AD$24]+[.$BB95])+[.AE$26]*[.$Z$5]*MAGNET([.AE$24]+[.$BB95])+[.AF$26]*[.$Z$5]*MAGNET([.AF$24]+[.$BB95])+[.AG$26]*[.$Z$5]*MAGNET([.AG$24]+[.$BB95])+[.D$26]*[.$Z$5]*MAGNET([.D$24]+[.$BB95])+[.AH$26]*[.$Z$5]*MAGNET([.AH$24]+[.BB95]) +[.AI$26]*[.$Z$5]*MAGNET([.AI$24]+[.BB95]) +[.AJ$26]*[.$Z$5]*MAGNET([.AJ$24]+[.BB95]) +[.AK$26]*[.$Z$5]*MAGNET([.AK$24]+[.BB95]) +[.AL$26]*[.$Z$5]*MAGNET([.AL$24]+[.BB95]) +[.AM$26]*[.$Z$5]*MAGNET([.AM$24]+[.BB95]) +[.AN$26]*[.$Z$5]*MAGNET([.AN$24]+[.BB95]) +[.AO$26]*[.$Z$5]*MAGNET([.AO$24]+[.BB95]) +[.AP$26]*[.$Z$5]*MAGNET([.AP$24]+[.$BB95])&#10;+[.AQ$26]*[.$Z$5]*MAGNET([.AQ$24]+[.$BB95])&#10;+[.AR$26]*[.$Z$5]*MAGNET([.AR$24]+[.$BB95])&#10;+[.AS$26]*[.$Z$5]*MAGNET([.AS$24]+[.$BB95])&#10;+[.AT$26]*[.$Z$5]*MAGNET([.AT$24]+[.$BB95])&#10;+[.AU$26]*[.$Z$5]*MAGNET([.AU$24]+[.$BB95])&#10;+[.AV$26]*[.$Z$5]*MAGNET([.AV$24]+[.$BB95])&#10;+[.AW$26]*[.$Z$5]*MAGNET([.AW$24]+[.$BB95])&#10;+[.AX$26]*[.$Z$5]*MAGNET([.AX$24]+[.$BB95])&#10;+[.AY$26]*[.$Z$5]*MAGNET([.AY$24]+[.$BB95]) +RAND()*[.$BD$13]" office:value-type="float" office:value="-39.1440532220886" calcext:value-type="float">
            <text:p>-39.14</text:p>
          </table:table-cell>
          <table:table-cell table:style-name="ce71" table:formula="of:=[.E$27]*[.$Z$5]*MAGNET([.E$24]+[.$BB95])+[.F$27]*[.$Z$5]*MAGNET([.F$24]+[.$BB95])+[.G$27]*[.$Z$5]*MAGNET([.G$24]+[.$BB95])+[.H$27]*[.$Z$5]*MAGNET([.H$24]+[.$BB95])+[.I$27]*[.$Z$5]*MAGNET([.I$24]+[.$BB95])+[.J$27]*[.$Z$5]*MAGNET([.J$24]+[.$BB95])+[.K$27]*[.$Z$5]*MAGNET([.K$24]+[.$BB95])+[.L$27]*[.$Z$5]*MAGNET([.L$24]+[.$BB95])+[.M$27]*[.$Z$5]*MAGNET([.M$24]+[.$BB95])+[.N$27]*[.$Z$5]*MAGNET([.N$24]+[.$BB95])+[.O$27]*[.$Z$5]*MAGNET([.O$24]+[.$BB95])+[.P$27]*[.$Z$5]*MAGNET([.P$24]+[.$BB95])+[.Q$27]*[.$Z$5]*MAGNET([.Q$24]+[.$BB95])+[.R$27]*[.$Z$5]*MAGNET([.R$24]+[.$BB95])+[.S$27]*[.$Z$5]*MAGNET([.S$24]+[.$BB95])+[.T$27]*[.$Z$5]*MAGNET([.T$24]+[.$BB95])+[.U$27]*[.$Z$5]*MAGNET([.U$24]+[.$BB95])+[.V$27]*[.$Z$5]*MAGNET([.V$24]+[.$BB95])+[.W$27]*[.$Z$5]*MAGNET([.W$24]+[.$BB95])+[.X$27]*[.$Z$5]*MAGNET([.X$24]+[.$BB95])+[.Y$27]*[.$Z$5]*MAGNET([.Y$24]+[.$BB95])+[.Z$27]*[.$Z$5]*MAGNET([.Z$24]+[.$BB95])+[.AA$27]*[.$Z$5]*MAGNET([.AA$24]+[.$BB95])+[.AB$27]*[.$Z$5]*MAGNET([.AB$24]+[.$BB95])+[.AC$27]*[.$Z$5]*MAGNET([.AC$24]+[.$BB95])+[.AD$27]*[.$Z$5]*MAGNET([.AD$24]+[.$BB95])+[.AE$27]*[.$Z$5]*MAGNET([.AE$24]+[.$BB95])+[.AF$27]*[.$Z$5]*MAGNET([.AF$24]+[.$BB95])+[.AG$27]*[.$Z$5]*MAGNET([.AG$24]+[.$BB95])+[.D$27]*[.$Z$5]*MAGNET([.D$24]+[.$BB95])+[.AH$27]*[.$Z$5]*MAGNET([.AH$24]+[.BB95]) +[.AI$27]*[.$Z$5]*MAGNET([.AI$24]+[.BB95]) +[.AJ$27]*[.$Z$5]*MAGNET([.AJ$24]+[.BB95]) +[.AK$27]*[.$Z$5]*MAGNET([.AK$24]+[.BB95]) +[.AL$27]*[.$Z$5]*MAGNET([.AL$24]+[.BB95]) +[.AM$27]*[.$Z$5]*MAGNET([.AM$24]+[.BB95]) +[.AN$27]*[.$Z$5]*MAGNET([.AN$24]+[.BB95]) +[.AO$27]*[.$Z$5]*MAGNET([.AO$24]+[.BB95]) +[.AP$27]*[.$Z$5]*MAGNET([.AP$24]+[.$BB95])&#10;+[.AQ$27]*[.$Z$5]*MAGNET([.AQ$24]+[.$BB95])&#10;+[.AR$27]*[.$Z$5]*MAGNET([.AR$24]+[.$BB95])&#10;+[.AS$27]*[.$Z$5]*MAGNET([.AS$24]+[.$BB95])&#10;+[.AT$27]*[.$Z$5]*MAGNET([.AT$24]+[.$BB95])&#10;+[.AU$27]*[.$Z$5]*MAGNET([.AU$24]+[.$BB95])&#10;+[.AV$27]*[.$Z$5]*MAGNET([.AV$24]+[.$BB95])&#10;+[.AW$27]*[.$Z$5]*MAGNET([.AW$24]+[.$BB95])&#10;+[.AX$27]*[.$Z$5]*MAGNET([.AX$24]+[.$BB95])&#10;+[.AY$27]*[.$Z$5]*MAGNET([.AY$24]+[.$BB95]) +RAND()*[.$BE$13]" office:value-type="float" office:value="-95.0973174148766" calcext:value-type="float">
            <text:p>-95.0973174148766</text:p>
          </table:table-cell>
          <table:table-cell table:style-name="ce71" table:formula="of:=[.E$28]*[.$Z$5]*MAGNET([.E$24]+[.$BB95])+[.F$28]*[.$Z$5]*MAGNET([.F$24]+[.$BB95])+[.G$28]*[.$Z$5]*MAGNET([.G$24]+[.$BB95])+[.H$28]*[.$Z$5]*MAGNET([.H$24]+[.$BB95])+[.I$28]*[.$Z$5]*MAGNET([.I$24]+[.$BB95])+[.J$28]*[.$Z$5]*MAGNET([.J$24]+[.$BB95])+[.K$28]*[.$Z$5]*MAGNET([.K$24]+[.$BB95])+[.L$28]*[.$Z$5]*MAGNET([.L$24]+[.$BB95])+[.M$28]*[.$Z$5]*MAGNET([.M$24]+[.$BB95])+[.N$28]*[.$Z$5]*MAGNET([.N$24]+[.$BB95])+[.O$28]*[.$Z$5]*MAGNET([.O$24]+[.$BB95])+[.P$28]*[.$Z$5]*MAGNET([.P$24]+[.$BB95])+[.Q$28]*[.$Z$5]*MAGNET([.Q$24]+[.$BB95])+[.R$28]*[.$Z$5]*MAGNET([.R$24]+[.$BB95])+[.S$28]*[.$Z$5]*MAGNET([.S$24]+[.$BB95])+[.T$28]*[.$Z$5]*MAGNET([.T$24]+[.$BB95])+[.U$28]*[.$Z$5]*MAGNET([.U$24]+[.$BB95])+[.V$28]*[.$Z$5]*MAGNET([.V$24]+[.$BB95])+[.W$28]*[.$Z$5]*MAGNET([.W$24]+[.$BB95])+[.X$28]*[.$Z$5]*MAGNET([.X$24]+[.$BB95])+[.Y$28]*[.$Z$5]*MAGNET([.Y$24]+[.$BB95])+[.Z$28]*[.$Z$5]*MAGNET([.Z$24]+[.$BB95])+[.AA$28]*[.$Z$5]*MAGNET([.AA$24]+[.$BB95])+[.AB$28]*[.$Z$5]*MAGNET([.AB$24]+[.$BB95])+[.AC$28]*[.$Z$5]*MAGNET([.AC$24]+[.$BB95])+[.AD$28]*[.$Z$5]*MAGNET([.AD$24]+[.$BB95])+[.AE$28]*[.$Z$5]*MAGNET([.AE$24]+[.$BB95])+[.AF$28]*[.$Z$5]*MAGNET([.AF$24]+[.$BB95])+[.AG$28]*[.$Z$5]*MAGNET([.AG$24]+[.$BB95])+[.D$28]*[.$Z$5]*MAGNET([.D$24]+[.$BB95])+[.AH$28]*[.$Z$5]*MAGNET([.AH$24]+[.BB95]) +[.AI$28]*[.$Z$5]*MAGNET([.AI$24]+[.BB95]) +[.AJ$28]*[.$Z$5]*MAGNET([.AJ$24]+[.BB95]) +[.AK$28]*[.$Z$5]*MAGNET([.AK$24]+[.BB95]) +[.AL$28]*[.$Z$5]*MAGNET([.AL$24]+[.BB95]) +[.AM$28]*[.$Z$5]*MAGNET([.AM$24]+[.BB95]) +[.AN$28]*[.$Z$5]*MAGNET([.AN$24]+[.BB95]) +[.AO$28]*[.$Z$5]*MAGNET([.AO$24]+[.BB95]) +[.AP$28]*[.$Z$5]*MAGNET([.AP$24]+[.$BB95])&#10;+[.AQ$28]*[.$Z$5]*MAGNET([.AQ$24]+[.$BB95])&#10;+[.AR$28]*[.$Z$5]*MAGNET([.AR$24]+[.$BB95])&#10;+[.AS$28]*[.$Z$5]*MAGNET([.AS$24]+[.$BB95])&#10;+[.AT$28]*[.$Z$5]*MAGNET([.AT$24]+[.$BB95])&#10;+[.AU$28]*[.$Z$5]*MAGNET([.AU$24]+[.$BB95])&#10;+[.AV$28]*[.$Z$5]*MAGNET([.AV$24]+[.$BB95])&#10;+[.AW$28]*[.$Z$5]*MAGNET([.AW$24]+[.$BB95])&#10;+[.AX$28]*[.$Z$5]*MAGNET([.AX$24]+[.$BB95])&#10;+[.AY$28]*[.$Z$5]*MAGNET([.AY$24]+[.$BB95]) +RAND()*[.$BF$13]" office:value-type="float" office:value="-10.4934404172189" calcext:value-type="float">
            <text:p>-10.4934404172189</text:p>
          </table:table-cell>
          <table:table-cell table:style-name="ce71" table:formula="of:=[.E$29]*[.$Z$5]*MAGNET([.E$24]+[.$BB95])+[.F$29]*[.$Z$5]*MAGNET([.F$24]+[.$BB95])+[.G$29]*[.$Z$5]*MAGNET([.G$24]+[.$BB95])+[.H$29]*[.$Z$5]*MAGNET([.H$24]+[.$BB95])+[.I$29]*[.$Z$5]*MAGNET([.I$24]+[.$BB95])+[.J$29]*[.$Z$5]*MAGNET([.J$24]+[.$BB95])+[.K$29]*[.$Z$5]*MAGNET([.K$24]+[.$BB95])+[.L$29]*[.$Z$5]*MAGNET([.L$24]+[.$BB95])+[.M$29]*[.$Z$5]*MAGNET([.M$24]+[.$BB95])+[.N$29]*[.$Z$5]*MAGNET([.N$24]+[.$BB95])+[.O$29]*[.$Z$5]*MAGNET([.O$24]+[.$BB95])+[.P$29]*[.$Z$5]*MAGNET([.P$24]+[.$BB95])+[.Q$29]*[.$Z$5]*MAGNET([.Q$24]+[.$BB95])+[.R$29]*[.$Z$5]*MAGNET([.R$24]+[.$BB95])+[.S$29]*[.$Z$5]*MAGNET([.S$24]+[.$BB95])+[.T$29]*[.$Z$5]*MAGNET([.T$24]+[.$BB95])+[.U$29]*[.$Z$5]*MAGNET([.U$24]+[.$BB95])+[.V$29]*[.$Z$5]*MAGNET([.V$24]+[.$BB95])+[.W$29]*[.$Z$5]*MAGNET([.W$24]+[.$BB95])+[.X$29]*[.$Z$5]*MAGNET([.X$24]+[.$BB95])+[.Y$29]*[.$Z$5]*MAGNET([.Y$24]+[.$BB95])+[.Z$29]*[.$Z$5]*MAGNET([.Z$24]+[.$BB95])+[.AA$29]*[.$Z$5]*MAGNET([.AA$24]+[.$BB95])+[.AB$29]*[.$Z$5]*MAGNET([.AB$24]+[.$BB95])+[.AC$29]*[.$Z$5]*MAGNET([.AC$24]+[.$BB95])+[.AD$29]*[.$Z$5]*MAGNET([.AD$24]+[.$BB95])+[.AE$29]*[.$Z$5]*MAGNET([.AE$24]+[.$BB95])+[.AF$29]*[.$Z$5]*MAGNET([.AF$24]+[.$BB95])+[.AG$29]*[.$Z$5]*MAGNET([.AG$24]+[.$BB95])+[.D$29]*[.$Z$5]*MAGNET([.D$24]+[.$BB95])+[.AH$29]*[.$Z$5]*MAGNET([.AH$24]+[.BB95]) +[.AI$29]*[.$Z$5]*MAGNET([.AI$24]+[.BB95]) +[.AJ$29]*[.$Z$5]*MAGNET([.AJ$24]+[.BB95]) +[.AK$29]*[.$Z$5]*MAGNET([.AK$24]+[.BB95]) +[.AL$29]*[.$Z$5]*MAGNET([.AL$24]+[.BB95]) +[.AM$29]*[.$Z$5]*MAGNET([.AM$24]+[.BB95]) +[.AN$29]*[.$Z$5]*MAGNET([.AN$24]+[.BB95]) +[.AO$29]*[.$Z$5]*MAGNET([.AO$24]+[.BB95]) +[.AP$29]*[.$Z$5]*MAGNET([.AP$24]+[.$BB95])&#10;+[.AQ$29]*[.$Z$5]*MAGNET([.AQ$24]+[.$BB95])&#10;+[.AR$29]*[.$Z$5]*MAGNET([.AR$24]+[.$BB95])&#10;+[.AS$29]*[.$Z$5]*MAGNET([.AS$24]+[.$BB95])&#10;+[.AT$29]*[.$Z$5]*MAGNET([.AT$24]+[.$BB95])&#10;+[.AU$29]*[.$Z$5]*MAGNET([.AU$24]+[.$BB95])&#10;+[.AV$29]*[.$Z$5]*MAGNET([.AV$24]+[.$BB95])&#10;+[.AW$29]*[.$Z$5]*MAGNET([.AW$24]+[.$BB95])&#10;+[.AX$29]*[.$Z$5]*MAGNET([.AX$24]+[.$BB95])&#10;+[.AY$29]*[.$Z$5]*MAGNET([.AY$24]+[.$BB95]) +RAND()*[.$BG$13]" office:value-type="float" office:value="38.6498109934395" calcext:value-type="float">
            <text:p>38.6498109934395</text:p>
          </table:table-cell>
          <table:table-cell table:style-name="ce71" table:formula="of:=[.E$30]*[.$Z$5]*MAGNET([.E$24]+[.$BB95])+[.F$30]*[.$Z$5]*MAGNET([.F$24]+[.$BB95])+[.G$30]*[.$Z$5]*MAGNET([.G$24]+[.$BB95])+[.H$30]*[.$Z$5]*MAGNET([.H$24]+[.$BB95])+[.I$30]*[.$Z$5]*MAGNET([.I$24]+[.$BB95])+[.J$30]*[.$Z$5]*MAGNET([.J$24]+[.$BB95])+[.K$30]*[.$Z$5]*MAGNET([.K$24]+[.$BB95])+[.L$30]*[.$Z$5]*MAGNET([.L$24]+[.$BB95])+[.M$30]*[.$Z$5]*MAGNET([.M$24]+[.$BB95])+[.N$30]*[.$Z$5]*MAGNET([.N$24]+[.$BB95])+[.O$30]*[.$Z$5]*MAGNET([.O$24]+[.$BB95])+[.P$30]*[.$Z$5]*MAGNET([.P$24]+[.$BB95])+[.Q$30]*[.$Z$5]*MAGNET([.Q$24]+[.$BB95])+[.R$30]*[.$Z$5]*MAGNET([.R$24]+[.$BB95])+[.S$30]*[.$Z$5]*MAGNET([.S$24]+[.$BB95])+[.T$30]*[.$Z$5]*MAGNET([.T$24]+[.$BB95])+[.U$30]*[.$Z$5]*MAGNET([.U$24]+[.$BB95])+[.V$30]*[.$Z$5]*MAGNET([.V$24]+[.$BB95])+[.W$30]*[.$Z$5]*MAGNET([.W$24]+[.$BB95])+[.X$30]*[.$Z$5]*MAGNET([.X$24]+[.$BB95])+[.Y$30]*[.$Z$5]*MAGNET([.Y$24]+[.$BB95])+[.Z$30]*[.$Z$5]*MAGNET([.Z$24]+[.$BB95])+[.AA$30]*[.$Z$5]*MAGNET([.AA$24]+[.$BB95])+[.AB$30]*[.$Z$5]*MAGNET([.AB$24]+[.$BB95])+[.AC$30]*[.$Z$5]*MAGNET([.AC$24]+[.$BB95])+[.AD$30]*[.$Z$5]*MAGNET([.AD$24]+[.$BB95])+[.AE$30]*[.$Z$5]*MAGNET([.AE$24]+[.$BB95])+[.AF$30]*[.$Z$5]*MAGNET([.AF$24]+[.$BB95])+[.AG$30]*[.$Z$5]*MAGNET([.AG$24]+[.$BB95])+[.D$30]*[.$Z$5]*MAGNET([.D$24]+[.$BB95])+[.AH$30]*[.$Z$5]*MAGNET([.AH$24]+[.BB95]) +[.AI$30]*[.$Z$5]*MAGNET([.AI$24]+[.BB95]) +[.AJ$30]*[.$Z$5]*MAGNET([.AJ$24]+[.BB95]) +[.AK$30]*[.$Z$5]*MAGNET([.AK$24]+[.BB95]) +[.AL$30]*[.$Z$5]*MAGNET([.AL$24]+[.BB95]) +[.AM$30]*[.$Z$5]*MAGNET([.AM$24]+[.BB95]) +[.AN$30]*[.$Z$5]*MAGNET([.AN$24]+[.BB95]) +[.AO$30]*[.$Z$5]*MAGNET([.AO$24]+[.BB95]) +[.AP$30]*[.$Z$5]*MAGNET([.AP$24]+[.$BB95])&#10;+[.AQ$30]*[.$Z$5]*MAGNET([.AQ$24]+[.$BB95])&#10;+[.AR$30]*[.$Z$5]*MAGNET([.AR$24]+[.$BB95])&#10;+[.AS$30]*[.$Z$5]*MAGNET([.AS$24]+[.$BB95])&#10;+[.AT$30]*[.$Z$5]*MAGNET([.AT$24]+[.$BB95])&#10;+[.AU$30]*[.$Z$5]*MAGNET([.AU$24]+[.$BB95])&#10;+[.AV$30]*[.$Z$5]*MAGNET([.AV$24]+[.$BB95])&#10;+[.AW$30]*[.$Z$5]*MAGNET([.AW$24]+[.$BB95])&#10;+[.AX$30]*[.$Z$5]*MAGNET([.AX$24]+[.$BB95])&#10;+[.AY$30]*[.$Z$5]*MAGNET([.AY$24]+[.$BB95]) +RAND()*[.$BH$13]" office:value-type="float" office:value="0" calcext:value-type="float">
            <text:p>0</text:p>
          </table:table-cell>
          <table:table-cell table:style-name="ce71" table:formula="of:=[.E$31]*[.$Z$5]*MAGNET([.E$24]+[.$BB95])+[.F$31]*[.$Z$5]*MAGNET([.F$24]+[.$BB95])+[.G$31]*[.$Z$5]*MAGNET([.G$24]+[.$BB95])+[.H$31]*[.$Z$5]*MAGNET([.H$24]+[.$BB95])+[.I$31]*[.$Z$5]*MAGNET([.I$24]+[.$BB95])+[.J$31]*[.$Z$5]*MAGNET([.J$24]+[.$BB95])+[.K$31]*[.$Z$5]*MAGNET([.K$24]+[.$BB95])+[.L$31]*[.$Z$5]*MAGNET([.L$24]+[.$BB95])+[.M$31]*[.$Z$5]*MAGNET([.M$24]+[.$BB95])+[.N$31]*[.$Z$5]*MAGNET([.N$24]+[.$BB95])+[.O$31]*[.$Z$5]*MAGNET([.O$24]+[.$BB95])+[.P$31]*[.$Z$5]*MAGNET([.P$24]+[.$BB95])+[.Q$31]*[.$Z$5]*MAGNET([.Q$24]+[.$BB95])+[.R$31]*[.$Z$5]*MAGNET([.R$24]+[.$BB95])+[.S$31]*[.$Z$5]*MAGNET([.S$24]+[.$BB95])+[.T$31]*[.$Z$5]*MAGNET([.T$24]+[.$BB95])+[.U$31]*[.$Z$5]*MAGNET([.U$24]+[.$BB95])+[.V$31]*[.$Z$5]*MAGNET([.V$24]+[.$BB95])+[.W$31]*[.$Z$5]*MAGNET([.W$24]+[.$BB95])+[.X$31]*[.$Z$5]*MAGNET([.X$24]+[.$BB95])+[.Y$31]*[.$Z$5]*MAGNET([.Y$24]+[.$BB95])+[.Z$31]*[.$Z$5]*MAGNET([.Z$24]+[.$BB95])+[.AA$31]*[.$Z$5]*MAGNET([.AA$24]+[.$BB95])+[.AB$31]*[.$Z$5]*MAGNET([.AB$24]+[.$BB95])+[.AC$31]*[.$Z$5]*MAGNET([.AC$24]+[.$BB95])+[.AD$31]*[.$Z$5]*MAGNET([.AD$24]+[.$BB95])+[.AE$31]*[.$Z$5]*MAGNET([.AE$24]+[.$BB95])+[.AF$31]*[.$Z$5]*MAGNET([.AF$24]+[.$BB95])+[.AG$31]*[.$Z$5]*MAGNET([.AG$24]+[.$BB95])+[.D$31]*[.$Z$5]*MAGNET([.D$24]+[.$BB95])+[.AH$31]*[.$Z$5]*MAGNET([.AH$24]+[.BB95]) +[.AI$31]*[.$Z$5]*MAGNET([.AI$24]+[.BB95]) +[.AJ$31]*[.$Z$5]*MAGNET([.AJ$24]+[.BB95]) +[.AK$31]*[.$Z$5]*MAGNET([.AK$24]+[.BB95]) +[.AL$31]*[.$Z$5]*MAGNET([.AL$24]+[.BB95]) +[.AM$31]*[.$Z$5]*MAGNET([.AM$24]+[.BB95]) +[.AN$31]*[.$Z$5]*MAGNET([.AN$24]+[.BB95]) +[.AO$31]*[.$Z$5]*MAGNET([.AO$24]+[.BB95]) +[.AP$31]*[.$Z$5]*MAGNET([.AP$24]+[.$BB95])&#10;+[.AQ$31]*[.$Z$5]*MAGNET([.AQ$24]+[.$BB95])&#10;+[.AR$31]*[.$Z$5]*MAGNET([.AR$24]+[.$BB95])&#10;+[.AS$31]*[.$Z$5]*MAGNET([.AS$24]+[.$BB95])&#10;+[.AT$31]*[.$Z$5]*MAGNET([.AT$24]+[.$BB95])&#10;+[.AU$31]*[.$Z$5]*MAGNET([.AU$24]+[.$BB95])&#10;+[.AV$31]*[.$Z$5]*MAGNET([.AV$24]+[.$BB95])&#10;+[.AW$31]*[.$Z$5]*MAGNET([.AW$24]+[.$BB95])&#10;+[.AX$31]*[.$Z$5]*MAGNET([.AX$24]+[.$BB95])&#10;+[.AY$31]*[.$Z$5]*MAGNET([.AY$24]+[.$BB95]) +RAND()*[.$BI$13]" office:value-type="float" office:value="0" calcext:value-type="float">
            <text:p>0</text:p>
          </table:table-cell>
          <table:table-cell table:style-name="ce71" table:formula="of:=[.E$32]*[.$Z$5]*MAGNET([.E$24]+[.$BB95])+[.F$32]*[.$Z$5]*MAGNET([.F$24]+[.$BB95])+[.G$32]*[.$Z$5]*MAGNET([.G$24]+[.$BB95])+[.H$32]*[.$Z$5]*MAGNET([.H$24]+[.$BB95])+[.I$32]*[.$Z$5]*MAGNET([.I$24]+[.$BB95])+[.J$32]*[.$Z$5]*MAGNET([.J$24]+[.$BB95])+[.K$32]*[.$Z$5]*MAGNET([.K$24]+[.$BB95])+[.L$32]*[.$Z$5]*MAGNET([.L$24]+[.$BB95])+[.M$32]*[.$Z$5]*MAGNET([.M$24]+[.$BB95])+[.N$32]*[.$Z$5]*MAGNET([.N$24]+[.$BB95])+[.O$32]*[.$Z$5]*MAGNET([.O$24]+[.$BB95])+[.P$32]*[.$Z$5]*MAGNET([.P$24]+[.$BB95])+[.Q$32]*[.$Z$5]*MAGNET([.Q$24]+[.$BB95])+[.R$32]*[.$Z$5]*MAGNET([.R$24]+[.$BB95])+[.S$32]*[.$Z$5]*MAGNET([.S$24]+[.$BB95])+[.T$32]*[.$Z$5]*MAGNET([.T$24]+[.$BB95])+[.U$32]*[.$Z$5]*MAGNET([.U$24]+[.$BB95])+[.V$32]*[.$Z$5]*MAGNET([.V$24]+[.$BB95])+[.W$32]*[.$Z$5]*MAGNET([.W$24]+[.$BB95])+[.X$32]*[.$Z$5]*MAGNET([.X$24]+[.$BB95])+[.Y$32]*[.$Z$5]*MAGNET([.Y$24]+[.$BB95])+[.Z$32]*[.$Z$5]*MAGNET([.Z$24]+[.$BB95])+[.AA$32]*[.$Z$5]*MAGNET([.AA$24]+[.$BB95])+[.AB$32]*[.$Z$5]*MAGNET([.AB$24]+[.$BB95])+[.AC$32]*[.$Z$5]*MAGNET([.AC$24]+[.$BB95])+[.AD$32]*[.$Z$5]*MAGNET([.AD$24]+[.$BB95])+[.AE$32]*[.$Z$5]*MAGNET([.AE$24]+[.$BB95])+[.AF$32]*[.$Z$5]*MAGNET([.AF$24]+[.$BB95])+[.AG$32]*[.$Z$5]*MAGNET([.AG$24]+[.$BB95])+[.D$32]*[.$Z$5]*MAGNET([.D$24]+[.$BB95])+[.AH$32]*[.$Z$5]*MAGNET([.AH$24]+[.BB95]) +[.AI$32]*[.$Z$5]*MAGNET([.AI$24]+[.BB95]) +[.AJ$32]*[.$Z$5]*MAGNET([.AJ$24]+[.BB95]) +[.AK$32]*[.$Z$5]*MAGNET([.AK$24]+[.BB95]) +[.AL$32]*[.$Z$5]*MAGNET([.AL$24]+[.BB95]) +[.AM$32]*[.$Z$5]*MAGNET([.AM$24]+[.BB95]) +[.AN$32]*[.$Z$5]*MAGNET([.AN$24]+[.BB95]) +[.AO$32]*[.$Z$5]*MAGNET([.AO$24]+[.BB95]) +[.AP$32]*[.$Z$5]*MAGNET([.AP$24]+[.$BB95])&#10;+[.AQ$32]*[.$Z$5]*MAGNET([.AQ$24]+[.$BB95])&#10;+[.AR$32]*[.$Z$5]*MAGNET([.AR$24]+[.$BB95])&#10;+[.AS$32]*[.$Z$5]*MAGNET([.AS$24]+[.$BB95])&#10;+[.AT$32]*[.$Z$5]*MAGNET([.AT$24]+[.$BB95])&#10;+[.AU$32]*[.$Z$5]*MAGNET([.AU$24]+[.$BB95])&#10;+[.AV$32]*[.$Z$5]*MAGNET([.AV$24]+[.$BB95])&#10;+[.AW$32]*[.$Z$5]*MAGNET([.AW$24]+[.$BB95])&#10;+[.AX$32]*[.$Z$5]*MAGNET([.AX$24]+[.$BB95])&#10;+[.AY$32]*[.$Z$5]*MAGNET([.AY$24]+[.$BB9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5]+0.002" office:value-type="float" office:value="0.162" calcext:value-type="float">
            <text:p>0.162</text:p>
          </table:table-cell>
          <table:table-cell table:formula="of:=[.BA96]*[.$D$6]" office:value-type="float" office:value="8.14300815810475" calcext:value-type="float">
            <text:p>8.143</text:p>
          </table:table-cell>
          <table:table-cell table:formula="of:=[.D$25]*[.$Z$5]*MAGNET([.D$24]+[.BB96])+[.E$25]*[.$Z$5]*MAGNET([.E$24]+[.BB96])+[.F$25]*[.$Z$5]*MAGNET([.F$24]+[.BB96])+[.G$25]*[.$Z$5]*MAGNET([.G$24]+[.BB96])+[.H$25]*[.$Z$5]*MAGNET([.H$24]+[.BB96])+[.I$25]*[.$Z$5]*MAGNET([.I$24]+[.BB96])+[.J$25]*[.$Z$5]*MAGNET([.J$24]+[.BB96])+[.K$25]*[.$Z$5]*MAGNET([.K$24]+[.BB96])+[.L$25]*[.$Z$5]*MAGNET([.L$24]+[.BB96])+[.M$25]*[.$Z$5]*MAGNET([.M$24]+[.BB96])+[.N$25]*[.$Z$5]*MAGNET([.N$24]+[.BB96])+[.O$25]*[.$Z$5]*MAGNET([.O$24]+[.BB96])+[.P$25]*[.$Z$5]*MAGNET([.P$24]+[.BB96])+[.Q$25]*[.$Z$5]*MAGNET([.Q$24]+[.BB96])+[.R$25]*[.$Z$5]*MAGNET([.R$24]+[.BB96])+[.S$25]*[.$Z$5]*MAGNET([.S$24]+[.BB96])+[.T$25]*[.$Z$5]*MAGNET([.T$24]+[.BB96])+[.U$25]*[.$Z$5]*MAGNET([.U$24]+[.BB96])+[.V$25]*[.$Z$5]*MAGNET([.V$24]+[.BB96])+[.W$25]*[.$Z$5]*MAGNET([.W$24]+[.BB96])+[.X$25]*[.$Z$5]*MAGNET([.X$24]+[.BB96])+[.Y$25]*[.$Z$5]*MAGNET([.Y$24]+[.BB96])+[.Z$25]*[.$Z$5]*MAGNET([.Z$24]+[.BB96])+[.AA$25]*[.$Z$5]*MAGNET([.AA$24]+[.BB96])+[.AB$25]*[.$Z$5]*MAGNET([.AB$24]+[.BB96])+[.AC$25]*[.$Z$5]*MAGNET([.AC$24]+[.BB96])+[.AD$25]*[.$Z$5]*MAGNET([.AD$24]+[.BB96])+[.AE$25]*[.$Z$5]*MAGNET([.AE$24]+[.BB96])+[.AF$25]*[.$Z$5]*MAGNET([.AF$24]+[.BB96])+[.AG$25]*[.$Z$5]*MAGNET([.AG$24]+[.BB96])+[.AH$25]*[.$Z$5]*MAGNET([.AH$24]+[.BB96]) +[.AI$25]*[.$Z$5]*MAGNET([.AI$24]+[.BB96]) +[.AJ$25]*[.$Z$5]*MAGNET([.AJ$24]+[.BB96]) +[.AK$25]*[.$Z$5]*MAGNET([.AK$24]+[.BB96]) +[.AL$25]*[.$Z$5]*MAGNET([.AL$24]+[.BB96]) +[.AM$25]*[.$Z$5]*MAGNET([.AM$24]+[.BB96]) +[.AN$25]*[.$Z$5]*MAGNET([.AN$24]+[.BB96]) +[.AO$25]*[.$Z$5]*MAGNET([.AO$24]+[.BB96])+RAND()*[.$BC$13]+[.AP$25]*[.$Z$5]*MAGNET([.AP$24]+[.BB96])&#10;+[.AQ$25]*[.$Z$5]*MAGNET([.AQ$24]+[.BB96])&#10;+[.AR$25]*[.$Z$5]*MAGNET([.AR$24]+[.BB96])&#10;+[.AS$25]*[.$Z$5]*MAGNET([.AS$24]+[.BB96])&#10;+[.AT$25]*[.$Z$5]*MAGNET([.AT$24]+[.BB96])&#10;+[.AU$25]*[.$Z$5]*MAGNET([.AU$24]+[.BB96])&#10;+[.AV$25]*[.$Z$5]*MAGNET([.AV$24]+[.BB96])&#10;+[.AW$25]*[.$Z$5]*MAGNET([.AW$24]+[.BB96])&#10;+[.AX$25]*[.$Z$5]*MAGNET([.AX$24]+[.BB96])&#10;+[.AY$25]*[.$Z$5]*MAGNET([.AY$24]+[.BB96])" office:value-type="float" office:value="122.187012775881" calcext:value-type="float">
            <text:p>122.19</text:p>
          </table:table-cell>
          <table:table-cell table:style-name="ce70" table:formula="of:=[.E$26]*[.$Z$5]*MAGNET([.E$24]+[.$BB96])+[.F$26]*[.$Z$5]*MAGNET([.F$24]+[.$BB96])+[.G$26]*[.$Z$5]*MAGNET([.G$24]+[.$BB96])+[.H$26]*[.$Z$5]*MAGNET([.H$24]+[.$BB96])+[.I$26]*[.$Z$5]*MAGNET([.I$24]+[.$BB96])+[.J$26]*[.$Z$5]*MAGNET([.J$24]+[.$BB96])+[.K$26]*[.$Z$5]*MAGNET([.K$24]+[.$BB96])+[.L$26]*[.$Z$5]*MAGNET([.L$24]+[.$BB96])+[.M$26]*[.$Z$5]*MAGNET([.M$24]+[.$BB96])+[.N$26]*[.$Z$5]*MAGNET([.N$24]+[.$BB96])+[.O$26]*[.$Z$5]*MAGNET([.O$24]+[.$BB96])+[.P$26]*[.$Z$5]*MAGNET([.P$24]+[.$BB96])+[.Q$26]*[.$Z$5]*MAGNET([.Q$24]+[.$BB96])+[.R$26]*[.$Z$5]*MAGNET([.R$24]+[.$BB96])+[.S$26]*[.$Z$5]*MAGNET([.S$24]+[.$BB96])+[.T$26]*[.$Z$5]*MAGNET([.T$24]+[.$BB96])+[.U$26]*[.$Z$5]*MAGNET([.U$24]+[.$BB96])+[.V$26]*[.$Z$5]*MAGNET([.V$24]+[.$BB96])+[.W$26]*[.$Z$5]*MAGNET([.W$24]+[.$BB96])+[.X$26]*[.$Z$5]*MAGNET([.X$24]+[.$BB96])+[.Y$26]*[.$Z$5]*MAGNET([.Y$24]+[.$BB96])+[.Z$26]*[.$Z$5]*MAGNET([.Z$24]+[.$BB96])+[.AA$26]*[.$Z$5]*MAGNET([.AA$24]+[.$BB96])+[.AB$26]*[.$Z$5]*MAGNET([.AB$24]+[.$BB96])+[.AC$26]*[.$Z$5]*MAGNET([.AC$24]+[.$BB96])+[.AD$26]*[.$Z$5]*MAGNET([.AD$24]+[.$BB96])+[.AE$26]*[.$Z$5]*MAGNET([.AE$24]+[.$BB96])+[.AF$26]*[.$Z$5]*MAGNET([.AF$24]+[.$BB96])+[.AG$26]*[.$Z$5]*MAGNET([.AG$24]+[.$BB96])+[.D$26]*[.$Z$5]*MAGNET([.D$24]+[.$BB96])+[.AH$26]*[.$Z$5]*MAGNET([.AH$24]+[.BB96]) +[.AI$26]*[.$Z$5]*MAGNET([.AI$24]+[.BB96]) +[.AJ$26]*[.$Z$5]*MAGNET([.AJ$24]+[.BB96]) +[.AK$26]*[.$Z$5]*MAGNET([.AK$24]+[.BB96]) +[.AL$26]*[.$Z$5]*MAGNET([.AL$24]+[.BB96]) +[.AM$26]*[.$Z$5]*MAGNET([.AM$24]+[.BB96]) +[.AN$26]*[.$Z$5]*MAGNET([.AN$24]+[.BB96]) +[.AO$26]*[.$Z$5]*MAGNET([.AO$24]+[.BB96]) +[.AP$26]*[.$Z$5]*MAGNET([.AP$24]+[.$BB96])&#10;+[.AQ$26]*[.$Z$5]*MAGNET([.AQ$24]+[.$BB96])&#10;+[.AR$26]*[.$Z$5]*MAGNET([.AR$24]+[.$BB96])&#10;+[.AS$26]*[.$Z$5]*MAGNET([.AS$24]+[.$BB96])&#10;+[.AT$26]*[.$Z$5]*MAGNET([.AT$24]+[.$BB96])&#10;+[.AU$26]*[.$Z$5]*MAGNET([.AU$24]+[.$BB96])&#10;+[.AV$26]*[.$Z$5]*MAGNET([.AV$24]+[.$BB96])&#10;+[.AW$26]*[.$Z$5]*MAGNET([.AW$24]+[.$BB96])&#10;+[.AX$26]*[.$Z$5]*MAGNET([.AX$24]+[.$BB96])&#10;+[.AY$26]*[.$Z$5]*MAGNET([.AY$24]+[.$BB96]) +RAND()*[.$BD$13]" office:value-type="float" office:value="-47.4977738413125" calcext:value-type="float">
            <text:p>-47.50</text:p>
          </table:table-cell>
          <table:table-cell table:style-name="ce71" table:formula="of:=[.E$27]*[.$Z$5]*MAGNET([.E$24]+[.$BB96])+[.F$27]*[.$Z$5]*MAGNET([.F$24]+[.$BB96])+[.G$27]*[.$Z$5]*MAGNET([.G$24]+[.$BB96])+[.H$27]*[.$Z$5]*MAGNET([.H$24]+[.$BB96])+[.I$27]*[.$Z$5]*MAGNET([.I$24]+[.$BB96])+[.J$27]*[.$Z$5]*MAGNET([.J$24]+[.$BB96])+[.K$27]*[.$Z$5]*MAGNET([.K$24]+[.$BB96])+[.L$27]*[.$Z$5]*MAGNET([.L$24]+[.$BB96])+[.M$27]*[.$Z$5]*MAGNET([.M$24]+[.$BB96])+[.N$27]*[.$Z$5]*MAGNET([.N$24]+[.$BB96])+[.O$27]*[.$Z$5]*MAGNET([.O$24]+[.$BB96])+[.P$27]*[.$Z$5]*MAGNET([.P$24]+[.$BB96])+[.Q$27]*[.$Z$5]*MAGNET([.Q$24]+[.$BB96])+[.R$27]*[.$Z$5]*MAGNET([.R$24]+[.$BB96])+[.S$27]*[.$Z$5]*MAGNET([.S$24]+[.$BB96])+[.T$27]*[.$Z$5]*MAGNET([.T$24]+[.$BB96])+[.U$27]*[.$Z$5]*MAGNET([.U$24]+[.$BB96])+[.V$27]*[.$Z$5]*MAGNET([.V$24]+[.$BB96])+[.W$27]*[.$Z$5]*MAGNET([.W$24]+[.$BB96])+[.X$27]*[.$Z$5]*MAGNET([.X$24]+[.$BB96])+[.Y$27]*[.$Z$5]*MAGNET([.Y$24]+[.$BB96])+[.Z$27]*[.$Z$5]*MAGNET([.Z$24]+[.$BB96])+[.AA$27]*[.$Z$5]*MAGNET([.AA$24]+[.$BB96])+[.AB$27]*[.$Z$5]*MAGNET([.AB$24]+[.$BB96])+[.AC$27]*[.$Z$5]*MAGNET([.AC$24]+[.$BB96])+[.AD$27]*[.$Z$5]*MAGNET([.AD$24]+[.$BB96])+[.AE$27]*[.$Z$5]*MAGNET([.AE$24]+[.$BB96])+[.AF$27]*[.$Z$5]*MAGNET([.AF$24]+[.$BB96])+[.AG$27]*[.$Z$5]*MAGNET([.AG$24]+[.$BB96])+[.D$27]*[.$Z$5]*MAGNET([.D$24]+[.$BB96])+[.AH$27]*[.$Z$5]*MAGNET([.AH$24]+[.BB96]) +[.AI$27]*[.$Z$5]*MAGNET([.AI$24]+[.BB96]) +[.AJ$27]*[.$Z$5]*MAGNET([.AJ$24]+[.BB96]) +[.AK$27]*[.$Z$5]*MAGNET([.AK$24]+[.BB96]) +[.AL$27]*[.$Z$5]*MAGNET([.AL$24]+[.BB96]) +[.AM$27]*[.$Z$5]*MAGNET([.AM$24]+[.BB96]) +[.AN$27]*[.$Z$5]*MAGNET([.AN$24]+[.BB96]) +[.AO$27]*[.$Z$5]*MAGNET([.AO$24]+[.BB96]) +[.AP$27]*[.$Z$5]*MAGNET([.AP$24]+[.$BB96])&#10;+[.AQ$27]*[.$Z$5]*MAGNET([.AQ$24]+[.$BB96])&#10;+[.AR$27]*[.$Z$5]*MAGNET([.AR$24]+[.$BB96])&#10;+[.AS$27]*[.$Z$5]*MAGNET([.AS$24]+[.$BB96])&#10;+[.AT$27]*[.$Z$5]*MAGNET([.AT$24]+[.$BB96])&#10;+[.AU$27]*[.$Z$5]*MAGNET([.AU$24]+[.$BB96])&#10;+[.AV$27]*[.$Z$5]*MAGNET([.AV$24]+[.$BB96])&#10;+[.AW$27]*[.$Z$5]*MAGNET([.AW$24]+[.$BB96])&#10;+[.AX$27]*[.$Z$5]*MAGNET([.AX$24]+[.$BB96])&#10;+[.AY$27]*[.$Z$5]*MAGNET([.AY$24]+[.$BB96]) +RAND()*[.$BE$13]" office:value-type="float" office:value="-89.7838686331938" calcext:value-type="float">
            <text:p>-89.7838686331938</text:p>
          </table:table-cell>
          <table:table-cell table:style-name="ce71" table:formula="of:=[.E$28]*[.$Z$5]*MAGNET([.E$24]+[.$BB96])+[.F$28]*[.$Z$5]*MAGNET([.F$24]+[.$BB96])+[.G$28]*[.$Z$5]*MAGNET([.G$24]+[.$BB96])+[.H$28]*[.$Z$5]*MAGNET([.H$24]+[.$BB96])+[.I$28]*[.$Z$5]*MAGNET([.I$24]+[.$BB96])+[.J$28]*[.$Z$5]*MAGNET([.J$24]+[.$BB96])+[.K$28]*[.$Z$5]*MAGNET([.K$24]+[.$BB96])+[.L$28]*[.$Z$5]*MAGNET([.L$24]+[.$BB96])+[.M$28]*[.$Z$5]*MAGNET([.M$24]+[.$BB96])+[.N$28]*[.$Z$5]*MAGNET([.N$24]+[.$BB96])+[.O$28]*[.$Z$5]*MAGNET([.O$24]+[.$BB96])+[.P$28]*[.$Z$5]*MAGNET([.P$24]+[.$BB96])+[.Q$28]*[.$Z$5]*MAGNET([.Q$24]+[.$BB96])+[.R$28]*[.$Z$5]*MAGNET([.R$24]+[.$BB96])+[.S$28]*[.$Z$5]*MAGNET([.S$24]+[.$BB96])+[.T$28]*[.$Z$5]*MAGNET([.T$24]+[.$BB96])+[.U$28]*[.$Z$5]*MAGNET([.U$24]+[.$BB96])+[.V$28]*[.$Z$5]*MAGNET([.V$24]+[.$BB96])+[.W$28]*[.$Z$5]*MAGNET([.W$24]+[.$BB96])+[.X$28]*[.$Z$5]*MAGNET([.X$24]+[.$BB96])+[.Y$28]*[.$Z$5]*MAGNET([.Y$24]+[.$BB96])+[.Z$28]*[.$Z$5]*MAGNET([.Z$24]+[.$BB96])+[.AA$28]*[.$Z$5]*MAGNET([.AA$24]+[.$BB96])+[.AB$28]*[.$Z$5]*MAGNET([.AB$24]+[.$BB96])+[.AC$28]*[.$Z$5]*MAGNET([.AC$24]+[.$BB96])+[.AD$28]*[.$Z$5]*MAGNET([.AD$24]+[.$BB96])+[.AE$28]*[.$Z$5]*MAGNET([.AE$24]+[.$BB96])+[.AF$28]*[.$Z$5]*MAGNET([.AF$24]+[.$BB96])+[.AG$28]*[.$Z$5]*MAGNET([.AG$24]+[.$BB96])+[.D$28]*[.$Z$5]*MAGNET([.D$24]+[.$BB96])+[.AH$28]*[.$Z$5]*MAGNET([.AH$24]+[.BB96]) +[.AI$28]*[.$Z$5]*MAGNET([.AI$24]+[.BB96]) +[.AJ$28]*[.$Z$5]*MAGNET([.AJ$24]+[.BB96]) +[.AK$28]*[.$Z$5]*MAGNET([.AK$24]+[.BB96]) +[.AL$28]*[.$Z$5]*MAGNET([.AL$24]+[.BB96]) +[.AM$28]*[.$Z$5]*MAGNET([.AM$24]+[.BB96]) +[.AN$28]*[.$Z$5]*MAGNET([.AN$24]+[.BB96]) +[.AO$28]*[.$Z$5]*MAGNET([.AO$24]+[.BB96]) +[.AP$28]*[.$Z$5]*MAGNET([.AP$24]+[.$BB96])&#10;+[.AQ$28]*[.$Z$5]*MAGNET([.AQ$24]+[.$BB96])&#10;+[.AR$28]*[.$Z$5]*MAGNET([.AR$24]+[.$BB96])&#10;+[.AS$28]*[.$Z$5]*MAGNET([.AS$24]+[.$BB96])&#10;+[.AT$28]*[.$Z$5]*MAGNET([.AT$24]+[.$BB96])&#10;+[.AU$28]*[.$Z$5]*MAGNET([.AU$24]+[.$BB96])&#10;+[.AV$28]*[.$Z$5]*MAGNET([.AV$24]+[.$BB96])&#10;+[.AW$28]*[.$Z$5]*MAGNET([.AW$24]+[.$BB96])&#10;+[.AX$28]*[.$Z$5]*MAGNET([.AX$24]+[.$BB96])&#10;+[.AY$28]*[.$Z$5]*MAGNET([.AY$24]+[.$BB96]) +RAND()*[.$BF$13]" office:value-type="float" office:value="-8.63613437992832" calcext:value-type="float">
            <text:p>-8.63613437992832</text:p>
          </table:table-cell>
          <table:table-cell table:style-name="ce71" table:formula="of:=[.E$29]*[.$Z$5]*MAGNET([.E$24]+[.$BB96])+[.F$29]*[.$Z$5]*MAGNET([.F$24]+[.$BB96])+[.G$29]*[.$Z$5]*MAGNET([.G$24]+[.$BB96])+[.H$29]*[.$Z$5]*MAGNET([.H$24]+[.$BB96])+[.I$29]*[.$Z$5]*MAGNET([.I$24]+[.$BB96])+[.J$29]*[.$Z$5]*MAGNET([.J$24]+[.$BB96])+[.K$29]*[.$Z$5]*MAGNET([.K$24]+[.$BB96])+[.L$29]*[.$Z$5]*MAGNET([.L$24]+[.$BB96])+[.M$29]*[.$Z$5]*MAGNET([.M$24]+[.$BB96])+[.N$29]*[.$Z$5]*MAGNET([.N$24]+[.$BB96])+[.O$29]*[.$Z$5]*MAGNET([.O$24]+[.$BB96])+[.P$29]*[.$Z$5]*MAGNET([.P$24]+[.$BB96])+[.Q$29]*[.$Z$5]*MAGNET([.Q$24]+[.$BB96])+[.R$29]*[.$Z$5]*MAGNET([.R$24]+[.$BB96])+[.S$29]*[.$Z$5]*MAGNET([.S$24]+[.$BB96])+[.T$29]*[.$Z$5]*MAGNET([.T$24]+[.$BB96])+[.U$29]*[.$Z$5]*MAGNET([.U$24]+[.$BB96])+[.V$29]*[.$Z$5]*MAGNET([.V$24]+[.$BB96])+[.W$29]*[.$Z$5]*MAGNET([.W$24]+[.$BB96])+[.X$29]*[.$Z$5]*MAGNET([.X$24]+[.$BB96])+[.Y$29]*[.$Z$5]*MAGNET([.Y$24]+[.$BB96])+[.Z$29]*[.$Z$5]*MAGNET([.Z$24]+[.$BB96])+[.AA$29]*[.$Z$5]*MAGNET([.AA$24]+[.$BB96])+[.AB$29]*[.$Z$5]*MAGNET([.AB$24]+[.$BB96])+[.AC$29]*[.$Z$5]*MAGNET([.AC$24]+[.$BB96])+[.AD$29]*[.$Z$5]*MAGNET([.AD$24]+[.$BB96])+[.AE$29]*[.$Z$5]*MAGNET([.AE$24]+[.$BB96])+[.AF$29]*[.$Z$5]*MAGNET([.AF$24]+[.$BB96])+[.AG$29]*[.$Z$5]*MAGNET([.AG$24]+[.$BB96])+[.D$29]*[.$Z$5]*MAGNET([.D$24]+[.$BB96])+[.AH$29]*[.$Z$5]*MAGNET([.AH$24]+[.BB96]) +[.AI$29]*[.$Z$5]*MAGNET([.AI$24]+[.BB96]) +[.AJ$29]*[.$Z$5]*MAGNET([.AJ$24]+[.BB96]) +[.AK$29]*[.$Z$5]*MAGNET([.AK$24]+[.BB96]) +[.AL$29]*[.$Z$5]*MAGNET([.AL$24]+[.BB96]) +[.AM$29]*[.$Z$5]*MAGNET([.AM$24]+[.BB96]) +[.AN$29]*[.$Z$5]*MAGNET([.AN$24]+[.BB96]) +[.AO$29]*[.$Z$5]*MAGNET([.AO$24]+[.BB96]) +[.AP$29]*[.$Z$5]*MAGNET([.AP$24]+[.$BB96])&#10;+[.AQ$29]*[.$Z$5]*MAGNET([.AQ$24]+[.$BB96])&#10;+[.AR$29]*[.$Z$5]*MAGNET([.AR$24]+[.$BB96])&#10;+[.AS$29]*[.$Z$5]*MAGNET([.AS$24]+[.$BB96])&#10;+[.AT$29]*[.$Z$5]*MAGNET([.AT$24]+[.$BB96])&#10;+[.AU$29]*[.$Z$5]*MAGNET([.AU$24]+[.$BB96])&#10;+[.AV$29]*[.$Z$5]*MAGNET([.AV$24]+[.$BB96])&#10;+[.AW$29]*[.$Z$5]*MAGNET([.AW$24]+[.$BB96])&#10;+[.AX$29]*[.$Z$5]*MAGNET([.AX$24]+[.$BB96])&#10;+[.AY$29]*[.$Z$5]*MAGNET([.AY$24]+[.$BB96]) +RAND()*[.$BG$13]" office:value-type="float" office:value="33.4531464348148" calcext:value-type="float">
            <text:p>33.4531464348148</text:p>
          </table:table-cell>
          <table:table-cell table:style-name="ce71" table:formula="of:=[.E$30]*[.$Z$5]*MAGNET([.E$24]+[.$BB96])+[.F$30]*[.$Z$5]*MAGNET([.F$24]+[.$BB96])+[.G$30]*[.$Z$5]*MAGNET([.G$24]+[.$BB96])+[.H$30]*[.$Z$5]*MAGNET([.H$24]+[.$BB96])+[.I$30]*[.$Z$5]*MAGNET([.I$24]+[.$BB96])+[.J$30]*[.$Z$5]*MAGNET([.J$24]+[.$BB96])+[.K$30]*[.$Z$5]*MAGNET([.K$24]+[.$BB96])+[.L$30]*[.$Z$5]*MAGNET([.L$24]+[.$BB96])+[.M$30]*[.$Z$5]*MAGNET([.M$24]+[.$BB96])+[.N$30]*[.$Z$5]*MAGNET([.N$24]+[.$BB96])+[.O$30]*[.$Z$5]*MAGNET([.O$24]+[.$BB96])+[.P$30]*[.$Z$5]*MAGNET([.P$24]+[.$BB96])+[.Q$30]*[.$Z$5]*MAGNET([.Q$24]+[.$BB96])+[.R$30]*[.$Z$5]*MAGNET([.R$24]+[.$BB96])+[.S$30]*[.$Z$5]*MAGNET([.S$24]+[.$BB96])+[.T$30]*[.$Z$5]*MAGNET([.T$24]+[.$BB96])+[.U$30]*[.$Z$5]*MAGNET([.U$24]+[.$BB96])+[.V$30]*[.$Z$5]*MAGNET([.V$24]+[.$BB96])+[.W$30]*[.$Z$5]*MAGNET([.W$24]+[.$BB96])+[.X$30]*[.$Z$5]*MAGNET([.X$24]+[.$BB96])+[.Y$30]*[.$Z$5]*MAGNET([.Y$24]+[.$BB96])+[.Z$30]*[.$Z$5]*MAGNET([.Z$24]+[.$BB96])+[.AA$30]*[.$Z$5]*MAGNET([.AA$24]+[.$BB96])+[.AB$30]*[.$Z$5]*MAGNET([.AB$24]+[.$BB96])+[.AC$30]*[.$Z$5]*MAGNET([.AC$24]+[.$BB96])+[.AD$30]*[.$Z$5]*MAGNET([.AD$24]+[.$BB96])+[.AE$30]*[.$Z$5]*MAGNET([.AE$24]+[.$BB96])+[.AF$30]*[.$Z$5]*MAGNET([.AF$24]+[.$BB96])+[.AG$30]*[.$Z$5]*MAGNET([.AG$24]+[.$BB96])+[.D$30]*[.$Z$5]*MAGNET([.D$24]+[.$BB96])+[.AH$30]*[.$Z$5]*MAGNET([.AH$24]+[.BB96]) +[.AI$30]*[.$Z$5]*MAGNET([.AI$24]+[.BB96]) +[.AJ$30]*[.$Z$5]*MAGNET([.AJ$24]+[.BB96]) +[.AK$30]*[.$Z$5]*MAGNET([.AK$24]+[.BB96]) +[.AL$30]*[.$Z$5]*MAGNET([.AL$24]+[.BB96]) +[.AM$30]*[.$Z$5]*MAGNET([.AM$24]+[.BB96]) +[.AN$30]*[.$Z$5]*MAGNET([.AN$24]+[.BB96]) +[.AO$30]*[.$Z$5]*MAGNET([.AO$24]+[.BB96]) +[.AP$30]*[.$Z$5]*MAGNET([.AP$24]+[.$BB96])&#10;+[.AQ$30]*[.$Z$5]*MAGNET([.AQ$24]+[.$BB96])&#10;+[.AR$30]*[.$Z$5]*MAGNET([.AR$24]+[.$BB96])&#10;+[.AS$30]*[.$Z$5]*MAGNET([.AS$24]+[.$BB96])&#10;+[.AT$30]*[.$Z$5]*MAGNET([.AT$24]+[.$BB96])&#10;+[.AU$30]*[.$Z$5]*MAGNET([.AU$24]+[.$BB96])&#10;+[.AV$30]*[.$Z$5]*MAGNET([.AV$24]+[.$BB96])&#10;+[.AW$30]*[.$Z$5]*MAGNET([.AW$24]+[.$BB96])&#10;+[.AX$30]*[.$Z$5]*MAGNET([.AX$24]+[.$BB96])&#10;+[.AY$30]*[.$Z$5]*MAGNET([.AY$24]+[.$BB96]) +RAND()*[.$BH$13]" office:value-type="float" office:value="0" calcext:value-type="float">
            <text:p>0</text:p>
          </table:table-cell>
          <table:table-cell table:style-name="ce71" table:formula="of:=[.E$31]*[.$Z$5]*MAGNET([.E$24]+[.$BB96])+[.F$31]*[.$Z$5]*MAGNET([.F$24]+[.$BB96])+[.G$31]*[.$Z$5]*MAGNET([.G$24]+[.$BB96])+[.H$31]*[.$Z$5]*MAGNET([.H$24]+[.$BB96])+[.I$31]*[.$Z$5]*MAGNET([.I$24]+[.$BB96])+[.J$31]*[.$Z$5]*MAGNET([.J$24]+[.$BB96])+[.K$31]*[.$Z$5]*MAGNET([.K$24]+[.$BB96])+[.L$31]*[.$Z$5]*MAGNET([.L$24]+[.$BB96])+[.M$31]*[.$Z$5]*MAGNET([.M$24]+[.$BB96])+[.N$31]*[.$Z$5]*MAGNET([.N$24]+[.$BB96])+[.O$31]*[.$Z$5]*MAGNET([.O$24]+[.$BB96])+[.P$31]*[.$Z$5]*MAGNET([.P$24]+[.$BB96])+[.Q$31]*[.$Z$5]*MAGNET([.Q$24]+[.$BB96])+[.R$31]*[.$Z$5]*MAGNET([.R$24]+[.$BB96])+[.S$31]*[.$Z$5]*MAGNET([.S$24]+[.$BB96])+[.T$31]*[.$Z$5]*MAGNET([.T$24]+[.$BB96])+[.U$31]*[.$Z$5]*MAGNET([.U$24]+[.$BB96])+[.V$31]*[.$Z$5]*MAGNET([.V$24]+[.$BB96])+[.W$31]*[.$Z$5]*MAGNET([.W$24]+[.$BB96])+[.X$31]*[.$Z$5]*MAGNET([.X$24]+[.$BB96])+[.Y$31]*[.$Z$5]*MAGNET([.Y$24]+[.$BB96])+[.Z$31]*[.$Z$5]*MAGNET([.Z$24]+[.$BB96])+[.AA$31]*[.$Z$5]*MAGNET([.AA$24]+[.$BB96])+[.AB$31]*[.$Z$5]*MAGNET([.AB$24]+[.$BB96])+[.AC$31]*[.$Z$5]*MAGNET([.AC$24]+[.$BB96])+[.AD$31]*[.$Z$5]*MAGNET([.AD$24]+[.$BB96])+[.AE$31]*[.$Z$5]*MAGNET([.AE$24]+[.$BB96])+[.AF$31]*[.$Z$5]*MAGNET([.AF$24]+[.$BB96])+[.AG$31]*[.$Z$5]*MAGNET([.AG$24]+[.$BB96])+[.D$31]*[.$Z$5]*MAGNET([.D$24]+[.$BB96])+[.AH$31]*[.$Z$5]*MAGNET([.AH$24]+[.BB96]) +[.AI$31]*[.$Z$5]*MAGNET([.AI$24]+[.BB96]) +[.AJ$31]*[.$Z$5]*MAGNET([.AJ$24]+[.BB96]) +[.AK$31]*[.$Z$5]*MAGNET([.AK$24]+[.BB96]) +[.AL$31]*[.$Z$5]*MAGNET([.AL$24]+[.BB96]) +[.AM$31]*[.$Z$5]*MAGNET([.AM$24]+[.BB96]) +[.AN$31]*[.$Z$5]*MAGNET([.AN$24]+[.BB96]) +[.AO$31]*[.$Z$5]*MAGNET([.AO$24]+[.BB96]) +[.AP$31]*[.$Z$5]*MAGNET([.AP$24]+[.$BB96])&#10;+[.AQ$31]*[.$Z$5]*MAGNET([.AQ$24]+[.$BB96])&#10;+[.AR$31]*[.$Z$5]*MAGNET([.AR$24]+[.$BB96])&#10;+[.AS$31]*[.$Z$5]*MAGNET([.AS$24]+[.$BB96])&#10;+[.AT$31]*[.$Z$5]*MAGNET([.AT$24]+[.$BB96])&#10;+[.AU$31]*[.$Z$5]*MAGNET([.AU$24]+[.$BB96])&#10;+[.AV$31]*[.$Z$5]*MAGNET([.AV$24]+[.$BB96])&#10;+[.AW$31]*[.$Z$5]*MAGNET([.AW$24]+[.$BB96])&#10;+[.AX$31]*[.$Z$5]*MAGNET([.AX$24]+[.$BB96])&#10;+[.AY$31]*[.$Z$5]*MAGNET([.AY$24]+[.$BB96]) +RAND()*[.$BI$13]" office:value-type="float" office:value="0" calcext:value-type="float">
            <text:p>0</text:p>
          </table:table-cell>
          <table:table-cell table:style-name="ce71" table:formula="of:=[.E$32]*[.$Z$5]*MAGNET([.E$24]+[.$BB96])+[.F$32]*[.$Z$5]*MAGNET([.F$24]+[.$BB96])+[.G$32]*[.$Z$5]*MAGNET([.G$24]+[.$BB96])+[.H$32]*[.$Z$5]*MAGNET([.H$24]+[.$BB96])+[.I$32]*[.$Z$5]*MAGNET([.I$24]+[.$BB96])+[.J$32]*[.$Z$5]*MAGNET([.J$24]+[.$BB96])+[.K$32]*[.$Z$5]*MAGNET([.K$24]+[.$BB96])+[.L$32]*[.$Z$5]*MAGNET([.L$24]+[.$BB96])+[.M$32]*[.$Z$5]*MAGNET([.M$24]+[.$BB96])+[.N$32]*[.$Z$5]*MAGNET([.N$24]+[.$BB96])+[.O$32]*[.$Z$5]*MAGNET([.O$24]+[.$BB96])+[.P$32]*[.$Z$5]*MAGNET([.P$24]+[.$BB96])+[.Q$32]*[.$Z$5]*MAGNET([.Q$24]+[.$BB96])+[.R$32]*[.$Z$5]*MAGNET([.R$24]+[.$BB96])+[.S$32]*[.$Z$5]*MAGNET([.S$24]+[.$BB96])+[.T$32]*[.$Z$5]*MAGNET([.T$24]+[.$BB96])+[.U$32]*[.$Z$5]*MAGNET([.U$24]+[.$BB96])+[.V$32]*[.$Z$5]*MAGNET([.V$24]+[.$BB96])+[.W$32]*[.$Z$5]*MAGNET([.W$24]+[.$BB96])+[.X$32]*[.$Z$5]*MAGNET([.X$24]+[.$BB96])+[.Y$32]*[.$Z$5]*MAGNET([.Y$24]+[.$BB96])+[.Z$32]*[.$Z$5]*MAGNET([.Z$24]+[.$BB96])+[.AA$32]*[.$Z$5]*MAGNET([.AA$24]+[.$BB96])+[.AB$32]*[.$Z$5]*MAGNET([.AB$24]+[.$BB96])+[.AC$32]*[.$Z$5]*MAGNET([.AC$24]+[.$BB96])+[.AD$32]*[.$Z$5]*MAGNET([.AD$24]+[.$BB96])+[.AE$32]*[.$Z$5]*MAGNET([.AE$24]+[.$BB96])+[.AF$32]*[.$Z$5]*MAGNET([.AF$24]+[.$BB96])+[.AG$32]*[.$Z$5]*MAGNET([.AG$24]+[.$BB96])+[.D$32]*[.$Z$5]*MAGNET([.D$24]+[.$BB96])+[.AH$32]*[.$Z$5]*MAGNET([.AH$24]+[.BB96]) +[.AI$32]*[.$Z$5]*MAGNET([.AI$24]+[.BB96]) +[.AJ$32]*[.$Z$5]*MAGNET([.AJ$24]+[.BB96]) +[.AK$32]*[.$Z$5]*MAGNET([.AK$24]+[.BB96]) +[.AL$32]*[.$Z$5]*MAGNET([.AL$24]+[.BB96]) +[.AM$32]*[.$Z$5]*MAGNET([.AM$24]+[.BB96]) +[.AN$32]*[.$Z$5]*MAGNET([.AN$24]+[.BB96]) +[.AO$32]*[.$Z$5]*MAGNET([.AO$24]+[.BB96]) +[.AP$32]*[.$Z$5]*MAGNET([.AP$24]+[.$BB96])&#10;+[.AQ$32]*[.$Z$5]*MAGNET([.AQ$24]+[.$BB96])&#10;+[.AR$32]*[.$Z$5]*MAGNET([.AR$24]+[.$BB96])&#10;+[.AS$32]*[.$Z$5]*MAGNET([.AS$24]+[.$BB96])&#10;+[.AT$32]*[.$Z$5]*MAGNET([.AT$24]+[.$BB96])&#10;+[.AU$32]*[.$Z$5]*MAGNET([.AU$24]+[.$BB96])&#10;+[.AV$32]*[.$Z$5]*MAGNET([.AV$24]+[.$BB96])&#10;+[.AW$32]*[.$Z$5]*MAGNET([.AW$24]+[.$BB96])&#10;+[.AX$32]*[.$Z$5]*MAGNET([.AX$24]+[.$BB96])&#10;+[.AY$32]*[.$Z$5]*MAGNET([.AY$24]+[.$BB9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6]+0.002" office:value-type="float" office:value="0.164" calcext:value-type="float">
            <text:p>0.164</text:p>
          </table:table-cell>
          <table:table-cell table:formula="of:=[.BA97]*[.$D$6]" office:value-type="float" office:value="8.24353912301962" calcext:value-type="float">
            <text:p>8.244</text:p>
          </table:table-cell>
          <table:table-cell table:formula="of:=[.D$25]*[.$Z$5]*MAGNET([.D$24]+[.BB97])+[.E$25]*[.$Z$5]*MAGNET([.E$24]+[.BB97])+[.F$25]*[.$Z$5]*MAGNET([.F$24]+[.BB97])+[.G$25]*[.$Z$5]*MAGNET([.G$24]+[.BB97])+[.H$25]*[.$Z$5]*MAGNET([.H$24]+[.BB97])+[.I$25]*[.$Z$5]*MAGNET([.I$24]+[.BB97])+[.J$25]*[.$Z$5]*MAGNET([.J$24]+[.BB97])+[.K$25]*[.$Z$5]*MAGNET([.K$24]+[.BB97])+[.L$25]*[.$Z$5]*MAGNET([.L$24]+[.BB97])+[.M$25]*[.$Z$5]*MAGNET([.M$24]+[.BB97])+[.N$25]*[.$Z$5]*MAGNET([.N$24]+[.BB97])+[.O$25]*[.$Z$5]*MAGNET([.O$24]+[.BB97])+[.P$25]*[.$Z$5]*MAGNET([.P$24]+[.BB97])+[.Q$25]*[.$Z$5]*MAGNET([.Q$24]+[.BB97])+[.R$25]*[.$Z$5]*MAGNET([.R$24]+[.BB97])+[.S$25]*[.$Z$5]*MAGNET([.S$24]+[.BB97])+[.T$25]*[.$Z$5]*MAGNET([.T$24]+[.BB97])+[.U$25]*[.$Z$5]*MAGNET([.U$24]+[.BB97])+[.V$25]*[.$Z$5]*MAGNET([.V$24]+[.BB97])+[.W$25]*[.$Z$5]*MAGNET([.W$24]+[.BB97])+[.X$25]*[.$Z$5]*MAGNET([.X$24]+[.BB97])+[.Y$25]*[.$Z$5]*MAGNET([.Y$24]+[.BB97])+[.Z$25]*[.$Z$5]*MAGNET([.Z$24]+[.BB97])+[.AA$25]*[.$Z$5]*MAGNET([.AA$24]+[.BB97])+[.AB$25]*[.$Z$5]*MAGNET([.AB$24]+[.BB97])+[.AC$25]*[.$Z$5]*MAGNET([.AC$24]+[.BB97])+[.AD$25]*[.$Z$5]*MAGNET([.AD$24]+[.BB97])+[.AE$25]*[.$Z$5]*MAGNET([.AE$24]+[.BB97])+[.AF$25]*[.$Z$5]*MAGNET([.AF$24]+[.BB97])+[.AG$25]*[.$Z$5]*MAGNET([.AG$24]+[.BB97])+[.AH$25]*[.$Z$5]*MAGNET([.AH$24]+[.BB97]) +[.AI$25]*[.$Z$5]*MAGNET([.AI$24]+[.BB97]) +[.AJ$25]*[.$Z$5]*MAGNET([.AJ$24]+[.BB97]) +[.AK$25]*[.$Z$5]*MAGNET([.AK$24]+[.BB97]) +[.AL$25]*[.$Z$5]*MAGNET([.AL$24]+[.BB97]) +[.AM$25]*[.$Z$5]*MAGNET([.AM$24]+[.BB97]) +[.AN$25]*[.$Z$5]*MAGNET([.AN$24]+[.BB97]) +[.AO$25]*[.$Z$5]*MAGNET([.AO$24]+[.BB97])+RAND()*[.$BC$13]+[.AP$25]*[.$Z$5]*MAGNET([.AP$24]+[.BB97])&#10;+[.AQ$25]*[.$Z$5]*MAGNET([.AQ$24]+[.BB97])&#10;+[.AR$25]*[.$Z$5]*MAGNET([.AR$24]+[.BB97])&#10;+[.AS$25]*[.$Z$5]*MAGNET([.AS$24]+[.BB97])&#10;+[.AT$25]*[.$Z$5]*MAGNET([.AT$24]+[.BB97])&#10;+[.AU$25]*[.$Z$5]*MAGNET([.AU$24]+[.BB97])&#10;+[.AV$25]*[.$Z$5]*MAGNET([.AV$24]+[.BB97])&#10;+[.AW$25]*[.$Z$5]*MAGNET([.AW$24]+[.BB97])&#10;+[.AX$25]*[.$Z$5]*MAGNET([.AX$24]+[.BB97])&#10;+[.AY$25]*[.$Z$5]*MAGNET([.AY$24]+[.BB97])" office:value-type="float" office:value="122.483361698903" calcext:value-type="float">
            <text:p>122.48</text:p>
          </table:table-cell>
          <table:table-cell table:style-name="ce70" table:formula="of:=[.E$26]*[.$Z$5]*MAGNET([.E$24]+[.$BB97])+[.F$26]*[.$Z$5]*MAGNET([.F$24]+[.$BB97])+[.G$26]*[.$Z$5]*MAGNET([.G$24]+[.$BB97])+[.H$26]*[.$Z$5]*MAGNET([.H$24]+[.$BB97])+[.I$26]*[.$Z$5]*MAGNET([.I$24]+[.$BB97])+[.J$26]*[.$Z$5]*MAGNET([.J$24]+[.$BB97])+[.K$26]*[.$Z$5]*MAGNET([.K$24]+[.$BB97])+[.L$26]*[.$Z$5]*MAGNET([.L$24]+[.$BB97])+[.M$26]*[.$Z$5]*MAGNET([.M$24]+[.$BB97])+[.N$26]*[.$Z$5]*MAGNET([.N$24]+[.$BB97])+[.O$26]*[.$Z$5]*MAGNET([.O$24]+[.$BB97])+[.P$26]*[.$Z$5]*MAGNET([.P$24]+[.$BB97])+[.Q$26]*[.$Z$5]*MAGNET([.Q$24]+[.$BB97])+[.R$26]*[.$Z$5]*MAGNET([.R$24]+[.$BB97])+[.S$26]*[.$Z$5]*MAGNET([.S$24]+[.$BB97])+[.T$26]*[.$Z$5]*MAGNET([.T$24]+[.$BB97])+[.U$26]*[.$Z$5]*MAGNET([.U$24]+[.$BB97])+[.V$26]*[.$Z$5]*MAGNET([.V$24]+[.$BB97])+[.W$26]*[.$Z$5]*MAGNET([.W$24]+[.$BB97])+[.X$26]*[.$Z$5]*MAGNET([.X$24]+[.$BB97])+[.Y$26]*[.$Z$5]*MAGNET([.Y$24]+[.$BB97])+[.Z$26]*[.$Z$5]*MAGNET([.Z$24]+[.$BB97])+[.AA$26]*[.$Z$5]*MAGNET([.AA$24]+[.$BB97])+[.AB$26]*[.$Z$5]*MAGNET([.AB$24]+[.$BB97])+[.AC$26]*[.$Z$5]*MAGNET([.AC$24]+[.$BB97])+[.AD$26]*[.$Z$5]*MAGNET([.AD$24]+[.$BB97])+[.AE$26]*[.$Z$5]*MAGNET([.AE$24]+[.$BB97])+[.AF$26]*[.$Z$5]*MAGNET([.AF$24]+[.$BB97])+[.AG$26]*[.$Z$5]*MAGNET([.AG$24]+[.$BB97])+[.D$26]*[.$Z$5]*MAGNET([.D$24]+[.$BB97])+[.AH$26]*[.$Z$5]*MAGNET([.AH$24]+[.BB97]) +[.AI$26]*[.$Z$5]*MAGNET([.AI$24]+[.BB97]) +[.AJ$26]*[.$Z$5]*MAGNET([.AJ$24]+[.BB97]) +[.AK$26]*[.$Z$5]*MAGNET([.AK$24]+[.BB97]) +[.AL$26]*[.$Z$5]*MAGNET([.AL$24]+[.BB97]) +[.AM$26]*[.$Z$5]*MAGNET([.AM$24]+[.BB97]) +[.AN$26]*[.$Z$5]*MAGNET([.AN$24]+[.BB97]) +[.AO$26]*[.$Z$5]*MAGNET([.AO$24]+[.BB97]) +[.AP$26]*[.$Z$5]*MAGNET([.AP$24]+[.$BB97])&#10;+[.AQ$26]*[.$Z$5]*MAGNET([.AQ$24]+[.$BB97])&#10;+[.AR$26]*[.$Z$5]*MAGNET([.AR$24]+[.$BB97])&#10;+[.AS$26]*[.$Z$5]*MAGNET([.AS$24]+[.$BB97])&#10;+[.AT$26]*[.$Z$5]*MAGNET([.AT$24]+[.$BB97])&#10;+[.AU$26]*[.$Z$5]*MAGNET([.AU$24]+[.$BB97])&#10;+[.AV$26]*[.$Z$5]*MAGNET([.AV$24]+[.$BB97])&#10;+[.AW$26]*[.$Z$5]*MAGNET([.AW$24]+[.$BB97])&#10;+[.AX$26]*[.$Z$5]*MAGNET([.AX$24]+[.$BB97])&#10;+[.AY$26]*[.$Z$5]*MAGNET([.AY$24]+[.$BB97]) +RAND()*[.$BD$13]" office:value-type="float" office:value="-55.3328067206175" calcext:value-type="float">
            <text:p>-55.33</text:p>
          </table:table-cell>
          <table:table-cell table:style-name="ce71" table:formula="of:=[.E$27]*[.$Z$5]*MAGNET([.E$24]+[.$BB97])+[.F$27]*[.$Z$5]*MAGNET([.F$24]+[.$BB97])+[.G$27]*[.$Z$5]*MAGNET([.G$24]+[.$BB97])+[.H$27]*[.$Z$5]*MAGNET([.H$24]+[.$BB97])+[.I$27]*[.$Z$5]*MAGNET([.I$24]+[.$BB97])+[.J$27]*[.$Z$5]*MAGNET([.J$24]+[.$BB97])+[.K$27]*[.$Z$5]*MAGNET([.K$24]+[.$BB97])+[.L$27]*[.$Z$5]*MAGNET([.L$24]+[.$BB97])+[.M$27]*[.$Z$5]*MAGNET([.M$24]+[.$BB97])+[.N$27]*[.$Z$5]*MAGNET([.N$24]+[.$BB97])+[.O$27]*[.$Z$5]*MAGNET([.O$24]+[.$BB97])+[.P$27]*[.$Z$5]*MAGNET([.P$24]+[.$BB97])+[.Q$27]*[.$Z$5]*MAGNET([.Q$24]+[.$BB97])+[.R$27]*[.$Z$5]*MAGNET([.R$24]+[.$BB97])+[.S$27]*[.$Z$5]*MAGNET([.S$24]+[.$BB97])+[.T$27]*[.$Z$5]*MAGNET([.T$24]+[.$BB97])+[.U$27]*[.$Z$5]*MAGNET([.U$24]+[.$BB97])+[.V$27]*[.$Z$5]*MAGNET([.V$24]+[.$BB97])+[.W$27]*[.$Z$5]*MAGNET([.W$24]+[.$BB97])+[.X$27]*[.$Z$5]*MAGNET([.X$24]+[.$BB97])+[.Y$27]*[.$Z$5]*MAGNET([.Y$24]+[.$BB97])+[.Z$27]*[.$Z$5]*MAGNET([.Z$24]+[.$BB97])+[.AA$27]*[.$Z$5]*MAGNET([.AA$24]+[.$BB97])+[.AB$27]*[.$Z$5]*MAGNET([.AB$24]+[.$BB97])+[.AC$27]*[.$Z$5]*MAGNET([.AC$24]+[.$BB97])+[.AD$27]*[.$Z$5]*MAGNET([.AD$24]+[.$BB97])+[.AE$27]*[.$Z$5]*MAGNET([.AE$24]+[.$BB97])+[.AF$27]*[.$Z$5]*MAGNET([.AF$24]+[.$BB97])+[.AG$27]*[.$Z$5]*MAGNET([.AG$24]+[.$BB97])+[.D$27]*[.$Z$5]*MAGNET([.D$24]+[.$BB97])+[.AH$27]*[.$Z$5]*MAGNET([.AH$24]+[.BB97]) +[.AI$27]*[.$Z$5]*MAGNET([.AI$24]+[.BB97]) +[.AJ$27]*[.$Z$5]*MAGNET([.AJ$24]+[.BB97]) +[.AK$27]*[.$Z$5]*MAGNET([.AK$24]+[.BB97]) +[.AL$27]*[.$Z$5]*MAGNET([.AL$24]+[.BB97]) +[.AM$27]*[.$Z$5]*MAGNET([.AM$24]+[.BB97]) +[.AN$27]*[.$Z$5]*MAGNET([.AN$24]+[.BB97]) +[.AO$27]*[.$Z$5]*MAGNET([.AO$24]+[.BB97]) +[.AP$27]*[.$Z$5]*MAGNET([.AP$24]+[.$BB97])&#10;+[.AQ$27]*[.$Z$5]*MAGNET([.AQ$24]+[.$BB97])&#10;+[.AR$27]*[.$Z$5]*MAGNET([.AR$24]+[.$BB97])&#10;+[.AS$27]*[.$Z$5]*MAGNET([.AS$24]+[.$BB97])&#10;+[.AT$27]*[.$Z$5]*MAGNET([.AT$24]+[.$BB97])&#10;+[.AU$27]*[.$Z$5]*MAGNET([.AU$24]+[.$BB97])&#10;+[.AV$27]*[.$Z$5]*MAGNET([.AV$24]+[.$BB97])&#10;+[.AW$27]*[.$Z$5]*MAGNET([.AW$24]+[.$BB97])&#10;+[.AX$27]*[.$Z$5]*MAGNET([.AX$24]+[.$BB97])&#10;+[.AY$27]*[.$Z$5]*MAGNET([.AY$24]+[.$BB97]) +RAND()*[.$BE$13]" office:value-type="float" office:value="-78.8062174631298" calcext:value-type="float">
            <text:p>-78.8062174631298</text:p>
          </table:table-cell>
          <table:table-cell table:style-name="ce71" table:formula="of:=[.E$28]*[.$Z$5]*MAGNET([.E$24]+[.$BB97])+[.F$28]*[.$Z$5]*MAGNET([.F$24]+[.$BB97])+[.G$28]*[.$Z$5]*MAGNET([.G$24]+[.$BB97])+[.H$28]*[.$Z$5]*MAGNET([.H$24]+[.$BB97])+[.I$28]*[.$Z$5]*MAGNET([.I$24]+[.$BB97])+[.J$28]*[.$Z$5]*MAGNET([.J$24]+[.$BB97])+[.K$28]*[.$Z$5]*MAGNET([.K$24]+[.$BB97])+[.L$28]*[.$Z$5]*MAGNET([.L$24]+[.$BB97])+[.M$28]*[.$Z$5]*MAGNET([.M$24]+[.$BB97])+[.N$28]*[.$Z$5]*MAGNET([.N$24]+[.$BB97])+[.O$28]*[.$Z$5]*MAGNET([.O$24]+[.$BB97])+[.P$28]*[.$Z$5]*MAGNET([.P$24]+[.$BB97])+[.Q$28]*[.$Z$5]*MAGNET([.Q$24]+[.$BB97])+[.R$28]*[.$Z$5]*MAGNET([.R$24]+[.$BB97])+[.S$28]*[.$Z$5]*MAGNET([.S$24]+[.$BB97])+[.T$28]*[.$Z$5]*MAGNET([.T$24]+[.$BB97])+[.U$28]*[.$Z$5]*MAGNET([.U$24]+[.$BB97])+[.V$28]*[.$Z$5]*MAGNET([.V$24]+[.$BB97])+[.W$28]*[.$Z$5]*MAGNET([.W$24]+[.$BB97])+[.X$28]*[.$Z$5]*MAGNET([.X$24]+[.$BB97])+[.Y$28]*[.$Z$5]*MAGNET([.Y$24]+[.$BB97])+[.Z$28]*[.$Z$5]*MAGNET([.Z$24]+[.$BB97])+[.AA$28]*[.$Z$5]*MAGNET([.AA$24]+[.$BB97])+[.AB$28]*[.$Z$5]*MAGNET([.AB$24]+[.$BB97])+[.AC$28]*[.$Z$5]*MAGNET([.AC$24]+[.$BB97])+[.AD$28]*[.$Z$5]*MAGNET([.AD$24]+[.$BB97])+[.AE$28]*[.$Z$5]*MAGNET([.AE$24]+[.$BB97])+[.AF$28]*[.$Z$5]*MAGNET([.AF$24]+[.$BB97])+[.AG$28]*[.$Z$5]*MAGNET([.AG$24]+[.$BB97])+[.D$28]*[.$Z$5]*MAGNET([.D$24]+[.$BB97])+[.AH$28]*[.$Z$5]*MAGNET([.AH$24]+[.BB97]) +[.AI$28]*[.$Z$5]*MAGNET([.AI$24]+[.BB97]) +[.AJ$28]*[.$Z$5]*MAGNET([.AJ$24]+[.BB97]) +[.AK$28]*[.$Z$5]*MAGNET([.AK$24]+[.BB97]) +[.AL$28]*[.$Z$5]*MAGNET([.AL$24]+[.BB97]) +[.AM$28]*[.$Z$5]*MAGNET([.AM$24]+[.BB97]) +[.AN$28]*[.$Z$5]*MAGNET([.AN$24]+[.BB97]) +[.AO$28]*[.$Z$5]*MAGNET([.AO$24]+[.BB97]) +[.AP$28]*[.$Z$5]*MAGNET([.AP$24]+[.$BB97])&#10;+[.AQ$28]*[.$Z$5]*MAGNET([.AQ$24]+[.$BB97])&#10;+[.AR$28]*[.$Z$5]*MAGNET([.AR$24]+[.$BB97])&#10;+[.AS$28]*[.$Z$5]*MAGNET([.AS$24]+[.$BB97])&#10;+[.AT$28]*[.$Z$5]*MAGNET([.AT$24]+[.$BB97])&#10;+[.AU$28]*[.$Z$5]*MAGNET([.AU$24]+[.$BB97])&#10;+[.AV$28]*[.$Z$5]*MAGNET([.AV$24]+[.$BB97])&#10;+[.AW$28]*[.$Z$5]*MAGNET([.AW$24]+[.$BB97])&#10;+[.AX$28]*[.$Z$5]*MAGNET([.AX$24]+[.$BB97])&#10;+[.AY$28]*[.$Z$5]*MAGNET([.AY$24]+[.$BB97]) +RAND()*[.$BF$13]" office:value-type="float" office:value="-8.03747868866094" calcext:value-type="float">
            <text:p>-8.03747868866094</text:p>
          </table:table-cell>
          <table:table-cell table:style-name="ce71" table:formula="of:=[.E$29]*[.$Z$5]*MAGNET([.E$24]+[.$BB97])+[.F$29]*[.$Z$5]*MAGNET([.F$24]+[.$BB97])+[.G$29]*[.$Z$5]*MAGNET([.G$24]+[.$BB97])+[.H$29]*[.$Z$5]*MAGNET([.H$24]+[.$BB97])+[.I$29]*[.$Z$5]*MAGNET([.I$24]+[.$BB97])+[.J$29]*[.$Z$5]*MAGNET([.J$24]+[.$BB97])+[.K$29]*[.$Z$5]*MAGNET([.K$24]+[.$BB97])+[.L$29]*[.$Z$5]*MAGNET([.L$24]+[.$BB97])+[.M$29]*[.$Z$5]*MAGNET([.M$24]+[.$BB97])+[.N$29]*[.$Z$5]*MAGNET([.N$24]+[.$BB97])+[.O$29]*[.$Z$5]*MAGNET([.O$24]+[.$BB97])+[.P$29]*[.$Z$5]*MAGNET([.P$24]+[.$BB97])+[.Q$29]*[.$Z$5]*MAGNET([.Q$24]+[.$BB97])+[.R$29]*[.$Z$5]*MAGNET([.R$24]+[.$BB97])+[.S$29]*[.$Z$5]*MAGNET([.S$24]+[.$BB97])+[.T$29]*[.$Z$5]*MAGNET([.T$24]+[.$BB97])+[.U$29]*[.$Z$5]*MAGNET([.U$24]+[.$BB97])+[.V$29]*[.$Z$5]*MAGNET([.V$24]+[.$BB97])+[.W$29]*[.$Z$5]*MAGNET([.W$24]+[.$BB97])+[.X$29]*[.$Z$5]*MAGNET([.X$24]+[.$BB97])+[.Y$29]*[.$Z$5]*MAGNET([.Y$24]+[.$BB97])+[.Z$29]*[.$Z$5]*MAGNET([.Z$24]+[.$BB97])+[.AA$29]*[.$Z$5]*MAGNET([.AA$24]+[.$BB97])+[.AB$29]*[.$Z$5]*MAGNET([.AB$24]+[.$BB97])+[.AC$29]*[.$Z$5]*MAGNET([.AC$24]+[.$BB97])+[.AD$29]*[.$Z$5]*MAGNET([.AD$24]+[.$BB97])+[.AE$29]*[.$Z$5]*MAGNET([.AE$24]+[.$BB97])+[.AF$29]*[.$Z$5]*MAGNET([.AF$24]+[.$BB97])+[.AG$29]*[.$Z$5]*MAGNET([.AG$24]+[.$BB97])+[.D$29]*[.$Z$5]*MAGNET([.D$24]+[.$BB97])+[.AH$29]*[.$Z$5]*MAGNET([.AH$24]+[.BB97]) +[.AI$29]*[.$Z$5]*MAGNET([.AI$24]+[.BB97]) +[.AJ$29]*[.$Z$5]*MAGNET([.AJ$24]+[.BB97]) +[.AK$29]*[.$Z$5]*MAGNET([.AK$24]+[.BB97]) +[.AL$29]*[.$Z$5]*MAGNET([.AL$24]+[.BB97]) +[.AM$29]*[.$Z$5]*MAGNET([.AM$24]+[.BB97]) +[.AN$29]*[.$Z$5]*MAGNET([.AN$24]+[.BB97]) +[.AO$29]*[.$Z$5]*MAGNET([.AO$24]+[.BB97]) +[.AP$29]*[.$Z$5]*MAGNET([.AP$24]+[.$BB97])&#10;+[.AQ$29]*[.$Z$5]*MAGNET([.AQ$24]+[.$BB97])&#10;+[.AR$29]*[.$Z$5]*MAGNET([.AR$24]+[.$BB97])&#10;+[.AS$29]*[.$Z$5]*MAGNET([.AS$24]+[.$BB97])&#10;+[.AT$29]*[.$Z$5]*MAGNET([.AT$24]+[.$BB97])&#10;+[.AU$29]*[.$Z$5]*MAGNET([.AU$24]+[.$BB97])&#10;+[.AV$29]*[.$Z$5]*MAGNET([.AV$24]+[.$BB97])&#10;+[.AW$29]*[.$Z$5]*MAGNET([.AW$24]+[.$BB97])&#10;+[.AX$29]*[.$Z$5]*MAGNET([.AX$24]+[.$BB97])&#10;+[.AY$29]*[.$Z$5]*MAGNET([.AY$24]+[.$BB97]) +RAND()*[.$BG$13]" office:value-type="float" office:value="30.1618111122025" calcext:value-type="float">
            <text:p>30.1618111122025</text:p>
          </table:table-cell>
          <table:table-cell table:style-name="ce71" table:formula="of:=[.E$30]*[.$Z$5]*MAGNET([.E$24]+[.$BB97])+[.F$30]*[.$Z$5]*MAGNET([.F$24]+[.$BB97])+[.G$30]*[.$Z$5]*MAGNET([.G$24]+[.$BB97])+[.H$30]*[.$Z$5]*MAGNET([.H$24]+[.$BB97])+[.I$30]*[.$Z$5]*MAGNET([.I$24]+[.$BB97])+[.J$30]*[.$Z$5]*MAGNET([.J$24]+[.$BB97])+[.K$30]*[.$Z$5]*MAGNET([.K$24]+[.$BB97])+[.L$30]*[.$Z$5]*MAGNET([.L$24]+[.$BB97])+[.M$30]*[.$Z$5]*MAGNET([.M$24]+[.$BB97])+[.N$30]*[.$Z$5]*MAGNET([.N$24]+[.$BB97])+[.O$30]*[.$Z$5]*MAGNET([.O$24]+[.$BB97])+[.P$30]*[.$Z$5]*MAGNET([.P$24]+[.$BB97])+[.Q$30]*[.$Z$5]*MAGNET([.Q$24]+[.$BB97])+[.R$30]*[.$Z$5]*MAGNET([.R$24]+[.$BB97])+[.S$30]*[.$Z$5]*MAGNET([.S$24]+[.$BB97])+[.T$30]*[.$Z$5]*MAGNET([.T$24]+[.$BB97])+[.U$30]*[.$Z$5]*MAGNET([.U$24]+[.$BB97])+[.V$30]*[.$Z$5]*MAGNET([.V$24]+[.$BB97])+[.W$30]*[.$Z$5]*MAGNET([.W$24]+[.$BB97])+[.X$30]*[.$Z$5]*MAGNET([.X$24]+[.$BB97])+[.Y$30]*[.$Z$5]*MAGNET([.Y$24]+[.$BB97])+[.Z$30]*[.$Z$5]*MAGNET([.Z$24]+[.$BB97])+[.AA$30]*[.$Z$5]*MAGNET([.AA$24]+[.$BB97])+[.AB$30]*[.$Z$5]*MAGNET([.AB$24]+[.$BB97])+[.AC$30]*[.$Z$5]*MAGNET([.AC$24]+[.$BB97])+[.AD$30]*[.$Z$5]*MAGNET([.AD$24]+[.$BB97])+[.AE$30]*[.$Z$5]*MAGNET([.AE$24]+[.$BB97])+[.AF$30]*[.$Z$5]*MAGNET([.AF$24]+[.$BB97])+[.AG$30]*[.$Z$5]*MAGNET([.AG$24]+[.$BB97])+[.D$30]*[.$Z$5]*MAGNET([.D$24]+[.$BB97])+[.AH$30]*[.$Z$5]*MAGNET([.AH$24]+[.BB97]) +[.AI$30]*[.$Z$5]*MAGNET([.AI$24]+[.BB97]) +[.AJ$30]*[.$Z$5]*MAGNET([.AJ$24]+[.BB97]) +[.AK$30]*[.$Z$5]*MAGNET([.AK$24]+[.BB97]) +[.AL$30]*[.$Z$5]*MAGNET([.AL$24]+[.BB97]) +[.AM$30]*[.$Z$5]*MAGNET([.AM$24]+[.BB97]) +[.AN$30]*[.$Z$5]*MAGNET([.AN$24]+[.BB97]) +[.AO$30]*[.$Z$5]*MAGNET([.AO$24]+[.BB97]) +[.AP$30]*[.$Z$5]*MAGNET([.AP$24]+[.$BB97])&#10;+[.AQ$30]*[.$Z$5]*MAGNET([.AQ$24]+[.$BB97])&#10;+[.AR$30]*[.$Z$5]*MAGNET([.AR$24]+[.$BB97])&#10;+[.AS$30]*[.$Z$5]*MAGNET([.AS$24]+[.$BB97])&#10;+[.AT$30]*[.$Z$5]*MAGNET([.AT$24]+[.$BB97])&#10;+[.AU$30]*[.$Z$5]*MAGNET([.AU$24]+[.$BB97])&#10;+[.AV$30]*[.$Z$5]*MAGNET([.AV$24]+[.$BB97])&#10;+[.AW$30]*[.$Z$5]*MAGNET([.AW$24]+[.$BB97])&#10;+[.AX$30]*[.$Z$5]*MAGNET([.AX$24]+[.$BB97])&#10;+[.AY$30]*[.$Z$5]*MAGNET([.AY$24]+[.$BB97]) +RAND()*[.$BH$13]" office:value-type="float" office:value="0" calcext:value-type="float">
            <text:p>0</text:p>
          </table:table-cell>
          <table:table-cell table:style-name="ce71" table:formula="of:=[.E$31]*[.$Z$5]*MAGNET([.E$24]+[.$BB97])+[.F$31]*[.$Z$5]*MAGNET([.F$24]+[.$BB97])+[.G$31]*[.$Z$5]*MAGNET([.G$24]+[.$BB97])+[.H$31]*[.$Z$5]*MAGNET([.H$24]+[.$BB97])+[.I$31]*[.$Z$5]*MAGNET([.I$24]+[.$BB97])+[.J$31]*[.$Z$5]*MAGNET([.J$24]+[.$BB97])+[.K$31]*[.$Z$5]*MAGNET([.K$24]+[.$BB97])+[.L$31]*[.$Z$5]*MAGNET([.L$24]+[.$BB97])+[.M$31]*[.$Z$5]*MAGNET([.M$24]+[.$BB97])+[.N$31]*[.$Z$5]*MAGNET([.N$24]+[.$BB97])+[.O$31]*[.$Z$5]*MAGNET([.O$24]+[.$BB97])+[.P$31]*[.$Z$5]*MAGNET([.P$24]+[.$BB97])+[.Q$31]*[.$Z$5]*MAGNET([.Q$24]+[.$BB97])+[.R$31]*[.$Z$5]*MAGNET([.R$24]+[.$BB97])+[.S$31]*[.$Z$5]*MAGNET([.S$24]+[.$BB97])+[.T$31]*[.$Z$5]*MAGNET([.T$24]+[.$BB97])+[.U$31]*[.$Z$5]*MAGNET([.U$24]+[.$BB97])+[.V$31]*[.$Z$5]*MAGNET([.V$24]+[.$BB97])+[.W$31]*[.$Z$5]*MAGNET([.W$24]+[.$BB97])+[.X$31]*[.$Z$5]*MAGNET([.X$24]+[.$BB97])+[.Y$31]*[.$Z$5]*MAGNET([.Y$24]+[.$BB97])+[.Z$31]*[.$Z$5]*MAGNET([.Z$24]+[.$BB97])+[.AA$31]*[.$Z$5]*MAGNET([.AA$24]+[.$BB97])+[.AB$31]*[.$Z$5]*MAGNET([.AB$24]+[.$BB97])+[.AC$31]*[.$Z$5]*MAGNET([.AC$24]+[.$BB97])+[.AD$31]*[.$Z$5]*MAGNET([.AD$24]+[.$BB97])+[.AE$31]*[.$Z$5]*MAGNET([.AE$24]+[.$BB97])+[.AF$31]*[.$Z$5]*MAGNET([.AF$24]+[.$BB97])+[.AG$31]*[.$Z$5]*MAGNET([.AG$24]+[.$BB97])+[.D$31]*[.$Z$5]*MAGNET([.D$24]+[.$BB97])+[.AH$31]*[.$Z$5]*MAGNET([.AH$24]+[.BB97]) +[.AI$31]*[.$Z$5]*MAGNET([.AI$24]+[.BB97]) +[.AJ$31]*[.$Z$5]*MAGNET([.AJ$24]+[.BB97]) +[.AK$31]*[.$Z$5]*MAGNET([.AK$24]+[.BB97]) +[.AL$31]*[.$Z$5]*MAGNET([.AL$24]+[.BB97]) +[.AM$31]*[.$Z$5]*MAGNET([.AM$24]+[.BB97]) +[.AN$31]*[.$Z$5]*MAGNET([.AN$24]+[.BB97]) +[.AO$31]*[.$Z$5]*MAGNET([.AO$24]+[.BB97]) +[.AP$31]*[.$Z$5]*MAGNET([.AP$24]+[.$BB97])&#10;+[.AQ$31]*[.$Z$5]*MAGNET([.AQ$24]+[.$BB97])&#10;+[.AR$31]*[.$Z$5]*MAGNET([.AR$24]+[.$BB97])&#10;+[.AS$31]*[.$Z$5]*MAGNET([.AS$24]+[.$BB97])&#10;+[.AT$31]*[.$Z$5]*MAGNET([.AT$24]+[.$BB97])&#10;+[.AU$31]*[.$Z$5]*MAGNET([.AU$24]+[.$BB97])&#10;+[.AV$31]*[.$Z$5]*MAGNET([.AV$24]+[.$BB97])&#10;+[.AW$31]*[.$Z$5]*MAGNET([.AW$24]+[.$BB97])&#10;+[.AX$31]*[.$Z$5]*MAGNET([.AX$24]+[.$BB97])&#10;+[.AY$31]*[.$Z$5]*MAGNET([.AY$24]+[.$BB97]) +RAND()*[.$BI$13]" office:value-type="float" office:value="0" calcext:value-type="float">
            <text:p>0</text:p>
          </table:table-cell>
          <table:table-cell table:style-name="ce71" table:formula="of:=[.E$32]*[.$Z$5]*MAGNET([.E$24]+[.$BB97])+[.F$32]*[.$Z$5]*MAGNET([.F$24]+[.$BB97])+[.G$32]*[.$Z$5]*MAGNET([.G$24]+[.$BB97])+[.H$32]*[.$Z$5]*MAGNET([.H$24]+[.$BB97])+[.I$32]*[.$Z$5]*MAGNET([.I$24]+[.$BB97])+[.J$32]*[.$Z$5]*MAGNET([.J$24]+[.$BB97])+[.K$32]*[.$Z$5]*MAGNET([.K$24]+[.$BB97])+[.L$32]*[.$Z$5]*MAGNET([.L$24]+[.$BB97])+[.M$32]*[.$Z$5]*MAGNET([.M$24]+[.$BB97])+[.N$32]*[.$Z$5]*MAGNET([.N$24]+[.$BB97])+[.O$32]*[.$Z$5]*MAGNET([.O$24]+[.$BB97])+[.P$32]*[.$Z$5]*MAGNET([.P$24]+[.$BB97])+[.Q$32]*[.$Z$5]*MAGNET([.Q$24]+[.$BB97])+[.R$32]*[.$Z$5]*MAGNET([.R$24]+[.$BB97])+[.S$32]*[.$Z$5]*MAGNET([.S$24]+[.$BB97])+[.T$32]*[.$Z$5]*MAGNET([.T$24]+[.$BB97])+[.U$32]*[.$Z$5]*MAGNET([.U$24]+[.$BB97])+[.V$32]*[.$Z$5]*MAGNET([.V$24]+[.$BB97])+[.W$32]*[.$Z$5]*MAGNET([.W$24]+[.$BB97])+[.X$32]*[.$Z$5]*MAGNET([.X$24]+[.$BB97])+[.Y$32]*[.$Z$5]*MAGNET([.Y$24]+[.$BB97])+[.Z$32]*[.$Z$5]*MAGNET([.Z$24]+[.$BB97])+[.AA$32]*[.$Z$5]*MAGNET([.AA$24]+[.$BB97])+[.AB$32]*[.$Z$5]*MAGNET([.AB$24]+[.$BB97])+[.AC$32]*[.$Z$5]*MAGNET([.AC$24]+[.$BB97])+[.AD$32]*[.$Z$5]*MAGNET([.AD$24]+[.$BB97])+[.AE$32]*[.$Z$5]*MAGNET([.AE$24]+[.$BB97])+[.AF$32]*[.$Z$5]*MAGNET([.AF$24]+[.$BB97])+[.AG$32]*[.$Z$5]*MAGNET([.AG$24]+[.$BB97])+[.D$32]*[.$Z$5]*MAGNET([.D$24]+[.$BB97])+[.AH$32]*[.$Z$5]*MAGNET([.AH$24]+[.BB97]) +[.AI$32]*[.$Z$5]*MAGNET([.AI$24]+[.BB97]) +[.AJ$32]*[.$Z$5]*MAGNET([.AJ$24]+[.BB97]) +[.AK$32]*[.$Z$5]*MAGNET([.AK$24]+[.BB97]) +[.AL$32]*[.$Z$5]*MAGNET([.AL$24]+[.BB97]) +[.AM$32]*[.$Z$5]*MAGNET([.AM$24]+[.BB97]) +[.AN$32]*[.$Z$5]*MAGNET([.AN$24]+[.BB97]) +[.AO$32]*[.$Z$5]*MAGNET([.AO$24]+[.BB97]) +[.AP$32]*[.$Z$5]*MAGNET([.AP$24]+[.$BB97])&#10;+[.AQ$32]*[.$Z$5]*MAGNET([.AQ$24]+[.$BB97])&#10;+[.AR$32]*[.$Z$5]*MAGNET([.AR$24]+[.$BB97])&#10;+[.AS$32]*[.$Z$5]*MAGNET([.AS$24]+[.$BB97])&#10;+[.AT$32]*[.$Z$5]*MAGNET([.AT$24]+[.$BB97])&#10;+[.AU$32]*[.$Z$5]*MAGNET([.AU$24]+[.$BB97])&#10;+[.AV$32]*[.$Z$5]*MAGNET([.AV$24]+[.$BB97])&#10;+[.AW$32]*[.$Z$5]*MAGNET([.AW$24]+[.$BB97])&#10;+[.AX$32]*[.$Z$5]*MAGNET([.AX$24]+[.$BB97])&#10;+[.AY$32]*[.$Z$5]*MAGNET([.AY$24]+[.$BB9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7]+0.002" office:value-type="float" office:value="0.166" calcext:value-type="float">
            <text:p>0.166</text:p>
          </table:table-cell>
          <table:table-cell table:formula="of:=[.BA98]*[.$D$6]" office:value-type="float" office:value="8.3440700879345" calcext:value-type="float">
            <text:p>8.344</text:p>
          </table:table-cell>
          <table:table-cell table:formula="of:=[.D$25]*[.$Z$5]*MAGNET([.D$24]+[.BB98])+[.E$25]*[.$Z$5]*MAGNET([.E$24]+[.BB98])+[.F$25]*[.$Z$5]*MAGNET([.F$24]+[.BB98])+[.G$25]*[.$Z$5]*MAGNET([.G$24]+[.BB98])+[.H$25]*[.$Z$5]*MAGNET([.H$24]+[.BB98])+[.I$25]*[.$Z$5]*MAGNET([.I$24]+[.BB98])+[.J$25]*[.$Z$5]*MAGNET([.J$24]+[.BB98])+[.K$25]*[.$Z$5]*MAGNET([.K$24]+[.BB98])+[.L$25]*[.$Z$5]*MAGNET([.L$24]+[.BB98])+[.M$25]*[.$Z$5]*MAGNET([.M$24]+[.BB98])+[.N$25]*[.$Z$5]*MAGNET([.N$24]+[.BB98])+[.O$25]*[.$Z$5]*MAGNET([.O$24]+[.BB98])+[.P$25]*[.$Z$5]*MAGNET([.P$24]+[.BB98])+[.Q$25]*[.$Z$5]*MAGNET([.Q$24]+[.BB98])+[.R$25]*[.$Z$5]*MAGNET([.R$24]+[.BB98])+[.S$25]*[.$Z$5]*MAGNET([.S$24]+[.BB98])+[.T$25]*[.$Z$5]*MAGNET([.T$24]+[.BB98])+[.U$25]*[.$Z$5]*MAGNET([.U$24]+[.BB98])+[.V$25]*[.$Z$5]*MAGNET([.V$24]+[.BB98])+[.W$25]*[.$Z$5]*MAGNET([.W$24]+[.BB98])+[.X$25]*[.$Z$5]*MAGNET([.X$24]+[.BB98])+[.Y$25]*[.$Z$5]*MAGNET([.Y$24]+[.BB98])+[.Z$25]*[.$Z$5]*MAGNET([.Z$24]+[.BB98])+[.AA$25]*[.$Z$5]*MAGNET([.AA$24]+[.BB98])+[.AB$25]*[.$Z$5]*MAGNET([.AB$24]+[.BB98])+[.AC$25]*[.$Z$5]*MAGNET([.AC$24]+[.BB98])+[.AD$25]*[.$Z$5]*MAGNET([.AD$24]+[.BB98])+[.AE$25]*[.$Z$5]*MAGNET([.AE$24]+[.BB98])+[.AF$25]*[.$Z$5]*MAGNET([.AF$24]+[.BB98])+[.AG$25]*[.$Z$5]*MAGNET([.AG$24]+[.BB98])+[.AH$25]*[.$Z$5]*MAGNET([.AH$24]+[.BB98]) +[.AI$25]*[.$Z$5]*MAGNET([.AI$24]+[.BB98]) +[.AJ$25]*[.$Z$5]*MAGNET([.AJ$24]+[.BB98]) +[.AK$25]*[.$Z$5]*MAGNET([.AK$24]+[.BB98]) +[.AL$25]*[.$Z$5]*MAGNET([.AL$24]+[.BB98]) +[.AM$25]*[.$Z$5]*MAGNET([.AM$24]+[.BB98]) +[.AN$25]*[.$Z$5]*MAGNET([.AN$24]+[.BB98]) +[.AO$25]*[.$Z$5]*MAGNET([.AO$24]+[.BB98])+RAND()*[.$BC$13]+[.AP$25]*[.$Z$5]*MAGNET([.AP$24]+[.BB98])&#10;+[.AQ$25]*[.$Z$5]*MAGNET([.AQ$24]+[.BB98])&#10;+[.AR$25]*[.$Z$5]*MAGNET([.AR$24]+[.BB98])&#10;+[.AS$25]*[.$Z$5]*MAGNET([.AS$24]+[.BB98])&#10;+[.AT$25]*[.$Z$5]*MAGNET([.AT$24]+[.BB98])&#10;+[.AU$25]*[.$Z$5]*MAGNET([.AU$24]+[.BB98])&#10;+[.AV$25]*[.$Z$5]*MAGNET([.AV$24]+[.BB98])&#10;+[.AW$25]*[.$Z$5]*MAGNET([.AW$24]+[.BB98])&#10;+[.AX$25]*[.$Z$5]*MAGNET([.AX$24]+[.BB98])&#10;+[.AY$25]*[.$Z$5]*MAGNET([.AY$24]+[.BB98])" office:value-type="float" office:value="123.877864950746" calcext:value-type="float">
            <text:p>123.88</text:p>
          </table:table-cell>
          <table:table-cell table:style-name="ce70" table:formula="of:=[.E$26]*[.$Z$5]*MAGNET([.E$24]+[.$BB98])+[.F$26]*[.$Z$5]*MAGNET([.F$24]+[.$BB98])+[.G$26]*[.$Z$5]*MAGNET([.G$24]+[.$BB98])+[.H$26]*[.$Z$5]*MAGNET([.H$24]+[.$BB98])+[.I$26]*[.$Z$5]*MAGNET([.I$24]+[.$BB98])+[.J$26]*[.$Z$5]*MAGNET([.J$24]+[.$BB98])+[.K$26]*[.$Z$5]*MAGNET([.K$24]+[.$BB98])+[.L$26]*[.$Z$5]*MAGNET([.L$24]+[.$BB98])+[.M$26]*[.$Z$5]*MAGNET([.M$24]+[.$BB98])+[.N$26]*[.$Z$5]*MAGNET([.N$24]+[.$BB98])+[.O$26]*[.$Z$5]*MAGNET([.O$24]+[.$BB98])+[.P$26]*[.$Z$5]*MAGNET([.P$24]+[.$BB98])+[.Q$26]*[.$Z$5]*MAGNET([.Q$24]+[.$BB98])+[.R$26]*[.$Z$5]*MAGNET([.R$24]+[.$BB98])+[.S$26]*[.$Z$5]*MAGNET([.S$24]+[.$BB98])+[.T$26]*[.$Z$5]*MAGNET([.T$24]+[.$BB98])+[.U$26]*[.$Z$5]*MAGNET([.U$24]+[.$BB98])+[.V$26]*[.$Z$5]*MAGNET([.V$24]+[.$BB98])+[.W$26]*[.$Z$5]*MAGNET([.W$24]+[.$BB98])+[.X$26]*[.$Z$5]*MAGNET([.X$24]+[.$BB98])+[.Y$26]*[.$Z$5]*MAGNET([.Y$24]+[.$BB98])+[.Z$26]*[.$Z$5]*MAGNET([.Z$24]+[.$BB98])+[.AA$26]*[.$Z$5]*MAGNET([.AA$24]+[.$BB98])+[.AB$26]*[.$Z$5]*MAGNET([.AB$24]+[.$BB98])+[.AC$26]*[.$Z$5]*MAGNET([.AC$24]+[.$BB98])+[.AD$26]*[.$Z$5]*MAGNET([.AD$24]+[.$BB98])+[.AE$26]*[.$Z$5]*MAGNET([.AE$24]+[.$BB98])+[.AF$26]*[.$Z$5]*MAGNET([.AF$24]+[.$BB98])+[.AG$26]*[.$Z$5]*MAGNET([.AG$24]+[.$BB98])+[.D$26]*[.$Z$5]*MAGNET([.D$24]+[.$BB98])+[.AH$26]*[.$Z$5]*MAGNET([.AH$24]+[.BB98]) +[.AI$26]*[.$Z$5]*MAGNET([.AI$24]+[.BB98]) +[.AJ$26]*[.$Z$5]*MAGNET([.AJ$24]+[.BB98]) +[.AK$26]*[.$Z$5]*MAGNET([.AK$24]+[.BB98]) +[.AL$26]*[.$Z$5]*MAGNET([.AL$24]+[.BB98]) +[.AM$26]*[.$Z$5]*MAGNET([.AM$24]+[.BB98]) +[.AN$26]*[.$Z$5]*MAGNET([.AN$24]+[.BB98]) +[.AO$26]*[.$Z$5]*MAGNET([.AO$24]+[.BB98]) +[.AP$26]*[.$Z$5]*MAGNET([.AP$24]+[.$BB98])&#10;+[.AQ$26]*[.$Z$5]*MAGNET([.AQ$24]+[.$BB98])&#10;+[.AR$26]*[.$Z$5]*MAGNET([.AR$24]+[.$BB98])&#10;+[.AS$26]*[.$Z$5]*MAGNET([.AS$24]+[.$BB98])&#10;+[.AT$26]*[.$Z$5]*MAGNET([.AT$24]+[.$BB98])&#10;+[.AU$26]*[.$Z$5]*MAGNET([.AU$24]+[.$BB98])&#10;+[.AV$26]*[.$Z$5]*MAGNET([.AV$24]+[.$BB98])&#10;+[.AW$26]*[.$Z$5]*MAGNET([.AW$24]+[.$BB98])&#10;+[.AX$26]*[.$Z$5]*MAGNET([.AX$24]+[.$BB98])&#10;+[.AY$26]*[.$Z$5]*MAGNET([.AY$24]+[.$BB98]) +RAND()*[.$BD$13]" office:value-type="float" office:value="-59.7064439195988" calcext:value-type="float">
            <text:p>-59.71</text:p>
          </table:table-cell>
          <table:table-cell table:style-name="ce71" table:formula="of:=[.E$27]*[.$Z$5]*MAGNET([.E$24]+[.$BB98])+[.F$27]*[.$Z$5]*MAGNET([.F$24]+[.$BB98])+[.G$27]*[.$Z$5]*MAGNET([.G$24]+[.$BB98])+[.H$27]*[.$Z$5]*MAGNET([.H$24]+[.$BB98])+[.I$27]*[.$Z$5]*MAGNET([.I$24]+[.$BB98])+[.J$27]*[.$Z$5]*MAGNET([.J$24]+[.$BB98])+[.K$27]*[.$Z$5]*MAGNET([.K$24]+[.$BB98])+[.L$27]*[.$Z$5]*MAGNET([.L$24]+[.$BB98])+[.M$27]*[.$Z$5]*MAGNET([.M$24]+[.$BB98])+[.N$27]*[.$Z$5]*MAGNET([.N$24]+[.$BB98])+[.O$27]*[.$Z$5]*MAGNET([.O$24]+[.$BB98])+[.P$27]*[.$Z$5]*MAGNET([.P$24]+[.$BB98])+[.Q$27]*[.$Z$5]*MAGNET([.Q$24]+[.$BB98])+[.R$27]*[.$Z$5]*MAGNET([.R$24]+[.$BB98])+[.S$27]*[.$Z$5]*MAGNET([.S$24]+[.$BB98])+[.T$27]*[.$Z$5]*MAGNET([.T$24]+[.$BB98])+[.U$27]*[.$Z$5]*MAGNET([.U$24]+[.$BB98])+[.V$27]*[.$Z$5]*MAGNET([.V$24]+[.$BB98])+[.W$27]*[.$Z$5]*MAGNET([.W$24]+[.$BB98])+[.X$27]*[.$Z$5]*MAGNET([.X$24]+[.$BB98])+[.Y$27]*[.$Z$5]*MAGNET([.Y$24]+[.$BB98])+[.Z$27]*[.$Z$5]*MAGNET([.Z$24]+[.$BB98])+[.AA$27]*[.$Z$5]*MAGNET([.AA$24]+[.$BB98])+[.AB$27]*[.$Z$5]*MAGNET([.AB$24]+[.$BB98])+[.AC$27]*[.$Z$5]*MAGNET([.AC$24]+[.$BB98])+[.AD$27]*[.$Z$5]*MAGNET([.AD$24]+[.$BB98])+[.AE$27]*[.$Z$5]*MAGNET([.AE$24]+[.$BB98])+[.AF$27]*[.$Z$5]*MAGNET([.AF$24]+[.$BB98])+[.AG$27]*[.$Z$5]*MAGNET([.AG$24]+[.$BB98])+[.D$27]*[.$Z$5]*MAGNET([.D$24]+[.$BB98])+[.AH$27]*[.$Z$5]*MAGNET([.AH$24]+[.BB98]) +[.AI$27]*[.$Z$5]*MAGNET([.AI$24]+[.BB98]) +[.AJ$27]*[.$Z$5]*MAGNET([.AJ$24]+[.BB98]) +[.AK$27]*[.$Z$5]*MAGNET([.AK$24]+[.BB98]) +[.AL$27]*[.$Z$5]*MAGNET([.AL$24]+[.BB98]) +[.AM$27]*[.$Z$5]*MAGNET([.AM$24]+[.BB98]) +[.AN$27]*[.$Z$5]*MAGNET([.AN$24]+[.BB98]) +[.AO$27]*[.$Z$5]*MAGNET([.AO$24]+[.BB98]) +[.AP$27]*[.$Z$5]*MAGNET([.AP$24]+[.$BB98])&#10;+[.AQ$27]*[.$Z$5]*MAGNET([.AQ$24]+[.$BB98])&#10;+[.AR$27]*[.$Z$5]*MAGNET([.AR$24]+[.$BB98])&#10;+[.AS$27]*[.$Z$5]*MAGNET([.AS$24]+[.$BB98])&#10;+[.AT$27]*[.$Z$5]*MAGNET([.AT$24]+[.$BB98])&#10;+[.AU$27]*[.$Z$5]*MAGNET([.AU$24]+[.$BB98])&#10;+[.AV$27]*[.$Z$5]*MAGNET([.AV$24]+[.$BB98])&#10;+[.AW$27]*[.$Z$5]*MAGNET([.AW$24]+[.$BB98])&#10;+[.AX$27]*[.$Z$5]*MAGNET([.AX$24]+[.$BB98])&#10;+[.AY$27]*[.$Z$5]*MAGNET([.AY$24]+[.$BB98]) +RAND()*[.$BE$13]" office:value-type="float" office:value="-68.588029060098" calcext:value-type="float">
            <text:p>-68.588029060098</text:p>
          </table:table-cell>
          <table:table-cell table:style-name="ce71" table:formula="of:=[.E$28]*[.$Z$5]*MAGNET([.E$24]+[.$BB98])+[.F$28]*[.$Z$5]*MAGNET([.F$24]+[.$BB98])+[.G$28]*[.$Z$5]*MAGNET([.G$24]+[.$BB98])+[.H$28]*[.$Z$5]*MAGNET([.H$24]+[.$BB98])+[.I$28]*[.$Z$5]*MAGNET([.I$24]+[.$BB98])+[.J$28]*[.$Z$5]*MAGNET([.J$24]+[.$BB98])+[.K$28]*[.$Z$5]*MAGNET([.K$24]+[.$BB98])+[.L$28]*[.$Z$5]*MAGNET([.L$24]+[.$BB98])+[.M$28]*[.$Z$5]*MAGNET([.M$24]+[.$BB98])+[.N$28]*[.$Z$5]*MAGNET([.N$24]+[.$BB98])+[.O$28]*[.$Z$5]*MAGNET([.O$24]+[.$BB98])+[.P$28]*[.$Z$5]*MAGNET([.P$24]+[.$BB98])+[.Q$28]*[.$Z$5]*MAGNET([.Q$24]+[.$BB98])+[.R$28]*[.$Z$5]*MAGNET([.R$24]+[.$BB98])+[.S$28]*[.$Z$5]*MAGNET([.S$24]+[.$BB98])+[.T$28]*[.$Z$5]*MAGNET([.T$24]+[.$BB98])+[.U$28]*[.$Z$5]*MAGNET([.U$24]+[.$BB98])+[.V$28]*[.$Z$5]*MAGNET([.V$24]+[.$BB98])+[.W$28]*[.$Z$5]*MAGNET([.W$24]+[.$BB98])+[.X$28]*[.$Z$5]*MAGNET([.X$24]+[.$BB98])+[.Y$28]*[.$Z$5]*MAGNET([.Y$24]+[.$BB98])+[.Z$28]*[.$Z$5]*MAGNET([.Z$24]+[.$BB98])+[.AA$28]*[.$Z$5]*MAGNET([.AA$24]+[.$BB98])+[.AB$28]*[.$Z$5]*MAGNET([.AB$24]+[.$BB98])+[.AC$28]*[.$Z$5]*MAGNET([.AC$24]+[.$BB98])+[.AD$28]*[.$Z$5]*MAGNET([.AD$24]+[.$BB98])+[.AE$28]*[.$Z$5]*MAGNET([.AE$24]+[.$BB98])+[.AF$28]*[.$Z$5]*MAGNET([.AF$24]+[.$BB98])+[.AG$28]*[.$Z$5]*MAGNET([.AG$24]+[.$BB98])+[.D$28]*[.$Z$5]*MAGNET([.D$24]+[.$BB98])+[.AH$28]*[.$Z$5]*MAGNET([.AH$24]+[.BB98]) +[.AI$28]*[.$Z$5]*MAGNET([.AI$24]+[.BB98]) +[.AJ$28]*[.$Z$5]*MAGNET([.AJ$24]+[.BB98]) +[.AK$28]*[.$Z$5]*MAGNET([.AK$24]+[.BB98]) +[.AL$28]*[.$Z$5]*MAGNET([.AL$24]+[.BB98]) +[.AM$28]*[.$Z$5]*MAGNET([.AM$24]+[.BB98]) +[.AN$28]*[.$Z$5]*MAGNET([.AN$24]+[.BB98]) +[.AO$28]*[.$Z$5]*MAGNET([.AO$24]+[.BB98]) +[.AP$28]*[.$Z$5]*MAGNET([.AP$24]+[.$BB98])&#10;+[.AQ$28]*[.$Z$5]*MAGNET([.AQ$24]+[.$BB98])&#10;+[.AR$28]*[.$Z$5]*MAGNET([.AR$24]+[.$BB98])&#10;+[.AS$28]*[.$Z$5]*MAGNET([.AS$24]+[.$BB98])&#10;+[.AT$28]*[.$Z$5]*MAGNET([.AT$24]+[.$BB98])&#10;+[.AU$28]*[.$Z$5]*MAGNET([.AU$24]+[.$BB98])&#10;+[.AV$28]*[.$Z$5]*MAGNET([.AV$24]+[.$BB98])&#10;+[.AW$28]*[.$Z$5]*MAGNET([.AW$24]+[.$BB98])&#10;+[.AX$28]*[.$Z$5]*MAGNET([.AX$24]+[.$BB98])&#10;+[.AY$28]*[.$Z$5]*MAGNET([.AY$24]+[.$BB98]) +RAND()*[.$BF$13]" office:value-type="float" office:value="-5.36935705569926" calcext:value-type="float">
            <text:p>-5.36935705569926</text:p>
          </table:table-cell>
          <table:table-cell table:style-name="ce71" table:formula="of:=[.E$29]*[.$Z$5]*MAGNET([.E$24]+[.$BB98])+[.F$29]*[.$Z$5]*MAGNET([.F$24]+[.$BB98])+[.G$29]*[.$Z$5]*MAGNET([.G$24]+[.$BB98])+[.H$29]*[.$Z$5]*MAGNET([.H$24]+[.$BB98])+[.I$29]*[.$Z$5]*MAGNET([.I$24]+[.$BB98])+[.J$29]*[.$Z$5]*MAGNET([.J$24]+[.$BB98])+[.K$29]*[.$Z$5]*MAGNET([.K$24]+[.$BB98])+[.L$29]*[.$Z$5]*MAGNET([.L$24]+[.$BB98])+[.M$29]*[.$Z$5]*MAGNET([.M$24]+[.$BB98])+[.N$29]*[.$Z$5]*MAGNET([.N$24]+[.$BB98])+[.O$29]*[.$Z$5]*MAGNET([.O$24]+[.$BB98])+[.P$29]*[.$Z$5]*MAGNET([.P$24]+[.$BB98])+[.Q$29]*[.$Z$5]*MAGNET([.Q$24]+[.$BB98])+[.R$29]*[.$Z$5]*MAGNET([.R$24]+[.$BB98])+[.S$29]*[.$Z$5]*MAGNET([.S$24]+[.$BB98])+[.T$29]*[.$Z$5]*MAGNET([.T$24]+[.$BB98])+[.U$29]*[.$Z$5]*MAGNET([.U$24]+[.$BB98])+[.V$29]*[.$Z$5]*MAGNET([.V$24]+[.$BB98])+[.W$29]*[.$Z$5]*MAGNET([.W$24]+[.$BB98])+[.X$29]*[.$Z$5]*MAGNET([.X$24]+[.$BB98])+[.Y$29]*[.$Z$5]*MAGNET([.Y$24]+[.$BB98])+[.Z$29]*[.$Z$5]*MAGNET([.Z$24]+[.$BB98])+[.AA$29]*[.$Z$5]*MAGNET([.AA$24]+[.$BB98])+[.AB$29]*[.$Z$5]*MAGNET([.AB$24]+[.$BB98])+[.AC$29]*[.$Z$5]*MAGNET([.AC$24]+[.$BB98])+[.AD$29]*[.$Z$5]*MAGNET([.AD$24]+[.$BB98])+[.AE$29]*[.$Z$5]*MAGNET([.AE$24]+[.$BB98])+[.AF$29]*[.$Z$5]*MAGNET([.AF$24]+[.$BB98])+[.AG$29]*[.$Z$5]*MAGNET([.AG$24]+[.$BB98])+[.D$29]*[.$Z$5]*MAGNET([.D$24]+[.$BB98])+[.AH$29]*[.$Z$5]*MAGNET([.AH$24]+[.BB98]) +[.AI$29]*[.$Z$5]*MAGNET([.AI$24]+[.BB98]) +[.AJ$29]*[.$Z$5]*MAGNET([.AJ$24]+[.BB98]) +[.AK$29]*[.$Z$5]*MAGNET([.AK$24]+[.BB98]) +[.AL$29]*[.$Z$5]*MAGNET([.AL$24]+[.BB98]) +[.AM$29]*[.$Z$5]*MAGNET([.AM$24]+[.BB98]) +[.AN$29]*[.$Z$5]*MAGNET([.AN$24]+[.BB98]) +[.AO$29]*[.$Z$5]*MAGNET([.AO$24]+[.BB98]) +[.AP$29]*[.$Z$5]*MAGNET([.AP$24]+[.$BB98])&#10;+[.AQ$29]*[.$Z$5]*MAGNET([.AQ$24]+[.$BB98])&#10;+[.AR$29]*[.$Z$5]*MAGNET([.AR$24]+[.$BB98])&#10;+[.AS$29]*[.$Z$5]*MAGNET([.AS$24]+[.$BB98])&#10;+[.AT$29]*[.$Z$5]*MAGNET([.AT$24]+[.$BB98])&#10;+[.AU$29]*[.$Z$5]*MAGNET([.AU$24]+[.$BB98])&#10;+[.AV$29]*[.$Z$5]*MAGNET([.AV$24]+[.$BB98])&#10;+[.AW$29]*[.$Z$5]*MAGNET([.AW$24]+[.$BB98])&#10;+[.AX$29]*[.$Z$5]*MAGNET([.AX$24]+[.$BB98])&#10;+[.AY$29]*[.$Z$5]*MAGNET([.AY$24]+[.$BB98]) +RAND()*[.$BG$13]" office:value-type="float" office:value="27.21045296841" calcext:value-type="float">
            <text:p>27.21045296841</text:p>
          </table:table-cell>
          <table:table-cell table:style-name="ce71" table:formula="of:=[.E$30]*[.$Z$5]*MAGNET([.E$24]+[.$BB98])+[.F$30]*[.$Z$5]*MAGNET([.F$24]+[.$BB98])+[.G$30]*[.$Z$5]*MAGNET([.G$24]+[.$BB98])+[.H$30]*[.$Z$5]*MAGNET([.H$24]+[.$BB98])+[.I$30]*[.$Z$5]*MAGNET([.I$24]+[.$BB98])+[.J$30]*[.$Z$5]*MAGNET([.J$24]+[.$BB98])+[.K$30]*[.$Z$5]*MAGNET([.K$24]+[.$BB98])+[.L$30]*[.$Z$5]*MAGNET([.L$24]+[.$BB98])+[.M$30]*[.$Z$5]*MAGNET([.M$24]+[.$BB98])+[.N$30]*[.$Z$5]*MAGNET([.N$24]+[.$BB98])+[.O$30]*[.$Z$5]*MAGNET([.O$24]+[.$BB98])+[.P$30]*[.$Z$5]*MAGNET([.P$24]+[.$BB98])+[.Q$30]*[.$Z$5]*MAGNET([.Q$24]+[.$BB98])+[.R$30]*[.$Z$5]*MAGNET([.R$24]+[.$BB98])+[.S$30]*[.$Z$5]*MAGNET([.S$24]+[.$BB98])+[.T$30]*[.$Z$5]*MAGNET([.T$24]+[.$BB98])+[.U$30]*[.$Z$5]*MAGNET([.U$24]+[.$BB98])+[.V$30]*[.$Z$5]*MAGNET([.V$24]+[.$BB98])+[.W$30]*[.$Z$5]*MAGNET([.W$24]+[.$BB98])+[.X$30]*[.$Z$5]*MAGNET([.X$24]+[.$BB98])+[.Y$30]*[.$Z$5]*MAGNET([.Y$24]+[.$BB98])+[.Z$30]*[.$Z$5]*MAGNET([.Z$24]+[.$BB98])+[.AA$30]*[.$Z$5]*MAGNET([.AA$24]+[.$BB98])+[.AB$30]*[.$Z$5]*MAGNET([.AB$24]+[.$BB98])+[.AC$30]*[.$Z$5]*MAGNET([.AC$24]+[.$BB98])+[.AD$30]*[.$Z$5]*MAGNET([.AD$24]+[.$BB98])+[.AE$30]*[.$Z$5]*MAGNET([.AE$24]+[.$BB98])+[.AF$30]*[.$Z$5]*MAGNET([.AF$24]+[.$BB98])+[.AG$30]*[.$Z$5]*MAGNET([.AG$24]+[.$BB98])+[.D$30]*[.$Z$5]*MAGNET([.D$24]+[.$BB98])+[.AH$30]*[.$Z$5]*MAGNET([.AH$24]+[.BB98]) +[.AI$30]*[.$Z$5]*MAGNET([.AI$24]+[.BB98]) +[.AJ$30]*[.$Z$5]*MAGNET([.AJ$24]+[.BB98]) +[.AK$30]*[.$Z$5]*MAGNET([.AK$24]+[.BB98]) +[.AL$30]*[.$Z$5]*MAGNET([.AL$24]+[.BB98]) +[.AM$30]*[.$Z$5]*MAGNET([.AM$24]+[.BB98]) +[.AN$30]*[.$Z$5]*MAGNET([.AN$24]+[.BB98]) +[.AO$30]*[.$Z$5]*MAGNET([.AO$24]+[.BB98]) +[.AP$30]*[.$Z$5]*MAGNET([.AP$24]+[.$BB98])&#10;+[.AQ$30]*[.$Z$5]*MAGNET([.AQ$24]+[.$BB98])&#10;+[.AR$30]*[.$Z$5]*MAGNET([.AR$24]+[.$BB98])&#10;+[.AS$30]*[.$Z$5]*MAGNET([.AS$24]+[.$BB98])&#10;+[.AT$30]*[.$Z$5]*MAGNET([.AT$24]+[.$BB98])&#10;+[.AU$30]*[.$Z$5]*MAGNET([.AU$24]+[.$BB98])&#10;+[.AV$30]*[.$Z$5]*MAGNET([.AV$24]+[.$BB98])&#10;+[.AW$30]*[.$Z$5]*MAGNET([.AW$24]+[.$BB98])&#10;+[.AX$30]*[.$Z$5]*MAGNET([.AX$24]+[.$BB98])&#10;+[.AY$30]*[.$Z$5]*MAGNET([.AY$24]+[.$BB98]) +RAND()*[.$BH$13]" office:value-type="float" office:value="0" calcext:value-type="float">
            <text:p>0</text:p>
          </table:table-cell>
          <table:table-cell table:style-name="ce71" table:formula="of:=[.E$31]*[.$Z$5]*MAGNET([.E$24]+[.$BB98])+[.F$31]*[.$Z$5]*MAGNET([.F$24]+[.$BB98])+[.G$31]*[.$Z$5]*MAGNET([.G$24]+[.$BB98])+[.H$31]*[.$Z$5]*MAGNET([.H$24]+[.$BB98])+[.I$31]*[.$Z$5]*MAGNET([.I$24]+[.$BB98])+[.J$31]*[.$Z$5]*MAGNET([.J$24]+[.$BB98])+[.K$31]*[.$Z$5]*MAGNET([.K$24]+[.$BB98])+[.L$31]*[.$Z$5]*MAGNET([.L$24]+[.$BB98])+[.M$31]*[.$Z$5]*MAGNET([.M$24]+[.$BB98])+[.N$31]*[.$Z$5]*MAGNET([.N$24]+[.$BB98])+[.O$31]*[.$Z$5]*MAGNET([.O$24]+[.$BB98])+[.P$31]*[.$Z$5]*MAGNET([.P$24]+[.$BB98])+[.Q$31]*[.$Z$5]*MAGNET([.Q$24]+[.$BB98])+[.R$31]*[.$Z$5]*MAGNET([.R$24]+[.$BB98])+[.S$31]*[.$Z$5]*MAGNET([.S$24]+[.$BB98])+[.T$31]*[.$Z$5]*MAGNET([.T$24]+[.$BB98])+[.U$31]*[.$Z$5]*MAGNET([.U$24]+[.$BB98])+[.V$31]*[.$Z$5]*MAGNET([.V$24]+[.$BB98])+[.W$31]*[.$Z$5]*MAGNET([.W$24]+[.$BB98])+[.X$31]*[.$Z$5]*MAGNET([.X$24]+[.$BB98])+[.Y$31]*[.$Z$5]*MAGNET([.Y$24]+[.$BB98])+[.Z$31]*[.$Z$5]*MAGNET([.Z$24]+[.$BB98])+[.AA$31]*[.$Z$5]*MAGNET([.AA$24]+[.$BB98])+[.AB$31]*[.$Z$5]*MAGNET([.AB$24]+[.$BB98])+[.AC$31]*[.$Z$5]*MAGNET([.AC$24]+[.$BB98])+[.AD$31]*[.$Z$5]*MAGNET([.AD$24]+[.$BB98])+[.AE$31]*[.$Z$5]*MAGNET([.AE$24]+[.$BB98])+[.AF$31]*[.$Z$5]*MAGNET([.AF$24]+[.$BB98])+[.AG$31]*[.$Z$5]*MAGNET([.AG$24]+[.$BB98])+[.D$31]*[.$Z$5]*MAGNET([.D$24]+[.$BB98])+[.AH$31]*[.$Z$5]*MAGNET([.AH$24]+[.BB98]) +[.AI$31]*[.$Z$5]*MAGNET([.AI$24]+[.BB98]) +[.AJ$31]*[.$Z$5]*MAGNET([.AJ$24]+[.BB98]) +[.AK$31]*[.$Z$5]*MAGNET([.AK$24]+[.BB98]) +[.AL$31]*[.$Z$5]*MAGNET([.AL$24]+[.BB98]) +[.AM$31]*[.$Z$5]*MAGNET([.AM$24]+[.BB98]) +[.AN$31]*[.$Z$5]*MAGNET([.AN$24]+[.BB98]) +[.AO$31]*[.$Z$5]*MAGNET([.AO$24]+[.BB98]) +[.AP$31]*[.$Z$5]*MAGNET([.AP$24]+[.$BB98])&#10;+[.AQ$31]*[.$Z$5]*MAGNET([.AQ$24]+[.$BB98])&#10;+[.AR$31]*[.$Z$5]*MAGNET([.AR$24]+[.$BB98])&#10;+[.AS$31]*[.$Z$5]*MAGNET([.AS$24]+[.$BB98])&#10;+[.AT$31]*[.$Z$5]*MAGNET([.AT$24]+[.$BB98])&#10;+[.AU$31]*[.$Z$5]*MAGNET([.AU$24]+[.$BB98])&#10;+[.AV$31]*[.$Z$5]*MAGNET([.AV$24]+[.$BB98])&#10;+[.AW$31]*[.$Z$5]*MAGNET([.AW$24]+[.$BB98])&#10;+[.AX$31]*[.$Z$5]*MAGNET([.AX$24]+[.$BB98])&#10;+[.AY$31]*[.$Z$5]*MAGNET([.AY$24]+[.$BB98]) +RAND()*[.$BI$13]" office:value-type="float" office:value="0" calcext:value-type="float">
            <text:p>0</text:p>
          </table:table-cell>
          <table:table-cell table:style-name="ce71" table:formula="of:=[.E$32]*[.$Z$5]*MAGNET([.E$24]+[.$BB98])+[.F$32]*[.$Z$5]*MAGNET([.F$24]+[.$BB98])+[.G$32]*[.$Z$5]*MAGNET([.G$24]+[.$BB98])+[.H$32]*[.$Z$5]*MAGNET([.H$24]+[.$BB98])+[.I$32]*[.$Z$5]*MAGNET([.I$24]+[.$BB98])+[.J$32]*[.$Z$5]*MAGNET([.J$24]+[.$BB98])+[.K$32]*[.$Z$5]*MAGNET([.K$24]+[.$BB98])+[.L$32]*[.$Z$5]*MAGNET([.L$24]+[.$BB98])+[.M$32]*[.$Z$5]*MAGNET([.M$24]+[.$BB98])+[.N$32]*[.$Z$5]*MAGNET([.N$24]+[.$BB98])+[.O$32]*[.$Z$5]*MAGNET([.O$24]+[.$BB98])+[.P$32]*[.$Z$5]*MAGNET([.P$24]+[.$BB98])+[.Q$32]*[.$Z$5]*MAGNET([.Q$24]+[.$BB98])+[.R$32]*[.$Z$5]*MAGNET([.R$24]+[.$BB98])+[.S$32]*[.$Z$5]*MAGNET([.S$24]+[.$BB98])+[.T$32]*[.$Z$5]*MAGNET([.T$24]+[.$BB98])+[.U$32]*[.$Z$5]*MAGNET([.U$24]+[.$BB98])+[.V$32]*[.$Z$5]*MAGNET([.V$24]+[.$BB98])+[.W$32]*[.$Z$5]*MAGNET([.W$24]+[.$BB98])+[.X$32]*[.$Z$5]*MAGNET([.X$24]+[.$BB98])+[.Y$32]*[.$Z$5]*MAGNET([.Y$24]+[.$BB98])+[.Z$32]*[.$Z$5]*MAGNET([.Z$24]+[.$BB98])+[.AA$32]*[.$Z$5]*MAGNET([.AA$24]+[.$BB98])+[.AB$32]*[.$Z$5]*MAGNET([.AB$24]+[.$BB98])+[.AC$32]*[.$Z$5]*MAGNET([.AC$24]+[.$BB98])+[.AD$32]*[.$Z$5]*MAGNET([.AD$24]+[.$BB98])+[.AE$32]*[.$Z$5]*MAGNET([.AE$24]+[.$BB98])+[.AF$32]*[.$Z$5]*MAGNET([.AF$24]+[.$BB98])+[.AG$32]*[.$Z$5]*MAGNET([.AG$24]+[.$BB98])+[.D$32]*[.$Z$5]*MAGNET([.D$24]+[.$BB98])+[.AH$32]*[.$Z$5]*MAGNET([.AH$24]+[.BB98]) +[.AI$32]*[.$Z$5]*MAGNET([.AI$24]+[.BB98]) +[.AJ$32]*[.$Z$5]*MAGNET([.AJ$24]+[.BB98]) +[.AK$32]*[.$Z$5]*MAGNET([.AK$24]+[.BB98]) +[.AL$32]*[.$Z$5]*MAGNET([.AL$24]+[.BB98]) +[.AM$32]*[.$Z$5]*MAGNET([.AM$24]+[.BB98]) +[.AN$32]*[.$Z$5]*MAGNET([.AN$24]+[.BB98]) +[.AO$32]*[.$Z$5]*MAGNET([.AO$24]+[.BB98]) +[.AP$32]*[.$Z$5]*MAGNET([.AP$24]+[.$BB98])&#10;+[.AQ$32]*[.$Z$5]*MAGNET([.AQ$24]+[.$BB98])&#10;+[.AR$32]*[.$Z$5]*MAGNET([.AR$24]+[.$BB98])&#10;+[.AS$32]*[.$Z$5]*MAGNET([.AS$24]+[.$BB98])&#10;+[.AT$32]*[.$Z$5]*MAGNET([.AT$24]+[.$BB98])&#10;+[.AU$32]*[.$Z$5]*MAGNET([.AU$24]+[.$BB98])&#10;+[.AV$32]*[.$Z$5]*MAGNET([.AV$24]+[.$BB98])&#10;+[.AW$32]*[.$Z$5]*MAGNET([.AW$24]+[.$BB98])&#10;+[.AX$32]*[.$Z$5]*MAGNET([.AX$24]+[.$BB98])&#10;+[.AY$32]*[.$Z$5]*MAGNET([.AY$24]+[.$BB9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8]+0.002" office:value-type="float" office:value="0.168" calcext:value-type="float">
            <text:p>0.168</text:p>
          </table:table-cell>
          <table:table-cell table:formula="of:=[.BA99]*[.$D$6]" office:value-type="float" office:value="8.44460105284937" calcext:value-type="float">
            <text:p>8.445</text:p>
          </table:table-cell>
          <table:table-cell table:formula="of:=[.D$25]*[.$Z$5]*MAGNET([.D$24]+[.BB99])+[.E$25]*[.$Z$5]*MAGNET([.E$24]+[.BB99])+[.F$25]*[.$Z$5]*MAGNET([.F$24]+[.BB99])+[.G$25]*[.$Z$5]*MAGNET([.G$24]+[.BB99])+[.H$25]*[.$Z$5]*MAGNET([.H$24]+[.BB99])+[.I$25]*[.$Z$5]*MAGNET([.I$24]+[.BB99])+[.J$25]*[.$Z$5]*MAGNET([.J$24]+[.BB99])+[.K$25]*[.$Z$5]*MAGNET([.K$24]+[.BB99])+[.L$25]*[.$Z$5]*MAGNET([.L$24]+[.BB99])+[.M$25]*[.$Z$5]*MAGNET([.M$24]+[.BB99])+[.N$25]*[.$Z$5]*MAGNET([.N$24]+[.BB99])+[.O$25]*[.$Z$5]*MAGNET([.O$24]+[.BB99])+[.P$25]*[.$Z$5]*MAGNET([.P$24]+[.BB99])+[.Q$25]*[.$Z$5]*MAGNET([.Q$24]+[.BB99])+[.R$25]*[.$Z$5]*MAGNET([.R$24]+[.BB99])+[.S$25]*[.$Z$5]*MAGNET([.S$24]+[.BB99])+[.T$25]*[.$Z$5]*MAGNET([.T$24]+[.BB99])+[.U$25]*[.$Z$5]*MAGNET([.U$24]+[.BB99])+[.V$25]*[.$Z$5]*MAGNET([.V$24]+[.BB99])+[.W$25]*[.$Z$5]*MAGNET([.W$24]+[.BB99])+[.X$25]*[.$Z$5]*MAGNET([.X$24]+[.BB99])+[.Y$25]*[.$Z$5]*MAGNET([.Y$24]+[.BB99])+[.Z$25]*[.$Z$5]*MAGNET([.Z$24]+[.BB99])+[.AA$25]*[.$Z$5]*MAGNET([.AA$24]+[.BB99])+[.AB$25]*[.$Z$5]*MAGNET([.AB$24]+[.BB99])+[.AC$25]*[.$Z$5]*MAGNET([.AC$24]+[.BB99])+[.AD$25]*[.$Z$5]*MAGNET([.AD$24]+[.BB99])+[.AE$25]*[.$Z$5]*MAGNET([.AE$24]+[.BB99])+[.AF$25]*[.$Z$5]*MAGNET([.AF$24]+[.BB99])+[.AG$25]*[.$Z$5]*MAGNET([.AG$24]+[.BB99])+[.AH$25]*[.$Z$5]*MAGNET([.AH$24]+[.BB99]) +[.AI$25]*[.$Z$5]*MAGNET([.AI$24]+[.BB99]) +[.AJ$25]*[.$Z$5]*MAGNET([.AJ$24]+[.BB99]) +[.AK$25]*[.$Z$5]*MAGNET([.AK$24]+[.BB99]) +[.AL$25]*[.$Z$5]*MAGNET([.AL$24]+[.BB99]) +[.AM$25]*[.$Z$5]*MAGNET([.AM$24]+[.BB99]) +[.AN$25]*[.$Z$5]*MAGNET([.AN$24]+[.BB99]) +[.AO$25]*[.$Z$5]*MAGNET([.AO$24]+[.BB99])+RAND()*[.$BC$13]+[.AP$25]*[.$Z$5]*MAGNET([.AP$24]+[.BB99])&#10;+[.AQ$25]*[.$Z$5]*MAGNET([.AQ$24]+[.BB99])&#10;+[.AR$25]*[.$Z$5]*MAGNET([.AR$24]+[.BB99])&#10;+[.AS$25]*[.$Z$5]*MAGNET([.AS$24]+[.BB99])&#10;+[.AT$25]*[.$Z$5]*MAGNET([.AT$24]+[.BB99])&#10;+[.AU$25]*[.$Z$5]*MAGNET([.AU$24]+[.BB99])&#10;+[.AV$25]*[.$Z$5]*MAGNET([.AV$24]+[.BB99])&#10;+[.AW$25]*[.$Z$5]*MAGNET([.AW$24]+[.BB99])&#10;+[.AX$25]*[.$Z$5]*MAGNET([.AX$24]+[.BB99])&#10;+[.AY$25]*[.$Z$5]*MAGNET([.AY$24]+[.BB99])" office:value-type="float" office:value="118.197142662084" calcext:value-type="float">
            <text:p>118.20</text:p>
          </table:table-cell>
          <table:table-cell table:style-name="ce70" table:formula="of:=[.E$26]*[.$Z$5]*MAGNET([.E$24]+[.$BB99])+[.F$26]*[.$Z$5]*MAGNET([.F$24]+[.$BB99])+[.G$26]*[.$Z$5]*MAGNET([.G$24]+[.$BB99])+[.H$26]*[.$Z$5]*MAGNET([.H$24]+[.$BB99])+[.I$26]*[.$Z$5]*MAGNET([.I$24]+[.$BB99])+[.J$26]*[.$Z$5]*MAGNET([.J$24]+[.$BB99])+[.K$26]*[.$Z$5]*MAGNET([.K$24]+[.$BB99])+[.L$26]*[.$Z$5]*MAGNET([.L$24]+[.$BB99])+[.M$26]*[.$Z$5]*MAGNET([.M$24]+[.$BB99])+[.N$26]*[.$Z$5]*MAGNET([.N$24]+[.$BB99])+[.O$26]*[.$Z$5]*MAGNET([.O$24]+[.$BB99])+[.P$26]*[.$Z$5]*MAGNET([.P$24]+[.$BB99])+[.Q$26]*[.$Z$5]*MAGNET([.Q$24]+[.$BB99])+[.R$26]*[.$Z$5]*MAGNET([.R$24]+[.$BB99])+[.S$26]*[.$Z$5]*MAGNET([.S$24]+[.$BB99])+[.T$26]*[.$Z$5]*MAGNET([.T$24]+[.$BB99])+[.U$26]*[.$Z$5]*MAGNET([.U$24]+[.$BB99])+[.V$26]*[.$Z$5]*MAGNET([.V$24]+[.$BB99])+[.W$26]*[.$Z$5]*MAGNET([.W$24]+[.$BB99])+[.X$26]*[.$Z$5]*MAGNET([.X$24]+[.$BB99])+[.Y$26]*[.$Z$5]*MAGNET([.Y$24]+[.$BB99])+[.Z$26]*[.$Z$5]*MAGNET([.Z$24]+[.$BB99])+[.AA$26]*[.$Z$5]*MAGNET([.AA$24]+[.$BB99])+[.AB$26]*[.$Z$5]*MAGNET([.AB$24]+[.$BB99])+[.AC$26]*[.$Z$5]*MAGNET([.AC$24]+[.$BB99])+[.AD$26]*[.$Z$5]*MAGNET([.AD$24]+[.$BB99])+[.AE$26]*[.$Z$5]*MAGNET([.AE$24]+[.$BB99])+[.AF$26]*[.$Z$5]*MAGNET([.AF$24]+[.$BB99])+[.AG$26]*[.$Z$5]*MAGNET([.AG$24]+[.$BB99])+[.D$26]*[.$Z$5]*MAGNET([.D$24]+[.$BB99])+[.AH$26]*[.$Z$5]*MAGNET([.AH$24]+[.BB99]) +[.AI$26]*[.$Z$5]*MAGNET([.AI$24]+[.BB99]) +[.AJ$26]*[.$Z$5]*MAGNET([.AJ$24]+[.BB99]) +[.AK$26]*[.$Z$5]*MAGNET([.AK$24]+[.BB99]) +[.AL$26]*[.$Z$5]*MAGNET([.AL$24]+[.BB99]) +[.AM$26]*[.$Z$5]*MAGNET([.AM$24]+[.BB99]) +[.AN$26]*[.$Z$5]*MAGNET([.AN$24]+[.BB99]) +[.AO$26]*[.$Z$5]*MAGNET([.AO$24]+[.BB99]) +[.AP$26]*[.$Z$5]*MAGNET([.AP$24]+[.$BB99])&#10;+[.AQ$26]*[.$Z$5]*MAGNET([.AQ$24]+[.$BB99])&#10;+[.AR$26]*[.$Z$5]*MAGNET([.AR$24]+[.$BB99])&#10;+[.AS$26]*[.$Z$5]*MAGNET([.AS$24]+[.$BB99])&#10;+[.AT$26]*[.$Z$5]*MAGNET([.AT$24]+[.$BB99])&#10;+[.AU$26]*[.$Z$5]*MAGNET([.AU$24]+[.$BB99])&#10;+[.AV$26]*[.$Z$5]*MAGNET([.AV$24]+[.$BB99])&#10;+[.AW$26]*[.$Z$5]*MAGNET([.AW$24]+[.$BB99])&#10;+[.AX$26]*[.$Z$5]*MAGNET([.AX$24]+[.$BB99])&#10;+[.AY$26]*[.$Z$5]*MAGNET([.AY$24]+[.$BB99]) +RAND()*[.$BD$13]" office:value-type="float" office:value="-65.5095434462689" calcext:value-type="float">
            <text:p>-65.51</text:p>
          </table:table-cell>
          <table:table-cell table:style-name="ce71" table:formula="of:=[.E$27]*[.$Z$5]*MAGNET([.E$24]+[.$BB99])+[.F$27]*[.$Z$5]*MAGNET([.F$24]+[.$BB99])+[.G$27]*[.$Z$5]*MAGNET([.G$24]+[.$BB99])+[.H$27]*[.$Z$5]*MAGNET([.H$24]+[.$BB99])+[.I$27]*[.$Z$5]*MAGNET([.I$24]+[.$BB99])+[.J$27]*[.$Z$5]*MAGNET([.J$24]+[.$BB99])+[.K$27]*[.$Z$5]*MAGNET([.K$24]+[.$BB99])+[.L$27]*[.$Z$5]*MAGNET([.L$24]+[.$BB99])+[.M$27]*[.$Z$5]*MAGNET([.M$24]+[.$BB99])+[.N$27]*[.$Z$5]*MAGNET([.N$24]+[.$BB99])+[.O$27]*[.$Z$5]*MAGNET([.O$24]+[.$BB99])+[.P$27]*[.$Z$5]*MAGNET([.P$24]+[.$BB99])+[.Q$27]*[.$Z$5]*MAGNET([.Q$24]+[.$BB99])+[.R$27]*[.$Z$5]*MAGNET([.R$24]+[.$BB99])+[.S$27]*[.$Z$5]*MAGNET([.S$24]+[.$BB99])+[.T$27]*[.$Z$5]*MAGNET([.T$24]+[.$BB99])+[.U$27]*[.$Z$5]*MAGNET([.U$24]+[.$BB99])+[.V$27]*[.$Z$5]*MAGNET([.V$24]+[.$BB99])+[.W$27]*[.$Z$5]*MAGNET([.W$24]+[.$BB99])+[.X$27]*[.$Z$5]*MAGNET([.X$24]+[.$BB99])+[.Y$27]*[.$Z$5]*MAGNET([.Y$24]+[.$BB99])+[.Z$27]*[.$Z$5]*MAGNET([.Z$24]+[.$BB99])+[.AA$27]*[.$Z$5]*MAGNET([.AA$24]+[.$BB99])+[.AB$27]*[.$Z$5]*MAGNET([.AB$24]+[.$BB99])+[.AC$27]*[.$Z$5]*MAGNET([.AC$24]+[.$BB99])+[.AD$27]*[.$Z$5]*MAGNET([.AD$24]+[.$BB99])+[.AE$27]*[.$Z$5]*MAGNET([.AE$24]+[.$BB99])+[.AF$27]*[.$Z$5]*MAGNET([.AF$24]+[.$BB99])+[.AG$27]*[.$Z$5]*MAGNET([.AG$24]+[.$BB99])+[.D$27]*[.$Z$5]*MAGNET([.D$24]+[.$BB99])+[.AH$27]*[.$Z$5]*MAGNET([.AH$24]+[.BB99]) +[.AI$27]*[.$Z$5]*MAGNET([.AI$24]+[.BB99]) +[.AJ$27]*[.$Z$5]*MAGNET([.AJ$24]+[.BB99]) +[.AK$27]*[.$Z$5]*MAGNET([.AK$24]+[.BB99]) +[.AL$27]*[.$Z$5]*MAGNET([.AL$24]+[.BB99]) +[.AM$27]*[.$Z$5]*MAGNET([.AM$24]+[.BB99]) +[.AN$27]*[.$Z$5]*MAGNET([.AN$24]+[.BB99]) +[.AO$27]*[.$Z$5]*MAGNET([.AO$24]+[.BB99]) +[.AP$27]*[.$Z$5]*MAGNET([.AP$24]+[.$BB99])&#10;+[.AQ$27]*[.$Z$5]*MAGNET([.AQ$24]+[.$BB99])&#10;+[.AR$27]*[.$Z$5]*MAGNET([.AR$24]+[.$BB99])&#10;+[.AS$27]*[.$Z$5]*MAGNET([.AS$24]+[.$BB99])&#10;+[.AT$27]*[.$Z$5]*MAGNET([.AT$24]+[.$BB99])&#10;+[.AU$27]*[.$Z$5]*MAGNET([.AU$24]+[.$BB99])&#10;+[.AV$27]*[.$Z$5]*MAGNET([.AV$24]+[.$BB99])&#10;+[.AW$27]*[.$Z$5]*MAGNET([.AW$24]+[.$BB99])&#10;+[.AX$27]*[.$Z$5]*MAGNET([.AX$24]+[.$BB99])&#10;+[.AY$27]*[.$Z$5]*MAGNET([.AY$24]+[.$BB99]) +RAND()*[.$BE$13]" office:value-type="float" office:value="-49.9250493949136" calcext:value-type="float">
            <text:p>-49.9250493949136</text:p>
          </table:table-cell>
          <table:table-cell table:style-name="ce71" table:formula="of:=[.E$28]*[.$Z$5]*MAGNET([.E$24]+[.$BB99])+[.F$28]*[.$Z$5]*MAGNET([.F$24]+[.$BB99])+[.G$28]*[.$Z$5]*MAGNET([.G$24]+[.$BB99])+[.H$28]*[.$Z$5]*MAGNET([.H$24]+[.$BB99])+[.I$28]*[.$Z$5]*MAGNET([.I$24]+[.$BB99])+[.J$28]*[.$Z$5]*MAGNET([.J$24]+[.$BB99])+[.K$28]*[.$Z$5]*MAGNET([.K$24]+[.$BB99])+[.L$28]*[.$Z$5]*MAGNET([.L$24]+[.$BB99])+[.M$28]*[.$Z$5]*MAGNET([.M$24]+[.$BB99])+[.N$28]*[.$Z$5]*MAGNET([.N$24]+[.$BB99])+[.O$28]*[.$Z$5]*MAGNET([.O$24]+[.$BB99])+[.P$28]*[.$Z$5]*MAGNET([.P$24]+[.$BB99])+[.Q$28]*[.$Z$5]*MAGNET([.Q$24]+[.$BB99])+[.R$28]*[.$Z$5]*MAGNET([.R$24]+[.$BB99])+[.S$28]*[.$Z$5]*MAGNET([.S$24]+[.$BB99])+[.T$28]*[.$Z$5]*MAGNET([.T$24]+[.$BB99])+[.U$28]*[.$Z$5]*MAGNET([.U$24]+[.$BB99])+[.V$28]*[.$Z$5]*MAGNET([.V$24]+[.$BB99])+[.W$28]*[.$Z$5]*MAGNET([.W$24]+[.$BB99])+[.X$28]*[.$Z$5]*MAGNET([.X$24]+[.$BB99])+[.Y$28]*[.$Z$5]*MAGNET([.Y$24]+[.$BB99])+[.Z$28]*[.$Z$5]*MAGNET([.Z$24]+[.$BB99])+[.AA$28]*[.$Z$5]*MAGNET([.AA$24]+[.$BB99])+[.AB$28]*[.$Z$5]*MAGNET([.AB$24]+[.$BB99])+[.AC$28]*[.$Z$5]*MAGNET([.AC$24]+[.$BB99])+[.AD$28]*[.$Z$5]*MAGNET([.AD$24]+[.$BB99])+[.AE$28]*[.$Z$5]*MAGNET([.AE$24]+[.$BB99])+[.AF$28]*[.$Z$5]*MAGNET([.AF$24]+[.$BB99])+[.AG$28]*[.$Z$5]*MAGNET([.AG$24]+[.$BB99])+[.D$28]*[.$Z$5]*MAGNET([.D$24]+[.$BB99])+[.AH$28]*[.$Z$5]*MAGNET([.AH$24]+[.BB99]) +[.AI$28]*[.$Z$5]*MAGNET([.AI$24]+[.BB99]) +[.AJ$28]*[.$Z$5]*MAGNET([.AJ$24]+[.BB99]) +[.AK$28]*[.$Z$5]*MAGNET([.AK$24]+[.BB99]) +[.AL$28]*[.$Z$5]*MAGNET([.AL$24]+[.BB99]) +[.AM$28]*[.$Z$5]*MAGNET([.AM$24]+[.BB99]) +[.AN$28]*[.$Z$5]*MAGNET([.AN$24]+[.BB99]) +[.AO$28]*[.$Z$5]*MAGNET([.AO$24]+[.BB99]) +[.AP$28]*[.$Z$5]*MAGNET([.AP$24]+[.$BB99])&#10;+[.AQ$28]*[.$Z$5]*MAGNET([.AQ$24]+[.$BB99])&#10;+[.AR$28]*[.$Z$5]*MAGNET([.AR$24]+[.$BB99])&#10;+[.AS$28]*[.$Z$5]*MAGNET([.AS$24]+[.$BB99])&#10;+[.AT$28]*[.$Z$5]*MAGNET([.AT$24]+[.$BB99])&#10;+[.AU$28]*[.$Z$5]*MAGNET([.AU$24]+[.$BB99])&#10;+[.AV$28]*[.$Z$5]*MAGNET([.AV$24]+[.$BB99])&#10;+[.AW$28]*[.$Z$5]*MAGNET([.AW$24]+[.$BB99])&#10;+[.AX$28]*[.$Z$5]*MAGNET([.AX$24]+[.$BB99])&#10;+[.AY$28]*[.$Z$5]*MAGNET([.AY$24]+[.$BB99]) +RAND()*[.$BF$13]" office:value-type="float" office:value="-3.99001770409296" calcext:value-type="float">
            <text:p>-3.99001770409296</text:p>
          </table:table-cell>
          <table:table-cell table:style-name="ce71" table:formula="of:=[.E$29]*[.$Z$5]*MAGNET([.E$24]+[.$BB99])+[.F$29]*[.$Z$5]*MAGNET([.F$24]+[.$BB99])+[.G$29]*[.$Z$5]*MAGNET([.G$24]+[.$BB99])+[.H$29]*[.$Z$5]*MAGNET([.H$24]+[.$BB99])+[.I$29]*[.$Z$5]*MAGNET([.I$24]+[.$BB99])+[.J$29]*[.$Z$5]*MAGNET([.J$24]+[.$BB99])+[.K$29]*[.$Z$5]*MAGNET([.K$24]+[.$BB99])+[.L$29]*[.$Z$5]*MAGNET([.L$24]+[.$BB99])+[.M$29]*[.$Z$5]*MAGNET([.M$24]+[.$BB99])+[.N$29]*[.$Z$5]*MAGNET([.N$24]+[.$BB99])+[.O$29]*[.$Z$5]*MAGNET([.O$24]+[.$BB99])+[.P$29]*[.$Z$5]*MAGNET([.P$24]+[.$BB99])+[.Q$29]*[.$Z$5]*MAGNET([.Q$24]+[.$BB99])+[.R$29]*[.$Z$5]*MAGNET([.R$24]+[.$BB99])+[.S$29]*[.$Z$5]*MAGNET([.S$24]+[.$BB99])+[.T$29]*[.$Z$5]*MAGNET([.T$24]+[.$BB99])+[.U$29]*[.$Z$5]*MAGNET([.U$24]+[.$BB99])+[.V$29]*[.$Z$5]*MAGNET([.V$24]+[.$BB99])+[.W$29]*[.$Z$5]*MAGNET([.W$24]+[.$BB99])+[.X$29]*[.$Z$5]*MAGNET([.X$24]+[.$BB99])+[.Y$29]*[.$Z$5]*MAGNET([.Y$24]+[.$BB99])+[.Z$29]*[.$Z$5]*MAGNET([.Z$24]+[.$BB99])+[.AA$29]*[.$Z$5]*MAGNET([.AA$24]+[.$BB99])+[.AB$29]*[.$Z$5]*MAGNET([.AB$24]+[.$BB99])+[.AC$29]*[.$Z$5]*MAGNET([.AC$24]+[.$BB99])+[.AD$29]*[.$Z$5]*MAGNET([.AD$24]+[.$BB99])+[.AE$29]*[.$Z$5]*MAGNET([.AE$24]+[.$BB99])+[.AF$29]*[.$Z$5]*MAGNET([.AF$24]+[.$BB99])+[.AG$29]*[.$Z$5]*MAGNET([.AG$24]+[.$BB99])+[.D$29]*[.$Z$5]*MAGNET([.D$24]+[.$BB99])+[.AH$29]*[.$Z$5]*MAGNET([.AH$24]+[.BB99]) +[.AI$29]*[.$Z$5]*MAGNET([.AI$24]+[.BB99]) +[.AJ$29]*[.$Z$5]*MAGNET([.AJ$24]+[.BB99]) +[.AK$29]*[.$Z$5]*MAGNET([.AK$24]+[.BB99]) +[.AL$29]*[.$Z$5]*MAGNET([.AL$24]+[.BB99]) +[.AM$29]*[.$Z$5]*MAGNET([.AM$24]+[.BB99]) +[.AN$29]*[.$Z$5]*MAGNET([.AN$24]+[.BB99]) +[.AO$29]*[.$Z$5]*MAGNET([.AO$24]+[.BB99]) +[.AP$29]*[.$Z$5]*MAGNET([.AP$24]+[.$BB99])&#10;+[.AQ$29]*[.$Z$5]*MAGNET([.AQ$24]+[.$BB99])&#10;+[.AR$29]*[.$Z$5]*MAGNET([.AR$24]+[.$BB99])&#10;+[.AS$29]*[.$Z$5]*MAGNET([.AS$24]+[.$BB99])&#10;+[.AT$29]*[.$Z$5]*MAGNET([.AT$24]+[.$BB99])&#10;+[.AU$29]*[.$Z$5]*MAGNET([.AU$24]+[.$BB99])&#10;+[.AV$29]*[.$Z$5]*MAGNET([.AV$24]+[.$BB99])&#10;+[.AW$29]*[.$Z$5]*MAGNET([.AW$24]+[.$BB99])&#10;+[.AX$29]*[.$Z$5]*MAGNET([.AX$24]+[.$BB99])&#10;+[.AY$29]*[.$Z$5]*MAGNET([.AY$24]+[.$BB99]) +RAND()*[.$BG$13]" office:value-type="float" office:value="21.5189043521461" calcext:value-type="float">
            <text:p>21.5189043521461</text:p>
          </table:table-cell>
          <table:table-cell table:style-name="ce71" table:formula="of:=[.E$30]*[.$Z$5]*MAGNET([.E$24]+[.$BB99])+[.F$30]*[.$Z$5]*MAGNET([.F$24]+[.$BB99])+[.G$30]*[.$Z$5]*MAGNET([.G$24]+[.$BB99])+[.H$30]*[.$Z$5]*MAGNET([.H$24]+[.$BB99])+[.I$30]*[.$Z$5]*MAGNET([.I$24]+[.$BB99])+[.J$30]*[.$Z$5]*MAGNET([.J$24]+[.$BB99])+[.K$30]*[.$Z$5]*MAGNET([.K$24]+[.$BB99])+[.L$30]*[.$Z$5]*MAGNET([.L$24]+[.$BB99])+[.M$30]*[.$Z$5]*MAGNET([.M$24]+[.$BB99])+[.N$30]*[.$Z$5]*MAGNET([.N$24]+[.$BB99])+[.O$30]*[.$Z$5]*MAGNET([.O$24]+[.$BB99])+[.P$30]*[.$Z$5]*MAGNET([.P$24]+[.$BB99])+[.Q$30]*[.$Z$5]*MAGNET([.Q$24]+[.$BB99])+[.R$30]*[.$Z$5]*MAGNET([.R$24]+[.$BB99])+[.S$30]*[.$Z$5]*MAGNET([.S$24]+[.$BB99])+[.T$30]*[.$Z$5]*MAGNET([.T$24]+[.$BB99])+[.U$30]*[.$Z$5]*MAGNET([.U$24]+[.$BB99])+[.V$30]*[.$Z$5]*MAGNET([.V$24]+[.$BB99])+[.W$30]*[.$Z$5]*MAGNET([.W$24]+[.$BB99])+[.X$30]*[.$Z$5]*MAGNET([.X$24]+[.$BB99])+[.Y$30]*[.$Z$5]*MAGNET([.Y$24]+[.$BB99])+[.Z$30]*[.$Z$5]*MAGNET([.Z$24]+[.$BB99])+[.AA$30]*[.$Z$5]*MAGNET([.AA$24]+[.$BB99])+[.AB$30]*[.$Z$5]*MAGNET([.AB$24]+[.$BB99])+[.AC$30]*[.$Z$5]*MAGNET([.AC$24]+[.$BB99])+[.AD$30]*[.$Z$5]*MAGNET([.AD$24]+[.$BB99])+[.AE$30]*[.$Z$5]*MAGNET([.AE$24]+[.$BB99])+[.AF$30]*[.$Z$5]*MAGNET([.AF$24]+[.$BB99])+[.AG$30]*[.$Z$5]*MAGNET([.AG$24]+[.$BB99])+[.D$30]*[.$Z$5]*MAGNET([.D$24]+[.$BB99])+[.AH$30]*[.$Z$5]*MAGNET([.AH$24]+[.BB99]) +[.AI$30]*[.$Z$5]*MAGNET([.AI$24]+[.BB99]) +[.AJ$30]*[.$Z$5]*MAGNET([.AJ$24]+[.BB99]) +[.AK$30]*[.$Z$5]*MAGNET([.AK$24]+[.BB99]) +[.AL$30]*[.$Z$5]*MAGNET([.AL$24]+[.BB99]) +[.AM$30]*[.$Z$5]*MAGNET([.AM$24]+[.BB99]) +[.AN$30]*[.$Z$5]*MAGNET([.AN$24]+[.BB99]) +[.AO$30]*[.$Z$5]*MAGNET([.AO$24]+[.BB99]) +[.AP$30]*[.$Z$5]*MAGNET([.AP$24]+[.$BB99])&#10;+[.AQ$30]*[.$Z$5]*MAGNET([.AQ$24]+[.$BB99])&#10;+[.AR$30]*[.$Z$5]*MAGNET([.AR$24]+[.$BB99])&#10;+[.AS$30]*[.$Z$5]*MAGNET([.AS$24]+[.$BB99])&#10;+[.AT$30]*[.$Z$5]*MAGNET([.AT$24]+[.$BB99])&#10;+[.AU$30]*[.$Z$5]*MAGNET([.AU$24]+[.$BB99])&#10;+[.AV$30]*[.$Z$5]*MAGNET([.AV$24]+[.$BB99])&#10;+[.AW$30]*[.$Z$5]*MAGNET([.AW$24]+[.$BB99])&#10;+[.AX$30]*[.$Z$5]*MAGNET([.AX$24]+[.$BB99])&#10;+[.AY$30]*[.$Z$5]*MAGNET([.AY$24]+[.$BB99]) +RAND()*[.$BH$13]" office:value-type="float" office:value="0" calcext:value-type="float">
            <text:p>0</text:p>
          </table:table-cell>
          <table:table-cell table:style-name="ce71" table:formula="of:=[.E$31]*[.$Z$5]*MAGNET([.E$24]+[.$BB99])+[.F$31]*[.$Z$5]*MAGNET([.F$24]+[.$BB99])+[.G$31]*[.$Z$5]*MAGNET([.G$24]+[.$BB99])+[.H$31]*[.$Z$5]*MAGNET([.H$24]+[.$BB99])+[.I$31]*[.$Z$5]*MAGNET([.I$24]+[.$BB99])+[.J$31]*[.$Z$5]*MAGNET([.J$24]+[.$BB99])+[.K$31]*[.$Z$5]*MAGNET([.K$24]+[.$BB99])+[.L$31]*[.$Z$5]*MAGNET([.L$24]+[.$BB99])+[.M$31]*[.$Z$5]*MAGNET([.M$24]+[.$BB99])+[.N$31]*[.$Z$5]*MAGNET([.N$24]+[.$BB99])+[.O$31]*[.$Z$5]*MAGNET([.O$24]+[.$BB99])+[.P$31]*[.$Z$5]*MAGNET([.P$24]+[.$BB99])+[.Q$31]*[.$Z$5]*MAGNET([.Q$24]+[.$BB99])+[.R$31]*[.$Z$5]*MAGNET([.R$24]+[.$BB99])+[.S$31]*[.$Z$5]*MAGNET([.S$24]+[.$BB99])+[.T$31]*[.$Z$5]*MAGNET([.T$24]+[.$BB99])+[.U$31]*[.$Z$5]*MAGNET([.U$24]+[.$BB99])+[.V$31]*[.$Z$5]*MAGNET([.V$24]+[.$BB99])+[.W$31]*[.$Z$5]*MAGNET([.W$24]+[.$BB99])+[.X$31]*[.$Z$5]*MAGNET([.X$24]+[.$BB99])+[.Y$31]*[.$Z$5]*MAGNET([.Y$24]+[.$BB99])+[.Z$31]*[.$Z$5]*MAGNET([.Z$24]+[.$BB99])+[.AA$31]*[.$Z$5]*MAGNET([.AA$24]+[.$BB99])+[.AB$31]*[.$Z$5]*MAGNET([.AB$24]+[.$BB99])+[.AC$31]*[.$Z$5]*MAGNET([.AC$24]+[.$BB99])+[.AD$31]*[.$Z$5]*MAGNET([.AD$24]+[.$BB99])+[.AE$31]*[.$Z$5]*MAGNET([.AE$24]+[.$BB99])+[.AF$31]*[.$Z$5]*MAGNET([.AF$24]+[.$BB99])+[.AG$31]*[.$Z$5]*MAGNET([.AG$24]+[.$BB99])+[.D$31]*[.$Z$5]*MAGNET([.D$24]+[.$BB99])+[.AH$31]*[.$Z$5]*MAGNET([.AH$24]+[.BB99]) +[.AI$31]*[.$Z$5]*MAGNET([.AI$24]+[.BB99]) +[.AJ$31]*[.$Z$5]*MAGNET([.AJ$24]+[.BB99]) +[.AK$31]*[.$Z$5]*MAGNET([.AK$24]+[.BB99]) +[.AL$31]*[.$Z$5]*MAGNET([.AL$24]+[.BB99]) +[.AM$31]*[.$Z$5]*MAGNET([.AM$24]+[.BB99]) +[.AN$31]*[.$Z$5]*MAGNET([.AN$24]+[.BB99]) +[.AO$31]*[.$Z$5]*MAGNET([.AO$24]+[.BB99]) +[.AP$31]*[.$Z$5]*MAGNET([.AP$24]+[.$BB99])&#10;+[.AQ$31]*[.$Z$5]*MAGNET([.AQ$24]+[.$BB99])&#10;+[.AR$31]*[.$Z$5]*MAGNET([.AR$24]+[.$BB99])&#10;+[.AS$31]*[.$Z$5]*MAGNET([.AS$24]+[.$BB99])&#10;+[.AT$31]*[.$Z$5]*MAGNET([.AT$24]+[.$BB99])&#10;+[.AU$31]*[.$Z$5]*MAGNET([.AU$24]+[.$BB99])&#10;+[.AV$31]*[.$Z$5]*MAGNET([.AV$24]+[.$BB99])&#10;+[.AW$31]*[.$Z$5]*MAGNET([.AW$24]+[.$BB99])&#10;+[.AX$31]*[.$Z$5]*MAGNET([.AX$24]+[.$BB99])&#10;+[.AY$31]*[.$Z$5]*MAGNET([.AY$24]+[.$BB99]) +RAND()*[.$BI$13]" office:value-type="float" office:value="0" calcext:value-type="float">
            <text:p>0</text:p>
          </table:table-cell>
          <table:table-cell table:style-name="ce71" table:formula="of:=[.E$32]*[.$Z$5]*MAGNET([.E$24]+[.$BB99])+[.F$32]*[.$Z$5]*MAGNET([.F$24]+[.$BB99])+[.G$32]*[.$Z$5]*MAGNET([.G$24]+[.$BB99])+[.H$32]*[.$Z$5]*MAGNET([.H$24]+[.$BB99])+[.I$32]*[.$Z$5]*MAGNET([.I$24]+[.$BB99])+[.J$32]*[.$Z$5]*MAGNET([.J$24]+[.$BB99])+[.K$32]*[.$Z$5]*MAGNET([.K$24]+[.$BB99])+[.L$32]*[.$Z$5]*MAGNET([.L$24]+[.$BB99])+[.M$32]*[.$Z$5]*MAGNET([.M$24]+[.$BB99])+[.N$32]*[.$Z$5]*MAGNET([.N$24]+[.$BB99])+[.O$32]*[.$Z$5]*MAGNET([.O$24]+[.$BB99])+[.P$32]*[.$Z$5]*MAGNET([.P$24]+[.$BB99])+[.Q$32]*[.$Z$5]*MAGNET([.Q$24]+[.$BB99])+[.R$32]*[.$Z$5]*MAGNET([.R$24]+[.$BB99])+[.S$32]*[.$Z$5]*MAGNET([.S$24]+[.$BB99])+[.T$32]*[.$Z$5]*MAGNET([.T$24]+[.$BB99])+[.U$32]*[.$Z$5]*MAGNET([.U$24]+[.$BB99])+[.V$32]*[.$Z$5]*MAGNET([.V$24]+[.$BB99])+[.W$32]*[.$Z$5]*MAGNET([.W$24]+[.$BB99])+[.X$32]*[.$Z$5]*MAGNET([.X$24]+[.$BB99])+[.Y$32]*[.$Z$5]*MAGNET([.Y$24]+[.$BB99])+[.Z$32]*[.$Z$5]*MAGNET([.Z$24]+[.$BB99])+[.AA$32]*[.$Z$5]*MAGNET([.AA$24]+[.$BB99])+[.AB$32]*[.$Z$5]*MAGNET([.AB$24]+[.$BB99])+[.AC$32]*[.$Z$5]*MAGNET([.AC$24]+[.$BB99])+[.AD$32]*[.$Z$5]*MAGNET([.AD$24]+[.$BB99])+[.AE$32]*[.$Z$5]*MAGNET([.AE$24]+[.$BB99])+[.AF$32]*[.$Z$5]*MAGNET([.AF$24]+[.$BB99])+[.AG$32]*[.$Z$5]*MAGNET([.AG$24]+[.$BB99])+[.D$32]*[.$Z$5]*MAGNET([.D$24]+[.$BB99])+[.AH$32]*[.$Z$5]*MAGNET([.AH$24]+[.BB99]) +[.AI$32]*[.$Z$5]*MAGNET([.AI$24]+[.BB99]) +[.AJ$32]*[.$Z$5]*MAGNET([.AJ$24]+[.BB99]) +[.AK$32]*[.$Z$5]*MAGNET([.AK$24]+[.BB99]) +[.AL$32]*[.$Z$5]*MAGNET([.AL$24]+[.BB99]) +[.AM$32]*[.$Z$5]*MAGNET([.AM$24]+[.BB99]) +[.AN$32]*[.$Z$5]*MAGNET([.AN$24]+[.BB99]) +[.AO$32]*[.$Z$5]*MAGNET([.AO$24]+[.BB99]) +[.AP$32]*[.$Z$5]*MAGNET([.AP$24]+[.$BB99])&#10;+[.AQ$32]*[.$Z$5]*MAGNET([.AQ$24]+[.$BB99])&#10;+[.AR$32]*[.$Z$5]*MAGNET([.AR$24]+[.$BB99])&#10;+[.AS$32]*[.$Z$5]*MAGNET([.AS$24]+[.$BB99])&#10;+[.AT$32]*[.$Z$5]*MAGNET([.AT$24]+[.$BB99])&#10;+[.AU$32]*[.$Z$5]*MAGNET([.AU$24]+[.$BB99])&#10;+[.AV$32]*[.$Z$5]*MAGNET([.AV$24]+[.$BB99])&#10;+[.AW$32]*[.$Z$5]*MAGNET([.AW$24]+[.$BB99])&#10;+[.AX$32]*[.$Z$5]*MAGNET([.AX$24]+[.$BB99])&#10;+[.AY$32]*[.$Z$5]*MAGNET([.AY$24]+[.$BB9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99]+0.002" office:value-type="float" office:value="0.17" calcext:value-type="float">
            <text:p>0.17</text:p>
          </table:table-cell>
          <table:table-cell table:formula="of:=[.BA100]*[.$D$6]" office:value-type="float" office:value="8.54513201776424" calcext:value-type="float">
            <text:p>8.545</text:p>
          </table:table-cell>
          <table:table-cell table:formula="of:=[.D$25]*[.$Z$5]*MAGNET([.D$24]+[.BB100])+[.E$25]*[.$Z$5]*MAGNET([.E$24]+[.BB100])+[.F$25]*[.$Z$5]*MAGNET([.F$24]+[.BB100])+[.G$25]*[.$Z$5]*MAGNET([.G$24]+[.BB100])+[.H$25]*[.$Z$5]*MAGNET([.H$24]+[.BB100])+[.I$25]*[.$Z$5]*MAGNET([.I$24]+[.BB100])+[.J$25]*[.$Z$5]*MAGNET([.J$24]+[.BB100])+[.K$25]*[.$Z$5]*MAGNET([.K$24]+[.BB100])+[.L$25]*[.$Z$5]*MAGNET([.L$24]+[.BB100])+[.M$25]*[.$Z$5]*MAGNET([.M$24]+[.BB100])+[.N$25]*[.$Z$5]*MAGNET([.N$24]+[.BB100])+[.O$25]*[.$Z$5]*MAGNET([.O$24]+[.BB100])+[.P$25]*[.$Z$5]*MAGNET([.P$24]+[.BB100])+[.Q$25]*[.$Z$5]*MAGNET([.Q$24]+[.BB100])+[.R$25]*[.$Z$5]*MAGNET([.R$24]+[.BB100])+[.S$25]*[.$Z$5]*MAGNET([.S$24]+[.BB100])+[.T$25]*[.$Z$5]*MAGNET([.T$24]+[.BB100])+[.U$25]*[.$Z$5]*MAGNET([.U$24]+[.BB100])+[.V$25]*[.$Z$5]*MAGNET([.V$24]+[.BB100])+[.W$25]*[.$Z$5]*MAGNET([.W$24]+[.BB100])+[.X$25]*[.$Z$5]*MAGNET([.X$24]+[.BB100])+[.Y$25]*[.$Z$5]*MAGNET([.Y$24]+[.BB100])+[.Z$25]*[.$Z$5]*MAGNET([.Z$24]+[.BB100])+[.AA$25]*[.$Z$5]*MAGNET([.AA$24]+[.BB100])+[.AB$25]*[.$Z$5]*MAGNET([.AB$24]+[.BB100])+[.AC$25]*[.$Z$5]*MAGNET([.AC$24]+[.BB100])+[.AD$25]*[.$Z$5]*MAGNET([.AD$24]+[.BB100])+[.AE$25]*[.$Z$5]*MAGNET([.AE$24]+[.BB100])+[.AF$25]*[.$Z$5]*MAGNET([.AF$24]+[.BB100])+[.AG$25]*[.$Z$5]*MAGNET([.AG$24]+[.BB100])+[.AH$25]*[.$Z$5]*MAGNET([.AH$24]+[.BB100]) +[.AI$25]*[.$Z$5]*MAGNET([.AI$24]+[.BB100]) +[.AJ$25]*[.$Z$5]*MAGNET([.AJ$24]+[.BB100]) +[.AK$25]*[.$Z$5]*MAGNET([.AK$24]+[.BB100]) +[.AL$25]*[.$Z$5]*MAGNET([.AL$24]+[.BB100]) +[.AM$25]*[.$Z$5]*MAGNET([.AM$24]+[.BB100]) +[.AN$25]*[.$Z$5]*MAGNET([.AN$24]+[.BB100]) +[.AO$25]*[.$Z$5]*MAGNET([.AO$24]+[.BB100])+RAND()*[.$BC$13]+[.AP$25]*[.$Z$5]*MAGNET([.AP$24]+[.BB100])&#10;+[.AQ$25]*[.$Z$5]*MAGNET([.AQ$24]+[.BB100])&#10;+[.AR$25]*[.$Z$5]*MAGNET([.AR$24]+[.BB100])&#10;+[.AS$25]*[.$Z$5]*MAGNET([.AS$24]+[.BB100])&#10;+[.AT$25]*[.$Z$5]*MAGNET([.AT$24]+[.BB100])&#10;+[.AU$25]*[.$Z$5]*MAGNET([.AU$24]+[.BB100])&#10;+[.AV$25]*[.$Z$5]*MAGNET([.AV$24]+[.BB100])&#10;+[.AW$25]*[.$Z$5]*MAGNET([.AW$24]+[.BB100])&#10;+[.AX$25]*[.$Z$5]*MAGNET([.AX$24]+[.BB100])&#10;+[.AY$25]*[.$Z$5]*MAGNET([.AY$24]+[.BB100])" office:value-type="float" office:value="120.578562317655" calcext:value-type="float">
            <text:p>120.58</text:p>
          </table:table-cell>
          <table:table-cell table:style-name="ce70" table:formula="of:=[.E$26]*[.$Z$5]*MAGNET([.E$24]+[.$BB100])+[.F$26]*[.$Z$5]*MAGNET([.F$24]+[.$BB100])+[.G$26]*[.$Z$5]*MAGNET([.G$24]+[.$BB100])+[.H$26]*[.$Z$5]*MAGNET([.H$24]+[.$BB100])+[.I$26]*[.$Z$5]*MAGNET([.I$24]+[.$BB100])+[.J$26]*[.$Z$5]*MAGNET([.J$24]+[.$BB100])+[.K$26]*[.$Z$5]*MAGNET([.K$24]+[.$BB100])+[.L$26]*[.$Z$5]*MAGNET([.L$24]+[.$BB100])+[.M$26]*[.$Z$5]*MAGNET([.M$24]+[.$BB100])+[.N$26]*[.$Z$5]*MAGNET([.N$24]+[.$BB100])+[.O$26]*[.$Z$5]*MAGNET([.O$24]+[.$BB100])+[.P$26]*[.$Z$5]*MAGNET([.P$24]+[.$BB100])+[.Q$26]*[.$Z$5]*MAGNET([.Q$24]+[.$BB100])+[.R$26]*[.$Z$5]*MAGNET([.R$24]+[.$BB100])+[.S$26]*[.$Z$5]*MAGNET([.S$24]+[.$BB100])+[.T$26]*[.$Z$5]*MAGNET([.T$24]+[.$BB100])+[.U$26]*[.$Z$5]*MAGNET([.U$24]+[.$BB100])+[.V$26]*[.$Z$5]*MAGNET([.V$24]+[.$BB100])+[.W$26]*[.$Z$5]*MAGNET([.W$24]+[.$BB100])+[.X$26]*[.$Z$5]*MAGNET([.X$24]+[.$BB100])+[.Y$26]*[.$Z$5]*MAGNET([.Y$24]+[.$BB100])+[.Z$26]*[.$Z$5]*MAGNET([.Z$24]+[.$BB100])+[.AA$26]*[.$Z$5]*MAGNET([.AA$24]+[.$BB100])+[.AB$26]*[.$Z$5]*MAGNET([.AB$24]+[.$BB100])+[.AC$26]*[.$Z$5]*MAGNET([.AC$24]+[.$BB100])+[.AD$26]*[.$Z$5]*MAGNET([.AD$24]+[.$BB100])+[.AE$26]*[.$Z$5]*MAGNET([.AE$24]+[.$BB100])+[.AF$26]*[.$Z$5]*MAGNET([.AF$24]+[.$BB100])+[.AG$26]*[.$Z$5]*MAGNET([.AG$24]+[.$BB100])+[.D$26]*[.$Z$5]*MAGNET([.D$24]+[.$BB100])+[.AH$26]*[.$Z$5]*MAGNET([.AH$24]+[.BB100]) +[.AI$26]*[.$Z$5]*MAGNET([.AI$24]+[.BB100]) +[.AJ$26]*[.$Z$5]*MAGNET([.AJ$24]+[.BB100]) +[.AK$26]*[.$Z$5]*MAGNET([.AK$24]+[.BB100]) +[.AL$26]*[.$Z$5]*MAGNET([.AL$24]+[.BB100]) +[.AM$26]*[.$Z$5]*MAGNET([.AM$24]+[.BB100]) +[.AN$26]*[.$Z$5]*MAGNET([.AN$24]+[.BB100]) +[.AO$26]*[.$Z$5]*MAGNET([.AO$24]+[.BB100]) +[.AP$26]*[.$Z$5]*MAGNET([.AP$24]+[.$BB100])&#10;+[.AQ$26]*[.$Z$5]*MAGNET([.AQ$24]+[.$BB100])&#10;+[.AR$26]*[.$Z$5]*MAGNET([.AR$24]+[.$BB100])&#10;+[.AS$26]*[.$Z$5]*MAGNET([.AS$24]+[.$BB100])&#10;+[.AT$26]*[.$Z$5]*MAGNET([.AT$24]+[.$BB100])&#10;+[.AU$26]*[.$Z$5]*MAGNET([.AU$24]+[.$BB100])&#10;+[.AV$26]*[.$Z$5]*MAGNET([.AV$24]+[.$BB100])&#10;+[.AW$26]*[.$Z$5]*MAGNET([.AW$24]+[.$BB100])&#10;+[.AX$26]*[.$Z$5]*MAGNET([.AX$24]+[.$BB100])&#10;+[.AY$26]*[.$Z$5]*MAGNET([.AY$24]+[.$BB100]) +RAND()*[.$BD$13]" office:value-type="float" office:value="-69.2304165447424" calcext:value-type="float">
            <text:p>-69.23</text:p>
          </table:table-cell>
          <table:table-cell table:style-name="ce71" table:formula="of:=[.E$27]*[.$Z$5]*MAGNET([.E$24]+[.$BB100])+[.F$27]*[.$Z$5]*MAGNET([.F$24]+[.$BB100])+[.G$27]*[.$Z$5]*MAGNET([.G$24]+[.$BB100])+[.H$27]*[.$Z$5]*MAGNET([.H$24]+[.$BB100])+[.I$27]*[.$Z$5]*MAGNET([.I$24]+[.$BB100])+[.J$27]*[.$Z$5]*MAGNET([.J$24]+[.$BB100])+[.K$27]*[.$Z$5]*MAGNET([.K$24]+[.$BB100])+[.L$27]*[.$Z$5]*MAGNET([.L$24]+[.$BB100])+[.M$27]*[.$Z$5]*MAGNET([.M$24]+[.$BB100])+[.N$27]*[.$Z$5]*MAGNET([.N$24]+[.$BB100])+[.O$27]*[.$Z$5]*MAGNET([.O$24]+[.$BB100])+[.P$27]*[.$Z$5]*MAGNET([.P$24]+[.$BB100])+[.Q$27]*[.$Z$5]*MAGNET([.Q$24]+[.$BB100])+[.R$27]*[.$Z$5]*MAGNET([.R$24]+[.$BB100])+[.S$27]*[.$Z$5]*MAGNET([.S$24]+[.$BB100])+[.T$27]*[.$Z$5]*MAGNET([.T$24]+[.$BB100])+[.U$27]*[.$Z$5]*MAGNET([.U$24]+[.$BB100])+[.V$27]*[.$Z$5]*MAGNET([.V$24]+[.$BB100])+[.W$27]*[.$Z$5]*MAGNET([.W$24]+[.$BB100])+[.X$27]*[.$Z$5]*MAGNET([.X$24]+[.$BB100])+[.Y$27]*[.$Z$5]*MAGNET([.Y$24]+[.$BB100])+[.Z$27]*[.$Z$5]*MAGNET([.Z$24]+[.$BB100])+[.AA$27]*[.$Z$5]*MAGNET([.AA$24]+[.$BB100])+[.AB$27]*[.$Z$5]*MAGNET([.AB$24]+[.$BB100])+[.AC$27]*[.$Z$5]*MAGNET([.AC$24]+[.$BB100])+[.AD$27]*[.$Z$5]*MAGNET([.AD$24]+[.$BB100])+[.AE$27]*[.$Z$5]*MAGNET([.AE$24]+[.$BB100])+[.AF$27]*[.$Z$5]*MAGNET([.AF$24]+[.$BB100])+[.AG$27]*[.$Z$5]*MAGNET([.AG$24]+[.$BB100])+[.D$27]*[.$Z$5]*MAGNET([.D$24]+[.$BB100])+[.AH$27]*[.$Z$5]*MAGNET([.AH$24]+[.BB100]) +[.AI$27]*[.$Z$5]*MAGNET([.AI$24]+[.BB100]) +[.AJ$27]*[.$Z$5]*MAGNET([.AJ$24]+[.BB100]) +[.AK$27]*[.$Z$5]*MAGNET([.AK$24]+[.BB100]) +[.AL$27]*[.$Z$5]*MAGNET([.AL$24]+[.BB100]) +[.AM$27]*[.$Z$5]*MAGNET([.AM$24]+[.BB100]) +[.AN$27]*[.$Z$5]*MAGNET([.AN$24]+[.BB100]) +[.AO$27]*[.$Z$5]*MAGNET([.AO$24]+[.BB100]) +[.AP$27]*[.$Z$5]*MAGNET([.AP$24]+[.$BB100])&#10;+[.AQ$27]*[.$Z$5]*MAGNET([.AQ$24]+[.$BB100])&#10;+[.AR$27]*[.$Z$5]*MAGNET([.AR$24]+[.$BB100])&#10;+[.AS$27]*[.$Z$5]*MAGNET([.AS$24]+[.$BB100])&#10;+[.AT$27]*[.$Z$5]*MAGNET([.AT$24]+[.$BB100])&#10;+[.AU$27]*[.$Z$5]*MAGNET([.AU$24]+[.$BB100])&#10;+[.AV$27]*[.$Z$5]*MAGNET([.AV$24]+[.$BB100])&#10;+[.AW$27]*[.$Z$5]*MAGNET([.AW$24]+[.$BB100])&#10;+[.AX$27]*[.$Z$5]*MAGNET([.AX$24]+[.$BB100])&#10;+[.AY$27]*[.$Z$5]*MAGNET([.AY$24]+[.$BB100]) +RAND()*[.$BE$13]" office:value-type="float" office:value="-45.1642261174591" calcext:value-type="float">
            <text:p>-45.1642261174591</text:p>
          </table:table-cell>
          <table:table-cell table:style-name="ce71" table:formula="of:=[.E$28]*[.$Z$5]*MAGNET([.E$24]+[.$BB100])+[.F$28]*[.$Z$5]*MAGNET([.F$24]+[.$BB100])+[.G$28]*[.$Z$5]*MAGNET([.G$24]+[.$BB100])+[.H$28]*[.$Z$5]*MAGNET([.H$24]+[.$BB100])+[.I$28]*[.$Z$5]*MAGNET([.I$24]+[.$BB100])+[.J$28]*[.$Z$5]*MAGNET([.J$24]+[.$BB100])+[.K$28]*[.$Z$5]*MAGNET([.K$24]+[.$BB100])+[.L$28]*[.$Z$5]*MAGNET([.L$24]+[.$BB100])+[.M$28]*[.$Z$5]*MAGNET([.M$24]+[.$BB100])+[.N$28]*[.$Z$5]*MAGNET([.N$24]+[.$BB100])+[.O$28]*[.$Z$5]*MAGNET([.O$24]+[.$BB100])+[.P$28]*[.$Z$5]*MAGNET([.P$24]+[.$BB100])+[.Q$28]*[.$Z$5]*MAGNET([.Q$24]+[.$BB100])+[.R$28]*[.$Z$5]*MAGNET([.R$24]+[.$BB100])+[.S$28]*[.$Z$5]*MAGNET([.S$24]+[.$BB100])+[.T$28]*[.$Z$5]*MAGNET([.T$24]+[.$BB100])+[.U$28]*[.$Z$5]*MAGNET([.U$24]+[.$BB100])+[.V$28]*[.$Z$5]*MAGNET([.V$24]+[.$BB100])+[.W$28]*[.$Z$5]*MAGNET([.W$24]+[.$BB100])+[.X$28]*[.$Z$5]*MAGNET([.X$24]+[.$BB100])+[.Y$28]*[.$Z$5]*MAGNET([.Y$24]+[.$BB100])+[.Z$28]*[.$Z$5]*MAGNET([.Z$24]+[.$BB100])+[.AA$28]*[.$Z$5]*MAGNET([.AA$24]+[.$BB100])+[.AB$28]*[.$Z$5]*MAGNET([.AB$24]+[.$BB100])+[.AC$28]*[.$Z$5]*MAGNET([.AC$24]+[.$BB100])+[.AD$28]*[.$Z$5]*MAGNET([.AD$24]+[.$BB100])+[.AE$28]*[.$Z$5]*MAGNET([.AE$24]+[.$BB100])+[.AF$28]*[.$Z$5]*MAGNET([.AF$24]+[.$BB100])+[.AG$28]*[.$Z$5]*MAGNET([.AG$24]+[.$BB100])+[.D$28]*[.$Z$5]*MAGNET([.D$24]+[.$BB100])+[.AH$28]*[.$Z$5]*MAGNET([.AH$24]+[.BB100]) +[.AI$28]*[.$Z$5]*MAGNET([.AI$24]+[.BB100]) +[.AJ$28]*[.$Z$5]*MAGNET([.AJ$24]+[.BB100]) +[.AK$28]*[.$Z$5]*MAGNET([.AK$24]+[.BB100]) +[.AL$28]*[.$Z$5]*MAGNET([.AL$24]+[.BB100]) +[.AM$28]*[.$Z$5]*MAGNET([.AM$24]+[.BB100]) +[.AN$28]*[.$Z$5]*MAGNET([.AN$24]+[.BB100]) +[.AO$28]*[.$Z$5]*MAGNET([.AO$24]+[.BB100]) +[.AP$28]*[.$Z$5]*MAGNET([.AP$24]+[.$BB100])&#10;+[.AQ$28]*[.$Z$5]*MAGNET([.AQ$24]+[.$BB100])&#10;+[.AR$28]*[.$Z$5]*MAGNET([.AR$24]+[.$BB100])&#10;+[.AS$28]*[.$Z$5]*MAGNET([.AS$24]+[.$BB100])&#10;+[.AT$28]*[.$Z$5]*MAGNET([.AT$24]+[.$BB100])&#10;+[.AU$28]*[.$Z$5]*MAGNET([.AU$24]+[.$BB100])&#10;+[.AV$28]*[.$Z$5]*MAGNET([.AV$24]+[.$BB100])&#10;+[.AW$28]*[.$Z$5]*MAGNET([.AW$24]+[.$BB100])&#10;+[.AX$28]*[.$Z$5]*MAGNET([.AX$24]+[.$BB100])&#10;+[.AY$28]*[.$Z$5]*MAGNET([.AY$24]+[.$BB100]) +RAND()*[.$BF$13]" office:value-type="float" office:value="-2.46251127230654" calcext:value-type="float">
            <text:p>-2.46251127230654</text:p>
          </table:table-cell>
          <table:table-cell table:style-name="ce71" table:formula="of:=[.E$29]*[.$Z$5]*MAGNET([.E$24]+[.$BB100])+[.F$29]*[.$Z$5]*MAGNET([.F$24]+[.$BB100])+[.G$29]*[.$Z$5]*MAGNET([.G$24]+[.$BB100])+[.H$29]*[.$Z$5]*MAGNET([.H$24]+[.$BB100])+[.I$29]*[.$Z$5]*MAGNET([.I$24]+[.$BB100])+[.J$29]*[.$Z$5]*MAGNET([.J$24]+[.$BB100])+[.K$29]*[.$Z$5]*MAGNET([.K$24]+[.$BB100])+[.L$29]*[.$Z$5]*MAGNET([.L$24]+[.$BB100])+[.M$29]*[.$Z$5]*MAGNET([.M$24]+[.$BB100])+[.N$29]*[.$Z$5]*MAGNET([.N$24]+[.$BB100])+[.O$29]*[.$Z$5]*MAGNET([.O$24]+[.$BB100])+[.P$29]*[.$Z$5]*MAGNET([.P$24]+[.$BB100])+[.Q$29]*[.$Z$5]*MAGNET([.Q$24]+[.$BB100])+[.R$29]*[.$Z$5]*MAGNET([.R$24]+[.$BB100])+[.S$29]*[.$Z$5]*MAGNET([.S$24]+[.$BB100])+[.T$29]*[.$Z$5]*MAGNET([.T$24]+[.$BB100])+[.U$29]*[.$Z$5]*MAGNET([.U$24]+[.$BB100])+[.V$29]*[.$Z$5]*MAGNET([.V$24]+[.$BB100])+[.W$29]*[.$Z$5]*MAGNET([.W$24]+[.$BB100])+[.X$29]*[.$Z$5]*MAGNET([.X$24]+[.$BB100])+[.Y$29]*[.$Z$5]*MAGNET([.Y$24]+[.$BB100])+[.Z$29]*[.$Z$5]*MAGNET([.Z$24]+[.$BB100])+[.AA$29]*[.$Z$5]*MAGNET([.AA$24]+[.$BB100])+[.AB$29]*[.$Z$5]*MAGNET([.AB$24]+[.$BB100])+[.AC$29]*[.$Z$5]*MAGNET([.AC$24]+[.$BB100])+[.AD$29]*[.$Z$5]*MAGNET([.AD$24]+[.$BB100])+[.AE$29]*[.$Z$5]*MAGNET([.AE$24]+[.$BB100])+[.AF$29]*[.$Z$5]*MAGNET([.AF$24]+[.$BB100])+[.AG$29]*[.$Z$5]*MAGNET([.AG$24]+[.$BB100])+[.D$29]*[.$Z$5]*MAGNET([.D$24]+[.$BB100])+[.AH$29]*[.$Z$5]*MAGNET([.AH$24]+[.BB100]) +[.AI$29]*[.$Z$5]*MAGNET([.AI$24]+[.BB100]) +[.AJ$29]*[.$Z$5]*MAGNET([.AJ$24]+[.BB100]) +[.AK$29]*[.$Z$5]*MAGNET([.AK$24]+[.BB100]) +[.AL$29]*[.$Z$5]*MAGNET([.AL$24]+[.BB100]) +[.AM$29]*[.$Z$5]*MAGNET([.AM$24]+[.BB100]) +[.AN$29]*[.$Z$5]*MAGNET([.AN$24]+[.BB100]) +[.AO$29]*[.$Z$5]*MAGNET([.AO$24]+[.BB100]) +[.AP$29]*[.$Z$5]*MAGNET([.AP$24]+[.$BB100])&#10;+[.AQ$29]*[.$Z$5]*MAGNET([.AQ$24]+[.$BB100])&#10;+[.AR$29]*[.$Z$5]*MAGNET([.AR$24]+[.$BB100])&#10;+[.AS$29]*[.$Z$5]*MAGNET([.AS$24]+[.$BB100])&#10;+[.AT$29]*[.$Z$5]*MAGNET([.AT$24]+[.$BB100])&#10;+[.AU$29]*[.$Z$5]*MAGNET([.AU$24]+[.$BB100])&#10;+[.AV$29]*[.$Z$5]*MAGNET([.AV$24]+[.$BB100])&#10;+[.AW$29]*[.$Z$5]*MAGNET([.AW$24]+[.$BB100])&#10;+[.AX$29]*[.$Z$5]*MAGNET([.AX$24]+[.$BB100])&#10;+[.AY$29]*[.$Z$5]*MAGNET([.AY$24]+[.$BB100]) +RAND()*[.$BG$13]" office:value-type="float" office:value="16.2045891783746" calcext:value-type="float">
            <text:p>16.2045891783746</text:p>
          </table:table-cell>
          <table:table-cell table:style-name="ce71" table:formula="of:=[.E$30]*[.$Z$5]*MAGNET([.E$24]+[.$BB100])+[.F$30]*[.$Z$5]*MAGNET([.F$24]+[.$BB100])+[.G$30]*[.$Z$5]*MAGNET([.G$24]+[.$BB100])+[.H$30]*[.$Z$5]*MAGNET([.H$24]+[.$BB100])+[.I$30]*[.$Z$5]*MAGNET([.I$24]+[.$BB100])+[.J$30]*[.$Z$5]*MAGNET([.J$24]+[.$BB100])+[.K$30]*[.$Z$5]*MAGNET([.K$24]+[.$BB100])+[.L$30]*[.$Z$5]*MAGNET([.L$24]+[.$BB100])+[.M$30]*[.$Z$5]*MAGNET([.M$24]+[.$BB100])+[.N$30]*[.$Z$5]*MAGNET([.N$24]+[.$BB100])+[.O$30]*[.$Z$5]*MAGNET([.O$24]+[.$BB100])+[.P$30]*[.$Z$5]*MAGNET([.P$24]+[.$BB100])+[.Q$30]*[.$Z$5]*MAGNET([.Q$24]+[.$BB100])+[.R$30]*[.$Z$5]*MAGNET([.R$24]+[.$BB100])+[.S$30]*[.$Z$5]*MAGNET([.S$24]+[.$BB100])+[.T$30]*[.$Z$5]*MAGNET([.T$24]+[.$BB100])+[.U$30]*[.$Z$5]*MAGNET([.U$24]+[.$BB100])+[.V$30]*[.$Z$5]*MAGNET([.V$24]+[.$BB100])+[.W$30]*[.$Z$5]*MAGNET([.W$24]+[.$BB100])+[.X$30]*[.$Z$5]*MAGNET([.X$24]+[.$BB100])+[.Y$30]*[.$Z$5]*MAGNET([.Y$24]+[.$BB100])+[.Z$30]*[.$Z$5]*MAGNET([.Z$24]+[.$BB100])+[.AA$30]*[.$Z$5]*MAGNET([.AA$24]+[.$BB100])+[.AB$30]*[.$Z$5]*MAGNET([.AB$24]+[.$BB100])+[.AC$30]*[.$Z$5]*MAGNET([.AC$24]+[.$BB100])+[.AD$30]*[.$Z$5]*MAGNET([.AD$24]+[.$BB100])+[.AE$30]*[.$Z$5]*MAGNET([.AE$24]+[.$BB100])+[.AF$30]*[.$Z$5]*MAGNET([.AF$24]+[.$BB100])+[.AG$30]*[.$Z$5]*MAGNET([.AG$24]+[.$BB100])+[.D$30]*[.$Z$5]*MAGNET([.D$24]+[.$BB100])+[.AH$30]*[.$Z$5]*MAGNET([.AH$24]+[.BB100]) +[.AI$30]*[.$Z$5]*MAGNET([.AI$24]+[.BB100]) +[.AJ$30]*[.$Z$5]*MAGNET([.AJ$24]+[.BB100]) +[.AK$30]*[.$Z$5]*MAGNET([.AK$24]+[.BB100]) +[.AL$30]*[.$Z$5]*MAGNET([.AL$24]+[.BB100]) +[.AM$30]*[.$Z$5]*MAGNET([.AM$24]+[.BB100]) +[.AN$30]*[.$Z$5]*MAGNET([.AN$24]+[.BB100]) +[.AO$30]*[.$Z$5]*MAGNET([.AO$24]+[.BB100]) +[.AP$30]*[.$Z$5]*MAGNET([.AP$24]+[.$BB100])&#10;+[.AQ$30]*[.$Z$5]*MAGNET([.AQ$24]+[.$BB100])&#10;+[.AR$30]*[.$Z$5]*MAGNET([.AR$24]+[.$BB100])&#10;+[.AS$30]*[.$Z$5]*MAGNET([.AS$24]+[.$BB100])&#10;+[.AT$30]*[.$Z$5]*MAGNET([.AT$24]+[.$BB100])&#10;+[.AU$30]*[.$Z$5]*MAGNET([.AU$24]+[.$BB100])&#10;+[.AV$30]*[.$Z$5]*MAGNET([.AV$24]+[.$BB100])&#10;+[.AW$30]*[.$Z$5]*MAGNET([.AW$24]+[.$BB100])&#10;+[.AX$30]*[.$Z$5]*MAGNET([.AX$24]+[.$BB100])&#10;+[.AY$30]*[.$Z$5]*MAGNET([.AY$24]+[.$BB100]) +RAND()*[.$BH$13]" office:value-type="float" office:value="0" calcext:value-type="float">
            <text:p>0</text:p>
          </table:table-cell>
          <table:table-cell table:style-name="ce71" table:formula="of:=[.E$31]*[.$Z$5]*MAGNET([.E$24]+[.$BB100])+[.F$31]*[.$Z$5]*MAGNET([.F$24]+[.$BB100])+[.G$31]*[.$Z$5]*MAGNET([.G$24]+[.$BB100])+[.H$31]*[.$Z$5]*MAGNET([.H$24]+[.$BB100])+[.I$31]*[.$Z$5]*MAGNET([.I$24]+[.$BB100])+[.J$31]*[.$Z$5]*MAGNET([.J$24]+[.$BB100])+[.K$31]*[.$Z$5]*MAGNET([.K$24]+[.$BB100])+[.L$31]*[.$Z$5]*MAGNET([.L$24]+[.$BB100])+[.M$31]*[.$Z$5]*MAGNET([.M$24]+[.$BB100])+[.N$31]*[.$Z$5]*MAGNET([.N$24]+[.$BB100])+[.O$31]*[.$Z$5]*MAGNET([.O$24]+[.$BB100])+[.P$31]*[.$Z$5]*MAGNET([.P$24]+[.$BB100])+[.Q$31]*[.$Z$5]*MAGNET([.Q$24]+[.$BB100])+[.R$31]*[.$Z$5]*MAGNET([.R$24]+[.$BB100])+[.S$31]*[.$Z$5]*MAGNET([.S$24]+[.$BB100])+[.T$31]*[.$Z$5]*MAGNET([.T$24]+[.$BB100])+[.U$31]*[.$Z$5]*MAGNET([.U$24]+[.$BB100])+[.V$31]*[.$Z$5]*MAGNET([.V$24]+[.$BB100])+[.W$31]*[.$Z$5]*MAGNET([.W$24]+[.$BB100])+[.X$31]*[.$Z$5]*MAGNET([.X$24]+[.$BB100])+[.Y$31]*[.$Z$5]*MAGNET([.Y$24]+[.$BB100])+[.Z$31]*[.$Z$5]*MAGNET([.Z$24]+[.$BB100])+[.AA$31]*[.$Z$5]*MAGNET([.AA$24]+[.$BB100])+[.AB$31]*[.$Z$5]*MAGNET([.AB$24]+[.$BB100])+[.AC$31]*[.$Z$5]*MAGNET([.AC$24]+[.$BB100])+[.AD$31]*[.$Z$5]*MAGNET([.AD$24]+[.$BB100])+[.AE$31]*[.$Z$5]*MAGNET([.AE$24]+[.$BB100])+[.AF$31]*[.$Z$5]*MAGNET([.AF$24]+[.$BB100])+[.AG$31]*[.$Z$5]*MAGNET([.AG$24]+[.$BB100])+[.D$31]*[.$Z$5]*MAGNET([.D$24]+[.$BB100])+[.AH$31]*[.$Z$5]*MAGNET([.AH$24]+[.BB100]) +[.AI$31]*[.$Z$5]*MAGNET([.AI$24]+[.BB100]) +[.AJ$31]*[.$Z$5]*MAGNET([.AJ$24]+[.BB100]) +[.AK$31]*[.$Z$5]*MAGNET([.AK$24]+[.BB100]) +[.AL$31]*[.$Z$5]*MAGNET([.AL$24]+[.BB100]) +[.AM$31]*[.$Z$5]*MAGNET([.AM$24]+[.BB100]) +[.AN$31]*[.$Z$5]*MAGNET([.AN$24]+[.BB100]) +[.AO$31]*[.$Z$5]*MAGNET([.AO$24]+[.BB100]) +[.AP$31]*[.$Z$5]*MAGNET([.AP$24]+[.$BB100])&#10;+[.AQ$31]*[.$Z$5]*MAGNET([.AQ$24]+[.$BB100])&#10;+[.AR$31]*[.$Z$5]*MAGNET([.AR$24]+[.$BB100])&#10;+[.AS$31]*[.$Z$5]*MAGNET([.AS$24]+[.$BB100])&#10;+[.AT$31]*[.$Z$5]*MAGNET([.AT$24]+[.$BB100])&#10;+[.AU$31]*[.$Z$5]*MAGNET([.AU$24]+[.$BB100])&#10;+[.AV$31]*[.$Z$5]*MAGNET([.AV$24]+[.$BB100])&#10;+[.AW$31]*[.$Z$5]*MAGNET([.AW$24]+[.$BB100])&#10;+[.AX$31]*[.$Z$5]*MAGNET([.AX$24]+[.$BB100])&#10;+[.AY$31]*[.$Z$5]*MAGNET([.AY$24]+[.$BB100]) +RAND()*[.$BI$13]" office:value-type="float" office:value="0" calcext:value-type="float">
            <text:p>0</text:p>
          </table:table-cell>
          <table:table-cell table:style-name="ce71" table:formula="of:=[.E$32]*[.$Z$5]*MAGNET([.E$24]+[.$BB100])+[.F$32]*[.$Z$5]*MAGNET([.F$24]+[.$BB100])+[.G$32]*[.$Z$5]*MAGNET([.G$24]+[.$BB100])+[.H$32]*[.$Z$5]*MAGNET([.H$24]+[.$BB100])+[.I$32]*[.$Z$5]*MAGNET([.I$24]+[.$BB100])+[.J$32]*[.$Z$5]*MAGNET([.J$24]+[.$BB100])+[.K$32]*[.$Z$5]*MAGNET([.K$24]+[.$BB100])+[.L$32]*[.$Z$5]*MAGNET([.L$24]+[.$BB100])+[.M$32]*[.$Z$5]*MAGNET([.M$24]+[.$BB100])+[.N$32]*[.$Z$5]*MAGNET([.N$24]+[.$BB100])+[.O$32]*[.$Z$5]*MAGNET([.O$24]+[.$BB100])+[.P$32]*[.$Z$5]*MAGNET([.P$24]+[.$BB100])+[.Q$32]*[.$Z$5]*MAGNET([.Q$24]+[.$BB100])+[.R$32]*[.$Z$5]*MAGNET([.R$24]+[.$BB100])+[.S$32]*[.$Z$5]*MAGNET([.S$24]+[.$BB100])+[.T$32]*[.$Z$5]*MAGNET([.T$24]+[.$BB100])+[.U$32]*[.$Z$5]*MAGNET([.U$24]+[.$BB100])+[.V$32]*[.$Z$5]*MAGNET([.V$24]+[.$BB100])+[.W$32]*[.$Z$5]*MAGNET([.W$24]+[.$BB100])+[.X$32]*[.$Z$5]*MAGNET([.X$24]+[.$BB100])+[.Y$32]*[.$Z$5]*MAGNET([.Y$24]+[.$BB100])+[.Z$32]*[.$Z$5]*MAGNET([.Z$24]+[.$BB100])+[.AA$32]*[.$Z$5]*MAGNET([.AA$24]+[.$BB100])+[.AB$32]*[.$Z$5]*MAGNET([.AB$24]+[.$BB100])+[.AC$32]*[.$Z$5]*MAGNET([.AC$24]+[.$BB100])+[.AD$32]*[.$Z$5]*MAGNET([.AD$24]+[.$BB100])+[.AE$32]*[.$Z$5]*MAGNET([.AE$24]+[.$BB100])+[.AF$32]*[.$Z$5]*MAGNET([.AF$24]+[.$BB100])+[.AG$32]*[.$Z$5]*MAGNET([.AG$24]+[.$BB100])+[.D$32]*[.$Z$5]*MAGNET([.D$24]+[.$BB100])+[.AH$32]*[.$Z$5]*MAGNET([.AH$24]+[.BB100]) +[.AI$32]*[.$Z$5]*MAGNET([.AI$24]+[.BB100]) +[.AJ$32]*[.$Z$5]*MAGNET([.AJ$24]+[.BB100]) +[.AK$32]*[.$Z$5]*MAGNET([.AK$24]+[.BB100]) +[.AL$32]*[.$Z$5]*MAGNET([.AL$24]+[.BB100]) +[.AM$32]*[.$Z$5]*MAGNET([.AM$24]+[.BB100]) +[.AN$32]*[.$Z$5]*MAGNET([.AN$24]+[.BB100]) +[.AO$32]*[.$Z$5]*MAGNET([.AO$24]+[.BB100]) +[.AP$32]*[.$Z$5]*MAGNET([.AP$24]+[.$BB100])&#10;+[.AQ$32]*[.$Z$5]*MAGNET([.AQ$24]+[.$BB100])&#10;+[.AR$32]*[.$Z$5]*MAGNET([.AR$24]+[.$BB100])&#10;+[.AS$32]*[.$Z$5]*MAGNET([.AS$24]+[.$BB100])&#10;+[.AT$32]*[.$Z$5]*MAGNET([.AT$24]+[.$BB100])&#10;+[.AU$32]*[.$Z$5]*MAGNET([.AU$24]+[.$BB100])&#10;+[.AV$32]*[.$Z$5]*MAGNET([.AV$24]+[.$BB100])&#10;+[.AW$32]*[.$Z$5]*MAGNET([.AW$24]+[.$BB100])&#10;+[.AX$32]*[.$Z$5]*MAGNET([.AX$24]+[.$BB100])&#10;+[.AY$32]*[.$Z$5]*MAGNET([.AY$24]+[.$BB10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0]+0.002" office:value-type="float" office:value="0.172" calcext:value-type="float">
            <text:p>0.172</text:p>
          </table:table-cell>
          <table:table-cell table:formula="of:=[.BA101]*[.$D$6]" office:value-type="float" office:value="8.64566298267912" calcext:value-type="float">
            <text:p>8.646</text:p>
          </table:table-cell>
          <table:table-cell table:formula="of:=[.D$25]*[.$Z$5]*MAGNET([.D$24]+[.BB101])+[.E$25]*[.$Z$5]*MAGNET([.E$24]+[.BB101])+[.F$25]*[.$Z$5]*MAGNET([.F$24]+[.BB101])+[.G$25]*[.$Z$5]*MAGNET([.G$24]+[.BB101])+[.H$25]*[.$Z$5]*MAGNET([.H$24]+[.BB101])+[.I$25]*[.$Z$5]*MAGNET([.I$24]+[.BB101])+[.J$25]*[.$Z$5]*MAGNET([.J$24]+[.BB101])+[.K$25]*[.$Z$5]*MAGNET([.K$24]+[.BB101])+[.L$25]*[.$Z$5]*MAGNET([.L$24]+[.BB101])+[.M$25]*[.$Z$5]*MAGNET([.M$24]+[.BB101])+[.N$25]*[.$Z$5]*MAGNET([.N$24]+[.BB101])+[.O$25]*[.$Z$5]*MAGNET([.O$24]+[.BB101])+[.P$25]*[.$Z$5]*MAGNET([.P$24]+[.BB101])+[.Q$25]*[.$Z$5]*MAGNET([.Q$24]+[.BB101])+[.R$25]*[.$Z$5]*MAGNET([.R$24]+[.BB101])+[.S$25]*[.$Z$5]*MAGNET([.S$24]+[.BB101])+[.T$25]*[.$Z$5]*MAGNET([.T$24]+[.BB101])+[.U$25]*[.$Z$5]*MAGNET([.U$24]+[.BB101])+[.V$25]*[.$Z$5]*MAGNET([.V$24]+[.BB101])+[.W$25]*[.$Z$5]*MAGNET([.W$24]+[.BB101])+[.X$25]*[.$Z$5]*MAGNET([.X$24]+[.BB101])+[.Y$25]*[.$Z$5]*MAGNET([.Y$24]+[.BB101])+[.Z$25]*[.$Z$5]*MAGNET([.Z$24]+[.BB101])+[.AA$25]*[.$Z$5]*MAGNET([.AA$24]+[.BB101])+[.AB$25]*[.$Z$5]*MAGNET([.AB$24]+[.BB101])+[.AC$25]*[.$Z$5]*MAGNET([.AC$24]+[.BB101])+[.AD$25]*[.$Z$5]*MAGNET([.AD$24]+[.BB101])+[.AE$25]*[.$Z$5]*MAGNET([.AE$24]+[.BB101])+[.AF$25]*[.$Z$5]*MAGNET([.AF$24]+[.BB101])+[.AG$25]*[.$Z$5]*MAGNET([.AG$24]+[.BB101])+[.AH$25]*[.$Z$5]*MAGNET([.AH$24]+[.BB101]) +[.AI$25]*[.$Z$5]*MAGNET([.AI$24]+[.BB101]) +[.AJ$25]*[.$Z$5]*MAGNET([.AJ$24]+[.BB101]) +[.AK$25]*[.$Z$5]*MAGNET([.AK$24]+[.BB101]) +[.AL$25]*[.$Z$5]*MAGNET([.AL$24]+[.BB101]) +[.AM$25]*[.$Z$5]*MAGNET([.AM$24]+[.BB101]) +[.AN$25]*[.$Z$5]*MAGNET([.AN$24]+[.BB101]) +[.AO$25]*[.$Z$5]*MAGNET([.AO$24]+[.BB101])+RAND()*[.$BC$13]+[.AP$25]*[.$Z$5]*MAGNET([.AP$24]+[.BB101])&#10;+[.AQ$25]*[.$Z$5]*MAGNET([.AQ$24]+[.BB101])&#10;+[.AR$25]*[.$Z$5]*MAGNET([.AR$24]+[.BB101])&#10;+[.AS$25]*[.$Z$5]*MAGNET([.AS$24]+[.BB101])&#10;+[.AT$25]*[.$Z$5]*MAGNET([.AT$24]+[.BB101])&#10;+[.AU$25]*[.$Z$5]*MAGNET([.AU$24]+[.BB101])&#10;+[.AV$25]*[.$Z$5]*MAGNET([.AV$24]+[.BB101])&#10;+[.AW$25]*[.$Z$5]*MAGNET([.AW$24]+[.BB101])&#10;+[.AX$25]*[.$Z$5]*MAGNET([.AX$24]+[.BB101])&#10;+[.AY$25]*[.$Z$5]*MAGNET([.AY$24]+[.BB101])" office:value-type="float" office:value="110.657283757916" calcext:value-type="float">
            <text:p>110.66</text:p>
          </table:table-cell>
          <table:table-cell table:style-name="ce70" table:formula="of:=[.E$26]*[.$Z$5]*MAGNET([.E$24]+[.$BB101])+[.F$26]*[.$Z$5]*MAGNET([.F$24]+[.$BB101])+[.G$26]*[.$Z$5]*MAGNET([.G$24]+[.$BB101])+[.H$26]*[.$Z$5]*MAGNET([.H$24]+[.$BB101])+[.I$26]*[.$Z$5]*MAGNET([.I$24]+[.$BB101])+[.J$26]*[.$Z$5]*MAGNET([.J$24]+[.$BB101])+[.K$26]*[.$Z$5]*MAGNET([.K$24]+[.$BB101])+[.L$26]*[.$Z$5]*MAGNET([.L$24]+[.$BB101])+[.M$26]*[.$Z$5]*MAGNET([.M$24]+[.$BB101])+[.N$26]*[.$Z$5]*MAGNET([.N$24]+[.$BB101])+[.O$26]*[.$Z$5]*MAGNET([.O$24]+[.$BB101])+[.P$26]*[.$Z$5]*MAGNET([.P$24]+[.$BB101])+[.Q$26]*[.$Z$5]*MAGNET([.Q$24]+[.$BB101])+[.R$26]*[.$Z$5]*MAGNET([.R$24]+[.$BB101])+[.S$26]*[.$Z$5]*MAGNET([.S$24]+[.$BB101])+[.T$26]*[.$Z$5]*MAGNET([.T$24]+[.$BB101])+[.U$26]*[.$Z$5]*MAGNET([.U$24]+[.$BB101])+[.V$26]*[.$Z$5]*MAGNET([.V$24]+[.$BB101])+[.W$26]*[.$Z$5]*MAGNET([.W$24]+[.$BB101])+[.X$26]*[.$Z$5]*MAGNET([.X$24]+[.$BB101])+[.Y$26]*[.$Z$5]*MAGNET([.Y$24]+[.$BB101])+[.Z$26]*[.$Z$5]*MAGNET([.Z$24]+[.$BB101])+[.AA$26]*[.$Z$5]*MAGNET([.AA$24]+[.$BB101])+[.AB$26]*[.$Z$5]*MAGNET([.AB$24]+[.$BB101])+[.AC$26]*[.$Z$5]*MAGNET([.AC$24]+[.$BB101])+[.AD$26]*[.$Z$5]*MAGNET([.AD$24]+[.$BB101])+[.AE$26]*[.$Z$5]*MAGNET([.AE$24]+[.$BB101])+[.AF$26]*[.$Z$5]*MAGNET([.AF$24]+[.$BB101])+[.AG$26]*[.$Z$5]*MAGNET([.AG$24]+[.$BB101])+[.D$26]*[.$Z$5]*MAGNET([.D$24]+[.$BB101])+[.AH$26]*[.$Z$5]*MAGNET([.AH$24]+[.BB101]) +[.AI$26]*[.$Z$5]*MAGNET([.AI$24]+[.BB101]) +[.AJ$26]*[.$Z$5]*MAGNET([.AJ$24]+[.BB101]) +[.AK$26]*[.$Z$5]*MAGNET([.AK$24]+[.BB101]) +[.AL$26]*[.$Z$5]*MAGNET([.AL$24]+[.BB101]) +[.AM$26]*[.$Z$5]*MAGNET([.AM$24]+[.BB101]) +[.AN$26]*[.$Z$5]*MAGNET([.AN$24]+[.BB101]) +[.AO$26]*[.$Z$5]*MAGNET([.AO$24]+[.BB101]) +[.AP$26]*[.$Z$5]*MAGNET([.AP$24]+[.$BB101])&#10;+[.AQ$26]*[.$Z$5]*MAGNET([.AQ$24]+[.$BB101])&#10;+[.AR$26]*[.$Z$5]*MAGNET([.AR$24]+[.$BB101])&#10;+[.AS$26]*[.$Z$5]*MAGNET([.AS$24]+[.$BB101])&#10;+[.AT$26]*[.$Z$5]*MAGNET([.AT$24]+[.$BB101])&#10;+[.AU$26]*[.$Z$5]*MAGNET([.AU$24]+[.$BB101])&#10;+[.AV$26]*[.$Z$5]*MAGNET([.AV$24]+[.$BB101])&#10;+[.AW$26]*[.$Z$5]*MAGNET([.AW$24]+[.$BB101])&#10;+[.AX$26]*[.$Z$5]*MAGNET([.AX$24]+[.$BB101])&#10;+[.AY$26]*[.$Z$5]*MAGNET([.AY$24]+[.$BB101]) +RAND()*[.$BD$13]" office:value-type="float" office:value="-77.1304973703174" calcext:value-type="float">
            <text:p>-77.13</text:p>
          </table:table-cell>
          <table:table-cell table:style-name="ce71" table:formula="of:=[.E$27]*[.$Z$5]*MAGNET([.E$24]+[.$BB101])+[.F$27]*[.$Z$5]*MAGNET([.F$24]+[.$BB101])+[.G$27]*[.$Z$5]*MAGNET([.G$24]+[.$BB101])+[.H$27]*[.$Z$5]*MAGNET([.H$24]+[.$BB101])+[.I$27]*[.$Z$5]*MAGNET([.I$24]+[.$BB101])+[.J$27]*[.$Z$5]*MAGNET([.J$24]+[.$BB101])+[.K$27]*[.$Z$5]*MAGNET([.K$24]+[.$BB101])+[.L$27]*[.$Z$5]*MAGNET([.L$24]+[.$BB101])+[.M$27]*[.$Z$5]*MAGNET([.M$24]+[.$BB101])+[.N$27]*[.$Z$5]*MAGNET([.N$24]+[.$BB101])+[.O$27]*[.$Z$5]*MAGNET([.O$24]+[.$BB101])+[.P$27]*[.$Z$5]*MAGNET([.P$24]+[.$BB101])+[.Q$27]*[.$Z$5]*MAGNET([.Q$24]+[.$BB101])+[.R$27]*[.$Z$5]*MAGNET([.R$24]+[.$BB101])+[.S$27]*[.$Z$5]*MAGNET([.S$24]+[.$BB101])+[.T$27]*[.$Z$5]*MAGNET([.T$24]+[.$BB101])+[.U$27]*[.$Z$5]*MAGNET([.U$24]+[.$BB101])+[.V$27]*[.$Z$5]*MAGNET([.V$24]+[.$BB101])+[.W$27]*[.$Z$5]*MAGNET([.W$24]+[.$BB101])+[.X$27]*[.$Z$5]*MAGNET([.X$24]+[.$BB101])+[.Y$27]*[.$Z$5]*MAGNET([.Y$24]+[.$BB101])+[.Z$27]*[.$Z$5]*MAGNET([.Z$24]+[.$BB101])+[.AA$27]*[.$Z$5]*MAGNET([.AA$24]+[.$BB101])+[.AB$27]*[.$Z$5]*MAGNET([.AB$24]+[.$BB101])+[.AC$27]*[.$Z$5]*MAGNET([.AC$24]+[.$BB101])+[.AD$27]*[.$Z$5]*MAGNET([.AD$24]+[.$BB101])+[.AE$27]*[.$Z$5]*MAGNET([.AE$24]+[.$BB101])+[.AF$27]*[.$Z$5]*MAGNET([.AF$24]+[.$BB101])+[.AG$27]*[.$Z$5]*MAGNET([.AG$24]+[.$BB101])+[.D$27]*[.$Z$5]*MAGNET([.D$24]+[.$BB101])+[.AH$27]*[.$Z$5]*MAGNET([.AH$24]+[.BB101]) +[.AI$27]*[.$Z$5]*MAGNET([.AI$24]+[.BB101]) +[.AJ$27]*[.$Z$5]*MAGNET([.AJ$24]+[.BB101]) +[.AK$27]*[.$Z$5]*MAGNET([.AK$24]+[.BB101]) +[.AL$27]*[.$Z$5]*MAGNET([.AL$24]+[.BB101]) +[.AM$27]*[.$Z$5]*MAGNET([.AM$24]+[.BB101]) +[.AN$27]*[.$Z$5]*MAGNET([.AN$24]+[.BB101]) +[.AO$27]*[.$Z$5]*MAGNET([.AO$24]+[.BB101]) +[.AP$27]*[.$Z$5]*MAGNET([.AP$24]+[.$BB101])&#10;+[.AQ$27]*[.$Z$5]*MAGNET([.AQ$24]+[.$BB101])&#10;+[.AR$27]*[.$Z$5]*MAGNET([.AR$24]+[.$BB101])&#10;+[.AS$27]*[.$Z$5]*MAGNET([.AS$24]+[.$BB101])&#10;+[.AT$27]*[.$Z$5]*MAGNET([.AT$24]+[.$BB101])&#10;+[.AU$27]*[.$Z$5]*MAGNET([.AU$24]+[.$BB101])&#10;+[.AV$27]*[.$Z$5]*MAGNET([.AV$24]+[.$BB101])&#10;+[.AW$27]*[.$Z$5]*MAGNET([.AW$24]+[.$BB101])&#10;+[.AX$27]*[.$Z$5]*MAGNET([.AX$24]+[.$BB101])&#10;+[.AY$27]*[.$Z$5]*MAGNET([.AY$24]+[.$BB101]) +RAND()*[.$BE$13]" office:value-type="float" office:value="-27.5899149789945" calcext:value-type="float">
            <text:p>-27.5899149789945</text:p>
          </table:table-cell>
          <table:table-cell table:style-name="ce71" table:formula="of:=[.E$28]*[.$Z$5]*MAGNET([.E$24]+[.$BB101])+[.F$28]*[.$Z$5]*MAGNET([.F$24]+[.$BB101])+[.G$28]*[.$Z$5]*MAGNET([.G$24]+[.$BB101])+[.H$28]*[.$Z$5]*MAGNET([.H$24]+[.$BB101])+[.I$28]*[.$Z$5]*MAGNET([.I$24]+[.$BB101])+[.J$28]*[.$Z$5]*MAGNET([.J$24]+[.$BB101])+[.K$28]*[.$Z$5]*MAGNET([.K$24]+[.$BB101])+[.L$28]*[.$Z$5]*MAGNET([.L$24]+[.$BB101])+[.M$28]*[.$Z$5]*MAGNET([.M$24]+[.$BB101])+[.N$28]*[.$Z$5]*MAGNET([.N$24]+[.$BB101])+[.O$28]*[.$Z$5]*MAGNET([.O$24]+[.$BB101])+[.P$28]*[.$Z$5]*MAGNET([.P$24]+[.$BB101])+[.Q$28]*[.$Z$5]*MAGNET([.Q$24]+[.$BB101])+[.R$28]*[.$Z$5]*MAGNET([.R$24]+[.$BB101])+[.S$28]*[.$Z$5]*MAGNET([.S$24]+[.$BB101])+[.T$28]*[.$Z$5]*MAGNET([.T$24]+[.$BB101])+[.U$28]*[.$Z$5]*MAGNET([.U$24]+[.$BB101])+[.V$28]*[.$Z$5]*MAGNET([.V$24]+[.$BB101])+[.W$28]*[.$Z$5]*MAGNET([.W$24]+[.$BB101])+[.X$28]*[.$Z$5]*MAGNET([.X$24]+[.$BB101])+[.Y$28]*[.$Z$5]*MAGNET([.Y$24]+[.$BB101])+[.Z$28]*[.$Z$5]*MAGNET([.Z$24]+[.$BB101])+[.AA$28]*[.$Z$5]*MAGNET([.AA$24]+[.$BB101])+[.AB$28]*[.$Z$5]*MAGNET([.AB$24]+[.$BB101])+[.AC$28]*[.$Z$5]*MAGNET([.AC$24]+[.$BB101])+[.AD$28]*[.$Z$5]*MAGNET([.AD$24]+[.$BB101])+[.AE$28]*[.$Z$5]*MAGNET([.AE$24]+[.$BB101])+[.AF$28]*[.$Z$5]*MAGNET([.AF$24]+[.$BB101])+[.AG$28]*[.$Z$5]*MAGNET([.AG$24]+[.$BB101])+[.D$28]*[.$Z$5]*MAGNET([.D$24]+[.$BB101])+[.AH$28]*[.$Z$5]*MAGNET([.AH$24]+[.BB101]) +[.AI$28]*[.$Z$5]*MAGNET([.AI$24]+[.BB101]) +[.AJ$28]*[.$Z$5]*MAGNET([.AJ$24]+[.BB101]) +[.AK$28]*[.$Z$5]*MAGNET([.AK$24]+[.BB101]) +[.AL$28]*[.$Z$5]*MAGNET([.AL$24]+[.BB101]) +[.AM$28]*[.$Z$5]*MAGNET([.AM$24]+[.BB101]) +[.AN$28]*[.$Z$5]*MAGNET([.AN$24]+[.BB101]) +[.AO$28]*[.$Z$5]*MAGNET([.AO$24]+[.BB101]) +[.AP$28]*[.$Z$5]*MAGNET([.AP$24]+[.$BB101])&#10;+[.AQ$28]*[.$Z$5]*MAGNET([.AQ$24]+[.$BB101])&#10;+[.AR$28]*[.$Z$5]*MAGNET([.AR$24]+[.$BB101])&#10;+[.AS$28]*[.$Z$5]*MAGNET([.AS$24]+[.$BB101])&#10;+[.AT$28]*[.$Z$5]*MAGNET([.AT$24]+[.$BB101])&#10;+[.AU$28]*[.$Z$5]*MAGNET([.AU$24]+[.$BB101])&#10;+[.AV$28]*[.$Z$5]*MAGNET([.AV$24]+[.$BB101])&#10;+[.AW$28]*[.$Z$5]*MAGNET([.AW$24]+[.$BB101])&#10;+[.AX$28]*[.$Z$5]*MAGNET([.AX$24]+[.$BB101])&#10;+[.AY$28]*[.$Z$5]*MAGNET([.AY$24]+[.$BB101]) +RAND()*[.$BF$13]" office:value-type="float" office:value="-1.59848835107194" calcext:value-type="float">
            <text:p>-1.59848835107194</text:p>
          </table:table-cell>
          <table:table-cell table:style-name="ce71" table:formula="of:=[.E$29]*[.$Z$5]*MAGNET([.E$24]+[.$BB101])+[.F$29]*[.$Z$5]*MAGNET([.F$24]+[.$BB101])+[.G$29]*[.$Z$5]*MAGNET([.G$24]+[.$BB101])+[.H$29]*[.$Z$5]*MAGNET([.H$24]+[.$BB101])+[.I$29]*[.$Z$5]*MAGNET([.I$24]+[.$BB101])+[.J$29]*[.$Z$5]*MAGNET([.J$24]+[.$BB101])+[.K$29]*[.$Z$5]*MAGNET([.K$24]+[.$BB101])+[.L$29]*[.$Z$5]*MAGNET([.L$24]+[.$BB101])+[.M$29]*[.$Z$5]*MAGNET([.M$24]+[.$BB101])+[.N$29]*[.$Z$5]*MAGNET([.N$24]+[.$BB101])+[.O$29]*[.$Z$5]*MAGNET([.O$24]+[.$BB101])+[.P$29]*[.$Z$5]*MAGNET([.P$24]+[.$BB101])+[.Q$29]*[.$Z$5]*MAGNET([.Q$24]+[.$BB101])+[.R$29]*[.$Z$5]*MAGNET([.R$24]+[.$BB101])+[.S$29]*[.$Z$5]*MAGNET([.S$24]+[.$BB101])+[.T$29]*[.$Z$5]*MAGNET([.T$24]+[.$BB101])+[.U$29]*[.$Z$5]*MAGNET([.U$24]+[.$BB101])+[.V$29]*[.$Z$5]*MAGNET([.V$24]+[.$BB101])+[.W$29]*[.$Z$5]*MAGNET([.W$24]+[.$BB101])+[.X$29]*[.$Z$5]*MAGNET([.X$24]+[.$BB101])+[.Y$29]*[.$Z$5]*MAGNET([.Y$24]+[.$BB101])+[.Z$29]*[.$Z$5]*MAGNET([.Z$24]+[.$BB101])+[.AA$29]*[.$Z$5]*MAGNET([.AA$24]+[.$BB101])+[.AB$29]*[.$Z$5]*MAGNET([.AB$24]+[.$BB101])+[.AC$29]*[.$Z$5]*MAGNET([.AC$24]+[.$BB101])+[.AD$29]*[.$Z$5]*MAGNET([.AD$24]+[.$BB101])+[.AE$29]*[.$Z$5]*MAGNET([.AE$24]+[.$BB101])+[.AF$29]*[.$Z$5]*MAGNET([.AF$24]+[.$BB101])+[.AG$29]*[.$Z$5]*MAGNET([.AG$24]+[.$BB101])+[.D$29]*[.$Z$5]*MAGNET([.D$24]+[.$BB101])+[.AH$29]*[.$Z$5]*MAGNET([.AH$24]+[.BB101]) +[.AI$29]*[.$Z$5]*MAGNET([.AI$24]+[.BB101]) +[.AJ$29]*[.$Z$5]*MAGNET([.AJ$24]+[.BB101]) +[.AK$29]*[.$Z$5]*MAGNET([.AK$24]+[.BB101]) +[.AL$29]*[.$Z$5]*MAGNET([.AL$24]+[.BB101]) +[.AM$29]*[.$Z$5]*MAGNET([.AM$24]+[.BB101]) +[.AN$29]*[.$Z$5]*MAGNET([.AN$24]+[.BB101]) +[.AO$29]*[.$Z$5]*MAGNET([.AO$24]+[.BB101]) +[.AP$29]*[.$Z$5]*MAGNET([.AP$24]+[.$BB101])&#10;+[.AQ$29]*[.$Z$5]*MAGNET([.AQ$24]+[.$BB101])&#10;+[.AR$29]*[.$Z$5]*MAGNET([.AR$24]+[.$BB101])&#10;+[.AS$29]*[.$Z$5]*MAGNET([.AS$24]+[.$BB101])&#10;+[.AT$29]*[.$Z$5]*MAGNET([.AT$24]+[.$BB101])&#10;+[.AU$29]*[.$Z$5]*MAGNET([.AU$24]+[.$BB101])&#10;+[.AV$29]*[.$Z$5]*MAGNET([.AV$24]+[.$BB101])&#10;+[.AW$29]*[.$Z$5]*MAGNET([.AW$24]+[.$BB101])&#10;+[.AX$29]*[.$Z$5]*MAGNET([.AX$24]+[.$BB101])&#10;+[.AY$29]*[.$Z$5]*MAGNET([.AY$24]+[.$BB101]) +RAND()*[.$BG$13]" office:value-type="float" office:value="12.6838453125971" calcext:value-type="float">
            <text:p>12.6838453125971</text:p>
          </table:table-cell>
          <table:table-cell table:style-name="ce71" table:formula="of:=[.E$30]*[.$Z$5]*MAGNET([.E$24]+[.$BB101])+[.F$30]*[.$Z$5]*MAGNET([.F$24]+[.$BB101])+[.G$30]*[.$Z$5]*MAGNET([.G$24]+[.$BB101])+[.H$30]*[.$Z$5]*MAGNET([.H$24]+[.$BB101])+[.I$30]*[.$Z$5]*MAGNET([.I$24]+[.$BB101])+[.J$30]*[.$Z$5]*MAGNET([.J$24]+[.$BB101])+[.K$30]*[.$Z$5]*MAGNET([.K$24]+[.$BB101])+[.L$30]*[.$Z$5]*MAGNET([.L$24]+[.$BB101])+[.M$30]*[.$Z$5]*MAGNET([.M$24]+[.$BB101])+[.N$30]*[.$Z$5]*MAGNET([.N$24]+[.$BB101])+[.O$30]*[.$Z$5]*MAGNET([.O$24]+[.$BB101])+[.P$30]*[.$Z$5]*MAGNET([.P$24]+[.$BB101])+[.Q$30]*[.$Z$5]*MAGNET([.Q$24]+[.$BB101])+[.R$30]*[.$Z$5]*MAGNET([.R$24]+[.$BB101])+[.S$30]*[.$Z$5]*MAGNET([.S$24]+[.$BB101])+[.T$30]*[.$Z$5]*MAGNET([.T$24]+[.$BB101])+[.U$30]*[.$Z$5]*MAGNET([.U$24]+[.$BB101])+[.V$30]*[.$Z$5]*MAGNET([.V$24]+[.$BB101])+[.W$30]*[.$Z$5]*MAGNET([.W$24]+[.$BB101])+[.X$30]*[.$Z$5]*MAGNET([.X$24]+[.$BB101])+[.Y$30]*[.$Z$5]*MAGNET([.Y$24]+[.$BB101])+[.Z$30]*[.$Z$5]*MAGNET([.Z$24]+[.$BB101])+[.AA$30]*[.$Z$5]*MAGNET([.AA$24]+[.$BB101])+[.AB$30]*[.$Z$5]*MAGNET([.AB$24]+[.$BB101])+[.AC$30]*[.$Z$5]*MAGNET([.AC$24]+[.$BB101])+[.AD$30]*[.$Z$5]*MAGNET([.AD$24]+[.$BB101])+[.AE$30]*[.$Z$5]*MAGNET([.AE$24]+[.$BB101])+[.AF$30]*[.$Z$5]*MAGNET([.AF$24]+[.$BB101])+[.AG$30]*[.$Z$5]*MAGNET([.AG$24]+[.$BB101])+[.D$30]*[.$Z$5]*MAGNET([.D$24]+[.$BB101])+[.AH$30]*[.$Z$5]*MAGNET([.AH$24]+[.BB101]) +[.AI$30]*[.$Z$5]*MAGNET([.AI$24]+[.BB101]) +[.AJ$30]*[.$Z$5]*MAGNET([.AJ$24]+[.BB101]) +[.AK$30]*[.$Z$5]*MAGNET([.AK$24]+[.BB101]) +[.AL$30]*[.$Z$5]*MAGNET([.AL$24]+[.BB101]) +[.AM$30]*[.$Z$5]*MAGNET([.AM$24]+[.BB101]) +[.AN$30]*[.$Z$5]*MAGNET([.AN$24]+[.BB101]) +[.AO$30]*[.$Z$5]*MAGNET([.AO$24]+[.BB101]) +[.AP$30]*[.$Z$5]*MAGNET([.AP$24]+[.$BB101])&#10;+[.AQ$30]*[.$Z$5]*MAGNET([.AQ$24]+[.$BB101])&#10;+[.AR$30]*[.$Z$5]*MAGNET([.AR$24]+[.$BB101])&#10;+[.AS$30]*[.$Z$5]*MAGNET([.AS$24]+[.$BB101])&#10;+[.AT$30]*[.$Z$5]*MAGNET([.AT$24]+[.$BB101])&#10;+[.AU$30]*[.$Z$5]*MAGNET([.AU$24]+[.$BB101])&#10;+[.AV$30]*[.$Z$5]*MAGNET([.AV$24]+[.$BB101])&#10;+[.AW$30]*[.$Z$5]*MAGNET([.AW$24]+[.$BB101])&#10;+[.AX$30]*[.$Z$5]*MAGNET([.AX$24]+[.$BB101])&#10;+[.AY$30]*[.$Z$5]*MAGNET([.AY$24]+[.$BB101]) +RAND()*[.$BH$13]" office:value-type="float" office:value="0" calcext:value-type="float">
            <text:p>0</text:p>
          </table:table-cell>
          <table:table-cell table:style-name="ce71" table:formula="of:=[.E$31]*[.$Z$5]*MAGNET([.E$24]+[.$BB101])+[.F$31]*[.$Z$5]*MAGNET([.F$24]+[.$BB101])+[.G$31]*[.$Z$5]*MAGNET([.G$24]+[.$BB101])+[.H$31]*[.$Z$5]*MAGNET([.H$24]+[.$BB101])+[.I$31]*[.$Z$5]*MAGNET([.I$24]+[.$BB101])+[.J$31]*[.$Z$5]*MAGNET([.J$24]+[.$BB101])+[.K$31]*[.$Z$5]*MAGNET([.K$24]+[.$BB101])+[.L$31]*[.$Z$5]*MAGNET([.L$24]+[.$BB101])+[.M$31]*[.$Z$5]*MAGNET([.M$24]+[.$BB101])+[.N$31]*[.$Z$5]*MAGNET([.N$24]+[.$BB101])+[.O$31]*[.$Z$5]*MAGNET([.O$24]+[.$BB101])+[.P$31]*[.$Z$5]*MAGNET([.P$24]+[.$BB101])+[.Q$31]*[.$Z$5]*MAGNET([.Q$24]+[.$BB101])+[.R$31]*[.$Z$5]*MAGNET([.R$24]+[.$BB101])+[.S$31]*[.$Z$5]*MAGNET([.S$24]+[.$BB101])+[.T$31]*[.$Z$5]*MAGNET([.T$24]+[.$BB101])+[.U$31]*[.$Z$5]*MAGNET([.U$24]+[.$BB101])+[.V$31]*[.$Z$5]*MAGNET([.V$24]+[.$BB101])+[.W$31]*[.$Z$5]*MAGNET([.W$24]+[.$BB101])+[.X$31]*[.$Z$5]*MAGNET([.X$24]+[.$BB101])+[.Y$31]*[.$Z$5]*MAGNET([.Y$24]+[.$BB101])+[.Z$31]*[.$Z$5]*MAGNET([.Z$24]+[.$BB101])+[.AA$31]*[.$Z$5]*MAGNET([.AA$24]+[.$BB101])+[.AB$31]*[.$Z$5]*MAGNET([.AB$24]+[.$BB101])+[.AC$31]*[.$Z$5]*MAGNET([.AC$24]+[.$BB101])+[.AD$31]*[.$Z$5]*MAGNET([.AD$24]+[.$BB101])+[.AE$31]*[.$Z$5]*MAGNET([.AE$24]+[.$BB101])+[.AF$31]*[.$Z$5]*MAGNET([.AF$24]+[.$BB101])+[.AG$31]*[.$Z$5]*MAGNET([.AG$24]+[.$BB101])+[.D$31]*[.$Z$5]*MAGNET([.D$24]+[.$BB101])+[.AH$31]*[.$Z$5]*MAGNET([.AH$24]+[.BB101]) +[.AI$31]*[.$Z$5]*MAGNET([.AI$24]+[.BB101]) +[.AJ$31]*[.$Z$5]*MAGNET([.AJ$24]+[.BB101]) +[.AK$31]*[.$Z$5]*MAGNET([.AK$24]+[.BB101]) +[.AL$31]*[.$Z$5]*MAGNET([.AL$24]+[.BB101]) +[.AM$31]*[.$Z$5]*MAGNET([.AM$24]+[.BB101]) +[.AN$31]*[.$Z$5]*MAGNET([.AN$24]+[.BB101]) +[.AO$31]*[.$Z$5]*MAGNET([.AO$24]+[.BB101]) +[.AP$31]*[.$Z$5]*MAGNET([.AP$24]+[.$BB101])&#10;+[.AQ$31]*[.$Z$5]*MAGNET([.AQ$24]+[.$BB101])&#10;+[.AR$31]*[.$Z$5]*MAGNET([.AR$24]+[.$BB101])&#10;+[.AS$31]*[.$Z$5]*MAGNET([.AS$24]+[.$BB101])&#10;+[.AT$31]*[.$Z$5]*MAGNET([.AT$24]+[.$BB101])&#10;+[.AU$31]*[.$Z$5]*MAGNET([.AU$24]+[.$BB101])&#10;+[.AV$31]*[.$Z$5]*MAGNET([.AV$24]+[.$BB101])&#10;+[.AW$31]*[.$Z$5]*MAGNET([.AW$24]+[.$BB101])&#10;+[.AX$31]*[.$Z$5]*MAGNET([.AX$24]+[.$BB101])&#10;+[.AY$31]*[.$Z$5]*MAGNET([.AY$24]+[.$BB101]) +RAND()*[.$BI$13]" office:value-type="float" office:value="0" calcext:value-type="float">
            <text:p>0</text:p>
          </table:table-cell>
          <table:table-cell table:style-name="ce71" table:formula="of:=[.E$32]*[.$Z$5]*MAGNET([.E$24]+[.$BB101])+[.F$32]*[.$Z$5]*MAGNET([.F$24]+[.$BB101])+[.G$32]*[.$Z$5]*MAGNET([.G$24]+[.$BB101])+[.H$32]*[.$Z$5]*MAGNET([.H$24]+[.$BB101])+[.I$32]*[.$Z$5]*MAGNET([.I$24]+[.$BB101])+[.J$32]*[.$Z$5]*MAGNET([.J$24]+[.$BB101])+[.K$32]*[.$Z$5]*MAGNET([.K$24]+[.$BB101])+[.L$32]*[.$Z$5]*MAGNET([.L$24]+[.$BB101])+[.M$32]*[.$Z$5]*MAGNET([.M$24]+[.$BB101])+[.N$32]*[.$Z$5]*MAGNET([.N$24]+[.$BB101])+[.O$32]*[.$Z$5]*MAGNET([.O$24]+[.$BB101])+[.P$32]*[.$Z$5]*MAGNET([.P$24]+[.$BB101])+[.Q$32]*[.$Z$5]*MAGNET([.Q$24]+[.$BB101])+[.R$32]*[.$Z$5]*MAGNET([.R$24]+[.$BB101])+[.S$32]*[.$Z$5]*MAGNET([.S$24]+[.$BB101])+[.T$32]*[.$Z$5]*MAGNET([.T$24]+[.$BB101])+[.U$32]*[.$Z$5]*MAGNET([.U$24]+[.$BB101])+[.V$32]*[.$Z$5]*MAGNET([.V$24]+[.$BB101])+[.W$32]*[.$Z$5]*MAGNET([.W$24]+[.$BB101])+[.X$32]*[.$Z$5]*MAGNET([.X$24]+[.$BB101])+[.Y$32]*[.$Z$5]*MAGNET([.Y$24]+[.$BB101])+[.Z$32]*[.$Z$5]*MAGNET([.Z$24]+[.$BB101])+[.AA$32]*[.$Z$5]*MAGNET([.AA$24]+[.$BB101])+[.AB$32]*[.$Z$5]*MAGNET([.AB$24]+[.$BB101])+[.AC$32]*[.$Z$5]*MAGNET([.AC$24]+[.$BB101])+[.AD$32]*[.$Z$5]*MAGNET([.AD$24]+[.$BB101])+[.AE$32]*[.$Z$5]*MAGNET([.AE$24]+[.$BB101])+[.AF$32]*[.$Z$5]*MAGNET([.AF$24]+[.$BB101])+[.AG$32]*[.$Z$5]*MAGNET([.AG$24]+[.$BB101])+[.D$32]*[.$Z$5]*MAGNET([.D$24]+[.$BB101])+[.AH$32]*[.$Z$5]*MAGNET([.AH$24]+[.BB101]) +[.AI$32]*[.$Z$5]*MAGNET([.AI$24]+[.BB101]) +[.AJ$32]*[.$Z$5]*MAGNET([.AJ$24]+[.BB101]) +[.AK$32]*[.$Z$5]*MAGNET([.AK$24]+[.BB101]) +[.AL$32]*[.$Z$5]*MAGNET([.AL$24]+[.BB101]) +[.AM$32]*[.$Z$5]*MAGNET([.AM$24]+[.BB101]) +[.AN$32]*[.$Z$5]*MAGNET([.AN$24]+[.BB101]) +[.AO$32]*[.$Z$5]*MAGNET([.AO$24]+[.BB101]) +[.AP$32]*[.$Z$5]*MAGNET([.AP$24]+[.$BB101])&#10;+[.AQ$32]*[.$Z$5]*MAGNET([.AQ$24]+[.$BB101])&#10;+[.AR$32]*[.$Z$5]*MAGNET([.AR$24]+[.$BB101])&#10;+[.AS$32]*[.$Z$5]*MAGNET([.AS$24]+[.$BB101])&#10;+[.AT$32]*[.$Z$5]*MAGNET([.AT$24]+[.$BB101])&#10;+[.AU$32]*[.$Z$5]*MAGNET([.AU$24]+[.$BB101])&#10;+[.AV$32]*[.$Z$5]*MAGNET([.AV$24]+[.$BB101])&#10;+[.AW$32]*[.$Z$5]*MAGNET([.AW$24]+[.$BB101])&#10;+[.AX$32]*[.$Z$5]*MAGNET([.AX$24]+[.$BB101])&#10;+[.AY$32]*[.$Z$5]*MAGNET([.AY$24]+[.$BB10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1]+0.002" office:value-type="float" office:value="0.174" calcext:value-type="float">
            <text:p>0.174</text:p>
          </table:table-cell>
          <table:table-cell table:formula="of:=[.BA102]*[.$D$6]" office:value-type="float" office:value="8.74619394759399" calcext:value-type="float">
            <text:p>8.746</text:p>
          </table:table-cell>
          <table:table-cell table:formula="of:=[.D$25]*[.$Z$5]*MAGNET([.D$24]+[.BB102])+[.E$25]*[.$Z$5]*MAGNET([.E$24]+[.BB102])+[.F$25]*[.$Z$5]*MAGNET([.F$24]+[.BB102])+[.G$25]*[.$Z$5]*MAGNET([.G$24]+[.BB102])+[.H$25]*[.$Z$5]*MAGNET([.H$24]+[.BB102])+[.I$25]*[.$Z$5]*MAGNET([.I$24]+[.BB102])+[.J$25]*[.$Z$5]*MAGNET([.J$24]+[.BB102])+[.K$25]*[.$Z$5]*MAGNET([.K$24]+[.BB102])+[.L$25]*[.$Z$5]*MAGNET([.L$24]+[.BB102])+[.M$25]*[.$Z$5]*MAGNET([.M$24]+[.BB102])+[.N$25]*[.$Z$5]*MAGNET([.N$24]+[.BB102])+[.O$25]*[.$Z$5]*MAGNET([.O$24]+[.BB102])+[.P$25]*[.$Z$5]*MAGNET([.P$24]+[.BB102])+[.Q$25]*[.$Z$5]*MAGNET([.Q$24]+[.BB102])+[.R$25]*[.$Z$5]*MAGNET([.R$24]+[.BB102])+[.S$25]*[.$Z$5]*MAGNET([.S$24]+[.BB102])+[.T$25]*[.$Z$5]*MAGNET([.T$24]+[.BB102])+[.U$25]*[.$Z$5]*MAGNET([.U$24]+[.BB102])+[.V$25]*[.$Z$5]*MAGNET([.V$24]+[.BB102])+[.W$25]*[.$Z$5]*MAGNET([.W$24]+[.BB102])+[.X$25]*[.$Z$5]*MAGNET([.X$24]+[.BB102])+[.Y$25]*[.$Z$5]*MAGNET([.Y$24]+[.BB102])+[.Z$25]*[.$Z$5]*MAGNET([.Z$24]+[.BB102])+[.AA$25]*[.$Z$5]*MAGNET([.AA$24]+[.BB102])+[.AB$25]*[.$Z$5]*MAGNET([.AB$24]+[.BB102])+[.AC$25]*[.$Z$5]*MAGNET([.AC$24]+[.BB102])+[.AD$25]*[.$Z$5]*MAGNET([.AD$24]+[.BB102])+[.AE$25]*[.$Z$5]*MAGNET([.AE$24]+[.BB102])+[.AF$25]*[.$Z$5]*MAGNET([.AF$24]+[.BB102])+[.AG$25]*[.$Z$5]*MAGNET([.AG$24]+[.BB102])+[.AH$25]*[.$Z$5]*MAGNET([.AH$24]+[.BB102]) +[.AI$25]*[.$Z$5]*MAGNET([.AI$24]+[.BB102]) +[.AJ$25]*[.$Z$5]*MAGNET([.AJ$24]+[.BB102]) +[.AK$25]*[.$Z$5]*MAGNET([.AK$24]+[.BB102]) +[.AL$25]*[.$Z$5]*MAGNET([.AL$24]+[.BB102]) +[.AM$25]*[.$Z$5]*MAGNET([.AM$24]+[.BB102]) +[.AN$25]*[.$Z$5]*MAGNET([.AN$24]+[.BB102]) +[.AO$25]*[.$Z$5]*MAGNET([.AO$24]+[.BB102])+RAND()*[.$BC$13]+[.AP$25]*[.$Z$5]*MAGNET([.AP$24]+[.BB102])&#10;+[.AQ$25]*[.$Z$5]*MAGNET([.AQ$24]+[.BB102])&#10;+[.AR$25]*[.$Z$5]*MAGNET([.AR$24]+[.BB102])&#10;+[.AS$25]*[.$Z$5]*MAGNET([.AS$24]+[.BB102])&#10;+[.AT$25]*[.$Z$5]*MAGNET([.AT$24]+[.BB102])&#10;+[.AU$25]*[.$Z$5]*MAGNET([.AU$24]+[.BB102])&#10;+[.AV$25]*[.$Z$5]*MAGNET([.AV$24]+[.BB102])&#10;+[.AW$25]*[.$Z$5]*MAGNET([.AW$24]+[.BB102])&#10;+[.AX$25]*[.$Z$5]*MAGNET([.AX$24]+[.BB102])&#10;+[.AY$25]*[.$Z$5]*MAGNET([.AY$24]+[.BB102])" office:value-type="float" office:value="107.73564915307" calcext:value-type="float">
            <text:p>107.74</text:p>
          </table:table-cell>
          <table:table-cell table:style-name="ce70" table:formula="of:=[.E$26]*[.$Z$5]*MAGNET([.E$24]+[.$BB102])+[.F$26]*[.$Z$5]*MAGNET([.F$24]+[.$BB102])+[.G$26]*[.$Z$5]*MAGNET([.G$24]+[.$BB102])+[.H$26]*[.$Z$5]*MAGNET([.H$24]+[.$BB102])+[.I$26]*[.$Z$5]*MAGNET([.I$24]+[.$BB102])+[.J$26]*[.$Z$5]*MAGNET([.J$24]+[.$BB102])+[.K$26]*[.$Z$5]*MAGNET([.K$24]+[.$BB102])+[.L$26]*[.$Z$5]*MAGNET([.L$24]+[.$BB102])+[.M$26]*[.$Z$5]*MAGNET([.M$24]+[.$BB102])+[.N$26]*[.$Z$5]*MAGNET([.N$24]+[.$BB102])+[.O$26]*[.$Z$5]*MAGNET([.O$24]+[.$BB102])+[.P$26]*[.$Z$5]*MAGNET([.P$24]+[.$BB102])+[.Q$26]*[.$Z$5]*MAGNET([.Q$24]+[.$BB102])+[.R$26]*[.$Z$5]*MAGNET([.R$24]+[.$BB102])+[.S$26]*[.$Z$5]*MAGNET([.S$24]+[.$BB102])+[.T$26]*[.$Z$5]*MAGNET([.T$24]+[.$BB102])+[.U$26]*[.$Z$5]*MAGNET([.U$24]+[.$BB102])+[.V$26]*[.$Z$5]*MAGNET([.V$24]+[.$BB102])+[.W$26]*[.$Z$5]*MAGNET([.W$24]+[.$BB102])+[.X$26]*[.$Z$5]*MAGNET([.X$24]+[.$BB102])+[.Y$26]*[.$Z$5]*MAGNET([.Y$24]+[.$BB102])+[.Z$26]*[.$Z$5]*MAGNET([.Z$24]+[.$BB102])+[.AA$26]*[.$Z$5]*MAGNET([.AA$24]+[.$BB102])+[.AB$26]*[.$Z$5]*MAGNET([.AB$24]+[.$BB102])+[.AC$26]*[.$Z$5]*MAGNET([.AC$24]+[.$BB102])+[.AD$26]*[.$Z$5]*MAGNET([.AD$24]+[.$BB102])+[.AE$26]*[.$Z$5]*MAGNET([.AE$24]+[.$BB102])+[.AF$26]*[.$Z$5]*MAGNET([.AF$24]+[.$BB102])+[.AG$26]*[.$Z$5]*MAGNET([.AG$24]+[.$BB102])+[.D$26]*[.$Z$5]*MAGNET([.D$24]+[.$BB102])+[.AH$26]*[.$Z$5]*MAGNET([.AH$24]+[.BB102]) +[.AI$26]*[.$Z$5]*MAGNET([.AI$24]+[.BB102]) +[.AJ$26]*[.$Z$5]*MAGNET([.AJ$24]+[.BB102]) +[.AK$26]*[.$Z$5]*MAGNET([.AK$24]+[.BB102]) +[.AL$26]*[.$Z$5]*MAGNET([.AL$24]+[.BB102]) +[.AM$26]*[.$Z$5]*MAGNET([.AM$24]+[.BB102]) +[.AN$26]*[.$Z$5]*MAGNET([.AN$24]+[.BB102]) +[.AO$26]*[.$Z$5]*MAGNET([.AO$24]+[.BB102]) +[.AP$26]*[.$Z$5]*MAGNET([.AP$24]+[.$BB102])&#10;+[.AQ$26]*[.$Z$5]*MAGNET([.AQ$24]+[.$BB102])&#10;+[.AR$26]*[.$Z$5]*MAGNET([.AR$24]+[.$BB102])&#10;+[.AS$26]*[.$Z$5]*MAGNET([.AS$24]+[.$BB102])&#10;+[.AT$26]*[.$Z$5]*MAGNET([.AT$24]+[.$BB102])&#10;+[.AU$26]*[.$Z$5]*MAGNET([.AU$24]+[.$BB102])&#10;+[.AV$26]*[.$Z$5]*MAGNET([.AV$24]+[.$BB102])&#10;+[.AW$26]*[.$Z$5]*MAGNET([.AW$24]+[.$BB102])&#10;+[.AX$26]*[.$Z$5]*MAGNET([.AX$24]+[.$BB102])&#10;+[.AY$26]*[.$Z$5]*MAGNET([.AY$24]+[.$BB102]) +RAND()*[.$BD$13]" office:value-type="float" office:value="-79.7463479840103" calcext:value-type="float">
            <text:p>-79.75</text:p>
          </table:table-cell>
          <table:table-cell table:style-name="ce71" table:formula="of:=[.E$27]*[.$Z$5]*MAGNET([.E$24]+[.$BB102])+[.F$27]*[.$Z$5]*MAGNET([.F$24]+[.$BB102])+[.G$27]*[.$Z$5]*MAGNET([.G$24]+[.$BB102])+[.H$27]*[.$Z$5]*MAGNET([.H$24]+[.$BB102])+[.I$27]*[.$Z$5]*MAGNET([.I$24]+[.$BB102])+[.J$27]*[.$Z$5]*MAGNET([.J$24]+[.$BB102])+[.K$27]*[.$Z$5]*MAGNET([.K$24]+[.$BB102])+[.L$27]*[.$Z$5]*MAGNET([.L$24]+[.$BB102])+[.M$27]*[.$Z$5]*MAGNET([.M$24]+[.$BB102])+[.N$27]*[.$Z$5]*MAGNET([.N$24]+[.$BB102])+[.O$27]*[.$Z$5]*MAGNET([.O$24]+[.$BB102])+[.P$27]*[.$Z$5]*MAGNET([.P$24]+[.$BB102])+[.Q$27]*[.$Z$5]*MAGNET([.Q$24]+[.$BB102])+[.R$27]*[.$Z$5]*MAGNET([.R$24]+[.$BB102])+[.S$27]*[.$Z$5]*MAGNET([.S$24]+[.$BB102])+[.T$27]*[.$Z$5]*MAGNET([.T$24]+[.$BB102])+[.U$27]*[.$Z$5]*MAGNET([.U$24]+[.$BB102])+[.V$27]*[.$Z$5]*MAGNET([.V$24]+[.$BB102])+[.W$27]*[.$Z$5]*MAGNET([.W$24]+[.$BB102])+[.X$27]*[.$Z$5]*MAGNET([.X$24]+[.$BB102])+[.Y$27]*[.$Z$5]*MAGNET([.Y$24]+[.$BB102])+[.Z$27]*[.$Z$5]*MAGNET([.Z$24]+[.$BB102])+[.AA$27]*[.$Z$5]*MAGNET([.AA$24]+[.$BB102])+[.AB$27]*[.$Z$5]*MAGNET([.AB$24]+[.$BB102])+[.AC$27]*[.$Z$5]*MAGNET([.AC$24]+[.$BB102])+[.AD$27]*[.$Z$5]*MAGNET([.AD$24]+[.$BB102])+[.AE$27]*[.$Z$5]*MAGNET([.AE$24]+[.$BB102])+[.AF$27]*[.$Z$5]*MAGNET([.AF$24]+[.$BB102])+[.AG$27]*[.$Z$5]*MAGNET([.AG$24]+[.$BB102])+[.D$27]*[.$Z$5]*MAGNET([.D$24]+[.$BB102])+[.AH$27]*[.$Z$5]*MAGNET([.AH$24]+[.BB102]) +[.AI$27]*[.$Z$5]*MAGNET([.AI$24]+[.BB102]) +[.AJ$27]*[.$Z$5]*MAGNET([.AJ$24]+[.BB102]) +[.AK$27]*[.$Z$5]*MAGNET([.AK$24]+[.BB102]) +[.AL$27]*[.$Z$5]*MAGNET([.AL$24]+[.BB102]) +[.AM$27]*[.$Z$5]*MAGNET([.AM$24]+[.BB102]) +[.AN$27]*[.$Z$5]*MAGNET([.AN$24]+[.BB102]) +[.AO$27]*[.$Z$5]*MAGNET([.AO$24]+[.BB102]) +[.AP$27]*[.$Z$5]*MAGNET([.AP$24]+[.$BB102])&#10;+[.AQ$27]*[.$Z$5]*MAGNET([.AQ$24]+[.$BB102])&#10;+[.AR$27]*[.$Z$5]*MAGNET([.AR$24]+[.$BB102])&#10;+[.AS$27]*[.$Z$5]*MAGNET([.AS$24]+[.$BB102])&#10;+[.AT$27]*[.$Z$5]*MAGNET([.AT$24]+[.$BB102])&#10;+[.AU$27]*[.$Z$5]*MAGNET([.AU$24]+[.$BB102])&#10;+[.AV$27]*[.$Z$5]*MAGNET([.AV$24]+[.$BB102])&#10;+[.AW$27]*[.$Z$5]*MAGNET([.AW$24]+[.$BB102])&#10;+[.AX$27]*[.$Z$5]*MAGNET([.AX$24]+[.$BB102])&#10;+[.AY$27]*[.$Z$5]*MAGNET([.AY$24]+[.$BB102]) +RAND()*[.$BE$13]" office:value-type="float" office:value="-14.4489490238802" calcext:value-type="float">
            <text:p>-14.4489490238802</text:p>
          </table:table-cell>
          <table:table-cell table:style-name="ce71" table:formula="of:=[.E$28]*[.$Z$5]*MAGNET([.E$24]+[.$BB102])+[.F$28]*[.$Z$5]*MAGNET([.F$24]+[.$BB102])+[.G$28]*[.$Z$5]*MAGNET([.G$24]+[.$BB102])+[.H$28]*[.$Z$5]*MAGNET([.H$24]+[.$BB102])+[.I$28]*[.$Z$5]*MAGNET([.I$24]+[.$BB102])+[.J$28]*[.$Z$5]*MAGNET([.J$24]+[.$BB102])+[.K$28]*[.$Z$5]*MAGNET([.K$24]+[.$BB102])+[.L$28]*[.$Z$5]*MAGNET([.L$24]+[.$BB102])+[.M$28]*[.$Z$5]*MAGNET([.M$24]+[.$BB102])+[.N$28]*[.$Z$5]*MAGNET([.N$24]+[.$BB102])+[.O$28]*[.$Z$5]*MAGNET([.O$24]+[.$BB102])+[.P$28]*[.$Z$5]*MAGNET([.P$24]+[.$BB102])+[.Q$28]*[.$Z$5]*MAGNET([.Q$24]+[.$BB102])+[.R$28]*[.$Z$5]*MAGNET([.R$24]+[.$BB102])+[.S$28]*[.$Z$5]*MAGNET([.S$24]+[.$BB102])+[.T$28]*[.$Z$5]*MAGNET([.T$24]+[.$BB102])+[.U$28]*[.$Z$5]*MAGNET([.U$24]+[.$BB102])+[.V$28]*[.$Z$5]*MAGNET([.V$24]+[.$BB102])+[.W$28]*[.$Z$5]*MAGNET([.W$24]+[.$BB102])+[.X$28]*[.$Z$5]*MAGNET([.X$24]+[.$BB102])+[.Y$28]*[.$Z$5]*MAGNET([.Y$24]+[.$BB102])+[.Z$28]*[.$Z$5]*MAGNET([.Z$24]+[.$BB102])+[.AA$28]*[.$Z$5]*MAGNET([.AA$24]+[.$BB102])+[.AB$28]*[.$Z$5]*MAGNET([.AB$24]+[.$BB102])+[.AC$28]*[.$Z$5]*MAGNET([.AC$24]+[.$BB102])+[.AD$28]*[.$Z$5]*MAGNET([.AD$24]+[.$BB102])+[.AE$28]*[.$Z$5]*MAGNET([.AE$24]+[.$BB102])+[.AF$28]*[.$Z$5]*MAGNET([.AF$24]+[.$BB102])+[.AG$28]*[.$Z$5]*MAGNET([.AG$24]+[.$BB102])+[.D$28]*[.$Z$5]*MAGNET([.D$24]+[.$BB102])+[.AH$28]*[.$Z$5]*MAGNET([.AH$24]+[.BB102]) +[.AI$28]*[.$Z$5]*MAGNET([.AI$24]+[.BB102]) +[.AJ$28]*[.$Z$5]*MAGNET([.AJ$24]+[.BB102]) +[.AK$28]*[.$Z$5]*MAGNET([.AK$24]+[.BB102]) +[.AL$28]*[.$Z$5]*MAGNET([.AL$24]+[.BB102]) +[.AM$28]*[.$Z$5]*MAGNET([.AM$24]+[.BB102]) +[.AN$28]*[.$Z$5]*MAGNET([.AN$24]+[.BB102]) +[.AO$28]*[.$Z$5]*MAGNET([.AO$24]+[.BB102]) +[.AP$28]*[.$Z$5]*MAGNET([.AP$24]+[.$BB102])&#10;+[.AQ$28]*[.$Z$5]*MAGNET([.AQ$24]+[.$BB102])&#10;+[.AR$28]*[.$Z$5]*MAGNET([.AR$24]+[.$BB102])&#10;+[.AS$28]*[.$Z$5]*MAGNET([.AS$24]+[.$BB102])&#10;+[.AT$28]*[.$Z$5]*MAGNET([.AT$24]+[.$BB102])&#10;+[.AU$28]*[.$Z$5]*MAGNET([.AU$24]+[.$BB102])&#10;+[.AV$28]*[.$Z$5]*MAGNET([.AV$24]+[.$BB102])&#10;+[.AW$28]*[.$Z$5]*MAGNET([.AW$24]+[.$BB102])&#10;+[.AX$28]*[.$Z$5]*MAGNET([.AX$24]+[.$BB102])&#10;+[.AY$28]*[.$Z$5]*MAGNET([.AY$24]+[.$BB102]) +RAND()*[.$BF$13]" office:value-type="float" office:value="-0.00546829801327586" calcext:value-type="float">
            <text:p>-0.00546829801327586</text:p>
          </table:table-cell>
          <table:table-cell table:style-name="ce71" table:formula="of:=[.E$29]*[.$Z$5]*MAGNET([.E$24]+[.$BB102])+[.F$29]*[.$Z$5]*MAGNET([.F$24]+[.$BB102])+[.G$29]*[.$Z$5]*MAGNET([.G$24]+[.$BB102])+[.H$29]*[.$Z$5]*MAGNET([.H$24]+[.$BB102])+[.I$29]*[.$Z$5]*MAGNET([.I$24]+[.$BB102])+[.J$29]*[.$Z$5]*MAGNET([.J$24]+[.$BB102])+[.K$29]*[.$Z$5]*MAGNET([.K$24]+[.$BB102])+[.L$29]*[.$Z$5]*MAGNET([.L$24]+[.$BB102])+[.M$29]*[.$Z$5]*MAGNET([.M$24]+[.$BB102])+[.N$29]*[.$Z$5]*MAGNET([.N$24]+[.$BB102])+[.O$29]*[.$Z$5]*MAGNET([.O$24]+[.$BB102])+[.P$29]*[.$Z$5]*MAGNET([.P$24]+[.$BB102])+[.Q$29]*[.$Z$5]*MAGNET([.Q$24]+[.$BB102])+[.R$29]*[.$Z$5]*MAGNET([.R$24]+[.$BB102])+[.S$29]*[.$Z$5]*MAGNET([.S$24]+[.$BB102])+[.T$29]*[.$Z$5]*MAGNET([.T$24]+[.$BB102])+[.U$29]*[.$Z$5]*MAGNET([.U$24]+[.$BB102])+[.V$29]*[.$Z$5]*MAGNET([.V$24]+[.$BB102])+[.W$29]*[.$Z$5]*MAGNET([.W$24]+[.$BB102])+[.X$29]*[.$Z$5]*MAGNET([.X$24]+[.$BB102])+[.Y$29]*[.$Z$5]*MAGNET([.Y$24]+[.$BB102])+[.Z$29]*[.$Z$5]*MAGNET([.Z$24]+[.$BB102])+[.AA$29]*[.$Z$5]*MAGNET([.AA$24]+[.$BB102])+[.AB$29]*[.$Z$5]*MAGNET([.AB$24]+[.$BB102])+[.AC$29]*[.$Z$5]*MAGNET([.AC$24]+[.$BB102])+[.AD$29]*[.$Z$5]*MAGNET([.AD$24]+[.$BB102])+[.AE$29]*[.$Z$5]*MAGNET([.AE$24]+[.$BB102])+[.AF$29]*[.$Z$5]*MAGNET([.AF$24]+[.$BB102])+[.AG$29]*[.$Z$5]*MAGNET([.AG$24]+[.$BB102])+[.D$29]*[.$Z$5]*MAGNET([.D$24]+[.$BB102])+[.AH$29]*[.$Z$5]*MAGNET([.AH$24]+[.BB102]) +[.AI$29]*[.$Z$5]*MAGNET([.AI$24]+[.BB102]) +[.AJ$29]*[.$Z$5]*MAGNET([.AJ$24]+[.BB102]) +[.AK$29]*[.$Z$5]*MAGNET([.AK$24]+[.BB102]) +[.AL$29]*[.$Z$5]*MAGNET([.AL$24]+[.BB102]) +[.AM$29]*[.$Z$5]*MAGNET([.AM$24]+[.BB102]) +[.AN$29]*[.$Z$5]*MAGNET([.AN$24]+[.BB102]) +[.AO$29]*[.$Z$5]*MAGNET([.AO$24]+[.BB102]) +[.AP$29]*[.$Z$5]*MAGNET([.AP$24]+[.$BB102])&#10;+[.AQ$29]*[.$Z$5]*MAGNET([.AQ$24]+[.$BB102])&#10;+[.AR$29]*[.$Z$5]*MAGNET([.AR$24]+[.$BB102])&#10;+[.AS$29]*[.$Z$5]*MAGNET([.AS$24]+[.$BB102])&#10;+[.AT$29]*[.$Z$5]*MAGNET([.AT$24]+[.$BB102])&#10;+[.AU$29]*[.$Z$5]*MAGNET([.AU$24]+[.$BB102])&#10;+[.AV$29]*[.$Z$5]*MAGNET([.AV$24]+[.$BB102])&#10;+[.AW$29]*[.$Z$5]*MAGNET([.AW$24]+[.$BB102])&#10;+[.AX$29]*[.$Z$5]*MAGNET([.AX$24]+[.$BB102])&#10;+[.AY$29]*[.$Z$5]*MAGNET([.AY$24]+[.$BB102]) +RAND()*[.$BG$13]" office:value-type="float" office:value="5.51330817783717" calcext:value-type="float">
            <text:p>5.51330817783717</text:p>
          </table:table-cell>
          <table:table-cell table:style-name="ce71" table:formula="of:=[.E$30]*[.$Z$5]*MAGNET([.E$24]+[.$BB102])+[.F$30]*[.$Z$5]*MAGNET([.F$24]+[.$BB102])+[.G$30]*[.$Z$5]*MAGNET([.G$24]+[.$BB102])+[.H$30]*[.$Z$5]*MAGNET([.H$24]+[.$BB102])+[.I$30]*[.$Z$5]*MAGNET([.I$24]+[.$BB102])+[.J$30]*[.$Z$5]*MAGNET([.J$24]+[.$BB102])+[.K$30]*[.$Z$5]*MAGNET([.K$24]+[.$BB102])+[.L$30]*[.$Z$5]*MAGNET([.L$24]+[.$BB102])+[.M$30]*[.$Z$5]*MAGNET([.M$24]+[.$BB102])+[.N$30]*[.$Z$5]*MAGNET([.N$24]+[.$BB102])+[.O$30]*[.$Z$5]*MAGNET([.O$24]+[.$BB102])+[.P$30]*[.$Z$5]*MAGNET([.P$24]+[.$BB102])+[.Q$30]*[.$Z$5]*MAGNET([.Q$24]+[.$BB102])+[.R$30]*[.$Z$5]*MAGNET([.R$24]+[.$BB102])+[.S$30]*[.$Z$5]*MAGNET([.S$24]+[.$BB102])+[.T$30]*[.$Z$5]*MAGNET([.T$24]+[.$BB102])+[.U$30]*[.$Z$5]*MAGNET([.U$24]+[.$BB102])+[.V$30]*[.$Z$5]*MAGNET([.V$24]+[.$BB102])+[.W$30]*[.$Z$5]*MAGNET([.W$24]+[.$BB102])+[.X$30]*[.$Z$5]*MAGNET([.X$24]+[.$BB102])+[.Y$30]*[.$Z$5]*MAGNET([.Y$24]+[.$BB102])+[.Z$30]*[.$Z$5]*MAGNET([.Z$24]+[.$BB102])+[.AA$30]*[.$Z$5]*MAGNET([.AA$24]+[.$BB102])+[.AB$30]*[.$Z$5]*MAGNET([.AB$24]+[.$BB102])+[.AC$30]*[.$Z$5]*MAGNET([.AC$24]+[.$BB102])+[.AD$30]*[.$Z$5]*MAGNET([.AD$24]+[.$BB102])+[.AE$30]*[.$Z$5]*MAGNET([.AE$24]+[.$BB102])+[.AF$30]*[.$Z$5]*MAGNET([.AF$24]+[.$BB102])+[.AG$30]*[.$Z$5]*MAGNET([.AG$24]+[.$BB102])+[.D$30]*[.$Z$5]*MAGNET([.D$24]+[.$BB102])+[.AH$30]*[.$Z$5]*MAGNET([.AH$24]+[.BB102]) +[.AI$30]*[.$Z$5]*MAGNET([.AI$24]+[.BB102]) +[.AJ$30]*[.$Z$5]*MAGNET([.AJ$24]+[.BB102]) +[.AK$30]*[.$Z$5]*MAGNET([.AK$24]+[.BB102]) +[.AL$30]*[.$Z$5]*MAGNET([.AL$24]+[.BB102]) +[.AM$30]*[.$Z$5]*MAGNET([.AM$24]+[.BB102]) +[.AN$30]*[.$Z$5]*MAGNET([.AN$24]+[.BB102]) +[.AO$30]*[.$Z$5]*MAGNET([.AO$24]+[.BB102]) +[.AP$30]*[.$Z$5]*MAGNET([.AP$24]+[.$BB102])&#10;+[.AQ$30]*[.$Z$5]*MAGNET([.AQ$24]+[.$BB102])&#10;+[.AR$30]*[.$Z$5]*MAGNET([.AR$24]+[.$BB102])&#10;+[.AS$30]*[.$Z$5]*MAGNET([.AS$24]+[.$BB102])&#10;+[.AT$30]*[.$Z$5]*MAGNET([.AT$24]+[.$BB102])&#10;+[.AU$30]*[.$Z$5]*MAGNET([.AU$24]+[.$BB102])&#10;+[.AV$30]*[.$Z$5]*MAGNET([.AV$24]+[.$BB102])&#10;+[.AW$30]*[.$Z$5]*MAGNET([.AW$24]+[.$BB102])&#10;+[.AX$30]*[.$Z$5]*MAGNET([.AX$24]+[.$BB102])&#10;+[.AY$30]*[.$Z$5]*MAGNET([.AY$24]+[.$BB102]) +RAND()*[.$BH$13]" office:value-type="float" office:value="0" calcext:value-type="float">
            <text:p>0</text:p>
          </table:table-cell>
          <table:table-cell table:style-name="ce71" table:formula="of:=[.E$31]*[.$Z$5]*MAGNET([.E$24]+[.$BB102])+[.F$31]*[.$Z$5]*MAGNET([.F$24]+[.$BB102])+[.G$31]*[.$Z$5]*MAGNET([.G$24]+[.$BB102])+[.H$31]*[.$Z$5]*MAGNET([.H$24]+[.$BB102])+[.I$31]*[.$Z$5]*MAGNET([.I$24]+[.$BB102])+[.J$31]*[.$Z$5]*MAGNET([.J$24]+[.$BB102])+[.K$31]*[.$Z$5]*MAGNET([.K$24]+[.$BB102])+[.L$31]*[.$Z$5]*MAGNET([.L$24]+[.$BB102])+[.M$31]*[.$Z$5]*MAGNET([.M$24]+[.$BB102])+[.N$31]*[.$Z$5]*MAGNET([.N$24]+[.$BB102])+[.O$31]*[.$Z$5]*MAGNET([.O$24]+[.$BB102])+[.P$31]*[.$Z$5]*MAGNET([.P$24]+[.$BB102])+[.Q$31]*[.$Z$5]*MAGNET([.Q$24]+[.$BB102])+[.R$31]*[.$Z$5]*MAGNET([.R$24]+[.$BB102])+[.S$31]*[.$Z$5]*MAGNET([.S$24]+[.$BB102])+[.T$31]*[.$Z$5]*MAGNET([.T$24]+[.$BB102])+[.U$31]*[.$Z$5]*MAGNET([.U$24]+[.$BB102])+[.V$31]*[.$Z$5]*MAGNET([.V$24]+[.$BB102])+[.W$31]*[.$Z$5]*MAGNET([.W$24]+[.$BB102])+[.X$31]*[.$Z$5]*MAGNET([.X$24]+[.$BB102])+[.Y$31]*[.$Z$5]*MAGNET([.Y$24]+[.$BB102])+[.Z$31]*[.$Z$5]*MAGNET([.Z$24]+[.$BB102])+[.AA$31]*[.$Z$5]*MAGNET([.AA$24]+[.$BB102])+[.AB$31]*[.$Z$5]*MAGNET([.AB$24]+[.$BB102])+[.AC$31]*[.$Z$5]*MAGNET([.AC$24]+[.$BB102])+[.AD$31]*[.$Z$5]*MAGNET([.AD$24]+[.$BB102])+[.AE$31]*[.$Z$5]*MAGNET([.AE$24]+[.$BB102])+[.AF$31]*[.$Z$5]*MAGNET([.AF$24]+[.$BB102])+[.AG$31]*[.$Z$5]*MAGNET([.AG$24]+[.$BB102])+[.D$31]*[.$Z$5]*MAGNET([.D$24]+[.$BB102])+[.AH$31]*[.$Z$5]*MAGNET([.AH$24]+[.BB102]) +[.AI$31]*[.$Z$5]*MAGNET([.AI$24]+[.BB102]) +[.AJ$31]*[.$Z$5]*MAGNET([.AJ$24]+[.BB102]) +[.AK$31]*[.$Z$5]*MAGNET([.AK$24]+[.BB102]) +[.AL$31]*[.$Z$5]*MAGNET([.AL$24]+[.BB102]) +[.AM$31]*[.$Z$5]*MAGNET([.AM$24]+[.BB102]) +[.AN$31]*[.$Z$5]*MAGNET([.AN$24]+[.BB102]) +[.AO$31]*[.$Z$5]*MAGNET([.AO$24]+[.BB102]) +[.AP$31]*[.$Z$5]*MAGNET([.AP$24]+[.$BB102])&#10;+[.AQ$31]*[.$Z$5]*MAGNET([.AQ$24]+[.$BB102])&#10;+[.AR$31]*[.$Z$5]*MAGNET([.AR$24]+[.$BB102])&#10;+[.AS$31]*[.$Z$5]*MAGNET([.AS$24]+[.$BB102])&#10;+[.AT$31]*[.$Z$5]*MAGNET([.AT$24]+[.$BB102])&#10;+[.AU$31]*[.$Z$5]*MAGNET([.AU$24]+[.$BB102])&#10;+[.AV$31]*[.$Z$5]*MAGNET([.AV$24]+[.$BB102])&#10;+[.AW$31]*[.$Z$5]*MAGNET([.AW$24]+[.$BB102])&#10;+[.AX$31]*[.$Z$5]*MAGNET([.AX$24]+[.$BB102])&#10;+[.AY$31]*[.$Z$5]*MAGNET([.AY$24]+[.$BB102]) +RAND()*[.$BI$13]" office:value-type="float" office:value="0" calcext:value-type="float">
            <text:p>0</text:p>
          </table:table-cell>
          <table:table-cell table:style-name="ce71" table:formula="of:=[.E$32]*[.$Z$5]*MAGNET([.E$24]+[.$BB102])+[.F$32]*[.$Z$5]*MAGNET([.F$24]+[.$BB102])+[.G$32]*[.$Z$5]*MAGNET([.G$24]+[.$BB102])+[.H$32]*[.$Z$5]*MAGNET([.H$24]+[.$BB102])+[.I$32]*[.$Z$5]*MAGNET([.I$24]+[.$BB102])+[.J$32]*[.$Z$5]*MAGNET([.J$24]+[.$BB102])+[.K$32]*[.$Z$5]*MAGNET([.K$24]+[.$BB102])+[.L$32]*[.$Z$5]*MAGNET([.L$24]+[.$BB102])+[.M$32]*[.$Z$5]*MAGNET([.M$24]+[.$BB102])+[.N$32]*[.$Z$5]*MAGNET([.N$24]+[.$BB102])+[.O$32]*[.$Z$5]*MAGNET([.O$24]+[.$BB102])+[.P$32]*[.$Z$5]*MAGNET([.P$24]+[.$BB102])+[.Q$32]*[.$Z$5]*MAGNET([.Q$24]+[.$BB102])+[.R$32]*[.$Z$5]*MAGNET([.R$24]+[.$BB102])+[.S$32]*[.$Z$5]*MAGNET([.S$24]+[.$BB102])+[.T$32]*[.$Z$5]*MAGNET([.T$24]+[.$BB102])+[.U$32]*[.$Z$5]*MAGNET([.U$24]+[.$BB102])+[.V$32]*[.$Z$5]*MAGNET([.V$24]+[.$BB102])+[.W$32]*[.$Z$5]*MAGNET([.W$24]+[.$BB102])+[.X$32]*[.$Z$5]*MAGNET([.X$24]+[.$BB102])+[.Y$32]*[.$Z$5]*MAGNET([.Y$24]+[.$BB102])+[.Z$32]*[.$Z$5]*MAGNET([.Z$24]+[.$BB102])+[.AA$32]*[.$Z$5]*MAGNET([.AA$24]+[.$BB102])+[.AB$32]*[.$Z$5]*MAGNET([.AB$24]+[.$BB102])+[.AC$32]*[.$Z$5]*MAGNET([.AC$24]+[.$BB102])+[.AD$32]*[.$Z$5]*MAGNET([.AD$24]+[.$BB102])+[.AE$32]*[.$Z$5]*MAGNET([.AE$24]+[.$BB102])+[.AF$32]*[.$Z$5]*MAGNET([.AF$24]+[.$BB102])+[.AG$32]*[.$Z$5]*MAGNET([.AG$24]+[.$BB102])+[.D$32]*[.$Z$5]*MAGNET([.D$24]+[.$BB102])+[.AH$32]*[.$Z$5]*MAGNET([.AH$24]+[.BB102]) +[.AI$32]*[.$Z$5]*MAGNET([.AI$24]+[.BB102]) +[.AJ$32]*[.$Z$5]*MAGNET([.AJ$24]+[.BB102]) +[.AK$32]*[.$Z$5]*MAGNET([.AK$24]+[.BB102]) +[.AL$32]*[.$Z$5]*MAGNET([.AL$24]+[.BB102]) +[.AM$32]*[.$Z$5]*MAGNET([.AM$24]+[.BB102]) +[.AN$32]*[.$Z$5]*MAGNET([.AN$24]+[.BB102]) +[.AO$32]*[.$Z$5]*MAGNET([.AO$24]+[.BB102]) +[.AP$32]*[.$Z$5]*MAGNET([.AP$24]+[.$BB102])&#10;+[.AQ$32]*[.$Z$5]*MAGNET([.AQ$24]+[.$BB102])&#10;+[.AR$32]*[.$Z$5]*MAGNET([.AR$24]+[.$BB102])&#10;+[.AS$32]*[.$Z$5]*MAGNET([.AS$24]+[.$BB102])&#10;+[.AT$32]*[.$Z$5]*MAGNET([.AT$24]+[.$BB102])&#10;+[.AU$32]*[.$Z$5]*MAGNET([.AU$24]+[.$BB102])&#10;+[.AV$32]*[.$Z$5]*MAGNET([.AV$24]+[.$BB102])&#10;+[.AW$32]*[.$Z$5]*MAGNET([.AW$24]+[.$BB102])&#10;+[.AX$32]*[.$Z$5]*MAGNET([.AX$24]+[.$BB102])&#10;+[.AY$32]*[.$Z$5]*MAGNET([.AY$24]+[.$BB10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2]+0.002" office:value-type="float" office:value="0.176" calcext:value-type="float">
            <text:p>0.176</text:p>
          </table:table-cell>
          <table:table-cell table:formula="of:=[.BA103]*[.$D$6]" office:value-type="float" office:value="8.84672491250886" calcext:value-type="float">
            <text:p>8.847</text:p>
          </table:table-cell>
          <table:table-cell table:formula="of:=[.D$25]*[.$Z$5]*MAGNET([.D$24]+[.BB103])+[.E$25]*[.$Z$5]*MAGNET([.E$24]+[.BB103])+[.F$25]*[.$Z$5]*MAGNET([.F$24]+[.BB103])+[.G$25]*[.$Z$5]*MAGNET([.G$24]+[.BB103])+[.H$25]*[.$Z$5]*MAGNET([.H$24]+[.BB103])+[.I$25]*[.$Z$5]*MAGNET([.I$24]+[.BB103])+[.J$25]*[.$Z$5]*MAGNET([.J$24]+[.BB103])+[.K$25]*[.$Z$5]*MAGNET([.K$24]+[.BB103])+[.L$25]*[.$Z$5]*MAGNET([.L$24]+[.BB103])+[.M$25]*[.$Z$5]*MAGNET([.M$24]+[.BB103])+[.N$25]*[.$Z$5]*MAGNET([.N$24]+[.BB103])+[.O$25]*[.$Z$5]*MAGNET([.O$24]+[.BB103])+[.P$25]*[.$Z$5]*MAGNET([.P$24]+[.BB103])+[.Q$25]*[.$Z$5]*MAGNET([.Q$24]+[.BB103])+[.R$25]*[.$Z$5]*MAGNET([.R$24]+[.BB103])+[.S$25]*[.$Z$5]*MAGNET([.S$24]+[.BB103])+[.T$25]*[.$Z$5]*MAGNET([.T$24]+[.BB103])+[.U$25]*[.$Z$5]*MAGNET([.U$24]+[.BB103])+[.V$25]*[.$Z$5]*MAGNET([.V$24]+[.BB103])+[.W$25]*[.$Z$5]*MAGNET([.W$24]+[.BB103])+[.X$25]*[.$Z$5]*MAGNET([.X$24]+[.BB103])+[.Y$25]*[.$Z$5]*MAGNET([.Y$24]+[.BB103])+[.Z$25]*[.$Z$5]*MAGNET([.Z$24]+[.BB103])+[.AA$25]*[.$Z$5]*MAGNET([.AA$24]+[.BB103])+[.AB$25]*[.$Z$5]*MAGNET([.AB$24]+[.BB103])+[.AC$25]*[.$Z$5]*MAGNET([.AC$24]+[.BB103])+[.AD$25]*[.$Z$5]*MAGNET([.AD$24]+[.BB103])+[.AE$25]*[.$Z$5]*MAGNET([.AE$24]+[.BB103])+[.AF$25]*[.$Z$5]*MAGNET([.AF$24]+[.BB103])+[.AG$25]*[.$Z$5]*MAGNET([.AG$24]+[.BB103])+[.AH$25]*[.$Z$5]*MAGNET([.AH$24]+[.BB103]) +[.AI$25]*[.$Z$5]*MAGNET([.AI$24]+[.BB103]) +[.AJ$25]*[.$Z$5]*MAGNET([.AJ$24]+[.BB103]) +[.AK$25]*[.$Z$5]*MAGNET([.AK$24]+[.BB103]) +[.AL$25]*[.$Z$5]*MAGNET([.AL$24]+[.BB103]) +[.AM$25]*[.$Z$5]*MAGNET([.AM$24]+[.BB103]) +[.AN$25]*[.$Z$5]*MAGNET([.AN$24]+[.BB103]) +[.AO$25]*[.$Z$5]*MAGNET([.AO$24]+[.BB103])+RAND()*[.$BC$13]+[.AP$25]*[.$Z$5]*MAGNET([.AP$24]+[.BB103])&#10;+[.AQ$25]*[.$Z$5]*MAGNET([.AQ$24]+[.BB103])&#10;+[.AR$25]*[.$Z$5]*MAGNET([.AR$24]+[.BB103])&#10;+[.AS$25]*[.$Z$5]*MAGNET([.AS$24]+[.BB103])&#10;+[.AT$25]*[.$Z$5]*MAGNET([.AT$24]+[.BB103])&#10;+[.AU$25]*[.$Z$5]*MAGNET([.AU$24]+[.BB103])&#10;+[.AV$25]*[.$Z$5]*MAGNET([.AV$24]+[.BB103])&#10;+[.AW$25]*[.$Z$5]*MAGNET([.AW$24]+[.BB103])&#10;+[.AX$25]*[.$Z$5]*MAGNET([.AX$24]+[.BB103])&#10;+[.AY$25]*[.$Z$5]*MAGNET([.AY$24]+[.BB103])" office:value-type="float" office:value="102.42033386077" calcext:value-type="float">
            <text:p>102.42</text:p>
          </table:table-cell>
          <table:table-cell table:style-name="ce70" table:formula="of:=[.E$26]*[.$Z$5]*MAGNET([.E$24]+[.$BB103])+[.F$26]*[.$Z$5]*MAGNET([.F$24]+[.$BB103])+[.G$26]*[.$Z$5]*MAGNET([.G$24]+[.$BB103])+[.H$26]*[.$Z$5]*MAGNET([.H$24]+[.$BB103])+[.I$26]*[.$Z$5]*MAGNET([.I$24]+[.$BB103])+[.J$26]*[.$Z$5]*MAGNET([.J$24]+[.$BB103])+[.K$26]*[.$Z$5]*MAGNET([.K$24]+[.$BB103])+[.L$26]*[.$Z$5]*MAGNET([.L$24]+[.$BB103])+[.M$26]*[.$Z$5]*MAGNET([.M$24]+[.$BB103])+[.N$26]*[.$Z$5]*MAGNET([.N$24]+[.$BB103])+[.O$26]*[.$Z$5]*MAGNET([.O$24]+[.$BB103])+[.P$26]*[.$Z$5]*MAGNET([.P$24]+[.$BB103])+[.Q$26]*[.$Z$5]*MAGNET([.Q$24]+[.$BB103])+[.R$26]*[.$Z$5]*MAGNET([.R$24]+[.$BB103])+[.S$26]*[.$Z$5]*MAGNET([.S$24]+[.$BB103])+[.T$26]*[.$Z$5]*MAGNET([.T$24]+[.$BB103])+[.U$26]*[.$Z$5]*MAGNET([.U$24]+[.$BB103])+[.V$26]*[.$Z$5]*MAGNET([.V$24]+[.$BB103])+[.W$26]*[.$Z$5]*MAGNET([.W$24]+[.$BB103])+[.X$26]*[.$Z$5]*MAGNET([.X$24]+[.$BB103])+[.Y$26]*[.$Z$5]*MAGNET([.Y$24]+[.$BB103])+[.Z$26]*[.$Z$5]*MAGNET([.Z$24]+[.$BB103])+[.AA$26]*[.$Z$5]*MAGNET([.AA$24]+[.$BB103])+[.AB$26]*[.$Z$5]*MAGNET([.AB$24]+[.$BB103])+[.AC$26]*[.$Z$5]*MAGNET([.AC$24]+[.$BB103])+[.AD$26]*[.$Z$5]*MAGNET([.AD$24]+[.$BB103])+[.AE$26]*[.$Z$5]*MAGNET([.AE$24]+[.$BB103])+[.AF$26]*[.$Z$5]*MAGNET([.AF$24]+[.$BB103])+[.AG$26]*[.$Z$5]*MAGNET([.AG$24]+[.$BB103])+[.D$26]*[.$Z$5]*MAGNET([.D$24]+[.$BB103])+[.AH$26]*[.$Z$5]*MAGNET([.AH$24]+[.BB103]) +[.AI$26]*[.$Z$5]*MAGNET([.AI$24]+[.BB103]) +[.AJ$26]*[.$Z$5]*MAGNET([.AJ$24]+[.BB103]) +[.AK$26]*[.$Z$5]*MAGNET([.AK$24]+[.BB103]) +[.AL$26]*[.$Z$5]*MAGNET([.AL$24]+[.BB103]) +[.AM$26]*[.$Z$5]*MAGNET([.AM$24]+[.BB103]) +[.AN$26]*[.$Z$5]*MAGNET([.AN$24]+[.BB103]) +[.AO$26]*[.$Z$5]*MAGNET([.AO$24]+[.BB103]) +[.AP$26]*[.$Z$5]*MAGNET([.AP$24]+[.$BB103])&#10;+[.AQ$26]*[.$Z$5]*MAGNET([.AQ$24]+[.$BB103])&#10;+[.AR$26]*[.$Z$5]*MAGNET([.AR$24]+[.$BB103])&#10;+[.AS$26]*[.$Z$5]*MAGNET([.AS$24]+[.$BB103])&#10;+[.AT$26]*[.$Z$5]*MAGNET([.AT$24]+[.$BB103])&#10;+[.AU$26]*[.$Z$5]*MAGNET([.AU$24]+[.$BB103])&#10;+[.AV$26]*[.$Z$5]*MAGNET([.AV$24]+[.$BB103])&#10;+[.AW$26]*[.$Z$5]*MAGNET([.AW$24]+[.$BB103])&#10;+[.AX$26]*[.$Z$5]*MAGNET([.AX$24]+[.$BB103])&#10;+[.AY$26]*[.$Z$5]*MAGNET([.AY$24]+[.$BB103]) +RAND()*[.$BD$13]" office:value-type="float" office:value="-81.7235557701447" calcext:value-type="float">
            <text:p>-81.72</text:p>
          </table:table-cell>
          <table:table-cell table:style-name="ce71" table:formula="of:=[.E$27]*[.$Z$5]*MAGNET([.E$24]+[.$BB103])+[.F$27]*[.$Z$5]*MAGNET([.F$24]+[.$BB103])+[.G$27]*[.$Z$5]*MAGNET([.G$24]+[.$BB103])+[.H$27]*[.$Z$5]*MAGNET([.H$24]+[.$BB103])+[.I$27]*[.$Z$5]*MAGNET([.I$24]+[.$BB103])+[.J$27]*[.$Z$5]*MAGNET([.J$24]+[.$BB103])+[.K$27]*[.$Z$5]*MAGNET([.K$24]+[.$BB103])+[.L$27]*[.$Z$5]*MAGNET([.L$24]+[.$BB103])+[.M$27]*[.$Z$5]*MAGNET([.M$24]+[.$BB103])+[.N$27]*[.$Z$5]*MAGNET([.N$24]+[.$BB103])+[.O$27]*[.$Z$5]*MAGNET([.O$24]+[.$BB103])+[.P$27]*[.$Z$5]*MAGNET([.P$24]+[.$BB103])+[.Q$27]*[.$Z$5]*MAGNET([.Q$24]+[.$BB103])+[.R$27]*[.$Z$5]*MAGNET([.R$24]+[.$BB103])+[.S$27]*[.$Z$5]*MAGNET([.S$24]+[.$BB103])+[.T$27]*[.$Z$5]*MAGNET([.T$24]+[.$BB103])+[.U$27]*[.$Z$5]*MAGNET([.U$24]+[.$BB103])+[.V$27]*[.$Z$5]*MAGNET([.V$24]+[.$BB103])+[.W$27]*[.$Z$5]*MAGNET([.W$24]+[.$BB103])+[.X$27]*[.$Z$5]*MAGNET([.X$24]+[.$BB103])+[.Y$27]*[.$Z$5]*MAGNET([.Y$24]+[.$BB103])+[.Z$27]*[.$Z$5]*MAGNET([.Z$24]+[.$BB103])+[.AA$27]*[.$Z$5]*MAGNET([.AA$24]+[.$BB103])+[.AB$27]*[.$Z$5]*MAGNET([.AB$24]+[.$BB103])+[.AC$27]*[.$Z$5]*MAGNET([.AC$24]+[.$BB103])+[.AD$27]*[.$Z$5]*MAGNET([.AD$24]+[.$BB103])+[.AE$27]*[.$Z$5]*MAGNET([.AE$24]+[.$BB103])+[.AF$27]*[.$Z$5]*MAGNET([.AF$24]+[.$BB103])+[.AG$27]*[.$Z$5]*MAGNET([.AG$24]+[.$BB103])+[.D$27]*[.$Z$5]*MAGNET([.D$24]+[.$BB103])+[.AH$27]*[.$Z$5]*MAGNET([.AH$24]+[.BB103]) +[.AI$27]*[.$Z$5]*MAGNET([.AI$24]+[.BB103]) +[.AJ$27]*[.$Z$5]*MAGNET([.AJ$24]+[.BB103]) +[.AK$27]*[.$Z$5]*MAGNET([.AK$24]+[.BB103]) +[.AL$27]*[.$Z$5]*MAGNET([.AL$24]+[.BB103]) +[.AM$27]*[.$Z$5]*MAGNET([.AM$24]+[.BB103]) +[.AN$27]*[.$Z$5]*MAGNET([.AN$24]+[.BB103]) +[.AO$27]*[.$Z$5]*MAGNET([.AO$24]+[.BB103]) +[.AP$27]*[.$Z$5]*MAGNET([.AP$24]+[.$BB103])&#10;+[.AQ$27]*[.$Z$5]*MAGNET([.AQ$24]+[.$BB103])&#10;+[.AR$27]*[.$Z$5]*MAGNET([.AR$24]+[.$BB103])&#10;+[.AS$27]*[.$Z$5]*MAGNET([.AS$24]+[.$BB103])&#10;+[.AT$27]*[.$Z$5]*MAGNET([.AT$24]+[.$BB103])&#10;+[.AU$27]*[.$Z$5]*MAGNET([.AU$24]+[.$BB103])&#10;+[.AV$27]*[.$Z$5]*MAGNET([.AV$24]+[.$BB103])&#10;+[.AW$27]*[.$Z$5]*MAGNET([.AW$24]+[.$BB103])&#10;+[.AX$27]*[.$Z$5]*MAGNET([.AX$24]+[.$BB103])&#10;+[.AY$27]*[.$Z$5]*MAGNET([.AY$24]+[.$BB103]) +RAND()*[.$BE$13]" office:value-type="float" office:value="-6.85519934118127" calcext:value-type="float">
            <text:p>-6.85519934118127</text:p>
          </table:table-cell>
          <table:table-cell table:style-name="ce71" table:formula="of:=[.E$28]*[.$Z$5]*MAGNET([.E$24]+[.$BB103])+[.F$28]*[.$Z$5]*MAGNET([.F$24]+[.$BB103])+[.G$28]*[.$Z$5]*MAGNET([.G$24]+[.$BB103])+[.H$28]*[.$Z$5]*MAGNET([.H$24]+[.$BB103])+[.I$28]*[.$Z$5]*MAGNET([.I$24]+[.$BB103])+[.J$28]*[.$Z$5]*MAGNET([.J$24]+[.$BB103])+[.K$28]*[.$Z$5]*MAGNET([.K$24]+[.$BB103])+[.L$28]*[.$Z$5]*MAGNET([.L$24]+[.$BB103])+[.M$28]*[.$Z$5]*MAGNET([.M$24]+[.$BB103])+[.N$28]*[.$Z$5]*MAGNET([.N$24]+[.$BB103])+[.O$28]*[.$Z$5]*MAGNET([.O$24]+[.$BB103])+[.P$28]*[.$Z$5]*MAGNET([.P$24]+[.$BB103])+[.Q$28]*[.$Z$5]*MAGNET([.Q$24]+[.$BB103])+[.R$28]*[.$Z$5]*MAGNET([.R$24]+[.$BB103])+[.S$28]*[.$Z$5]*MAGNET([.S$24]+[.$BB103])+[.T$28]*[.$Z$5]*MAGNET([.T$24]+[.$BB103])+[.U$28]*[.$Z$5]*MAGNET([.U$24]+[.$BB103])+[.V$28]*[.$Z$5]*MAGNET([.V$24]+[.$BB103])+[.W$28]*[.$Z$5]*MAGNET([.W$24]+[.$BB103])+[.X$28]*[.$Z$5]*MAGNET([.X$24]+[.$BB103])+[.Y$28]*[.$Z$5]*MAGNET([.Y$24]+[.$BB103])+[.Z$28]*[.$Z$5]*MAGNET([.Z$24]+[.$BB103])+[.AA$28]*[.$Z$5]*MAGNET([.AA$24]+[.$BB103])+[.AB$28]*[.$Z$5]*MAGNET([.AB$24]+[.$BB103])+[.AC$28]*[.$Z$5]*MAGNET([.AC$24]+[.$BB103])+[.AD$28]*[.$Z$5]*MAGNET([.AD$24]+[.$BB103])+[.AE$28]*[.$Z$5]*MAGNET([.AE$24]+[.$BB103])+[.AF$28]*[.$Z$5]*MAGNET([.AF$24]+[.$BB103])+[.AG$28]*[.$Z$5]*MAGNET([.AG$24]+[.$BB103])+[.D$28]*[.$Z$5]*MAGNET([.D$24]+[.$BB103])+[.AH$28]*[.$Z$5]*MAGNET([.AH$24]+[.BB103]) +[.AI$28]*[.$Z$5]*MAGNET([.AI$24]+[.BB103]) +[.AJ$28]*[.$Z$5]*MAGNET([.AJ$24]+[.BB103]) +[.AK$28]*[.$Z$5]*MAGNET([.AK$24]+[.BB103]) +[.AL$28]*[.$Z$5]*MAGNET([.AL$24]+[.BB103]) +[.AM$28]*[.$Z$5]*MAGNET([.AM$24]+[.BB103]) +[.AN$28]*[.$Z$5]*MAGNET([.AN$24]+[.BB103]) +[.AO$28]*[.$Z$5]*MAGNET([.AO$24]+[.BB103]) +[.AP$28]*[.$Z$5]*MAGNET([.AP$24]+[.$BB103])&#10;+[.AQ$28]*[.$Z$5]*MAGNET([.AQ$24]+[.$BB103])&#10;+[.AR$28]*[.$Z$5]*MAGNET([.AR$24]+[.$BB103])&#10;+[.AS$28]*[.$Z$5]*MAGNET([.AS$24]+[.$BB103])&#10;+[.AT$28]*[.$Z$5]*MAGNET([.AT$24]+[.$BB103])&#10;+[.AU$28]*[.$Z$5]*MAGNET([.AU$24]+[.$BB103])&#10;+[.AV$28]*[.$Z$5]*MAGNET([.AV$24]+[.$BB103])&#10;+[.AW$28]*[.$Z$5]*MAGNET([.AW$24]+[.$BB103])&#10;+[.AX$28]*[.$Z$5]*MAGNET([.AX$24]+[.$BB103])&#10;+[.AY$28]*[.$Z$5]*MAGNET([.AY$24]+[.$BB103]) +RAND()*[.$BF$13]" office:value-type="float" office:value="0.525525813870127" calcext:value-type="float">
            <text:p>0.525525813870127</text:p>
          </table:table-cell>
          <table:table-cell table:style-name="ce71" table:formula="of:=[.E$29]*[.$Z$5]*MAGNET([.E$24]+[.$BB103])+[.F$29]*[.$Z$5]*MAGNET([.F$24]+[.$BB103])+[.G$29]*[.$Z$5]*MAGNET([.G$24]+[.$BB103])+[.H$29]*[.$Z$5]*MAGNET([.H$24]+[.$BB103])+[.I$29]*[.$Z$5]*MAGNET([.I$24]+[.$BB103])+[.J$29]*[.$Z$5]*MAGNET([.J$24]+[.$BB103])+[.K$29]*[.$Z$5]*MAGNET([.K$24]+[.$BB103])+[.L$29]*[.$Z$5]*MAGNET([.L$24]+[.$BB103])+[.M$29]*[.$Z$5]*MAGNET([.M$24]+[.$BB103])+[.N$29]*[.$Z$5]*MAGNET([.N$24]+[.$BB103])+[.O$29]*[.$Z$5]*MAGNET([.O$24]+[.$BB103])+[.P$29]*[.$Z$5]*MAGNET([.P$24]+[.$BB103])+[.Q$29]*[.$Z$5]*MAGNET([.Q$24]+[.$BB103])+[.R$29]*[.$Z$5]*MAGNET([.R$24]+[.$BB103])+[.S$29]*[.$Z$5]*MAGNET([.S$24]+[.$BB103])+[.T$29]*[.$Z$5]*MAGNET([.T$24]+[.$BB103])+[.U$29]*[.$Z$5]*MAGNET([.U$24]+[.$BB103])+[.V$29]*[.$Z$5]*MAGNET([.V$24]+[.$BB103])+[.W$29]*[.$Z$5]*MAGNET([.W$24]+[.$BB103])+[.X$29]*[.$Z$5]*MAGNET([.X$24]+[.$BB103])+[.Y$29]*[.$Z$5]*MAGNET([.Y$24]+[.$BB103])+[.Z$29]*[.$Z$5]*MAGNET([.Z$24]+[.$BB103])+[.AA$29]*[.$Z$5]*MAGNET([.AA$24]+[.$BB103])+[.AB$29]*[.$Z$5]*MAGNET([.AB$24]+[.$BB103])+[.AC$29]*[.$Z$5]*MAGNET([.AC$24]+[.$BB103])+[.AD$29]*[.$Z$5]*MAGNET([.AD$24]+[.$BB103])+[.AE$29]*[.$Z$5]*MAGNET([.AE$24]+[.$BB103])+[.AF$29]*[.$Z$5]*MAGNET([.AF$24]+[.$BB103])+[.AG$29]*[.$Z$5]*MAGNET([.AG$24]+[.$BB103])+[.D$29]*[.$Z$5]*MAGNET([.D$24]+[.$BB103])+[.AH$29]*[.$Z$5]*MAGNET([.AH$24]+[.BB103]) +[.AI$29]*[.$Z$5]*MAGNET([.AI$24]+[.BB103]) +[.AJ$29]*[.$Z$5]*MAGNET([.AJ$24]+[.BB103]) +[.AK$29]*[.$Z$5]*MAGNET([.AK$24]+[.BB103]) +[.AL$29]*[.$Z$5]*MAGNET([.AL$24]+[.BB103]) +[.AM$29]*[.$Z$5]*MAGNET([.AM$24]+[.BB103]) +[.AN$29]*[.$Z$5]*MAGNET([.AN$24]+[.BB103]) +[.AO$29]*[.$Z$5]*MAGNET([.AO$24]+[.BB103]) +[.AP$29]*[.$Z$5]*MAGNET([.AP$24]+[.$BB103])&#10;+[.AQ$29]*[.$Z$5]*MAGNET([.AQ$24]+[.$BB103])&#10;+[.AR$29]*[.$Z$5]*MAGNET([.AR$24]+[.$BB103])&#10;+[.AS$29]*[.$Z$5]*MAGNET([.AS$24]+[.$BB103])&#10;+[.AT$29]*[.$Z$5]*MAGNET([.AT$24]+[.$BB103])&#10;+[.AU$29]*[.$Z$5]*MAGNET([.AU$24]+[.$BB103])&#10;+[.AV$29]*[.$Z$5]*MAGNET([.AV$24]+[.$BB103])&#10;+[.AW$29]*[.$Z$5]*MAGNET([.AW$24]+[.$BB103])&#10;+[.AX$29]*[.$Z$5]*MAGNET([.AX$24]+[.$BB103])&#10;+[.AY$29]*[.$Z$5]*MAGNET([.AY$24]+[.$BB103]) +RAND()*[.$BG$13]" office:value-type="float" office:value="1.20717286594097" calcext:value-type="float">
            <text:p>1.20717286594097</text:p>
          </table:table-cell>
          <table:table-cell table:style-name="ce71" table:formula="of:=[.E$30]*[.$Z$5]*MAGNET([.E$24]+[.$BB103])+[.F$30]*[.$Z$5]*MAGNET([.F$24]+[.$BB103])+[.G$30]*[.$Z$5]*MAGNET([.G$24]+[.$BB103])+[.H$30]*[.$Z$5]*MAGNET([.H$24]+[.$BB103])+[.I$30]*[.$Z$5]*MAGNET([.I$24]+[.$BB103])+[.J$30]*[.$Z$5]*MAGNET([.J$24]+[.$BB103])+[.K$30]*[.$Z$5]*MAGNET([.K$24]+[.$BB103])+[.L$30]*[.$Z$5]*MAGNET([.L$24]+[.$BB103])+[.M$30]*[.$Z$5]*MAGNET([.M$24]+[.$BB103])+[.N$30]*[.$Z$5]*MAGNET([.N$24]+[.$BB103])+[.O$30]*[.$Z$5]*MAGNET([.O$24]+[.$BB103])+[.P$30]*[.$Z$5]*MAGNET([.P$24]+[.$BB103])+[.Q$30]*[.$Z$5]*MAGNET([.Q$24]+[.$BB103])+[.R$30]*[.$Z$5]*MAGNET([.R$24]+[.$BB103])+[.S$30]*[.$Z$5]*MAGNET([.S$24]+[.$BB103])+[.T$30]*[.$Z$5]*MAGNET([.T$24]+[.$BB103])+[.U$30]*[.$Z$5]*MAGNET([.U$24]+[.$BB103])+[.V$30]*[.$Z$5]*MAGNET([.V$24]+[.$BB103])+[.W$30]*[.$Z$5]*MAGNET([.W$24]+[.$BB103])+[.X$30]*[.$Z$5]*MAGNET([.X$24]+[.$BB103])+[.Y$30]*[.$Z$5]*MAGNET([.Y$24]+[.$BB103])+[.Z$30]*[.$Z$5]*MAGNET([.Z$24]+[.$BB103])+[.AA$30]*[.$Z$5]*MAGNET([.AA$24]+[.$BB103])+[.AB$30]*[.$Z$5]*MAGNET([.AB$24]+[.$BB103])+[.AC$30]*[.$Z$5]*MAGNET([.AC$24]+[.$BB103])+[.AD$30]*[.$Z$5]*MAGNET([.AD$24]+[.$BB103])+[.AE$30]*[.$Z$5]*MAGNET([.AE$24]+[.$BB103])+[.AF$30]*[.$Z$5]*MAGNET([.AF$24]+[.$BB103])+[.AG$30]*[.$Z$5]*MAGNET([.AG$24]+[.$BB103])+[.D$30]*[.$Z$5]*MAGNET([.D$24]+[.$BB103])+[.AH$30]*[.$Z$5]*MAGNET([.AH$24]+[.BB103]) +[.AI$30]*[.$Z$5]*MAGNET([.AI$24]+[.BB103]) +[.AJ$30]*[.$Z$5]*MAGNET([.AJ$24]+[.BB103]) +[.AK$30]*[.$Z$5]*MAGNET([.AK$24]+[.BB103]) +[.AL$30]*[.$Z$5]*MAGNET([.AL$24]+[.BB103]) +[.AM$30]*[.$Z$5]*MAGNET([.AM$24]+[.BB103]) +[.AN$30]*[.$Z$5]*MAGNET([.AN$24]+[.BB103]) +[.AO$30]*[.$Z$5]*MAGNET([.AO$24]+[.BB103]) +[.AP$30]*[.$Z$5]*MAGNET([.AP$24]+[.$BB103])&#10;+[.AQ$30]*[.$Z$5]*MAGNET([.AQ$24]+[.$BB103])&#10;+[.AR$30]*[.$Z$5]*MAGNET([.AR$24]+[.$BB103])&#10;+[.AS$30]*[.$Z$5]*MAGNET([.AS$24]+[.$BB103])&#10;+[.AT$30]*[.$Z$5]*MAGNET([.AT$24]+[.$BB103])&#10;+[.AU$30]*[.$Z$5]*MAGNET([.AU$24]+[.$BB103])&#10;+[.AV$30]*[.$Z$5]*MAGNET([.AV$24]+[.$BB103])&#10;+[.AW$30]*[.$Z$5]*MAGNET([.AW$24]+[.$BB103])&#10;+[.AX$30]*[.$Z$5]*MAGNET([.AX$24]+[.$BB103])&#10;+[.AY$30]*[.$Z$5]*MAGNET([.AY$24]+[.$BB103]) +RAND()*[.$BH$13]" office:value-type="float" office:value="0" calcext:value-type="float">
            <text:p>0</text:p>
          </table:table-cell>
          <table:table-cell table:style-name="ce71" table:formula="of:=[.E$31]*[.$Z$5]*MAGNET([.E$24]+[.$BB103])+[.F$31]*[.$Z$5]*MAGNET([.F$24]+[.$BB103])+[.G$31]*[.$Z$5]*MAGNET([.G$24]+[.$BB103])+[.H$31]*[.$Z$5]*MAGNET([.H$24]+[.$BB103])+[.I$31]*[.$Z$5]*MAGNET([.I$24]+[.$BB103])+[.J$31]*[.$Z$5]*MAGNET([.J$24]+[.$BB103])+[.K$31]*[.$Z$5]*MAGNET([.K$24]+[.$BB103])+[.L$31]*[.$Z$5]*MAGNET([.L$24]+[.$BB103])+[.M$31]*[.$Z$5]*MAGNET([.M$24]+[.$BB103])+[.N$31]*[.$Z$5]*MAGNET([.N$24]+[.$BB103])+[.O$31]*[.$Z$5]*MAGNET([.O$24]+[.$BB103])+[.P$31]*[.$Z$5]*MAGNET([.P$24]+[.$BB103])+[.Q$31]*[.$Z$5]*MAGNET([.Q$24]+[.$BB103])+[.R$31]*[.$Z$5]*MAGNET([.R$24]+[.$BB103])+[.S$31]*[.$Z$5]*MAGNET([.S$24]+[.$BB103])+[.T$31]*[.$Z$5]*MAGNET([.T$24]+[.$BB103])+[.U$31]*[.$Z$5]*MAGNET([.U$24]+[.$BB103])+[.V$31]*[.$Z$5]*MAGNET([.V$24]+[.$BB103])+[.W$31]*[.$Z$5]*MAGNET([.W$24]+[.$BB103])+[.X$31]*[.$Z$5]*MAGNET([.X$24]+[.$BB103])+[.Y$31]*[.$Z$5]*MAGNET([.Y$24]+[.$BB103])+[.Z$31]*[.$Z$5]*MAGNET([.Z$24]+[.$BB103])+[.AA$31]*[.$Z$5]*MAGNET([.AA$24]+[.$BB103])+[.AB$31]*[.$Z$5]*MAGNET([.AB$24]+[.$BB103])+[.AC$31]*[.$Z$5]*MAGNET([.AC$24]+[.$BB103])+[.AD$31]*[.$Z$5]*MAGNET([.AD$24]+[.$BB103])+[.AE$31]*[.$Z$5]*MAGNET([.AE$24]+[.$BB103])+[.AF$31]*[.$Z$5]*MAGNET([.AF$24]+[.$BB103])+[.AG$31]*[.$Z$5]*MAGNET([.AG$24]+[.$BB103])+[.D$31]*[.$Z$5]*MAGNET([.D$24]+[.$BB103])+[.AH$31]*[.$Z$5]*MAGNET([.AH$24]+[.BB103]) +[.AI$31]*[.$Z$5]*MAGNET([.AI$24]+[.BB103]) +[.AJ$31]*[.$Z$5]*MAGNET([.AJ$24]+[.BB103]) +[.AK$31]*[.$Z$5]*MAGNET([.AK$24]+[.BB103]) +[.AL$31]*[.$Z$5]*MAGNET([.AL$24]+[.BB103]) +[.AM$31]*[.$Z$5]*MAGNET([.AM$24]+[.BB103]) +[.AN$31]*[.$Z$5]*MAGNET([.AN$24]+[.BB103]) +[.AO$31]*[.$Z$5]*MAGNET([.AO$24]+[.BB103]) +[.AP$31]*[.$Z$5]*MAGNET([.AP$24]+[.$BB103])&#10;+[.AQ$31]*[.$Z$5]*MAGNET([.AQ$24]+[.$BB103])&#10;+[.AR$31]*[.$Z$5]*MAGNET([.AR$24]+[.$BB103])&#10;+[.AS$31]*[.$Z$5]*MAGNET([.AS$24]+[.$BB103])&#10;+[.AT$31]*[.$Z$5]*MAGNET([.AT$24]+[.$BB103])&#10;+[.AU$31]*[.$Z$5]*MAGNET([.AU$24]+[.$BB103])&#10;+[.AV$31]*[.$Z$5]*MAGNET([.AV$24]+[.$BB103])&#10;+[.AW$31]*[.$Z$5]*MAGNET([.AW$24]+[.$BB103])&#10;+[.AX$31]*[.$Z$5]*MAGNET([.AX$24]+[.$BB103])&#10;+[.AY$31]*[.$Z$5]*MAGNET([.AY$24]+[.$BB103]) +RAND()*[.$BI$13]" office:value-type="float" office:value="0" calcext:value-type="float">
            <text:p>0</text:p>
          </table:table-cell>
          <table:table-cell table:style-name="ce71" table:formula="of:=[.E$32]*[.$Z$5]*MAGNET([.E$24]+[.$BB103])+[.F$32]*[.$Z$5]*MAGNET([.F$24]+[.$BB103])+[.G$32]*[.$Z$5]*MAGNET([.G$24]+[.$BB103])+[.H$32]*[.$Z$5]*MAGNET([.H$24]+[.$BB103])+[.I$32]*[.$Z$5]*MAGNET([.I$24]+[.$BB103])+[.J$32]*[.$Z$5]*MAGNET([.J$24]+[.$BB103])+[.K$32]*[.$Z$5]*MAGNET([.K$24]+[.$BB103])+[.L$32]*[.$Z$5]*MAGNET([.L$24]+[.$BB103])+[.M$32]*[.$Z$5]*MAGNET([.M$24]+[.$BB103])+[.N$32]*[.$Z$5]*MAGNET([.N$24]+[.$BB103])+[.O$32]*[.$Z$5]*MAGNET([.O$24]+[.$BB103])+[.P$32]*[.$Z$5]*MAGNET([.P$24]+[.$BB103])+[.Q$32]*[.$Z$5]*MAGNET([.Q$24]+[.$BB103])+[.R$32]*[.$Z$5]*MAGNET([.R$24]+[.$BB103])+[.S$32]*[.$Z$5]*MAGNET([.S$24]+[.$BB103])+[.T$32]*[.$Z$5]*MAGNET([.T$24]+[.$BB103])+[.U$32]*[.$Z$5]*MAGNET([.U$24]+[.$BB103])+[.V$32]*[.$Z$5]*MAGNET([.V$24]+[.$BB103])+[.W$32]*[.$Z$5]*MAGNET([.W$24]+[.$BB103])+[.X$32]*[.$Z$5]*MAGNET([.X$24]+[.$BB103])+[.Y$32]*[.$Z$5]*MAGNET([.Y$24]+[.$BB103])+[.Z$32]*[.$Z$5]*MAGNET([.Z$24]+[.$BB103])+[.AA$32]*[.$Z$5]*MAGNET([.AA$24]+[.$BB103])+[.AB$32]*[.$Z$5]*MAGNET([.AB$24]+[.$BB103])+[.AC$32]*[.$Z$5]*MAGNET([.AC$24]+[.$BB103])+[.AD$32]*[.$Z$5]*MAGNET([.AD$24]+[.$BB103])+[.AE$32]*[.$Z$5]*MAGNET([.AE$24]+[.$BB103])+[.AF$32]*[.$Z$5]*MAGNET([.AF$24]+[.$BB103])+[.AG$32]*[.$Z$5]*MAGNET([.AG$24]+[.$BB103])+[.D$32]*[.$Z$5]*MAGNET([.D$24]+[.$BB103])+[.AH$32]*[.$Z$5]*MAGNET([.AH$24]+[.BB103]) +[.AI$32]*[.$Z$5]*MAGNET([.AI$24]+[.BB103]) +[.AJ$32]*[.$Z$5]*MAGNET([.AJ$24]+[.BB103]) +[.AK$32]*[.$Z$5]*MAGNET([.AK$24]+[.BB103]) +[.AL$32]*[.$Z$5]*MAGNET([.AL$24]+[.BB103]) +[.AM$32]*[.$Z$5]*MAGNET([.AM$24]+[.BB103]) +[.AN$32]*[.$Z$5]*MAGNET([.AN$24]+[.BB103]) +[.AO$32]*[.$Z$5]*MAGNET([.AO$24]+[.BB103]) +[.AP$32]*[.$Z$5]*MAGNET([.AP$24]+[.$BB103])&#10;+[.AQ$32]*[.$Z$5]*MAGNET([.AQ$24]+[.$BB103])&#10;+[.AR$32]*[.$Z$5]*MAGNET([.AR$24]+[.$BB103])&#10;+[.AS$32]*[.$Z$5]*MAGNET([.AS$24]+[.$BB103])&#10;+[.AT$32]*[.$Z$5]*MAGNET([.AT$24]+[.$BB103])&#10;+[.AU$32]*[.$Z$5]*MAGNET([.AU$24]+[.$BB103])&#10;+[.AV$32]*[.$Z$5]*MAGNET([.AV$24]+[.$BB103])&#10;+[.AW$32]*[.$Z$5]*MAGNET([.AW$24]+[.$BB103])&#10;+[.AX$32]*[.$Z$5]*MAGNET([.AX$24]+[.$BB103])&#10;+[.AY$32]*[.$Z$5]*MAGNET([.AY$24]+[.$BB10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3]+0.002" office:value-type="float" office:value="0.178" calcext:value-type="float">
            <text:p>0.178</text:p>
          </table:table-cell>
          <table:table-cell table:formula="of:=[.BA104]*[.$D$6]" office:value-type="float" office:value="8.94725587742374" calcext:value-type="float">
            <text:p>8.947</text:p>
          </table:table-cell>
          <table:table-cell table:formula="of:=[.D$25]*[.$Z$5]*MAGNET([.D$24]+[.BB104])+[.E$25]*[.$Z$5]*MAGNET([.E$24]+[.BB104])+[.F$25]*[.$Z$5]*MAGNET([.F$24]+[.BB104])+[.G$25]*[.$Z$5]*MAGNET([.G$24]+[.BB104])+[.H$25]*[.$Z$5]*MAGNET([.H$24]+[.BB104])+[.I$25]*[.$Z$5]*MAGNET([.I$24]+[.BB104])+[.J$25]*[.$Z$5]*MAGNET([.J$24]+[.BB104])+[.K$25]*[.$Z$5]*MAGNET([.K$24]+[.BB104])+[.L$25]*[.$Z$5]*MAGNET([.L$24]+[.BB104])+[.M$25]*[.$Z$5]*MAGNET([.M$24]+[.BB104])+[.N$25]*[.$Z$5]*MAGNET([.N$24]+[.BB104])+[.O$25]*[.$Z$5]*MAGNET([.O$24]+[.BB104])+[.P$25]*[.$Z$5]*MAGNET([.P$24]+[.BB104])+[.Q$25]*[.$Z$5]*MAGNET([.Q$24]+[.BB104])+[.R$25]*[.$Z$5]*MAGNET([.R$24]+[.BB104])+[.S$25]*[.$Z$5]*MAGNET([.S$24]+[.BB104])+[.T$25]*[.$Z$5]*MAGNET([.T$24]+[.BB104])+[.U$25]*[.$Z$5]*MAGNET([.U$24]+[.BB104])+[.V$25]*[.$Z$5]*MAGNET([.V$24]+[.BB104])+[.W$25]*[.$Z$5]*MAGNET([.W$24]+[.BB104])+[.X$25]*[.$Z$5]*MAGNET([.X$24]+[.BB104])+[.Y$25]*[.$Z$5]*MAGNET([.Y$24]+[.BB104])+[.Z$25]*[.$Z$5]*MAGNET([.Z$24]+[.BB104])+[.AA$25]*[.$Z$5]*MAGNET([.AA$24]+[.BB104])+[.AB$25]*[.$Z$5]*MAGNET([.AB$24]+[.BB104])+[.AC$25]*[.$Z$5]*MAGNET([.AC$24]+[.BB104])+[.AD$25]*[.$Z$5]*MAGNET([.AD$24]+[.BB104])+[.AE$25]*[.$Z$5]*MAGNET([.AE$24]+[.BB104])+[.AF$25]*[.$Z$5]*MAGNET([.AF$24]+[.BB104])+[.AG$25]*[.$Z$5]*MAGNET([.AG$24]+[.BB104])+[.AH$25]*[.$Z$5]*MAGNET([.AH$24]+[.BB104]) +[.AI$25]*[.$Z$5]*MAGNET([.AI$24]+[.BB104]) +[.AJ$25]*[.$Z$5]*MAGNET([.AJ$24]+[.BB104]) +[.AK$25]*[.$Z$5]*MAGNET([.AK$24]+[.BB104]) +[.AL$25]*[.$Z$5]*MAGNET([.AL$24]+[.BB104]) +[.AM$25]*[.$Z$5]*MAGNET([.AM$24]+[.BB104]) +[.AN$25]*[.$Z$5]*MAGNET([.AN$24]+[.BB104]) +[.AO$25]*[.$Z$5]*MAGNET([.AO$24]+[.BB104])+RAND()*[.$BC$13]+[.AP$25]*[.$Z$5]*MAGNET([.AP$24]+[.BB104])&#10;+[.AQ$25]*[.$Z$5]*MAGNET([.AQ$24]+[.BB104])&#10;+[.AR$25]*[.$Z$5]*MAGNET([.AR$24]+[.BB104])&#10;+[.AS$25]*[.$Z$5]*MAGNET([.AS$24]+[.BB104])&#10;+[.AT$25]*[.$Z$5]*MAGNET([.AT$24]+[.BB104])&#10;+[.AU$25]*[.$Z$5]*MAGNET([.AU$24]+[.BB104])&#10;+[.AV$25]*[.$Z$5]*MAGNET([.AV$24]+[.BB104])&#10;+[.AW$25]*[.$Z$5]*MAGNET([.AW$24]+[.BB104])&#10;+[.AX$25]*[.$Z$5]*MAGNET([.AX$24]+[.BB104])&#10;+[.AY$25]*[.$Z$5]*MAGNET([.AY$24]+[.BB104])" office:value-type="float" office:value="92.9936923023288" calcext:value-type="float">
            <text:p>92.99</text:p>
          </table:table-cell>
          <table:table-cell table:style-name="ce70" table:formula="of:=[.E$26]*[.$Z$5]*MAGNET([.E$24]+[.$BB104])+[.F$26]*[.$Z$5]*MAGNET([.F$24]+[.$BB104])+[.G$26]*[.$Z$5]*MAGNET([.G$24]+[.$BB104])+[.H$26]*[.$Z$5]*MAGNET([.H$24]+[.$BB104])+[.I$26]*[.$Z$5]*MAGNET([.I$24]+[.$BB104])+[.J$26]*[.$Z$5]*MAGNET([.J$24]+[.$BB104])+[.K$26]*[.$Z$5]*MAGNET([.K$24]+[.$BB104])+[.L$26]*[.$Z$5]*MAGNET([.L$24]+[.$BB104])+[.M$26]*[.$Z$5]*MAGNET([.M$24]+[.$BB104])+[.N$26]*[.$Z$5]*MAGNET([.N$24]+[.$BB104])+[.O$26]*[.$Z$5]*MAGNET([.O$24]+[.$BB104])+[.P$26]*[.$Z$5]*MAGNET([.P$24]+[.$BB104])+[.Q$26]*[.$Z$5]*MAGNET([.Q$24]+[.$BB104])+[.R$26]*[.$Z$5]*MAGNET([.R$24]+[.$BB104])+[.S$26]*[.$Z$5]*MAGNET([.S$24]+[.$BB104])+[.T$26]*[.$Z$5]*MAGNET([.T$24]+[.$BB104])+[.U$26]*[.$Z$5]*MAGNET([.U$24]+[.$BB104])+[.V$26]*[.$Z$5]*MAGNET([.V$24]+[.$BB104])+[.W$26]*[.$Z$5]*MAGNET([.W$24]+[.$BB104])+[.X$26]*[.$Z$5]*MAGNET([.X$24]+[.$BB104])+[.Y$26]*[.$Z$5]*MAGNET([.Y$24]+[.$BB104])+[.Z$26]*[.$Z$5]*MAGNET([.Z$24]+[.$BB104])+[.AA$26]*[.$Z$5]*MAGNET([.AA$24]+[.$BB104])+[.AB$26]*[.$Z$5]*MAGNET([.AB$24]+[.$BB104])+[.AC$26]*[.$Z$5]*MAGNET([.AC$24]+[.$BB104])+[.AD$26]*[.$Z$5]*MAGNET([.AD$24]+[.$BB104])+[.AE$26]*[.$Z$5]*MAGNET([.AE$24]+[.$BB104])+[.AF$26]*[.$Z$5]*MAGNET([.AF$24]+[.$BB104])+[.AG$26]*[.$Z$5]*MAGNET([.AG$24]+[.$BB104])+[.D$26]*[.$Z$5]*MAGNET([.D$24]+[.$BB104])+[.AH$26]*[.$Z$5]*MAGNET([.AH$24]+[.BB104]) +[.AI$26]*[.$Z$5]*MAGNET([.AI$24]+[.BB104]) +[.AJ$26]*[.$Z$5]*MAGNET([.AJ$24]+[.BB104]) +[.AK$26]*[.$Z$5]*MAGNET([.AK$24]+[.BB104]) +[.AL$26]*[.$Z$5]*MAGNET([.AL$24]+[.BB104]) +[.AM$26]*[.$Z$5]*MAGNET([.AM$24]+[.BB104]) +[.AN$26]*[.$Z$5]*MAGNET([.AN$24]+[.BB104]) +[.AO$26]*[.$Z$5]*MAGNET([.AO$24]+[.BB104]) +[.AP$26]*[.$Z$5]*MAGNET([.AP$24]+[.$BB104])&#10;+[.AQ$26]*[.$Z$5]*MAGNET([.AQ$24]+[.$BB104])&#10;+[.AR$26]*[.$Z$5]*MAGNET([.AR$24]+[.$BB104])&#10;+[.AS$26]*[.$Z$5]*MAGNET([.AS$24]+[.$BB104])&#10;+[.AT$26]*[.$Z$5]*MAGNET([.AT$24]+[.$BB104])&#10;+[.AU$26]*[.$Z$5]*MAGNET([.AU$24]+[.$BB104])&#10;+[.AV$26]*[.$Z$5]*MAGNET([.AV$24]+[.$BB104])&#10;+[.AW$26]*[.$Z$5]*MAGNET([.AW$24]+[.$BB104])&#10;+[.AX$26]*[.$Z$5]*MAGNET([.AX$24]+[.$BB104])&#10;+[.AY$26]*[.$Z$5]*MAGNET([.AY$24]+[.$BB104]) +RAND()*[.$BD$13]" office:value-type="float" office:value="-85.0992863065022" calcext:value-type="float">
            <text:p>-85.10</text:p>
          </table:table-cell>
          <table:table-cell table:style-name="ce71" table:formula="of:=[.E$27]*[.$Z$5]*MAGNET([.E$24]+[.$BB104])+[.F$27]*[.$Z$5]*MAGNET([.F$24]+[.$BB104])+[.G$27]*[.$Z$5]*MAGNET([.G$24]+[.$BB104])+[.H$27]*[.$Z$5]*MAGNET([.H$24]+[.$BB104])+[.I$27]*[.$Z$5]*MAGNET([.I$24]+[.$BB104])+[.J$27]*[.$Z$5]*MAGNET([.J$24]+[.$BB104])+[.K$27]*[.$Z$5]*MAGNET([.K$24]+[.$BB104])+[.L$27]*[.$Z$5]*MAGNET([.L$24]+[.$BB104])+[.M$27]*[.$Z$5]*MAGNET([.M$24]+[.$BB104])+[.N$27]*[.$Z$5]*MAGNET([.N$24]+[.$BB104])+[.O$27]*[.$Z$5]*MAGNET([.O$24]+[.$BB104])+[.P$27]*[.$Z$5]*MAGNET([.P$24]+[.$BB104])+[.Q$27]*[.$Z$5]*MAGNET([.Q$24]+[.$BB104])+[.R$27]*[.$Z$5]*MAGNET([.R$24]+[.$BB104])+[.S$27]*[.$Z$5]*MAGNET([.S$24]+[.$BB104])+[.T$27]*[.$Z$5]*MAGNET([.T$24]+[.$BB104])+[.U$27]*[.$Z$5]*MAGNET([.U$24]+[.$BB104])+[.V$27]*[.$Z$5]*MAGNET([.V$24]+[.$BB104])+[.W$27]*[.$Z$5]*MAGNET([.W$24]+[.$BB104])+[.X$27]*[.$Z$5]*MAGNET([.X$24]+[.$BB104])+[.Y$27]*[.$Z$5]*MAGNET([.Y$24]+[.$BB104])+[.Z$27]*[.$Z$5]*MAGNET([.Z$24]+[.$BB104])+[.AA$27]*[.$Z$5]*MAGNET([.AA$24]+[.$BB104])+[.AB$27]*[.$Z$5]*MAGNET([.AB$24]+[.$BB104])+[.AC$27]*[.$Z$5]*MAGNET([.AC$24]+[.$BB104])+[.AD$27]*[.$Z$5]*MAGNET([.AD$24]+[.$BB104])+[.AE$27]*[.$Z$5]*MAGNET([.AE$24]+[.$BB104])+[.AF$27]*[.$Z$5]*MAGNET([.AF$24]+[.$BB104])+[.AG$27]*[.$Z$5]*MAGNET([.AG$24]+[.$BB104])+[.D$27]*[.$Z$5]*MAGNET([.D$24]+[.$BB104])+[.AH$27]*[.$Z$5]*MAGNET([.AH$24]+[.BB104]) +[.AI$27]*[.$Z$5]*MAGNET([.AI$24]+[.BB104]) +[.AJ$27]*[.$Z$5]*MAGNET([.AJ$24]+[.BB104]) +[.AK$27]*[.$Z$5]*MAGNET([.AK$24]+[.BB104]) +[.AL$27]*[.$Z$5]*MAGNET([.AL$24]+[.BB104]) +[.AM$27]*[.$Z$5]*MAGNET([.AM$24]+[.BB104]) +[.AN$27]*[.$Z$5]*MAGNET([.AN$24]+[.BB104]) +[.AO$27]*[.$Z$5]*MAGNET([.AO$24]+[.BB104]) +[.AP$27]*[.$Z$5]*MAGNET([.AP$24]+[.$BB104])&#10;+[.AQ$27]*[.$Z$5]*MAGNET([.AQ$24]+[.$BB104])&#10;+[.AR$27]*[.$Z$5]*MAGNET([.AR$24]+[.$BB104])&#10;+[.AS$27]*[.$Z$5]*MAGNET([.AS$24]+[.$BB104])&#10;+[.AT$27]*[.$Z$5]*MAGNET([.AT$24]+[.$BB104])&#10;+[.AU$27]*[.$Z$5]*MAGNET([.AU$24]+[.$BB104])&#10;+[.AV$27]*[.$Z$5]*MAGNET([.AV$24]+[.$BB104])&#10;+[.AW$27]*[.$Z$5]*MAGNET([.AW$24]+[.$BB104])&#10;+[.AX$27]*[.$Z$5]*MAGNET([.AX$24]+[.$BB104])&#10;+[.AY$27]*[.$Z$5]*MAGNET([.AY$24]+[.$BB104]) +RAND()*[.$BE$13]" office:value-type="float" office:value="7.58286477193737" calcext:value-type="float">
            <text:p>7.58286477193737</text:p>
          </table:table-cell>
          <table:table-cell table:style-name="ce71" table:formula="of:=[.E$28]*[.$Z$5]*MAGNET([.E$24]+[.$BB104])+[.F$28]*[.$Z$5]*MAGNET([.F$24]+[.$BB104])+[.G$28]*[.$Z$5]*MAGNET([.G$24]+[.$BB104])+[.H$28]*[.$Z$5]*MAGNET([.H$24]+[.$BB104])+[.I$28]*[.$Z$5]*MAGNET([.I$24]+[.$BB104])+[.J$28]*[.$Z$5]*MAGNET([.J$24]+[.$BB104])+[.K$28]*[.$Z$5]*MAGNET([.K$24]+[.$BB104])+[.L$28]*[.$Z$5]*MAGNET([.L$24]+[.$BB104])+[.M$28]*[.$Z$5]*MAGNET([.M$24]+[.$BB104])+[.N$28]*[.$Z$5]*MAGNET([.N$24]+[.$BB104])+[.O$28]*[.$Z$5]*MAGNET([.O$24]+[.$BB104])+[.P$28]*[.$Z$5]*MAGNET([.P$24]+[.$BB104])+[.Q$28]*[.$Z$5]*MAGNET([.Q$24]+[.$BB104])+[.R$28]*[.$Z$5]*MAGNET([.R$24]+[.$BB104])+[.S$28]*[.$Z$5]*MAGNET([.S$24]+[.$BB104])+[.T$28]*[.$Z$5]*MAGNET([.T$24]+[.$BB104])+[.U$28]*[.$Z$5]*MAGNET([.U$24]+[.$BB104])+[.V$28]*[.$Z$5]*MAGNET([.V$24]+[.$BB104])+[.W$28]*[.$Z$5]*MAGNET([.W$24]+[.$BB104])+[.X$28]*[.$Z$5]*MAGNET([.X$24]+[.$BB104])+[.Y$28]*[.$Z$5]*MAGNET([.Y$24]+[.$BB104])+[.Z$28]*[.$Z$5]*MAGNET([.Z$24]+[.$BB104])+[.AA$28]*[.$Z$5]*MAGNET([.AA$24]+[.$BB104])+[.AB$28]*[.$Z$5]*MAGNET([.AB$24]+[.$BB104])+[.AC$28]*[.$Z$5]*MAGNET([.AC$24]+[.$BB104])+[.AD$28]*[.$Z$5]*MAGNET([.AD$24]+[.$BB104])+[.AE$28]*[.$Z$5]*MAGNET([.AE$24]+[.$BB104])+[.AF$28]*[.$Z$5]*MAGNET([.AF$24]+[.$BB104])+[.AG$28]*[.$Z$5]*MAGNET([.AG$24]+[.$BB104])+[.D$28]*[.$Z$5]*MAGNET([.D$24]+[.$BB104])+[.AH$28]*[.$Z$5]*MAGNET([.AH$24]+[.BB104]) +[.AI$28]*[.$Z$5]*MAGNET([.AI$24]+[.BB104]) +[.AJ$28]*[.$Z$5]*MAGNET([.AJ$24]+[.BB104]) +[.AK$28]*[.$Z$5]*MAGNET([.AK$24]+[.BB104]) +[.AL$28]*[.$Z$5]*MAGNET([.AL$24]+[.BB104]) +[.AM$28]*[.$Z$5]*MAGNET([.AM$24]+[.BB104]) +[.AN$28]*[.$Z$5]*MAGNET([.AN$24]+[.BB104]) +[.AO$28]*[.$Z$5]*MAGNET([.AO$24]+[.BB104]) +[.AP$28]*[.$Z$5]*MAGNET([.AP$24]+[.$BB104])&#10;+[.AQ$28]*[.$Z$5]*MAGNET([.AQ$24]+[.$BB104])&#10;+[.AR$28]*[.$Z$5]*MAGNET([.AR$24]+[.$BB104])&#10;+[.AS$28]*[.$Z$5]*MAGNET([.AS$24]+[.$BB104])&#10;+[.AT$28]*[.$Z$5]*MAGNET([.AT$24]+[.$BB104])&#10;+[.AU$28]*[.$Z$5]*MAGNET([.AU$24]+[.$BB104])&#10;+[.AV$28]*[.$Z$5]*MAGNET([.AV$24]+[.$BB104])&#10;+[.AW$28]*[.$Z$5]*MAGNET([.AW$24]+[.$BB104])&#10;+[.AX$28]*[.$Z$5]*MAGNET([.AX$24]+[.$BB104])&#10;+[.AY$28]*[.$Z$5]*MAGNET([.AY$24]+[.$BB104]) +RAND()*[.$BF$13]" office:value-type="float" office:value="1.76286443545432" calcext:value-type="float">
            <text:p>1.76286443545432</text:p>
          </table:table-cell>
          <table:table-cell table:style-name="ce71" table:formula="of:=[.E$29]*[.$Z$5]*MAGNET([.E$24]+[.$BB104])+[.F$29]*[.$Z$5]*MAGNET([.F$24]+[.$BB104])+[.G$29]*[.$Z$5]*MAGNET([.G$24]+[.$BB104])+[.H$29]*[.$Z$5]*MAGNET([.H$24]+[.$BB104])+[.I$29]*[.$Z$5]*MAGNET([.I$24]+[.$BB104])+[.J$29]*[.$Z$5]*MAGNET([.J$24]+[.$BB104])+[.K$29]*[.$Z$5]*MAGNET([.K$24]+[.$BB104])+[.L$29]*[.$Z$5]*MAGNET([.L$24]+[.$BB104])+[.M$29]*[.$Z$5]*MAGNET([.M$24]+[.$BB104])+[.N$29]*[.$Z$5]*MAGNET([.N$24]+[.$BB104])+[.O$29]*[.$Z$5]*MAGNET([.O$24]+[.$BB104])+[.P$29]*[.$Z$5]*MAGNET([.P$24]+[.$BB104])+[.Q$29]*[.$Z$5]*MAGNET([.Q$24]+[.$BB104])+[.R$29]*[.$Z$5]*MAGNET([.R$24]+[.$BB104])+[.S$29]*[.$Z$5]*MAGNET([.S$24]+[.$BB104])+[.T$29]*[.$Z$5]*MAGNET([.T$24]+[.$BB104])+[.U$29]*[.$Z$5]*MAGNET([.U$24]+[.$BB104])+[.V$29]*[.$Z$5]*MAGNET([.V$24]+[.$BB104])+[.W$29]*[.$Z$5]*MAGNET([.W$24]+[.$BB104])+[.X$29]*[.$Z$5]*MAGNET([.X$24]+[.$BB104])+[.Y$29]*[.$Z$5]*MAGNET([.Y$24]+[.$BB104])+[.Z$29]*[.$Z$5]*MAGNET([.Z$24]+[.$BB104])+[.AA$29]*[.$Z$5]*MAGNET([.AA$24]+[.$BB104])+[.AB$29]*[.$Z$5]*MAGNET([.AB$24]+[.$BB104])+[.AC$29]*[.$Z$5]*MAGNET([.AC$24]+[.$BB104])+[.AD$29]*[.$Z$5]*MAGNET([.AD$24]+[.$BB104])+[.AE$29]*[.$Z$5]*MAGNET([.AE$24]+[.$BB104])+[.AF$29]*[.$Z$5]*MAGNET([.AF$24]+[.$BB104])+[.AG$29]*[.$Z$5]*MAGNET([.AG$24]+[.$BB104])+[.D$29]*[.$Z$5]*MAGNET([.D$24]+[.$BB104])+[.AH$29]*[.$Z$5]*MAGNET([.AH$24]+[.BB104]) +[.AI$29]*[.$Z$5]*MAGNET([.AI$24]+[.BB104]) +[.AJ$29]*[.$Z$5]*MAGNET([.AJ$24]+[.BB104]) +[.AK$29]*[.$Z$5]*MAGNET([.AK$24]+[.BB104]) +[.AL$29]*[.$Z$5]*MAGNET([.AL$24]+[.BB104]) +[.AM$29]*[.$Z$5]*MAGNET([.AM$24]+[.BB104]) +[.AN$29]*[.$Z$5]*MAGNET([.AN$24]+[.BB104]) +[.AO$29]*[.$Z$5]*MAGNET([.AO$24]+[.BB104]) +[.AP$29]*[.$Z$5]*MAGNET([.AP$24]+[.$BB104])&#10;+[.AQ$29]*[.$Z$5]*MAGNET([.AQ$24]+[.$BB104])&#10;+[.AR$29]*[.$Z$5]*MAGNET([.AR$24]+[.$BB104])&#10;+[.AS$29]*[.$Z$5]*MAGNET([.AS$24]+[.$BB104])&#10;+[.AT$29]*[.$Z$5]*MAGNET([.AT$24]+[.$BB104])&#10;+[.AU$29]*[.$Z$5]*MAGNET([.AU$24]+[.$BB104])&#10;+[.AV$29]*[.$Z$5]*MAGNET([.AV$24]+[.$BB104])&#10;+[.AW$29]*[.$Z$5]*MAGNET([.AW$24]+[.$BB104])&#10;+[.AX$29]*[.$Z$5]*MAGNET([.AX$24]+[.$BB104])&#10;+[.AY$29]*[.$Z$5]*MAGNET([.AY$24]+[.$BB104]) +RAND()*[.$BG$13]" office:value-type="float" office:value="-4.17222836809738" calcext:value-type="float">
            <text:p>-4.17222836809738</text:p>
          </table:table-cell>
          <table:table-cell table:style-name="ce71" table:formula="of:=[.E$30]*[.$Z$5]*MAGNET([.E$24]+[.$BB104])+[.F$30]*[.$Z$5]*MAGNET([.F$24]+[.$BB104])+[.G$30]*[.$Z$5]*MAGNET([.G$24]+[.$BB104])+[.H$30]*[.$Z$5]*MAGNET([.H$24]+[.$BB104])+[.I$30]*[.$Z$5]*MAGNET([.I$24]+[.$BB104])+[.J$30]*[.$Z$5]*MAGNET([.J$24]+[.$BB104])+[.K$30]*[.$Z$5]*MAGNET([.K$24]+[.$BB104])+[.L$30]*[.$Z$5]*MAGNET([.L$24]+[.$BB104])+[.M$30]*[.$Z$5]*MAGNET([.M$24]+[.$BB104])+[.N$30]*[.$Z$5]*MAGNET([.N$24]+[.$BB104])+[.O$30]*[.$Z$5]*MAGNET([.O$24]+[.$BB104])+[.P$30]*[.$Z$5]*MAGNET([.P$24]+[.$BB104])+[.Q$30]*[.$Z$5]*MAGNET([.Q$24]+[.$BB104])+[.R$30]*[.$Z$5]*MAGNET([.R$24]+[.$BB104])+[.S$30]*[.$Z$5]*MAGNET([.S$24]+[.$BB104])+[.T$30]*[.$Z$5]*MAGNET([.T$24]+[.$BB104])+[.U$30]*[.$Z$5]*MAGNET([.U$24]+[.$BB104])+[.V$30]*[.$Z$5]*MAGNET([.V$24]+[.$BB104])+[.W$30]*[.$Z$5]*MAGNET([.W$24]+[.$BB104])+[.X$30]*[.$Z$5]*MAGNET([.X$24]+[.$BB104])+[.Y$30]*[.$Z$5]*MAGNET([.Y$24]+[.$BB104])+[.Z$30]*[.$Z$5]*MAGNET([.Z$24]+[.$BB104])+[.AA$30]*[.$Z$5]*MAGNET([.AA$24]+[.$BB104])+[.AB$30]*[.$Z$5]*MAGNET([.AB$24]+[.$BB104])+[.AC$30]*[.$Z$5]*MAGNET([.AC$24]+[.$BB104])+[.AD$30]*[.$Z$5]*MAGNET([.AD$24]+[.$BB104])+[.AE$30]*[.$Z$5]*MAGNET([.AE$24]+[.$BB104])+[.AF$30]*[.$Z$5]*MAGNET([.AF$24]+[.$BB104])+[.AG$30]*[.$Z$5]*MAGNET([.AG$24]+[.$BB104])+[.D$30]*[.$Z$5]*MAGNET([.D$24]+[.$BB104])+[.AH$30]*[.$Z$5]*MAGNET([.AH$24]+[.BB104]) +[.AI$30]*[.$Z$5]*MAGNET([.AI$24]+[.BB104]) +[.AJ$30]*[.$Z$5]*MAGNET([.AJ$24]+[.BB104]) +[.AK$30]*[.$Z$5]*MAGNET([.AK$24]+[.BB104]) +[.AL$30]*[.$Z$5]*MAGNET([.AL$24]+[.BB104]) +[.AM$30]*[.$Z$5]*MAGNET([.AM$24]+[.BB104]) +[.AN$30]*[.$Z$5]*MAGNET([.AN$24]+[.BB104]) +[.AO$30]*[.$Z$5]*MAGNET([.AO$24]+[.BB104]) +[.AP$30]*[.$Z$5]*MAGNET([.AP$24]+[.$BB104])&#10;+[.AQ$30]*[.$Z$5]*MAGNET([.AQ$24]+[.$BB104])&#10;+[.AR$30]*[.$Z$5]*MAGNET([.AR$24]+[.$BB104])&#10;+[.AS$30]*[.$Z$5]*MAGNET([.AS$24]+[.$BB104])&#10;+[.AT$30]*[.$Z$5]*MAGNET([.AT$24]+[.$BB104])&#10;+[.AU$30]*[.$Z$5]*MAGNET([.AU$24]+[.$BB104])&#10;+[.AV$30]*[.$Z$5]*MAGNET([.AV$24]+[.$BB104])&#10;+[.AW$30]*[.$Z$5]*MAGNET([.AW$24]+[.$BB104])&#10;+[.AX$30]*[.$Z$5]*MAGNET([.AX$24]+[.$BB104])&#10;+[.AY$30]*[.$Z$5]*MAGNET([.AY$24]+[.$BB104]) +RAND()*[.$BH$13]" office:value-type="float" office:value="0" calcext:value-type="float">
            <text:p>0</text:p>
          </table:table-cell>
          <table:table-cell table:style-name="ce71" table:formula="of:=[.E$31]*[.$Z$5]*MAGNET([.E$24]+[.$BB104])+[.F$31]*[.$Z$5]*MAGNET([.F$24]+[.$BB104])+[.G$31]*[.$Z$5]*MAGNET([.G$24]+[.$BB104])+[.H$31]*[.$Z$5]*MAGNET([.H$24]+[.$BB104])+[.I$31]*[.$Z$5]*MAGNET([.I$24]+[.$BB104])+[.J$31]*[.$Z$5]*MAGNET([.J$24]+[.$BB104])+[.K$31]*[.$Z$5]*MAGNET([.K$24]+[.$BB104])+[.L$31]*[.$Z$5]*MAGNET([.L$24]+[.$BB104])+[.M$31]*[.$Z$5]*MAGNET([.M$24]+[.$BB104])+[.N$31]*[.$Z$5]*MAGNET([.N$24]+[.$BB104])+[.O$31]*[.$Z$5]*MAGNET([.O$24]+[.$BB104])+[.P$31]*[.$Z$5]*MAGNET([.P$24]+[.$BB104])+[.Q$31]*[.$Z$5]*MAGNET([.Q$24]+[.$BB104])+[.R$31]*[.$Z$5]*MAGNET([.R$24]+[.$BB104])+[.S$31]*[.$Z$5]*MAGNET([.S$24]+[.$BB104])+[.T$31]*[.$Z$5]*MAGNET([.T$24]+[.$BB104])+[.U$31]*[.$Z$5]*MAGNET([.U$24]+[.$BB104])+[.V$31]*[.$Z$5]*MAGNET([.V$24]+[.$BB104])+[.W$31]*[.$Z$5]*MAGNET([.W$24]+[.$BB104])+[.X$31]*[.$Z$5]*MAGNET([.X$24]+[.$BB104])+[.Y$31]*[.$Z$5]*MAGNET([.Y$24]+[.$BB104])+[.Z$31]*[.$Z$5]*MAGNET([.Z$24]+[.$BB104])+[.AA$31]*[.$Z$5]*MAGNET([.AA$24]+[.$BB104])+[.AB$31]*[.$Z$5]*MAGNET([.AB$24]+[.$BB104])+[.AC$31]*[.$Z$5]*MAGNET([.AC$24]+[.$BB104])+[.AD$31]*[.$Z$5]*MAGNET([.AD$24]+[.$BB104])+[.AE$31]*[.$Z$5]*MAGNET([.AE$24]+[.$BB104])+[.AF$31]*[.$Z$5]*MAGNET([.AF$24]+[.$BB104])+[.AG$31]*[.$Z$5]*MAGNET([.AG$24]+[.$BB104])+[.D$31]*[.$Z$5]*MAGNET([.D$24]+[.$BB104])+[.AH$31]*[.$Z$5]*MAGNET([.AH$24]+[.BB104]) +[.AI$31]*[.$Z$5]*MAGNET([.AI$24]+[.BB104]) +[.AJ$31]*[.$Z$5]*MAGNET([.AJ$24]+[.BB104]) +[.AK$31]*[.$Z$5]*MAGNET([.AK$24]+[.BB104]) +[.AL$31]*[.$Z$5]*MAGNET([.AL$24]+[.BB104]) +[.AM$31]*[.$Z$5]*MAGNET([.AM$24]+[.BB104]) +[.AN$31]*[.$Z$5]*MAGNET([.AN$24]+[.BB104]) +[.AO$31]*[.$Z$5]*MAGNET([.AO$24]+[.BB104]) +[.AP$31]*[.$Z$5]*MAGNET([.AP$24]+[.$BB104])&#10;+[.AQ$31]*[.$Z$5]*MAGNET([.AQ$24]+[.$BB104])&#10;+[.AR$31]*[.$Z$5]*MAGNET([.AR$24]+[.$BB104])&#10;+[.AS$31]*[.$Z$5]*MAGNET([.AS$24]+[.$BB104])&#10;+[.AT$31]*[.$Z$5]*MAGNET([.AT$24]+[.$BB104])&#10;+[.AU$31]*[.$Z$5]*MAGNET([.AU$24]+[.$BB104])&#10;+[.AV$31]*[.$Z$5]*MAGNET([.AV$24]+[.$BB104])&#10;+[.AW$31]*[.$Z$5]*MAGNET([.AW$24]+[.$BB104])&#10;+[.AX$31]*[.$Z$5]*MAGNET([.AX$24]+[.$BB104])&#10;+[.AY$31]*[.$Z$5]*MAGNET([.AY$24]+[.$BB104]) +RAND()*[.$BI$13]" office:value-type="float" office:value="0" calcext:value-type="float">
            <text:p>0</text:p>
          </table:table-cell>
          <table:table-cell table:style-name="ce71" table:formula="of:=[.E$32]*[.$Z$5]*MAGNET([.E$24]+[.$BB104])+[.F$32]*[.$Z$5]*MAGNET([.F$24]+[.$BB104])+[.G$32]*[.$Z$5]*MAGNET([.G$24]+[.$BB104])+[.H$32]*[.$Z$5]*MAGNET([.H$24]+[.$BB104])+[.I$32]*[.$Z$5]*MAGNET([.I$24]+[.$BB104])+[.J$32]*[.$Z$5]*MAGNET([.J$24]+[.$BB104])+[.K$32]*[.$Z$5]*MAGNET([.K$24]+[.$BB104])+[.L$32]*[.$Z$5]*MAGNET([.L$24]+[.$BB104])+[.M$32]*[.$Z$5]*MAGNET([.M$24]+[.$BB104])+[.N$32]*[.$Z$5]*MAGNET([.N$24]+[.$BB104])+[.O$32]*[.$Z$5]*MAGNET([.O$24]+[.$BB104])+[.P$32]*[.$Z$5]*MAGNET([.P$24]+[.$BB104])+[.Q$32]*[.$Z$5]*MAGNET([.Q$24]+[.$BB104])+[.R$32]*[.$Z$5]*MAGNET([.R$24]+[.$BB104])+[.S$32]*[.$Z$5]*MAGNET([.S$24]+[.$BB104])+[.T$32]*[.$Z$5]*MAGNET([.T$24]+[.$BB104])+[.U$32]*[.$Z$5]*MAGNET([.U$24]+[.$BB104])+[.V$32]*[.$Z$5]*MAGNET([.V$24]+[.$BB104])+[.W$32]*[.$Z$5]*MAGNET([.W$24]+[.$BB104])+[.X$32]*[.$Z$5]*MAGNET([.X$24]+[.$BB104])+[.Y$32]*[.$Z$5]*MAGNET([.Y$24]+[.$BB104])+[.Z$32]*[.$Z$5]*MAGNET([.Z$24]+[.$BB104])+[.AA$32]*[.$Z$5]*MAGNET([.AA$24]+[.$BB104])+[.AB$32]*[.$Z$5]*MAGNET([.AB$24]+[.$BB104])+[.AC$32]*[.$Z$5]*MAGNET([.AC$24]+[.$BB104])+[.AD$32]*[.$Z$5]*MAGNET([.AD$24]+[.$BB104])+[.AE$32]*[.$Z$5]*MAGNET([.AE$24]+[.$BB104])+[.AF$32]*[.$Z$5]*MAGNET([.AF$24]+[.$BB104])+[.AG$32]*[.$Z$5]*MAGNET([.AG$24]+[.$BB104])+[.D$32]*[.$Z$5]*MAGNET([.D$24]+[.$BB104])+[.AH$32]*[.$Z$5]*MAGNET([.AH$24]+[.BB104]) +[.AI$32]*[.$Z$5]*MAGNET([.AI$24]+[.BB104]) +[.AJ$32]*[.$Z$5]*MAGNET([.AJ$24]+[.BB104]) +[.AK$32]*[.$Z$5]*MAGNET([.AK$24]+[.BB104]) +[.AL$32]*[.$Z$5]*MAGNET([.AL$24]+[.BB104]) +[.AM$32]*[.$Z$5]*MAGNET([.AM$24]+[.BB104]) +[.AN$32]*[.$Z$5]*MAGNET([.AN$24]+[.BB104]) +[.AO$32]*[.$Z$5]*MAGNET([.AO$24]+[.BB104]) +[.AP$32]*[.$Z$5]*MAGNET([.AP$24]+[.$BB104])&#10;+[.AQ$32]*[.$Z$5]*MAGNET([.AQ$24]+[.$BB104])&#10;+[.AR$32]*[.$Z$5]*MAGNET([.AR$24]+[.$BB104])&#10;+[.AS$32]*[.$Z$5]*MAGNET([.AS$24]+[.$BB104])&#10;+[.AT$32]*[.$Z$5]*MAGNET([.AT$24]+[.$BB104])&#10;+[.AU$32]*[.$Z$5]*MAGNET([.AU$24]+[.$BB104])&#10;+[.AV$32]*[.$Z$5]*MAGNET([.AV$24]+[.$BB104])&#10;+[.AW$32]*[.$Z$5]*MAGNET([.AW$24]+[.$BB104])&#10;+[.AX$32]*[.$Z$5]*MAGNET([.AX$24]+[.$BB104])&#10;+[.AY$32]*[.$Z$5]*MAGNET([.AY$24]+[.$BB10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4]+0.002" office:value-type="float" office:value="0.18" calcext:value-type="float">
            <text:p>0.18</text:p>
          </table:table-cell>
          <table:table-cell table:formula="of:=[.BA105]*[.$D$6]" office:value-type="float" office:value="9.04778684233861" calcext:value-type="float">
            <text:p>9.048</text:p>
          </table:table-cell>
          <table:table-cell table:formula="of:=[.D$25]*[.$Z$5]*MAGNET([.D$24]+[.BB105])+[.E$25]*[.$Z$5]*MAGNET([.E$24]+[.BB105])+[.F$25]*[.$Z$5]*MAGNET([.F$24]+[.BB105])+[.G$25]*[.$Z$5]*MAGNET([.G$24]+[.BB105])+[.H$25]*[.$Z$5]*MAGNET([.H$24]+[.BB105])+[.I$25]*[.$Z$5]*MAGNET([.I$24]+[.BB105])+[.J$25]*[.$Z$5]*MAGNET([.J$24]+[.BB105])+[.K$25]*[.$Z$5]*MAGNET([.K$24]+[.BB105])+[.L$25]*[.$Z$5]*MAGNET([.L$24]+[.BB105])+[.M$25]*[.$Z$5]*MAGNET([.M$24]+[.BB105])+[.N$25]*[.$Z$5]*MAGNET([.N$24]+[.BB105])+[.O$25]*[.$Z$5]*MAGNET([.O$24]+[.BB105])+[.P$25]*[.$Z$5]*MAGNET([.P$24]+[.BB105])+[.Q$25]*[.$Z$5]*MAGNET([.Q$24]+[.BB105])+[.R$25]*[.$Z$5]*MAGNET([.R$24]+[.BB105])+[.S$25]*[.$Z$5]*MAGNET([.S$24]+[.BB105])+[.T$25]*[.$Z$5]*MAGNET([.T$24]+[.BB105])+[.U$25]*[.$Z$5]*MAGNET([.U$24]+[.BB105])+[.V$25]*[.$Z$5]*MAGNET([.V$24]+[.BB105])+[.W$25]*[.$Z$5]*MAGNET([.W$24]+[.BB105])+[.X$25]*[.$Z$5]*MAGNET([.X$24]+[.BB105])+[.Y$25]*[.$Z$5]*MAGNET([.Y$24]+[.BB105])+[.Z$25]*[.$Z$5]*MAGNET([.Z$24]+[.BB105])+[.AA$25]*[.$Z$5]*MAGNET([.AA$24]+[.BB105])+[.AB$25]*[.$Z$5]*MAGNET([.AB$24]+[.BB105])+[.AC$25]*[.$Z$5]*MAGNET([.AC$24]+[.BB105])+[.AD$25]*[.$Z$5]*MAGNET([.AD$24]+[.BB105])+[.AE$25]*[.$Z$5]*MAGNET([.AE$24]+[.BB105])+[.AF$25]*[.$Z$5]*MAGNET([.AF$24]+[.BB105])+[.AG$25]*[.$Z$5]*MAGNET([.AG$24]+[.BB105])+[.AH$25]*[.$Z$5]*MAGNET([.AH$24]+[.BB105]) +[.AI$25]*[.$Z$5]*MAGNET([.AI$24]+[.BB105]) +[.AJ$25]*[.$Z$5]*MAGNET([.AJ$24]+[.BB105]) +[.AK$25]*[.$Z$5]*MAGNET([.AK$24]+[.BB105]) +[.AL$25]*[.$Z$5]*MAGNET([.AL$24]+[.BB105]) +[.AM$25]*[.$Z$5]*MAGNET([.AM$24]+[.BB105]) +[.AN$25]*[.$Z$5]*MAGNET([.AN$24]+[.BB105]) +[.AO$25]*[.$Z$5]*MAGNET([.AO$24]+[.BB105])+RAND()*[.$BC$13]+[.AP$25]*[.$Z$5]*MAGNET([.AP$24]+[.BB105])&#10;+[.AQ$25]*[.$Z$5]*MAGNET([.AQ$24]+[.BB105])&#10;+[.AR$25]*[.$Z$5]*MAGNET([.AR$24]+[.BB105])&#10;+[.AS$25]*[.$Z$5]*MAGNET([.AS$24]+[.BB105])&#10;+[.AT$25]*[.$Z$5]*MAGNET([.AT$24]+[.BB105])&#10;+[.AU$25]*[.$Z$5]*MAGNET([.AU$24]+[.BB105])&#10;+[.AV$25]*[.$Z$5]*MAGNET([.AV$24]+[.BB105])&#10;+[.AW$25]*[.$Z$5]*MAGNET([.AW$24]+[.BB105])&#10;+[.AX$25]*[.$Z$5]*MAGNET([.AX$24]+[.BB105])&#10;+[.AY$25]*[.$Z$5]*MAGNET([.AY$24]+[.BB105])" office:value-type="float" office:value="88.6405500231536" calcext:value-type="float">
            <text:p>88.64</text:p>
          </table:table-cell>
          <table:table-cell table:style-name="ce70" table:formula="of:=[.E$26]*[.$Z$5]*MAGNET([.E$24]+[.$BB105])+[.F$26]*[.$Z$5]*MAGNET([.F$24]+[.$BB105])+[.G$26]*[.$Z$5]*MAGNET([.G$24]+[.$BB105])+[.H$26]*[.$Z$5]*MAGNET([.H$24]+[.$BB105])+[.I$26]*[.$Z$5]*MAGNET([.I$24]+[.$BB105])+[.J$26]*[.$Z$5]*MAGNET([.J$24]+[.$BB105])+[.K$26]*[.$Z$5]*MAGNET([.K$24]+[.$BB105])+[.L$26]*[.$Z$5]*MAGNET([.L$24]+[.$BB105])+[.M$26]*[.$Z$5]*MAGNET([.M$24]+[.$BB105])+[.N$26]*[.$Z$5]*MAGNET([.N$24]+[.$BB105])+[.O$26]*[.$Z$5]*MAGNET([.O$24]+[.$BB105])+[.P$26]*[.$Z$5]*MAGNET([.P$24]+[.$BB105])+[.Q$26]*[.$Z$5]*MAGNET([.Q$24]+[.$BB105])+[.R$26]*[.$Z$5]*MAGNET([.R$24]+[.$BB105])+[.S$26]*[.$Z$5]*MAGNET([.S$24]+[.$BB105])+[.T$26]*[.$Z$5]*MAGNET([.T$24]+[.$BB105])+[.U$26]*[.$Z$5]*MAGNET([.U$24]+[.$BB105])+[.V$26]*[.$Z$5]*MAGNET([.V$24]+[.$BB105])+[.W$26]*[.$Z$5]*MAGNET([.W$24]+[.$BB105])+[.X$26]*[.$Z$5]*MAGNET([.X$24]+[.$BB105])+[.Y$26]*[.$Z$5]*MAGNET([.Y$24]+[.$BB105])+[.Z$26]*[.$Z$5]*MAGNET([.Z$24]+[.$BB105])+[.AA$26]*[.$Z$5]*MAGNET([.AA$24]+[.$BB105])+[.AB$26]*[.$Z$5]*MAGNET([.AB$24]+[.$BB105])+[.AC$26]*[.$Z$5]*MAGNET([.AC$24]+[.$BB105])+[.AD$26]*[.$Z$5]*MAGNET([.AD$24]+[.$BB105])+[.AE$26]*[.$Z$5]*MAGNET([.AE$24]+[.$BB105])+[.AF$26]*[.$Z$5]*MAGNET([.AF$24]+[.$BB105])+[.AG$26]*[.$Z$5]*MAGNET([.AG$24]+[.$BB105])+[.D$26]*[.$Z$5]*MAGNET([.D$24]+[.$BB105])+[.AH$26]*[.$Z$5]*MAGNET([.AH$24]+[.BB105]) +[.AI$26]*[.$Z$5]*MAGNET([.AI$24]+[.BB105]) +[.AJ$26]*[.$Z$5]*MAGNET([.AJ$24]+[.BB105]) +[.AK$26]*[.$Z$5]*MAGNET([.AK$24]+[.BB105]) +[.AL$26]*[.$Z$5]*MAGNET([.AL$24]+[.BB105]) +[.AM$26]*[.$Z$5]*MAGNET([.AM$24]+[.BB105]) +[.AN$26]*[.$Z$5]*MAGNET([.AN$24]+[.BB105]) +[.AO$26]*[.$Z$5]*MAGNET([.AO$24]+[.BB105]) +[.AP$26]*[.$Z$5]*MAGNET([.AP$24]+[.$BB105])&#10;+[.AQ$26]*[.$Z$5]*MAGNET([.AQ$24]+[.$BB105])&#10;+[.AR$26]*[.$Z$5]*MAGNET([.AR$24]+[.$BB105])&#10;+[.AS$26]*[.$Z$5]*MAGNET([.AS$24]+[.$BB105])&#10;+[.AT$26]*[.$Z$5]*MAGNET([.AT$24]+[.$BB105])&#10;+[.AU$26]*[.$Z$5]*MAGNET([.AU$24]+[.$BB105])&#10;+[.AV$26]*[.$Z$5]*MAGNET([.AV$24]+[.$BB105])&#10;+[.AW$26]*[.$Z$5]*MAGNET([.AW$24]+[.$BB105])&#10;+[.AX$26]*[.$Z$5]*MAGNET([.AX$24]+[.$BB105])&#10;+[.AY$26]*[.$Z$5]*MAGNET([.AY$24]+[.$BB105]) +RAND()*[.$BD$13]" office:value-type="float" office:value="-86.7399100636136" calcext:value-type="float">
            <text:p>-86.74</text:p>
          </table:table-cell>
          <table:table-cell table:style-name="ce71" table:formula="of:=[.E$27]*[.$Z$5]*MAGNET([.E$24]+[.$BB105])+[.F$27]*[.$Z$5]*MAGNET([.F$24]+[.$BB105])+[.G$27]*[.$Z$5]*MAGNET([.G$24]+[.$BB105])+[.H$27]*[.$Z$5]*MAGNET([.H$24]+[.$BB105])+[.I$27]*[.$Z$5]*MAGNET([.I$24]+[.$BB105])+[.J$27]*[.$Z$5]*MAGNET([.J$24]+[.$BB105])+[.K$27]*[.$Z$5]*MAGNET([.K$24]+[.$BB105])+[.L$27]*[.$Z$5]*MAGNET([.L$24]+[.$BB105])+[.M$27]*[.$Z$5]*MAGNET([.M$24]+[.$BB105])+[.N$27]*[.$Z$5]*MAGNET([.N$24]+[.$BB105])+[.O$27]*[.$Z$5]*MAGNET([.O$24]+[.$BB105])+[.P$27]*[.$Z$5]*MAGNET([.P$24]+[.$BB105])+[.Q$27]*[.$Z$5]*MAGNET([.Q$24]+[.$BB105])+[.R$27]*[.$Z$5]*MAGNET([.R$24]+[.$BB105])+[.S$27]*[.$Z$5]*MAGNET([.S$24]+[.$BB105])+[.T$27]*[.$Z$5]*MAGNET([.T$24]+[.$BB105])+[.U$27]*[.$Z$5]*MAGNET([.U$24]+[.$BB105])+[.V$27]*[.$Z$5]*MAGNET([.V$24]+[.$BB105])+[.W$27]*[.$Z$5]*MAGNET([.W$24]+[.$BB105])+[.X$27]*[.$Z$5]*MAGNET([.X$24]+[.$BB105])+[.Y$27]*[.$Z$5]*MAGNET([.Y$24]+[.$BB105])+[.Z$27]*[.$Z$5]*MAGNET([.Z$24]+[.$BB105])+[.AA$27]*[.$Z$5]*MAGNET([.AA$24]+[.$BB105])+[.AB$27]*[.$Z$5]*MAGNET([.AB$24]+[.$BB105])+[.AC$27]*[.$Z$5]*MAGNET([.AC$24]+[.$BB105])+[.AD$27]*[.$Z$5]*MAGNET([.AD$24]+[.$BB105])+[.AE$27]*[.$Z$5]*MAGNET([.AE$24]+[.$BB105])+[.AF$27]*[.$Z$5]*MAGNET([.AF$24]+[.$BB105])+[.AG$27]*[.$Z$5]*MAGNET([.AG$24]+[.$BB105])+[.D$27]*[.$Z$5]*MAGNET([.D$24]+[.$BB105])+[.AH$27]*[.$Z$5]*MAGNET([.AH$24]+[.BB105]) +[.AI$27]*[.$Z$5]*MAGNET([.AI$24]+[.BB105]) +[.AJ$27]*[.$Z$5]*MAGNET([.AJ$24]+[.BB105]) +[.AK$27]*[.$Z$5]*MAGNET([.AK$24]+[.BB105]) +[.AL$27]*[.$Z$5]*MAGNET([.AL$24]+[.BB105]) +[.AM$27]*[.$Z$5]*MAGNET([.AM$24]+[.BB105]) +[.AN$27]*[.$Z$5]*MAGNET([.AN$24]+[.BB105]) +[.AO$27]*[.$Z$5]*MAGNET([.AO$24]+[.BB105]) +[.AP$27]*[.$Z$5]*MAGNET([.AP$24]+[.$BB105])&#10;+[.AQ$27]*[.$Z$5]*MAGNET([.AQ$24]+[.$BB105])&#10;+[.AR$27]*[.$Z$5]*MAGNET([.AR$24]+[.$BB105])&#10;+[.AS$27]*[.$Z$5]*MAGNET([.AS$24]+[.$BB105])&#10;+[.AT$27]*[.$Z$5]*MAGNET([.AT$24]+[.$BB105])&#10;+[.AU$27]*[.$Z$5]*MAGNET([.AU$24]+[.$BB105])&#10;+[.AV$27]*[.$Z$5]*MAGNET([.AV$24]+[.$BB105])&#10;+[.AW$27]*[.$Z$5]*MAGNET([.AW$24]+[.$BB105])&#10;+[.AX$27]*[.$Z$5]*MAGNET([.AX$24]+[.$BB105])&#10;+[.AY$27]*[.$Z$5]*MAGNET([.AY$24]+[.$BB105]) +RAND()*[.$BE$13]" office:value-type="float" office:value="19.4756608835417" calcext:value-type="float">
            <text:p>19.4756608835417</text:p>
          </table:table-cell>
          <table:table-cell table:style-name="ce71" table:formula="of:=[.E$28]*[.$Z$5]*MAGNET([.E$24]+[.$BB105])+[.F$28]*[.$Z$5]*MAGNET([.F$24]+[.$BB105])+[.G$28]*[.$Z$5]*MAGNET([.G$24]+[.$BB105])+[.H$28]*[.$Z$5]*MAGNET([.H$24]+[.$BB105])+[.I$28]*[.$Z$5]*MAGNET([.I$24]+[.$BB105])+[.J$28]*[.$Z$5]*MAGNET([.J$24]+[.$BB105])+[.K$28]*[.$Z$5]*MAGNET([.K$24]+[.$BB105])+[.L$28]*[.$Z$5]*MAGNET([.L$24]+[.$BB105])+[.M$28]*[.$Z$5]*MAGNET([.M$24]+[.$BB105])+[.N$28]*[.$Z$5]*MAGNET([.N$24]+[.$BB105])+[.O$28]*[.$Z$5]*MAGNET([.O$24]+[.$BB105])+[.P$28]*[.$Z$5]*MAGNET([.P$24]+[.$BB105])+[.Q$28]*[.$Z$5]*MAGNET([.Q$24]+[.$BB105])+[.R$28]*[.$Z$5]*MAGNET([.R$24]+[.$BB105])+[.S$28]*[.$Z$5]*MAGNET([.S$24]+[.$BB105])+[.T$28]*[.$Z$5]*MAGNET([.T$24]+[.$BB105])+[.U$28]*[.$Z$5]*MAGNET([.U$24]+[.$BB105])+[.V$28]*[.$Z$5]*MAGNET([.V$24]+[.$BB105])+[.W$28]*[.$Z$5]*MAGNET([.W$24]+[.$BB105])+[.X$28]*[.$Z$5]*MAGNET([.X$24]+[.$BB105])+[.Y$28]*[.$Z$5]*MAGNET([.Y$24]+[.$BB105])+[.Z$28]*[.$Z$5]*MAGNET([.Z$24]+[.$BB105])+[.AA$28]*[.$Z$5]*MAGNET([.AA$24]+[.$BB105])+[.AB$28]*[.$Z$5]*MAGNET([.AB$24]+[.$BB105])+[.AC$28]*[.$Z$5]*MAGNET([.AC$24]+[.$BB105])+[.AD$28]*[.$Z$5]*MAGNET([.AD$24]+[.$BB105])+[.AE$28]*[.$Z$5]*MAGNET([.AE$24]+[.$BB105])+[.AF$28]*[.$Z$5]*MAGNET([.AF$24]+[.$BB105])+[.AG$28]*[.$Z$5]*MAGNET([.AG$24]+[.$BB105])+[.D$28]*[.$Z$5]*MAGNET([.D$24]+[.$BB105])+[.AH$28]*[.$Z$5]*MAGNET([.AH$24]+[.BB105]) +[.AI$28]*[.$Z$5]*MAGNET([.AI$24]+[.BB105]) +[.AJ$28]*[.$Z$5]*MAGNET([.AJ$24]+[.BB105]) +[.AK$28]*[.$Z$5]*MAGNET([.AK$24]+[.BB105]) +[.AL$28]*[.$Z$5]*MAGNET([.AL$24]+[.BB105]) +[.AM$28]*[.$Z$5]*MAGNET([.AM$24]+[.BB105]) +[.AN$28]*[.$Z$5]*MAGNET([.AN$24]+[.BB105]) +[.AO$28]*[.$Z$5]*MAGNET([.AO$24]+[.BB105]) +[.AP$28]*[.$Z$5]*MAGNET([.AP$24]+[.$BB105])&#10;+[.AQ$28]*[.$Z$5]*MAGNET([.AQ$24]+[.$BB105])&#10;+[.AR$28]*[.$Z$5]*MAGNET([.AR$24]+[.$BB105])&#10;+[.AS$28]*[.$Z$5]*MAGNET([.AS$24]+[.$BB105])&#10;+[.AT$28]*[.$Z$5]*MAGNET([.AT$24]+[.$BB105])&#10;+[.AU$28]*[.$Z$5]*MAGNET([.AU$24]+[.$BB105])&#10;+[.AV$28]*[.$Z$5]*MAGNET([.AV$24]+[.$BB105])&#10;+[.AW$28]*[.$Z$5]*MAGNET([.AW$24]+[.$BB105])&#10;+[.AX$28]*[.$Z$5]*MAGNET([.AX$24]+[.$BB105])&#10;+[.AY$28]*[.$Z$5]*MAGNET([.AY$24]+[.$BB105]) +RAND()*[.$BF$13]" office:value-type="float" office:value="3.14880037022084" calcext:value-type="float">
            <text:p>3.14880037022084</text:p>
          </table:table-cell>
          <table:table-cell table:style-name="ce71" table:formula="of:=[.E$29]*[.$Z$5]*MAGNET([.E$24]+[.$BB105])+[.F$29]*[.$Z$5]*MAGNET([.F$24]+[.$BB105])+[.G$29]*[.$Z$5]*MAGNET([.G$24]+[.$BB105])+[.H$29]*[.$Z$5]*MAGNET([.H$24]+[.$BB105])+[.I$29]*[.$Z$5]*MAGNET([.I$24]+[.$BB105])+[.J$29]*[.$Z$5]*MAGNET([.J$24]+[.$BB105])+[.K$29]*[.$Z$5]*MAGNET([.K$24]+[.$BB105])+[.L$29]*[.$Z$5]*MAGNET([.L$24]+[.$BB105])+[.M$29]*[.$Z$5]*MAGNET([.M$24]+[.$BB105])+[.N$29]*[.$Z$5]*MAGNET([.N$24]+[.$BB105])+[.O$29]*[.$Z$5]*MAGNET([.O$24]+[.$BB105])+[.P$29]*[.$Z$5]*MAGNET([.P$24]+[.$BB105])+[.Q$29]*[.$Z$5]*MAGNET([.Q$24]+[.$BB105])+[.R$29]*[.$Z$5]*MAGNET([.R$24]+[.$BB105])+[.S$29]*[.$Z$5]*MAGNET([.S$24]+[.$BB105])+[.T$29]*[.$Z$5]*MAGNET([.T$24]+[.$BB105])+[.U$29]*[.$Z$5]*MAGNET([.U$24]+[.$BB105])+[.V$29]*[.$Z$5]*MAGNET([.V$24]+[.$BB105])+[.W$29]*[.$Z$5]*MAGNET([.W$24]+[.$BB105])+[.X$29]*[.$Z$5]*MAGNET([.X$24]+[.$BB105])+[.Y$29]*[.$Z$5]*MAGNET([.Y$24]+[.$BB105])+[.Z$29]*[.$Z$5]*MAGNET([.Z$24]+[.$BB105])+[.AA$29]*[.$Z$5]*MAGNET([.AA$24]+[.$BB105])+[.AB$29]*[.$Z$5]*MAGNET([.AB$24]+[.$BB105])+[.AC$29]*[.$Z$5]*MAGNET([.AC$24]+[.$BB105])+[.AD$29]*[.$Z$5]*MAGNET([.AD$24]+[.$BB105])+[.AE$29]*[.$Z$5]*MAGNET([.AE$24]+[.$BB105])+[.AF$29]*[.$Z$5]*MAGNET([.AF$24]+[.$BB105])+[.AG$29]*[.$Z$5]*MAGNET([.AG$24]+[.$BB105])+[.D$29]*[.$Z$5]*MAGNET([.D$24]+[.$BB105])+[.AH$29]*[.$Z$5]*MAGNET([.AH$24]+[.BB105]) +[.AI$29]*[.$Z$5]*MAGNET([.AI$24]+[.BB105]) +[.AJ$29]*[.$Z$5]*MAGNET([.AJ$24]+[.BB105]) +[.AK$29]*[.$Z$5]*MAGNET([.AK$24]+[.BB105]) +[.AL$29]*[.$Z$5]*MAGNET([.AL$24]+[.BB105]) +[.AM$29]*[.$Z$5]*MAGNET([.AM$24]+[.BB105]) +[.AN$29]*[.$Z$5]*MAGNET([.AN$24]+[.BB105]) +[.AO$29]*[.$Z$5]*MAGNET([.AO$24]+[.BB105]) +[.AP$29]*[.$Z$5]*MAGNET([.AP$24]+[.$BB105])&#10;+[.AQ$29]*[.$Z$5]*MAGNET([.AQ$24]+[.$BB105])&#10;+[.AR$29]*[.$Z$5]*MAGNET([.AR$24]+[.$BB105])&#10;+[.AS$29]*[.$Z$5]*MAGNET([.AS$24]+[.$BB105])&#10;+[.AT$29]*[.$Z$5]*MAGNET([.AT$24]+[.$BB105])&#10;+[.AU$29]*[.$Z$5]*MAGNET([.AU$24]+[.$BB105])&#10;+[.AV$29]*[.$Z$5]*MAGNET([.AV$24]+[.$BB105])&#10;+[.AW$29]*[.$Z$5]*MAGNET([.AW$24]+[.$BB105])&#10;+[.AX$29]*[.$Z$5]*MAGNET([.AX$24]+[.$BB105])&#10;+[.AY$29]*[.$Z$5]*MAGNET([.AY$24]+[.$BB105]) +RAND()*[.$BG$13]" office:value-type="float" office:value="-9.83978621805939" calcext:value-type="float">
            <text:p>-9.83978621805939</text:p>
          </table:table-cell>
          <table:table-cell table:style-name="ce71" table:formula="of:=[.E$30]*[.$Z$5]*MAGNET([.E$24]+[.$BB105])+[.F$30]*[.$Z$5]*MAGNET([.F$24]+[.$BB105])+[.G$30]*[.$Z$5]*MAGNET([.G$24]+[.$BB105])+[.H$30]*[.$Z$5]*MAGNET([.H$24]+[.$BB105])+[.I$30]*[.$Z$5]*MAGNET([.I$24]+[.$BB105])+[.J$30]*[.$Z$5]*MAGNET([.J$24]+[.$BB105])+[.K$30]*[.$Z$5]*MAGNET([.K$24]+[.$BB105])+[.L$30]*[.$Z$5]*MAGNET([.L$24]+[.$BB105])+[.M$30]*[.$Z$5]*MAGNET([.M$24]+[.$BB105])+[.N$30]*[.$Z$5]*MAGNET([.N$24]+[.$BB105])+[.O$30]*[.$Z$5]*MAGNET([.O$24]+[.$BB105])+[.P$30]*[.$Z$5]*MAGNET([.P$24]+[.$BB105])+[.Q$30]*[.$Z$5]*MAGNET([.Q$24]+[.$BB105])+[.R$30]*[.$Z$5]*MAGNET([.R$24]+[.$BB105])+[.S$30]*[.$Z$5]*MAGNET([.S$24]+[.$BB105])+[.T$30]*[.$Z$5]*MAGNET([.T$24]+[.$BB105])+[.U$30]*[.$Z$5]*MAGNET([.U$24]+[.$BB105])+[.V$30]*[.$Z$5]*MAGNET([.V$24]+[.$BB105])+[.W$30]*[.$Z$5]*MAGNET([.W$24]+[.$BB105])+[.X$30]*[.$Z$5]*MAGNET([.X$24]+[.$BB105])+[.Y$30]*[.$Z$5]*MAGNET([.Y$24]+[.$BB105])+[.Z$30]*[.$Z$5]*MAGNET([.Z$24]+[.$BB105])+[.AA$30]*[.$Z$5]*MAGNET([.AA$24]+[.$BB105])+[.AB$30]*[.$Z$5]*MAGNET([.AB$24]+[.$BB105])+[.AC$30]*[.$Z$5]*MAGNET([.AC$24]+[.$BB105])+[.AD$30]*[.$Z$5]*MAGNET([.AD$24]+[.$BB105])+[.AE$30]*[.$Z$5]*MAGNET([.AE$24]+[.$BB105])+[.AF$30]*[.$Z$5]*MAGNET([.AF$24]+[.$BB105])+[.AG$30]*[.$Z$5]*MAGNET([.AG$24]+[.$BB105])+[.D$30]*[.$Z$5]*MAGNET([.D$24]+[.$BB105])+[.AH$30]*[.$Z$5]*MAGNET([.AH$24]+[.BB105]) +[.AI$30]*[.$Z$5]*MAGNET([.AI$24]+[.BB105]) +[.AJ$30]*[.$Z$5]*MAGNET([.AJ$24]+[.BB105]) +[.AK$30]*[.$Z$5]*MAGNET([.AK$24]+[.BB105]) +[.AL$30]*[.$Z$5]*MAGNET([.AL$24]+[.BB105]) +[.AM$30]*[.$Z$5]*MAGNET([.AM$24]+[.BB105]) +[.AN$30]*[.$Z$5]*MAGNET([.AN$24]+[.BB105]) +[.AO$30]*[.$Z$5]*MAGNET([.AO$24]+[.BB105]) +[.AP$30]*[.$Z$5]*MAGNET([.AP$24]+[.$BB105])&#10;+[.AQ$30]*[.$Z$5]*MAGNET([.AQ$24]+[.$BB105])&#10;+[.AR$30]*[.$Z$5]*MAGNET([.AR$24]+[.$BB105])&#10;+[.AS$30]*[.$Z$5]*MAGNET([.AS$24]+[.$BB105])&#10;+[.AT$30]*[.$Z$5]*MAGNET([.AT$24]+[.$BB105])&#10;+[.AU$30]*[.$Z$5]*MAGNET([.AU$24]+[.$BB105])&#10;+[.AV$30]*[.$Z$5]*MAGNET([.AV$24]+[.$BB105])&#10;+[.AW$30]*[.$Z$5]*MAGNET([.AW$24]+[.$BB105])&#10;+[.AX$30]*[.$Z$5]*MAGNET([.AX$24]+[.$BB105])&#10;+[.AY$30]*[.$Z$5]*MAGNET([.AY$24]+[.$BB105]) +RAND()*[.$BH$13]" office:value-type="float" office:value="0" calcext:value-type="float">
            <text:p>0</text:p>
          </table:table-cell>
          <table:table-cell table:style-name="ce71" table:formula="of:=[.E$31]*[.$Z$5]*MAGNET([.E$24]+[.$BB105])+[.F$31]*[.$Z$5]*MAGNET([.F$24]+[.$BB105])+[.G$31]*[.$Z$5]*MAGNET([.G$24]+[.$BB105])+[.H$31]*[.$Z$5]*MAGNET([.H$24]+[.$BB105])+[.I$31]*[.$Z$5]*MAGNET([.I$24]+[.$BB105])+[.J$31]*[.$Z$5]*MAGNET([.J$24]+[.$BB105])+[.K$31]*[.$Z$5]*MAGNET([.K$24]+[.$BB105])+[.L$31]*[.$Z$5]*MAGNET([.L$24]+[.$BB105])+[.M$31]*[.$Z$5]*MAGNET([.M$24]+[.$BB105])+[.N$31]*[.$Z$5]*MAGNET([.N$24]+[.$BB105])+[.O$31]*[.$Z$5]*MAGNET([.O$24]+[.$BB105])+[.P$31]*[.$Z$5]*MAGNET([.P$24]+[.$BB105])+[.Q$31]*[.$Z$5]*MAGNET([.Q$24]+[.$BB105])+[.R$31]*[.$Z$5]*MAGNET([.R$24]+[.$BB105])+[.S$31]*[.$Z$5]*MAGNET([.S$24]+[.$BB105])+[.T$31]*[.$Z$5]*MAGNET([.T$24]+[.$BB105])+[.U$31]*[.$Z$5]*MAGNET([.U$24]+[.$BB105])+[.V$31]*[.$Z$5]*MAGNET([.V$24]+[.$BB105])+[.W$31]*[.$Z$5]*MAGNET([.W$24]+[.$BB105])+[.X$31]*[.$Z$5]*MAGNET([.X$24]+[.$BB105])+[.Y$31]*[.$Z$5]*MAGNET([.Y$24]+[.$BB105])+[.Z$31]*[.$Z$5]*MAGNET([.Z$24]+[.$BB105])+[.AA$31]*[.$Z$5]*MAGNET([.AA$24]+[.$BB105])+[.AB$31]*[.$Z$5]*MAGNET([.AB$24]+[.$BB105])+[.AC$31]*[.$Z$5]*MAGNET([.AC$24]+[.$BB105])+[.AD$31]*[.$Z$5]*MAGNET([.AD$24]+[.$BB105])+[.AE$31]*[.$Z$5]*MAGNET([.AE$24]+[.$BB105])+[.AF$31]*[.$Z$5]*MAGNET([.AF$24]+[.$BB105])+[.AG$31]*[.$Z$5]*MAGNET([.AG$24]+[.$BB105])+[.D$31]*[.$Z$5]*MAGNET([.D$24]+[.$BB105])+[.AH$31]*[.$Z$5]*MAGNET([.AH$24]+[.BB105]) +[.AI$31]*[.$Z$5]*MAGNET([.AI$24]+[.BB105]) +[.AJ$31]*[.$Z$5]*MAGNET([.AJ$24]+[.BB105]) +[.AK$31]*[.$Z$5]*MAGNET([.AK$24]+[.BB105]) +[.AL$31]*[.$Z$5]*MAGNET([.AL$24]+[.BB105]) +[.AM$31]*[.$Z$5]*MAGNET([.AM$24]+[.BB105]) +[.AN$31]*[.$Z$5]*MAGNET([.AN$24]+[.BB105]) +[.AO$31]*[.$Z$5]*MAGNET([.AO$24]+[.BB105]) +[.AP$31]*[.$Z$5]*MAGNET([.AP$24]+[.$BB105])&#10;+[.AQ$31]*[.$Z$5]*MAGNET([.AQ$24]+[.$BB105])&#10;+[.AR$31]*[.$Z$5]*MAGNET([.AR$24]+[.$BB105])&#10;+[.AS$31]*[.$Z$5]*MAGNET([.AS$24]+[.$BB105])&#10;+[.AT$31]*[.$Z$5]*MAGNET([.AT$24]+[.$BB105])&#10;+[.AU$31]*[.$Z$5]*MAGNET([.AU$24]+[.$BB105])&#10;+[.AV$31]*[.$Z$5]*MAGNET([.AV$24]+[.$BB105])&#10;+[.AW$31]*[.$Z$5]*MAGNET([.AW$24]+[.$BB105])&#10;+[.AX$31]*[.$Z$5]*MAGNET([.AX$24]+[.$BB105])&#10;+[.AY$31]*[.$Z$5]*MAGNET([.AY$24]+[.$BB105]) +RAND()*[.$BI$13]" office:value-type="float" office:value="0" calcext:value-type="float">
            <text:p>0</text:p>
          </table:table-cell>
          <table:table-cell table:style-name="ce71" table:formula="of:=[.E$32]*[.$Z$5]*MAGNET([.E$24]+[.$BB105])+[.F$32]*[.$Z$5]*MAGNET([.F$24]+[.$BB105])+[.G$32]*[.$Z$5]*MAGNET([.G$24]+[.$BB105])+[.H$32]*[.$Z$5]*MAGNET([.H$24]+[.$BB105])+[.I$32]*[.$Z$5]*MAGNET([.I$24]+[.$BB105])+[.J$32]*[.$Z$5]*MAGNET([.J$24]+[.$BB105])+[.K$32]*[.$Z$5]*MAGNET([.K$24]+[.$BB105])+[.L$32]*[.$Z$5]*MAGNET([.L$24]+[.$BB105])+[.M$32]*[.$Z$5]*MAGNET([.M$24]+[.$BB105])+[.N$32]*[.$Z$5]*MAGNET([.N$24]+[.$BB105])+[.O$32]*[.$Z$5]*MAGNET([.O$24]+[.$BB105])+[.P$32]*[.$Z$5]*MAGNET([.P$24]+[.$BB105])+[.Q$32]*[.$Z$5]*MAGNET([.Q$24]+[.$BB105])+[.R$32]*[.$Z$5]*MAGNET([.R$24]+[.$BB105])+[.S$32]*[.$Z$5]*MAGNET([.S$24]+[.$BB105])+[.T$32]*[.$Z$5]*MAGNET([.T$24]+[.$BB105])+[.U$32]*[.$Z$5]*MAGNET([.U$24]+[.$BB105])+[.V$32]*[.$Z$5]*MAGNET([.V$24]+[.$BB105])+[.W$32]*[.$Z$5]*MAGNET([.W$24]+[.$BB105])+[.X$32]*[.$Z$5]*MAGNET([.X$24]+[.$BB105])+[.Y$32]*[.$Z$5]*MAGNET([.Y$24]+[.$BB105])+[.Z$32]*[.$Z$5]*MAGNET([.Z$24]+[.$BB105])+[.AA$32]*[.$Z$5]*MAGNET([.AA$24]+[.$BB105])+[.AB$32]*[.$Z$5]*MAGNET([.AB$24]+[.$BB105])+[.AC$32]*[.$Z$5]*MAGNET([.AC$24]+[.$BB105])+[.AD$32]*[.$Z$5]*MAGNET([.AD$24]+[.$BB105])+[.AE$32]*[.$Z$5]*MAGNET([.AE$24]+[.$BB105])+[.AF$32]*[.$Z$5]*MAGNET([.AF$24]+[.$BB105])+[.AG$32]*[.$Z$5]*MAGNET([.AG$24]+[.$BB105])+[.D$32]*[.$Z$5]*MAGNET([.D$24]+[.$BB105])+[.AH$32]*[.$Z$5]*MAGNET([.AH$24]+[.BB105]) +[.AI$32]*[.$Z$5]*MAGNET([.AI$24]+[.BB105]) +[.AJ$32]*[.$Z$5]*MAGNET([.AJ$24]+[.BB105]) +[.AK$32]*[.$Z$5]*MAGNET([.AK$24]+[.BB105]) +[.AL$32]*[.$Z$5]*MAGNET([.AL$24]+[.BB105]) +[.AM$32]*[.$Z$5]*MAGNET([.AM$24]+[.BB105]) +[.AN$32]*[.$Z$5]*MAGNET([.AN$24]+[.BB105]) +[.AO$32]*[.$Z$5]*MAGNET([.AO$24]+[.BB105]) +[.AP$32]*[.$Z$5]*MAGNET([.AP$24]+[.$BB105])&#10;+[.AQ$32]*[.$Z$5]*MAGNET([.AQ$24]+[.$BB105])&#10;+[.AR$32]*[.$Z$5]*MAGNET([.AR$24]+[.$BB105])&#10;+[.AS$32]*[.$Z$5]*MAGNET([.AS$24]+[.$BB105])&#10;+[.AT$32]*[.$Z$5]*MAGNET([.AT$24]+[.$BB105])&#10;+[.AU$32]*[.$Z$5]*MAGNET([.AU$24]+[.$BB105])&#10;+[.AV$32]*[.$Z$5]*MAGNET([.AV$24]+[.$BB105])&#10;+[.AW$32]*[.$Z$5]*MAGNET([.AW$24]+[.$BB105])&#10;+[.AX$32]*[.$Z$5]*MAGNET([.AX$24]+[.$BB105])&#10;+[.AY$32]*[.$Z$5]*MAGNET([.AY$24]+[.$BB10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5]+0.002" office:value-type="float" office:value="0.182" calcext:value-type="float">
            <text:p>0.182</text:p>
          </table:table-cell>
          <table:table-cell table:formula="of:=[.BA106]*[.$D$6]" office:value-type="float" office:value="9.14831780725348" calcext:value-type="float">
            <text:p>9.148</text:p>
          </table:table-cell>
          <table:table-cell table:formula="of:=[.D$25]*[.$Z$5]*MAGNET([.D$24]+[.BB106])+[.E$25]*[.$Z$5]*MAGNET([.E$24]+[.BB106])+[.F$25]*[.$Z$5]*MAGNET([.F$24]+[.BB106])+[.G$25]*[.$Z$5]*MAGNET([.G$24]+[.BB106])+[.H$25]*[.$Z$5]*MAGNET([.H$24]+[.BB106])+[.I$25]*[.$Z$5]*MAGNET([.I$24]+[.BB106])+[.J$25]*[.$Z$5]*MAGNET([.J$24]+[.BB106])+[.K$25]*[.$Z$5]*MAGNET([.K$24]+[.BB106])+[.L$25]*[.$Z$5]*MAGNET([.L$24]+[.BB106])+[.M$25]*[.$Z$5]*MAGNET([.M$24]+[.BB106])+[.N$25]*[.$Z$5]*MAGNET([.N$24]+[.BB106])+[.O$25]*[.$Z$5]*MAGNET([.O$24]+[.BB106])+[.P$25]*[.$Z$5]*MAGNET([.P$24]+[.BB106])+[.Q$25]*[.$Z$5]*MAGNET([.Q$24]+[.BB106])+[.R$25]*[.$Z$5]*MAGNET([.R$24]+[.BB106])+[.S$25]*[.$Z$5]*MAGNET([.S$24]+[.BB106])+[.T$25]*[.$Z$5]*MAGNET([.T$24]+[.BB106])+[.U$25]*[.$Z$5]*MAGNET([.U$24]+[.BB106])+[.V$25]*[.$Z$5]*MAGNET([.V$24]+[.BB106])+[.W$25]*[.$Z$5]*MAGNET([.W$24]+[.BB106])+[.X$25]*[.$Z$5]*MAGNET([.X$24]+[.BB106])+[.Y$25]*[.$Z$5]*MAGNET([.Y$24]+[.BB106])+[.Z$25]*[.$Z$5]*MAGNET([.Z$24]+[.BB106])+[.AA$25]*[.$Z$5]*MAGNET([.AA$24]+[.BB106])+[.AB$25]*[.$Z$5]*MAGNET([.AB$24]+[.BB106])+[.AC$25]*[.$Z$5]*MAGNET([.AC$24]+[.BB106])+[.AD$25]*[.$Z$5]*MAGNET([.AD$24]+[.BB106])+[.AE$25]*[.$Z$5]*MAGNET([.AE$24]+[.BB106])+[.AF$25]*[.$Z$5]*MAGNET([.AF$24]+[.BB106])+[.AG$25]*[.$Z$5]*MAGNET([.AG$24]+[.BB106])+[.AH$25]*[.$Z$5]*MAGNET([.AH$24]+[.BB106]) +[.AI$25]*[.$Z$5]*MAGNET([.AI$24]+[.BB106]) +[.AJ$25]*[.$Z$5]*MAGNET([.AJ$24]+[.BB106]) +[.AK$25]*[.$Z$5]*MAGNET([.AK$24]+[.BB106]) +[.AL$25]*[.$Z$5]*MAGNET([.AL$24]+[.BB106]) +[.AM$25]*[.$Z$5]*MAGNET([.AM$24]+[.BB106]) +[.AN$25]*[.$Z$5]*MAGNET([.AN$24]+[.BB106]) +[.AO$25]*[.$Z$5]*MAGNET([.AO$24]+[.BB106])+RAND()*[.$BC$13]+[.AP$25]*[.$Z$5]*MAGNET([.AP$24]+[.BB106])&#10;+[.AQ$25]*[.$Z$5]*MAGNET([.AQ$24]+[.BB106])&#10;+[.AR$25]*[.$Z$5]*MAGNET([.AR$24]+[.BB106])&#10;+[.AS$25]*[.$Z$5]*MAGNET([.AS$24]+[.BB106])&#10;+[.AT$25]*[.$Z$5]*MAGNET([.AT$24]+[.BB106])&#10;+[.AU$25]*[.$Z$5]*MAGNET([.AU$24]+[.BB106])&#10;+[.AV$25]*[.$Z$5]*MAGNET([.AV$24]+[.BB106])&#10;+[.AW$25]*[.$Z$5]*MAGNET([.AW$24]+[.BB106])&#10;+[.AX$25]*[.$Z$5]*MAGNET([.AX$24]+[.BB106])&#10;+[.AY$25]*[.$Z$5]*MAGNET([.AY$24]+[.BB106])" office:value-type="float" office:value="82.0237356529283" calcext:value-type="float">
            <text:p>82.02</text:p>
          </table:table-cell>
          <table:table-cell table:style-name="ce70" table:formula="of:=[.E$26]*[.$Z$5]*MAGNET([.E$24]+[.$BB106])+[.F$26]*[.$Z$5]*MAGNET([.F$24]+[.$BB106])+[.G$26]*[.$Z$5]*MAGNET([.G$24]+[.$BB106])+[.H$26]*[.$Z$5]*MAGNET([.H$24]+[.$BB106])+[.I$26]*[.$Z$5]*MAGNET([.I$24]+[.$BB106])+[.J$26]*[.$Z$5]*MAGNET([.J$24]+[.$BB106])+[.K$26]*[.$Z$5]*MAGNET([.K$24]+[.$BB106])+[.L$26]*[.$Z$5]*MAGNET([.L$24]+[.$BB106])+[.M$26]*[.$Z$5]*MAGNET([.M$24]+[.$BB106])+[.N$26]*[.$Z$5]*MAGNET([.N$24]+[.$BB106])+[.O$26]*[.$Z$5]*MAGNET([.O$24]+[.$BB106])+[.P$26]*[.$Z$5]*MAGNET([.P$24]+[.$BB106])+[.Q$26]*[.$Z$5]*MAGNET([.Q$24]+[.$BB106])+[.R$26]*[.$Z$5]*MAGNET([.R$24]+[.$BB106])+[.S$26]*[.$Z$5]*MAGNET([.S$24]+[.$BB106])+[.T$26]*[.$Z$5]*MAGNET([.T$24]+[.$BB106])+[.U$26]*[.$Z$5]*MAGNET([.U$24]+[.$BB106])+[.V$26]*[.$Z$5]*MAGNET([.V$24]+[.$BB106])+[.W$26]*[.$Z$5]*MAGNET([.W$24]+[.$BB106])+[.X$26]*[.$Z$5]*MAGNET([.X$24]+[.$BB106])+[.Y$26]*[.$Z$5]*MAGNET([.Y$24]+[.$BB106])+[.Z$26]*[.$Z$5]*MAGNET([.Z$24]+[.$BB106])+[.AA$26]*[.$Z$5]*MAGNET([.AA$24]+[.$BB106])+[.AB$26]*[.$Z$5]*MAGNET([.AB$24]+[.$BB106])+[.AC$26]*[.$Z$5]*MAGNET([.AC$24]+[.$BB106])+[.AD$26]*[.$Z$5]*MAGNET([.AD$24]+[.$BB106])+[.AE$26]*[.$Z$5]*MAGNET([.AE$24]+[.$BB106])+[.AF$26]*[.$Z$5]*MAGNET([.AF$24]+[.$BB106])+[.AG$26]*[.$Z$5]*MAGNET([.AG$24]+[.$BB106])+[.D$26]*[.$Z$5]*MAGNET([.D$24]+[.$BB106])+[.AH$26]*[.$Z$5]*MAGNET([.AH$24]+[.BB106]) +[.AI$26]*[.$Z$5]*MAGNET([.AI$24]+[.BB106]) +[.AJ$26]*[.$Z$5]*MAGNET([.AJ$24]+[.BB106]) +[.AK$26]*[.$Z$5]*MAGNET([.AK$24]+[.BB106]) +[.AL$26]*[.$Z$5]*MAGNET([.AL$24]+[.BB106]) +[.AM$26]*[.$Z$5]*MAGNET([.AM$24]+[.BB106]) +[.AN$26]*[.$Z$5]*MAGNET([.AN$24]+[.BB106]) +[.AO$26]*[.$Z$5]*MAGNET([.AO$24]+[.BB106]) +[.AP$26]*[.$Z$5]*MAGNET([.AP$24]+[.$BB106])&#10;+[.AQ$26]*[.$Z$5]*MAGNET([.AQ$24]+[.$BB106])&#10;+[.AR$26]*[.$Z$5]*MAGNET([.AR$24]+[.$BB106])&#10;+[.AS$26]*[.$Z$5]*MAGNET([.AS$24]+[.$BB106])&#10;+[.AT$26]*[.$Z$5]*MAGNET([.AT$24]+[.$BB106])&#10;+[.AU$26]*[.$Z$5]*MAGNET([.AU$24]+[.$BB106])&#10;+[.AV$26]*[.$Z$5]*MAGNET([.AV$24]+[.$BB106])&#10;+[.AW$26]*[.$Z$5]*MAGNET([.AW$24]+[.$BB106])&#10;+[.AX$26]*[.$Z$5]*MAGNET([.AX$24]+[.$BB106])&#10;+[.AY$26]*[.$Z$5]*MAGNET([.AY$24]+[.$BB106]) +RAND()*[.$BD$13]" office:value-type="float" office:value="-84.3775392236773" calcext:value-type="float">
            <text:p>-84.38</text:p>
          </table:table-cell>
          <table:table-cell table:style-name="ce71" table:formula="of:=[.E$27]*[.$Z$5]*MAGNET([.E$24]+[.$BB106])+[.F$27]*[.$Z$5]*MAGNET([.F$24]+[.$BB106])+[.G$27]*[.$Z$5]*MAGNET([.G$24]+[.$BB106])+[.H$27]*[.$Z$5]*MAGNET([.H$24]+[.$BB106])+[.I$27]*[.$Z$5]*MAGNET([.I$24]+[.$BB106])+[.J$27]*[.$Z$5]*MAGNET([.J$24]+[.$BB106])+[.K$27]*[.$Z$5]*MAGNET([.K$24]+[.$BB106])+[.L$27]*[.$Z$5]*MAGNET([.L$24]+[.$BB106])+[.M$27]*[.$Z$5]*MAGNET([.M$24]+[.$BB106])+[.N$27]*[.$Z$5]*MAGNET([.N$24]+[.$BB106])+[.O$27]*[.$Z$5]*MAGNET([.O$24]+[.$BB106])+[.P$27]*[.$Z$5]*MAGNET([.P$24]+[.$BB106])+[.Q$27]*[.$Z$5]*MAGNET([.Q$24]+[.$BB106])+[.R$27]*[.$Z$5]*MAGNET([.R$24]+[.$BB106])+[.S$27]*[.$Z$5]*MAGNET([.S$24]+[.$BB106])+[.T$27]*[.$Z$5]*MAGNET([.T$24]+[.$BB106])+[.U$27]*[.$Z$5]*MAGNET([.U$24]+[.$BB106])+[.V$27]*[.$Z$5]*MAGNET([.V$24]+[.$BB106])+[.W$27]*[.$Z$5]*MAGNET([.W$24]+[.$BB106])+[.X$27]*[.$Z$5]*MAGNET([.X$24]+[.$BB106])+[.Y$27]*[.$Z$5]*MAGNET([.Y$24]+[.$BB106])+[.Z$27]*[.$Z$5]*MAGNET([.Z$24]+[.$BB106])+[.AA$27]*[.$Z$5]*MAGNET([.AA$24]+[.$BB106])+[.AB$27]*[.$Z$5]*MAGNET([.AB$24]+[.$BB106])+[.AC$27]*[.$Z$5]*MAGNET([.AC$24]+[.$BB106])+[.AD$27]*[.$Z$5]*MAGNET([.AD$24]+[.$BB106])+[.AE$27]*[.$Z$5]*MAGNET([.AE$24]+[.$BB106])+[.AF$27]*[.$Z$5]*MAGNET([.AF$24]+[.$BB106])+[.AG$27]*[.$Z$5]*MAGNET([.AG$24]+[.$BB106])+[.D$27]*[.$Z$5]*MAGNET([.D$24]+[.$BB106])+[.AH$27]*[.$Z$5]*MAGNET([.AH$24]+[.BB106]) +[.AI$27]*[.$Z$5]*MAGNET([.AI$24]+[.BB106]) +[.AJ$27]*[.$Z$5]*MAGNET([.AJ$24]+[.BB106]) +[.AK$27]*[.$Z$5]*MAGNET([.AK$24]+[.BB106]) +[.AL$27]*[.$Z$5]*MAGNET([.AL$24]+[.BB106]) +[.AM$27]*[.$Z$5]*MAGNET([.AM$24]+[.BB106]) +[.AN$27]*[.$Z$5]*MAGNET([.AN$24]+[.BB106]) +[.AO$27]*[.$Z$5]*MAGNET([.AO$24]+[.BB106]) +[.AP$27]*[.$Z$5]*MAGNET([.AP$24]+[.$BB106])&#10;+[.AQ$27]*[.$Z$5]*MAGNET([.AQ$24]+[.$BB106])&#10;+[.AR$27]*[.$Z$5]*MAGNET([.AR$24]+[.$BB106])&#10;+[.AS$27]*[.$Z$5]*MAGNET([.AS$24]+[.$BB106])&#10;+[.AT$27]*[.$Z$5]*MAGNET([.AT$24]+[.$BB106])&#10;+[.AU$27]*[.$Z$5]*MAGNET([.AU$24]+[.$BB106])&#10;+[.AV$27]*[.$Z$5]*MAGNET([.AV$24]+[.$BB106])&#10;+[.AW$27]*[.$Z$5]*MAGNET([.AW$24]+[.$BB106])&#10;+[.AX$27]*[.$Z$5]*MAGNET([.AX$24]+[.$BB106])&#10;+[.AY$27]*[.$Z$5]*MAGNET([.AY$24]+[.$BB106]) +RAND()*[.$BE$13]" office:value-type="float" office:value="35.599199023363" calcext:value-type="float">
            <text:p>35.599199023363</text:p>
          </table:table-cell>
          <table:table-cell table:style-name="ce71" table:formula="of:=[.E$28]*[.$Z$5]*MAGNET([.E$24]+[.$BB106])+[.F$28]*[.$Z$5]*MAGNET([.F$24]+[.$BB106])+[.G$28]*[.$Z$5]*MAGNET([.G$24]+[.$BB106])+[.H$28]*[.$Z$5]*MAGNET([.H$24]+[.$BB106])+[.I$28]*[.$Z$5]*MAGNET([.I$24]+[.$BB106])+[.J$28]*[.$Z$5]*MAGNET([.J$24]+[.$BB106])+[.K$28]*[.$Z$5]*MAGNET([.K$24]+[.$BB106])+[.L$28]*[.$Z$5]*MAGNET([.L$24]+[.$BB106])+[.M$28]*[.$Z$5]*MAGNET([.M$24]+[.$BB106])+[.N$28]*[.$Z$5]*MAGNET([.N$24]+[.$BB106])+[.O$28]*[.$Z$5]*MAGNET([.O$24]+[.$BB106])+[.P$28]*[.$Z$5]*MAGNET([.P$24]+[.$BB106])+[.Q$28]*[.$Z$5]*MAGNET([.Q$24]+[.$BB106])+[.R$28]*[.$Z$5]*MAGNET([.R$24]+[.$BB106])+[.S$28]*[.$Z$5]*MAGNET([.S$24]+[.$BB106])+[.T$28]*[.$Z$5]*MAGNET([.T$24]+[.$BB106])+[.U$28]*[.$Z$5]*MAGNET([.U$24]+[.$BB106])+[.V$28]*[.$Z$5]*MAGNET([.V$24]+[.$BB106])+[.W$28]*[.$Z$5]*MAGNET([.W$24]+[.$BB106])+[.X$28]*[.$Z$5]*MAGNET([.X$24]+[.$BB106])+[.Y$28]*[.$Z$5]*MAGNET([.Y$24]+[.$BB106])+[.Z$28]*[.$Z$5]*MAGNET([.Z$24]+[.$BB106])+[.AA$28]*[.$Z$5]*MAGNET([.AA$24]+[.$BB106])+[.AB$28]*[.$Z$5]*MAGNET([.AB$24]+[.$BB106])+[.AC$28]*[.$Z$5]*MAGNET([.AC$24]+[.$BB106])+[.AD$28]*[.$Z$5]*MAGNET([.AD$24]+[.$BB106])+[.AE$28]*[.$Z$5]*MAGNET([.AE$24]+[.$BB106])+[.AF$28]*[.$Z$5]*MAGNET([.AF$24]+[.$BB106])+[.AG$28]*[.$Z$5]*MAGNET([.AG$24]+[.$BB106])+[.D$28]*[.$Z$5]*MAGNET([.D$24]+[.$BB106])+[.AH$28]*[.$Z$5]*MAGNET([.AH$24]+[.BB106]) +[.AI$28]*[.$Z$5]*MAGNET([.AI$24]+[.BB106]) +[.AJ$28]*[.$Z$5]*MAGNET([.AJ$24]+[.BB106]) +[.AK$28]*[.$Z$5]*MAGNET([.AK$24]+[.BB106]) +[.AL$28]*[.$Z$5]*MAGNET([.AL$24]+[.BB106]) +[.AM$28]*[.$Z$5]*MAGNET([.AM$24]+[.BB106]) +[.AN$28]*[.$Z$5]*MAGNET([.AN$24]+[.BB106]) +[.AO$28]*[.$Z$5]*MAGNET([.AO$24]+[.BB106]) +[.AP$28]*[.$Z$5]*MAGNET([.AP$24]+[.$BB106])&#10;+[.AQ$28]*[.$Z$5]*MAGNET([.AQ$24]+[.$BB106])&#10;+[.AR$28]*[.$Z$5]*MAGNET([.AR$24]+[.$BB106])&#10;+[.AS$28]*[.$Z$5]*MAGNET([.AS$24]+[.$BB106])&#10;+[.AT$28]*[.$Z$5]*MAGNET([.AT$24]+[.$BB106])&#10;+[.AU$28]*[.$Z$5]*MAGNET([.AU$24]+[.$BB106])&#10;+[.AV$28]*[.$Z$5]*MAGNET([.AV$24]+[.$BB106])&#10;+[.AW$28]*[.$Z$5]*MAGNET([.AW$24]+[.$BB106])&#10;+[.AX$28]*[.$Z$5]*MAGNET([.AX$24]+[.$BB106])&#10;+[.AY$28]*[.$Z$5]*MAGNET([.AY$24]+[.$BB106]) +RAND()*[.$BF$13]" office:value-type="float" office:value="4.62238403572728" calcext:value-type="float">
            <text:p>4.62238403572728</text:p>
          </table:table-cell>
          <table:table-cell table:style-name="ce71" table:formula="of:=[.E$29]*[.$Z$5]*MAGNET([.E$24]+[.$BB106])+[.F$29]*[.$Z$5]*MAGNET([.F$24]+[.$BB106])+[.G$29]*[.$Z$5]*MAGNET([.G$24]+[.$BB106])+[.H$29]*[.$Z$5]*MAGNET([.H$24]+[.$BB106])+[.I$29]*[.$Z$5]*MAGNET([.I$24]+[.$BB106])+[.J$29]*[.$Z$5]*MAGNET([.J$24]+[.$BB106])+[.K$29]*[.$Z$5]*MAGNET([.K$24]+[.$BB106])+[.L$29]*[.$Z$5]*MAGNET([.L$24]+[.$BB106])+[.M$29]*[.$Z$5]*MAGNET([.M$24]+[.$BB106])+[.N$29]*[.$Z$5]*MAGNET([.N$24]+[.$BB106])+[.O$29]*[.$Z$5]*MAGNET([.O$24]+[.$BB106])+[.P$29]*[.$Z$5]*MAGNET([.P$24]+[.$BB106])+[.Q$29]*[.$Z$5]*MAGNET([.Q$24]+[.$BB106])+[.R$29]*[.$Z$5]*MAGNET([.R$24]+[.$BB106])+[.S$29]*[.$Z$5]*MAGNET([.S$24]+[.$BB106])+[.T$29]*[.$Z$5]*MAGNET([.T$24]+[.$BB106])+[.U$29]*[.$Z$5]*MAGNET([.U$24]+[.$BB106])+[.V$29]*[.$Z$5]*MAGNET([.V$24]+[.$BB106])+[.W$29]*[.$Z$5]*MAGNET([.W$24]+[.$BB106])+[.X$29]*[.$Z$5]*MAGNET([.X$24]+[.$BB106])+[.Y$29]*[.$Z$5]*MAGNET([.Y$24]+[.$BB106])+[.Z$29]*[.$Z$5]*MAGNET([.Z$24]+[.$BB106])+[.AA$29]*[.$Z$5]*MAGNET([.AA$24]+[.$BB106])+[.AB$29]*[.$Z$5]*MAGNET([.AB$24]+[.$BB106])+[.AC$29]*[.$Z$5]*MAGNET([.AC$24]+[.$BB106])+[.AD$29]*[.$Z$5]*MAGNET([.AD$24]+[.$BB106])+[.AE$29]*[.$Z$5]*MAGNET([.AE$24]+[.$BB106])+[.AF$29]*[.$Z$5]*MAGNET([.AF$24]+[.$BB106])+[.AG$29]*[.$Z$5]*MAGNET([.AG$24]+[.$BB106])+[.D$29]*[.$Z$5]*MAGNET([.D$24]+[.$BB106])+[.AH$29]*[.$Z$5]*MAGNET([.AH$24]+[.BB106]) +[.AI$29]*[.$Z$5]*MAGNET([.AI$24]+[.BB106]) +[.AJ$29]*[.$Z$5]*MAGNET([.AJ$24]+[.BB106]) +[.AK$29]*[.$Z$5]*MAGNET([.AK$24]+[.BB106]) +[.AL$29]*[.$Z$5]*MAGNET([.AL$24]+[.BB106]) +[.AM$29]*[.$Z$5]*MAGNET([.AM$24]+[.BB106]) +[.AN$29]*[.$Z$5]*MAGNET([.AN$24]+[.BB106]) +[.AO$29]*[.$Z$5]*MAGNET([.AO$24]+[.BB106]) +[.AP$29]*[.$Z$5]*MAGNET([.AP$24]+[.$BB106])&#10;+[.AQ$29]*[.$Z$5]*MAGNET([.AQ$24]+[.$BB106])&#10;+[.AR$29]*[.$Z$5]*MAGNET([.AR$24]+[.$BB106])&#10;+[.AS$29]*[.$Z$5]*MAGNET([.AS$24]+[.$BB106])&#10;+[.AT$29]*[.$Z$5]*MAGNET([.AT$24]+[.$BB106])&#10;+[.AU$29]*[.$Z$5]*MAGNET([.AU$24]+[.$BB106])&#10;+[.AV$29]*[.$Z$5]*MAGNET([.AV$24]+[.$BB106])&#10;+[.AW$29]*[.$Z$5]*MAGNET([.AW$24]+[.$BB106])&#10;+[.AX$29]*[.$Z$5]*MAGNET([.AX$24]+[.$BB106])&#10;+[.AY$29]*[.$Z$5]*MAGNET([.AY$24]+[.$BB106]) +RAND()*[.$BG$13]" office:value-type="float" office:value="-15.1192376508925" calcext:value-type="float">
            <text:p>-15.1192376508925</text:p>
          </table:table-cell>
          <table:table-cell table:style-name="ce71" table:formula="of:=[.E$30]*[.$Z$5]*MAGNET([.E$24]+[.$BB106])+[.F$30]*[.$Z$5]*MAGNET([.F$24]+[.$BB106])+[.G$30]*[.$Z$5]*MAGNET([.G$24]+[.$BB106])+[.H$30]*[.$Z$5]*MAGNET([.H$24]+[.$BB106])+[.I$30]*[.$Z$5]*MAGNET([.I$24]+[.$BB106])+[.J$30]*[.$Z$5]*MAGNET([.J$24]+[.$BB106])+[.K$30]*[.$Z$5]*MAGNET([.K$24]+[.$BB106])+[.L$30]*[.$Z$5]*MAGNET([.L$24]+[.$BB106])+[.M$30]*[.$Z$5]*MAGNET([.M$24]+[.$BB106])+[.N$30]*[.$Z$5]*MAGNET([.N$24]+[.$BB106])+[.O$30]*[.$Z$5]*MAGNET([.O$24]+[.$BB106])+[.P$30]*[.$Z$5]*MAGNET([.P$24]+[.$BB106])+[.Q$30]*[.$Z$5]*MAGNET([.Q$24]+[.$BB106])+[.R$30]*[.$Z$5]*MAGNET([.R$24]+[.$BB106])+[.S$30]*[.$Z$5]*MAGNET([.S$24]+[.$BB106])+[.T$30]*[.$Z$5]*MAGNET([.T$24]+[.$BB106])+[.U$30]*[.$Z$5]*MAGNET([.U$24]+[.$BB106])+[.V$30]*[.$Z$5]*MAGNET([.V$24]+[.$BB106])+[.W$30]*[.$Z$5]*MAGNET([.W$24]+[.$BB106])+[.X$30]*[.$Z$5]*MAGNET([.X$24]+[.$BB106])+[.Y$30]*[.$Z$5]*MAGNET([.Y$24]+[.$BB106])+[.Z$30]*[.$Z$5]*MAGNET([.Z$24]+[.$BB106])+[.AA$30]*[.$Z$5]*MAGNET([.AA$24]+[.$BB106])+[.AB$30]*[.$Z$5]*MAGNET([.AB$24]+[.$BB106])+[.AC$30]*[.$Z$5]*MAGNET([.AC$24]+[.$BB106])+[.AD$30]*[.$Z$5]*MAGNET([.AD$24]+[.$BB106])+[.AE$30]*[.$Z$5]*MAGNET([.AE$24]+[.$BB106])+[.AF$30]*[.$Z$5]*MAGNET([.AF$24]+[.$BB106])+[.AG$30]*[.$Z$5]*MAGNET([.AG$24]+[.$BB106])+[.D$30]*[.$Z$5]*MAGNET([.D$24]+[.$BB106])+[.AH$30]*[.$Z$5]*MAGNET([.AH$24]+[.BB106]) +[.AI$30]*[.$Z$5]*MAGNET([.AI$24]+[.BB106]) +[.AJ$30]*[.$Z$5]*MAGNET([.AJ$24]+[.BB106]) +[.AK$30]*[.$Z$5]*MAGNET([.AK$24]+[.BB106]) +[.AL$30]*[.$Z$5]*MAGNET([.AL$24]+[.BB106]) +[.AM$30]*[.$Z$5]*MAGNET([.AM$24]+[.BB106]) +[.AN$30]*[.$Z$5]*MAGNET([.AN$24]+[.BB106]) +[.AO$30]*[.$Z$5]*MAGNET([.AO$24]+[.BB106]) +[.AP$30]*[.$Z$5]*MAGNET([.AP$24]+[.$BB106])&#10;+[.AQ$30]*[.$Z$5]*MAGNET([.AQ$24]+[.$BB106])&#10;+[.AR$30]*[.$Z$5]*MAGNET([.AR$24]+[.$BB106])&#10;+[.AS$30]*[.$Z$5]*MAGNET([.AS$24]+[.$BB106])&#10;+[.AT$30]*[.$Z$5]*MAGNET([.AT$24]+[.$BB106])&#10;+[.AU$30]*[.$Z$5]*MAGNET([.AU$24]+[.$BB106])&#10;+[.AV$30]*[.$Z$5]*MAGNET([.AV$24]+[.$BB106])&#10;+[.AW$30]*[.$Z$5]*MAGNET([.AW$24]+[.$BB106])&#10;+[.AX$30]*[.$Z$5]*MAGNET([.AX$24]+[.$BB106])&#10;+[.AY$30]*[.$Z$5]*MAGNET([.AY$24]+[.$BB106]) +RAND()*[.$BH$13]" office:value-type="float" office:value="0" calcext:value-type="float">
            <text:p>0</text:p>
          </table:table-cell>
          <table:table-cell table:style-name="ce71" table:formula="of:=[.E$31]*[.$Z$5]*MAGNET([.E$24]+[.$BB106])+[.F$31]*[.$Z$5]*MAGNET([.F$24]+[.$BB106])+[.G$31]*[.$Z$5]*MAGNET([.G$24]+[.$BB106])+[.H$31]*[.$Z$5]*MAGNET([.H$24]+[.$BB106])+[.I$31]*[.$Z$5]*MAGNET([.I$24]+[.$BB106])+[.J$31]*[.$Z$5]*MAGNET([.J$24]+[.$BB106])+[.K$31]*[.$Z$5]*MAGNET([.K$24]+[.$BB106])+[.L$31]*[.$Z$5]*MAGNET([.L$24]+[.$BB106])+[.M$31]*[.$Z$5]*MAGNET([.M$24]+[.$BB106])+[.N$31]*[.$Z$5]*MAGNET([.N$24]+[.$BB106])+[.O$31]*[.$Z$5]*MAGNET([.O$24]+[.$BB106])+[.P$31]*[.$Z$5]*MAGNET([.P$24]+[.$BB106])+[.Q$31]*[.$Z$5]*MAGNET([.Q$24]+[.$BB106])+[.R$31]*[.$Z$5]*MAGNET([.R$24]+[.$BB106])+[.S$31]*[.$Z$5]*MAGNET([.S$24]+[.$BB106])+[.T$31]*[.$Z$5]*MAGNET([.T$24]+[.$BB106])+[.U$31]*[.$Z$5]*MAGNET([.U$24]+[.$BB106])+[.V$31]*[.$Z$5]*MAGNET([.V$24]+[.$BB106])+[.W$31]*[.$Z$5]*MAGNET([.W$24]+[.$BB106])+[.X$31]*[.$Z$5]*MAGNET([.X$24]+[.$BB106])+[.Y$31]*[.$Z$5]*MAGNET([.Y$24]+[.$BB106])+[.Z$31]*[.$Z$5]*MAGNET([.Z$24]+[.$BB106])+[.AA$31]*[.$Z$5]*MAGNET([.AA$24]+[.$BB106])+[.AB$31]*[.$Z$5]*MAGNET([.AB$24]+[.$BB106])+[.AC$31]*[.$Z$5]*MAGNET([.AC$24]+[.$BB106])+[.AD$31]*[.$Z$5]*MAGNET([.AD$24]+[.$BB106])+[.AE$31]*[.$Z$5]*MAGNET([.AE$24]+[.$BB106])+[.AF$31]*[.$Z$5]*MAGNET([.AF$24]+[.$BB106])+[.AG$31]*[.$Z$5]*MAGNET([.AG$24]+[.$BB106])+[.D$31]*[.$Z$5]*MAGNET([.D$24]+[.$BB106])+[.AH$31]*[.$Z$5]*MAGNET([.AH$24]+[.BB106]) +[.AI$31]*[.$Z$5]*MAGNET([.AI$24]+[.BB106]) +[.AJ$31]*[.$Z$5]*MAGNET([.AJ$24]+[.BB106]) +[.AK$31]*[.$Z$5]*MAGNET([.AK$24]+[.BB106]) +[.AL$31]*[.$Z$5]*MAGNET([.AL$24]+[.BB106]) +[.AM$31]*[.$Z$5]*MAGNET([.AM$24]+[.BB106]) +[.AN$31]*[.$Z$5]*MAGNET([.AN$24]+[.BB106]) +[.AO$31]*[.$Z$5]*MAGNET([.AO$24]+[.BB106]) +[.AP$31]*[.$Z$5]*MAGNET([.AP$24]+[.$BB106])&#10;+[.AQ$31]*[.$Z$5]*MAGNET([.AQ$24]+[.$BB106])&#10;+[.AR$31]*[.$Z$5]*MAGNET([.AR$24]+[.$BB106])&#10;+[.AS$31]*[.$Z$5]*MAGNET([.AS$24]+[.$BB106])&#10;+[.AT$31]*[.$Z$5]*MAGNET([.AT$24]+[.$BB106])&#10;+[.AU$31]*[.$Z$5]*MAGNET([.AU$24]+[.$BB106])&#10;+[.AV$31]*[.$Z$5]*MAGNET([.AV$24]+[.$BB106])&#10;+[.AW$31]*[.$Z$5]*MAGNET([.AW$24]+[.$BB106])&#10;+[.AX$31]*[.$Z$5]*MAGNET([.AX$24]+[.$BB106])&#10;+[.AY$31]*[.$Z$5]*MAGNET([.AY$24]+[.$BB106]) +RAND()*[.$BI$13]" office:value-type="float" office:value="0" calcext:value-type="float">
            <text:p>0</text:p>
          </table:table-cell>
          <table:table-cell table:style-name="ce71" table:formula="of:=[.E$32]*[.$Z$5]*MAGNET([.E$24]+[.$BB106])+[.F$32]*[.$Z$5]*MAGNET([.F$24]+[.$BB106])+[.G$32]*[.$Z$5]*MAGNET([.G$24]+[.$BB106])+[.H$32]*[.$Z$5]*MAGNET([.H$24]+[.$BB106])+[.I$32]*[.$Z$5]*MAGNET([.I$24]+[.$BB106])+[.J$32]*[.$Z$5]*MAGNET([.J$24]+[.$BB106])+[.K$32]*[.$Z$5]*MAGNET([.K$24]+[.$BB106])+[.L$32]*[.$Z$5]*MAGNET([.L$24]+[.$BB106])+[.M$32]*[.$Z$5]*MAGNET([.M$24]+[.$BB106])+[.N$32]*[.$Z$5]*MAGNET([.N$24]+[.$BB106])+[.O$32]*[.$Z$5]*MAGNET([.O$24]+[.$BB106])+[.P$32]*[.$Z$5]*MAGNET([.P$24]+[.$BB106])+[.Q$32]*[.$Z$5]*MAGNET([.Q$24]+[.$BB106])+[.R$32]*[.$Z$5]*MAGNET([.R$24]+[.$BB106])+[.S$32]*[.$Z$5]*MAGNET([.S$24]+[.$BB106])+[.T$32]*[.$Z$5]*MAGNET([.T$24]+[.$BB106])+[.U$32]*[.$Z$5]*MAGNET([.U$24]+[.$BB106])+[.V$32]*[.$Z$5]*MAGNET([.V$24]+[.$BB106])+[.W$32]*[.$Z$5]*MAGNET([.W$24]+[.$BB106])+[.X$32]*[.$Z$5]*MAGNET([.X$24]+[.$BB106])+[.Y$32]*[.$Z$5]*MAGNET([.Y$24]+[.$BB106])+[.Z$32]*[.$Z$5]*MAGNET([.Z$24]+[.$BB106])+[.AA$32]*[.$Z$5]*MAGNET([.AA$24]+[.$BB106])+[.AB$32]*[.$Z$5]*MAGNET([.AB$24]+[.$BB106])+[.AC$32]*[.$Z$5]*MAGNET([.AC$24]+[.$BB106])+[.AD$32]*[.$Z$5]*MAGNET([.AD$24]+[.$BB106])+[.AE$32]*[.$Z$5]*MAGNET([.AE$24]+[.$BB106])+[.AF$32]*[.$Z$5]*MAGNET([.AF$24]+[.$BB106])+[.AG$32]*[.$Z$5]*MAGNET([.AG$24]+[.$BB106])+[.D$32]*[.$Z$5]*MAGNET([.D$24]+[.$BB106])+[.AH$32]*[.$Z$5]*MAGNET([.AH$24]+[.BB106]) +[.AI$32]*[.$Z$5]*MAGNET([.AI$24]+[.BB106]) +[.AJ$32]*[.$Z$5]*MAGNET([.AJ$24]+[.BB106]) +[.AK$32]*[.$Z$5]*MAGNET([.AK$24]+[.BB106]) +[.AL$32]*[.$Z$5]*MAGNET([.AL$24]+[.BB106]) +[.AM$32]*[.$Z$5]*MAGNET([.AM$24]+[.BB106]) +[.AN$32]*[.$Z$5]*MAGNET([.AN$24]+[.BB106]) +[.AO$32]*[.$Z$5]*MAGNET([.AO$24]+[.BB106]) +[.AP$32]*[.$Z$5]*MAGNET([.AP$24]+[.$BB106])&#10;+[.AQ$32]*[.$Z$5]*MAGNET([.AQ$24]+[.$BB106])&#10;+[.AR$32]*[.$Z$5]*MAGNET([.AR$24]+[.$BB106])&#10;+[.AS$32]*[.$Z$5]*MAGNET([.AS$24]+[.$BB106])&#10;+[.AT$32]*[.$Z$5]*MAGNET([.AT$24]+[.$BB106])&#10;+[.AU$32]*[.$Z$5]*MAGNET([.AU$24]+[.$BB106])&#10;+[.AV$32]*[.$Z$5]*MAGNET([.AV$24]+[.$BB106])&#10;+[.AW$32]*[.$Z$5]*MAGNET([.AW$24]+[.$BB106])&#10;+[.AX$32]*[.$Z$5]*MAGNET([.AX$24]+[.$BB106])&#10;+[.AY$32]*[.$Z$5]*MAGNET([.AY$24]+[.$BB106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6]+0.002" office:value-type="float" office:value="0.184" calcext:value-type="float">
            <text:p>0.184</text:p>
          </table:table-cell>
          <table:table-cell table:formula="of:=[.BA107]*[.$D$6]" office:value-type="float" office:value="9.24884877216836" calcext:value-type="float">
            <text:p>9.249</text:p>
          </table:table-cell>
          <table:table-cell table:formula="of:=[.D$25]*[.$Z$5]*MAGNET([.D$24]+[.BB107])+[.E$25]*[.$Z$5]*MAGNET([.E$24]+[.BB107])+[.F$25]*[.$Z$5]*MAGNET([.F$24]+[.BB107])+[.G$25]*[.$Z$5]*MAGNET([.G$24]+[.BB107])+[.H$25]*[.$Z$5]*MAGNET([.H$24]+[.BB107])+[.I$25]*[.$Z$5]*MAGNET([.I$24]+[.BB107])+[.J$25]*[.$Z$5]*MAGNET([.J$24]+[.BB107])+[.K$25]*[.$Z$5]*MAGNET([.K$24]+[.BB107])+[.L$25]*[.$Z$5]*MAGNET([.L$24]+[.BB107])+[.M$25]*[.$Z$5]*MAGNET([.M$24]+[.BB107])+[.N$25]*[.$Z$5]*MAGNET([.N$24]+[.BB107])+[.O$25]*[.$Z$5]*MAGNET([.O$24]+[.BB107])+[.P$25]*[.$Z$5]*MAGNET([.P$24]+[.BB107])+[.Q$25]*[.$Z$5]*MAGNET([.Q$24]+[.BB107])+[.R$25]*[.$Z$5]*MAGNET([.R$24]+[.BB107])+[.S$25]*[.$Z$5]*MAGNET([.S$24]+[.BB107])+[.T$25]*[.$Z$5]*MAGNET([.T$24]+[.BB107])+[.U$25]*[.$Z$5]*MAGNET([.U$24]+[.BB107])+[.V$25]*[.$Z$5]*MAGNET([.V$24]+[.BB107])+[.W$25]*[.$Z$5]*MAGNET([.W$24]+[.BB107])+[.X$25]*[.$Z$5]*MAGNET([.X$24]+[.BB107])+[.Y$25]*[.$Z$5]*MAGNET([.Y$24]+[.BB107])+[.Z$25]*[.$Z$5]*MAGNET([.Z$24]+[.BB107])+[.AA$25]*[.$Z$5]*MAGNET([.AA$24]+[.BB107])+[.AB$25]*[.$Z$5]*MAGNET([.AB$24]+[.BB107])+[.AC$25]*[.$Z$5]*MAGNET([.AC$24]+[.BB107])+[.AD$25]*[.$Z$5]*MAGNET([.AD$24]+[.BB107])+[.AE$25]*[.$Z$5]*MAGNET([.AE$24]+[.BB107])+[.AF$25]*[.$Z$5]*MAGNET([.AF$24]+[.BB107])+[.AG$25]*[.$Z$5]*MAGNET([.AG$24]+[.BB107])+[.AH$25]*[.$Z$5]*MAGNET([.AH$24]+[.BB107]) +[.AI$25]*[.$Z$5]*MAGNET([.AI$24]+[.BB107]) +[.AJ$25]*[.$Z$5]*MAGNET([.AJ$24]+[.BB107]) +[.AK$25]*[.$Z$5]*MAGNET([.AK$24]+[.BB107]) +[.AL$25]*[.$Z$5]*MAGNET([.AL$24]+[.BB107]) +[.AM$25]*[.$Z$5]*MAGNET([.AM$24]+[.BB107]) +[.AN$25]*[.$Z$5]*MAGNET([.AN$24]+[.BB107]) +[.AO$25]*[.$Z$5]*MAGNET([.AO$24]+[.BB107])+RAND()*[.$BC$13]+[.AP$25]*[.$Z$5]*MAGNET([.AP$24]+[.BB107])&#10;+[.AQ$25]*[.$Z$5]*MAGNET([.AQ$24]+[.BB107])&#10;+[.AR$25]*[.$Z$5]*MAGNET([.AR$24]+[.BB107])&#10;+[.AS$25]*[.$Z$5]*MAGNET([.AS$24]+[.BB107])&#10;+[.AT$25]*[.$Z$5]*MAGNET([.AT$24]+[.BB107])&#10;+[.AU$25]*[.$Z$5]*MAGNET([.AU$24]+[.BB107])&#10;+[.AV$25]*[.$Z$5]*MAGNET([.AV$24]+[.BB107])&#10;+[.AW$25]*[.$Z$5]*MAGNET([.AW$24]+[.BB107])&#10;+[.AX$25]*[.$Z$5]*MAGNET([.AX$24]+[.BB107])&#10;+[.AY$25]*[.$Z$5]*MAGNET([.AY$24]+[.BB107])" office:value-type="float" office:value="70.3480605539178" calcext:value-type="float">
            <text:p>70.35</text:p>
          </table:table-cell>
          <table:table-cell table:style-name="ce70" table:formula="of:=[.E$26]*[.$Z$5]*MAGNET([.E$24]+[.$BB107])+[.F$26]*[.$Z$5]*MAGNET([.F$24]+[.$BB107])+[.G$26]*[.$Z$5]*MAGNET([.G$24]+[.$BB107])+[.H$26]*[.$Z$5]*MAGNET([.H$24]+[.$BB107])+[.I$26]*[.$Z$5]*MAGNET([.I$24]+[.$BB107])+[.J$26]*[.$Z$5]*MAGNET([.J$24]+[.$BB107])+[.K$26]*[.$Z$5]*MAGNET([.K$24]+[.$BB107])+[.L$26]*[.$Z$5]*MAGNET([.L$24]+[.$BB107])+[.M$26]*[.$Z$5]*MAGNET([.M$24]+[.$BB107])+[.N$26]*[.$Z$5]*MAGNET([.N$24]+[.$BB107])+[.O$26]*[.$Z$5]*MAGNET([.O$24]+[.$BB107])+[.P$26]*[.$Z$5]*MAGNET([.P$24]+[.$BB107])+[.Q$26]*[.$Z$5]*MAGNET([.Q$24]+[.$BB107])+[.R$26]*[.$Z$5]*MAGNET([.R$24]+[.$BB107])+[.S$26]*[.$Z$5]*MAGNET([.S$24]+[.$BB107])+[.T$26]*[.$Z$5]*MAGNET([.T$24]+[.$BB107])+[.U$26]*[.$Z$5]*MAGNET([.U$24]+[.$BB107])+[.V$26]*[.$Z$5]*MAGNET([.V$24]+[.$BB107])+[.W$26]*[.$Z$5]*MAGNET([.W$24]+[.$BB107])+[.X$26]*[.$Z$5]*MAGNET([.X$24]+[.$BB107])+[.Y$26]*[.$Z$5]*MAGNET([.Y$24]+[.$BB107])+[.Z$26]*[.$Z$5]*MAGNET([.Z$24]+[.$BB107])+[.AA$26]*[.$Z$5]*MAGNET([.AA$24]+[.$BB107])+[.AB$26]*[.$Z$5]*MAGNET([.AB$24]+[.$BB107])+[.AC$26]*[.$Z$5]*MAGNET([.AC$24]+[.$BB107])+[.AD$26]*[.$Z$5]*MAGNET([.AD$24]+[.$BB107])+[.AE$26]*[.$Z$5]*MAGNET([.AE$24]+[.$BB107])+[.AF$26]*[.$Z$5]*MAGNET([.AF$24]+[.$BB107])+[.AG$26]*[.$Z$5]*MAGNET([.AG$24]+[.$BB107])+[.D$26]*[.$Z$5]*MAGNET([.D$24]+[.$BB107])+[.AH$26]*[.$Z$5]*MAGNET([.AH$24]+[.BB107]) +[.AI$26]*[.$Z$5]*MAGNET([.AI$24]+[.BB107]) +[.AJ$26]*[.$Z$5]*MAGNET([.AJ$24]+[.BB107]) +[.AK$26]*[.$Z$5]*MAGNET([.AK$24]+[.BB107]) +[.AL$26]*[.$Z$5]*MAGNET([.AL$24]+[.BB107]) +[.AM$26]*[.$Z$5]*MAGNET([.AM$24]+[.BB107]) +[.AN$26]*[.$Z$5]*MAGNET([.AN$24]+[.BB107]) +[.AO$26]*[.$Z$5]*MAGNET([.AO$24]+[.BB107]) +[.AP$26]*[.$Z$5]*MAGNET([.AP$24]+[.$BB107])&#10;+[.AQ$26]*[.$Z$5]*MAGNET([.AQ$24]+[.$BB107])&#10;+[.AR$26]*[.$Z$5]*MAGNET([.AR$24]+[.$BB107])&#10;+[.AS$26]*[.$Z$5]*MAGNET([.AS$24]+[.$BB107])&#10;+[.AT$26]*[.$Z$5]*MAGNET([.AT$24]+[.$BB107])&#10;+[.AU$26]*[.$Z$5]*MAGNET([.AU$24]+[.$BB107])&#10;+[.AV$26]*[.$Z$5]*MAGNET([.AV$24]+[.$BB107])&#10;+[.AW$26]*[.$Z$5]*MAGNET([.AW$24]+[.$BB107])&#10;+[.AX$26]*[.$Z$5]*MAGNET([.AX$24]+[.$BB107])&#10;+[.AY$26]*[.$Z$5]*MAGNET([.AY$24]+[.$BB107]) +RAND()*[.$BD$13]" office:value-type="float" office:value="-86.9459818017634" calcext:value-type="float">
            <text:p>-86.95</text:p>
          </table:table-cell>
          <table:table-cell table:style-name="ce71" table:formula="of:=[.E$27]*[.$Z$5]*MAGNET([.E$24]+[.$BB107])+[.F$27]*[.$Z$5]*MAGNET([.F$24]+[.$BB107])+[.G$27]*[.$Z$5]*MAGNET([.G$24]+[.$BB107])+[.H$27]*[.$Z$5]*MAGNET([.H$24]+[.$BB107])+[.I$27]*[.$Z$5]*MAGNET([.I$24]+[.$BB107])+[.J$27]*[.$Z$5]*MAGNET([.J$24]+[.$BB107])+[.K$27]*[.$Z$5]*MAGNET([.K$24]+[.$BB107])+[.L$27]*[.$Z$5]*MAGNET([.L$24]+[.$BB107])+[.M$27]*[.$Z$5]*MAGNET([.M$24]+[.$BB107])+[.N$27]*[.$Z$5]*MAGNET([.N$24]+[.$BB107])+[.O$27]*[.$Z$5]*MAGNET([.O$24]+[.$BB107])+[.P$27]*[.$Z$5]*MAGNET([.P$24]+[.$BB107])+[.Q$27]*[.$Z$5]*MAGNET([.Q$24]+[.$BB107])+[.R$27]*[.$Z$5]*MAGNET([.R$24]+[.$BB107])+[.S$27]*[.$Z$5]*MAGNET([.S$24]+[.$BB107])+[.T$27]*[.$Z$5]*MAGNET([.T$24]+[.$BB107])+[.U$27]*[.$Z$5]*MAGNET([.U$24]+[.$BB107])+[.V$27]*[.$Z$5]*MAGNET([.V$24]+[.$BB107])+[.W$27]*[.$Z$5]*MAGNET([.W$24]+[.$BB107])+[.X$27]*[.$Z$5]*MAGNET([.X$24]+[.$BB107])+[.Y$27]*[.$Z$5]*MAGNET([.Y$24]+[.$BB107])+[.Z$27]*[.$Z$5]*MAGNET([.Z$24]+[.$BB107])+[.AA$27]*[.$Z$5]*MAGNET([.AA$24]+[.$BB107])+[.AB$27]*[.$Z$5]*MAGNET([.AB$24]+[.$BB107])+[.AC$27]*[.$Z$5]*MAGNET([.AC$24]+[.$BB107])+[.AD$27]*[.$Z$5]*MAGNET([.AD$24]+[.$BB107])+[.AE$27]*[.$Z$5]*MAGNET([.AE$24]+[.$BB107])+[.AF$27]*[.$Z$5]*MAGNET([.AF$24]+[.$BB107])+[.AG$27]*[.$Z$5]*MAGNET([.AG$24]+[.$BB107])+[.D$27]*[.$Z$5]*MAGNET([.D$24]+[.$BB107])+[.AH$27]*[.$Z$5]*MAGNET([.AH$24]+[.BB107]) +[.AI$27]*[.$Z$5]*MAGNET([.AI$24]+[.BB107]) +[.AJ$27]*[.$Z$5]*MAGNET([.AJ$24]+[.BB107]) +[.AK$27]*[.$Z$5]*MAGNET([.AK$24]+[.BB107]) +[.AL$27]*[.$Z$5]*MAGNET([.AL$24]+[.BB107]) +[.AM$27]*[.$Z$5]*MAGNET([.AM$24]+[.BB107]) +[.AN$27]*[.$Z$5]*MAGNET([.AN$24]+[.BB107]) +[.AO$27]*[.$Z$5]*MAGNET([.AO$24]+[.BB107]) +[.AP$27]*[.$Z$5]*MAGNET([.AP$24]+[.$BB107])&#10;+[.AQ$27]*[.$Z$5]*MAGNET([.AQ$24]+[.$BB107])&#10;+[.AR$27]*[.$Z$5]*MAGNET([.AR$24]+[.$BB107])&#10;+[.AS$27]*[.$Z$5]*MAGNET([.AS$24]+[.$BB107])&#10;+[.AT$27]*[.$Z$5]*MAGNET([.AT$24]+[.$BB107])&#10;+[.AU$27]*[.$Z$5]*MAGNET([.AU$24]+[.$BB107])&#10;+[.AV$27]*[.$Z$5]*MAGNET([.AV$24]+[.$BB107])&#10;+[.AW$27]*[.$Z$5]*MAGNET([.AW$24]+[.$BB107])&#10;+[.AX$27]*[.$Z$5]*MAGNET([.AX$24]+[.$BB107])&#10;+[.AY$27]*[.$Z$5]*MAGNET([.AY$24]+[.$BB107]) +RAND()*[.$BE$13]" office:value-type="float" office:value="43.9222434673855" calcext:value-type="float">
            <text:p>43.9222434673855</text:p>
          </table:table-cell>
          <table:table-cell table:style-name="ce71" table:formula="of:=[.E$28]*[.$Z$5]*MAGNET([.E$24]+[.$BB107])+[.F$28]*[.$Z$5]*MAGNET([.F$24]+[.$BB107])+[.G$28]*[.$Z$5]*MAGNET([.G$24]+[.$BB107])+[.H$28]*[.$Z$5]*MAGNET([.H$24]+[.$BB107])+[.I$28]*[.$Z$5]*MAGNET([.I$24]+[.$BB107])+[.J$28]*[.$Z$5]*MAGNET([.J$24]+[.$BB107])+[.K$28]*[.$Z$5]*MAGNET([.K$24]+[.$BB107])+[.L$28]*[.$Z$5]*MAGNET([.L$24]+[.$BB107])+[.M$28]*[.$Z$5]*MAGNET([.M$24]+[.$BB107])+[.N$28]*[.$Z$5]*MAGNET([.N$24]+[.$BB107])+[.O$28]*[.$Z$5]*MAGNET([.O$24]+[.$BB107])+[.P$28]*[.$Z$5]*MAGNET([.P$24]+[.$BB107])+[.Q$28]*[.$Z$5]*MAGNET([.Q$24]+[.$BB107])+[.R$28]*[.$Z$5]*MAGNET([.R$24]+[.$BB107])+[.S$28]*[.$Z$5]*MAGNET([.S$24]+[.$BB107])+[.T$28]*[.$Z$5]*MAGNET([.T$24]+[.$BB107])+[.U$28]*[.$Z$5]*MAGNET([.U$24]+[.$BB107])+[.V$28]*[.$Z$5]*MAGNET([.V$24]+[.$BB107])+[.W$28]*[.$Z$5]*MAGNET([.W$24]+[.$BB107])+[.X$28]*[.$Z$5]*MAGNET([.X$24]+[.$BB107])+[.Y$28]*[.$Z$5]*MAGNET([.Y$24]+[.$BB107])+[.Z$28]*[.$Z$5]*MAGNET([.Z$24]+[.$BB107])+[.AA$28]*[.$Z$5]*MAGNET([.AA$24]+[.$BB107])+[.AB$28]*[.$Z$5]*MAGNET([.AB$24]+[.$BB107])+[.AC$28]*[.$Z$5]*MAGNET([.AC$24]+[.$BB107])+[.AD$28]*[.$Z$5]*MAGNET([.AD$24]+[.$BB107])+[.AE$28]*[.$Z$5]*MAGNET([.AE$24]+[.$BB107])+[.AF$28]*[.$Z$5]*MAGNET([.AF$24]+[.$BB107])+[.AG$28]*[.$Z$5]*MAGNET([.AG$24]+[.$BB107])+[.D$28]*[.$Z$5]*MAGNET([.D$24]+[.$BB107])+[.AH$28]*[.$Z$5]*MAGNET([.AH$24]+[.BB107]) +[.AI$28]*[.$Z$5]*MAGNET([.AI$24]+[.BB107]) +[.AJ$28]*[.$Z$5]*MAGNET([.AJ$24]+[.BB107]) +[.AK$28]*[.$Z$5]*MAGNET([.AK$24]+[.BB107]) +[.AL$28]*[.$Z$5]*MAGNET([.AL$24]+[.BB107]) +[.AM$28]*[.$Z$5]*MAGNET([.AM$24]+[.BB107]) +[.AN$28]*[.$Z$5]*MAGNET([.AN$24]+[.BB107]) +[.AO$28]*[.$Z$5]*MAGNET([.AO$24]+[.BB107]) +[.AP$28]*[.$Z$5]*MAGNET([.AP$24]+[.$BB107])&#10;+[.AQ$28]*[.$Z$5]*MAGNET([.AQ$24]+[.$BB107])&#10;+[.AR$28]*[.$Z$5]*MAGNET([.AR$24]+[.$BB107])&#10;+[.AS$28]*[.$Z$5]*MAGNET([.AS$24]+[.$BB107])&#10;+[.AT$28]*[.$Z$5]*MAGNET([.AT$24]+[.$BB107])&#10;+[.AU$28]*[.$Z$5]*MAGNET([.AU$24]+[.$BB107])&#10;+[.AV$28]*[.$Z$5]*MAGNET([.AV$24]+[.$BB107])&#10;+[.AW$28]*[.$Z$5]*MAGNET([.AW$24]+[.$BB107])&#10;+[.AX$28]*[.$Z$5]*MAGNET([.AX$24]+[.$BB107])&#10;+[.AY$28]*[.$Z$5]*MAGNET([.AY$24]+[.$BB107]) +RAND()*[.$BF$13]" office:value-type="float" office:value="5.66912029326869" calcext:value-type="float">
            <text:p>5.66912029326869</text:p>
          </table:table-cell>
          <table:table-cell table:style-name="ce71" table:formula="of:=[.E$29]*[.$Z$5]*MAGNET([.E$24]+[.$BB107])+[.F$29]*[.$Z$5]*MAGNET([.F$24]+[.$BB107])+[.G$29]*[.$Z$5]*MAGNET([.G$24]+[.$BB107])+[.H$29]*[.$Z$5]*MAGNET([.H$24]+[.$BB107])+[.I$29]*[.$Z$5]*MAGNET([.I$24]+[.$BB107])+[.J$29]*[.$Z$5]*MAGNET([.J$24]+[.$BB107])+[.K$29]*[.$Z$5]*MAGNET([.K$24]+[.$BB107])+[.L$29]*[.$Z$5]*MAGNET([.L$24]+[.$BB107])+[.M$29]*[.$Z$5]*MAGNET([.M$24]+[.$BB107])+[.N$29]*[.$Z$5]*MAGNET([.N$24]+[.$BB107])+[.O$29]*[.$Z$5]*MAGNET([.O$24]+[.$BB107])+[.P$29]*[.$Z$5]*MAGNET([.P$24]+[.$BB107])+[.Q$29]*[.$Z$5]*MAGNET([.Q$24]+[.$BB107])+[.R$29]*[.$Z$5]*MAGNET([.R$24]+[.$BB107])+[.S$29]*[.$Z$5]*MAGNET([.S$24]+[.$BB107])+[.T$29]*[.$Z$5]*MAGNET([.T$24]+[.$BB107])+[.U$29]*[.$Z$5]*MAGNET([.U$24]+[.$BB107])+[.V$29]*[.$Z$5]*MAGNET([.V$24]+[.$BB107])+[.W$29]*[.$Z$5]*MAGNET([.W$24]+[.$BB107])+[.X$29]*[.$Z$5]*MAGNET([.X$24]+[.$BB107])+[.Y$29]*[.$Z$5]*MAGNET([.Y$24]+[.$BB107])+[.Z$29]*[.$Z$5]*MAGNET([.Z$24]+[.$BB107])+[.AA$29]*[.$Z$5]*MAGNET([.AA$24]+[.$BB107])+[.AB$29]*[.$Z$5]*MAGNET([.AB$24]+[.$BB107])+[.AC$29]*[.$Z$5]*MAGNET([.AC$24]+[.$BB107])+[.AD$29]*[.$Z$5]*MAGNET([.AD$24]+[.$BB107])+[.AE$29]*[.$Z$5]*MAGNET([.AE$24]+[.$BB107])+[.AF$29]*[.$Z$5]*MAGNET([.AF$24]+[.$BB107])+[.AG$29]*[.$Z$5]*MAGNET([.AG$24]+[.$BB107])+[.D$29]*[.$Z$5]*MAGNET([.D$24]+[.$BB107])+[.AH$29]*[.$Z$5]*MAGNET([.AH$24]+[.BB107]) +[.AI$29]*[.$Z$5]*MAGNET([.AI$24]+[.BB107]) +[.AJ$29]*[.$Z$5]*MAGNET([.AJ$24]+[.BB107]) +[.AK$29]*[.$Z$5]*MAGNET([.AK$24]+[.BB107]) +[.AL$29]*[.$Z$5]*MAGNET([.AL$24]+[.BB107]) +[.AM$29]*[.$Z$5]*MAGNET([.AM$24]+[.BB107]) +[.AN$29]*[.$Z$5]*MAGNET([.AN$24]+[.BB107]) +[.AO$29]*[.$Z$5]*MAGNET([.AO$24]+[.BB107]) +[.AP$29]*[.$Z$5]*MAGNET([.AP$24]+[.$BB107])&#10;+[.AQ$29]*[.$Z$5]*MAGNET([.AQ$24]+[.$BB107])&#10;+[.AR$29]*[.$Z$5]*MAGNET([.AR$24]+[.$BB107])&#10;+[.AS$29]*[.$Z$5]*MAGNET([.AS$24]+[.$BB107])&#10;+[.AT$29]*[.$Z$5]*MAGNET([.AT$24]+[.$BB107])&#10;+[.AU$29]*[.$Z$5]*MAGNET([.AU$24]+[.$BB107])&#10;+[.AV$29]*[.$Z$5]*MAGNET([.AV$24]+[.$BB107])&#10;+[.AW$29]*[.$Z$5]*MAGNET([.AW$24]+[.$BB107])&#10;+[.AX$29]*[.$Z$5]*MAGNET([.AX$24]+[.$BB107])&#10;+[.AY$29]*[.$Z$5]*MAGNET([.AY$24]+[.$BB107]) +RAND()*[.$BG$13]" office:value-type="float" office:value="-19.4136249515171" calcext:value-type="float">
            <text:p>-19.4136249515171</text:p>
          </table:table-cell>
          <table:table-cell table:style-name="ce71" table:formula="of:=[.E$30]*[.$Z$5]*MAGNET([.E$24]+[.$BB107])+[.F$30]*[.$Z$5]*MAGNET([.F$24]+[.$BB107])+[.G$30]*[.$Z$5]*MAGNET([.G$24]+[.$BB107])+[.H$30]*[.$Z$5]*MAGNET([.H$24]+[.$BB107])+[.I$30]*[.$Z$5]*MAGNET([.I$24]+[.$BB107])+[.J$30]*[.$Z$5]*MAGNET([.J$24]+[.$BB107])+[.K$30]*[.$Z$5]*MAGNET([.K$24]+[.$BB107])+[.L$30]*[.$Z$5]*MAGNET([.L$24]+[.$BB107])+[.M$30]*[.$Z$5]*MAGNET([.M$24]+[.$BB107])+[.N$30]*[.$Z$5]*MAGNET([.N$24]+[.$BB107])+[.O$30]*[.$Z$5]*MAGNET([.O$24]+[.$BB107])+[.P$30]*[.$Z$5]*MAGNET([.P$24]+[.$BB107])+[.Q$30]*[.$Z$5]*MAGNET([.Q$24]+[.$BB107])+[.R$30]*[.$Z$5]*MAGNET([.R$24]+[.$BB107])+[.S$30]*[.$Z$5]*MAGNET([.S$24]+[.$BB107])+[.T$30]*[.$Z$5]*MAGNET([.T$24]+[.$BB107])+[.U$30]*[.$Z$5]*MAGNET([.U$24]+[.$BB107])+[.V$30]*[.$Z$5]*MAGNET([.V$24]+[.$BB107])+[.W$30]*[.$Z$5]*MAGNET([.W$24]+[.$BB107])+[.X$30]*[.$Z$5]*MAGNET([.X$24]+[.$BB107])+[.Y$30]*[.$Z$5]*MAGNET([.Y$24]+[.$BB107])+[.Z$30]*[.$Z$5]*MAGNET([.Z$24]+[.$BB107])+[.AA$30]*[.$Z$5]*MAGNET([.AA$24]+[.$BB107])+[.AB$30]*[.$Z$5]*MAGNET([.AB$24]+[.$BB107])+[.AC$30]*[.$Z$5]*MAGNET([.AC$24]+[.$BB107])+[.AD$30]*[.$Z$5]*MAGNET([.AD$24]+[.$BB107])+[.AE$30]*[.$Z$5]*MAGNET([.AE$24]+[.$BB107])+[.AF$30]*[.$Z$5]*MAGNET([.AF$24]+[.$BB107])+[.AG$30]*[.$Z$5]*MAGNET([.AG$24]+[.$BB107])+[.D$30]*[.$Z$5]*MAGNET([.D$24]+[.$BB107])+[.AH$30]*[.$Z$5]*MAGNET([.AH$24]+[.BB107]) +[.AI$30]*[.$Z$5]*MAGNET([.AI$24]+[.BB107]) +[.AJ$30]*[.$Z$5]*MAGNET([.AJ$24]+[.BB107]) +[.AK$30]*[.$Z$5]*MAGNET([.AK$24]+[.BB107]) +[.AL$30]*[.$Z$5]*MAGNET([.AL$24]+[.BB107]) +[.AM$30]*[.$Z$5]*MAGNET([.AM$24]+[.BB107]) +[.AN$30]*[.$Z$5]*MAGNET([.AN$24]+[.BB107]) +[.AO$30]*[.$Z$5]*MAGNET([.AO$24]+[.BB107]) +[.AP$30]*[.$Z$5]*MAGNET([.AP$24]+[.$BB107])&#10;+[.AQ$30]*[.$Z$5]*MAGNET([.AQ$24]+[.$BB107])&#10;+[.AR$30]*[.$Z$5]*MAGNET([.AR$24]+[.$BB107])&#10;+[.AS$30]*[.$Z$5]*MAGNET([.AS$24]+[.$BB107])&#10;+[.AT$30]*[.$Z$5]*MAGNET([.AT$24]+[.$BB107])&#10;+[.AU$30]*[.$Z$5]*MAGNET([.AU$24]+[.$BB107])&#10;+[.AV$30]*[.$Z$5]*MAGNET([.AV$24]+[.$BB107])&#10;+[.AW$30]*[.$Z$5]*MAGNET([.AW$24]+[.$BB107])&#10;+[.AX$30]*[.$Z$5]*MAGNET([.AX$24]+[.$BB107])&#10;+[.AY$30]*[.$Z$5]*MAGNET([.AY$24]+[.$BB107]) +RAND()*[.$BH$13]" office:value-type="float" office:value="0" calcext:value-type="float">
            <text:p>0</text:p>
          </table:table-cell>
          <table:table-cell table:style-name="ce71" table:formula="of:=[.E$31]*[.$Z$5]*MAGNET([.E$24]+[.$BB107])+[.F$31]*[.$Z$5]*MAGNET([.F$24]+[.$BB107])+[.G$31]*[.$Z$5]*MAGNET([.G$24]+[.$BB107])+[.H$31]*[.$Z$5]*MAGNET([.H$24]+[.$BB107])+[.I$31]*[.$Z$5]*MAGNET([.I$24]+[.$BB107])+[.J$31]*[.$Z$5]*MAGNET([.J$24]+[.$BB107])+[.K$31]*[.$Z$5]*MAGNET([.K$24]+[.$BB107])+[.L$31]*[.$Z$5]*MAGNET([.L$24]+[.$BB107])+[.M$31]*[.$Z$5]*MAGNET([.M$24]+[.$BB107])+[.N$31]*[.$Z$5]*MAGNET([.N$24]+[.$BB107])+[.O$31]*[.$Z$5]*MAGNET([.O$24]+[.$BB107])+[.P$31]*[.$Z$5]*MAGNET([.P$24]+[.$BB107])+[.Q$31]*[.$Z$5]*MAGNET([.Q$24]+[.$BB107])+[.R$31]*[.$Z$5]*MAGNET([.R$24]+[.$BB107])+[.S$31]*[.$Z$5]*MAGNET([.S$24]+[.$BB107])+[.T$31]*[.$Z$5]*MAGNET([.T$24]+[.$BB107])+[.U$31]*[.$Z$5]*MAGNET([.U$24]+[.$BB107])+[.V$31]*[.$Z$5]*MAGNET([.V$24]+[.$BB107])+[.W$31]*[.$Z$5]*MAGNET([.W$24]+[.$BB107])+[.X$31]*[.$Z$5]*MAGNET([.X$24]+[.$BB107])+[.Y$31]*[.$Z$5]*MAGNET([.Y$24]+[.$BB107])+[.Z$31]*[.$Z$5]*MAGNET([.Z$24]+[.$BB107])+[.AA$31]*[.$Z$5]*MAGNET([.AA$24]+[.$BB107])+[.AB$31]*[.$Z$5]*MAGNET([.AB$24]+[.$BB107])+[.AC$31]*[.$Z$5]*MAGNET([.AC$24]+[.$BB107])+[.AD$31]*[.$Z$5]*MAGNET([.AD$24]+[.$BB107])+[.AE$31]*[.$Z$5]*MAGNET([.AE$24]+[.$BB107])+[.AF$31]*[.$Z$5]*MAGNET([.AF$24]+[.$BB107])+[.AG$31]*[.$Z$5]*MAGNET([.AG$24]+[.$BB107])+[.D$31]*[.$Z$5]*MAGNET([.D$24]+[.$BB107])+[.AH$31]*[.$Z$5]*MAGNET([.AH$24]+[.BB107]) +[.AI$31]*[.$Z$5]*MAGNET([.AI$24]+[.BB107]) +[.AJ$31]*[.$Z$5]*MAGNET([.AJ$24]+[.BB107]) +[.AK$31]*[.$Z$5]*MAGNET([.AK$24]+[.BB107]) +[.AL$31]*[.$Z$5]*MAGNET([.AL$24]+[.BB107]) +[.AM$31]*[.$Z$5]*MAGNET([.AM$24]+[.BB107]) +[.AN$31]*[.$Z$5]*MAGNET([.AN$24]+[.BB107]) +[.AO$31]*[.$Z$5]*MAGNET([.AO$24]+[.BB107]) +[.AP$31]*[.$Z$5]*MAGNET([.AP$24]+[.$BB107])&#10;+[.AQ$31]*[.$Z$5]*MAGNET([.AQ$24]+[.$BB107])&#10;+[.AR$31]*[.$Z$5]*MAGNET([.AR$24]+[.$BB107])&#10;+[.AS$31]*[.$Z$5]*MAGNET([.AS$24]+[.$BB107])&#10;+[.AT$31]*[.$Z$5]*MAGNET([.AT$24]+[.$BB107])&#10;+[.AU$31]*[.$Z$5]*MAGNET([.AU$24]+[.$BB107])&#10;+[.AV$31]*[.$Z$5]*MAGNET([.AV$24]+[.$BB107])&#10;+[.AW$31]*[.$Z$5]*MAGNET([.AW$24]+[.$BB107])&#10;+[.AX$31]*[.$Z$5]*MAGNET([.AX$24]+[.$BB107])&#10;+[.AY$31]*[.$Z$5]*MAGNET([.AY$24]+[.$BB107]) +RAND()*[.$BI$13]" office:value-type="float" office:value="0" calcext:value-type="float">
            <text:p>0</text:p>
          </table:table-cell>
          <table:table-cell table:style-name="ce71" table:formula="of:=[.E$32]*[.$Z$5]*MAGNET([.E$24]+[.$BB107])+[.F$32]*[.$Z$5]*MAGNET([.F$24]+[.$BB107])+[.G$32]*[.$Z$5]*MAGNET([.G$24]+[.$BB107])+[.H$32]*[.$Z$5]*MAGNET([.H$24]+[.$BB107])+[.I$32]*[.$Z$5]*MAGNET([.I$24]+[.$BB107])+[.J$32]*[.$Z$5]*MAGNET([.J$24]+[.$BB107])+[.K$32]*[.$Z$5]*MAGNET([.K$24]+[.$BB107])+[.L$32]*[.$Z$5]*MAGNET([.L$24]+[.$BB107])+[.M$32]*[.$Z$5]*MAGNET([.M$24]+[.$BB107])+[.N$32]*[.$Z$5]*MAGNET([.N$24]+[.$BB107])+[.O$32]*[.$Z$5]*MAGNET([.O$24]+[.$BB107])+[.P$32]*[.$Z$5]*MAGNET([.P$24]+[.$BB107])+[.Q$32]*[.$Z$5]*MAGNET([.Q$24]+[.$BB107])+[.R$32]*[.$Z$5]*MAGNET([.R$24]+[.$BB107])+[.S$32]*[.$Z$5]*MAGNET([.S$24]+[.$BB107])+[.T$32]*[.$Z$5]*MAGNET([.T$24]+[.$BB107])+[.U$32]*[.$Z$5]*MAGNET([.U$24]+[.$BB107])+[.V$32]*[.$Z$5]*MAGNET([.V$24]+[.$BB107])+[.W$32]*[.$Z$5]*MAGNET([.W$24]+[.$BB107])+[.X$32]*[.$Z$5]*MAGNET([.X$24]+[.$BB107])+[.Y$32]*[.$Z$5]*MAGNET([.Y$24]+[.$BB107])+[.Z$32]*[.$Z$5]*MAGNET([.Z$24]+[.$BB107])+[.AA$32]*[.$Z$5]*MAGNET([.AA$24]+[.$BB107])+[.AB$32]*[.$Z$5]*MAGNET([.AB$24]+[.$BB107])+[.AC$32]*[.$Z$5]*MAGNET([.AC$24]+[.$BB107])+[.AD$32]*[.$Z$5]*MAGNET([.AD$24]+[.$BB107])+[.AE$32]*[.$Z$5]*MAGNET([.AE$24]+[.$BB107])+[.AF$32]*[.$Z$5]*MAGNET([.AF$24]+[.$BB107])+[.AG$32]*[.$Z$5]*MAGNET([.AG$24]+[.$BB107])+[.D$32]*[.$Z$5]*MAGNET([.D$24]+[.$BB107])+[.AH$32]*[.$Z$5]*MAGNET([.AH$24]+[.BB107]) +[.AI$32]*[.$Z$5]*MAGNET([.AI$24]+[.BB107]) +[.AJ$32]*[.$Z$5]*MAGNET([.AJ$24]+[.BB107]) +[.AK$32]*[.$Z$5]*MAGNET([.AK$24]+[.BB107]) +[.AL$32]*[.$Z$5]*MAGNET([.AL$24]+[.BB107]) +[.AM$32]*[.$Z$5]*MAGNET([.AM$24]+[.BB107]) +[.AN$32]*[.$Z$5]*MAGNET([.AN$24]+[.BB107]) +[.AO$32]*[.$Z$5]*MAGNET([.AO$24]+[.BB107]) +[.AP$32]*[.$Z$5]*MAGNET([.AP$24]+[.$BB107])&#10;+[.AQ$32]*[.$Z$5]*MAGNET([.AQ$24]+[.$BB107])&#10;+[.AR$32]*[.$Z$5]*MAGNET([.AR$24]+[.$BB107])&#10;+[.AS$32]*[.$Z$5]*MAGNET([.AS$24]+[.$BB107])&#10;+[.AT$32]*[.$Z$5]*MAGNET([.AT$24]+[.$BB107])&#10;+[.AU$32]*[.$Z$5]*MAGNET([.AU$24]+[.$BB107])&#10;+[.AV$32]*[.$Z$5]*MAGNET([.AV$24]+[.$BB107])&#10;+[.AW$32]*[.$Z$5]*MAGNET([.AW$24]+[.$BB107])&#10;+[.AX$32]*[.$Z$5]*MAGNET([.AX$24]+[.$BB107])&#10;+[.AY$32]*[.$Z$5]*MAGNET([.AY$24]+[.$BB107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7]+0.002" office:value-type="float" office:value="0.186" calcext:value-type="float">
            <text:p>0.186</text:p>
          </table:table-cell>
          <table:table-cell table:formula="of:=[.BA108]*[.$D$6]" office:value-type="float" office:value="9.34937973708323" calcext:value-type="float">
            <text:p>9.349</text:p>
          </table:table-cell>
          <table:table-cell table:formula="of:=[.D$25]*[.$Z$5]*MAGNET([.D$24]+[.BB108])+[.E$25]*[.$Z$5]*MAGNET([.E$24]+[.BB108])+[.F$25]*[.$Z$5]*MAGNET([.F$24]+[.BB108])+[.G$25]*[.$Z$5]*MAGNET([.G$24]+[.BB108])+[.H$25]*[.$Z$5]*MAGNET([.H$24]+[.BB108])+[.I$25]*[.$Z$5]*MAGNET([.I$24]+[.BB108])+[.J$25]*[.$Z$5]*MAGNET([.J$24]+[.BB108])+[.K$25]*[.$Z$5]*MAGNET([.K$24]+[.BB108])+[.L$25]*[.$Z$5]*MAGNET([.L$24]+[.BB108])+[.M$25]*[.$Z$5]*MAGNET([.M$24]+[.BB108])+[.N$25]*[.$Z$5]*MAGNET([.N$24]+[.BB108])+[.O$25]*[.$Z$5]*MAGNET([.O$24]+[.BB108])+[.P$25]*[.$Z$5]*MAGNET([.P$24]+[.BB108])+[.Q$25]*[.$Z$5]*MAGNET([.Q$24]+[.BB108])+[.R$25]*[.$Z$5]*MAGNET([.R$24]+[.BB108])+[.S$25]*[.$Z$5]*MAGNET([.S$24]+[.BB108])+[.T$25]*[.$Z$5]*MAGNET([.T$24]+[.BB108])+[.U$25]*[.$Z$5]*MAGNET([.U$24]+[.BB108])+[.V$25]*[.$Z$5]*MAGNET([.V$24]+[.BB108])+[.W$25]*[.$Z$5]*MAGNET([.W$24]+[.BB108])+[.X$25]*[.$Z$5]*MAGNET([.X$24]+[.BB108])+[.Y$25]*[.$Z$5]*MAGNET([.Y$24]+[.BB108])+[.Z$25]*[.$Z$5]*MAGNET([.Z$24]+[.BB108])+[.AA$25]*[.$Z$5]*MAGNET([.AA$24]+[.BB108])+[.AB$25]*[.$Z$5]*MAGNET([.AB$24]+[.BB108])+[.AC$25]*[.$Z$5]*MAGNET([.AC$24]+[.BB108])+[.AD$25]*[.$Z$5]*MAGNET([.AD$24]+[.BB108])+[.AE$25]*[.$Z$5]*MAGNET([.AE$24]+[.BB108])+[.AF$25]*[.$Z$5]*MAGNET([.AF$24]+[.BB108])+[.AG$25]*[.$Z$5]*MAGNET([.AG$24]+[.BB108])+[.AH$25]*[.$Z$5]*MAGNET([.AH$24]+[.BB108]) +[.AI$25]*[.$Z$5]*MAGNET([.AI$24]+[.BB108]) +[.AJ$25]*[.$Z$5]*MAGNET([.AJ$24]+[.BB108]) +[.AK$25]*[.$Z$5]*MAGNET([.AK$24]+[.BB108]) +[.AL$25]*[.$Z$5]*MAGNET([.AL$24]+[.BB108]) +[.AM$25]*[.$Z$5]*MAGNET([.AM$24]+[.BB108]) +[.AN$25]*[.$Z$5]*MAGNET([.AN$24]+[.BB108]) +[.AO$25]*[.$Z$5]*MAGNET([.AO$24]+[.BB108])+RAND()*[.$BC$13]+[.AP$25]*[.$Z$5]*MAGNET([.AP$24]+[.BB108])&#10;+[.AQ$25]*[.$Z$5]*MAGNET([.AQ$24]+[.BB108])&#10;+[.AR$25]*[.$Z$5]*MAGNET([.AR$24]+[.BB108])&#10;+[.AS$25]*[.$Z$5]*MAGNET([.AS$24]+[.BB108])&#10;+[.AT$25]*[.$Z$5]*MAGNET([.AT$24]+[.BB108])&#10;+[.AU$25]*[.$Z$5]*MAGNET([.AU$24]+[.BB108])&#10;+[.AV$25]*[.$Z$5]*MAGNET([.AV$24]+[.BB108])&#10;+[.AW$25]*[.$Z$5]*MAGNET([.AW$24]+[.BB108])&#10;+[.AX$25]*[.$Z$5]*MAGNET([.AX$24]+[.BB108])&#10;+[.AY$25]*[.$Z$5]*MAGNET([.AY$24]+[.BB108])" office:value-type="float" office:value="58.7781763207485" calcext:value-type="float">
            <text:p>58.78</text:p>
          </table:table-cell>
          <table:table-cell table:style-name="ce70" table:formula="of:=[.E$26]*[.$Z$5]*MAGNET([.E$24]+[.$BB108])+[.F$26]*[.$Z$5]*MAGNET([.F$24]+[.$BB108])+[.G$26]*[.$Z$5]*MAGNET([.G$24]+[.$BB108])+[.H$26]*[.$Z$5]*MAGNET([.H$24]+[.$BB108])+[.I$26]*[.$Z$5]*MAGNET([.I$24]+[.$BB108])+[.J$26]*[.$Z$5]*MAGNET([.J$24]+[.$BB108])+[.K$26]*[.$Z$5]*MAGNET([.K$24]+[.$BB108])+[.L$26]*[.$Z$5]*MAGNET([.L$24]+[.$BB108])+[.M$26]*[.$Z$5]*MAGNET([.M$24]+[.$BB108])+[.N$26]*[.$Z$5]*MAGNET([.N$24]+[.$BB108])+[.O$26]*[.$Z$5]*MAGNET([.O$24]+[.$BB108])+[.P$26]*[.$Z$5]*MAGNET([.P$24]+[.$BB108])+[.Q$26]*[.$Z$5]*MAGNET([.Q$24]+[.$BB108])+[.R$26]*[.$Z$5]*MAGNET([.R$24]+[.$BB108])+[.S$26]*[.$Z$5]*MAGNET([.S$24]+[.$BB108])+[.T$26]*[.$Z$5]*MAGNET([.T$24]+[.$BB108])+[.U$26]*[.$Z$5]*MAGNET([.U$24]+[.$BB108])+[.V$26]*[.$Z$5]*MAGNET([.V$24]+[.$BB108])+[.W$26]*[.$Z$5]*MAGNET([.W$24]+[.$BB108])+[.X$26]*[.$Z$5]*MAGNET([.X$24]+[.$BB108])+[.Y$26]*[.$Z$5]*MAGNET([.Y$24]+[.$BB108])+[.Z$26]*[.$Z$5]*MAGNET([.Z$24]+[.$BB108])+[.AA$26]*[.$Z$5]*MAGNET([.AA$24]+[.$BB108])+[.AB$26]*[.$Z$5]*MAGNET([.AB$24]+[.$BB108])+[.AC$26]*[.$Z$5]*MAGNET([.AC$24]+[.$BB108])+[.AD$26]*[.$Z$5]*MAGNET([.AD$24]+[.$BB108])+[.AE$26]*[.$Z$5]*MAGNET([.AE$24]+[.$BB108])+[.AF$26]*[.$Z$5]*MAGNET([.AF$24]+[.$BB108])+[.AG$26]*[.$Z$5]*MAGNET([.AG$24]+[.$BB108])+[.D$26]*[.$Z$5]*MAGNET([.D$24]+[.$BB108])+[.AH$26]*[.$Z$5]*MAGNET([.AH$24]+[.BB108]) +[.AI$26]*[.$Z$5]*MAGNET([.AI$24]+[.BB108]) +[.AJ$26]*[.$Z$5]*MAGNET([.AJ$24]+[.BB108]) +[.AK$26]*[.$Z$5]*MAGNET([.AK$24]+[.BB108]) +[.AL$26]*[.$Z$5]*MAGNET([.AL$24]+[.BB108]) +[.AM$26]*[.$Z$5]*MAGNET([.AM$24]+[.BB108]) +[.AN$26]*[.$Z$5]*MAGNET([.AN$24]+[.BB108]) +[.AO$26]*[.$Z$5]*MAGNET([.AO$24]+[.BB108]) +[.AP$26]*[.$Z$5]*MAGNET([.AP$24]+[.$BB108])&#10;+[.AQ$26]*[.$Z$5]*MAGNET([.AQ$24]+[.$BB108])&#10;+[.AR$26]*[.$Z$5]*MAGNET([.AR$24]+[.$BB108])&#10;+[.AS$26]*[.$Z$5]*MAGNET([.AS$24]+[.$BB108])&#10;+[.AT$26]*[.$Z$5]*MAGNET([.AT$24]+[.$BB108])&#10;+[.AU$26]*[.$Z$5]*MAGNET([.AU$24]+[.$BB108])&#10;+[.AV$26]*[.$Z$5]*MAGNET([.AV$24]+[.$BB108])&#10;+[.AW$26]*[.$Z$5]*MAGNET([.AW$24]+[.$BB108])&#10;+[.AX$26]*[.$Z$5]*MAGNET([.AX$24]+[.$BB108])&#10;+[.AY$26]*[.$Z$5]*MAGNET([.AY$24]+[.$BB108]) +RAND()*[.$BD$13]" office:value-type="float" office:value="-86.5747732992659" calcext:value-type="float">
            <text:p>-86.57</text:p>
          </table:table-cell>
          <table:table-cell table:style-name="ce71" table:formula="of:=[.E$27]*[.$Z$5]*MAGNET([.E$24]+[.$BB108])+[.F$27]*[.$Z$5]*MAGNET([.F$24]+[.$BB108])+[.G$27]*[.$Z$5]*MAGNET([.G$24]+[.$BB108])+[.H$27]*[.$Z$5]*MAGNET([.H$24]+[.$BB108])+[.I$27]*[.$Z$5]*MAGNET([.I$24]+[.$BB108])+[.J$27]*[.$Z$5]*MAGNET([.J$24]+[.$BB108])+[.K$27]*[.$Z$5]*MAGNET([.K$24]+[.$BB108])+[.L$27]*[.$Z$5]*MAGNET([.L$24]+[.$BB108])+[.M$27]*[.$Z$5]*MAGNET([.M$24]+[.$BB108])+[.N$27]*[.$Z$5]*MAGNET([.N$24]+[.$BB108])+[.O$27]*[.$Z$5]*MAGNET([.O$24]+[.$BB108])+[.P$27]*[.$Z$5]*MAGNET([.P$24]+[.$BB108])+[.Q$27]*[.$Z$5]*MAGNET([.Q$24]+[.$BB108])+[.R$27]*[.$Z$5]*MAGNET([.R$24]+[.$BB108])+[.S$27]*[.$Z$5]*MAGNET([.S$24]+[.$BB108])+[.T$27]*[.$Z$5]*MAGNET([.T$24]+[.$BB108])+[.U$27]*[.$Z$5]*MAGNET([.U$24]+[.$BB108])+[.V$27]*[.$Z$5]*MAGNET([.V$24]+[.$BB108])+[.W$27]*[.$Z$5]*MAGNET([.W$24]+[.$BB108])+[.X$27]*[.$Z$5]*MAGNET([.X$24]+[.$BB108])+[.Y$27]*[.$Z$5]*MAGNET([.Y$24]+[.$BB108])+[.Z$27]*[.$Z$5]*MAGNET([.Z$24]+[.$BB108])+[.AA$27]*[.$Z$5]*MAGNET([.AA$24]+[.$BB108])+[.AB$27]*[.$Z$5]*MAGNET([.AB$24]+[.$BB108])+[.AC$27]*[.$Z$5]*MAGNET([.AC$24]+[.$BB108])+[.AD$27]*[.$Z$5]*MAGNET([.AD$24]+[.$BB108])+[.AE$27]*[.$Z$5]*MAGNET([.AE$24]+[.$BB108])+[.AF$27]*[.$Z$5]*MAGNET([.AF$24]+[.$BB108])+[.AG$27]*[.$Z$5]*MAGNET([.AG$24]+[.$BB108])+[.D$27]*[.$Z$5]*MAGNET([.D$24]+[.$BB108])+[.AH$27]*[.$Z$5]*MAGNET([.AH$24]+[.BB108]) +[.AI$27]*[.$Z$5]*MAGNET([.AI$24]+[.BB108]) +[.AJ$27]*[.$Z$5]*MAGNET([.AJ$24]+[.BB108]) +[.AK$27]*[.$Z$5]*MAGNET([.AK$24]+[.BB108]) +[.AL$27]*[.$Z$5]*MAGNET([.AL$24]+[.BB108]) +[.AM$27]*[.$Z$5]*MAGNET([.AM$24]+[.BB108]) +[.AN$27]*[.$Z$5]*MAGNET([.AN$24]+[.BB108]) +[.AO$27]*[.$Z$5]*MAGNET([.AO$24]+[.BB108]) +[.AP$27]*[.$Z$5]*MAGNET([.AP$24]+[.$BB108])&#10;+[.AQ$27]*[.$Z$5]*MAGNET([.AQ$24]+[.$BB108])&#10;+[.AR$27]*[.$Z$5]*MAGNET([.AR$24]+[.$BB108])&#10;+[.AS$27]*[.$Z$5]*MAGNET([.AS$24]+[.$BB108])&#10;+[.AT$27]*[.$Z$5]*MAGNET([.AT$24]+[.$BB108])&#10;+[.AU$27]*[.$Z$5]*MAGNET([.AU$24]+[.$BB108])&#10;+[.AV$27]*[.$Z$5]*MAGNET([.AV$24]+[.$BB108])&#10;+[.AW$27]*[.$Z$5]*MAGNET([.AW$24]+[.$BB108])&#10;+[.AX$27]*[.$Z$5]*MAGNET([.AX$24]+[.$BB108])&#10;+[.AY$27]*[.$Z$5]*MAGNET([.AY$24]+[.$BB108]) +RAND()*[.$BE$13]" office:value-type="float" office:value="59.8980180546352" calcext:value-type="float">
            <text:p>59.8980180546352</text:p>
          </table:table-cell>
          <table:table-cell table:style-name="ce71" table:formula="of:=[.E$28]*[.$Z$5]*MAGNET([.E$24]+[.$BB108])+[.F$28]*[.$Z$5]*MAGNET([.F$24]+[.$BB108])+[.G$28]*[.$Z$5]*MAGNET([.G$24]+[.$BB108])+[.H$28]*[.$Z$5]*MAGNET([.H$24]+[.$BB108])+[.I$28]*[.$Z$5]*MAGNET([.I$24]+[.$BB108])+[.J$28]*[.$Z$5]*MAGNET([.J$24]+[.$BB108])+[.K$28]*[.$Z$5]*MAGNET([.K$24]+[.$BB108])+[.L$28]*[.$Z$5]*MAGNET([.L$24]+[.$BB108])+[.M$28]*[.$Z$5]*MAGNET([.M$24]+[.$BB108])+[.N$28]*[.$Z$5]*MAGNET([.N$24]+[.$BB108])+[.O$28]*[.$Z$5]*MAGNET([.O$24]+[.$BB108])+[.P$28]*[.$Z$5]*MAGNET([.P$24]+[.$BB108])+[.Q$28]*[.$Z$5]*MAGNET([.Q$24]+[.$BB108])+[.R$28]*[.$Z$5]*MAGNET([.R$24]+[.$BB108])+[.S$28]*[.$Z$5]*MAGNET([.S$24]+[.$BB108])+[.T$28]*[.$Z$5]*MAGNET([.T$24]+[.$BB108])+[.U$28]*[.$Z$5]*MAGNET([.U$24]+[.$BB108])+[.V$28]*[.$Z$5]*MAGNET([.V$24]+[.$BB108])+[.W$28]*[.$Z$5]*MAGNET([.W$24]+[.$BB108])+[.X$28]*[.$Z$5]*MAGNET([.X$24]+[.$BB108])+[.Y$28]*[.$Z$5]*MAGNET([.Y$24]+[.$BB108])+[.Z$28]*[.$Z$5]*MAGNET([.Z$24]+[.$BB108])+[.AA$28]*[.$Z$5]*MAGNET([.AA$24]+[.$BB108])+[.AB$28]*[.$Z$5]*MAGNET([.AB$24]+[.$BB108])+[.AC$28]*[.$Z$5]*MAGNET([.AC$24]+[.$BB108])+[.AD$28]*[.$Z$5]*MAGNET([.AD$24]+[.$BB108])+[.AE$28]*[.$Z$5]*MAGNET([.AE$24]+[.$BB108])+[.AF$28]*[.$Z$5]*MAGNET([.AF$24]+[.$BB108])+[.AG$28]*[.$Z$5]*MAGNET([.AG$24]+[.$BB108])+[.D$28]*[.$Z$5]*MAGNET([.D$24]+[.$BB108])+[.AH$28]*[.$Z$5]*MAGNET([.AH$24]+[.BB108]) +[.AI$28]*[.$Z$5]*MAGNET([.AI$24]+[.BB108]) +[.AJ$28]*[.$Z$5]*MAGNET([.AJ$24]+[.BB108]) +[.AK$28]*[.$Z$5]*MAGNET([.AK$24]+[.BB108]) +[.AL$28]*[.$Z$5]*MAGNET([.AL$24]+[.BB108]) +[.AM$28]*[.$Z$5]*MAGNET([.AM$24]+[.BB108]) +[.AN$28]*[.$Z$5]*MAGNET([.AN$24]+[.BB108]) +[.AO$28]*[.$Z$5]*MAGNET([.AO$24]+[.BB108]) +[.AP$28]*[.$Z$5]*MAGNET([.AP$24]+[.$BB108])&#10;+[.AQ$28]*[.$Z$5]*MAGNET([.AQ$24]+[.$BB108])&#10;+[.AR$28]*[.$Z$5]*MAGNET([.AR$24]+[.$BB108])&#10;+[.AS$28]*[.$Z$5]*MAGNET([.AS$24]+[.$BB108])&#10;+[.AT$28]*[.$Z$5]*MAGNET([.AT$24]+[.$BB108])&#10;+[.AU$28]*[.$Z$5]*MAGNET([.AU$24]+[.$BB108])&#10;+[.AV$28]*[.$Z$5]*MAGNET([.AV$24]+[.$BB108])&#10;+[.AW$28]*[.$Z$5]*MAGNET([.AW$24]+[.$BB108])&#10;+[.AX$28]*[.$Z$5]*MAGNET([.AX$24]+[.$BB108])&#10;+[.AY$28]*[.$Z$5]*MAGNET([.AY$24]+[.$BB108]) +RAND()*[.$BF$13]" office:value-type="float" office:value="6.68608178984006" calcext:value-type="float">
            <text:p>6.68608178984006</text:p>
          </table:table-cell>
          <table:table-cell table:style-name="ce71" table:formula="of:=[.E$29]*[.$Z$5]*MAGNET([.E$24]+[.$BB108])+[.F$29]*[.$Z$5]*MAGNET([.F$24]+[.$BB108])+[.G$29]*[.$Z$5]*MAGNET([.G$24]+[.$BB108])+[.H$29]*[.$Z$5]*MAGNET([.H$24]+[.$BB108])+[.I$29]*[.$Z$5]*MAGNET([.I$24]+[.$BB108])+[.J$29]*[.$Z$5]*MAGNET([.J$24]+[.$BB108])+[.K$29]*[.$Z$5]*MAGNET([.K$24]+[.$BB108])+[.L$29]*[.$Z$5]*MAGNET([.L$24]+[.$BB108])+[.M$29]*[.$Z$5]*MAGNET([.M$24]+[.$BB108])+[.N$29]*[.$Z$5]*MAGNET([.N$24]+[.$BB108])+[.O$29]*[.$Z$5]*MAGNET([.O$24]+[.$BB108])+[.P$29]*[.$Z$5]*MAGNET([.P$24]+[.$BB108])+[.Q$29]*[.$Z$5]*MAGNET([.Q$24]+[.$BB108])+[.R$29]*[.$Z$5]*MAGNET([.R$24]+[.$BB108])+[.S$29]*[.$Z$5]*MAGNET([.S$24]+[.$BB108])+[.T$29]*[.$Z$5]*MAGNET([.T$24]+[.$BB108])+[.U$29]*[.$Z$5]*MAGNET([.U$24]+[.$BB108])+[.V$29]*[.$Z$5]*MAGNET([.V$24]+[.$BB108])+[.W$29]*[.$Z$5]*MAGNET([.W$24]+[.$BB108])+[.X$29]*[.$Z$5]*MAGNET([.X$24]+[.$BB108])+[.Y$29]*[.$Z$5]*MAGNET([.Y$24]+[.$BB108])+[.Z$29]*[.$Z$5]*MAGNET([.Z$24]+[.$BB108])+[.AA$29]*[.$Z$5]*MAGNET([.AA$24]+[.$BB108])+[.AB$29]*[.$Z$5]*MAGNET([.AB$24]+[.$BB108])+[.AC$29]*[.$Z$5]*MAGNET([.AC$24]+[.$BB108])+[.AD$29]*[.$Z$5]*MAGNET([.AD$24]+[.$BB108])+[.AE$29]*[.$Z$5]*MAGNET([.AE$24]+[.$BB108])+[.AF$29]*[.$Z$5]*MAGNET([.AF$24]+[.$BB108])+[.AG$29]*[.$Z$5]*MAGNET([.AG$24]+[.$BB108])+[.D$29]*[.$Z$5]*MAGNET([.D$24]+[.$BB108])+[.AH$29]*[.$Z$5]*MAGNET([.AH$24]+[.BB108]) +[.AI$29]*[.$Z$5]*MAGNET([.AI$24]+[.BB108]) +[.AJ$29]*[.$Z$5]*MAGNET([.AJ$24]+[.BB108]) +[.AK$29]*[.$Z$5]*MAGNET([.AK$24]+[.BB108]) +[.AL$29]*[.$Z$5]*MAGNET([.AL$24]+[.BB108]) +[.AM$29]*[.$Z$5]*MAGNET([.AM$24]+[.BB108]) +[.AN$29]*[.$Z$5]*MAGNET([.AN$24]+[.BB108]) +[.AO$29]*[.$Z$5]*MAGNET([.AO$24]+[.BB108]) +[.AP$29]*[.$Z$5]*MAGNET([.AP$24]+[.$BB108])&#10;+[.AQ$29]*[.$Z$5]*MAGNET([.AQ$24]+[.$BB108])&#10;+[.AR$29]*[.$Z$5]*MAGNET([.AR$24]+[.$BB108])&#10;+[.AS$29]*[.$Z$5]*MAGNET([.AS$24]+[.$BB108])&#10;+[.AT$29]*[.$Z$5]*MAGNET([.AT$24]+[.$BB108])&#10;+[.AU$29]*[.$Z$5]*MAGNET([.AU$24]+[.$BB108])&#10;+[.AV$29]*[.$Z$5]*MAGNET([.AV$24]+[.$BB108])&#10;+[.AW$29]*[.$Z$5]*MAGNET([.AW$24]+[.$BB108])&#10;+[.AX$29]*[.$Z$5]*MAGNET([.AX$24]+[.$BB108])&#10;+[.AY$29]*[.$Z$5]*MAGNET([.AY$24]+[.$BB108]) +RAND()*[.$BG$13]" office:value-type="float" office:value="-25.8078169249236" calcext:value-type="float">
            <text:p>-25.8078169249236</text:p>
          </table:table-cell>
          <table:table-cell table:style-name="ce71" table:formula="of:=[.E$30]*[.$Z$5]*MAGNET([.E$24]+[.$BB108])+[.F$30]*[.$Z$5]*MAGNET([.F$24]+[.$BB108])+[.G$30]*[.$Z$5]*MAGNET([.G$24]+[.$BB108])+[.H$30]*[.$Z$5]*MAGNET([.H$24]+[.$BB108])+[.I$30]*[.$Z$5]*MAGNET([.I$24]+[.$BB108])+[.J$30]*[.$Z$5]*MAGNET([.J$24]+[.$BB108])+[.K$30]*[.$Z$5]*MAGNET([.K$24]+[.$BB108])+[.L$30]*[.$Z$5]*MAGNET([.L$24]+[.$BB108])+[.M$30]*[.$Z$5]*MAGNET([.M$24]+[.$BB108])+[.N$30]*[.$Z$5]*MAGNET([.N$24]+[.$BB108])+[.O$30]*[.$Z$5]*MAGNET([.O$24]+[.$BB108])+[.P$30]*[.$Z$5]*MAGNET([.P$24]+[.$BB108])+[.Q$30]*[.$Z$5]*MAGNET([.Q$24]+[.$BB108])+[.R$30]*[.$Z$5]*MAGNET([.R$24]+[.$BB108])+[.S$30]*[.$Z$5]*MAGNET([.S$24]+[.$BB108])+[.T$30]*[.$Z$5]*MAGNET([.T$24]+[.$BB108])+[.U$30]*[.$Z$5]*MAGNET([.U$24]+[.$BB108])+[.V$30]*[.$Z$5]*MAGNET([.V$24]+[.$BB108])+[.W$30]*[.$Z$5]*MAGNET([.W$24]+[.$BB108])+[.X$30]*[.$Z$5]*MAGNET([.X$24]+[.$BB108])+[.Y$30]*[.$Z$5]*MAGNET([.Y$24]+[.$BB108])+[.Z$30]*[.$Z$5]*MAGNET([.Z$24]+[.$BB108])+[.AA$30]*[.$Z$5]*MAGNET([.AA$24]+[.$BB108])+[.AB$30]*[.$Z$5]*MAGNET([.AB$24]+[.$BB108])+[.AC$30]*[.$Z$5]*MAGNET([.AC$24]+[.$BB108])+[.AD$30]*[.$Z$5]*MAGNET([.AD$24]+[.$BB108])+[.AE$30]*[.$Z$5]*MAGNET([.AE$24]+[.$BB108])+[.AF$30]*[.$Z$5]*MAGNET([.AF$24]+[.$BB108])+[.AG$30]*[.$Z$5]*MAGNET([.AG$24]+[.$BB108])+[.D$30]*[.$Z$5]*MAGNET([.D$24]+[.$BB108])+[.AH$30]*[.$Z$5]*MAGNET([.AH$24]+[.BB108]) +[.AI$30]*[.$Z$5]*MAGNET([.AI$24]+[.BB108]) +[.AJ$30]*[.$Z$5]*MAGNET([.AJ$24]+[.BB108]) +[.AK$30]*[.$Z$5]*MAGNET([.AK$24]+[.BB108]) +[.AL$30]*[.$Z$5]*MAGNET([.AL$24]+[.BB108]) +[.AM$30]*[.$Z$5]*MAGNET([.AM$24]+[.BB108]) +[.AN$30]*[.$Z$5]*MAGNET([.AN$24]+[.BB108]) +[.AO$30]*[.$Z$5]*MAGNET([.AO$24]+[.BB108]) +[.AP$30]*[.$Z$5]*MAGNET([.AP$24]+[.$BB108])&#10;+[.AQ$30]*[.$Z$5]*MAGNET([.AQ$24]+[.$BB108])&#10;+[.AR$30]*[.$Z$5]*MAGNET([.AR$24]+[.$BB108])&#10;+[.AS$30]*[.$Z$5]*MAGNET([.AS$24]+[.$BB108])&#10;+[.AT$30]*[.$Z$5]*MAGNET([.AT$24]+[.$BB108])&#10;+[.AU$30]*[.$Z$5]*MAGNET([.AU$24]+[.$BB108])&#10;+[.AV$30]*[.$Z$5]*MAGNET([.AV$24]+[.$BB108])&#10;+[.AW$30]*[.$Z$5]*MAGNET([.AW$24]+[.$BB108])&#10;+[.AX$30]*[.$Z$5]*MAGNET([.AX$24]+[.$BB108])&#10;+[.AY$30]*[.$Z$5]*MAGNET([.AY$24]+[.$BB108]) +RAND()*[.$BH$13]" office:value-type="float" office:value="0" calcext:value-type="float">
            <text:p>0</text:p>
          </table:table-cell>
          <table:table-cell table:style-name="ce71" table:formula="of:=[.E$31]*[.$Z$5]*MAGNET([.E$24]+[.$BB108])+[.F$31]*[.$Z$5]*MAGNET([.F$24]+[.$BB108])+[.G$31]*[.$Z$5]*MAGNET([.G$24]+[.$BB108])+[.H$31]*[.$Z$5]*MAGNET([.H$24]+[.$BB108])+[.I$31]*[.$Z$5]*MAGNET([.I$24]+[.$BB108])+[.J$31]*[.$Z$5]*MAGNET([.J$24]+[.$BB108])+[.K$31]*[.$Z$5]*MAGNET([.K$24]+[.$BB108])+[.L$31]*[.$Z$5]*MAGNET([.L$24]+[.$BB108])+[.M$31]*[.$Z$5]*MAGNET([.M$24]+[.$BB108])+[.N$31]*[.$Z$5]*MAGNET([.N$24]+[.$BB108])+[.O$31]*[.$Z$5]*MAGNET([.O$24]+[.$BB108])+[.P$31]*[.$Z$5]*MAGNET([.P$24]+[.$BB108])+[.Q$31]*[.$Z$5]*MAGNET([.Q$24]+[.$BB108])+[.R$31]*[.$Z$5]*MAGNET([.R$24]+[.$BB108])+[.S$31]*[.$Z$5]*MAGNET([.S$24]+[.$BB108])+[.T$31]*[.$Z$5]*MAGNET([.T$24]+[.$BB108])+[.U$31]*[.$Z$5]*MAGNET([.U$24]+[.$BB108])+[.V$31]*[.$Z$5]*MAGNET([.V$24]+[.$BB108])+[.W$31]*[.$Z$5]*MAGNET([.W$24]+[.$BB108])+[.X$31]*[.$Z$5]*MAGNET([.X$24]+[.$BB108])+[.Y$31]*[.$Z$5]*MAGNET([.Y$24]+[.$BB108])+[.Z$31]*[.$Z$5]*MAGNET([.Z$24]+[.$BB108])+[.AA$31]*[.$Z$5]*MAGNET([.AA$24]+[.$BB108])+[.AB$31]*[.$Z$5]*MAGNET([.AB$24]+[.$BB108])+[.AC$31]*[.$Z$5]*MAGNET([.AC$24]+[.$BB108])+[.AD$31]*[.$Z$5]*MAGNET([.AD$24]+[.$BB108])+[.AE$31]*[.$Z$5]*MAGNET([.AE$24]+[.$BB108])+[.AF$31]*[.$Z$5]*MAGNET([.AF$24]+[.$BB108])+[.AG$31]*[.$Z$5]*MAGNET([.AG$24]+[.$BB108])+[.D$31]*[.$Z$5]*MAGNET([.D$24]+[.$BB108])+[.AH$31]*[.$Z$5]*MAGNET([.AH$24]+[.BB108]) +[.AI$31]*[.$Z$5]*MAGNET([.AI$24]+[.BB108]) +[.AJ$31]*[.$Z$5]*MAGNET([.AJ$24]+[.BB108]) +[.AK$31]*[.$Z$5]*MAGNET([.AK$24]+[.BB108]) +[.AL$31]*[.$Z$5]*MAGNET([.AL$24]+[.BB108]) +[.AM$31]*[.$Z$5]*MAGNET([.AM$24]+[.BB108]) +[.AN$31]*[.$Z$5]*MAGNET([.AN$24]+[.BB108]) +[.AO$31]*[.$Z$5]*MAGNET([.AO$24]+[.BB108]) +[.AP$31]*[.$Z$5]*MAGNET([.AP$24]+[.$BB108])&#10;+[.AQ$31]*[.$Z$5]*MAGNET([.AQ$24]+[.$BB108])&#10;+[.AR$31]*[.$Z$5]*MAGNET([.AR$24]+[.$BB108])&#10;+[.AS$31]*[.$Z$5]*MAGNET([.AS$24]+[.$BB108])&#10;+[.AT$31]*[.$Z$5]*MAGNET([.AT$24]+[.$BB108])&#10;+[.AU$31]*[.$Z$5]*MAGNET([.AU$24]+[.$BB108])&#10;+[.AV$31]*[.$Z$5]*MAGNET([.AV$24]+[.$BB108])&#10;+[.AW$31]*[.$Z$5]*MAGNET([.AW$24]+[.$BB108])&#10;+[.AX$31]*[.$Z$5]*MAGNET([.AX$24]+[.$BB108])&#10;+[.AY$31]*[.$Z$5]*MAGNET([.AY$24]+[.$BB108]) +RAND()*[.$BI$13]" office:value-type="float" office:value="0" calcext:value-type="float">
            <text:p>0</text:p>
          </table:table-cell>
          <table:table-cell table:style-name="ce71" table:formula="of:=[.E$32]*[.$Z$5]*MAGNET([.E$24]+[.$BB108])+[.F$32]*[.$Z$5]*MAGNET([.F$24]+[.$BB108])+[.G$32]*[.$Z$5]*MAGNET([.G$24]+[.$BB108])+[.H$32]*[.$Z$5]*MAGNET([.H$24]+[.$BB108])+[.I$32]*[.$Z$5]*MAGNET([.I$24]+[.$BB108])+[.J$32]*[.$Z$5]*MAGNET([.J$24]+[.$BB108])+[.K$32]*[.$Z$5]*MAGNET([.K$24]+[.$BB108])+[.L$32]*[.$Z$5]*MAGNET([.L$24]+[.$BB108])+[.M$32]*[.$Z$5]*MAGNET([.M$24]+[.$BB108])+[.N$32]*[.$Z$5]*MAGNET([.N$24]+[.$BB108])+[.O$32]*[.$Z$5]*MAGNET([.O$24]+[.$BB108])+[.P$32]*[.$Z$5]*MAGNET([.P$24]+[.$BB108])+[.Q$32]*[.$Z$5]*MAGNET([.Q$24]+[.$BB108])+[.R$32]*[.$Z$5]*MAGNET([.R$24]+[.$BB108])+[.S$32]*[.$Z$5]*MAGNET([.S$24]+[.$BB108])+[.T$32]*[.$Z$5]*MAGNET([.T$24]+[.$BB108])+[.U$32]*[.$Z$5]*MAGNET([.U$24]+[.$BB108])+[.V$32]*[.$Z$5]*MAGNET([.V$24]+[.$BB108])+[.W$32]*[.$Z$5]*MAGNET([.W$24]+[.$BB108])+[.X$32]*[.$Z$5]*MAGNET([.X$24]+[.$BB108])+[.Y$32]*[.$Z$5]*MAGNET([.Y$24]+[.$BB108])+[.Z$32]*[.$Z$5]*MAGNET([.Z$24]+[.$BB108])+[.AA$32]*[.$Z$5]*MAGNET([.AA$24]+[.$BB108])+[.AB$32]*[.$Z$5]*MAGNET([.AB$24]+[.$BB108])+[.AC$32]*[.$Z$5]*MAGNET([.AC$24]+[.$BB108])+[.AD$32]*[.$Z$5]*MAGNET([.AD$24]+[.$BB108])+[.AE$32]*[.$Z$5]*MAGNET([.AE$24]+[.$BB108])+[.AF$32]*[.$Z$5]*MAGNET([.AF$24]+[.$BB108])+[.AG$32]*[.$Z$5]*MAGNET([.AG$24]+[.$BB108])+[.D$32]*[.$Z$5]*MAGNET([.D$24]+[.$BB108])+[.AH$32]*[.$Z$5]*MAGNET([.AH$24]+[.BB108]) +[.AI$32]*[.$Z$5]*MAGNET([.AI$24]+[.BB108]) +[.AJ$32]*[.$Z$5]*MAGNET([.AJ$24]+[.BB108]) +[.AK$32]*[.$Z$5]*MAGNET([.AK$24]+[.BB108]) +[.AL$32]*[.$Z$5]*MAGNET([.AL$24]+[.BB108]) +[.AM$32]*[.$Z$5]*MAGNET([.AM$24]+[.BB108]) +[.AN$32]*[.$Z$5]*MAGNET([.AN$24]+[.BB108]) +[.AO$32]*[.$Z$5]*MAGNET([.AO$24]+[.BB108]) +[.AP$32]*[.$Z$5]*MAGNET([.AP$24]+[.$BB108])&#10;+[.AQ$32]*[.$Z$5]*MAGNET([.AQ$24]+[.$BB108])&#10;+[.AR$32]*[.$Z$5]*MAGNET([.AR$24]+[.$BB108])&#10;+[.AS$32]*[.$Z$5]*MAGNET([.AS$24]+[.$BB108])&#10;+[.AT$32]*[.$Z$5]*MAGNET([.AT$24]+[.$BB108])&#10;+[.AU$32]*[.$Z$5]*MAGNET([.AU$24]+[.$BB108])&#10;+[.AV$32]*[.$Z$5]*MAGNET([.AV$24]+[.$BB108])&#10;+[.AW$32]*[.$Z$5]*MAGNET([.AW$24]+[.$BB108])&#10;+[.AX$32]*[.$Z$5]*MAGNET([.AX$24]+[.$BB108])&#10;+[.AY$32]*[.$Z$5]*MAGNET([.AY$24]+[.$BB108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8]+0.002" office:value-type="float" office:value="0.188" calcext:value-type="float">
            <text:p>0.188</text:p>
          </table:table-cell>
          <table:table-cell table:formula="of:=[.BA109]*[.$D$6]" office:value-type="float" office:value="9.44991070199811" calcext:value-type="float">
            <text:p>9.450</text:p>
          </table:table-cell>
          <table:table-cell table:formula="of:=[.D$25]*[.$Z$5]*MAGNET([.D$24]+[.BB109])+[.E$25]*[.$Z$5]*MAGNET([.E$24]+[.BB109])+[.F$25]*[.$Z$5]*MAGNET([.F$24]+[.BB109])+[.G$25]*[.$Z$5]*MAGNET([.G$24]+[.BB109])+[.H$25]*[.$Z$5]*MAGNET([.H$24]+[.BB109])+[.I$25]*[.$Z$5]*MAGNET([.I$24]+[.BB109])+[.J$25]*[.$Z$5]*MAGNET([.J$24]+[.BB109])+[.K$25]*[.$Z$5]*MAGNET([.K$24]+[.BB109])+[.L$25]*[.$Z$5]*MAGNET([.L$24]+[.BB109])+[.M$25]*[.$Z$5]*MAGNET([.M$24]+[.BB109])+[.N$25]*[.$Z$5]*MAGNET([.N$24]+[.BB109])+[.O$25]*[.$Z$5]*MAGNET([.O$24]+[.BB109])+[.P$25]*[.$Z$5]*MAGNET([.P$24]+[.BB109])+[.Q$25]*[.$Z$5]*MAGNET([.Q$24]+[.BB109])+[.R$25]*[.$Z$5]*MAGNET([.R$24]+[.BB109])+[.S$25]*[.$Z$5]*MAGNET([.S$24]+[.BB109])+[.T$25]*[.$Z$5]*MAGNET([.T$24]+[.BB109])+[.U$25]*[.$Z$5]*MAGNET([.U$24]+[.BB109])+[.V$25]*[.$Z$5]*MAGNET([.V$24]+[.BB109])+[.W$25]*[.$Z$5]*MAGNET([.W$24]+[.BB109])+[.X$25]*[.$Z$5]*MAGNET([.X$24]+[.BB109])+[.Y$25]*[.$Z$5]*MAGNET([.Y$24]+[.BB109])+[.Z$25]*[.$Z$5]*MAGNET([.Z$24]+[.BB109])+[.AA$25]*[.$Z$5]*MAGNET([.AA$24]+[.BB109])+[.AB$25]*[.$Z$5]*MAGNET([.AB$24]+[.BB109])+[.AC$25]*[.$Z$5]*MAGNET([.AC$24]+[.BB109])+[.AD$25]*[.$Z$5]*MAGNET([.AD$24]+[.BB109])+[.AE$25]*[.$Z$5]*MAGNET([.AE$24]+[.BB109])+[.AF$25]*[.$Z$5]*MAGNET([.AF$24]+[.BB109])+[.AG$25]*[.$Z$5]*MAGNET([.AG$24]+[.BB109])+[.AH$25]*[.$Z$5]*MAGNET([.AH$24]+[.BB109]) +[.AI$25]*[.$Z$5]*MAGNET([.AI$24]+[.BB109]) +[.AJ$25]*[.$Z$5]*MAGNET([.AJ$24]+[.BB109]) +[.AK$25]*[.$Z$5]*MAGNET([.AK$24]+[.BB109]) +[.AL$25]*[.$Z$5]*MAGNET([.AL$24]+[.BB109]) +[.AM$25]*[.$Z$5]*MAGNET([.AM$24]+[.BB109]) +[.AN$25]*[.$Z$5]*MAGNET([.AN$24]+[.BB109]) +[.AO$25]*[.$Z$5]*MAGNET([.AO$24]+[.BB109])+RAND()*[.$BC$13]+[.AP$25]*[.$Z$5]*MAGNET([.AP$24]+[.BB109])&#10;+[.AQ$25]*[.$Z$5]*MAGNET([.AQ$24]+[.BB109])&#10;+[.AR$25]*[.$Z$5]*MAGNET([.AR$24]+[.BB109])&#10;+[.AS$25]*[.$Z$5]*MAGNET([.AS$24]+[.BB109])&#10;+[.AT$25]*[.$Z$5]*MAGNET([.AT$24]+[.BB109])&#10;+[.AU$25]*[.$Z$5]*MAGNET([.AU$24]+[.BB109])&#10;+[.AV$25]*[.$Z$5]*MAGNET([.AV$24]+[.BB109])&#10;+[.AW$25]*[.$Z$5]*MAGNET([.AW$24]+[.BB109])&#10;+[.AX$25]*[.$Z$5]*MAGNET([.AX$24]+[.BB109])&#10;+[.AY$25]*[.$Z$5]*MAGNET([.AY$24]+[.BB109])" office:value-type="float" office:value="48.5914271521637" calcext:value-type="float">
            <text:p>48.59</text:p>
          </table:table-cell>
          <table:table-cell table:style-name="ce70" table:formula="of:=[.E$26]*[.$Z$5]*MAGNET([.E$24]+[.$BB109])+[.F$26]*[.$Z$5]*MAGNET([.F$24]+[.$BB109])+[.G$26]*[.$Z$5]*MAGNET([.G$24]+[.$BB109])+[.H$26]*[.$Z$5]*MAGNET([.H$24]+[.$BB109])+[.I$26]*[.$Z$5]*MAGNET([.I$24]+[.$BB109])+[.J$26]*[.$Z$5]*MAGNET([.J$24]+[.$BB109])+[.K$26]*[.$Z$5]*MAGNET([.K$24]+[.$BB109])+[.L$26]*[.$Z$5]*MAGNET([.L$24]+[.$BB109])+[.M$26]*[.$Z$5]*MAGNET([.M$24]+[.$BB109])+[.N$26]*[.$Z$5]*MAGNET([.N$24]+[.$BB109])+[.O$26]*[.$Z$5]*MAGNET([.O$24]+[.$BB109])+[.P$26]*[.$Z$5]*MAGNET([.P$24]+[.$BB109])+[.Q$26]*[.$Z$5]*MAGNET([.Q$24]+[.$BB109])+[.R$26]*[.$Z$5]*MAGNET([.R$24]+[.$BB109])+[.S$26]*[.$Z$5]*MAGNET([.S$24]+[.$BB109])+[.T$26]*[.$Z$5]*MAGNET([.T$24]+[.$BB109])+[.U$26]*[.$Z$5]*MAGNET([.U$24]+[.$BB109])+[.V$26]*[.$Z$5]*MAGNET([.V$24]+[.$BB109])+[.W$26]*[.$Z$5]*MAGNET([.W$24]+[.$BB109])+[.X$26]*[.$Z$5]*MAGNET([.X$24]+[.$BB109])+[.Y$26]*[.$Z$5]*MAGNET([.Y$24]+[.$BB109])+[.Z$26]*[.$Z$5]*MAGNET([.Z$24]+[.$BB109])+[.AA$26]*[.$Z$5]*MAGNET([.AA$24]+[.$BB109])+[.AB$26]*[.$Z$5]*MAGNET([.AB$24]+[.$BB109])+[.AC$26]*[.$Z$5]*MAGNET([.AC$24]+[.$BB109])+[.AD$26]*[.$Z$5]*MAGNET([.AD$24]+[.$BB109])+[.AE$26]*[.$Z$5]*MAGNET([.AE$24]+[.$BB109])+[.AF$26]*[.$Z$5]*MAGNET([.AF$24]+[.$BB109])+[.AG$26]*[.$Z$5]*MAGNET([.AG$24]+[.$BB109])+[.D$26]*[.$Z$5]*MAGNET([.D$24]+[.$BB109])+[.AH$26]*[.$Z$5]*MAGNET([.AH$24]+[.BB109]) +[.AI$26]*[.$Z$5]*MAGNET([.AI$24]+[.BB109]) +[.AJ$26]*[.$Z$5]*MAGNET([.AJ$24]+[.BB109]) +[.AK$26]*[.$Z$5]*MAGNET([.AK$24]+[.BB109]) +[.AL$26]*[.$Z$5]*MAGNET([.AL$24]+[.BB109]) +[.AM$26]*[.$Z$5]*MAGNET([.AM$24]+[.BB109]) +[.AN$26]*[.$Z$5]*MAGNET([.AN$24]+[.BB109]) +[.AO$26]*[.$Z$5]*MAGNET([.AO$24]+[.BB109]) +[.AP$26]*[.$Z$5]*MAGNET([.AP$24]+[.$BB109])&#10;+[.AQ$26]*[.$Z$5]*MAGNET([.AQ$24]+[.$BB109])&#10;+[.AR$26]*[.$Z$5]*MAGNET([.AR$24]+[.$BB109])&#10;+[.AS$26]*[.$Z$5]*MAGNET([.AS$24]+[.$BB109])&#10;+[.AT$26]*[.$Z$5]*MAGNET([.AT$24]+[.$BB109])&#10;+[.AU$26]*[.$Z$5]*MAGNET([.AU$24]+[.$BB109])&#10;+[.AV$26]*[.$Z$5]*MAGNET([.AV$24]+[.$BB109])&#10;+[.AW$26]*[.$Z$5]*MAGNET([.AW$24]+[.$BB109])&#10;+[.AX$26]*[.$Z$5]*MAGNET([.AX$24]+[.$BB109])&#10;+[.AY$26]*[.$Z$5]*MAGNET([.AY$24]+[.$BB109]) +RAND()*[.$BD$13]" office:value-type="float" office:value="-86.1231075823452" calcext:value-type="float">
            <text:p>-86.12</text:p>
          </table:table-cell>
          <table:table-cell table:style-name="ce71" table:formula="of:=[.E$27]*[.$Z$5]*MAGNET([.E$24]+[.$BB109])+[.F$27]*[.$Z$5]*MAGNET([.F$24]+[.$BB109])+[.G$27]*[.$Z$5]*MAGNET([.G$24]+[.$BB109])+[.H$27]*[.$Z$5]*MAGNET([.H$24]+[.$BB109])+[.I$27]*[.$Z$5]*MAGNET([.I$24]+[.$BB109])+[.J$27]*[.$Z$5]*MAGNET([.J$24]+[.$BB109])+[.K$27]*[.$Z$5]*MAGNET([.K$24]+[.$BB109])+[.L$27]*[.$Z$5]*MAGNET([.L$24]+[.$BB109])+[.M$27]*[.$Z$5]*MAGNET([.M$24]+[.$BB109])+[.N$27]*[.$Z$5]*MAGNET([.N$24]+[.$BB109])+[.O$27]*[.$Z$5]*MAGNET([.O$24]+[.$BB109])+[.P$27]*[.$Z$5]*MAGNET([.P$24]+[.$BB109])+[.Q$27]*[.$Z$5]*MAGNET([.Q$24]+[.$BB109])+[.R$27]*[.$Z$5]*MAGNET([.R$24]+[.$BB109])+[.S$27]*[.$Z$5]*MAGNET([.S$24]+[.$BB109])+[.T$27]*[.$Z$5]*MAGNET([.T$24]+[.$BB109])+[.U$27]*[.$Z$5]*MAGNET([.U$24]+[.$BB109])+[.V$27]*[.$Z$5]*MAGNET([.V$24]+[.$BB109])+[.W$27]*[.$Z$5]*MAGNET([.W$24]+[.$BB109])+[.X$27]*[.$Z$5]*MAGNET([.X$24]+[.$BB109])+[.Y$27]*[.$Z$5]*MAGNET([.Y$24]+[.$BB109])+[.Z$27]*[.$Z$5]*MAGNET([.Z$24]+[.$BB109])+[.AA$27]*[.$Z$5]*MAGNET([.AA$24]+[.$BB109])+[.AB$27]*[.$Z$5]*MAGNET([.AB$24]+[.$BB109])+[.AC$27]*[.$Z$5]*MAGNET([.AC$24]+[.$BB109])+[.AD$27]*[.$Z$5]*MAGNET([.AD$24]+[.$BB109])+[.AE$27]*[.$Z$5]*MAGNET([.AE$24]+[.$BB109])+[.AF$27]*[.$Z$5]*MAGNET([.AF$24]+[.$BB109])+[.AG$27]*[.$Z$5]*MAGNET([.AG$24]+[.$BB109])+[.D$27]*[.$Z$5]*MAGNET([.D$24]+[.$BB109])+[.AH$27]*[.$Z$5]*MAGNET([.AH$24]+[.BB109]) +[.AI$27]*[.$Z$5]*MAGNET([.AI$24]+[.BB109]) +[.AJ$27]*[.$Z$5]*MAGNET([.AJ$24]+[.BB109]) +[.AK$27]*[.$Z$5]*MAGNET([.AK$24]+[.BB109]) +[.AL$27]*[.$Z$5]*MAGNET([.AL$24]+[.BB109]) +[.AM$27]*[.$Z$5]*MAGNET([.AM$24]+[.BB109]) +[.AN$27]*[.$Z$5]*MAGNET([.AN$24]+[.BB109]) +[.AO$27]*[.$Z$5]*MAGNET([.AO$24]+[.BB109]) +[.AP$27]*[.$Z$5]*MAGNET([.AP$24]+[.$BB109])&#10;+[.AQ$27]*[.$Z$5]*MAGNET([.AQ$24]+[.$BB109])&#10;+[.AR$27]*[.$Z$5]*MAGNET([.AR$24]+[.$BB109])&#10;+[.AS$27]*[.$Z$5]*MAGNET([.AS$24]+[.$BB109])&#10;+[.AT$27]*[.$Z$5]*MAGNET([.AT$24]+[.$BB109])&#10;+[.AU$27]*[.$Z$5]*MAGNET([.AU$24]+[.$BB109])&#10;+[.AV$27]*[.$Z$5]*MAGNET([.AV$24]+[.$BB109])&#10;+[.AW$27]*[.$Z$5]*MAGNET([.AW$24]+[.$BB109])&#10;+[.AX$27]*[.$Z$5]*MAGNET([.AX$24]+[.$BB109])&#10;+[.AY$27]*[.$Z$5]*MAGNET([.AY$24]+[.$BB109]) +RAND()*[.$BE$13]" office:value-type="float" office:value="65.2828207345398" calcext:value-type="float">
            <text:p>65.2828207345398</text:p>
          </table:table-cell>
          <table:table-cell table:style-name="ce71" table:formula="of:=[.E$28]*[.$Z$5]*MAGNET([.E$24]+[.$BB109])+[.F$28]*[.$Z$5]*MAGNET([.F$24]+[.$BB109])+[.G$28]*[.$Z$5]*MAGNET([.G$24]+[.$BB109])+[.H$28]*[.$Z$5]*MAGNET([.H$24]+[.$BB109])+[.I$28]*[.$Z$5]*MAGNET([.I$24]+[.$BB109])+[.J$28]*[.$Z$5]*MAGNET([.J$24]+[.$BB109])+[.K$28]*[.$Z$5]*MAGNET([.K$24]+[.$BB109])+[.L$28]*[.$Z$5]*MAGNET([.L$24]+[.$BB109])+[.M$28]*[.$Z$5]*MAGNET([.M$24]+[.$BB109])+[.N$28]*[.$Z$5]*MAGNET([.N$24]+[.$BB109])+[.O$28]*[.$Z$5]*MAGNET([.O$24]+[.$BB109])+[.P$28]*[.$Z$5]*MAGNET([.P$24]+[.$BB109])+[.Q$28]*[.$Z$5]*MAGNET([.Q$24]+[.$BB109])+[.R$28]*[.$Z$5]*MAGNET([.R$24]+[.$BB109])+[.S$28]*[.$Z$5]*MAGNET([.S$24]+[.$BB109])+[.T$28]*[.$Z$5]*MAGNET([.T$24]+[.$BB109])+[.U$28]*[.$Z$5]*MAGNET([.U$24]+[.$BB109])+[.V$28]*[.$Z$5]*MAGNET([.V$24]+[.$BB109])+[.W$28]*[.$Z$5]*MAGNET([.W$24]+[.$BB109])+[.X$28]*[.$Z$5]*MAGNET([.X$24]+[.$BB109])+[.Y$28]*[.$Z$5]*MAGNET([.Y$24]+[.$BB109])+[.Z$28]*[.$Z$5]*MAGNET([.Z$24]+[.$BB109])+[.AA$28]*[.$Z$5]*MAGNET([.AA$24]+[.$BB109])+[.AB$28]*[.$Z$5]*MAGNET([.AB$24]+[.$BB109])+[.AC$28]*[.$Z$5]*MAGNET([.AC$24]+[.$BB109])+[.AD$28]*[.$Z$5]*MAGNET([.AD$24]+[.$BB109])+[.AE$28]*[.$Z$5]*MAGNET([.AE$24]+[.$BB109])+[.AF$28]*[.$Z$5]*MAGNET([.AF$24]+[.$BB109])+[.AG$28]*[.$Z$5]*MAGNET([.AG$24]+[.$BB109])+[.D$28]*[.$Z$5]*MAGNET([.D$24]+[.$BB109])+[.AH$28]*[.$Z$5]*MAGNET([.AH$24]+[.BB109]) +[.AI$28]*[.$Z$5]*MAGNET([.AI$24]+[.BB109]) +[.AJ$28]*[.$Z$5]*MAGNET([.AJ$24]+[.BB109]) +[.AK$28]*[.$Z$5]*MAGNET([.AK$24]+[.BB109]) +[.AL$28]*[.$Z$5]*MAGNET([.AL$24]+[.BB109]) +[.AM$28]*[.$Z$5]*MAGNET([.AM$24]+[.BB109]) +[.AN$28]*[.$Z$5]*MAGNET([.AN$24]+[.BB109]) +[.AO$28]*[.$Z$5]*MAGNET([.AO$24]+[.BB109]) +[.AP$28]*[.$Z$5]*MAGNET([.AP$24]+[.$BB109])&#10;+[.AQ$28]*[.$Z$5]*MAGNET([.AQ$24]+[.$BB109])&#10;+[.AR$28]*[.$Z$5]*MAGNET([.AR$24]+[.$BB109])&#10;+[.AS$28]*[.$Z$5]*MAGNET([.AS$24]+[.$BB109])&#10;+[.AT$28]*[.$Z$5]*MAGNET([.AT$24]+[.$BB109])&#10;+[.AU$28]*[.$Z$5]*MAGNET([.AU$24]+[.$BB109])&#10;+[.AV$28]*[.$Z$5]*MAGNET([.AV$24]+[.$BB109])&#10;+[.AW$28]*[.$Z$5]*MAGNET([.AW$24]+[.$BB109])&#10;+[.AX$28]*[.$Z$5]*MAGNET([.AX$24]+[.$BB109])&#10;+[.AY$28]*[.$Z$5]*MAGNET([.AY$24]+[.$BB109]) +RAND()*[.$BF$13]" office:value-type="float" office:value="8.39509881154043" calcext:value-type="float">
            <text:p>8.39509881154043</text:p>
          </table:table-cell>
          <table:table-cell table:style-name="ce71" table:formula="of:=[.E$29]*[.$Z$5]*MAGNET([.E$24]+[.$BB109])+[.F$29]*[.$Z$5]*MAGNET([.F$24]+[.$BB109])+[.G$29]*[.$Z$5]*MAGNET([.G$24]+[.$BB109])+[.H$29]*[.$Z$5]*MAGNET([.H$24]+[.$BB109])+[.I$29]*[.$Z$5]*MAGNET([.I$24]+[.$BB109])+[.J$29]*[.$Z$5]*MAGNET([.J$24]+[.$BB109])+[.K$29]*[.$Z$5]*MAGNET([.K$24]+[.$BB109])+[.L$29]*[.$Z$5]*MAGNET([.L$24]+[.$BB109])+[.M$29]*[.$Z$5]*MAGNET([.M$24]+[.$BB109])+[.N$29]*[.$Z$5]*MAGNET([.N$24]+[.$BB109])+[.O$29]*[.$Z$5]*MAGNET([.O$24]+[.$BB109])+[.P$29]*[.$Z$5]*MAGNET([.P$24]+[.$BB109])+[.Q$29]*[.$Z$5]*MAGNET([.Q$24]+[.$BB109])+[.R$29]*[.$Z$5]*MAGNET([.R$24]+[.$BB109])+[.S$29]*[.$Z$5]*MAGNET([.S$24]+[.$BB109])+[.T$29]*[.$Z$5]*MAGNET([.T$24]+[.$BB109])+[.U$29]*[.$Z$5]*MAGNET([.U$24]+[.$BB109])+[.V$29]*[.$Z$5]*MAGNET([.V$24]+[.$BB109])+[.W$29]*[.$Z$5]*MAGNET([.W$24]+[.$BB109])+[.X$29]*[.$Z$5]*MAGNET([.X$24]+[.$BB109])+[.Y$29]*[.$Z$5]*MAGNET([.Y$24]+[.$BB109])+[.Z$29]*[.$Z$5]*MAGNET([.Z$24]+[.$BB109])+[.AA$29]*[.$Z$5]*MAGNET([.AA$24]+[.$BB109])+[.AB$29]*[.$Z$5]*MAGNET([.AB$24]+[.$BB109])+[.AC$29]*[.$Z$5]*MAGNET([.AC$24]+[.$BB109])+[.AD$29]*[.$Z$5]*MAGNET([.AD$24]+[.$BB109])+[.AE$29]*[.$Z$5]*MAGNET([.AE$24]+[.$BB109])+[.AF$29]*[.$Z$5]*MAGNET([.AF$24]+[.$BB109])+[.AG$29]*[.$Z$5]*MAGNET([.AG$24]+[.$BB109])+[.D$29]*[.$Z$5]*MAGNET([.D$24]+[.$BB109])+[.AH$29]*[.$Z$5]*MAGNET([.AH$24]+[.BB109]) +[.AI$29]*[.$Z$5]*MAGNET([.AI$24]+[.BB109]) +[.AJ$29]*[.$Z$5]*MAGNET([.AJ$24]+[.BB109]) +[.AK$29]*[.$Z$5]*MAGNET([.AK$24]+[.BB109]) +[.AL$29]*[.$Z$5]*MAGNET([.AL$24]+[.BB109]) +[.AM$29]*[.$Z$5]*MAGNET([.AM$24]+[.BB109]) +[.AN$29]*[.$Z$5]*MAGNET([.AN$24]+[.BB109]) +[.AO$29]*[.$Z$5]*MAGNET([.AO$24]+[.BB109]) +[.AP$29]*[.$Z$5]*MAGNET([.AP$24]+[.$BB109])&#10;+[.AQ$29]*[.$Z$5]*MAGNET([.AQ$24]+[.$BB109])&#10;+[.AR$29]*[.$Z$5]*MAGNET([.AR$24]+[.$BB109])&#10;+[.AS$29]*[.$Z$5]*MAGNET([.AS$24]+[.$BB109])&#10;+[.AT$29]*[.$Z$5]*MAGNET([.AT$24]+[.$BB109])&#10;+[.AU$29]*[.$Z$5]*MAGNET([.AU$24]+[.$BB109])&#10;+[.AV$29]*[.$Z$5]*MAGNET([.AV$24]+[.$BB109])&#10;+[.AW$29]*[.$Z$5]*MAGNET([.AW$24]+[.$BB109])&#10;+[.AX$29]*[.$Z$5]*MAGNET([.AX$24]+[.$BB109])&#10;+[.AY$29]*[.$Z$5]*MAGNET([.AY$24]+[.$BB109]) +RAND()*[.$BG$13]" office:value-type="float" office:value="-29.0560034475016" calcext:value-type="float">
            <text:p>-29.0560034475016</text:p>
          </table:table-cell>
          <table:table-cell table:style-name="ce71" table:formula="of:=[.E$30]*[.$Z$5]*MAGNET([.E$24]+[.$BB109])+[.F$30]*[.$Z$5]*MAGNET([.F$24]+[.$BB109])+[.G$30]*[.$Z$5]*MAGNET([.G$24]+[.$BB109])+[.H$30]*[.$Z$5]*MAGNET([.H$24]+[.$BB109])+[.I$30]*[.$Z$5]*MAGNET([.I$24]+[.$BB109])+[.J$30]*[.$Z$5]*MAGNET([.J$24]+[.$BB109])+[.K$30]*[.$Z$5]*MAGNET([.K$24]+[.$BB109])+[.L$30]*[.$Z$5]*MAGNET([.L$24]+[.$BB109])+[.M$30]*[.$Z$5]*MAGNET([.M$24]+[.$BB109])+[.N$30]*[.$Z$5]*MAGNET([.N$24]+[.$BB109])+[.O$30]*[.$Z$5]*MAGNET([.O$24]+[.$BB109])+[.P$30]*[.$Z$5]*MAGNET([.P$24]+[.$BB109])+[.Q$30]*[.$Z$5]*MAGNET([.Q$24]+[.$BB109])+[.R$30]*[.$Z$5]*MAGNET([.R$24]+[.$BB109])+[.S$30]*[.$Z$5]*MAGNET([.S$24]+[.$BB109])+[.T$30]*[.$Z$5]*MAGNET([.T$24]+[.$BB109])+[.U$30]*[.$Z$5]*MAGNET([.U$24]+[.$BB109])+[.V$30]*[.$Z$5]*MAGNET([.V$24]+[.$BB109])+[.W$30]*[.$Z$5]*MAGNET([.W$24]+[.$BB109])+[.X$30]*[.$Z$5]*MAGNET([.X$24]+[.$BB109])+[.Y$30]*[.$Z$5]*MAGNET([.Y$24]+[.$BB109])+[.Z$30]*[.$Z$5]*MAGNET([.Z$24]+[.$BB109])+[.AA$30]*[.$Z$5]*MAGNET([.AA$24]+[.$BB109])+[.AB$30]*[.$Z$5]*MAGNET([.AB$24]+[.$BB109])+[.AC$30]*[.$Z$5]*MAGNET([.AC$24]+[.$BB109])+[.AD$30]*[.$Z$5]*MAGNET([.AD$24]+[.$BB109])+[.AE$30]*[.$Z$5]*MAGNET([.AE$24]+[.$BB109])+[.AF$30]*[.$Z$5]*MAGNET([.AF$24]+[.$BB109])+[.AG$30]*[.$Z$5]*MAGNET([.AG$24]+[.$BB109])+[.D$30]*[.$Z$5]*MAGNET([.D$24]+[.$BB109])+[.AH$30]*[.$Z$5]*MAGNET([.AH$24]+[.BB109]) +[.AI$30]*[.$Z$5]*MAGNET([.AI$24]+[.BB109]) +[.AJ$30]*[.$Z$5]*MAGNET([.AJ$24]+[.BB109]) +[.AK$30]*[.$Z$5]*MAGNET([.AK$24]+[.BB109]) +[.AL$30]*[.$Z$5]*MAGNET([.AL$24]+[.BB109]) +[.AM$30]*[.$Z$5]*MAGNET([.AM$24]+[.BB109]) +[.AN$30]*[.$Z$5]*MAGNET([.AN$24]+[.BB109]) +[.AO$30]*[.$Z$5]*MAGNET([.AO$24]+[.BB109]) +[.AP$30]*[.$Z$5]*MAGNET([.AP$24]+[.$BB109])&#10;+[.AQ$30]*[.$Z$5]*MAGNET([.AQ$24]+[.$BB109])&#10;+[.AR$30]*[.$Z$5]*MAGNET([.AR$24]+[.$BB109])&#10;+[.AS$30]*[.$Z$5]*MAGNET([.AS$24]+[.$BB109])&#10;+[.AT$30]*[.$Z$5]*MAGNET([.AT$24]+[.$BB109])&#10;+[.AU$30]*[.$Z$5]*MAGNET([.AU$24]+[.$BB109])&#10;+[.AV$30]*[.$Z$5]*MAGNET([.AV$24]+[.$BB109])&#10;+[.AW$30]*[.$Z$5]*MAGNET([.AW$24]+[.$BB109])&#10;+[.AX$30]*[.$Z$5]*MAGNET([.AX$24]+[.$BB109])&#10;+[.AY$30]*[.$Z$5]*MAGNET([.AY$24]+[.$BB109]) +RAND()*[.$BH$13]" office:value-type="float" office:value="0" calcext:value-type="float">
            <text:p>0</text:p>
          </table:table-cell>
          <table:table-cell table:style-name="ce71" table:formula="of:=[.E$31]*[.$Z$5]*MAGNET([.E$24]+[.$BB109])+[.F$31]*[.$Z$5]*MAGNET([.F$24]+[.$BB109])+[.G$31]*[.$Z$5]*MAGNET([.G$24]+[.$BB109])+[.H$31]*[.$Z$5]*MAGNET([.H$24]+[.$BB109])+[.I$31]*[.$Z$5]*MAGNET([.I$24]+[.$BB109])+[.J$31]*[.$Z$5]*MAGNET([.J$24]+[.$BB109])+[.K$31]*[.$Z$5]*MAGNET([.K$24]+[.$BB109])+[.L$31]*[.$Z$5]*MAGNET([.L$24]+[.$BB109])+[.M$31]*[.$Z$5]*MAGNET([.M$24]+[.$BB109])+[.N$31]*[.$Z$5]*MAGNET([.N$24]+[.$BB109])+[.O$31]*[.$Z$5]*MAGNET([.O$24]+[.$BB109])+[.P$31]*[.$Z$5]*MAGNET([.P$24]+[.$BB109])+[.Q$31]*[.$Z$5]*MAGNET([.Q$24]+[.$BB109])+[.R$31]*[.$Z$5]*MAGNET([.R$24]+[.$BB109])+[.S$31]*[.$Z$5]*MAGNET([.S$24]+[.$BB109])+[.T$31]*[.$Z$5]*MAGNET([.T$24]+[.$BB109])+[.U$31]*[.$Z$5]*MAGNET([.U$24]+[.$BB109])+[.V$31]*[.$Z$5]*MAGNET([.V$24]+[.$BB109])+[.W$31]*[.$Z$5]*MAGNET([.W$24]+[.$BB109])+[.X$31]*[.$Z$5]*MAGNET([.X$24]+[.$BB109])+[.Y$31]*[.$Z$5]*MAGNET([.Y$24]+[.$BB109])+[.Z$31]*[.$Z$5]*MAGNET([.Z$24]+[.$BB109])+[.AA$31]*[.$Z$5]*MAGNET([.AA$24]+[.$BB109])+[.AB$31]*[.$Z$5]*MAGNET([.AB$24]+[.$BB109])+[.AC$31]*[.$Z$5]*MAGNET([.AC$24]+[.$BB109])+[.AD$31]*[.$Z$5]*MAGNET([.AD$24]+[.$BB109])+[.AE$31]*[.$Z$5]*MAGNET([.AE$24]+[.$BB109])+[.AF$31]*[.$Z$5]*MAGNET([.AF$24]+[.$BB109])+[.AG$31]*[.$Z$5]*MAGNET([.AG$24]+[.$BB109])+[.D$31]*[.$Z$5]*MAGNET([.D$24]+[.$BB109])+[.AH$31]*[.$Z$5]*MAGNET([.AH$24]+[.BB109]) +[.AI$31]*[.$Z$5]*MAGNET([.AI$24]+[.BB109]) +[.AJ$31]*[.$Z$5]*MAGNET([.AJ$24]+[.BB109]) +[.AK$31]*[.$Z$5]*MAGNET([.AK$24]+[.BB109]) +[.AL$31]*[.$Z$5]*MAGNET([.AL$24]+[.BB109]) +[.AM$31]*[.$Z$5]*MAGNET([.AM$24]+[.BB109]) +[.AN$31]*[.$Z$5]*MAGNET([.AN$24]+[.BB109]) +[.AO$31]*[.$Z$5]*MAGNET([.AO$24]+[.BB109]) +[.AP$31]*[.$Z$5]*MAGNET([.AP$24]+[.$BB109])&#10;+[.AQ$31]*[.$Z$5]*MAGNET([.AQ$24]+[.$BB109])&#10;+[.AR$31]*[.$Z$5]*MAGNET([.AR$24]+[.$BB109])&#10;+[.AS$31]*[.$Z$5]*MAGNET([.AS$24]+[.$BB109])&#10;+[.AT$31]*[.$Z$5]*MAGNET([.AT$24]+[.$BB109])&#10;+[.AU$31]*[.$Z$5]*MAGNET([.AU$24]+[.$BB109])&#10;+[.AV$31]*[.$Z$5]*MAGNET([.AV$24]+[.$BB109])&#10;+[.AW$31]*[.$Z$5]*MAGNET([.AW$24]+[.$BB109])&#10;+[.AX$31]*[.$Z$5]*MAGNET([.AX$24]+[.$BB109])&#10;+[.AY$31]*[.$Z$5]*MAGNET([.AY$24]+[.$BB109]) +RAND()*[.$BI$13]" office:value-type="float" office:value="0" calcext:value-type="float">
            <text:p>0</text:p>
          </table:table-cell>
          <table:table-cell table:style-name="ce71" table:formula="of:=[.E$32]*[.$Z$5]*MAGNET([.E$24]+[.$BB109])+[.F$32]*[.$Z$5]*MAGNET([.F$24]+[.$BB109])+[.G$32]*[.$Z$5]*MAGNET([.G$24]+[.$BB109])+[.H$32]*[.$Z$5]*MAGNET([.H$24]+[.$BB109])+[.I$32]*[.$Z$5]*MAGNET([.I$24]+[.$BB109])+[.J$32]*[.$Z$5]*MAGNET([.J$24]+[.$BB109])+[.K$32]*[.$Z$5]*MAGNET([.K$24]+[.$BB109])+[.L$32]*[.$Z$5]*MAGNET([.L$24]+[.$BB109])+[.M$32]*[.$Z$5]*MAGNET([.M$24]+[.$BB109])+[.N$32]*[.$Z$5]*MAGNET([.N$24]+[.$BB109])+[.O$32]*[.$Z$5]*MAGNET([.O$24]+[.$BB109])+[.P$32]*[.$Z$5]*MAGNET([.P$24]+[.$BB109])+[.Q$32]*[.$Z$5]*MAGNET([.Q$24]+[.$BB109])+[.R$32]*[.$Z$5]*MAGNET([.R$24]+[.$BB109])+[.S$32]*[.$Z$5]*MAGNET([.S$24]+[.$BB109])+[.T$32]*[.$Z$5]*MAGNET([.T$24]+[.$BB109])+[.U$32]*[.$Z$5]*MAGNET([.U$24]+[.$BB109])+[.V$32]*[.$Z$5]*MAGNET([.V$24]+[.$BB109])+[.W$32]*[.$Z$5]*MAGNET([.W$24]+[.$BB109])+[.X$32]*[.$Z$5]*MAGNET([.X$24]+[.$BB109])+[.Y$32]*[.$Z$5]*MAGNET([.Y$24]+[.$BB109])+[.Z$32]*[.$Z$5]*MAGNET([.Z$24]+[.$BB109])+[.AA$32]*[.$Z$5]*MAGNET([.AA$24]+[.$BB109])+[.AB$32]*[.$Z$5]*MAGNET([.AB$24]+[.$BB109])+[.AC$32]*[.$Z$5]*MAGNET([.AC$24]+[.$BB109])+[.AD$32]*[.$Z$5]*MAGNET([.AD$24]+[.$BB109])+[.AE$32]*[.$Z$5]*MAGNET([.AE$24]+[.$BB109])+[.AF$32]*[.$Z$5]*MAGNET([.AF$24]+[.$BB109])+[.AG$32]*[.$Z$5]*MAGNET([.AG$24]+[.$BB109])+[.D$32]*[.$Z$5]*MAGNET([.D$24]+[.$BB109])+[.AH$32]*[.$Z$5]*MAGNET([.AH$24]+[.BB109]) +[.AI$32]*[.$Z$5]*MAGNET([.AI$24]+[.BB109]) +[.AJ$32]*[.$Z$5]*MAGNET([.AJ$24]+[.BB109]) +[.AK$32]*[.$Z$5]*MAGNET([.AK$24]+[.BB109]) +[.AL$32]*[.$Z$5]*MAGNET([.AL$24]+[.BB109]) +[.AM$32]*[.$Z$5]*MAGNET([.AM$24]+[.BB109]) +[.AN$32]*[.$Z$5]*MAGNET([.AN$24]+[.BB109]) +[.AO$32]*[.$Z$5]*MAGNET([.AO$24]+[.BB109]) +[.AP$32]*[.$Z$5]*MAGNET([.AP$24]+[.$BB109])&#10;+[.AQ$32]*[.$Z$5]*MAGNET([.AQ$24]+[.$BB109])&#10;+[.AR$32]*[.$Z$5]*MAGNET([.AR$24]+[.$BB109])&#10;+[.AS$32]*[.$Z$5]*MAGNET([.AS$24]+[.$BB109])&#10;+[.AT$32]*[.$Z$5]*MAGNET([.AT$24]+[.$BB109])&#10;+[.AU$32]*[.$Z$5]*MAGNET([.AU$24]+[.$BB109])&#10;+[.AV$32]*[.$Z$5]*MAGNET([.AV$24]+[.$BB109])&#10;+[.AW$32]*[.$Z$5]*MAGNET([.AW$24]+[.$BB109])&#10;+[.AX$32]*[.$Z$5]*MAGNET([.AX$24]+[.$BB109])&#10;+[.AY$32]*[.$Z$5]*MAGNET([.AY$24]+[.$BB109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09]+0.002" office:value-type="float" office:value="0.19" calcext:value-type="float">
            <text:p>0.19</text:p>
          </table:table-cell>
          <table:table-cell table:formula="of:=[.BA110]*[.$D$6]" office:value-type="float" office:value="9.55044166691298" calcext:value-type="float">
            <text:p>9.550</text:p>
          </table:table-cell>
          <table:table-cell table:formula="of:=[.D$25]*[.$Z$5]*MAGNET([.D$24]+[.BB110])+[.E$25]*[.$Z$5]*MAGNET([.E$24]+[.BB110])+[.F$25]*[.$Z$5]*MAGNET([.F$24]+[.BB110])+[.G$25]*[.$Z$5]*MAGNET([.G$24]+[.BB110])+[.H$25]*[.$Z$5]*MAGNET([.H$24]+[.BB110])+[.I$25]*[.$Z$5]*MAGNET([.I$24]+[.BB110])+[.J$25]*[.$Z$5]*MAGNET([.J$24]+[.BB110])+[.K$25]*[.$Z$5]*MAGNET([.K$24]+[.BB110])+[.L$25]*[.$Z$5]*MAGNET([.L$24]+[.BB110])+[.M$25]*[.$Z$5]*MAGNET([.M$24]+[.BB110])+[.N$25]*[.$Z$5]*MAGNET([.N$24]+[.BB110])+[.O$25]*[.$Z$5]*MAGNET([.O$24]+[.BB110])+[.P$25]*[.$Z$5]*MAGNET([.P$24]+[.BB110])+[.Q$25]*[.$Z$5]*MAGNET([.Q$24]+[.BB110])+[.R$25]*[.$Z$5]*MAGNET([.R$24]+[.BB110])+[.S$25]*[.$Z$5]*MAGNET([.S$24]+[.BB110])+[.T$25]*[.$Z$5]*MAGNET([.T$24]+[.BB110])+[.U$25]*[.$Z$5]*MAGNET([.U$24]+[.BB110])+[.V$25]*[.$Z$5]*MAGNET([.V$24]+[.BB110])+[.W$25]*[.$Z$5]*MAGNET([.W$24]+[.BB110])+[.X$25]*[.$Z$5]*MAGNET([.X$24]+[.BB110])+[.Y$25]*[.$Z$5]*MAGNET([.Y$24]+[.BB110])+[.Z$25]*[.$Z$5]*MAGNET([.Z$24]+[.BB110])+[.AA$25]*[.$Z$5]*MAGNET([.AA$24]+[.BB110])+[.AB$25]*[.$Z$5]*MAGNET([.AB$24]+[.BB110])+[.AC$25]*[.$Z$5]*MAGNET([.AC$24]+[.BB110])+[.AD$25]*[.$Z$5]*MAGNET([.AD$24]+[.BB110])+[.AE$25]*[.$Z$5]*MAGNET([.AE$24]+[.BB110])+[.AF$25]*[.$Z$5]*MAGNET([.AF$24]+[.BB110])+[.AG$25]*[.$Z$5]*MAGNET([.AG$24]+[.BB110])+[.AH$25]*[.$Z$5]*MAGNET([.AH$24]+[.BB110]) +[.AI$25]*[.$Z$5]*MAGNET([.AI$24]+[.BB110]) +[.AJ$25]*[.$Z$5]*MAGNET([.AJ$24]+[.BB110]) +[.AK$25]*[.$Z$5]*MAGNET([.AK$24]+[.BB110]) +[.AL$25]*[.$Z$5]*MAGNET([.AL$24]+[.BB110]) +[.AM$25]*[.$Z$5]*MAGNET([.AM$24]+[.BB110]) +[.AN$25]*[.$Z$5]*MAGNET([.AN$24]+[.BB110]) +[.AO$25]*[.$Z$5]*MAGNET([.AO$24]+[.BB110])+RAND()*[.$BC$13]+[.AP$25]*[.$Z$5]*MAGNET([.AP$24]+[.BB110])&#10;+[.AQ$25]*[.$Z$5]*MAGNET([.AQ$24]+[.BB110])&#10;+[.AR$25]*[.$Z$5]*MAGNET([.AR$24]+[.BB110])&#10;+[.AS$25]*[.$Z$5]*MAGNET([.AS$24]+[.BB110])&#10;+[.AT$25]*[.$Z$5]*MAGNET([.AT$24]+[.BB110])&#10;+[.AU$25]*[.$Z$5]*MAGNET([.AU$24]+[.BB110])&#10;+[.AV$25]*[.$Z$5]*MAGNET([.AV$24]+[.BB110])&#10;+[.AW$25]*[.$Z$5]*MAGNET([.AW$24]+[.BB110])&#10;+[.AX$25]*[.$Z$5]*MAGNET([.AX$24]+[.BB110])&#10;+[.AY$25]*[.$Z$5]*MAGNET([.AY$24]+[.BB110])" office:value-type="float" office:value="37.0837941941285" calcext:value-type="float">
            <text:p>37.08</text:p>
          </table:table-cell>
          <table:table-cell table:style-name="ce70" table:formula="of:=[.E$26]*[.$Z$5]*MAGNET([.E$24]+[.$BB110])+[.F$26]*[.$Z$5]*MAGNET([.F$24]+[.$BB110])+[.G$26]*[.$Z$5]*MAGNET([.G$24]+[.$BB110])+[.H$26]*[.$Z$5]*MAGNET([.H$24]+[.$BB110])+[.I$26]*[.$Z$5]*MAGNET([.I$24]+[.$BB110])+[.J$26]*[.$Z$5]*MAGNET([.J$24]+[.$BB110])+[.K$26]*[.$Z$5]*MAGNET([.K$24]+[.$BB110])+[.L$26]*[.$Z$5]*MAGNET([.L$24]+[.$BB110])+[.M$26]*[.$Z$5]*MAGNET([.M$24]+[.$BB110])+[.N$26]*[.$Z$5]*MAGNET([.N$24]+[.$BB110])+[.O$26]*[.$Z$5]*MAGNET([.O$24]+[.$BB110])+[.P$26]*[.$Z$5]*MAGNET([.P$24]+[.$BB110])+[.Q$26]*[.$Z$5]*MAGNET([.Q$24]+[.$BB110])+[.R$26]*[.$Z$5]*MAGNET([.R$24]+[.$BB110])+[.S$26]*[.$Z$5]*MAGNET([.S$24]+[.$BB110])+[.T$26]*[.$Z$5]*MAGNET([.T$24]+[.$BB110])+[.U$26]*[.$Z$5]*MAGNET([.U$24]+[.$BB110])+[.V$26]*[.$Z$5]*MAGNET([.V$24]+[.$BB110])+[.W$26]*[.$Z$5]*MAGNET([.W$24]+[.$BB110])+[.X$26]*[.$Z$5]*MAGNET([.X$24]+[.$BB110])+[.Y$26]*[.$Z$5]*MAGNET([.Y$24]+[.$BB110])+[.Z$26]*[.$Z$5]*MAGNET([.Z$24]+[.$BB110])+[.AA$26]*[.$Z$5]*MAGNET([.AA$24]+[.$BB110])+[.AB$26]*[.$Z$5]*MAGNET([.AB$24]+[.$BB110])+[.AC$26]*[.$Z$5]*MAGNET([.AC$24]+[.$BB110])+[.AD$26]*[.$Z$5]*MAGNET([.AD$24]+[.$BB110])+[.AE$26]*[.$Z$5]*MAGNET([.AE$24]+[.$BB110])+[.AF$26]*[.$Z$5]*MAGNET([.AF$24]+[.$BB110])+[.AG$26]*[.$Z$5]*MAGNET([.AG$24]+[.$BB110])+[.D$26]*[.$Z$5]*MAGNET([.D$24]+[.$BB110])+[.AH$26]*[.$Z$5]*MAGNET([.AH$24]+[.BB110]) +[.AI$26]*[.$Z$5]*MAGNET([.AI$24]+[.BB110]) +[.AJ$26]*[.$Z$5]*MAGNET([.AJ$24]+[.BB110]) +[.AK$26]*[.$Z$5]*MAGNET([.AK$24]+[.BB110]) +[.AL$26]*[.$Z$5]*MAGNET([.AL$24]+[.BB110]) +[.AM$26]*[.$Z$5]*MAGNET([.AM$24]+[.BB110]) +[.AN$26]*[.$Z$5]*MAGNET([.AN$24]+[.BB110]) +[.AO$26]*[.$Z$5]*MAGNET([.AO$24]+[.BB110]) +[.AP$26]*[.$Z$5]*MAGNET([.AP$24]+[.$BB110])&#10;+[.AQ$26]*[.$Z$5]*MAGNET([.AQ$24]+[.$BB110])&#10;+[.AR$26]*[.$Z$5]*MAGNET([.AR$24]+[.$BB110])&#10;+[.AS$26]*[.$Z$5]*MAGNET([.AS$24]+[.$BB110])&#10;+[.AT$26]*[.$Z$5]*MAGNET([.AT$24]+[.$BB110])&#10;+[.AU$26]*[.$Z$5]*MAGNET([.AU$24]+[.$BB110])&#10;+[.AV$26]*[.$Z$5]*MAGNET([.AV$24]+[.$BB110])&#10;+[.AW$26]*[.$Z$5]*MAGNET([.AW$24]+[.$BB110])&#10;+[.AX$26]*[.$Z$5]*MAGNET([.AX$24]+[.$BB110])&#10;+[.AY$26]*[.$Z$5]*MAGNET([.AY$24]+[.$BB110]) +RAND()*[.$BD$13]" office:value-type="float" office:value="-84.7522613328602" calcext:value-type="float">
            <text:p>-84.75</text:p>
          </table:table-cell>
          <table:table-cell table:style-name="ce71" table:formula="of:=[.E$27]*[.$Z$5]*MAGNET([.E$24]+[.$BB110])+[.F$27]*[.$Z$5]*MAGNET([.F$24]+[.$BB110])+[.G$27]*[.$Z$5]*MAGNET([.G$24]+[.$BB110])+[.H$27]*[.$Z$5]*MAGNET([.H$24]+[.$BB110])+[.I$27]*[.$Z$5]*MAGNET([.I$24]+[.$BB110])+[.J$27]*[.$Z$5]*MAGNET([.J$24]+[.$BB110])+[.K$27]*[.$Z$5]*MAGNET([.K$24]+[.$BB110])+[.L$27]*[.$Z$5]*MAGNET([.L$24]+[.$BB110])+[.M$27]*[.$Z$5]*MAGNET([.M$24]+[.$BB110])+[.N$27]*[.$Z$5]*MAGNET([.N$24]+[.$BB110])+[.O$27]*[.$Z$5]*MAGNET([.O$24]+[.$BB110])+[.P$27]*[.$Z$5]*MAGNET([.P$24]+[.$BB110])+[.Q$27]*[.$Z$5]*MAGNET([.Q$24]+[.$BB110])+[.R$27]*[.$Z$5]*MAGNET([.R$24]+[.$BB110])+[.S$27]*[.$Z$5]*MAGNET([.S$24]+[.$BB110])+[.T$27]*[.$Z$5]*MAGNET([.T$24]+[.$BB110])+[.U$27]*[.$Z$5]*MAGNET([.U$24]+[.$BB110])+[.V$27]*[.$Z$5]*MAGNET([.V$24]+[.$BB110])+[.W$27]*[.$Z$5]*MAGNET([.W$24]+[.$BB110])+[.X$27]*[.$Z$5]*MAGNET([.X$24]+[.$BB110])+[.Y$27]*[.$Z$5]*MAGNET([.Y$24]+[.$BB110])+[.Z$27]*[.$Z$5]*MAGNET([.Z$24]+[.$BB110])+[.AA$27]*[.$Z$5]*MAGNET([.AA$24]+[.$BB110])+[.AB$27]*[.$Z$5]*MAGNET([.AB$24]+[.$BB110])+[.AC$27]*[.$Z$5]*MAGNET([.AC$24]+[.$BB110])+[.AD$27]*[.$Z$5]*MAGNET([.AD$24]+[.$BB110])+[.AE$27]*[.$Z$5]*MAGNET([.AE$24]+[.$BB110])+[.AF$27]*[.$Z$5]*MAGNET([.AF$24]+[.$BB110])+[.AG$27]*[.$Z$5]*MAGNET([.AG$24]+[.$BB110])+[.D$27]*[.$Z$5]*MAGNET([.D$24]+[.$BB110])+[.AH$27]*[.$Z$5]*MAGNET([.AH$24]+[.BB110]) +[.AI$27]*[.$Z$5]*MAGNET([.AI$24]+[.BB110]) +[.AJ$27]*[.$Z$5]*MAGNET([.AJ$24]+[.BB110]) +[.AK$27]*[.$Z$5]*MAGNET([.AK$24]+[.BB110]) +[.AL$27]*[.$Z$5]*MAGNET([.AL$24]+[.BB110]) +[.AM$27]*[.$Z$5]*MAGNET([.AM$24]+[.BB110]) +[.AN$27]*[.$Z$5]*MAGNET([.AN$24]+[.BB110]) +[.AO$27]*[.$Z$5]*MAGNET([.AO$24]+[.BB110]) +[.AP$27]*[.$Z$5]*MAGNET([.AP$24]+[.$BB110])&#10;+[.AQ$27]*[.$Z$5]*MAGNET([.AQ$24]+[.$BB110])&#10;+[.AR$27]*[.$Z$5]*MAGNET([.AR$24]+[.$BB110])&#10;+[.AS$27]*[.$Z$5]*MAGNET([.AS$24]+[.$BB110])&#10;+[.AT$27]*[.$Z$5]*MAGNET([.AT$24]+[.$BB110])&#10;+[.AU$27]*[.$Z$5]*MAGNET([.AU$24]+[.$BB110])&#10;+[.AV$27]*[.$Z$5]*MAGNET([.AV$24]+[.$BB110])&#10;+[.AW$27]*[.$Z$5]*MAGNET([.AW$24]+[.$BB110])&#10;+[.AX$27]*[.$Z$5]*MAGNET([.AX$24]+[.$BB110])&#10;+[.AY$27]*[.$Z$5]*MAGNET([.AY$24]+[.$BB110]) +RAND()*[.$BE$13]" office:value-type="float" office:value="74.5861800376043" calcext:value-type="float">
            <text:p>74.5861800376043</text:p>
          </table:table-cell>
          <table:table-cell table:style-name="ce71" table:formula="of:=[.E$28]*[.$Z$5]*MAGNET([.E$24]+[.$BB110])+[.F$28]*[.$Z$5]*MAGNET([.F$24]+[.$BB110])+[.G$28]*[.$Z$5]*MAGNET([.G$24]+[.$BB110])+[.H$28]*[.$Z$5]*MAGNET([.H$24]+[.$BB110])+[.I$28]*[.$Z$5]*MAGNET([.I$24]+[.$BB110])+[.J$28]*[.$Z$5]*MAGNET([.J$24]+[.$BB110])+[.K$28]*[.$Z$5]*MAGNET([.K$24]+[.$BB110])+[.L$28]*[.$Z$5]*MAGNET([.L$24]+[.$BB110])+[.M$28]*[.$Z$5]*MAGNET([.M$24]+[.$BB110])+[.N$28]*[.$Z$5]*MAGNET([.N$24]+[.$BB110])+[.O$28]*[.$Z$5]*MAGNET([.O$24]+[.$BB110])+[.P$28]*[.$Z$5]*MAGNET([.P$24]+[.$BB110])+[.Q$28]*[.$Z$5]*MAGNET([.Q$24]+[.$BB110])+[.R$28]*[.$Z$5]*MAGNET([.R$24]+[.$BB110])+[.S$28]*[.$Z$5]*MAGNET([.S$24]+[.$BB110])+[.T$28]*[.$Z$5]*MAGNET([.T$24]+[.$BB110])+[.U$28]*[.$Z$5]*MAGNET([.U$24]+[.$BB110])+[.V$28]*[.$Z$5]*MAGNET([.V$24]+[.$BB110])+[.W$28]*[.$Z$5]*MAGNET([.W$24]+[.$BB110])+[.X$28]*[.$Z$5]*MAGNET([.X$24]+[.$BB110])+[.Y$28]*[.$Z$5]*MAGNET([.Y$24]+[.$BB110])+[.Z$28]*[.$Z$5]*MAGNET([.Z$24]+[.$BB110])+[.AA$28]*[.$Z$5]*MAGNET([.AA$24]+[.$BB110])+[.AB$28]*[.$Z$5]*MAGNET([.AB$24]+[.$BB110])+[.AC$28]*[.$Z$5]*MAGNET([.AC$24]+[.$BB110])+[.AD$28]*[.$Z$5]*MAGNET([.AD$24]+[.$BB110])+[.AE$28]*[.$Z$5]*MAGNET([.AE$24]+[.$BB110])+[.AF$28]*[.$Z$5]*MAGNET([.AF$24]+[.$BB110])+[.AG$28]*[.$Z$5]*MAGNET([.AG$24]+[.$BB110])+[.D$28]*[.$Z$5]*MAGNET([.D$24]+[.$BB110])+[.AH$28]*[.$Z$5]*MAGNET([.AH$24]+[.BB110]) +[.AI$28]*[.$Z$5]*MAGNET([.AI$24]+[.BB110]) +[.AJ$28]*[.$Z$5]*MAGNET([.AJ$24]+[.BB110]) +[.AK$28]*[.$Z$5]*MAGNET([.AK$24]+[.BB110]) +[.AL$28]*[.$Z$5]*MAGNET([.AL$24]+[.BB110]) +[.AM$28]*[.$Z$5]*MAGNET([.AM$24]+[.BB110]) +[.AN$28]*[.$Z$5]*MAGNET([.AN$24]+[.BB110]) +[.AO$28]*[.$Z$5]*MAGNET([.AO$24]+[.BB110]) +[.AP$28]*[.$Z$5]*MAGNET([.AP$24]+[.$BB110])&#10;+[.AQ$28]*[.$Z$5]*MAGNET([.AQ$24]+[.$BB110])&#10;+[.AR$28]*[.$Z$5]*MAGNET([.AR$24]+[.$BB110])&#10;+[.AS$28]*[.$Z$5]*MAGNET([.AS$24]+[.$BB110])&#10;+[.AT$28]*[.$Z$5]*MAGNET([.AT$24]+[.$BB110])&#10;+[.AU$28]*[.$Z$5]*MAGNET([.AU$24]+[.$BB110])&#10;+[.AV$28]*[.$Z$5]*MAGNET([.AV$24]+[.$BB110])&#10;+[.AW$28]*[.$Z$5]*MAGNET([.AW$24]+[.$BB110])&#10;+[.AX$28]*[.$Z$5]*MAGNET([.AX$24]+[.$BB110])&#10;+[.AY$28]*[.$Z$5]*MAGNET([.AY$24]+[.$BB110]) +RAND()*[.$BF$13]" office:value-type="float" office:value="10.0076892708881" calcext:value-type="float">
            <text:p>10.0076892708881</text:p>
          </table:table-cell>
          <table:table-cell table:style-name="ce71" table:formula="of:=[.E$29]*[.$Z$5]*MAGNET([.E$24]+[.$BB110])+[.F$29]*[.$Z$5]*MAGNET([.F$24]+[.$BB110])+[.G$29]*[.$Z$5]*MAGNET([.G$24]+[.$BB110])+[.H$29]*[.$Z$5]*MAGNET([.H$24]+[.$BB110])+[.I$29]*[.$Z$5]*MAGNET([.I$24]+[.$BB110])+[.J$29]*[.$Z$5]*MAGNET([.J$24]+[.$BB110])+[.K$29]*[.$Z$5]*MAGNET([.K$24]+[.$BB110])+[.L$29]*[.$Z$5]*MAGNET([.L$24]+[.$BB110])+[.M$29]*[.$Z$5]*MAGNET([.M$24]+[.$BB110])+[.N$29]*[.$Z$5]*MAGNET([.N$24]+[.$BB110])+[.O$29]*[.$Z$5]*MAGNET([.O$24]+[.$BB110])+[.P$29]*[.$Z$5]*MAGNET([.P$24]+[.$BB110])+[.Q$29]*[.$Z$5]*MAGNET([.Q$24]+[.$BB110])+[.R$29]*[.$Z$5]*MAGNET([.R$24]+[.$BB110])+[.S$29]*[.$Z$5]*MAGNET([.S$24]+[.$BB110])+[.T$29]*[.$Z$5]*MAGNET([.T$24]+[.$BB110])+[.U$29]*[.$Z$5]*MAGNET([.U$24]+[.$BB110])+[.V$29]*[.$Z$5]*MAGNET([.V$24]+[.$BB110])+[.W$29]*[.$Z$5]*MAGNET([.W$24]+[.$BB110])+[.X$29]*[.$Z$5]*MAGNET([.X$24]+[.$BB110])+[.Y$29]*[.$Z$5]*MAGNET([.Y$24]+[.$BB110])+[.Z$29]*[.$Z$5]*MAGNET([.Z$24]+[.$BB110])+[.AA$29]*[.$Z$5]*MAGNET([.AA$24]+[.$BB110])+[.AB$29]*[.$Z$5]*MAGNET([.AB$24]+[.$BB110])+[.AC$29]*[.$Z$5]*MAGNET([.AC$24]+[.$BB110])+[.AD$29]*[.$Z$5]*MAGNET([.AD$24]+[.$BB110])+[.AE$29]*[.$Z$5]*MAGNET([.AE$24]+[.$BB110])+[.AF$29]*[.$Z$5]*MAGNET([.AF$24]+[.$BB110])+[.AG$29]*[.$Z$5]*MAGNET([.AG$24]+[.$BB110])+[.D$29]*[.$Z$5]*MAGNET([.D$24]+[.$BB110])+[.AH$29]*[.$Z$5]*MAGNET([.AH$24]+[.BB110]) +[.AI$29]*[.$Z$5]*MAGNET([.AI$24]+[.BB110]) +[.AJ$29]*[.$Z$5]*MAGNET([.AJ$24]+[.BB110]) +[.AK$29]*[.$Z$5]*MAGNET([.AK$24]+[.BB110]) +[.AL$29]*[.$Z$5]*MAGNET([.AL$24]+[.BB110]) +[.AM$29]*[.$Z$5]*MAGNET([.AM$24]+[.BB110]) +[.AN$29]*[.$Z$5]*MAGNET([.AN$24]+[.BB110]) +[.AO$29]*[.$Z$5]*MAGNET([.AO$24]+[.BB110]) +[.AP$29]*[.$Z$5]*MAGNET([.AP$24]+[.$BB110])&#10;+[.AQ$29]*[.$Z$5]*MAGNET([.AQ$24]+[.$BB110])&#10;+[.AR$29]*[.$Z$5]*MAGNET([.AR$24]+[.$BB110])&#10;+[.AS$29]*[.$Z$5]*MAGNET([.AS$24]+[.$BB110])&#10;+[.AT$29]*[.$Z$5]*MAGNET([.AT$24]+[.$BB110])&#10;+[.AU$29]*[.$Z$5]*MAGNET([.AU$24]+[.$BB110])&#10;+[.AV$29]*[.$Z$5]*MAGNET([.AV$24]+[.$BB110])&#10;+[.AW$29]*[.$Z$5]*MAGNET([.AW$24]+[.$BB110])&#10;+[.AX$29]*[.$Z$5]*MAGNET([.AX$24]+[.$BB110])&#10;+[.AY$29]*[.$Z$5]*MAGNET([.AY$24]+[.$BB110]) +RAND()*[.$BG$13]" office:value-type="float" office:value="-32.0706635743243" calcext:value-type="float">
            <text:p>-32.0706635743243</text:p>
          </table:table-cell>
          <table:table-cell table:style-name="ce71" table:formula="of:=[.E$30]*[.$Z$5]*MAGNET([.E$24]+[.$BB110])+[.F$30]*[.$Z$5]*MAGNET([.F$24]+[.$BB110])+[.G$30]*[.$Z$5]*MAGNET([.G$24]+[.$BB110])+[.H$30]*[.$Z$5]*MAGNET([.H$24]+[.$BB110])+[.I$30]*[.$Z$5]*MAGNET([.I$24]+[.$BB110])+[.J$30]*[.$Z$5]*MAGNET([.J$24]+[.$BB110])+[.K$30]*[.$Z$5]*MAGNET([.K$24]+[.$BB110])+[.L$30]*[.$Z$5]*MAGNET([.L$24]+[.$BB110])+[.M$30]*[.$Z$5]*MAGNET([.M$24]+[.$BB110])+[.N$30]*[.$Z$5]*MAGNET([.N$24]+[.$BB110])+[.O$30]*[.$Z$5]*MAGNET([.O$24]+[.$BB110])+[.P$30]*[.$Z$5]*MAGNET([.P$24]+[.$BB110])+[.Q$30]*[.$Z$5]*MAGNET([.Q$24]+[.$BB110])+[.R$30]*[.$Z$5]*MAGNET([.R$24]+[.$BB110])+[.S$30]*[.$Z$5]*MAGNET([.S$24]+[.$BB110])+[.T$30]*[.$Z$5]*MAGNET([.T$24]+[.$BB110])+[.U$30]*[.$Z$5]*MAGNET([.U$24]+[.$BB110])+[.V$30]*[.$Z$5]*MAGNET([.V$24]+[.$BB110])+[.W$30]*[.$Z$5]*MAGNET([.W$24]+[.$BB110])+[.X$30]*[.$Z$5]*MAGNET([.X$24]+[.$BB110])+[.Y$30]*[.$Z$5]*MAGNET([.Y$24]+[.$BB110])+[.Z$30]*[.$Z$5]*MAGNET([.Z$24]+[.$BB110])+[.AA$30]*[.$Z$5]*MAGNET([.AA$24]+[.$BB110])+[.AB$30]*[.$Z$5]*MAGNET([.AB$24]+[.$BB110])+[.AC$30]*[.$Z$5]*MAGNET([.AC$24]+[.$BB110])+[.AD$30]*[.$Z$5]*MAGNET([.AD$24]+[.$BB110])+[.AE$30]*[.$Z$5]*MAGNET([.AE$24]+[.$BB110])+[.AF$30]*[.$Z$5]*MAGNET([.AF$24]+[.$BB110])+[.AG$30]*[.$Z$5]*MAGNET([.AG$24]+[.$BB110])+[.D$30]*[.$Z$5]*MAGNET([.D$24]+[.$BB110])+[.AH$30]*[.$Z$5]*MAGNET([.AH$24]+[.BB110]) +[.AI$30]*[.$Z$5]*MAGNET([.AI$24]+[.BB110]) +[.AJ$30]*[.$Z$5]*MAGNET([.AJ$24]+[.BB110]) +[.AK$30]*[.$Z$5]*MAGNET([.AK$24]+[.BB110]) +[.AL$30]*[.$Z$5]*MAGNET([.AL$24]+[.BB110]) +[.AM$30]*[.$Z$5]*MAGNET([.AM$24]+[.BB110]) +[.AN$30]*[.$Z$5]*MAGNET([.AN$24]+[.BB110]) +[.AO$30]*[.$Z$5]*MAGNET([.AO$24]+[.BB110]) +[.AP$30]*[.$Z$5]*MAGNET([.AP$24]+[.$BB110])&#10;+[.AQ$30]*[.$Z$5]*MAGNET([.AQ$24]+[.$BB110])&#10;+[.AR$30]*[.$Z$5]*MAGNET([.AR$24]+[.$BB110])&#10;+[.AS$30]*[.$Z$5]*MAGNET([.AS$24]+[.$BB110])&#10;+[.AT$30]*[.$Z$5]*MAGNET([.AT$24]+[.$BB110])&#10;+[.AU$30]*[.$Z$5]*MAGNET([.AU$24]+[.$BB110])&#10;+[.AV$30]*[.$Z$5]*MAGNET([.AV$24]+[.$BB110])&#10;+[.AW$30]*[.$Z$5]*MAGNET([.AW$24]+[.$BB110])&#10;+[.AX$30]*[.$Z$5]*MAGNET([.AX$24]+[.$BB110])&#10;+[.AY$30]*[.$Z$5]*MAGNET([.AY$24]+[.$BB110]) +RAND()*[.$BH$13]" office:value-type="float" office:value="0" calcext:value-type="float">
            <text:p>0</text:p>
          </table:table-cell>
          <table:table-cell table:style-name="ce71" table:formula="of:=[.E$31]*[.$Z$5]*MAGNET([.E$24]+[.$BB110])+[.F$31]*[.$Z$5]*MAGNET([.F$24]+[.$BB110])+[.G$31]*[.$Z$5]*MAGNET([.G$24]+[.$BB110])+[.H$31]*[.$Z$5]*MAGNET([.H$24]+[.$BB110])+[.I$31]*[.$Z$5]*MAGNET([.I$24]+[.$BB110])+[.J$31]*[.$Z$5]*MAGNET([.J$24]+[.$BB110])+[.K$31]*[.$Z$5]*MAGNET([.K$24]+[.$BB110])+[.L$31]*[.$Z$5]*MAGNET([.L$24]+[.$BB110])+[.M$31]*[.$Z$5]*MAGNET([.M$24]+[.$BB110])+[.N$31]*[.$Z$5]*MAGNET([.N$24]+[.$BB110])+[.O$31]*[.$Z$5]*MAGNET([.O$24]+[.$BB110])+[.P$31]*[.$Z$5]*MAGNET([.P$24]+[.$BB110])+[.Q$31]*[.$Z$5]*MAGNET([.Q$24]+[.$BB110])+[.R$31]*[.$Z$5]*MAGNET([.R$24]+[.$BB110])+[.S$31]*[.$Z$5]*MAGNET([.S$24]+[.$BB110])+[.T$31]*[.$Z$5]*MAGNET([.T$24]+[.$BB110])+[.U$31]*[.$Z$5]*MAGNET([.U$24]+[.$BB110])+[.V$31]*[.$Z$5]*MAGNET([.V$24]+[.$BB110])+[.W$31]*[.$Z$5]*MAGNET([.W$24]+[.$BB110])+[.X$31]*[.$Z$5]*MAGNET([.X$24]+[.$BB110])+[.Y$31]*[.$Z$5]*MAGNET([.Y$24]+[.$BB110])+[.Z$31]*[.$Z$5]*MAGNET([.Z$24]+[.$BB110])+[.AA$31]*[.$Z$5]*MAGNET([.AA$24]+[.$BB110])+[.AB$31]*[.$Z$5]*MAGNET([.AB$24]+[.$BB110])+[.AC$31]*[.$Z$5]*MAGNET([.AC$24]+[.$BB110])+[.AD$31]*[.$Z$5]*MAGNET([.AD$24]+[.$BB110])+[.AE$31]*[.$Z$5]*MAGNET([.AE$24]+[.$BB110])+[.AF$31]*[.$Z$5]*MAGNET([.AF$24]+[.$BB110])+[.AG$31]*[.$Z$5]*MAGNET([.AG$24]+[.$BB110])+[.D$31]*[.$Z$5]*MAGNET([.D$24]+[.$BB110])+[.AH$31]*[.$Z$5]*MAGNET([.AH$24]+[.BB110]) +[.AI$31]*[.$Z$5]*MAGNET([.AI$24]+[.BB110]) +[.AJ$31]*[.$Z$5]*MAGNET([.AJ$24]+[.BB110]) +[.AK$31]*[.$Z$5]*MAGNET([.AK$24]+[.BB110]) +[.AL$31]*[.$Z$5]*MAGNET([.AL$24]+[.BB110]) +[.AM$31]*[.$Z$5]*MAGNET([.AM$24]+[.BB110]) +[.AN$31]*[.$Z$5]*MAGNET([.AN$24]+[.BB110]) +[.AO$31]*[.$Z$5]*MAGNET([.AO$24]+[.BB110]) +[.AP$31]*[.$Z$5]*MAGNET([.AP$24]+[.$BB110])&#10;+[.AQ$31]*[.$Z$5]*MAGNET([.AQ$24]+[.$BB110])&#10;+[.AR$31]*[.$Z$5]*MAGNET([.AR$24]+[.$BB110])&#10;+[.AS$31]*[.$Z$5]*MAGNET([.AS$24]+[.$BB110])&#10;+[.AT$31]*[.$Z$5]*MAGNET([.AT$24]+[.$BB110])&#10;+[.AU$31]*[.$Z$5]*MAGNET([.AU$24]+[.$BB110])&#10;+[.AV$31]*[.$Z$5]*MAGNET([.AV$24]+[.$BB110])&#10;+[.AW$31]*[.$Z$5]*MAGNET([.AW$24]+[.$BB110])&#10;+[.AX$31]*[.$Z$5]*MAGNET([.AX$24]+[.$BB110])&#10;+[.AY$31]*[.$Z$5]*MAGNET([.AY$24]+[.$BB110]) +RAND()*[.$BI$13]" office:value-type="float" office:value="0" calcext:value-type="float">
            <text:p>0</text:p>
          </table:table-cell>
          <table:table-cell table:style-name="ce71" table:formula="of:=[.E$32]*[.$Z$5]*MAGNET([.E$24]+[.$BB110])+[.F$32]*[.$Z$5]*MAGNET([.F$24]+[.$BB110])+[.G$32]*[.$Z$5]*MAGNET([.G$24]+[.$BB110])+[.H$32]*[.$Z$5]*MAGNET([.H$24]+[.$BB110])+[.I$32]*[.$Z$5]*MAGNET([.I$24]+[.$BB110])+[.J$32]*[.$Z$5]*MAGNET([.J$24]+[.$BB110])+[.K$32]*[.$Z$5]*MAGNET([.K$24]+[.$BB110])+[.L$32]*[.$Z$5]*MAGNET([.L$24]+[.$BB110])+[.M$32]*[.$Z$5]*MAGNET([.M$24]+[.$BB110])+[.N$32]*[.$Z$5]*MAGNET([.N$24]+[.$BB110])+[.O$32]*[.$Z$5]*MAGNET([.O$24]+[.$BB110])+[.P$32]*[.$Z$5]*MAGNET([.P$24]+[.$BB110])+[.Q$32]*[.$Z$5]*MAGNET([.Q$24]+[.$BB110])+[.R$32]*[.$Z$5]*MAGNET([.R$24]+[.$BB110])+[.S$32]*[.$Z$5]*MAGNET([.S$24]+[.$BB110])+[.T$32]*[.$Z$5]*MAGNET([.T$24]+[.$BB110])+[.U$32]*[.$Z$5]*MAGNET([.U$24]+[.$BB110])+[.V$32]*[.$Z$5]*MAGNET([.V$24]+[.$BB110])+[.W$32]*[.$Z$5]*MAGNET([.W$24]+[.$BB110])+[.X$32]*[.$Z$5]*MAGNET([.X$24]+[.$BB110])+[.Y$32]*[.$Z$5]*MAGNET([.Y$24]+[.$BB110])+[.Z$32]*[.$Z$5]*MAGNET([.Z$24]+[.$BB110])+[.AA$32]*[.$Z$5]*MAGNET([.AA$24]+[.$BB110])+[.AB$32]*[.$Z$5]*MAGNET([.AB$24]+[.$BB110])+[.AC$32]*[.$Z$5]*MAGNET([.AC$24]+[.$BB110])+[.AD$32]*[.$Z$5]*MAGNET([.AD$24]+[.$BB110])+[.AE$32]*[.$Z$5]*MAGNET([.AE$24]+[.$BB110])+[.AF$32]*[.$Z$5]*MAGNET([.AF$24]+[.$BB110])+[.AG$32]*[.$Z$5]*MAGNET([.AG$24]+[.$BB110])+[.D$32]*[.$Z$5]*MAGNET([.D$24]+[.$BB110])+[.AH$32]*[.$Z$5]*MAGNET([.AH$24]+[.BB110]) +[.AI$32]*[.$Z$5]*MAGNET([.AI$24]+[.BB110]) +[.AJ$32]*[.$Z$5]*MAGNET([.AJ$24]+[.BB110]) +[.AK$32]*[.$Z$5]*MAGNET([.AK$24]+[.BB110]) +[.AL$32]*[.$Z$5]*MAGNET([.AL$24]+[.BB110]) +[.AM$32]*[.$Z$5]*MAGNET([.AM$24]+[.BB110]) +[.AN$32]*[.$Z$5]*MAGNET([.AN$24]+[.BB110]) +[.AO$32]*[.$Z$5]*MAGNET([.AO$24]+[.BB110]) +[.AP$32]*[.$Z$5]*MAGNET([.AP$24]+[.$BB110])&#10;+[.AQ$32]*[.$Z$5]*MAGNET([.AQ$24]+[.$BB110])&#10;+[.AR$32]*[.$Z$5]*MAGNET([.AR$24]+[.$BB110])&#10;+[.AS$32]*[.$Z$5]*MAGNET([.AS$24]+[.$BB110])&#10;+[.AT$32]*[.$Z$5]*MAGNET([.AT$24]+[.$BB110])&#10;+[.AU$32]*[.$Z$5]*MAGNET([.AU$24]+[.$BB110])&#10;+[.AV$32]*[.$Z$5]*MAGNET([.AV$24]+[.$BB110])&#10;+[.AW$32]*[.$Z$5]*MAGNET([.AW$24]+[.$BB110])&#10;+[.AX$32]*[.$Z$5]*MAGNET([.AX$24]+[.$BB110])&#10;+[.AY$32]*[.$Z$5]*MAGNET([.AY$24]+[.$BB110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10]+0.002" office:value-type="float" office:value="0.192" calcext:value-type="float">
            <text:p>0.192</text:p>
          </table:table-cell>
          <table:table-cell table:formula="of:=[.BA111]*[.$D$6]" office:value-type="float" office:value="9.65097263182785" calcext:value-type="float">
            <text:p>9.651</text:p>
          </table:table-cell>
          <table:table-cell table:formula="of:=[.D$25]*[.$Z$5]*MAGNET([.D$24]+[.BB111])+[.E$25]*[.$Z$5]*MAGNET([.E$24]+[.BB111])+[.F$25]*[.$Z$5]*MAGNET([.F$24]+[.BB111])+[.G$25]*[.$Z$5]*MAGNET([.G$24]+[.BB111])+[.H$25]*[.$Z$5]*MAGNET([.H$24]+[.BB111])+[.I$25]*[.$Z$5]*MAGNET([.I$24]+[.BB111])+[.J$25]*[.$Z$5]*MAGNET([.J$24]+[.BB111])+[.K$25]*[.$Z$5]*MAGNET([.K$24]+[.BB111])+[.L$25]*[.$Z$5]*MAGNET([.L$24]+[.BB111])+[.M$25]*[.$Z$5]*MAGNET([.M$24]+[.BB111])+[.N$25]*[.$Z$5]*MAGNET([.N$24]+[.BB111])+[.O$25]*[.$Z$5]*MAGNET([.O$24]+[.BB111])+[.P$25]*[.$Z$5]*MAGNET([.P$24]+[.BB111])+[.Q$25]*[.$Z$5]*MAGNET([.Q$24]+[.BB111])+[.R$25]*[.$Z$5]*MAGNET([.R$24]+[.BB111])+[.S$25]*[.$Z$5]*MAGNET([.S$24]+[.BB111])+[.T$25]*[.$Z$5]*MAGNET([.T$24]+[.BB111])+[.U$25]*[.$Z$5]*MAGNET([.U$24]+[.BB111])+[.V$25]*[.$Z$5]*MAGNET([.V$24]+[.BB111])+[.W$25]*[.$Z$5]*MAGNET([.W$24]+[.BB111])+[.X$25]*[.$Z$5]*MAGNET([.X$24]+[.BB111])+[.Y$25]*[.$Z$5]*MAGNET([.Y$24]+[.BB111])+[.Z$25]*[.$Z$5]*MAGNET([.Z$24]+[.BB111])+[.AA$25]*[.$Z$5]*MAGNET([.AA$24]+[.BB111])+[.AB$25]*[.$Z$5]*MAGNET([.AB$24]+[.BB111])+[.AC$25]*[.$Z$5]*MAGNET([.AC$24]+[.BB111])+[.AD$25]*[.$Z$5]*MAGNET([.AD$24]+[.BB111])+[.AE$25]*[.$Z$5]*MAGNET([.AE$24]+[.BB111])+[.AF$25]*[.$Z$5]*MAGNET([.AF$24]+[.BB111])+[.AG$25]*[.$Z$5]*MAGNET([.AG$24]+[.BB111])+[.AH$25]*[.$Z$5]*MAGNET([.AH$24]+[.BB111]) +[.AI$25]*[.$Z$5]*MAGNET([.AI$24]+[.BB111]) +[.AJ$25]*[.$Z$5]*MAGNET([.AJ$24]+[.BB111]) +[.AK$25]*[.$Z$5]*MAGNET([.AK$24]+[.BB111]) +[.AL$25]*[.$Z$5]*MAGNET([.AL$24]+[.BB111]) +[.AM$25]*[.$Z$5]*MAGNET([.AM$24]+[.BB111]) +[.AN$25]*[.$Z$5]*MAGNET([.AN$24]+[.BB111]) +[.AO$25]*[.$Z$5]*MAGNET([.AO$24]+[.BB111])+RAND()*[.$BC$13]+[.AP$25]*[.$Z$5]*MAGNET([.AP$24]+[.BB111])&#10;+[.AQ$25]*[.$Z$5]*MAGNET([.AQ$24]+[.BB111])&#10;+[.AR$25]*[.$Z$5]*MAGNET([.AR$24]+[.BB111])&#10;+[.AS$25]*[.$Z$5]*MAGNET([.AS$24]+[.BB111])&#10;+[.AT$25]*[.$Z$5]*MAGNET([.AT$24]+[.BB111])&#10;+[.AU$25]*[.$Z$5]*MAGNET([.AU$24]+[.BB111])&#10;+[.AV$25]*[.$Z$5]*MAGNET([.AV$24]+[.BB111])&#10;+[.AW$25]*[.$Z$5]*MAGNET([.AW$24]+[.BB111])&#10;+[.AX$25]*[.$Z$5]*MAGNET([.AX$24]+[.BB111])&#10;+[.AY$25]*[.$Z$5]*MAGNET([.AY$24]+[.BB111])" office:value-type="float" office:value="24.3831277479881" calcext:value-type="float">
            <text:p>24.38</text:p>
          </table:table-cell>
          <table:table-cell table:style-name="ce70" table:formula="of:=[.E$26]*[.$Z$5]*MAGNET([.E$24]+[.$BB111])+[.F$26]*[.$Z$5]*MAGNET([.F$24]+[.$BB111])+[.G$26]*[.$Z$5]*MAGNET([.G$24]+[.$BB111])+[.H$26]*[.$Z$5]*MAGNET([.H$24]+[.$BB111])+[.I$26]*[.$Z$5]*MAGNET([.I$24]+[.$BB111])+[.J$26]*[.$Z$5]*MAGNET([.J$24]+[.$BB111])+[.K$26]*[.$Z$5]*MAGNET([.K$24]+[.$BB111])+[.L$26]*[.$Z$5]*MAGNET([.L$24]+[.$BB111])+[.M$26]*[.$Z$5]*MAGNET([.M$24]+[.$BB111])+[.N$26]*[.$Z$5]*MAGNET([.N$24]+[.$BB111])+[.O$26]*[.$Z$5]*MAGNET([.O$24]+[.$BB111])+[.P$26]*[.$Z$5]*MAGNET([.P$24]+[.$BB111])+[.Q$26]*[.$Z$5]*MAGNET([.Q$24]+[.$BB111])+[.R$26]*[.$Z$5]*MAGNET([.R$24]+[.$BB111])+[.S$26]*[.$Z$5]*MAGNET([.S$24]+[.$BB111])+[.T$26]*[.$Z$5]*MAGNET([.T$24]+[.$BB111])+[.U$26]*[.$Z$5]*MAGNET([.U$24]+[.$BB111])+[.V$26]*[.$Z$5]*MAGNET([.V$24]+[.$BB111])+[.W$26]*[.$Z$5]*MAGNET([.W$24]+[.$BB111])+[.X$26]*[.$Z$5]*MAGNET([.X$24]+[.$BB111])+[.Y$26]*[.$Z$5]*MAGNET([.Y$24]+[.$BB111])+[.Z$26]*[.$Z$5]*MAGNET([.Z$24]+[.$BB111])+[.AA$26]*[.$Z$5]*MAGNET([.AA$24]+[.$BB111])+[.AB$26]*[.$Z$5]*MAGNET([.AB$24]+[.$BB111])+[.AC$26]*[.$Z$5]*MAGNET([.AC$24]+[.$BB111])+[.AD$26]*[.$Z$5]*MAGNET([.AD$24]+[.$BB111])+[.AE$26]*[.$Z$5]*MAGNET([.AE$24]+[.$BB111])+[.AF$26]*[.$Z$5]*MAGNET([.AF$24]+[.$BB111])+[.AG$26]*[.$Z$5]*MAGNET([.AG$24]+[.$BB111])+[.D$26]*[.$Z$5]*MAGNET([.D$24]+[.$BB111])+[.AH$26]*[.$Z$5]*MAGNET([.AH$24]+[.BB111]) +[.AI$26]*[.$Z$5]*MAGNET([.AI$24]+[.BB111]) +[.AJ$26]*[.$Z$5]*MAGNET([.AJ$24]+[.BB111]) +[.AK$26]*[.$Z$5]*MAGNET([.AK$24]+[.BB111]) +[.AL$26]*[.$Z$5]*MAGNET([.AL$24]+[.BB111]) +[.AM$26]*[.$Z$5]*MAGNET([.AM$24]+[.BB111]) +[.AN$26]*[.$Z$5]*MAGNET([.AN$24]+[.BB111]) +[.AO$26]*[.$Z$5]*MAGNET([.AO$24]+[.BB111]) +[.AP$26]*[.$Z$5]*MAGNET([.AP$24]+[.$BB111])&#10;+[.AQ$26]*[.$Z$5]*MAGNET([.AQ$24]+[.$BB111])&#10;+[.AR$26]*[.$Z$5]*MAGNET([.AR$24]+[.$BB111])&#10;+[.AS$26]*[.$Z$5]*MAGNET([.AS$24]+[.$BB111])&#10;+[.AT$26]*[.$Z$5]*MAGNET([.AT$24]+[.$BB111])&#10;+[.AU$26]*[.$Z$5]*MAGNET([.AU$24]+[.$BB111])&#10;+[.AV$26]*[.$Z$5]*MAGNET([.AV$24]+[.$BB111])&#10;+[.AW$26]*[.$Z$5]*MAGNET([.AW$24]+[.$BB111])&#10;+[.AX$26]*[.$Z$5]*MAGNET([.AX$24]+[.$BB111])&#10;+[.AY$26]*[.$Z$5]*MAGNET([.AY$24]+[.$BB111]) +RAND()*[.$BD$13]" office:value-type="float" office:value="-84.1914810284648" calcext:value-type="float">
            <text:p>-84.19</text:p>
          </table:table-cell>
          <table:table-cell table:style-name="ce71" table:formula="of:=[.E$27]*[.$Z$5]*MAGNET([.E$24]+[.$BB111])+[.F$27]*[.$Z$5]*MAGNET([.F$24]+[.$BB111])+[.G$27]*[.$Z$5]*MAGNET([.G$24]+[.$BB111])+[.H$27]*[.$Z$5]*MAGNET([.H$24]+[.$BB111])+[.I$27]*[.$Z$5]*MAGNET([.I$24]+[.$BB111])+[.J$27]*[.$Z$5]*MAGNET([.J$24]+[.$BB111])+[.K$27]*[.$Z$5]*MAGNET([.K$24]+[.$BB111])+[.L$27]*[.$Z$5]*MAGNET([.L$24]+[.$BB111])+[.M$27]*[.$Z$5]*MAGNET([.M$24]+[.$BB111])+[.N$27]*[.$Z$5]*MAGNET([.N$24]+[.$BB111])+[.O$27]*[.$Z$5]*MAGNET([.O$24]+[.$BB111])+[.P$27]*[.$Z$5]*MAGNET([.P$24]+[.$BB111])+[.Q$27]*[.$Z$5]*MAGNET([.Q$24]+[.$BB111])+[.R$27]*[.$Z$5]*MAGNET([.R$24]+[.$BB111])+[.S$27]*[.$Z$5]*MAGNET([.S$24]+[.$BB111])+[.T$27]*[.$Z$5]*MAGNET([.T$24]+[.$BB111])+[.U$27]*[.$Z$5]*MAGNET([.U$24]+[.$BB111])+[.V$27]*[.$Z$5]*MAGNET([.V$24]+[.$BB111])+[.W$27]*[.$Z$5]*MAGNET([.W$24]+[.$BB111])+[.X$27]*[.$Z$5]*MAGNET([.X$24]+[.$BB111])+[.Y$27]*[.$Z$5]*MAGNET([.Y$24]+[.$BB111])+[.Z$27]*[.$Z$5]*MAGNET([.Z$24]+[.$BB111])+[.AA$27]*[.$Z$5]*MAGNET([.AA$24]+[.$BB111])+[.AB$27]*[.$Z$5]*MAGNET([.AB$24]+[.$BB111])+[.AC$27]*[.$Z$5]*MAGNET([.AC$24]+[.$BB111])+[.AD$27]*[.$Z$5]*MAGNET([.AD$24]+[.$BB111])+[.AE$27]*[.$Z$5]*MAGNET([.AE$24]+[.$BB111])+[.AF$27]*[.$Z$5]*MAGNET([.AF$24]+[.$BB111])+[.AG$27]*[.$Z$5]*MAGNET([.AG$24]+[.$BB111])+[.D$27]*[.$Z$5]*MAGNET([.D$24]+[.$BB111])+[.AH$27]*[.$Z$5]*MAGNET([.AH$24]+[.BB111]) +[.AI$27]*[.$Z$5]*MAGNET([.AI$24]+[.BB111]) +[.AJ$27]*[.$Z$5]*MAGNET([.AJ$24]+[.BB111]) +[.AK$27]*[.$Z$5]*MAGNET([.AK$24]+[.BB111]) +[.AL$27]*[.$Z$5]*MAGNET([.AL$24]+[.BB111]) +[.AM$27]*[.$Z$5]*MAGNET([.AM$24]+[.BB111]) +[.AN$27]*[.$Z$5]*MAGNET([.AN$24]+[.BB111]) +[.AO$27]*[.$Z$5]*MAGNET([.AO$24]+[.BB111]) +[.AP$27]*[.$Z$5]*MAGNET([.AP$24]+[.$BB111])&#10;+[.AQ$27]*[.$Z$5]*MAGNET([.AQ$24]+[.$BB111])&#10;+[.AR$27]*[.$Z$5]*MAGNET([.AR$24]+[.$BB111])&#10;+[.AS$27]*[.$Z$5]*MAGNET([.AS$24]+[.$BB111])&#10;+[.AT$27]*[.$Z$5]*MAGNET([.AT$24]+[.$BB111])&#10;+[.AU$27]*[.$Z$5]*MAGNET([.AU$24]+[.$BB111])&#10;+[.AV$27]*[.$Z$5]*MAGNET([.AV$24]+[.$BB111])&#10;+[.AW$27]*[.$Z$5]*MAGNET([.AW$24]+[.$BB111])&#10;+[.AX$27]*[.$Z$5]*MAGNET([.AX$24]+[.$BB111])&#10;+[.AY$27]*[.$Z$5]*MAGNET([.AY$24]+[.$BB111]) +RAND()*[.$BE$13]" office:value-type="float" office:value="85.8898933978468" calcext:value-type="float">
            <text:p>85.8898933978468</text:p>
          </table:table-cell>
          <table:table-cell table:style-name="ce71" table:formula="of:=[.E$28]*[.$Z$5]*MAGNET([.E$24]+[.$BB111])+[.F$28]*[.$Z$5]*MAGNET([.F$24]+[.$BB111])+[.G$28]*[.$Z$5]*MAGNET([.G$24]+[.$BB111])+[.H$28]*[.$Z$5]*MAGNET([.H$24]+[.$BB111])+[.I$28]*[.$Z$5]*MAGNET([.I$24]+[.$BB111])+[.J$28]*[.$Z$5]*MAGNET([.J$24]+[.$BB111])+[.K$28]*[.$Z$5]*MAGNET([.K$24]+[.$BB111])+[.L$28]*[.$Z$5]*MAGNET([.L$24]+[.$BB111])+[.M$28]*[.$Z$5]*MAGNET([.M$24]+[.$BB111])+[.N$28]*[.$Z$5]*MAGNET([.N$24]+[.$BB111])+[.O$28]*[.$Z$5]*MAGNET([.O$24]+[.$BB111])+[.P$28]*[.$Z$5]*MAGNET([.P$24]+[.$BB111])+[.Q$28]*[.$Z$5]*MAGNET([.Q$24]+[.$BB111])+[.R$28]*[.$Z$5]*MAGNET([.R$24]+[.$BB111])+[.S$28]*[.$Z$5]*MAGNET([.S$24]+[.$BB111])+[.T$28]*[.$Z$5]*MAGNET([.T$24]+[.$BB111])+[.U$28]*[.$Z$5]*MAGNET([.U$24]+[.$BB111])+[.V$28]*[.$Z$5]*MAGNET([.V$24]+[.$BB111])+[.W$28]*[.$Z$5]*MAGNET([.W$24]+[.$BB111])+[.X$28]*[.$Z$5]*MAGNET([.X$24]+[.$BB111])+[.Y$28]*[.$Z$5]*MAGNET([.Y$24]+[.$BB111])+[.Z$28]*[.$Z$5]*MAGNET([.Z$24]+[.$BB111])+[.AA$28]*[.$Z$5]*MAGNET([.AA$24]+[.$BB111])+[.AB$28]*[.$Z$5]*MAGNET([.AB$24]+[.$BB111])+[.AC$28]*[.$Z$5]*MAGNET([.AC$24]+[.$BB111])+[.AD$28]*[.$Z$5]*MAGNET([.AD$24]+[.$BB111])+[.AE$28]*[.$Z$5]*MAGNET([.AE$24]+[.$BB111])+[.AF$28]*[.$Z$5]*MAGNET([.AF$24]+[.$BB111])+[.AG$28]*[.$Z$5]*MAGNET([.AG$24]+[.$BB111])+[.D$28]*[.$Z$5]*MAGNET([.D$24]+[.$BB111])+[.AH$28]*[.$Z$5]*MAGNET([.AH$24]+[.BB111]) +[.AI$28]*[.$Z$5]*MAGNET([.AI$24]+[.BB111]) +[.AJ$28]*[.$Z$5]*MAGNET([.AJ$24]+[.BB111]) +[.AK$28]*[.$Z$5]*MAGNET([.AK$24]+[.BB111]) +[.AL$28]*[.$Z$5]*MAGNET([.AL$24]+[.BB111]) +[.AM$28]*[.$Z$5]*MAGNET([.AM$24]+[.BB111]) +[.AN$28]*[.$Z$5]*MAGNET([.AN$24]+[.BB111]) +[.AO$28]*[.$Z$5]*MAGNET([.AO$24]+[.BB111]) +[.AP$28]*[.$Z$5]*MAGNET([.AP$24]+[.$BB111])&#10;+[.AQ$28]*[.$Z$5]*MAGNET([.AQ$24]+[.$BB111])&#10;+[.AR$28]*[.$Z$5]*MAGNET([.AR$24]+[.$BB111])&#10;+[.AS$28]*[.$Z$5]*MAGNET([.AS$24]+[.$BB111])&#10;+[.AT$28]*[.$Z$5]*MAGNET([.AT$24]+[.$BB111])&#10;+[.AU$28]*[.$Z$5]*MAGNET([.AU$24]+[.$BB111])&#10;+[.AV$28]*[.$Z$5]*MAGNET([.AV$24]+[.$BB111])&#10;+[.AW$28]*[.$Z$5]*MAGNET([.AW$24]+[.$BB111])&#10;+[.AX$28]*[.$Z$5]*MAGNET([.AX$24]+[.$BB111])&#10;+[.AY$28]*[.$Z$5]*MAGNET([.AY$24]+[.$BB111]) +RAND()*[.$BF$13]" office:value-type="float" office:value="12.3563361897396" calcext:value-type="float">
            <text:p>12.3563361897396</text:p>
          </table:table-cell>
          <table:table-cell table:style-name="ce71" table:formula="of:=[.E$29]*[.$Z$5]*MAGNET([.E$24]+[.$BB111])+[.F$29]*[.$Z$5]*MAGNET([.F$24]+[.$BB111])+[.G$29]*[.$Z$5]*MAGNET([.G$24]+[.$BB111])+[.H$29]*[.$Z$5]*MAGNET([.H$24]+[.$BB111])+[.I$29]*[.$Z$5]*MAGNET([.I$24]+[.$BB111])+[.J$29]*[.$Z$5]*MAGNET([.J$24]+[.$BB111])+[.K$29]*[.$Z$5]*MAGNET([.K$24]+[.$BB111])+[.L$29]*[.$Z$5]*MAGNET([.L$24]+[.$BB111])+[.M$29]*[.$Z$5]*MAGNET([.M$24]+[.$BB111])+[.N$29]*[.$Z$5]*MAGNET([.N$24]+[.$BB111])+[.O$29]*[.$Z$5]*MAGNET([.O$24]+[.$BB111])+[.P$29]*[.$Z$5]*MAGNET([.P$24]+[.$BB111])+[.Q$29]*[.$Z$5]*MAGNET([.Q$24]+[.$BB111])+[.R$29]*[.$Z$5]*MAGNET([.R$24]+[.$BB111])+[.S$29]*[.$Z$5]*MAGNET([.S$24]+[.$BB111])+[.T$29]*[.$Z$5]*MAGNET([.T$24]+[.$BB111])+[.U$29]*[.$Z$5]*MAGNET([.U$24]+[.$BB111])+[.V$29]*[.$Z$5]*MAGNET([.V$24]+[.$BB111])+[.W$29]*[.$Z$5]*MAGNET([.W$24]+[.$BB111])+[.X$29]*[.$Z$5]*MAGNET([.X$24]+[.$BB111])+[.Y$29]*[.$Z$5]*MAGNET([.Y$24]+[.$BB111])+[.Z$29]*[.$Z$5]*MAGNET([.Z$24]+[.$BB111])+[.AA$29]*[.$Z$5]*MAGNET([.AA$24]+[.$BB111])+[.AB$29]*[.$Z$5]*MAGNET([.AB$24]+[.$BB111])+[.AC$29]*[.$Z$5]*MAGNET([.AC$24]+[.$BB111])+[.AD$29]*[.$Z$5]*MAGNET([.AD$24]+[.$BB111])+[.AE$29]*[.$Z$5]*MAGNET([.AE$24]+[.$BB111])+[.AF$29]*[.$Z$5]*MAGNET([.AF$24]+[.$BB111])+[.AG$29]*[.$Z$5]*MAGNET([.AG$24]+[.$BB111])+[.D$29]*[.$Z$5]*MAGNET([.D$24]+[.$BB111])+[.AH$29]*[.$Z$5]*MAGNET([.AH$24]+[.BB111]) +[.AI$29]*[.$Z$5]*MAGNET([.AI$24]+[.BB111]) +[.AJ$29]*[.$Z$5]*MAGNET([.AJ$24]+[.BB111]) +[.AK$29]*[.$Z$5]*MAGNET([.AK$24]+[.BB111]) +[.AL$29]*[.$Z$5]*MAGNET([.AL$24]+[.BB111]) +[.AM$29]*[.$Z$5]*MAGNET([.AM$24]+[.BB111]) +[.AN$29]*[.$Z$5]*MAGNET([.AN$24]+[.BB111]) +[.AO$29]*[.$Z$5]*MAGNET([.AO$24]+[.BB111]) +[.AP$29]*[.$Z$5]*MAGNET([.AP$24]+[.$BB111])&#10;+[.AQ$29]*[.$Z$5]*MAGNET([.AQ$24]+[.$BB111])&#10;+[.AR$29]*[.$Z$5]*MAGNET([.AR$24]+[.$BB111])&#10;+[.AS$29]*[.$Z$5]*MAGNET([.AS$24]+[.$BB111])&#10;+[.AT$29]*[.$Z$5]*MAGNET([.AT$24]+[.$BB111])&#10;+[.AU$29]*[.$Z$5]*MAGNET([.AU$24]+[.$BB111])&#10;+[.AV$29]*[.$Z$5]*MAGNET([.AV$24]+[.$BB111])&#10;+[.AW$29]*[.$Z$5]*MAGNET([.AW$24]+[.$BB111])&#10;+[.AX$29]*[.$Z$5]*MAGNET([.AX$24]+[.$BB111])&#10;+[.AY$29]*[.$Z$5]*MAGNET([.AY$24]+[.$BB111]) +RAND()*[.$BG$13]" office:value-type="float" office:value="-35.9274064018597" calcext:value-type="float">
            <text:p>-35.9274064018597</text:p>
          </table:table-cell>
          <table:table-cell table:style-name="ce71" table:formula="of:=[.E$30]*[.$Z$5]*MAGNET([.E$24]+[.$BB111])+[.F$30]*[.$Z$5]*MAGNET([.F$24]+[.$BB111])+[.G$30]*[.$Z$5]*MAGNET([.G$24]+[.$BB111])+[.H$30]*[.$Z$5]*MAGNET([.H$24]+[.$BB111])+[.I$30]*[.$Z$5]*MAGNET([.I$24]+[.$BB111])+[.J$30]*[.$Z$5]*MAGNET([.J$24]+[.$BB111])+[.K$30]*[.$Z$5]*MAGNET([.K$24]+[.$BB111])+[.L$30]*[.$Z$5]*MAGNET([.L$24]+[.$BB111])+[.M$30]*[.$Z$5]*MAGNET([.M$24]+[.$BB111])+[.N$30]*[.$Z$5]*MAGNET([.N$24]+[.$BB111])+[.O$30]*[.$Z$5]*MAGNET([.O$24]+[.$BB111])+[.P$30]*[.$Z$5]*MAGNET([.P$24]+[.$BB111])+[.Q$30]*[.$Z$5]*MAGNET([.Q$24]+[.$BB111])+[.R$30]*[.$Z$5]*MAGNET([.R$24]+[.$BB111])+[.S$30]*[.$Z$5]*MAGNET([.S$24]+[.$BB111])+[.T$30]*[.$Z$5]*MAGNET([.T$24]+[.$BB111])+[.U$30]*[.$Z$5]*MAGNET([.U$24]+[.$BB111])+[.V$30]*[.$Z$5]*MAGNET([.V$24]+[.$BB111])+[.W$30]*[.$Z$5]*MAGNET([.W$24]+[.$BB111])+[.X$30]*[.$Z$5]*MAGNET([.X$24]+[.$BB111])+[.Y$30]*[.$Z$5]*MAGNET([.Y$24]+[.$BB111])+[.Z$30]*[.$Z$5]*MAGNET([.Z$24]+[.$BB111])+[.AA$30]*[.$Z$5]*MAGNET([.AA$24]+[.$BB111])+[.AB$30]*[.$Z$5]*MAGNET([.AB$24]+[.$BB111])+[.AC$30]*[.$Z$5]*MAGNET([.AC$24]+[.$BB111])+[.AD$30]*[.$Z$5]*MAGNET([.AD$24]+[.$BB111])+[.AE$30]*[.$Z$5]*MAGNET([.AE$24]+[.$BB111])+[.AF$30]*[.$Z$5]*MAGNET([.AF$24]+[.$BB111])+[.AG$30]*[.$Z$5]*MAGNET([.AG$24]+[.$BB111])+[.D$30]*[.$Z$5]*MAGNET([.D$24]+[.$BB111])+[.AH$30]*[.$Z$5]*MAGNET([.AH$24]+[.BB111]) +[.AI$30]*[.$Z$5]*MAGNET([.AI$24]+[.BB111]) +[.AJ$30]*[.$Z$5]*MAGNET([.AJ$24]+[.BB111]) +[.AK$30]*[.$Z$5]*MAGNET([.AK$24]+[.BB111]) +[.AL$30]*[.$Z$5]*MAGNET([.AL$24]+[.BB111]) +[.AM$30]*[.$Z$5]*MAGNET([.AM$24]+[.BB111]) +[.AN$30]*[.$Z$5]*MAGNET([.AN$24]+[.BB111]) +[.AO$30]*[.$Z$5]*MAGNET([.AO$24]+[.BB111]) +[.AP$30]*[.$Z$5]*MAGNET([.AP$24]+[.$BB111])&#10;+[.AQ$30]*[.$Z$5]*MAGNET([.AQ$24]+[.$BB111])&#10;+[.AR$30]*[.$Z$5]*MAGNET([.AR$24]+[.$BB111])&#10;+[.AS$30]*[.$Z$5]*MAGNET([.AS$24]+[.$BB111])&#10;+[.AT$30]*[.$Z$5]*MAGNET([.AT$24]+[.$BB111])&#10;+[.AU$30]*[.$Z$5]*MAGNET([.AU$24]+[.$BB111])&#10;+[.AV$30]*[.$Z$5]*MAGNET([.AV$24]+[.$BB111])&#10;+[.AW$30]*[.$Z$5]*MAGNET([.AW$24]+[.$BB111])&#10;+[.AX$30]*[.$Z$5]*MAGNET([.AX$24]+[.$BB111])&#10;+[.AY$30]*[.$Z$5]*MAGNET([.AY$24]+[.$BB111]) +RAND()*[.$BH$13]" office:value-type="float" office:value="0" calcext:value-type="float">
            <text:p>0</text:p>
          </table:table-cell>
          <table:table-cell table:style-name="ce71" table:formula="of:=[.E$31]*[.$Z$5]*MAGNET([.E$24]+[.$BB111])+[.F$31]*[.$Z$5]*MAGNET([.F$24]+[.$BB111])+[.G$31]*[.$Z$5]*MAGNET([.G$24]+[.$BB111])+[.H$31]*[.$Z$5]*MAGNET([.H$24]+[.$BB111])+[.I$31]*[.$Z$5]*MAGNET([.I$24]+[.$BB111])+[.J$31]*[.$Z$5]*MAGNET([.J$24]+[.$BB111])+[.K$31]*[.$Z$5]*MAGNET([.K$24]+[.$BB111])+[.L$31]*[.$Z$5]*MAGNET([.L$24]+[.$BB111])+[.M$31]*[.$Z$5]*MAGNET([.M$24]+[.$BB111])+[.N$31]*[.$Z$5]*MAGNET([.N$24]+[.$BB111])+[.O$31]*[.$Z$5]*MAGNET([.O$24]+[.$BB111])+[.P$31]*[.$Z$5]*MAGNET([.P$24]+[.$BB111])+[.Q$31]*[.$Z$5]*MAGNET([.Q$24]+[.$BB111])+[.R$31]*[.$Z$5]*MAGNET([.R$24]+[.$BB111])+[.S$31]*[.$Z$5]*MAGNET([.S$24]+[.$BB111])+[.T$31]*[.$Z$5]*MAGNET([.T$24]+[.$BB111])+[.U$31]*[.$Z$5]*MAGNET([.U$24]+[.$BB111])+[.V$31]*[.$Z$5]*MAGNET([.V$24]+[.$BB111])+[.W$31]*[.$Z$5]*MAGNET([.W$24]+[.$BB111])+[.X$31]*[.$Z$5]*MAGNET([.X$24]+[.$BB111])+[.Y$31]*[.$Z$5]*MAGNET([.Y$24]+[.$BB111])+[.Z$31]*[.$Z$5]*MAGNET([.Z$24]+[.$BB111])+[.AA$31]*[.$Z$5]*MAGNET([.AA$24]+[.$BB111])+[.AB$31]*[.$Z$5]*MAGNET([.AB$24]+[.$BB111])+[.AC$31]*[.$Z$5]*MAGNET([.AC$24]+[.$BB111])+[.AD$31]*[.$Z$5]*MAGNET([.AD$24]+[.$BB111])+[.AE$31]*[.$Z$5]*MAGNET([.AE$24]+[.$BB111])+[.AF$31]*[.$Z$5]*MAGNET([.AF$24]+[.$BB111])+[.AG$31]*[.$Z$5]*MAGNET([.AG$24]+[.$BB111])+[.D$31]*[.$Z$5]*MAGNET([.D$24]+[.$BB111])+[.AH$31]*[.$Z$5]*MAGNET([.AH$24]+[.BB111]) +[.AI$31]*[.$Z$5]*MAGNET([.AI$24]+[.BB111]) +[.AJ$31]*[.$Z$5]*MAGNET([.AJ$24]+[.BB111]) +[.AK$31]*[.$Z$5]*MAGNET([.AK$24]+[.BB111]) +[.AL$31]*[.$Z$5]*MAGNET([.AL$24]+[.BB111]) +[.AM$31]*[.$Z$5]*MAGNET([.AM$24]+[.BB111]) +[.AN$31]*[.$Z$5]*MAGNET([.AN$24]+[.BB111]) +[.AO$31]*[.$Z$5]*MAGNET([.AO$24]+[.BB111]) +[.AP$31]*[.$Z$5]*MAGNET([.AP$24]+[.$BB111])&#10;+[.AQ$31]*[.$Z$5]*MAGNET([.AQ$24]+[.$BB111])&#10;+[.AR$31]*[.$Z$5]*MAGNET([.AR$24]+[.$BB111])&#10;+[.AS$31]*[.$Z$5]*MAGNET([.AS$24]+[.$BB111])&#10;+[.AT$31]*[.$Z$5]*MAGNET([.AT$24]+[.$BB111])&#10;+[.AU$31]*[.$Z$5]*MAGNET([.AU$24]+[.$BB111])&#10;+[.AV$31]*[.$Z$5]*MAGNET([.AV$24]+[.$BB111])&#10;+[.AW$31]*[.$Z$5]*MAGNET([.AW$24]+[.$BB111])&#10;+[.AX$31]*[.$Z$5]*MAGNET([.AX$24]+[.$BB111])&#10;+[.AY$31]*[.$Z$5]*MAGNET([.AY$24]+[.$BB111]) +RAND()*[.$BI$13]" office:value-type="float" office:value="0" calcext:value-type="float">
            <text:p>0</text:p>
          </table:table-cell>
          <table:table-cell table:style-name="ce71" table:formula="of:=[.E$32]*[.$Z$5]*MAGNET([.E$24]+[.$BB111])+[.F$32]*[.$Z$5]*MAGNET([.F$24]+[.$BB111])+[.G$32]*[.$Z$5]*MAGNET([.G$24]+[.$BB111])+[.H$32]*[.$Z$5]*MAGNET([.H$24]+[.$BB111])+[.I$32]*[.$Z$5]*MAGNET([.I$24]+[.$BB111])+[.J$32]*[.$Z$5]*MAGNET([.J$24]+[.$BB111])+[.K$32]*[.$Z$5]*MAGNET([.K$24]+[.$BB111])+[.L$32]*[.$Z$5]*MAGNET([.L$24]+[.$BB111])+[.M$32]*[.$Z$5]*MAGNET([.M$24]+[.$BB111])+[.N$32]*[.$Z$5]*MAGNET([.N$24]+[.$BB111])+[.O$32]*[.$Z$5]*MAGNET([.O$24]+[.$BB111])+[.P$32]*[.$Z$5]*MAGNET([.P$24]+[.$BB111])+[.Q$32]*[.$Z$5]*MAGNET([.Q$24]+[.$BB111])+[.R$32]*[.$Z$5]*MAGNET([.R$24]+[.$BB111])+[.S$32]*[.$Z$5]*MAGNET([.S$24]+[.$BB111])+[.T$32]*[.$Z$5]*MAGNET([.T$24]+[.$BB111])+[.U$32]*[.$Z$5]*MAGNET([.U$24]+[.$BB111])+[.V$32]*[.$Z$5]*MAGNET([.V$24]+[.$BB111])+[.W$32]*[.$Z$5]*MAGNET([.W$24]+[.$BB111])+[.X$32]*[.$Z$5]*MAGNET([.X$24]+[.$BB111])+[.Y$32]*[.$Z$5]*MAGNET([.Y$24]+[.$BB111])+[.Z$32]*[.$Z$5]*MAGNET([.Z$24]+[.$BB111])+[.AA$32]*[.$Z$5]*MAGNET([.AA$24]+[.$BB111])+[.AB$32]*[.$Z$5]*MAGNET([.AB$24]+[.$BB111])+[.AC$32]*[.$Z$5]*MAGNET([.AC$24]+[.$BB111])+[.AD$32]*[.$Z$5]*MAGNET([.AD$24]+[.$BB111])+[.AE$32]*[.$Z$5]*MAGNET([.AE$24]+[.$BB111])+[.AF$32]*[.$Z$5]*MAGNET([.AF$24]+[.$BB111])+[.AG$32]*[.$Z$5]*MAGNET([.AG$24]+[.$BB111])+[.D$32]*[.$Z$5]*MAGNET([.D$24]+[.$BB111])+[.AH$32]*[.$Z$5]*MAGNET([.AH$24]+[.BB111]) +[.AI$32]*[.$Z$5]*MAGNET([.AI$24]+[.BB111]) +[.AJ$32]*[.$Z$5]*MAGNET([.AJ$24]+[.BB111]) +[.AK$32]*[.$Z$5]*MAGNET([.AK$24]+[.BB111]) +[.AL$32]*[.$Z$5]*MAGNET([.AL$24]+[.BB111]) +[.AM$32]*[.$Z$5]*MAGNET([.AM$24]+[.BB111]) +[.AN$32]*[.$Z$5]*MAGNET([.AN$24]+[.BB111]) +[.AO$32]*[.$Z$5]*MAGNET([.AO$24]+[.BB111]) +[.AP$32]*[.$Z$5]*MAGNET([.AP$24]+[.$BB111])&#10;+[.AQ$32]*[.$Z$5]*MAGNET([.AQ$24]+[.$BB111])&#10;+[.AR$32]*[.$Z$5]*MAGNET([.AR$24]+[.$BB111])&#10;+[.AS$32]*[.$Z$5]*MAGNET([.AS$24]+[.$BB111])&#10;+[.AT$32]*[.$Z$5]*MAGNET([.AT$24]+[.$BB111])&#10;+[.AU$32]*[.$Z$5]*MAGNET([.AU$24]+[.$BB111])&#10;+[.AV$32]*[.$Z$5]*MAGNET([.AV$24]+[.$BB111])&#10;+[.AW$32]*[.$Z$5]*MAGNET([.AW$24]+[.$BB111])&#10;+[.AX$32]*[.$Z$5]*MAGNET([.AX$24]+[.$BB111])&#10;+[.AY$32]*[.$Z$5]*MAGNET([.AY$24]+[.$BB111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11]+0.002" office:value-type="float" office:value="0.194" calcext:value-type="float">
            <text:p>0.194</text:p>
          </table:table-cell>
          <table:table-cell table:formula="of:=[.BA112]*[.$D$6]" office:value-type="float" office:value="9.75150359674273" calcext:value-type="float">
            <text:p>9.752</text:p>
          </table:table-cell>
          <table:table-cell table:formula="of:=[.D$25]*[.$Z$5]*MAGNET([.D$24]+[.BB112])+[.E$25]*[.$Z$5]*MAGNET([.E$24]+[.BB112])+[.F$25]*[.$Z$5]*MAGNET([.F$24]+[.BB112])+[.G$25]*[.$Z$5]*MAGNET([.G$24]+[.BB112])+[.H$25]*[.$Z$5]*MAGNET([.H$24]+[.BB112])+[.I$25]*[.$Z$5]*MAGNET([.I$24]+[.BB112])+[.J$25]*[.$Z$5]*MAGNET([.J$24]+[.BB112])+[.K$25]*[.$Z$5]*MAGNET([.K$24]+[.BB112])+[.L$25]*[.$Z$5]*MAGNET([.L$24]+[.BB112])+[.M$25]*[.$Z$5]*MAGNET([.M$24]+[.BB112])+[.N$25]*[.$Z$5]*MAGNET([.N$24]+[.BB112])+[.O$25]*[.$Z$5]*MAGNET([.O$24]+[.BB112])+[.P$25]*[.$Z$5]*MAGNET([.P$24]+[.BB112])+[.Q$25]*[.$Z$5]*MAGNET([.Q$24]+[.BB112])+[.R$25]*[.$Z$5]*MAGNET([.R$24]+[.BB112])+[.S$25]*[.$Z$5]*MAGNET([.S$24]+[.BB112])+[.T$25]*[.$Z$5]*MAGNET([.T$24]+[.BB112])+[.U$25]*[.$Z$5]*MAGNET([.U$24]+[.BB112])+[.V$25]*[.$Z$5]*MAGNET([.V$24]+[.BB112])+[.W$25]*[.$Z$5]*MAGNET([.W$24]+[.BB112])+[.X$25]*[.$Z$5]*MAGNET([.X$24]+[.BB112])+[.Y$25]*[.$Z$5]*MAGNET([.Y$24]+[.BB112])+[.Z$25]*[.$Z$5]*MAGNET([.Z$24]+[.BB112])+[.AA$25]*[.$Z$5]*MAGNET([.AA$24]+[.BB112])+[.AB$25]*[.$Z$5]*MAGNET([.AB$24]+[.BB112])+[.AC$25]*[.$Z$5]*MAGNET([.AC$24]+[.BB112])+[.AD$25]*[.$Z$5]*MAGNET([.AD$24]+[.BB112])+[.AE$25]*[.$Z$5]*MAGNET([.AE$24]+[.BB112])+[.AF$25]*[.$Z$5]*MAGNET([.AF$24]+[.BB112])+[.AG$25]*[.$Z$5]*MAGNET([.AG$24]+[.BB112])+[.AH$25]*[.$Z$5]*MAGNET([.AH$24]+[.BB112]) +[.AI$25]*[.$Z$5]*MAGNET([.AI$24]+[.BB112]) +[.AJ$25]*[.$Z$5]*MAGNET([.AJ$24]+[.BB112]) +[.AK$25]*[.$Z$5]*MAGNET([.AK$24]+[.BB112]) +[.AL$25]*[.$Z$5]*MAGNET([.AL$24]+[.BB112]) +[.AM$25]*[.$Z$5]*MAGNET([.AM$24]+[.BB112]) +[.AN$25]*[.$Z$5]*MAGNET([.AN$24]+[.BB112]) +[.AO$25]*[.$Z$5]*MAGNET([.AO$24]+[.BB112])+RAND()*[.$BC$13]+[.AP$25]*[.$Z$5]*MAGNET([.AP$24]+[.BB112])&#10;+[.AQ$25]*[.$Z$5]*MAGNET([.AQ$24]+[.BB112])&#10;+[.AR$25]*[.$Z$5]*MAGNET([.AR$24]+[.BB112])&#10;+[.AS$25]*[.$Z$5]*MAGNET([.AS$24]+[.BB112])&#10;+[.AT$25]*[.$Z$5]*MAGNET([.AT$24]+[.BB112])&#10;+[.AU$25]*[.$Z$5]*MAGNET([.AU$24]+[.BB112])&#10;+[.AV$25]*[.$Z$5]*MAGNET([.AV$24]+[.BB112])&#10;+[.AW$25]*[.$Z$5]*MAGNET([.AW$24]+[.BB112])&#10;+[.AX$25]*[.$Z$5]*MAGNET([.AX$24]+[.BB112])&#10;+[.AY$25]*[.$Z$5]*MAGNET([.AY$24]+[.BB112])" office:value-type="float" office:value="11.5372285288965" calcext:value-type="float">
            <text:p>11.54</text:p>
          </table:table-cell>
          <table:table-cell table:style-name="ce70" table:formula="of:=[.E$26]*[.$Z$5]*MAGNET([.E$24]+[.$BB112])+[.F$26]*[.$Z$5]*MAGNET([.F$24]+[.$BB112])+[.G$26]*[.$Z$5]*MAGNET([.G$24]+[.$BB112])+[.H$26]*[.$Z$5]*MAGNET([.H$24]+[.$BB112])+[.I$26]*[.$Z$5]*MAGNET([.I$24]+[.$BB112])+[.J$26]*[.$Z$5]*MAGNET([.J$24]+[.$BB112])+[.K$26]*[.$Z$5]*MAGNET([.K$24]+[.$BB112])+[.L$26]*[.$Z$5]*MAGNET([.L$24]+[.$BB112])+[.M$26]*[.$Z$5]*MAGNET([.M$24]+[.$BB112])+[.N$26]*[.$Z$5]*MAGNET([.N$24]+[.$BB112])+[.O$26]*[.$Z$5]*MAGNET([.O$24]+[.$BB112])+[.P$26]*[.$Z$5]*MAGNET([.P$24]+[.$BB112])+[.Q$26]*[.$Z$5]*MAGNET([.Q$24]+[.$BB112])+[.R$26]*[.$Z$5]*MAGNET([.R$24]+[.$BB112])+[.S$26]*[.$Z$5]*MAGNET([.S$24]+[.$BB112])+[.T$26]*[.$Z$5]*MAGNET([.T$24]+[.$BB112])+[.U$26]*[.$Z$5]*MAGNET([.U$24]+[.$BB112])+[.V$26]*[.$Z$5]*MAGNET([.V$24]+[.$BB112])+[.W$26]*[.$Z$5]*MAGNET([.W$24]+[.$BB112])+[.X$26]*[.$Z$5]*MAGNET([.X$24]+[.$BB112])+[.Y$26]*[.$Z$5]*MAGNET([.Y$24]+[.$BB112])+[.Z$26]*[.$Z$5]*MAGNET([.Z$24]+[.$BB112])+[.AA$26]*[.$Z$5]*MAGNET([.AA$24]+[.$BB112])+[.AB$26]*[.$Z$5]*MAGNET([.AB$24]+[.$BB112])+[.AC$26]*[.$Z$5]*MAGNET([.AC$24]+[.$BB112])+[.AD$26]*[.$Z$5]*MAGNET([.AD$24]+[.$BB112])+[.AE$26]*[.$Z$5]*MAGNET([.AE$24]+[.$BB112])+[.AF$26]*[.$Z$5]*MAGNET([.AF$24]+[.$BB112])+[.AG$26]*[.$Z$5]*MAGNET([.AG$24]+[.$BB112])+[.D$26]*[.$Z$5]*MAGNET([.D$24]+[.$BB112])+[.AH$26]*[.$Z$5]*MAGNET([.AH$24]+[.BB112]) +[.AI$26]*[.$Z$5]*MAGNET([.AI$24]+[.BB112]) +[.AJ$26]*[.$Z$5]*MAGNET([.AJ$24]+[.BB112]) +[.AK$26]*[.$Z$5]*MAGNET([.AK$24]+[.BB112]) +[.AL$26]*[.$Z$5]*MAGNET([.AL$24]+[.BB112]) +[.AM$26]*[.$Z$5]*MAGNET([.AM$24]+[.BB112]) +[.AN$26]*[.$Z$5]*MAGNET([.AN$24]+[.BB112]) +[.AO$26]*[.$Z$5]*MAGNET([.AO$24]+[.BB112]) +[.AP$26]*[.$Z$5]*MAGNET([.AP$24]+[.$BB112])&#10;+[.AQ$26]*[.$Z$5]*MAGNET([.AQ$24]+[.$BB112])&#10;+[.AR$26]*[.$Z$5]*MAGNET([.AR$24]+[.$BB112])&#10;+[.AS$26]*[.$Z$5]*MAGNET([.AS$24]+[.$BB112])&#10;+[.AT$26]*[.$Z$5]*MAGNET([.AT$24]+[.$BB112])&#10;+[.AU$26]*[.$Z$5]*MAGNET([.AU$24]+[.$BB112])&#10;+[.AV$26]*[.$Z$5]*MAGNET([.AV$24]+[.$BB112])&#10;+[.AW$26]*[.$Z$5]*MAGNET([.AW$24]+[.$BB112])&#10;+[.AX$26]*[.$Z$5]*MAGNET([.AX$24]+[.$BB112])&#10;+[.AY$26]*[.$Z$5]*MAGNET([.AY$24]+[.$BB112]) +RAND()*[.$BD$13]" office:value-type="float" office:value="-78.3640968927132" calcext:value-type="float">
            <text:p>-78.36</text:p>
          </table:table-cell>
          <table:table-cell table:style-name="ce71" table:formula="of:=[.E$27]*[.$Z$5]*MAGNET([.E$24]+[.$BB112])+[.F$27]*[.$Z$5]*MAGNET([.F$24]+[.$BB112])+[.G$27]*[.$Z$5]*MAGNET([.G$24]+[.$BB112])+[.H$27]*[.$Z$5]*MAGNET([.H$24]+[.$BB112])+[.I$27]*[.$Z$5]*MAGNET([.I$24]+[.$BB112])+[.J$27]*[.$Z$5]*MAGNET([.J$24]+[.$BB112])+[.K$27]*[.$Z$5]*MAGNET([.K$24]+[.$BB112])+[.L$27]*[.$Z$5]*MAGNET([.L$24]+[.$BB112])+[.M$27]*[.$Z$5]*MAGNET([.M$24]+[.$BB112])+[.N$27]*[.$Z$5]*MAGNET([.N$24]+[.$BB112])+[.O$27]*[.$Z$5]*MAGNET([.O$24]+[.$BB112])+[.P$27]*[.$Z$5]*MAGNET([.P$24]+[.$BB112])+[.Q$27]*[.$Z$5]*MAGNET([.Q$24]+[.$BB112])+[.R$27]*[.$Z$5]*MAGNET([.R$24]+[.$BB112])+[.S$27]*[.$Z$5]*MAGNET([.S$24]+[.$BB112])+[.T$27]*[.$Z$5]*MAGNET([.T$24]+[.$BB112])+[.U$27]*[.$Z$5]*MAGNET([.U$24]+[.$BB112])+[.V$27]*[.$Z$5]*MAGNET([.V$24]+[.$BB112])+[.W$27]*[.$Z$5]*MAGNET([.W$24]+[.$BB112])+[.X$27]*[.$Z$5]*MAGNET([.X$24]+[.$BB112])+[.Y$27]*[.$Z$5]*MAGNET([.Y$24]+[.$BB112])+[.Z$27]*[.$Z$5]*MAGNET([.Z$24]+[.$BB112])+[.AA$27]*[.$Z$5]*MAGNET([.AA$24]+[.$BB112])+[.AB$27]*[.$Z$5]*MAGNET([.AB$24]+[.$BB112])+[.AC$27]*[.$Z$5]*MAGNET([.AC$24]+[.$BB112])+[.AD$27]*[.$Z$5]*MAGNET([.AD$24]+[.$BB112])+[.AE$27]*[.$Z$5]*MAGNET([.AE$24]+[.$BB112])+[.AF$27]*[.$Z$5]*MAGNET([.AF$24]+[.$BB112])+[.AG$27]*[.$Z$5]*MAGNET([.AG$24]+[.$BB112])+[.D$27]*[.$Z$5]*MAGNET([.D$24]+[.$BB112])+[.AH$27]*[.$Z$5]*MAGNET([.AH$24]+[.BB112]) +[.AI$27]*[.$Z$5]*MAGNET([.AI$24]+[.BB112]) +[.AJ$27]*[.$Z$5]*MAGNET([.AJ$24]+[.BB112]) +[.AK$27]*[.$Z$5]*MAGNET([.AK$24]+[.BB112]) +[.AL$27]*[.$Z$5]*MAGNET([.AL$24]+[.BB112]) +[.AM$27]*[.$Z$5]*MAGNET([.AM$24]+[.BB112]) +[.AN$27]*[.$Z$5]*MAGNET([.AN$24]+[.BB112]) +[.AO$27]*[.$Z$5]*MAGNET([.AO$24]+[.BB112]) +[.AP$27]*[.$Z$5]*MAGNET([.AP$24]+[.$BB112])&#10;+[.AQ$27]*[.$Z$5]*MAGNET([.AQ$24]+[.$BB112])&#10;+[.AR$27]*[.$Z$5]*MAGNET([.AR$24]+[.$BB112])&#10;+[.AS$27]*[.$Z$5]*MAGNET([.AS$24]+[.$BB112])&#10;+[.AT$27]*[.$Z$5]*MAGNET([.AT$24]+[.$BB112])&#10;+[.AU$27]*[.$Z$5]*MAGNET([.AU$24]+[.$BB112])&#10;+[.AV$27]*[.$Z$5]*MAGNET([.AV$24]+[.$BB112])&#10;+[.AW$27]*[.$Z$5]*MAGNET([.AW$24]+[.$BB112])&#10;+[.AX$27]*[.$Z$5]*MAGNET([.AX$24]+[.$BB112])&#10;+[.AY$27]*[.$Z$5]*MAGNET([.AY$24]+[.$BB112]) +RAND()*[.$BE$13]" office:value-type="float" office:value="94.0155833012544" calcext:value-type="float">
            <text:p>94.0155833012544</text:p>
          </table:table-cell>
          <table:table-cell table:style-name="ce71" table:formula="of:=[.E$28]*[.$Z$5]*MAGNET([.E$24]+[.$BB112])+[.F$28]*[.$Z$5]*MAGNET([.F$24]+[.$BB112])+[.G$28]*[.$Z$5]*MAGNET([.G$24]+[.$BB112])+[.H$28]*[.$Z$5]*MAGNET([.H$24]+[.$BB112])+[.I$28]*[.$Z$5]*MAGNET([.I$24]+[.$BB112])+[.J$28]*[.$Z$5]*MAGNET([.J$24]+[.$BB112])+[.K$28]*[.$Z$5]*MAGNET([.K$24]+[.$BB112])+[.L$28]*[.$Z$5]*MAGNET([.L$24]+[.$BB112])+[.M$28]*[.$Z$5]*MAGNET([.M$24]+[.$BB112])+[.N$28]*[.$Z$5]*MAGNET([.N$24]+[.$BB112])+[.O$28]*[.$Z$5]*MAGNET([.O$24]+[.$BB112])+[.P$28]*[.$Z$5]*MAGNET([.P$24]+[.$BB112])+[.Q$28]*[.$Z$5]*MAGNET([.Q$24]+[.$BB112])+[.R$28]*[.$Z$5]*MAGNET([.R$24]+[.$BB112])+[.S$28]*[.$Z$5]*MAGNET([.S$24]+[.$BB112])+[.T$28]*[.$Z$5]*MAGNET([.T$24]+[.$BB112])+[.U$28]*[.$Z$5]*MAGNET([.U$24]+[.$BB112])+[.V$28]*[.$Z$5]*MAGNET([.V$24]+[.$BB112])+[.W$28]*[.$Z$5]*MAGNET([.W$24]+[.$BB112])+[.X$28]*[.$Z$5]*MAGNET([.X$24]+[.$BB112])+[.Y$28]*[.$Z$5]*MAGNET([.Y$24]+[.$BB112])+[.Z$28]*[.$Z$5]*MAGNET([.Z$24]+[.$BB112])+[.AA$28]*[.$Z$5]*MAGNET([.AA$24]+[.$BB112])+[.AB$28]*[.$Z$5]*MAGNET([.AB$24]+[.$BB112])+[.AC$28]*[.$Z$5]*MAGNET([.AC$24]+[.$BB112])+[.AD$28]*[.$Z$5]*MAGNET([.AD$24]+[.$BB112])+[.AE$28]*[.$Z$5]*MAGNET([.AE$24]+[.$BB112])+[.AF$28]*[.$Z$5]*MAGNET([.AF$24]+[.$BB112])+[.AG$28]*[.$Z$5]*MAGNET([.AG$24]+[.$BB112])+[.D$28]*[.$Z$5]*MAGNET([.D$24]+[.$BB112])+[.AH$28]*[.$Z$5]*MAGNET([.AH$24]+[.BB112]) +[.AI$28]*[.$Z$5]*MAGNET([.AI$24]+[.BB112]) +[.AJ$28]*[.$Z$5]*MAGNET([.AJ$24]+[.BB112]) +[.AK$28]*[.$Z$5]*MAGNET([.AK$24]+[.BB112]) +[.AL$28]*[.$Z$5]*MAGNET([.AL$24]+[.BB112]) +[.AM$28]*[.$Z$5]*MAGNET([.AM$24]+[.BB112]) +[.AN$28]*[.$Z$5]*MAGNET([.AN$24]+[.BB112]) +[.AO$28]*[.$Z$5]*MAGNET([.AO$24]+[.BB112]) +[.AP$28]*[.$Z$5]*MAGNET([.AP$24]+[.$BB112])&#10;+[.AQ$28]*[.$Z$5]*MAGNET([.AQ$24]+[.$BB112])&#10;+[.AR$28]*[.$Z$5]*MAGNET([.AR$24]+[.$BB112])&#10;+[.AS$28]*[.$Z$5]*MAGNET([.AS$24]+[.$BB112])&#10;+[.AT$28]*[.$Z$5]*MAGNET([.AT$24]+[.$BB112])&#10;+[.AU$28]*[.$Z$5]*MAGNET([.AU$24]+[.$BB112])&#10;+[.AV$28]*[.$Z$5]*MAGNET([.AV$24]+[.$BB112])&#10;+[.AW$28]*[.$Z$5]*MAGNET([.AW$24]+[.$BB112])&#10;+[.AX$28]*[.$Z$5]*MAGNET([.AX$24]+[.$BB112])&#10;+[.AY$28]*[.$Z$5]*MAGNET([.AY$24]+[.$BB112]) +RAND()*[.$BF$13]" office:value-type="float" office:value="12.5815187166243" calcext:value-type="float">
            <text:p>12.5815187166243</text:p>
          </table:table-cell>
          <table:table-cell table:style-name="ce71" table:formula="of:=[.E$29]*[.$Z$5]*MAGNET([.E$24]+[.$BB112])+[.F$29]*[.$Z$5]*MAGNET([.F$24]+[.$BB112])+[.G$29]*[.$Z$5]*MAGNET([.G$24]+[.$BB112])+[.H$29]*[.$Z$5]*MAGNET([.H$24]+[.$BB112])+[.I$29]*[.$Z$5]*MAGNET([.I$24]+[.$BB112])+[.J$29]*[.$Z$5]*MAGNET([.J$24]+[.$BB112])+[.K$29]*[.$Z$5]*MAGNET([.K$24]+[.$BB112])+[.L$29]*[.$Z$5]*MAGNET([.L$24]+[.$BB112])+[.M$29]*[.$Z$5]*MAGNET([.M$24]+[.$BB112])+[.N$29]*[.$Z$5]*MAGNET([.N$24]+[.$BB112])+[.O$29]*[.$Z$5]*MAGNET([.O$24]+[.$BB112])+[.P$29]*[.$Z$5]*MAGNET([.P$24]+[.$BB112])+[.Q$29]*[.$Z$5]*MAGNET([.Q$24]+[.$BB112])+[.R$29]*[.$Z$5]*MAGNET([.R$24]+[.$BB112])+[.S$29]*[.$Z$5]*MAGNET([.S$24]+[.$BB112])+[.T$29]*[.$Z$5]*MAGNET([.T$24]+[.$BB112])+[.U$29]*[.$Z$5]*MAGNET([.U$24]+[.$BB112])+[.V$29]*[.$Z$5]*MAGNET([.V$24]+[.$BB112])+[.W$29]*[.$Z$5]*MAGNET([.W$24]+[.$BB112])+[.X$29]*[.$Z$5]*MAGNET([.X$24]+[.$BB112])+[.Y$29]*[.$Z$5]*MAGNET([.Y$24]+[.$BB112])+[.Z$29]*[.$Z$5]*MAGNET([.Z$24]+[.$BB112])+[.AA$29]*[.$Z$5]*MAGNET([.AA$24]+[.$BB112])+[.AB$29]*[.$Z$5]*MAGNET([.AB$24]+[.$BB112])+[.AC$29]*[.$Z$5]*MAGNET([.AC$24]+[.$BB112])+[.AD$29]*[.$Z$5]*MAGNET([.AD$24]+[.$BB112])+[.AE$29]*[.$Z$5]*MAGNET([.AE$24]+[.$BB112])+[.AF$29]*[.$Z$5]*MAGNET([.AF$24]+[.$BB112])+[.AG$29]*[.$Z$5]*MAGNET([.AG$24]+[.$BB112])+[.D$29]*[.$Z$5]*MAGNET([.D$24]+[.$BB112])+[.AH$29]*[.$Z$5]*MAGNET([.AH$24]+[.BB112]) +[.AI$29]*[.$Z$5]*MAGNET([.AI$24]+[.BB112]) +[.AJ$29]*[.$Z$5]*MAGNET([.AJ$24]+[.BB112]) +[.AK$29]*[.$Z$5]*MAGNET([.AK$24]+[.BB112]) +[.AL$29]*[.$Z$5]*MAGNET([.AL$24]+[.BB112]) +[.AM$29]*[.$Z$5]*MAGNET([.AM$24]+[.BB112]) +[.AN$29]*[.$Z$5]*MAGNET([.AN$24]+[.BB112]) +[.AO$29]*[.$Z$5]*MAGNET([.AO$24]+[.BB112]) +[.AP$29]*[.$Z$5]*MAGNET([.AP$24]+[.$BB112])&#10;+[.AQ$29]*[.$Z$5]*MAGNET([.AQ$24]+[.$BB112])&#10;+[.AR$29]*[.$Z$5]*MAGNET([.AR$24]+[.$BB112])&#10;+[.AS$29]*[.$Z$5]*MAGNET([.AS$24]+[.$BB112])&#10;+[.AT$29]*[.$Z$5]*MAGNET([.AT$24]+[.$BB112])&#10;+[.AU$29]*[.$Z$5]*MAGNET([.AU$24]+[.$BB112])&#10;+[.AV$29]*[.$Z$5]*MAGNET([.AV$24]+[.$BB112])&#10;+[.AW$29]*[.$Z$5]*MAGNET([.AW$24]+[.$BB112])&#10;+[.AX$29]*[.$Z$5]*MAGNET([.AX$24]+[.$BB112])&#10;+[.AY$29]*[.$Z$5]*MAGNET([.AY$24]+[.$BB112]) +RAND()*[.$BG$13]" office:value-type="float" office:value="-39.2034272773479" calcext:value-type="float">
            <text:p>-39.2034272773479</text:p>
          </table:table-cell>
          <table:table-cell table:style-name="ce71" table:formula="of:=[.E$30]*[.$Z$5]*MAGNET([.E$24]+[.$BB112])+[.F$30]*[.$Z$5]*MAGNET([.F$24]+[.$BB112])+[.G$30]*[.$Z$5]*MAGNET([.G$24]+[.$BB112])+[.H$30]*[.$Z$5]*MAGNET([.H$24]+[.$BB112])+[.I$30]*[.$Z$5]*MAGNET([.I$24]+[.$BB112])+[.J$30]*[.$Z$5]*MAGNET([.J$24]+[.$BB112])+[.K$30]*[.$Z$5]*MAGNET([.K$24]+[.$BB112])+[.L$30]*[.$Z$5]*MAGNET([.L$24]+[.$BB112])+[.M$30]*[.$Z$5]*MAGNET([.M$24]+[.$BB112])+[.N$30]*[.$Z$5]*MAGNET([.N$24]+[.$BB112])+[.O$30]*[.$Z$5]*MAGNET([.O$24]+[.$BB112])+[.P$30]*[.$Z$5]*MAGNET([.P$24]+[.$BB112])+[.Q$30]*[.$Z$5]*MAGNET([.Q$24]+[.$BB112])+[.R$30]*[.$Z$5]*MAGNET([.R$24]+[.$BB112])+[.S$30]*[.$Z$5]*MAGNET([.S$24]+[.$BB112])+[.T$30]*[.$Z$5]*MAGNET([.T$24]+[.$BB112])+[.U$30]*[.$Z$5]*MAGNET([.U$24]+[.$BB112])+[.V$30]*[.$Z$5]*MAGNET([.V$24]+[.$BB112])+[.W$30]*[.$Z$5]*MAGNET([.W$24]+[.$BB112])+[.X$30]*[.$Z$5]*MAGNET([.X$24]+[.$BB112])+[.Y$30]*[.$Z$5]*MAGNET([.Y$24]+[.$BB112])+[.Z$30]*[.$Z$5]*MAGNET([.Z$24]+[.$BB112])+[.AA$30]*[.$Z$5]*MAGNET([.AA$24]+[.$BB112])+[.AB$30]*[.$Z$5]*MAGNET([.AB$24]+[.$BB112])+[.AC$30]*[.$Z$5]*MAGNET([.AC$24]+[.$BB112])+[.AD$30]*[.$Z$5]*MAGNET([.AD$24]+[.$BB112])+[.AE$30]*[.$Z$5]*MAGNET([.AE$24]+[.$BB112])+[.AF$30]*[.$Z$5]*MAGNET([.AF$24]+[.$BB112])+[.AG$30]*[.$Z$5]*MAGNET([.AG$24]+[.$BB112])+[.D$30]*[.$Z$5]*MAGNET([.D$24]+[.$BB112])+[.AH$30]*[.$Z$5]*MAGNET([.AH$24]+[.BB112]) +[.AI$30]*[.$Z$5]*MAGNET([.AI$24]+[.BB112]) +[.AJ$30]*[.$Z$5]*MAGNET([.AJ$24]+[.BB112]) +[.AK$30]*[.$Z$5]*MAGNET([.AK$24]+[.BB112]) +[.AL$30]*[.$Z$5]*MAGNET([.AL$24]+[.BB112]) +[.AM$30]*[.$Z$5]*MAGNET([.AM$24]+[.BB112]) +[.AN$30]*[.$Z$5]*MAGNET([.AN$24]+[.BB112]) +[.AO$30]*[.$Z$5]*MAGNET([.AO$24]+[.BB112]) +[.AP$30]*[.$Z$5]*MAGNET([.AP$24]+[.$BB112])&#10;+[.AQ$30]*[.$Z$5]*MAGNET([.AQ$24]+[.$BB112])&#10;+[.AR$30]*[.$Z$5]*MAGNET([.AR$24]+[.$BB112])&#10;+[.AS$30]*[.$Z$5]*MAGNET([.AS$24]+[.$BB112])&#10;+[.AT$30]*[.$Z$5]*MAGNET([.AT$24]+[.$BB112])&#10;+[.AU$30]*[.$Z$5]*MAGNET([.AU$24]+[.$BB112])&#10;+[.AV$30]*[.$Z$5]*MAGNET([.AV$24]+[.$BB112])&#10;+[.AW$30]*[.$Z$5]*MAGNET([.AW$24]+[.$BB112])&#10;+[.AX$30]*[.$Z$5]*MAGNET([.AX$24]+[.$BB112])&#10;+[.AY$30]*[.$Z$5]*MAGNET([.AY$24]+[.$BB112]) +RAND()*[.$BH$13]" office:value-type="float" office:value="0" calcext:value-type="float">
            <text:p>0</text:p>
          </table:table-cell>
          <table:table-cell table:style-name="ce71" table:formula="of:=[.E$31]*[.$Z$5]*MAGNET([.E$24]+[.$BB112])+[.F$31]*[.$Z$5]*MAGNET([.F$24]+[.$BB112])+[.G$31]*[.$Z$5]*MAGNET([.G$24]+[.$BB112])+[.H$31]*[.$Z$5]*MAGNET([.H$24]+[.$BB112])+[.I$31]*[.$Z$5]*MAGNET([.I$24]+[.$BB112])+[.J$31]*[.$Z$5]*MAGNET([.J$24]+[.$BB112])+[.K$31]*[.$Z$5]*MAGNET([.K$24]+[.$BB112])+[.L$31]*[.$Z$5]*MAGNET([.L$24]+[.$BB112])+[.M$31]*[.$Z$5]*MAGNET([.M$24]+[.$BB112])+[.N$31]*[.$Z$5]*MAGNET([.N$24]+[.$BB112])+[.O$31]*[.$Z$5]*MAGNET([.O$24]+[.$BB112])+[.P$31]*[.$Z$5]*MAGNET([.P$24]+[.$BB112])+[.Q$31]*[.$Z$5]*MAGNET([.Q$24]+[.$BB112])+[.R$31]*[.$Z$5]*MAGNET([.R$24]+[.$BB112])+[.S$31]*[.$Z$5]*MAGNET([.S$24]+[.$BB112])+[.T$31]*[.$Z$5]*MAGNET([.T$24]+[.$BB112])+[.U$31]*[.$Z$5]*MAGNET([.U$24]+[.$BB112])+[.V$31]*[.$Z$5]*MAGNET([.V$24]+[.$BB112])+[.W$31]*[.$Z$5]*MAGNET([.W$24]+[.$BB112])+[.X$31]*[.$Z$5]*MAGNET([.X$24]+[.$BB112])+[.Y$31]*[.$Z$5]*MAGNET([.Y$24]+[.$BB112])+[.Z$31]*[.$Z$5]*MAGNET([.Z$24]+[.$BB112])+[.AA$31]*[.$Z$5]*MAGNET([.AA$24]+[.$BB112])+[.AB$31]*[.$Z$5]*MAGNET([.AB$24]+[.$BB112])+[.AC$31]*[.$Z$5]*MAGNET([.AC$24]+[.$BB112])+[.AD$31]*[.$Z$5]*MAGNET([.AD$24]+[.$BB112])+[.AE$31]*[.$Z$5]*MAGNET([.AE$24]+[.$BB112])+[.AF$31]*[.$Z$5]*MAGNET([.AF$24]+[.$BB112])+[.AG$31]*[.$Z$5]*MAGNET([.AG$24]+[.$BB112])+[.D$31]*[.$Z$5]*MAGNET([.D$24]+[.$BB112])+[.AH$31]*[.$Z$5]*MAGNET([.AH$24]+[.BB112]) +[.AI$31]*[.$Z$5]*MAGNET([.AI$24]+[.BB112]) +[.AJ$31]*[.$Z$5]*MAGNET([.AJ$24]+[.BB112]) +[.AK$31]*[.$Z$5]*MAGNET([.AK$24]+[.BB112]) +[.AL$31]*[.$Z$5]*MAGNET([.AL$24]+[.BB112]) +[.AM$31]*[.$Z$5]*MAGNET([.AM$24]+[.BB112]) +[.AN$31]*[.$Z$5]*MAGNET([.AN$24]+[.BB112]) +[.AO$31]*[.$Z$5]*MAGNET([.AO$24]+[.BB112]) +[.AP$31]*[.$Z$5]*MAGNET([.AP$24]+[.$BB112])&#10;+[.AQ$31]*[.$Z$5]*MAGNET([.AQ$24]+[.$BB112])&#10;+[.AR$31]*[.$Z$5]*MAGNET([.AR$24]+[.$BB112])&#10;+[.AS$31]*[.$Z$5]*MAGNET([.AS$24]+[.$BB112])&#10;+[.AT$31]*[.$Z$5]*MAGNET([.AT$24]+[.$BB112])&#10;+[.AU$31]*[.$Z$5]*MAGNET([.AU$24]+[.$BB112])&#10;+[.AV$31]*[.$Z$5]*MAGNET([.AV$24]+[.$BB112])&#10;+[.AW$31]*[.$Z$5]*MAGNET([.AW$24]+[.$BB112])&#10;+[.AX$31]*[.$Z$5]*MAGNET([.AX$24]+[.$BB112])&#10;+[.AY$31]*[.$Z$5]*MAGNET([.AY$24]+[.$BB112]) +RAND()*[.$BI$13]" office:value-type="float" office:value="0" calcext:value-type="float">
            <text:p>0</text:p>
          </table:table-cell>
          <table:table-cell table:style-name="ce71" table:formula="of:=[.E$32]*[.$Z$5]*MAGNET([.E$24]+[.$BB112])+[.F$32]*[.$Z$5]*MAGNET([.F$24]+[.$BB112])+[.G$32]*[.$Z$5]*MAGNET([.G$24]+[.$BB112])+[.H$32]*[.$Z$5]*MAGNET([.H$24]+[.$BB112])+[.I$32]*[.$Z$5]*MAGNET([.I$24]+[.$BB112])+[.J$32]*[.$Z$5]*MAGNET([.J$24]+[.$BB112])+[.K$32]*[.$Z$5]*MAGNET([.K$24]+[.$BB112])+[.L$32]*[.$Z$5]*MAGNET([.L$24]+[.$BB112])+[.M$32]*[.$Z$5]*MAGNET([.M$24]+[.$BB112])+[.N$32]*[.$Z$5]*MAGNET([.N$24]+[.$BB112])+[.O$32]*[.$Z$5]*MAGNET([.O$24]+[.$BB112])+[.P$32]*[.$Z$5]*MAGNET([.P$24]+[.$BB112])+[.Q$32]*[.$Z$5]*MAGNET([.Q$24]+[.$BB112])+[.R$32]*[.$Z$5]*MAGNET([.R$24]+[.$BB112])+[.S$32]*[.$Z$5]*MAGNET([.S$24]+[.$BB112])+[.T$32]*[.$Z$5]*MAGNET([.T$24]+[.$BB112])+[.U$32]*[.$Z$5]*MAGNET([.U$24]+[.$BB112])+[.V$32]*[.$Z$5]*MAGNET([.V$24]+[.$BB112])+[.W$32]*[.$Z$5]*MAGNET([.W$24]+[.$BB112])+[.X$32]*[.$Z$5]*MAGNET([.X$24]+[.$BB112])+[.Y$32]*[.$Z$5]*MAGNET([.Y$24]+[.$BB112])+[.Z$32]*[.$Z$5]*MAGNET([.Z$24]+[.$BB112])+[.AA$32]*[.$Z$5]*MAGNET([.AA$24]+[.$BB112])+[.AB$32]*[.$Z$5]*MAGNET([.AB$24]+[.$BB112])+[.AC$32]*[.$Z$5]*MAGNET([.AC$24]+[.$BB112])+[.AD$32]*[.$Z$5]*MAGNET([.AD$24]+[.$BB112])+[.AE$32]*[.$Z$5]*MAGNET([.AE$24]+[.$BB112])+[.AF$32]*[.$Z$5]*MAGNET([.AF$24]+[.$BB112])+[.AG$32]*[.$Z$5]*MAGNET([.AG$24]+[.$BB112])+[.D$32]*[.$Z$5]*MAGNET([.D$24]+[.$BB112])+[.AH$32]*[.$Z$5]*MAGNET([.AH$24]+[.BB112]) +[.AI$32]*[.$Z$5]*MAGNET([.AI$24]+[.BB112]) +[.AJ$32]*[.$Z$5]*MAGNET([.AJ$24]+[.BB112]) +[.AK$32]*[.$Z$5]*MAGNET([.AK$24]+[.BB112]) +[.AL$32]*[.$Z$5]*MAGNET([.AL$24]+[.BB112]) +[.AM$32]*[.$Z$5]*MAGNET([.AM$24]+[.BB112]) +[.AN$32]*[.$Z$5]*MAGNET([.AN$24]+[.BB112]) +[.AO$32]*[.$Z$5]*MAGNET([.AO$24]+[.BB112]) +[.AP$32]*[.$Z$5]*MAGNET([.AP$24]+[.$BB112])&#10;+[.AQ$32]*[.$Z$5]*MAGNET([.AQ$24]+[.$BB112])&#10;+[.AR$32]*[.$Z$5]*MAGNET([.AR$24]+[.$BB112])&#10;+[.AS$32]*[.$Z$5]*MAGNET([.AS$24]+[.$BB112])&#10;+[.AT$32]*[.$Z$5]*MAGNET([.AT$24]+[.$BB112])&#10;+[.AU$32]*[.$Z$5]*MAGNET([.AU$24]+[.$BB112])&#10;+[.AV$32]*[.$Z$5]*MAGNET([.AV$24]+[.$BB112])&#10;+[.AW$32]*[.$Z$5]*MAGNET([.AW$24]+[.$BB112])&#10;+[.AX$32]*[.$Z$5]*MAGNET([.AX$24]+[.$BB112])&#10;+[.AY$32]*[.$Z$5]*MAGNET([.AY$24]+[.$BB112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12]+0.002" office:value-type="float" office:value="0.196" calcext:value-type="float">
            <text:p>0.196</text:p>
          </table:table-cell>
          <table:table-cell table:formula="of:=[.BA113]*[.$D$6]" office:value-type="float" office:value="9.8520345616576" calcext:value-type="float">
            <text:p>9.852</text:p>
          </table:table-cell>
          <table:table-cell table:formula="of:=[.D$25]*[.$Z$5]*MAGNET([.D$24]+[.BB113])+[.E$25]*[.$Z$5]*MAGNET([.E$24]+[.BB113])+[.F$25]*[.$Z$5]*MAGNET([.F$24]+[.BB113])+[.G$25]*[.$Z$5]*MAGNET([.G$24]+[.BB113])+[.H$25]*[.$Z$5]*MAGNET([.H$24]+[.BB113])+[.I$25]*[.$Z$5]*MAGNET([.I$24]+[.BB113])+[.J$25]*[.$Z$5]*MAGNET([.J$24]+[.BB113])+[.K$25]*[.$Z$5]*MAGNET([.K$24]+[.BB113])+[.L$25]*[.$Z$5]*MAGNET([.L$24]+[.BB113])+[.M$25]*[.$Z$5]*MAGNET([.M$24]+[.BB113])+[.N$25]*[.$Z$5]*MAGNET([.N$24]+[.BB113])+[.O$25]*[.$Z$5]*MAGNET([.O$24]+[.BB113])+[.P$25]*[.$Z$5]*MAGNET([.P$24]+[.BB113])+[.Q$25]*[.$Z$5]*MAGNET([.Q$24]+[.BB113])+[.R$25]*[.$Z$5]*MAGNET([.R$24]+[.BB113])+[.S$25]*[.$Z$5]*MAGNET([.S$24]+[.BB113])+[.T$25]*[.$Z$5]*MAGNET([.T$24]+[.BB113])+[.U$25]*[.$Z$5]*MAGNET([.U$24]+[.BB113])+[.V$25]*[.$Z$5]*MAGNET([.V$24]+[.BB113])+[.W$25]*[.$Z$5]*MAGNET([.W$24]+[.BB113])+[.X$25]*[.$Z$5]*MAGNET([.X$24]+[.BB113])+[.Y$25]*[.$Z$5]*MAGNET([.Y$24]+[.BB113])+[.Z$25]*[.$Z$5]*MAGNET([.Z$24]+[.BB113])+[.AA$25]*[.$Z$5]*MAGNET([.AA$24]+[.BB113])+[.AB$25]*[.$Z$5]*MAGNET([.AB$24]+[.BB113])+[.AC$25]*[.$Z$5]*MAGNET([.AC$24]+[.BB113])+[.AD$25]*[.$Z$5]*MAGNET([.AD$24]+[.BB113])+[.AE$25]*[.$Z$5]*MAGNET([.AE$24]+[.BB113])+[.AF$25]*[.$Z$5]*MAGNET([.AF$24]+[.BB113])+[.AG$25]*[.$Z$5]*MAGNET([.AG$24]+[.BB113])+[.AH$25]*[.$Z$5]*MAGNET([.AH$24]+[.BB113]) +[.AI$25]*[.$Z$5]*MAGNET([.AI$24]+[.BB113]) +[.AJ$25]*[.$Z$5]*MAGNET([.AJ$24]+[.BB113]) +[.AK$25]*[.$Z$5]*MAGNET([.AK$24]+[.BB113]) +[.AL$25]*[.$Z$5]*MAGNET([.AL$24]+[.BB113]) +[.AM$25]*[.$Z$5]*MAGNET([.AM$24]+[.BB113]) +[.AN$25]*[.$Z$5]*MAGNET([.AN$24]+[.BB113]) +[.AO$25]*[.$Z$5]*MAGNET([.AO$24]+[.BB113])+RAND()*[.$BC$13]+[.AP$25]*[.$Z$5]*MAGNET([.AP$24]+[.BB113])&#10;+[.AQ$25]*[.$Z$5]*MAGNET([.AQ$24]+[.BB113])&#10;+[.AR$25]*[.$Z$5]*MAGNET([.AR$24]+[.BB113])&#10;+[.AS$25]*[.$Z$5]*MAGNET([.AS$24]+[.BB113])&#10;+[.AT$25]*[.$Z$5]*MAGNET([.AT$24]+[.BB113])&#10;+[.AU$25]*[.$Z$5]*MAGNET([.AU$24]+[.BB113])&#10;+[.AV$25]*[.$Z$5]*MAGNET([.AV$24]+[.BB113])&#10;+[.AW$25]*[.$Z$5]*MAGNET([.AW$24]+[.BB113])&#10;+[.AX$25]*[.$Z$5]*MAGNET([.AX$24]+[.BB113])&#10;+[.AY$25]*[.$Z$5]*MAGNET([.AY$24]+[.BB113])" office:value-type="float" office:value="1.01876077063262" calcext:value-type="float">
            <text:p>1.02</text:p>
          </table:table-cell>
          <table:table-cell table:style-name="ce70" table:formula="of:=[.E$26]*[.$Z$5]*MAGNET([.E$24]+[.$BB113])+[.F$26]*[.$Z$5]*MAGNET([.F$24]+[.$BB113])+[.G$26]*[.$Z$5]*MAGNET([.G$24]+[.$BB113])+[.H$26]*[.$Z$5]*MAGNET([.H$24]+[.$BB113])+[.I$26]*[.$Z$5]*MAGNET([.I$24]+[.$BB113])+[.J$26]*[.$Z$5]*MAGNET([.J$24]+[.$BB113])+[.K$26]*[.$Z$5]*MAGNET([.K$24]+[.$BB113])+[.L$26]*[.$Z$5]*MAGNET([.L$24]+[.$BB113])+[.M$26]*[.$Z$5]*MAGNET([.M$24]+[.$BB113])+[.N$26]*[.$Z$5]*MAGNET([.N$24]+[.$BB113])+[.O$26]*[.$Z$5]*MAGNET([.O$24]+[.$BB113])+[.P$26]*[.$Z$5]*MAGNET([.P$24]+[.$BB113])+[.Q$26]*[.$Z$5]*MAGNET([.Q$24]+[.$BB113])+[.R$26]*[.$Z$5]*MAGNET([.R$24]+[.$BB113])+[.S$26]*[.$Z$5]*MAGNET([.S$24]+[.$BB113])+[.T$26]*[.$Z$5]*MAGNET([.T$24]+[.$BB113])+[.U$26]*[.$Z$5]*MAGNET([.U$24]+[.$BB113])+[.V$26]*[.$Z$5]*MAGNET([.V$24]+[.$BB113])+[.W$26]*[.$Z$5]*MAGNET([.W$24]+[.$BB113])+[.X$26]*[.$Z$5]*MAGNET([.X$24]+[.$BB113])+[.Y$26]*[.$Z$5]*MAGNET([.Y$24]+[.$BB113])+[.Z$26]*[.$Z$5]*MAGNET([.Z$24]+[.$BB113])+[.AA$26]*[.$Z$5]*MAGNET([.AA$24]+[.$BB113])+[.AB$26]*[.$Z$5]*MAGNET([.AB$24]+[.$BB113])+[.AC$26]*[.$Z$5]*MAGNET([.AC$24]+[.$BB113])+[.AD$26]*[.$Z$5]*MAGNET([.AD$24]+[.$BB113])+[.AE$26]*[.$Z$5]*MAGNET([.AE$24]+[.$BB113])+[.AF$26]*[.$Z$5]*MAGNET([.AF$24]+[.$BB113])+[.AG$26]*[.$Z$5]*MAGNET([.AG$24]+[.$BB113])+[.D$26]*[.$Z$5]*MAGNET([.D$24]+[.$BB113])+[.AH$26]*[.$Z$5]*MAGNET([.AH$24]+[.BB113]) +[.AI$26]*[.$Z$5]*MAGNET([.AI$24]+[.BB113]) +[.AJ$26]*[.$Z$5]*MAGNET([.AJ$24]+[.BB113]) +[.AK$26]*[.$Z$5]*MAGNET([.AK$24]+[.BB113]) +[.AL$26]*[.$Z$5]*MAGNET([.AL$24]+[.BB113]) +[.AM$26]*[.$Z$5]*MAGNET([.AM$24]+[.BB113]) +[.AN$26]*[.$Z$5]*MAGNET([.AN$24]+[.BB113]) +[.AO$26]*[.$Z$5]*MAGNET([.AO$24]+[.BB113]) +[.AP$26]*[.$Z$5]*MAGNET([.AP$24]+[.$BB113])&#10;+[.AQ$26]*[.$Z$5]*MAGNET([.AQ$24]+[.$BB113])&#10;+[.AR$26]*[.$Z$5]*MAGNET([.AR$24]+[.$BB113])&#10;+[.AS$26]*[.$Z$5]*MAGNET([.AS$24]+[.$BB113])&#10;+[.AT$26]*[.$Z$5]*MAGNET([.AT$24]+[.$BB113])&#10;+[.AU$26]*[.$Z$5]*MAGNET([.AU$24]+[.$BB113])&#10;+[.AV$26]*[.$Z$5]*MAGNET([.AV$24]+[.$BB113])&#10;+[.AW$26]*[.$Z$5]*MAGNET([.AW$24]+[.$BB113])&#10;+[.AX$26]*[.$Z$5]*MAGNET([.AX$24]+[.$BB113])&#10;+[.AY$26]*[.$Z$5]*MAGNET([.AY$24]+[.$BB113]) +RAND()*[.$BD$13]" office:value-type="float" office:value="-72.0132772680967" calcext:value-type="float">
            <text:p>-72.01</text:p>
          </table:table-cell>
          <table:table-cell table:style-name="ce71" table:formula="of:=[.E$27]*[.$Z$5]*MAGNET([.E$24]+[.$BB113])+[.F$27]*[.$Z$5]*MAGNET([.F$24]+[.$BB113])+[.G$27]*[.$Z$5]*MAGNET([.G$24]+[.$BB113])+[.H$27]*[.$Z$5]*MAGNET([.H$24]+[.$BB113])+[.I$27]*[.$Z$5]*MAGNET([.I$24]+[.$BB113])+[.J$27]*[.$Z$5]*MAGNET([.J$24]+[.$BB113])+[.K$27]*[.$Z$5]*MAGNET([.K$24]+[.$BB113])+[.L$27]*[.$Z$5]*MAGNET([.L$24]+[.$BB113])+[.M$27]*[.$Z$5]*MAGNET([.M$24]+[.$BB113])+[.N$27]*[.$Z$5]*MAGNET([.N$24]+[.$BB113])+[.O$27]*[.$Z$5]*MAGNET([.O$24]+[.$BB113])+[.P$27]*[.$Z$5]*MAGNET([.P$24]+[.$BB113])+[.Q$27]*[.$Z$5]*MAGNET([.Q$24]+[.$BB113])+[.R$27]*[.$Z$5]*MAGNET([.R$24]+[.$BB113])+[.S$27]*[.$Z$5]*MAGNET([.S$24]+[.$BB113])+[.T$27]*[.$Z$5]*MAGNET([.T$24]+[.$BB113])+[.U$27]*[.$Z$5]*MAGNET([.U$24]+[.$BB113])+[.V$27]*[.$Z$5]*MAGNET([.V$24]+[.$BB113])+[.W$27]*[.$Z$5]*MAGNET([.W$24]+[.$BB113])+[.X$27]*[.$Z$5]*MAGNET([.X$24]+[.$BB113])+[.Y$27]*[.$Z$5]*MAGNET([.Y$24]+[.$BB113])+[.Z$27]*[.$Z$5]*MAGNET([.Z$24]+[.$BB113])+[.AA$27]*[.$Z$5]*MAGNET([.AA$24]+[.$BB113])+[.AB$27]*[.$Z$5]*MAGNET([.AB$24]+[.$BB113])+[.AC$27]*[.$Z$5]*MAGNET([.AC$24]+[.$BB113])+[.AD$27]*[.$Z$5]*MAGNET([.AD$24]+[.$BB113])+[.AE$27]*[.$Z$5]*MAGNET([.AE$24]+[.$BB113])+[.AF$27]*[.$Z$5]*MAGNET([.AF$24]+[.$BB113])+[.AG$27]*[.$Z$5]*MAGNET([.AG$24]+[.$BB113])+[.D$27]*[.$Z$5]*MAGNET([.D$24]+[.$BB113])+[.AH$27]*[.$Z$5]*MAGNET([.AH$24]+[.BB113]) +[.AI$27]*[.$Z$5]*MAGNET([.AI$24]+[.BB113]) +[.AJ$27]*[.$Z$5]*MAGNET([.AJ$24]+[.BB113]) +[.AK$27]*[.$Z$5]*MAGNET([.AK$24]+[.BB113]) +[.AL$27]*[.$Z$5]*MAGNET([.AL$24]+[.BB113]) +[.AM$27]*[.$Z$5]*MAGNET([.AM$24]+[.BB113]) +[.AN$27]*[.$Z$5]*MAGNET([.AN$24]+[.BB113]) +[.AO$27]*[.$Z$5]*MAGNET([.AO$24]+[.BB113]) +[.AP$27]*[.$Z$5]*MAGNET([.AP$24]+[.$BB113])&#10;+[.AQ$27]*[.$Z$5]*MAGNET([.AQ$24]+[.$BB113])&#10;+[.AR$27]*[.$Z$5]*MAGNET([.AR$24]+[.$BB113])&#10;+[.AS$27]*[.$Z$5]*MAGNET([.AS$24]+[.$BB113])&#10;+[.AT$27]*[.$Z$5]*MAGNET([.AT$24]+[.$BB113])&#10;+[.AU$27]*[.$Z$5]*MAGNET([.AU$24]+[.$BB113])&#10;+[.AV$27]*[.$Z$5]*MAGNET([.AV$24]+[.$BB113])&#10;+[.AW$27]*[.$Z$5]*MAGNET([.AW$24]+[.$BB113])&#10;+[.AX$27]*[.$Z$5]*MAGNET([.AX$24]+[.$BB113])&#10;+[.AY$27]*[.$Z$5]*MAGNET([.AY$24]+[.$BB113]) +RAND()*[.$BE$13]" office:value-type="float" office:value="106.96462917615" calcext:value-type="float">
            <text:p>106.96462917615</text:p>
          </table:table-cell>
          <table:table-cell table:style-name="ce71" table:formula="of:=[.E$28]*[.$Z$5]*MAGNET([.E$24]+[.$BB113])+[.F$28]*[.$Z$5]*MAGNET([.F$24]+[.$BB113])+[.G$28]*[.$Z$5]*MAGNET([.G$24]+[.$BB113])+[.H$28]*[.$Z$5]*MAGNET([.H$24]+[.$BB113])+[.I$28]*[.$Z$5]*MAGNET([.I$24]+[.$BB113])+[.J$28]*[.$Z$5]*MAGNET([.J$24]+[.$BB113])+[.K$28]*[.$Z$5]*MAGNET([.K$24]+[.$BB113])+[.L$28]*[.$Z$5]*MAGNET([.L$24]+[.$BB113])+[.M$28]*[.$Z$5]*MAGNET([.M$24]+[.$BB113])+[.N$28]*[.$Z$5]*MAGNET([.N$24]+[.$BB113])+[.O$28]*[.$Z$5]*MAGNET([.O$24]+[.$BB113])+[.P$28]*[.$Z$5]*MAGNET([.P$24]+[.$BB113])+[.Q$28]*[.$Z$5]*MAGNET([.Q$24]+[.$BB113])+[.R$28]*[.$Z$5]*MAGNET([.R$24]+[.$BB113])+[.S$28]*[.$Z$5]*MAGNET([.S$24]+[.$BB113])+[.T$28]*[.$Z$5]*MAGNET([.T$24]+[.$BB113])+[.U$28]*[.$Z$5]*MAGNET([.U$24]+[.$BB113])+[.V$28]*[.$Z$5]*MAGNET([.V$24]+[.$BB113])+[.W$28]*[.$Z$5]*MAGNET([.W$24]+[.$BB113])+[.X$28]*[.$Z$5]*MAGNET([.X$24]+[.$BB113])+[.Y$28]*[.$Z$5]*MAGNET([.Y$24]+[.$BB113])+[.Z$28]*[.$Z$5]*MAGNET([.Z$24]+[.$BB113])+[.AA$28]*[.$Z$5]*MAGNET([.AA$24]+[.$BB113])+[.AB$28]*[.$Z$5]*MAGNET([.AB$24]+[.$BB113])+[.AC$28]*[.$Z$5]*MAGNET([.AC$24]+[.$BB113])+[.AD$28]*[.$Z$5]*MAGNET([.AD$24]+[.$BB113])+[.AE$28]*[.$Z$5]*MAGNET([.AE$24]+[.$BB113])+[.AF$28]*[.$Z$5]*MAGNET([.AF$24]+[.$BB113])+[.AG$28]*[.$Z$5]*MAGNET([.AG$24]+[.$BB113])+[.D$28]*[.$Z$5]*MAGNET([.D$24]+[.$BB113])+[.AH$28]*[.$Z$5]*MAGNET([.AH$24]+[.BB113]) +[.AI$28]*[.$Z$5]*MAGNET([.AI$24]+[.BB113]) +[.AJ$28]*[.$Z$5]*MAGNET([.AJ$24]+[.BB113]) +[.AK$28]*[.$Z$5]*MAGNET([.AK$24]+[.BB113]) +[.AL$28]*[.$Z$5]*MAGNET([.AL$24]+[.BB113]) +[.AM$28]*[.$Z$5]*MAGNET([.AM$24]+[.BB113]) +[.AN$28]*[.$Z$5]*MAGNET([.AN$24]+[.BB113]) +[.AO$28]*[.$Z$5]*MAGNET([.AO$24]+[.BB113]) +[.AP$28]*[.$Z$5]*MAGNET([.AP$24]+[.$BB113])&#10;+[.AQ$28]*[.$Z$5]*MAGNET([.AQ$24]+[.$BB113])&#10;+[.AR$28]*[.$Z$5]*MAGNET([.AR$24]+[.$BB113])&#10;+[.AS$28]*[.$Z$5]*MAGNET([.AS$24]+[.$BB113])&#10;+[.AT$28]*[.$Z$5]*MAGNET([.AT$24]+[.$BB113])&#10;+[.AU$28]*[.$Z$5]*MAGNET([.AU$24]+[.$BB113])&#10;+[.AV$28]*[.$Z$5]*MAGNET([.AV$24]+[.$BB113])&#10;+[.AW$28]*[.$Z$5]*MAGNET([.AW$24]+[.$BB113])&#10;+[.AX$28]*[.$Z$5]*MAGNET([.AX$24]+[.$BB113])&#10;+[.AY$28]*[.$Z$5]*MAGNET([.AY$24]+[.$BB113]) +RAND()*[.$BF$13]" office:value-type="float" office:value="13.819767495982" calcext:value-type="float">
            <text:p>13.819767495982</text:p>
          </table:table-cell>
          <table:table-cell table:style-name="ce71" table:formula="of:=[.E$29]*[.$Z$5]*MAGNET([.E$24]+[.$BB113])+[.F$29]*[.$Z$5]*MAGNET([.F$24]+[.$BB113])+[.G$29]*[.$Z$5]*MAGNET([.G$24]+[.$BB113])+[.H$29]*[.$Z$5]*MAGNET([.H$24]+[.$BB113])+[.I$29]*[.$Z$5]*MAGNET([.I$24]+[.$BB113])+[.J$29]*[.$Z$5]*MAGNET([.J$24]+[.$BB113])+[.K$29]*[.$Z$5]*MAGNET([.K$24]+[.$BB113])+[.L$29]*[.$Z$5]*MAGNET([.L$24]+[.$BB113])+[.M$29]*[.$Z$5]*MAGNET([.M$24]+[.$BB113])+[.N$29]*[.$Z$5]*MAGNET([.N$24]+[.$BB113])+[.O$29]*[.$Z$5]*MAGNET([.O$24]+[.$BB113])+[.P$29]*[.$Z$5]*MAGNET([.P$24]+[.$BB113])+[.Q$29]*[.$Z$5]*MAGNET([.Q$24]+[.$BB113])+[.R$29]*[.$Z$5]*MAGNET([.R$24]+[.$BB113])+[.S$29]*[.$Z$5]*MAGNET([.S$24]+[.$BB113])+[.T$29]*[.$Z$5]*MAGNET([.T$24]+[.$BB113])+[.U$29]*[.$Z$5]*MAGNET([.U$24]+[.$BB113])+[.V$29]*[.$Z$5]*MAGNET([.V$24]+[.$BB113])+[.W$29]*[.$Z$5]*MAGNET([.W$24]+[.$BB113])+[.X$29]*[.$Z$5]*MAGNET([.X$24]+[.$BB113])+[.Y$29]*[.$Z$5]*MAGNET([.Y$24]+[.$BB113])+[.Z$29]*[.$Z$5]*MAGNET([.Z$24]+[.$BB113])+[.AA$29]*[.$Z$5]*MAGNET([.AA$24]+[.$BB113])+[.AB$29]*[.$Z$5]*MAGNET([.AB$24]+[.$BB113])+[.AC$29]*[.$Z$5]*MAGNET([.AC$24]+[.$BB113])+[.AD$29]*[.$Z$5]*MAGNET([.AD$24]+[.$BB113])+[.AE$29]*[.$Z$5]*MAGNET([.AE$24]+[.$BB113])+[.AF$29]*[.$Z$5]*MAGNET([.AF$24]+[.$BB113])+[.AG$29]*[.$Z$5]*MAGNET([.AG$24]+[.$BB113])+[.D$29]*[.$Z$5]*MAGNET([.D$24]+[.$BB113])+[.AH$29]*[.$Z$5]*MAGNET([.AH$24]+[.BB113]) +[.AI$29]*[.$Z$5]*MAGNET([.AI$24]+[.BB113]) +[.AJ$29]*[.$Z$5]*MAGNET([.AJ$24]+[.BB113]) +[.AK$29]*[.$Z$5]*MAGNET([.AK$24]+[.BB113]) +[.AL$29]*[.$Z$5]*MAGNET([.AL$24]+[.BB113]) +[.AM$29]*[.$Z$5]*MAGNET([.AM$24]+[.BB113]) +[.AN$29]*[.$Z$5]*MAGNET([.AN$24]+[.BB113]) +[.AO$29]*[.$Z$5]*MAGNET([.AO$24]+[.BB113]) +[.AP$29]*[.$Z$5]*MAGNET([.AP$24]+[.$BB113])&#10;+[.AQ$29]*[.$Z$5]*MAGNET([.AQ$24]+[.$BB113])&#10;+[.AR$29]*[.$Z$5]*MAGNET([.AR$24]+[.$BB113])&#10;+[.AS$29]*[.$Z$5]*MAGNET([.AS$24]+[.$BB113])&#10;+[.AT$29]*[.$Z$5]*MAGNET([.AT$24]+[.$BB113])&#10;+[.AU$29]*[.$Z$5]*MAGNET([.AU$24]+[.$BB113])&#10;+[.AV$29]*[.$Z$5]*MAGNET([.AV$24]+[.$BB113])&#10;+[.AW$29]*[.$Z$5]*MAGNET([.AW$24]+[.$BB113])&#10;+[.AX$29]*[.$Z$5]*MAGNET([.AX$24]+[.$BB113])&#10;+[.AY$29]*[.$Z$5]*MAGNET([.AY$24]+[.$BB113]) +RAND()*[.$BG$13]" office:value-type="float" office:value="-41.8116942064032" calcext:value-type="float">
            <text:p>-41.8116942064032</text:p>
          </table:table-cell>
          <table:table-cell table:style-name="ce71" table:formula="of:=[.E$30]*[.$Z$5]*MAGNET([.E$24]+[.$BB113])+[.F$30]*[.$Z$5]*MAGNET([.F$24]+[.$BB113])+[.G$30]*[.$Z$5]*MAGNET([.G$24]+[.$BB113])+[.H$30]*[.$Z$5]*MAGNET([.H$24]+[.$BB113])+[.I$30]*[.$Z$5]*MAGNET([.I$24]+[.$BB113])+[.J$30]*[.$Z$5]*MAGNET([.J$24]+[.$BB113])+[.K$30]*[.$Z$5]*MAGNET([.K$24]+[.$BB113])+[.L$30]*[.$Z$5]*MAGNET([.L$24]+[.$BB113])+[.M$30]*[.$Z$5]*MAGNET([.M$24]+[.$BB113])+[.N$30]*[.$Z$5]*MAGNET([.N$24]+[.$BB113])+[.O$30]*[.$Z$5]*MAGNET([.O$24]+[.$BB113])+[.P$30]*[.$Z$5]*MAGNET([.P$24]+[.$BB113])+[.Q$30]*[.$Z$5]*MAGNET([.Q$24]+[.$BB113])+[.R$30]*[.$Z$5]*MAGNET([.R$24]+[.$BB113])+[.S$30]*[.$Z$5]*MAGNET([.S$24]+[.$BB113])+[.T$30]*[.$Z$5]*MAGNET([.T$24]+[.$BB113])+[.U$30]*[.$Z$5]*MAGNET([.U$24]+[.$BB113])+[.V$30]*[.$Z$5]*MAGNET([.V$24]+[.$BB113])+[.W$30]*[.$Z$5]*MAGNET([.W$24]+[.$BB113])+[.X$30]*[.$Z$5]*MAGNET([.X$24]+[.$BB113])+[.Y$30]*[.$Z$5]*MAGNET([.Y$24]+[.$BB113])+[.Z$30]*[.$Z$5]*MAGNET([.Z$24]+[.$BB113])+[.AA$30]*[.$Z$5]*MAGNET([.AA$24]+[.$BB113])+[.AB$30]*[.$Z$5]*MAGNET([.AB$24]+[.$BB113])+[.AC$30]*[.$Z$5]*MAGNET([.AC$24]+[.$BB113])+[.AD$30]*[.$Z$5]*MAGNET([.AD$24]+[.$BB113])+[.AE$30]*[.$Z$5]*MAGNET([.AE$24]+[.$BB113])+[.AF$30]*[.$Z$5]*MAGNET([.AF$24]+[.$BB113])+[.AG$30]*[.$Z$5]*MAGNET([.AG$24]+[.$BB113])+[.D$30]*[.$Z$5]*MAGNET([.D$24]+[.$BB113])+[.AH$30]*[.$Z$5]*MAGNET([.AH$24]+[.BB113]) +[.AI$30]*[.$Z$5]*MAGNET([.AI$24]+[.BB113]) +[.AJ$30]*[.$Z$5]*MAGNET([.AJ$24]+[.BB113]) +[.AK$30]*[.$Z$5]*MAGNET([.AK$24]+[.BB113]) +[.AL$30]*[.$Z$5]*MAGNET([.AL$24]+[.BB113]) +[.AM$30]*[.$Z$5]*MAGNET([.AM$24]+[.BB113]) +[.AN$30]*[.$Z$5]*MAGNET([.AN$24]+[.BB113]) +[.AO$30]*[.$Z$5]*MAGNET([.AO$24]+[.BB113]) +[.AP$30]*[.$Z$5]*MAGNET([.AP$24]+[.$BB113])&#10;+[.AQ$30]*[.$Z$5]*MAGNET([.AQ$24]+[.$BB113])&#10;+[.AR$30]*[.$Z$5]*MAGNET([.AR$24]+[.$BB113])&#10;+[.AS$30]*[.$Z$5]*MAGNET([.AS$24]+[.$BB113])&#10;+[.AT$30]*[.$Z$5]*MAGNET([.AT$24]+[.$BB113])&#10;+[.AU$30]*[.$Z$5]*MAGNET([.AU$24]+[.$BB113])&#10;+[.AV$30]*[.$Z$5]*MAGNET([.AV$24]+[.$BB113])&#10;+[.AW$30]*[.$Z$5]*MAGNET([.AW$24]+[.$BB113])&#10;+[.AX$30]*[.$Z$5]*MAGNET([.AX$24]+[.$BB113])&#10;+[.AY$30]*[.$Z$5]*MAGNET([.AY$24]+[.$BB113]) +RAND()*[.$BH$13]" office:value-type="float" office:value="0" calcext:value-type="float">
            <text:p>0</text:p>
          </table:table-cell>
          <table:table-cell table:style-name="ce71" table:formula="of:=[.E$31]*[.$Z$5]*MAGNET([.E$24]+[.$BB113])+[.F$31]*[.$Z$5]*MAGNET([.F$24]+[.$BB113])+[.G$31]*[.$Z$5]*MAGNET([.G$24]+[.$BB113])+[.H$31]*[.$Z$5]*MAGNET([.H$24]+[.$BB113])+[.I$31]*[.$Z$5]*MAGNET([.I$24]+[.$BB113])+[.J$31]*[.$Z$5]*MAGNET([.J$24]+[.$BB113])+[.K$31]*[.$Z$5]*MAGNET([.K$24]+[.$BB113])+[.L$31]*[.$Z$5]*MAGNET([.L$24]+[.$BB113])+[.M$31]*[.$Z$5]*MAGNET([.M$24]+[.$BB113])+[.N$31]*[.$Z$5]*MAGNET([.N$24]+[.$BB113])+[.O$31]*[.$Z$5]*MAGNET([.O$24]+[.$BB113])+[.P$31]*[.$Z$5]*MAGNET([.P$24]+[.$BB113])+[.Q$31]*[.$Z$5]*MAGNET([.Q$24]+[.$BB113])+[.R$31]*[.$Z$5]*MAGNET([.R$24]+[.$BB113])+[.S$31]*[.$Z$5]*MAGNET([.S$24]+[.$BB113])+[.T$31]*[.$Z$5]*MAGNET([.T$24]+[.$BB113])+[.U$31]*[.$Z$5]*MAGNET([.U$24]+[.$BB113])+[.V$31]*[.$Z$5]*MAGNET([.V$24]+[.$BB113])+[.W$31]*[.$Z$5]*MAGNET([.W$24]+[.$BB113])+[.X$31]*[.$Z$5]*MAGNET([.X$24]+[.$BB113])+[.Y$31]*[.$Z$5]*MAGNET([.Y$24]+[.$BB113])+[.Z$31]*[.$Z$5]*MAGNET([.Z$24]+[.$BB113])+[.AA$31]*[.$Z$5]*MAGNET([.AA$24]+[.$BB113])+[.AB$31]*[.$Z$5]*MAGNET([.AB$24]+[.$BB113])+[.AC$31]*[.$Z$5]*MAGNET([.AC$24]+[.$BB113])+[.AD$31]*[.$Z$5]*MAGNET([.AD$24]+[.$BB113])+[.AE$31]*[.$Z$5]*MAGNET([.AE$24]+[.$BB113])+[.AF$31]*[.$Z$5]*MAGNET([.AF$24]+[.$BB113])+[.AG$31]*[.$Z$5]*MAGNET([.AG$24]+[.$BB113])+[.D$31]*[.$Z$5]*MAGNET([.D$24]+[.$BB113])+[.AH$31]*[.$Z$5]*MAGNET([.AH$24]+[.BB113]) +[.AI$31]*[.$Z$5]*MAGNET([.AI$24]+[.BB113]) +[.AJ$31]*[.$Z$5]*MAGNET([.AJ$24]+[.BB113]) +[.AK$31]*[.$Z$5]*MAGNET([.AK$24]+[.BB113]) +[.AL$31]*[.$Z$5]*MAGNET([.AL$24]+[.BB113]) +[.AM$31]*[.$Z$5]*MAGNET([.AM$24]+[.BB113]) +[.AN$31]*[.$Z$5]*MAGNET([.AN$24]+[.BB113]) +[.AO$31]*[.$Z$5]*MAGNET([.AO$24]+[.BB113]) +[.AP$31]*[.$Z$5]*MAGNET([.AP$24]+[.$BB113])&#10;+[.AQ$31]*[.$Z$5]*MAGNET([.AQ$24]+[.$BB113])&#10;+[.AR$31]*[.$Z$5]*MAGNET([.AR$24]+[.$BB113])&#10;+[.AS$31]*[.$Z$5]*MAGNET([.AS$24]+[.$BB113])&#10;+[.AT$31]*[.$Z$5]*MAGNET([.AT$24]+[.$BB113])&#10;+[.AU$31]*[.$Z$5]*MAGNET([.AU$24]+[.$BB113])&#10;+[.AV$31]*[.$Z$5]*MAGNET([.AV$24]+[.$BB113])&#10;+[.AW$31]*[.$Z$5]*MAGNET([.AW$24]+[.$BB113])&#10;+[.AX$31]*[.$Z$5]*MAGNET([.AX$24]+[.$BB113])&#10;+[.AY$31]*[.$Z$5]*MAGNET([.AY$24]+[.$BB113]) +RAND()*[.$BI$13]" office:value-type="float" office:value="0" calcext:value-type="float">
            <text:p>0</text:p>
          </table:table-cell>
          <table:table-cell table:style-name="ce71" table:formula="of:=[.E$32]*[.$Z$5]*MAGNET([.E$24]+[.$BB113])+[.F$32]*[.$Z$5]*MAGNET([.F$24]+[.$BB113])+[.G$32]*[.$Z$5]*MAGNET([.G$24]+[.$BB113])+[.H$32]*[.$Z$5]*MAGNET([.H$24]+[.$BB113])+[.I$32]*[.$Z$5]*MAGNET([.I$24]+[.$BB113])+[.J$32]*[.$Z$5]*MAGNET([.J$24]+[.$BB113])+[.K$32]*[.$Z$5]*MAGNET([.K$24]+[.$BB113])+[.L$32]*[.$Z$5]*MAGNET([.L$24]+[.$BB113])+[.M$32]*[.$Z$5]*MAGNET([.M$24]+[.$BB113])+[.N$32]*[.$Z$5]*MAGNET([.N$24]+[.$BB113])+[.O$32]*[.$Z$5]*MAGNET([.O$24]+[.$BB113])+[.P$32]*[.$Z$5]*MAGNET([.P$24]+[.$BB113])+[.Q$32]*[.$Z$5]*MAGNET([.Q$24]+[.$BB113])+[.R$32]*[.$Z$5]*MAGNET([.R$24]+[.$BB113])+[.S$32]*[.$Z$5]*MAGNET([.S$24]+[.$BB113])+[.T$32]*[.$Z$5]*MAGNET([.T$24]+[.$BB113])+[.U$32]*[.$Z$5]*MAGNET([.U$24]+[.$BB113])+[.V$32]*[.$Z$5]*MAGNET([.V$24]+[.$BB113])+[.W$32]*[.$Z$5]*MAGNET([.W$24]+[.$BB113])+[.X$32]*[.$Z$5]*MAGNET([.X$24]+[.$BB113])+[.Y$32]*[.$Z$5]*MAGNET([.Y$24]+[.$BB113])+[.Z$32]*[.$Z$5]*MAGNET([.Z$24]+[.$BB113])+[.AA$32]*[.$Z$5]*MAGNET([.AA$24]+[.$BB113])+[.AB$32]*[.$Z$5]*MAGNET([.AB$24]+[.$BB113])+[.AC$32]*[.$Z$5]*MAGNET([.AC$24]+[.$BB113])+[.AD$32]*[.$Z$5]*MAGNET([.AD$24]+[.$BB113])+[.AE$32]*[.$Z$5]*MAGNET([.AE$24]+[.$BB113])+[.AF$32]*[.$Z$5]*MAGNET([.AF$24]+[.$BB113])+[.AG$32]*[.$Z$5]*MAGNET([.AG$24]+[.$BB113])+[.D$32]*[.$Z$5]*MAGNET([.D$24]+[.$BB113])+[.AH$32]*[.$Z$5]*MAGNET([.AH$24]+[.BB113]) +[.AI$32]*[.$Z$5]*MAGNET([.AI$24]+[.BB113]) +[.AJ$32]*[.$Z$5]*MAGNET([.AJ$24]+[.BB113]) +[.AK$32]*[.$Z$5]*MAGNET([.AK$24]+[.BB113]) +[.AL$32]*[.$Z$5]*MAGNET([.AL$24]+[.BB113]) +[.AM$32]*[.$Z$5]*MAGNET([.AM$24]+[.BB113]) +[.AN$32]*[.$Z$5]*MAGNET([.AN$24]+[.BB113]) +[.AO$32]*[.$Z$5]*MAGNET([.AO$24]+[.BB113]) +[.AP$32]*[.$Z$5]*MAGNET([.AP$24]+[.$BB113])&#10;+[.AQ$32]*[.$Z$5]*MAGNET([.AQ$24]+[.$BB113])&#10;+[.AR$32]*[.$Z$5]*MAGNET([.AR$24]+[.$BB113])&#10;+[.AS$32]*[.$Z$5]*MAGNET([.AS$24]+[.$BB113])&#10;+[.AT$32]*[.$Z$5]*MAGNET([.AT$24]+[.$BB113])&#10;+[.AU$32]*[.$Z$5]*MAGNET([.AU$24]+[.$BB113])&#10;+[.AV$32]*[.$Z$5]*MAGNET([.AV$24]+[.$BB113])&#10;+[.AW$32]*[.$Z$5]*MAGNET([.AW$24]+[.$BB113])&#10;+[.AX$32]*[.$Z$5]*MAGNET([.AX$24]+[.$BB113])&#10;+[.AY$32]*[.$Z$5]*MAGNET([.AY$24]+[.$BB113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13]+0.002" office:value-type="float" office:value="0.198" calcext:value-type="float">
            <text:p>0.198</text:p>
          </table:table-cell>
          <table:table-cell table:formula="of:=[.BA114]*[.$D$6]" office:value-type="float" office:value="9.95256552657247" calcext:value-type="float">
            <text:p>9.953</text:p>
          </table:table-cell>
          <table:table-cell table:formula="of:=[.D$25]*[.$Z$5]*MAGNET([.D$24]+[.BB114])+[.E$25]*[.$Z$5]*MAGNET([.E$24]+[.BB114])+[.F$25]*[.$Z$5]*MAGNET([.F$24]+[.BB114])+[.G$25]*[.$Z$5]*MAGNET([.G$24]+[.BB114])+[.H$25]*[.$Z$5]*MAGNET([.H$24]+[.BB114])+[.I$25]*[.$Z$5]*MAGNET([.I$24]+[.BB114])+[.J$25]*[.$Z$5]*MAGNET([.J$24]+[.BB114])+[.K$25]*[.$Z$5]*MAGNET([.K$24]+[.BB114])+[.L$25]*[.$Z$5]*MAGNET([.L$24]+[.BB114])+[.M$25]*[.$Z$5]*MAGNET([.M$24]+[.BB114])+[.N$25]*[.$Z$5]*MAGNET([.N$24]+[.BB114])+[.O$25]*[.$Z$5]*MAGNET([.O$24]+[.BB114])+[.P$25]*[.$Z$5]*MAGNET([.P$24]+[.BB114])+[.Q$25]*[.$Z$5]*MAGNET([.Q$24]+[.BB114])+[.R$25]*[.$Z$5]*MAGNET([.R$24]+[.BB114])+[.S$25]*[.$Z$5]*MAGNET([.S$24]+[.BB114])+[.T$25]*[.$Z$5]*MAGNET([.T$24]+[.BB114])+[.U$25]*[.$Z$5]*MAGNET([.U$24]+[.BB114])+[.V$25]*[.$Z$5]*MAGNET([.V$24]+[.BB114])+[.W$25]*[.$Z$5]*MAGNET([.W$24]+[.BB114])+[.X$25]*[.$Z$5]*MAGNET([.X$24]+[.BB114])+[.Y$25]*[.$Z$5]*MAGNET([.Y$24]+[.BB114])+[.Z$25]*[.$Z$5]*MAGNET([.Z$24]+[.BB114])+[.AA$25]*[.$Z$5]*MAGNET([.AA$24]+[.BB114])+[.AB$25]*[.$Z$5]*MAGNET([.AB$24]+[.BB114])+[.AC$25]*[.$Z$5]*MAGNET([.AC$24]+[.BB114])+[.AD$25]*[.$Z$5]*MAGNET([.AD$24]+[.BB114])+[.AE$25]*[.$Z$5]*MAGNET([.AE$24]+[.BB114])+[.AF$25]*[.$Z$5]*MAGNET([.AF$24]+[.BB114])+[.AG$25]*[.$Z$5]*MAGNET([.AG$24]+[.BB114])+[.AH$25]*[.$Z$5]*MAGNET([.AH$24]+[.BB114]) +[.AI$25]*[.$Z$5]*MAGNET([.AI$24]+[.BB114]) +[.AJ$25]*[.$Z$5]*MAGNET([.AJ$24]+[.BB114]) +[.AK$25]*[.$Z$5]*MAGNET([.AK$24]+[.BB114]) +[.AL$25]*[.$Z$5]*MAGNET([.AL$24]+[.BB114]) +[.AM$25]*[.$Z$5]*MAGNET([.AM$24]+[.BB114]) +[.AN$25]*[.$Z$5]*MAGNET([.AN$24]+[.BB114]) +[.AO$25]*[.$Z$5]*MAGNET([.AO$24]+[.BB114])+RAND()*[.$BC$13]+[.AP$25]*[.$Z$5]*MAGNET([.AP$24]+[.BB114])&#10;+[.AQ$25]*[.$Z$5]*MAGNET([.AQ$24]+[.BB114])&#10;+[.AR$25]*[.$Z$5]*MAGNET([.AR$24]+[.BB114])&#10;+[.AS$25]*[.$Z$5]*MAGNET([.AS$24]+[.BB114])&#10;+[.AT$25]*[.$Z$5]*MAGNET([.AT$24]+[.BB114])&#10;+[.AU$25]*[.$Z$5]*MAGNET([.AU$24]+[.BB114])&#10;+[.AV$25]*[.$Z$5]*MAGNET([.AV$24]+[.BB114])&#10;+[.AW$25]*[.$Z$5]*MAGNET([.AW$24]+[.BB114])&#10;+[.AX$25]*[.$Z$5]*MAGNET([.AX$24]+[.BB114])&#10;+[.AY$25]*[.$Z$5]*MAGNET([.AY$24]+[.BB114])" office:value-type="float" office:value="-8.35680715461501" calcext:value-type="float">
            <text:p>-8.36</text:p>
          </table:table-cell>
          <table:table-cell table:style-name="ce70" table:formula="of:=[.E$26]*[.$Z$5]*MAGNET([.E$24]+[.$BB114])+[.F$26]*[.$Z$5]*MAGNET([.F$24]+[.$BB114])+[.G$26]*[.$Z$5]*MAGNET([.G$24]+[.$BB114])+[.H$26]*[.$Z$5]*MAGNET([.H$24]+[.$BB114])+[.I$26]*[.$Z$5]*MAGNET([.I$24]+[.$BB114])+[.J$26]*[.$Z$5]*MAGNET([.J$24]+[.$BB114])+[.K$26]*[.$Z$5]*MAGNET([.K$24]+[.$BB114])+[.L$26]*[.$Z$5]*MAGNET([.L$24]+[.$BB114])+[.M$26]*[.$Z$5]*MAGNET([.M$24]+[.$BB114])+[.N$26]*[.$Z$5]*MAGNET([.N$24]+[.$BB114])+[.O$26]*[.$Z$5]*MAGNET([.O$24]+[.$BB114])+[.P$26]*[.$Z$5]*MAGNET([.P$24]+[.$BB114])+[.Q$26]*[.$Z$5]*MAGNET([.Q$24]+[.$BB114])+[.R$26]*[.$Z$5]*MAGNET([.R$24]+[.$BB114])+[.S$26]*[.$Z$5]*MAGNET([.S$24]+[.$BB114])+[.T$26]*[.$Z$5]*MAGNET([.T$24]+[.$BB114])+[.U$26]*[.$Z$5]*MAGNET([.U$24]+[.$BB114])+[.V$26]*[.$Z$5]*MAGNET([.V$24]+[.$BB114])+[.W$26]*[.$Z$5]*MAGNET([.W$24]+[.$BB114])+[.X$26]*[.$Z$5]*MAGNET([.X$24]+[.$BB114])+[.Y$26]*[.$Z$5]*MAGNET([.Y$24]+[.$BB114])+[.Z$26]*[.$Z$5]*MAGNET([.Z$24]+[.$BB114])+[.AA$26]*[.$Z$5]*MAGNET([.AA$24]+[.$BB114])+[.AB$26]*[.$Z$5]*MAGNET([.AB$24]+[.$BB114])+[.AC$26]*[.$Z$5]*MAGNET([.AC$24]+[.$BB114])+[.AD$26]*[.$Z$5]*MAGNET([.AD$24]+[.$BB114])+[.AE$26]*[.$Z$5]*MAGNET([.AE$24]+[.$BB114])+[.AF$26]*[.$Z$5]*MAGNET([.AF$24]+[.$BB114])+[.AG$26]*[.$Z$5]*MAGNET([.AG$24]+[.$BB114])+[.D$26]*[.$Z$5]*MAGNET([.D$24]+[.$BB114])+[.AH$26]*[.$Z$5]*MAGNET([.AH$24]+[.BB114]) +[.AI$26]*[.$Z$5]*MAGNET([.AI$24]+[.BB114]) +[.AJ$26]*[.$Z$5]*MAGNET([.AJ$24]+[.BB114]) +[.AK$26]*[.$Z$5]*MAGNET([.AK$24]+[.BB114]) +[.AL$26]*[.$Z$5]*MAGNET([.AL$24]+[.BB114]) +[.AM$26]*[.$Z$5]*MAGNET([.AM$24]+[.BB114]) +[.AN$26]*[.$Z$5]*MAGNET([.AN$24]+[.BB114]) +[.AO$26]*[.$Z$5]*MAGNET([.AO$24]+[.BB114]) +[.AP$26]*[.$Z$5]*MAGNET([.AP$24]+[.$BB114])&#10;+[.AQ$26]*[.$Z$5]*MAGNET([.AQ$24]+[.$BB114])&#10;+[.AR$26]*[.$Z$5]*MAGNET([.AR$24]+[.$BB114])&#10;+[.AS$26]*[.$Z$5]*MAGNET([.AS$24]+[.$BB114])&#10;+[.AT$26]*[.$Z$5]*MAGNET([.AT$24]+[.$BB114])&#10;+[.AU$26]*[.$Z$5]*MAGNET([.AU$24]+[.$BB114])&#10;+[.AV$26]*[.$Z$5]*MAGNET([.AV$24]+[.$BB114])&#10;+[.AW$26]*[.$Z$5]*MAGNET([.AW$24]+[.$BB114])&#10;+[.AX$26]*[.$Z$5]*MAGNET([.AX$24]+[.$BB114])&#10;+[.AY$26]*[.$Z$5]*MAGNET([.AY$24]+[.$BB114]) +RAND()*[.$BD$13]" office:value-type="float" office:value="-68.7460781021501" calcext:value-type="float">
            <text:p>-68.75</text:p>
          </table:table-cell>
          <table:table-cell table:style-name="ce71" table:formula="of:=[.E$27]*[.$Z$5]*MAGNET([.E$24]+[.$BB114])+[.F$27]*[.$Z$5]*MAGNET([.F$24]+[.$BB114])+[.G$27]*[.$Z$5]*MAGNET([.G$24]+[.$BB114])+[.H$27]*[.$Z$5]*MAGNET([.H$24]+[.$BB114])+[.I$27]*[.$Z$5]*MAGNET([.I$24]+[.$BB114])+[.J$27]*[.$Z$5]*MAGNET([.J$24]+[.$BB114])+[.K$27]*[.$Z$5]*MAGNET([.K$24]+[.$BB114])+[.L$27]*[.$Z$5]*MAGNET([.L$24]+[.$BB114])+[.M$27]*[.$Z$5]*MAGNET([.M$24]+[.$BB114])+[.N$27]*[.$Z$5]*MAGNET([.N$24]+[.$BB114])+[.O$27]*[.$Z$5]*MAGNET([.O$24]+[.$BB114])+[.P$27]*[.$Z$5]*MAGNET([.P$24]+[.$BB114])+[.Q$27]*[.$Z$5]*MAGNET([.Q$24]+[.$BB114])+[.R$27]*[.$Z$5]*MAGNET([.R$24]+[.$BB114])+[.S$27]*[.$Z$5]*MAGNET([.S$24]+[.$BB114])+[.T$27]*[.$Z$5]*MAGNET([.T$24]+[.$BB114])+[.U$27]*[.$Z$5]*MAGNET([.U$24]+[.$BB114])+[.V$27]*[.$Z$5]*MAGNET([.V$24]+[.$BB114])+[.W$27]*[.$Z$5]*MAGNET([.W$24]+[.$BB114])+[.X$27]*[.$Z$5]*MAGNET([.X$24]+[.$BB114])+[.Y$27]*[.$Z$5]*MAGNET([.Y$24]+[.$BB114])+[.Z$27]*[.$Z$5]*MAGNET([.Z$24]+[.$BB114])+[.AA$27]*[.$Z$5]*MAGNET([.AA$24]+[.$BB114])+[.AB$27]*[.$Z$5]*MAGNET([.AB$24]+[.$BB114])+[.AC$27]*[.$Z$5]*MAGNET([.AC$24]+[.$BB114])+[.AD$27]*[.$Z$5]*MAGNET([.AD$24]+[.$BB114])+[.AE$27]*[.$Z$5]*MAGNET([.AE$24]+[.$BB114])+[.AF$27]*[.$Z$5]*MAGNET([.AF$24]+[.$BB114])+[.AG$27]*[.$Z$5]*MAGNET([.AG$24]+[.$BB114])+[.D$27]*[.$Z$5]*MAGNET([.D$24]+[.$BB114])+[.AH$27]*[.$Z$5]*MAGNET([.AH$24]+[.BB114]) +[.AI$27]*[.$Z$5]*MAGNET([.AI$24]+[.BB114]) +[.AJ$27]*[.$Z$5]*MAGNET([.AJ$24]+[.BB114]) +[.AK$27]*[.$Z$5]*MAGNET([.AK$24]+[.BB114]) +[.AL$27]*[.$Z$5]*MAGNET([.AL$24]+[.BB114]) +[.AM$27]*[.$Z$5]*MAGNET([.AM$24]+[.BB114]) +[.AN$27]*[.$Z$5]*MAGNET([.AN$24]+[.BB114]) +[.AO$27]*[.$Z$5]*MAGNET([.AO$24]+[.BB114]) +[.AP$27]*[.$Z$5]*MAGNET([.AP$24]+[.$BB114])&#10;+[.AQ$27]*[.$Z$5]*MAGNET([.AQ$24]+[.$BB114])&#10;+[.AR$27]*[.$Z$5]*MAGNET([.AR$24]+[.$BB114])&#10;+[.AS$27]*[.$Z$5]*MAGNET([.AS$24]+[.$BB114])&#10;+[.AT$27]*[.$Z$5]*MAGNET([.AT$24]+[.$BB114])&#10;+[.AU$27]*[.$Z$5]*MAGNET([.AU$24]+[.$BB114])&#10;+[.AV$27]*[.$Z$5]*MAGNET([.AV$24]+[.$BB114])&#10;+[.AW$27]*[.$Z$5]*MAGNET([.AW$24]+[.$BB114])&#10;+[.AX$27]*[.$Z$5]*MAGNET([.AX$24]+[.$BB114])&#10;+[.AY$27]*[.$Z$5]*MAGNET([.AY$24]+[.$BB114]) +RAND()*[.$BE$13]" office:value-type="float" office:value="114.695476313922" calcext:value-type="float">
            <text:p>114.695476313922</text:p>
          </table:table-cell>
          <table:table-cell table:style-name="ce71" table:formula="of:=[.E$28]*[.$Z$5]*MAGNET([.E$24]+[.$BB114])+[.F$28]*[.$Z$5]*MAGNET([.F$24]+[.$BB114])+[.G$28]*[.$Z$5]*MAGNET([.G$24]+[.$BB114])+[.H$28]*[.$Z$5]*MAGNET([.H$24]+[.$BB114])+[.I$28]*[.$Z$5]*MAGNET([.I$24]+[.$BB114])+[.J$28]*[.$Z$5]*MAGNET([.J$24]+[.$BB114])+[.K$28]*[.$Z$5]*MAGNET([.K$24]+[.$BB114])+[.L$28]*[.$Z$5]*MAGNET([.L$24]+[.$BB114])+[.M$28]*[.$Z$5]*MAGNET([.M$24]+[.$BB114])+[.N$28]*[.$Z$5]*MAGNET([.N$24]+[.$BB114])+[.O$28]*[.$Z$5]*MAGNET([.O$24]+[.$BB114])+[.P$28]*[.$Z$5]*MAGNET([.P$24]+[.$BB114])+[.Q$28]*[.$Z$5]*MAGNET([.Q$24]+[.$BB114])+[.R$28]*[.$Z$5]*MAGNET([.R$24]+[.$BB114])+[.S$28]*[.$Z$5]*MAGNET([.S$24]+[.$BB114])+[.T$28]*[.$Z$5]*MAGNET([.T$24]+[.$BB114])+[.U$28]*[.$Z$5]*MAGNET([.U$24]+[.$BB114])+[.V$28]*[.$Z$5]*MAGNET([.V$24]+[.$BB114])+[.W$28]*[.$Z$5]*MAGNET([.W$24]+[.$BB114])+[.X$28]*[.$Z$5]*MAGNET([.X$24]+[.$BB114])+[.Y$28]*[.$Z$5]*MAGNET([.Y$24]+[.$BB114])+[.Z$28]*[.$Z$5]*MAGNET([.Z$24]+[.$BB114])+[.AA$28]*[.$Z$5]*MAGNET([.AA$24]+[.$BB114])+[.AB$28]*[.$Z$5]*MAGNET([.AB$24]+[.$BB114])+[.AC$28]*[.$Z$5]*MAGNET([.AC$24]+[.$BB114])+[.AD$28]*[.$Z$5]*MAGNET([.AD$24]+[.$BB114])+[.AE$28]*[.$Z$5]*MAGNET([.AE$24]+[.$BB114])+[.AF$28]*[.$Z$5]*MAGNET([.AF$24]+[.$BB114])+[.AG$28]*[.$Z$5]*MAGNET([.AG$24]+[.$BB114])+[.D$28]*[.$Z$5]*MAGNET([.D$24]+[.$BB114])+[.AH$28]*[.$Z$5]*MAGNET([.AH$24]+[.BB114]) +[.AI$28]*[.$Z$5]*MAGNET([.AI$24]+[.BB114]) +[.AJ$28]*[.$Z$5]*MAGNET([.AJ$24]+[.BB114]) +[.AK$28]*[.$Z$5]*MAGNET([.AK$24]+[.BB114]) +[.AL$28]*[.$Z$5]*MAGNET([.AL$24]+[.BB114]) +[.AM$28]*[.$Z$5]*MAGNET([.AM$24]+[.BB114]) +[.AN$28]*[.$Z$5]*MAGNET([.AN$24]+[.BB114]) +[.AO$28]*[.$Z$5]*MAGNET([.AO$24]+[.BB114]) +[.AP$28]*[.$Z$5]*MAGNET([.AP$24]+[.$BB114])&#10;+[.AQ$28]*[.$Z$5]*MAGNET([.AQ$24]+[.$BB114])&#10;+[.AR$28]*[.$Z$5]*MAGNET([.AR$24]+[.$BB114])&#10;+[.AS$28]*[.$Z$5]*MAGNET([.AS$24]+[.$BB114])&#10;+[.AT$28]*[.$Z$5]*MAGNET([.AT$24]+[.$BB114])&#10;+[.AU$28]*[.$Z$5]*MAGNET([.AU$24]+[.$BB114])&#10;+[.AV$28]*[.$Z$5]*MAGNET([.AV$24]+[.$BB114])&#10;+[.AW$28]*[.$Z$5]*MAGNET([.AW$24]+[.$BB114])&#10;+[.AX$28]*[.$Z$5]*MAGNET([.AX$24]+[.$BB114])&#10;+[.AY$28]*[.$Z$5]*MAGNET([.AY$24]+[.$BB114]) +RAND()*[.$BF$13]" office:value-type="float" office:value="15.274719562116" calcext:value-type="float">
            <text:p>15.274719562116</text:p>
          </table:table-cell>
          <table:table-cell table:style-name="ce71" table:formula="of:=[.E$29]*[.$Z$5]*MAGNET([.E$24]+[.$BB114])+[.F$29]*[.$Z$5]*MAGNET([.F$24]+[.$BB114])+[.G$29]*[.$Z$5]*MAGNET([.G$24]+[.$BB114])+[.H$29]*[.$Z$5]*MAGNET([.H$24]+[.$BB114])+[.I$29]*[.$Z$5]*MAGNET([.I$24]+[.$BB114])+[.J$29]*[.$Z$5]*MAGNET([.J$24]+[.$BB114])+[.K$29]*[.$Z$5]*MAGNET([.K$24]+[.$BB114])+[.L$29]*[.$Z$5]*MAGNET([.L$24]+[.$BB114])+[.M$29]*[.$Z$5]*MAGNET([.M$24]+[.$BB114])+[.N$29]*[.$Z$5]*MAGNET([.N$24]+[.$BB114])+[.O$29]*[.$Z$5]*MAGNET([.O$24]+[.$BB114])+[.P$29]*[.$Z$5]*MAGNET([.P$24]+[.$BB114])+[.Q$29]*[.$Z$5]*MAGNET([.Q$24]+[.$BB114])+[.R$29]*[.$Z$5]*MAGNET([.R$24]+[.$BB114])+[.S$29]*[.$Z$5]*MAGNET([.S$24]+[.$BB114])+[.T$29]*[.$Z$5]*MAGNET([.T$24]+[.$BB114])+[.U$29]*[.$Z$5]*MAGNET([.U$24]+[.$BB114])+[.V$29]*[.$Z$5]*MAGNET([.V$24]+[.$BB114])+[.W$29]*[.$Z$5]*MAGNET([.W$24]+[.$BB114])+[.X$29]*[.$Z$5]*MAGNET([.X$24]+[.$BB114])+[.Y$29]*[.$Z$5]*MAGNET([.Y$24]+[.$BB114])+[.Z$29]*[.$Z$5]*MAGNET([.Z$24]+[.$BB114])+[.AA$29]*[.$Z$5]*MAGNET([.AA$24]+[.$BB114])+[.AB$29]*[.$Z$5]*MAGNET([.AB$24]+[.$BB114])+[.AC$29]*[.$Z$5]*MAGNET([.AC$24]+[.$BB114])+[.AD$29]*[.$Z$5]*MAGNET([.AD$24]+[.$BB114])+[.AE$29]*[.$Z$5]*MAGNET([.AE$24]+[.$BB114])+[.AF$29]*[.$Z$5]*MAGNET([.AF$24]+[.$BB114])+[.AG$29]*[.$Z$5]*MAGNET([.AG$24]+[.$BB114])+[.D$29]*[.$Z$5]*MAGNET([.D$24]+[.$BB114])+[.AH$29]*[.$Z$5]*MAGNET([.AH$24]+[.BB114]) +[.AI$29]*[.$Z$5]*MAGNET([.AI$24]+[.BB114]) +[.AJ$29]*[.$Z$5]*MAGNET([.AJ$24]+[.BB114]) +[.AK$29]*[.$Z$5]*MAGNET([.AK$24]+[.BB114]) +[.AL$29]*[.$Z$5]*MAGNET([.AL$24]+[.BB114]) +[.AM$29]*[.$Z$5]*MAGNET([.AM$24]+[.BB114]) +[.AN$29]*[.$Z$5]*MAGNET([.AN$24]+[.BB114]) +[.AO$29]*[.$Z$5]*MAGNET([.AO$24]+[.BB114]) +[.AP$29]*[.$Z$5]*MAGNET([.AP$24]+[.$BB114])&#10;+[.AQ$29]*[.$Z$5]*MAGNET([.AQ$24]+[.$BB114])&#10;+[.AR$29]*[.$Z$5]*MAGNET([.AR$24]+[.$BB114])&#10;+[.AS$29]*[.$Z$5]*MAGNET([.AS$24]+[.$BB114])&#10;+[.AT$29]*[.$Z$5]*MAGNET([.AT$24]+[.$BB114])&#10;+[.AU$29]*[.$Z$5]*MAGNET([.AU$24]+[.$BB114])&#10;+[.AV$29]*[.$Z$5]*MAGNET([.AV$24]+[.$BB114])&#10;+[.AW$29]*[.$Z$5]*MAGNET([.AW$24]+[.$BB114])&#10;+[.AX$29]*[.$Z$5]*MAGNET([.AX$24]+[.$BB114])&#10;+[.AY$29]*[.$Z$5]*MAGNET([.AY$24]+[.$BB114]) +RAND()*[.$BG$13]" office:value-type="float" office:value="-42.1464930060347" calcext:value-type="float">
            <text:p>-42.1464930060347</text:p>
          </table:table-cell>
          <table:table-cell table:style-name="ce71" table:formula="of:=[.E$30]*[.$Z$5]*MAGNET([.E$24]+[.$BB114])+[.F$30]*[.$Z$5]*MAGNET([.F$24]+[.$BB114])+[.G$30]*[.$Z$5]*MAGNET([.G$24]+[.$BB114])+[.H$30]*[.$Z$5]*MAGNET([.H$24]+[.$BB114])+[.I$30]*[.$Z$5]*MAGNET([.I$24]+[.$BB114])+[.J$30]*[.$Z$5]*MAGNET([.J$24]+[.$BB114])+[.K$30]*[.$Z$5]*MAGNET([.K$24]+[.$BB114])+[.L$30]*[.$Z$5]*MAGNET([.L$24]+[.$BB114])+[.M$30]*[.$Z$5]*MAGNET([.M$24]+[.$BB114])+[.N$30]*[.$Z$5]*MAGNET([.N$24]+[.$BB114])+[.O$30]*[.$Z$5]*MAGNET([.O$24]+[.$BB114])+[.P$30]*[.$Z$5]*MAGNET([.P$24]+[.$BB114])+[.Q$30]*[.$Z$5]*MAGNET([.Q$24]+[.$BB114])+[.R$30]*[.$Z$5]*MAGNET([.R$24]+[.$BB114])+[.S$30]*[.$Z$5]*MAGNET([.S$24]+[.$BB114])+[.T$30]*[.$Z$5]*MAGNET([.T$24]+[.$BB114])+[.U$30]*[.$Z$5]*MAGNET([.U$24]+[.$BB114])+[.V$30]*[.$Z$5]*MAGNET([.V$24]+[.$BB114])+[.W$30]*[.$Z$5]*MAGNET([.W$24]+[.$BB114])+[.X$30]*[.$Z$5]*MAGNET([.X$24]+[.$BB114])+[.Y$30]*[.$Z$5]*MAGNET([.Y$24]+[.$BB114])+[.Z$30]*[.$Z$5]*MAGNET([.Z$24]+[.$BB114])+[.AA$30]*[.$Z$5]*MAGNET([.AA$24]+[.$BB114])+[.AB$30]*[.$Z$5]*MAGNET([.AB$24]+[.$BB114])+[.AC$30]*[.$Z$5]*MAGNET([.AC$24]+[.$BB114])+[.AD$30]*[.$Z$5]*MAGNET([.AD$24]+[.$BB114])+[.AE$30]*[.$Z$5]*MAGNET([.AE$24]+[.$BB114])+[.AF$30]*[.$Z$5]*MAGNET([.AF$24]+[.$BB114])+[.AG$30]*[.$Z$5]*MAGNET([.AG$24]+[.$BB114])+[.D$30]*[.$Z$5]*MAGNET([.D$24]+[.$BB114])+[.AH$30]*[.$Z$5]*MAGNET([.AH$24]+[.BB114]) +[.AI$30]*[.$Z$5]*MAGNET([.AI$24]+[.BB114]) +[.AJ$30]*[.$Z$5]*MAGNET([.AJ$24]+[.BB114]) +[.AK$30]*[.$Z$5]*MAGNET([.AK$24]+[.BB114]) +[.AL$30]*[.$Z$5]*MAGNET([.AL$24]+[.BB114]) +[.AM$30]*[.$Z$5]*MAGNET([.AM$24]+[.BB114]) +[.AN$30]*[.$Z$5]*MAGNET([.AN$24]+[.BB114]) +[.AO$30]*[.$Z$5]*MAGNET([.AO$24]+[.BB114]) +[.AP$30]*[.$Z$5]*MAGNET([.AP$24]+[.$BB114])&#10;+[.AQ$30]*[.$Z$5]*MAGNET([.AQ$24]+[.$BB114])&#10;+[.AR$30]*[.$Z$5]*MAGNET([.AR$24]+[.$BB114])&#10;+[.AS$30]*[.$Z$5]*MAGNET([.AS$24]+[.$BB114])&#10;+[.AT$30]*[.$Z$5]*MAGNET([.AT$24]+[.$BB114])&#10;+[.AU$30]*[.$Z$5]*MAGNET([.AU$24]+[.$BB114])&#10;+[.AV$30]*[.$Z$5]*MAGNET([.AV$24]+[.$BB114])&#10;+[.AW$30]*[.$Z$5]*MAGNET([.AW$24]+[.$BB114])&#10;+[.AX$30]*[.$Z$5]*MAGNET([.AX$24]+[.$BB114])&#10;+[.AY$30]*[.$Z$5]*MAGNET([.AY$24]+[.$BB114]) +RAND()*[.$BH$13]" office:value-type="float" office:value="0" calcext:value-type="float">
            <text:p>0</text:p>
          </table:table-cell>
          <table:table-cell table:style-name="ce71" table:formula="of:=[.E$31]*[.$Z$5]*MAGNET([.E$24]+[.$BB114])+[.F$31]*[.$Z$5]*MAGNET([.F$24]+[.$BB114])+[.G$31]*[.$Z$5]*MAGNET([.G$24]+[.$BB114])+[.H$31]*[.$Z$5]*MAGNET([.H$24]+[.$BB114])+[.I$31]*[.$Z$5]*MAGNET([.I$24]+[.$BB114])+[.J$31]*[.$Z$5]*MAGNET([.J$24]+[.$BB114])+[.K$31]*[.$Z$5]*MAGNET([.K$24]+[.$BB114])+[.L$31]*[.$Z$5]*MAGNET([.L$24]+[.$BB114])+[.M$31]*[.$Z$5]*MAGNET([.M$24]+[.$BB114])+[.N$31]*[.$Z$5]*MAGNET([.N$24]+[.$BB114])+[.O$31]*[.$Z$5]*MAGNET([.O$24]+[.$BB114])+[.P$31]*[.$Z$5]*MAGNET([.P$24]+[.$BB114])+[.Q$31]*[.$Z$5]*MAGNET([.Q$24]+[.$BB114])+[.R$31]*[.$Z$5]*MAGNET([.R$24]+[.$BB114])+[.S$31]*[.$Z$5]*MAGNET([.S$24]+[.$BB114])+[.T$31]*[.$Z$5]*MAGNET([.T$24]+[.$BB114])+[.U$31]*[.$Z$5]*MAGNET([.U$24]+[.$BB114])+[.V$31]*[.$Z$5]*MAGNET([.V$24]+[.$BB114])+[.W$31]*[.$Z$5]*MAGNET([.W$24]+[.$BB114])+[.X$31]*[.$Z$5]*MAGNET([.X$24]+[.$BB114])+[.Y$31]*[.$Z$5]*MAGNET([.Y$24]+[.$BB114])+[.Z$31]*[.$Z$5]*MAGNET([.Z$24]+[.$BB114])+[.AA$31]*[.$Z$5]*MAGNET([.AA$24]+[.$BB114])+[.AB$31]*[.$Z$5]*MAGNET([.AB$24]+[.$BB114])+[.AC$31]*[.$Z$5]*MAGNET([.AC$24]+[.$BB114])+[.AD$31]*[.$Z$5]*MAGNET([.AD$24]+[.$BB114])+[.AE$31]*[.$Z$5]*MAGNET([.AE$24]+[.$BB114])+[.AF$31]*[.$Z$5]*MAGNET([.AF$24]+[.$BB114])+[.AG$31]*[.$Z$5]*MAGNET([.AG$24]+[.$BB114])+[.D$31]*[.$Z$5]*MAGNET([.D$24]+[.$BB114])+[.AH$31]*[.$Z$5]*MAGNET([.AH$24]+[.BB114]) +[.AI$31]*[.$Z$5]*MAGNET([.AI$24]+[.BB114]) +[.AJ$31]*[.$Z$5]*MAGNET([.AJ$24]+[.BB114]) +[.AK$31]*[.$Z$5]*MAGNET([.AK$24]+[.BB114]) +[.AL$31]*[.$Z$5]*MAGNET([.AL$24]+[.BB114]) +[.AM$31]*[.$Z$5]*MAGNET([.AM$24]+[.BB114]) +[.AN$31]*[.$Z$5]*MAGNET([.AN$24]+[.BB114]) +[.AO$31]*[.$Z$5]*MAGNET([.AO$24]+[.BB114]) +[.AP$31]*[.$Z$5]*MAGNET([.AP$24]+[.$BB114])&#10;+[.AQ$31]*[.$Z$5]*MAGNET([.AQ$24]+[.$BB114])&#10;+[.AR$31]*[.$Z$5]*MAGNET([.AR$24]+[.$BB114])&#10;+[.AS$31]*[.$Z$5]*MAGNET([.AS$24]+[.$BB114])&#10;+[.AT$31]*[.$Z$5]*MAGNET([.AT$24]+[.$BB114])&#10;+[.AU$31]*[.$Z$5]*MAGNET([.AU$24]+[.$BB114])&#10;+[.AV$31]*[.$Z$5]*MAGNET([.AV$24]+[.$BB114])&#10;+[.AW$31]*[.$Z$5]*MAGNET([.AW$24]+[.$BB114])&#10;+[.AX$31]*[.$Z$5]*MAGNET([.AX$24]+[.$BB114])&#10;+[.AY$31]*[.$Z$5]*MAGNET([.AY$24]+[.$BB114]) +RAND()*[.$BI$13]" office:value-type="float" office:value="0" calcext:value-type="float">
            <text:p>0</text:p>
          </table:table-cell>
          <table:table-cell table:style-name="ce71" table:formula="of:=[.E$32]*[.$Z$5]*MAGNET([.E$24]+[.$BB114])+[.F$32]*[.$Z$5]*MAGNET([.F$24]+[.$BB114])+[.G$32]*[.$Z$5]*MAGNET([.G$24]+[.$BB114])+[.H$32]*[.$Z$5]*MAGNET([.H$24]+[.$BB114])+[.I$32]*[.$Z$5]*MAGNET([.I$24]+[.$BB114])+[.J$32]*[.$Z$5]*MAGNET([.J$24]+[.$BB114])+[.K$32]*[.$Z$5]*MAGNET([.K$24]+[.$BB114])+[.L$32]*[.$Z$5]*MAGNET([.L$24]+[.$BB114])+[.M$32]*[.$Z$5]*MAGNET([.M$24]+[.$BB114])+[.N$32]*[.$Z$5]*MAGNET([.N$24]+[.$BB114])+[.O$32]*[.$Z$5]*MAGNET([.O$24]+[.$BB114])+[.P$32]*[.$Z$5]*MAGNET([.P$24]+[.$BB114])+[.Q$32]*[.$Z$5]*MAGNET([.Q$24]+[.$BB114])+[.R$32]*[.$Z$5]*MAGNET([.R$24]+[.$BB114])+[.S$32]*[.$Z$5]*MAGNET([.S$24]+[.$BB114])+[.T$32]*[.$Z$5]*MAGNET([.T$24]+[.$BB114])+[.U$32]*[.$Z$5]*MAGNET([.U$24]+[.$BB114])+[.V$32]*[.$Z$5]*MAGNET([.V$24]+[.$BB114])+[.W$32]*[.$Z$5]*MAGNET([.W$24]+[.$BB114])+[.X$32]*[.$Z$5]*MAGNET([.X$24]+[.$BB114])+[.Y$32]*[.$Z$5]*MAGNET([.Y$24]+[.$BB114])+[.Z$32]*[.$Z$5]*MAGNET([.Z$24]+[.$BB114])+[.AA$32]*[.$Z$5]*MAGNET([.AA$24]+[.$BB114])+[.AB$32]*[.$Z$5]*MAGNET([.AB$24]+[.$BB114])+[.AC$32]*[.$Z$5]*MAGNET([.AC$24]+[.$BB114])+[.AD$32]*[.$Z$5]*MAGNET([.AD$24]+[.$BB114])+[.AE$32]*[.$Z$5]*MAGNET([.AE$24]+[.$BB114])+[.AF$32]*[.$Z$5]*MAGNET([.AF$24]+[.$BB114])+[.AG$32]*[.$Z$5]*MAGNET([.AG$24]+[.$BB114])+[.D$32]*[.$Z$5]*MAGNET([.D$24]+[.$BB114])+[.AH$32]*[.$Z$5]*MAGNET([.AH$24]+[.BB114]) +[.AI$32]*[.$Z$5]*MAGNET([.AI$24]+[.BB114]) +[.AJ$32]*[.$Z$5]*MAGNET([.AJ$24]+[.BB114]) +[.AK$32]*[.$Z$5]*MAGNET([.AK$24]+[.BB114]) +[.AL$32]*[.$Z$5]*MAGNET([.AL$24]+[.BB114]) +[.AM$32]*[.$Z$5]*MAGNET([.AM$24]+[.BB114]) +[.AN$32]*[.$Z$5]*MAGNET([.AN$24]+[.BB114]) +[.AO$32]*[.$Z$5]*MAGNET([.AO$24]+[.BB114]) +[.AP$32]*[.$Z$5]*MAGNET([.AP$24]+[.$BB114])&#10;+[.AQ$32]*[.$Z$5]*MAGNET([.AQ$24]+[.$BB114])&#10;+[.AR$32]*[.$Z$5]*MAGNET([.AR$24]+[.$BB114])&#10;+[.AS$32]*[.$Z$5]*MAGNET([.AS$24]+[.$BB114])&#10;+[.AT$32]*[.$Z$5]*MAGNET([.AT$24]+[.$BB114])&#10;+[.AU$32]*[.$Z$5]*MAGNET([.AU$24]+[.$BB114])&#10;+[.AV$32]*[.$Z$5]*MAGNET([.AV$24]+[.$BB114])&#10;+[.AW$32]*[.$Z$5]*MAGNET([.AW$24]+[.$BB114])&#10;+[.AX$32]*[.$Z$5]*MAGNET([.AX$24]+[.$BB114])&#10;+[.AY$32]*[.$Z$5]*MAGNET([.AY$24]+[.$BB114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>
          <table:table-cell table:number-columns-repeated="52"/>
          <table:table-cell table:formula="of:=[.BA114]+0.002" office:value-type="float" office:value="0.2" calcext:value-type="float">
            <text:p>0.2</text:p>
          </table:table-cell>
          <table:table-cell table:formula="of:=[.BA115]*[.$D$6]" office:value-type="float" office:value="10.0530964914873" calcext:value-type="float">
            <text:p>10.053</text:p>
          </table:table-cell>
          <table:table-cell table:formula="of:=[.D$25]*[.$Z$5]*MAGNET([.D$24]+[.BB115])+[.E$25]*[.$Z$5]*MAGNET([.E$24]+[.BB115])+[.F$25]*[.$Z$5]*MAGNET([.F$24]+[.BB115])+[.G$25]*[.$Z$5]*MAGNET([.G$24]+[.BB115])+[.H$25]*[.$Z$5]*MAGNET([.H$24]+[.BB115])+[.I$25]*[.$Z$5]*MAGNET([.I$24]+[.BB115])+[.J$25]*[.$Z$5]*MAGNET([.J$24]+[.BB115])+[.K$25]*[.$Z$5]*MAGNET([.K$24]+[.BB115])+[.L$25]*[.$Z$5]*MAGNET([.L$24]+[.BB115])+[.M$25]*[.$Z$5]*MAGNET([.M$24]+[.BB115])+[.N$25]*[.$Z$5]*MAGNET([.N$24]+[.BB115])+[.O$25]*[.$Z$5]*MAGNET([.O$24]+[.BB115])+[.P$25]*[.$Z$5]*MAGNET([.P$24]+[.BB115])+[.Q$25]*[.$Z$5]*MAGNET([.Q$24]+[.BB115])+[.R$25]*[.$Z$5]*MAGNET([.R$24]+[.BB115])+[.S$25]*[.$Z$5]*MAGNET([.S$24]+[.BB115])+[.T$25]*[.$Z$5]*MAGNET([.T$24]+[.BB115])+[.U$25]*[.$Z$5]*MAGNET([.U$24]+[.BB115])+[.V$25]*[.$Z$5]*MAGNET([.V$24]+[.BB115])+[.W$25]*[.$Z$5]*MAGNET([.W$24]+[.BB115])+[.X$25]*[.$Z$5]*MAGNET([.X$24]+[.BB115])+[.Y$25]*[.$Z$5]*MAGNET([.Y$24]+[.BB115])+[.Z$25]*[.$Z$5]*MAGNET([.Z$24]+[.BB115])+[.AA$25]*[.$Z$5]*MAGNET([.AA$24]+[.BB115])+[.AB$25]*[.$Z$5]*MAGNET([.AB$24]+[.BB115])+[.AC$25]*[.$Z$5]*MAGNET([.AC$24]+[.BB115])+[.AD$25]*[.$Z$5]*MAGNET([.AD$24]+[.BB115])+[.AE$25]*[.$Z$5]*MAGNET([.AE$24]+[.BB115])+[.AF$25]*[.$Z$5]*MAGNET([.AF$24]+[.BB115])+[.AG$25]*[.$Z$5]*MAGNET([.AG$24]+[.BB115])+[.AH$25]*[.$Z$5]*MAGNET([.AH$24]+[.BB115]) +[.AI$25]*[.$Z$5]*MAGNET([.AI$24]+[.BB115]) +[.AJ$25]*[.$Z$5]*MAGNET([.AJ$24]+[.BB115]) +[.AK$25]*[.$Z$5]*MAGNET([.AK$24]+[.BB115]) +[.AL$25]*[.$Z$5]*MAGNET([.AL$24]+[.BB115]) +[.AM$25]*[.$Z$5]*MAGNET([.AM$24]+[.BB115]) +[.AN$25]*[.$Z$5]*MAGNET([.AN$24]+[.BB115]) +[.AO$25]*[.$Z$5]*MAGNET([.AO$24]+[.BB115])+RAND()*[.$BC$13]+[.AP$25]*[.$Z$5]*MAGNET([.AP$24]+[.BB115])&#10;+[.AQ$25]*[.$Z$5]*MAGNET([.AQ$24]+[.BB115])&#10;+[.AR$25]*[.$Z$5]*MAGNET([.AR$24]+[.BB115])&#10;+[.AS$25]*[.$Z$5]*MAGNET([.AS$24]+[.BB115])&#10;+[.AT$25]*[.$Z$5]*MAGNET([.AT$24]+[.BB115])&#10;+[.AU$25]*[.$Z$5]*MAGNET([.AU$24]+[.BB115])&#10;+[.AV$25]*[.$Z$5]*MAGNET([.AV$24]+[.BB115])&#10;+[.AW$25]*[.$Z$5]*MAGNET([.AW$24]+[.BB115])&#10;+[.AX$25]*[.$Z$5]*MAGNET([.AX$24]+[.BB115])&#10;+[.AY$25]*[.$Z$5]*MAGNET([.AY$24]+[.BB115])" office:value-type="float" office:value="-20.921032530734" calcext:value-type="float">
            <text:p>-20.92</text:p>
          </table:table-cell>
          <table:table-cell table:style-name="ce70" table:formula="of:=[.E$26]*[.$Z$5]*MAGNET([.E$24]+[.$BB115])+[.F$26]*[.$Z$5]*MAGNET([.F$24]+[.$BB115])+[.G$26]*[.$Z$5]*MAGNET([.G$24]+[.$BB115])+[.H$26]*[.$Z$5]*MAGNET([.H$24]+[.$BB115])+[.I$26]*[.$Z$5]*MAGNET([.I$24]+[.$BB115])+[.J$26]*[.$Z$5]*MAGNET([.J$24]+[.$BB115])+[.K$26]*[.$Z$5]*MAGNET([.K$24]+[.$BB115])+[.L$26]*[.$Z$5]*MAGNET([.L$24]+[.$BB115])+[.M$26]*[.$Z$5]*MAGNET([.M$24]+[.$BB115])+[.N$26]*[.$Z$5]*MAGNET([.N$24]+[.$BB115])+[.O$26]*[.$Z$5]*MAGNET([.O$24]+[.$BB115])+[.P$26]*[.$Z$5]*MAGNET([.P$24]+[.$BB115])+[.Q$26]*[.$Z$5]*MAGNET([.Q$24]+[.$BB115])+[.R$26]*[.$Z$5]*MAGNET([.R$24]+[.$BB115])+[.S$26]*[.$Z$5]*MAGNET([.S$24]+[.$BB115])+[.T$26]*[.$Z$5]*MAGNET([.T$24]+[.$BB115])+[.U$26]*[.$Z$5]*MAGNET([.U$24]+[.$BB115])+[.V$26]*[.$Z$5]*MAGNET([.V$24]+[.$BB115])+[.W$26]*[.$Z$5]*MAGNET([.W$24]+[.$BB115])+[.X$26]*[.$Z$5]*MAGNET([.X$24]+[.$BB115])+[.Y$26]*[.$Z$5]*MAGNET([.Y$24]+[.$BB115])+[.Z$26]*[.$Z$5]*MAGNET([.Z$24]+[.$BB115])+[.AA$26]*[.$Z$5]*MAGNET([.AA$24]+[.$BB115])+[.AB$26]*[.$Z$5]*MAGNET([.AB$24]+[.$BB115])+[.AC$26]*[.$Z$5]*MAGNET([.AC$24]+[.$BB115])+[.AD$26]*[.$Z$5]*MAGNET([.AD$24]+[.$BB115])+[.AE$26]*[.$Z$5]*MAGNET([.AE$24]+[.$BB115])+[.AF$26]*[.$Z$5]*MAGNET([.AF$24]+[.$BB115])+[.AG$26]*[.$Z$5]*MAGNET([.AG$24]+[.$BB115])+[.D$26]*[.$Z$5]*MAGNET([.D$24]+[.$BB115])+[.AH$26]*[.$Z$5]*MAGNET([.AH$24]+[.BB115]) +[.AI$26]*[.$Z$5]*MAGNET([.AI$24]+[.BB115]) +[.AJ$26]*[.$Z$5]*MAGNET([.AJ$24]+[.BB115]) +[.AK$26]*[.$Z$5]*MAGNET([.AK$24]+[.BB115]) +[.AL$26]*[.$Z$5]*MAGNET([.AL$24]+[.BB115]) +[.AM$26]*[.$Z$5]*MAGNET([.AM$24]+[.BB115]) +[.AN$26]*[.$Z$5]*MAGNET([.AN$24]+[.BB115]) +[.AO$26]*[.$Z$5]*MAGNET([.AO$24]+[.BB115]) +[.AP$26]*[.$Z$5]*MAGNET([.AP$24]+[.$BB115])&#10;+[.AQ$26]*[.$Z$5]*MAGNET([.AQ$24]+[.$BB115])&#10;+[.AR$26]*[.$Z$5]*MAGNET([.AR$24]+[.$BB115])&#10;+[.AS$26]*[.$Z$5]*MAGNET([.AS$24]+[.$BB115])&#10;+[.AT$26]*[.$Z$5]*MAGNET([.AT$24]+[.$BB115])&#10;+[.AU$26]*[.$Z$5]*MAGNET([.AU$24]+[.$BB115])&#10;+[.AV$26]*[.$Z$5]*MAGNET([.AV$24]+[.$BB115])&#10;+[.AW$26]*[.$Z$5]*MAGNET([.AW$24]+[.$BB115])&#10;+[.AX$26]*[.$Z$5]*MAGNET([.AX$24]+[.$BB115])&#10;+[.AY$26]*[.$Z$5]*MAGNET([.AY$24]+[.$BB115]) +RAND()*[.$BD$13]" office:value-type="float" office:value="-61.8002096494738" calcext:value-type="float">
            <text:p>-61.80</text:p>
          </table:table-cell>
          <table:table-cell table:style-name="ce71" table:formula="of:=[.E$27]*[.$Z$5]*MAGNET([.E$24]+[.$BB115])+[.F$27]*[.$Z$5]*MAGNET([.F$24]+[.$BB115])+[.G$27]*[.$Z$5]*MAGNET([.G$24]+[.$BB115])+[.H$27]*[.$Z$5]*MAGNET([.H$24]+[.$BB115])+[.I$27]*[.$Z$5]*MAGNET([.I$24]+[.$BB115])+[.J$27]*[.$Z$5]*MAGNET([.J$24]+[.$BB115])+[.K$27]*[.$Z$5]*MAGNET([.K$24]+[.$BB115])+[.L$27]*[.$Z$5]*MAGNET([.L$24]+[.$BB115])+[.M$27]*[.$Z$5]*MAGNET([.M$24]+[.$BB115])+[.N$27]*[.$Z$5]*MAGNET([.N$24]+[.$BB115])+[.O$27]*[.$Z$5]*MAGNET([.O$24]+[.$BB115])+[.P$27]*[.$Z$5]*MAGNET([.P$24]+[.$BB115])+[.Q$27]*[.$Z$5]*MAGNET([.Q$24]+[.$BB115])+[.R$27]*[.$Z$5]*MAGNET([.R$24]+[.$BB115])+[.S$27]*[.$Z$5]*MAGNET([.S$24]+[.$BB115])+[.T$27]*[.$Z$5]*MAGNET([.T$24]+[.$BB115])+[.U$27]*[.$Z$5]*MAGNET([.U$24]+[.$BB115])+[.V$27]*[.$Z$5]*MAGNET([.V$24]+[.$BB115])+[.W$27]*[.$Z$5]*MAGNET([.W$24]+[.$BB115])+[.X$27]*[.$Z$5]*MAGNET([.X$24]+[.$BB115])+[.Y$27]*[.$Z$5]*MAGNET([.Y$24]+[.$BB115])+[.Z$27]*[.$Z$5]*MAGNET([.Z$24]+[.$BB115])+[.AA$27]*[.$Z$5]*MAGNET([.AA$24]+[.$BB115])+[.AB$27]*[.$Z$5]*MAGNET([.AB$24]+[.$BB115])+[.AC$27]*[.$Z$5]*MAGNET([.AC$24]+[.$BB115])+[.AD$27]*[.$Z$5]*MAGNET([.AD$24]+[.$BB115])+[.AE$27]*[.$Z$5]*MAGNET([.AE$24]+[.$BB115])+[.AF$27]*[.$Z$5]*MAGNET([.AF$24]+[.$BB115])+[.AG$27]*[.$Z$5]*MAGNET([.AG$24]+[.$BB115])+[.D$27]*[.$Z$5]*MAGNET([.D$24]+[.$BB115])+[.AH$27]*[.$Z$5]*MAGNET([.AH$24]+[.BB115]) +[.AI$27]*[.$Z$5]*MAGNET([.AI$24]+[.BB115]) +[.AJ$27]*[.$Z$5]*MAGNET([.AJ$24]+[.BB115]) +[.AK$27]*[.$Z$5]*MAGNET([.AK$24]+[.BB115]) +[.AL$27]*[.$Z$5]*MAGNET([.AL$24]+[.BB115]) +[.AM$27]*[.$Z$5]*MAGNET([.AM$24]+[.BB115]) +[.AN$27]*[.$Z$5]*MAGNET([.AN$24]+[.BB115]) +[.AO$27]*[.$Z$5]*MAGNET([.AO$24]+[.BB115]) +[.AP$27]*[.$Z$5]*MAGNET([.AP$24]+[.$BB115])&#10;+[.AQ$27]*[.$Z$5]*MAGNET([.AQ$24]+[.$BB115])&#10;+[.AR$27]*[.$Z$5]*MAGNET([.AR$24]+[.$BB115])&#10;+[.AS$27]*[.$Z$5]*MAGNET([.AS$24]+[.$BB115])&#10;+[.AT$27]*[.$Z$5]*MAGNET([.AT$24]+[.$BB115])&#10;+[.AU$27]*[.$Z$5]*MAGNET([.AU$24]+[.$BB115])&#10;+[.AV$27]*[.$Z$5]*MAGNET([.AV$24]+[.$BB115])&#10;+[.AW$27]*[.$Z$5]*MAGNET([.AW$24]+[.$BB115])&#10;+[.AX$27]*[.$Z$5]*MAGNET([.AX$24]+[.$BB115])&#10;+[.AY$27]*[.$Z$5]*MAGNET([.AY$24]+[.$BB115]) +RAND()*[.$BE$13]" office:value-type="float" office:value="121.36916654957" calcext:value-type="float">
            <text:p>121.36916654957</text:p>
          </table:table-cell>
          <table:table-cell table:style-name="ce71" table:formula="of:=[.E$28]*[.$Z$5]*MAGNET([.E$24]+[.$BB115])+[.F$28]*[.$Z$5]*MAGNET([.F$24]+[.$BB115])+[.G$28]*[.$Z$5]*MAGNET([.G$24]+[.$BB115])+[.H$28]*[.$Z$5]*MAGNET([.H$24]+[.$BB115])+[.I$28]*[.$Z$5]*MAGNET([.I$24]+[.$BB115])+[.J$28]*[.$Z$5]*MAGNET([.J$24]+[.$BB115])+[.K$28]*[.$Z$5]*MAGNET([.K$24]+[.$BB115])+[.L$28]*[.$Z$5]*MAGNET([.L$24]+[.$BB115])+[.M$28]*[.$Z$5]*MAGNET([.M$24]+[.$BB115])+[.N$28]*[.$Z$5]*MAGNET([.N$24]+[.$BB115])+[.O$28]*[.$Z$5]*MAGNET([.O$24]+[.$BB115])+[.P$28]*[.$Z$5]*MAGNET([.P$24]+[.$BB115])+[.Q$28]*[.$Z$5]*MAGNET([.Q$24]+[.$BB115])+[.R$28]*[.$Z$5]*MAGNET([.R$24]+[.$BB115])+[.S$28]*[.$Z$5]*MAGNET([.S$24]+[.$BB115])+[.T$28]*[.$Z$5]*MAGNET([.T$24]+[.$BB115])+[.U$28]*[.$Z$5]*MAGNET([.U$24]+[.$BB115])+[.V$28]*[.$Z$5]*MAGNET([.V$24]+[.$BB115])+[.W$28]*[.$Z$5]*MAGNET([.W$24]+[.$BB115])+[.X$28]*[.$Z$5]*MAGNET([.X$24]+[.$BB115])+[.Y$28]*[.$Z$5]*MAGNET([.Y$24]+[.$BB115])+[.Z$28]*[.$Z$5]*MAGNET([.Z$24]+[.$BB115])+[.AA$28]*[.$Z$5]*MAGNET([.AA$24]+[.$BB115])+[.AB$28]*[.$Z$5]*MAGNET([.AB$24]+[.$BB115])+[.AC$28]*[.$Z$5]*MAGNET([.AC$24]+[.$BB115])+[.AD$28]*[.$Z$5]*MAGNET([.AD$24]+[.$BB115])+[.AE$28]*[.$Z$5]*MAGNET([.AE$24]+[.$BB115])+[.AF$28]*[.$Z$5]*MAGNET([.AF$24]+[.$BB115])+[.AG$28]*[.$Z$5]*MAGNET([.AG$24]+[.$BB115])+[.D$28]*[.$Z$5]*MAGNET([.D$24]+[.$BB115])+[.AH$28]*[.$Z$5]*MAGNET([.AH$24]+[.BB115]) +[.AI$28]*[.$Z$5]*MAGNET([.AI$24]+[.BB115]) +[.AJ$28]*[.$Z$5]*MAGNET([.AJ$24]+[.BB115]) +[.AK$28]*[.$Z$5]*MAGNET([.AK$24]+[.BB115]) +[.AL$28]*[.$Z$5]*MAGNET([.AL$24]+[.BB115]) +[.AM$28]*[.$Z$5]*MAGNET([.AM$24]+[.BB115]) +[.AN$28]*[.$Z$5]*MAGNET([.AN$24]+[.BB115]) +[.AO$28]*[.$Z$5]*MAGNET([.AO$24]+[.BB115]) +[.AP$28]*[.$Z$5]*MAGNET([.AP$24]+[.$BB115])&#10;+[.AQ$28]*[.$Z$5]*MAGNET([.AQ$24]+[.$BB115])&#10;+[.AR$28]*[.$Z$5]*MAGNET([.AR$24]+[.$BB115])&#10;+[.AS$28]*[.$Z$5]*MAGNET([.AS$24]+[.$BB115])&#10;+[.AT$28]*[.$Z$5]*MAGNET([.AT$24]+[.$BB115])&#10;+[.AU$28]*[.$Z$5]*MAGNET([.AU$24]+[.$BB115])&#10;+[.AV$28]*[.$Z$5]*MAGNET([.AV$24]+[.$BB115])&#10;+[.AW$28]*[.$Z$5]*MAGNET([.AW$24]+[.$BB115])&#10;+[.AX$28]*[.$Z$5]*MAGNET([.AX$24]+[.$BB115])&#10;+[.AY$28]*[.$Z$5]*MAGNET([.AY$24]+[.$BB115]) +RAND()*[.$BF$13]" office:value-type="float" office:value="16.290899687339" calcext:value-type="float">
            <text:p>16.290899687339</text:p>
          </table:table-cell>
          <table:table-cell table:style-name="ce71" table:formula="of:=[.E$29]*[.$Z$5]*MAGNET([.E$24]+[.$BB115])+[.F$29]*[.$Z$5]*MAGNET([.F$24]+[.$BB115])+[.G$29]*[.$Z$5]*MAGNET([.G$24]+[.$BB115])+[.H$29]*[.$Z$5]*MAGNET([.H$24]+[.$BB115])+[.I$29]*[.$Z$5]*MAGNET([.I$24]+[.$BB115])+[.J$29]*[.$Z$5]*MAGNET([.J$24]+[.$BB115])+[.K$29]*[.$Z$5]*MAGNET([.K$24]+[.$BB115])+[.L$29]*[.$Z$5]*MAGNET([.L$24]+[.$BB115])+[.M$29]*[.$Z$5]*MAGNET([.M$24]+[.$BB115])+[.N$29]*[.$Z$5]*MAGNET([.N$24]+[.$BB115])+[.O$29]*[.$Z$5]*MAGNET([.O$24]+[.$BB115])+[.P$29]*[.$Z$5]*MAGNET([.P$24]+[.$BB115])+[.Q$29]*[.$Z$5]*MAGNET([.Q$24]+[.$BB115])+[.R$29]*[.$Z$5]*MAGNET([.R$24]+[.$BB115])+[.S$29]*[.$Z$5]*MAGNET([.S$24]+[.$BB115])+[.T$29]*[.$Z$5]*MAGNET([.T$24]+[.$BB115])+[.U$29]*[.$Z$5]*MAGNET([.U$24]+[.$BB115])+[.V$29]*[.$Z$5]*MAGNET([.V$24]+[.$BB115])+[.W$29]*[.$Z$5]*MAGNET([.W$24]+[.$BB115])+[.X$29]*[.$Z$5]*MAGNET([.X$24]+[.$BB115])+[.Y$29]*[.$Z$5]*MAGNET([.Y$24]+[.$BB115])+[.Z$29]*[.$Z$5]*MAGNET([.Z$24]+[.$BB115])+[.AA$29]*[.$Z$5]*MAGNET([.AA$24]+[.$BB115])+[.AB$29]*[.$Z$5]*MAGNET([.AB$24]+[.$BB115])+[.AC$29]*[.$Z$5]*MAGNET([.AC$24]+[.$BB115])+[.AD$29]*[.$Z$5]*MAGNET([.AD$24]+[.$BB115])+[.AE$29]*[.$Z$5]*MAGNET([.AE$24]+[.$BB115])+[.AF$29]*[.$Z$5]*MAGNET([.AF$24]+[.$BB115])+[.AG$29]*[.$Z$5]*MAGNET([.AG$24]+[.$BB115])+[.D$29]*[.$Z$5]*MAGNET([.D$24]+[.$BB115])+[.AH$29]*[.$Z$5]*MAGNET([.AH$24]+[.BB115]) +[.AI$29]*[.$Z$5]*MAGNET([.AI$24]+[.BB115]) +[.AJ$29]*[.$Z$5]*MAGNET([.AJ$24]+[.BB115]) +[.AK$29]*[.$Z$5]*MAGNET([.AK$24]+[.BB115]) +[.AL$29]*[.$Z$5]*MAGNET([.AL$24]+[.BB115]) +[.AM$29]*[.$Z$5]*MAGNET([.AM$24]+[.BB115]) +[.AN$29]*[.$Z$5]*MAGNET([.AN$24]+[.BB115]) +[.AO$29]*[.$Z$5]*MAGNET([.AO$24]+[.BB115]) +[.AP$29]*[.$Z$5]*MAGNET([.AP$24]+[.$BB115])&#10;+[.AQ$29]*[.$Z$5]*MAGNET([.AQ$24]+[.$BB115])&#10;+[.AR$29]*[.$Z$5]*MAGNET([.AR$24]+[.$BB115])&#10;+[.AS$29]*[.$Z$5]*MAGNET([.AS$24]+[.$BB115])&#10;+[.AT$29]*[.$Z$5]*MAGNET([.AT$24]+[.$BB115])&#10;+[.AU$29]*[.$Z$5]*MAGNET([.AU$24]+[.$BB115])&#10;+[.AV$29]*[.$Z$5]*MAGNET([.AV$24]+[.$BB115])&#10;+[.AW$29]*[.$Z$5]*MAGNET([.AW$24]+[.$BB115])&#10;+[.AX$29]*[.$Z$5]*MAGNET([.AX$24]+[.$BB115])&#10;+[.AY$29]*[.$Z$5]*MAGNET([.AY$24]+[.$BB115]) +RAND()*[.$BG$13]" office:value-type="float" office:value="-43.1325784887866" calcext:value-type="float">
            <text:p>-43.1325784887866</text:p>
          </table:table-cell>
          <table:table-cell table:style-name="ce71" table:formula="of:=[.E$30]*[.$Z$5]*MAGNET([.E$24]+[.$BB115])+[.F$30]*[.$Z$5]*MAGNET([.F$24]+[.$BB115])+[.G$30]*[.$Z$5]*MAGNET([.G$24]+[.$BB115])+[.H$30]*[.$Z$5]*MAGNET([.H$24]+[.$BB115])+[.I$30]*[.$Z$5]*MAGNET([.I$24]+[.$BB115])+[.J$30]*[.$Z$5]*MAGNET([.J$24]+[.$BB115])+[.K$30]*[.$Z$5]*MAGNET([.K$24]+[.$BB115])+[.L$30]*[.$Z$5]*MAGNET([.L$24]+[.$BB115])+[.M$30]*[.$Z$5]*MAGNET([.M$24]+[.$BB115])+[.N$30]*[.$Z$5]*MAGNET([.N$24]+[.$BB115])+[.O$30]*[.$Z$5]*MAGNET([.O$24]+[.$BB115])+[.P$30]*[.$Z$5]*MAGNET([.P$24]+[.$BB115])+[.Q$30]*[.$Z$5]*MAGNET([.Q$24]+[.$BB115])+[.R$30]*[.$Z$5]*MAGNET([.R$24]+[.$BB115])+[.S$30]*[.$Z$5]*MAGNET([.S$24]+[.$BB115])+[.T$30]*[.$Z$5]*MAGNET([.T$24]+[.$BB115])+[.U$30]*[.$Z$5]*MAGNET([.U$24]+[.$BB115])+[.V$30]*[.$Z$5]*MAGNET([.V$24]+[.$BB115])+[.W$30]*[.$Z$5]*MAGNET([.W$24]+[.$BB115])+[.X$30]*[.$Z$5]*MAGNET([.X$24]+[.$BB115])+[.Y$30]*[.$Z$5]*MAGNET([.Y$24]+[.$BB115])+[.Z$30]*[.$Z$5]*MAGNET([.Z$24]+[.$BB115])+[.AA$30]*[.$Z$5]*MAGNET([.AA$24]+[.$BB115])+[.AB$30]*[.$Z$5]*MAGNET([.AB$24]+[.$BB115])+[.AC$30]*[.$Z$5]*MAGNET([.AC$24]+[.$BB115])+[.AD$30]*[.$Z$5]*MAGNET([.AD$24]+[.$BB115])+[.AE$30]*[.$Z$5]*MAGNET([.AE$24]+[.$BB115])+[.AF$30]*[.$Z$5]*MAGNET([.AF$24]+[.$BB115])+[.AG$30]*[.$Z$5]*MAGNET([.AG$24]+[.$BB115])+[.D$30]*[.$Z$5]*MAGNET([.D$24]+[.$BB115])+[.AH$30]*[.$Z$5]*MAGNET([.AH$24]+[.BB115]) +[.AI$30]*[.$Z$5]*MAGNET([.AI$24]+[.BB115]) +[.AJ$30]*[.$Z$5]*MAGNET([.AJ$24]+[.BB115]) +[.AK$30]*[.$Z$5]*MAGNET([.AK$24]+[.BB115]) +[.AL$30]*[.$Z$5]*MAGNET([.AL$24]+[.BB115]) +[.AM$30]*[.$Z$5]*MAGNET([.AM$24]+[.BB115]) +[.AN$30]*[.$Z$5]*MAGNET([.AN$24]+[.BB115]) +[.AO$30]*[.$Z$5]*MAGNET([.AO$24]+[.BB115]) +[.AP$30]*[.$Z$5]*MAGNET([.AP$24]+[.$BB115])&#10;+[.AQ$30]*[.$Z$5]*MAGNET([.AQ$24]+[.$BB115])&#10;+[.AR$30]*[.$Z$5]*MAGNET([.AR$24]+[.$BB115])&#10;+[.AS$30]*[.$Z$5]*MAGNET([.AS$24]+[.$BB115])&#10;+[.AT$30]*[.$Z$5]*MAGNET([.AT$24]+[.$BB115])&#10;+[.AU$30]*[.$Z$5]*MAGNET([.AU$24]+[.$BB115])&#10;+[.AV$30]*[.$Z$5]*MAGNET([.AV$24]+[.$BB115])&#10;+[.AW$30]*[.$Z$5]*MAGNET([.AW$24]+[.$BB115])&#10;+[.AX$30]*[.$Z$5]*MAGNET([.AX$24]+[.$BB115])&#10;+[.AY$30]*[.$Z$5]*MAGNET([.AY$24]+[.$BB115]) +RAND()*[.$BH$13]" office:value-type="float" office:value="0" calcext:value-type="float">
            <text:p>0</text:p>
          </table:table-cell>
          <table:table-cell table:style-name="ce71" table:formula="of:=[.E$31]*[.$Z$5]*MAGNET([.E$24]+[.$BB115])+[.F$31]*[.$Z$5]*MAGNET([.F$24]+[.$BB115])+[.G$31]*[.$Z$5]*MAGNET([.G$24]+[.$BB115])+[.H$31]*[.$Z$5]*MAGNET([.H$24]+[.$BB115])+[.I$31]*[.$Z$5]*MAGNET([.I$24]+[.$BB115])+[.J$31]*[.$Z$5]*MAGNET([.J$24]+[.$BB115])+[.K$31]*[.$Z$5]*MAGNET([.K$24]+[.$BB115])+[.L$31]*[.$Z$5]*MAGNET([.L$24]+[.$BB115])+[.M$31]*[.$Z$5]*MAGNET([.M$24]+[.$BB115])+[.N$31]*[.$Z$5]*MAGNET([.N$24]+[.$BB115])+[.O$31]*[.$Z$5]*MAGNET([.O$24]+[.$BB115])+[.P$31]*[.$Z$5]*MAGNET([.P$24]+[.$BB115])+[.Q$31]*[.$Z$5]*MAGNET([.Q$24]+[.$BB115])+[.R$31]*[.$Z$5]*MAGNET([.R$24]+[.$BB115])+[.S$31]*[.$Z$5]*MAGNET([.S$24]+[.$BB115])+[.T$31]*[.$Z$5]*MAGNET([.T$24]+[.$BB115])+[.U$31]*[.$Z$5]*MAGNET([.U$24]+[.$BB115])+[.V$31]*[.$Z$5]*MAGNET([.V$24]+[.$BB115])+[.W$31]*[.$Z$5]*MAGNET([.W$24]+[.$BB115])+[.X$31]*[.$Z$5]*MAGNET([.X$24]+[.$BB115])+[.Y$31]*[.$Z$5]*MAGNET([.Y$24]+[.$BB115])+[.Z$31]*[.$Z$5]*MAGNET([.Z$24]+[.$BB115])+[.AA$31]*[.$Z$5]*MAGNET([.AA$24]+[.$BB115])+[.AB$31]*[.$Z$5]*MAGNET([.AB$24]+[.$BB115])+[.AC$31]*[.$Z$5]*MAGNET([.AC$24]+[.$BB115])+[.AD$31]*[.$Z$5]*MAGNET([.AD$24]+[.$BB115])+[.AE$31]*[.$Z$5]*MAGNET([.AE$24]+[.$BB115])+[.AF$31]*[.$Z$5]*MAGNET([.AF$24]+[.$BB115])+[.AG$31]*[.$Z$5]*MAGNET([.AG$24]+[.$BB115])+[.D$31]*[.$Z$5]*MAGNET([.D$24]+[.$BB115])+[.AH$31]*[.$Z$5]*MAGNET([.AH$24]+[.BB115]) +[.AI$31]*[.$Z$5]*MAGNET([.AI$24]+[.BB115]) +[.AJ$31]*[.$Z$5]*MAGNET([.AJ$24]+[.BB115]) +[.AK$31]*[.$Z$5]*MAGNET([.AK$24]+[.BB115]) +[.AL$31]*[.$Z$5]*MAGNET([.AL$24]+[.BB115]) +[.AM$31]*[.$Z$5]*MAGNET([.AM$24]+[.BB115]) +[.AN$31]*[.$Z$5]*MAGNET([.AN$24]+[.BB115]) +[.AO$31]*[.$Z$5]*MAGNET([.AO$24]+[.BB115]) +[.AP$31]*[.$Z$5]*MAGNET([.AP$24]+[.$BB115])&#10;+[.AQ$31]*[.$Z$5]*MAGNET([.AQ$24]+[.$BB115])&#10;+[.AR$31]*[.$Z$5]*MAGNET([.AR$24]+[.$BB115])&#10;+[.AS$31]*[.$Z$5]*MAGNET([.AS$24]+[.$BB115])&#10;+[.AT$31]*[.$Z$5]*MAGNET([.AT$24]+[.$BB115])&#10;+[.AU$31]*[.$Z$5]*MAGNET([.AU$24]+[.$BB115])&#10;+[.AV$31]*[.$Z$5]*MAGNET([.AV$24]+[.$BB115])&#10;+[.AW$31]*[.$Z$5]*MAGNET([.AW$24]+[.$BB115])&#10;+[.AX$31]*[.$Z$5]*MAGNET([.AX$24]+[.$BB115])&#10;+[.AY$31]*[.$Z$5]*MAGNET([.AY$24]+[.$BB115]) +RAND()*[.$BI$13]" office:value-type="float" office:value="0" calcext:value-type="float">
            <text:p>0</text:p>
          </table:table-cell>
          <table:table-cell table:style-name="ce71" table:formula="of:=[.E$32]*[.$Z$5]*MAGNET([.E$24]+[.$BB115])+[.F$32]*[.$Z$5]*MAGNET([.F$24]+[.$BB115])+[.G$32]*[.$Z$5]*MAGNET([.G$24]+[.$BB115])+[.H$32]*[.$Z$5]*MAGNET([.H$24]+[.$BB115])+[.I$32]*[.$Z$5]*MAGNET([.I$24]+[.$BB115])+[.J$32]*[.$Z$5]*MAGNET([.J$24]+[.$BB115])+[.K$32]*[.$Z$5]*MAGNET([.K$24]+[.$BB115])+[.L$32]*[.$Z$5]*MAGNET([.L$24]+[.$BB115])+[.M$32]*[.$Z$5]*MAGNET([.M$24]+[.$BB115])+[.N$32]*[.$Z$5]*MAGNET([.N$24]+[.$BB115])+[.O$32]*[.$Z$5]*MAGNET([.O$24]+[.$BB115])+[.P$32]*[.$Z$5]*MAGNET([.P$24]+[.$BB115])+[.Q$32]*[.$Z$5]*MAGNET([.Q$24]+[.$BB115])+[.R$32]*[.$Z$5]*MAGNET([.R$24]+[.$BB115])+[.S$32]*[.$Z$5]*MAGNET([.S$24]+[.$BB115])+[.T$32]*[.$Z$5]*MAGNET([.T$24]+[.$BB115])+[.U$32]*[.$Z$5]*MAGNET([.U$24]+[.$BB115])+[.V$32]*[.$Z$5]*MAGNET([.V$24]+[.$BB115])+[.W$32]*[.$Z$5]*MAGNET([.W$24]+[.$BB115])+[.X$32]*[.$Z$5]*MAGNET([.X$24]+[.$BB115])+[.Y$32]*[.$Z$5]*MAGNET([.Y$24]+[.$BB115])+[.Z$32]*[.$Z$5]*MAGNET([.Z$24]+[.$BB115])+[.AA$32]*[.$Z$5]*MAGNET([.AA$24]+[.$BB115])+[.AB$32]*[.$Z$5]*MAGNET([.AB$24]+[.$BB115])+[.AC$32]*[.$Z$5]*MAGNET([.AC$24]+[.$BB115])+[.AD$32]*[.$Z$5]*MAGNET([.AD$24]+[.$BB115])+[.AE$32]*[.$Z$5]*MAGNET([.AE$24]+[.$BB115])+[.AF$32]*[.$Z$5]*MAGNET([.AF$24]+[.$BB115])+[.AG$32]*[.$Z$5]*MAGNET([.AG$24]+[.$BB115])+[.D$32]*[.$Z$5]*MAGNET([.D$24]+[.$BB115])+[.AH$32]*[.$Z$5]*MAGNET([.AH$24]+[.BB115]) +[.AI$32]*[.$Z$5]*MAGNET([.AI$24]+[.BB115]) +[.AJ$32]*[.$Z$5]*MAGNET([.AJ$24]+[.BB115]) +[.AK$32]*[.$Z$5]*MAGNET([.AK$24]+[.BB115]) +[.AL$32]*[.$Z$5]*MAGNET([.AL$24]+[.BB115]) +[.AM$32]*[.$Z$5]*MAGNET([.AM$24]+[.BB115]) +[.AN$32]*[.$Z$5]*MAGNET([.AN$24]+[.BB115]) +[.AO$32]*[.$Z$5]*MAGNET([.AO$24]+[.BB115]) +[.AP$32]*[.$Z$5]*MAGNET([.AP$24]+[.$BB115])&#10;+[.AQ$32]*[.$Z$5]*MAGNET([.AQ$24]+[.$BB115])&#10;+[.AR$32]*[.$Z$5]*MAGNET([.AR$24]+[.$BB115])&#10;+[.AS$32]*[.$Z$5]*MAGNET([.AS$24]+[.$BB115])&#10;+[.AT$32]*[.$Z$5]*MAGNET([.AT$24]+[.$BB115])&#10;+[.AU$32]*[.$Z$5]*MAGNET([.AU$24]+[.$BB115])&#10;+[.AV$32]*[.$Z$5]*MAGNET([.AV$24]+[.$BB115])&#10;+[.AW$32]*[.$Z$5]*MAGNET([.AW$24]+[.$BB115])&#10;+[.AX$32]*[.$Z$5]*MAGNET([.AX$24]+[.$BB115])&#10;+[.AY$32]*[.$Z$5]*MAGNET([.AY$24]+[.$BB115]) +RAND()*[.$BJ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18"/>
        </table:table-row>
        <table:table-row table:style-name="ro1" table:number-rows-repeated="88">
          <table:table-cell table:number-columns-repeated="54"/>
          <table:table-cell table:style-name="ce66"/>
          <table:table-cell table:number-columns-repeated="11"/>
          <table:table-cell table:style-name="Default" table:number-columns-repeated="16318"/>
        </table:table-row>
        <table:table-row table:style-name="ro1">
          <table:table-cell table:number-columns-repeated="54"/>
          <table:table-cell table:style-name="ce66"/>
          <table:table-cell table:number-columns-repeated="11"/>
          <table:table-cell table:style-name="Default" table:number-columns-repeated="16318"/>
        </table:table-row>
        <calcext:conditional-formats>
          <calcext:conditional-format calcext:target-range-address="Räkn.D13:Räkn.AG13 Räkn.AH13:Räkn.AO13 Räkn.AP13:Räkn.AQ13 Räkn.AR13:Räkn.AY13">
            <calcext:condition calcext:apply-style-name="ConditionalStyle_8" calcext:value="between(-0.1,0.1)" calcext:base-cell-address="Räkn.D13"/>
            <calcext:condition calcext:apply-style-name="ConditionalStyle_7" calcext:value="between(6.27,6.29)" calcext:base-cell-address="Räkn.D13"/>
          </calcext:conditional-format>
        </calcext:conditional-formats>
      </table:table>
      <table:table table:name="plot" table:style-name="ta3">
        <office:forms form:automatic-focus="false" form:apply-design-mode="false"/>
        <table:table-column table:style-name="co7" table:default-cell-style-name="Default"/>
        <table:table-column table:style-name="co5" table:number-columns-repeated="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number-columns-repeated="5" table:default-cell-style-name="ce66"/>
        <table:table-column table:style-name="co7" table:number-columns-repeated="16364"/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64" table:formula="of:=[$Lind.S4]"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style-name="ce2" office:value-type="string" calcext:value-type="string">
            <text:p>Omega</text:p>
          </table:table-cell>
          <table:table-cell table:formula="of:=[.C1]*2*PI()" office:value-type="float" office:value="50.2654824574367" calcext:value-type="float">
            <text:p>50.2654824574367</text:p>
          </table:table-cell>
          <table:table-cell office:value-type="string" calcext:value-type="string">
            <text:p>rad/s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id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U3</text:p>
          </table:table-cell>
          <table:table-cell table:style-name="Default" office:value-type="string" calcext:value-type="string">
            <text:p>U4</text:p>
          </table:table-cell>
          <table:table-cell table:style-name="Default" office:value-type="string" calcext:value-type="string">
            <text:p>U5</text:p>
          </table:table-cell>
          <table:table-cell table:style-name="Default" office:value-type="string" calcext:value-type="string">
            <text:p>U6</text:p>
          </table:table-cell>
          <table:table-cell table:style-name="Default" office:value-type="string" calcext:value-type="string">
            <text:p>U7</text:p>
          </table:table-cell>
          <table:table-cell table:style-name="Default" office:value-type="string" calcext:value-type="string">
            <text:p>U8</text:p>
          </table:table-cell>
          <table:table-cell table:style-name="Default">
            <draw:frame table:end-cell-address="plot.AO27" table:end-x="0.3331in" table:end-y="0.0622in" draw:z-index="0" draw:name="Chart 1" draw:style-name="gr1" draw:text-style-name="P1" svg:width="13.1035in" svg:height="4.9476in" svg:x="0.6043in" svg:y="0.1146in">
              <draw:object draw:notify-on-update-of-ranges="plot.M4:plot.M10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U_G</text:p>
          </table:table-cell>
          <table:table-cell table:style-name="ce72" table:formula="of:=[$Räkn.$BA38]" office:value-type="float" office:value="0.046" calcext:value-type="float">
            <text:p>0</text:p>
          </table:table-cell>
          <table:table-cell table:style-name="ce72" table:formula="of:=[$Räkn.$BA40]" office:value-type="float" office:value="0.05" calcext:value-type="float">
            <text:p>0</text:p>
          </table:table-cell>
          <table:table-cell table:style-name="ce72" table:formula="of:=[$Räkn.$BA42]" office:value-type="float" office:value="0.054" calcext:value-type="float">
            <text:p>0</text:p>
          </table:table-cell>
          <table:table-cell table:style-name="ce72" table:formula="of:=[$Räkn.$BA44]" office:value-type="float" office:value="0.058" calcext:value-type="float">
            <text:p>0</text:p>
          </table:table-cell>
          <table:table-cell table:style-name="ce72" table:formula="of:=[$Räkn.$BA46]" office:value-type="float" office:value="0.062" calcext:value-type="float">
            <text:p>0</text:p>
          </table:table-cell>
          <table:table-cell table:style-name="ce72" table:formula="of:=[$Räkn.$BA48]" office:value-type="float" office:value="0.066" calcext:value-type="float">
            <text:p>0</text:p>
          </table:table-cell>
          <table:table-cell table:style-name="ce72" table:formula="of:=[$Räkn.$BA50]" office:value-type="float" office:value="0.0700000000000001" calcext:value-type="float">
            <text:p>0</text:p>
          </table:table-cell>
          <table:table-cell table:style-name="ce72" table:formula="of:=[$Räkn.$BA52]" office:value-type="float" office:value="0.0740000000000001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$4]*MAGNET([.$I$1]*[.$L4]+[.B$5]*PI()/180)+(RAND()-0.5)*[.$B$4]*[.$B$13]" office:value-type="float" office:value="-0.0000380254379239401" calcext:value-type="float">
            <text:p>0.00</text:p>
          </table:table-cell>
          <table:table-cell table:formula="of:=[.C$4]*MAGNET([.$I$1]*[.$L4]+[.C$5]*PI()/180)+(RAND()-0.5)*[.$B$4]*[.$B$13]" office:value-type="float" office:value="0.00037568787479057" calcext:value-type="float">
            <text:p>0.00</text:p>
          </table:table-cell>
          <table:table-cell table:formula="of:=[.D$4]*MAGNET([.$I$1]*[.$L4]+[.D$5]*PI()/180)+(RAND()-0.5)*[.$B$4]*[.$B$13]" office:value-type="float" office:value="0.000142615772316234" calcext:value-type="float">
            <text:p>0.00</text:p>
          </table:table-cell>
          <table:table-cell table:formula="of:=[.E$4]*MAGNET([.$I$1]*[.$L4]+[.E$5]*PI()/180)+(RAND()-0.5)*[.$B$4]*[.$B$13]" office:value-type="float" office:value="0.00398547294118494" calcext:value-type="float">
            <text:p>0.00</text:p>
          </table:table-cell>
          <table:table-cell table:formula="of:=[.F$4]*MAGNET([.$I$1]*[.$L4]+[.F$5]*PI()/180)+(RAND()-0.5)*[.$B$4]*[.$B$13]" office:value-type="float" office:value="0.000410944369458761" calcext:value-type="float">
            <text:p>0.00</text:p>
          </table:table-cell>
          <table:table-cell table:formula="of:=[.G$4]*MAGNET([.$I$1]*[.$L4]+[.G$5]*PI()/180)+(RAND()-0.5)*[.$B$4]*[.$B$13]" office:value-type="float" office:value="-0.00038045169708515" calcext:value-type="float">
            <text:p>0.00</text:p>
          </table:table-cell>
          <table:table-cell table:formula="of:=[.H$4]*MAGNET([.$I$1]*[.$L4]+[.H$5]*PI()/180)+(RAND()-0.5)*[.$B$4]*[.$B$13]" office:value-type="float" office:value="-0.000222171874002436" calcext:value-type="float">
            <text:p>0.00</text:p>
          </table:table-cell>
          <table:table-cell table:formula="of:=[.I$4]*MAGNET([.$I$1]*[.$L4]+[.I$5]*PI()/180)+(RAND()-0.5)*[.$B$4]*[.$B$13]" office:value-type="float" office:value="0.000642776100007145" calcext:value-type="float">
            <text:p>0.00</text:p>
          </table:table-cell>
          <table:table-cell table:style-name="Default" table:number-columns-repeated="16364"/>
        </table:table-row>
        <table:table-row table:style-name="ro1">
          <table:table-cell office:value-type="string" calcext:value-type="string">
            <text:p>gam_G</text:p>
          </table:table-cell>
          <table:table-cell table:style-name="ce72" table:formula="of:=[$Räkn.$AN38]" office:value-type="float" office:value="0" calcext:value-type="float">
            <text:p>0</text:p>
          </table:table-cell>
          <table:table-cell table:style-name="ce72" table:formula="of:=[$Räkn.$AN40]" office:value-type="float" office:value="0" calcext:value-type="float">
            <text:p>0</text:p>
          </table:table-cell>
          <table:table-cell table:style-name="ce72" table:formula="of:=[$Räkn.$AN42]" office:value-type="float" office:value="0" calcext:value-type="float">
            <text:p>0</text:p>
          </table:table-cell>
          <table:table-cell table:style-name="ce72" table:formula="of:=[$Räkn.$AN44]" office:value-type="float" office:value="4" calcext:value-type="float">
            <text:p>4</text:p>
          </table:table-cell>
          <table:table-cell table:style-name="ce72" table:formula="of:=[$Räkn.$AN46]" office:value-type="float" office:value="0" calcext:value-type="float">
            <text:p>0</text:p>
          </table:table-cell>
          <table:table-cell table:style-name="ce72" table:formula="of:=[$Räkn.$AN48]" office:value-type="float" office:value="0" calcext:value-type="float">
            <text:p>0</text:p>
          </table:table-cell>
          <table:table-cell table:style-name="ce72" table:formula="of:=[$Räkn.$AN50]" office:value-type="float" office:value="0" calcext:value-type="float">
            <text:p>0</text:p>
          </table:table-cell>
          <table:table-cell table:style-name="ce72" table:formula="of:=[$Räkn.$AN52]" office:value-type="float" office:value="0" calcext:value-type="float">
            <text:p>0</text:p>
          </table:table-cell>
          <table:table-cell table:number-columns-repeated="2"/>
          <table:table-cell table:formula="of:=[.L4]+0.002" office:value-type="float" office:value="0.002" calcext:value-type="float">
            <text:p>0.002</text:p>
          </table:table-cell>
          <table:table-cell table:formula="of:=[.B$4]*MAGNET([.$I$1]*[.$L5]+[.B$5]*PI()/180)+(RAND()-0.5)*[.$B$4]*[.$B$13]" office:value-type="float" office:value="0.00504093819560507" calcext:value-type="float">
            <text:p>0.01</text:p>
          </table:table-cell>
          <table:table-cell table:formula="of:=[.C$4]*MAGNET([.$I$1]*[.$L5]+[.C$5]*PI()/180)+(RAND()-0.5)*[.$B$4]*[.$B$13]" office:value-type="float" office:value="0.00463132291573342" calcext:value-type="float">
            <text:p>0.00</text:p>
          </table:table-cell>
          <table:table-cell table:formula="of:=[.D$4]*MAGNET([.$I$1]*[.$L5]+[.D$5]*PI()/180)+(RAND()-0.5)*[.$B$4]*[.$B$13]" office:value-type="float" office:value="0.0047795188197216" calcext:value-type="float">
            <text:p>0.00</text:p>
          </table:table-cell>
          <table:table-cell table:formula="of:=[.E$4]*MAGNET([.$I$1]*[.$L5]+[.E$5]*PI()/180)+(RAND()-0.5)*[.$B$4]*[.$B$13]" office:value-type="float" office:value="0.0105052012298229" calcext:value-type="float">
            <text:p>0.01</text:p>
          </table:table-cell>
          <table:table-cell table:formula="of:=[.F$4]*MAGNET([.$I$1]*[.$L5]+[.F$5]*PI()/180)+(RAND()-0.5)*[.$B$4]*[.$B$13]" office:value-type="float" office:value="0.00613821915841989" calcext:value-type="float">
            <text:p>0.01</text:p>
          </table:table-cell>
          <table:table-cell table:formula="of:=[.G$4]*MAGNET([.$I$1]*[.$L5]+[.G$5]*PI()/180)+(RAND()-0.5)*[.$B$4]*[.$B$13]" office:value-type="float" office:value="0.00674300523715629" calcext:value-type="float">
            <text:p>0.01</text:p>
          </table:table-cell>
          <table:table-cell table:formula="of:=[.H$4]*MAGNET([.$I$1]*[.$L5]+[.H$5]*PI()/180)+(RAND()-0.5)*[.$B$4]*[.$B$13]" office:value-type="float" office:value="0.0070493946003822" calcext:value-type="float">
            <text:p>0.01</text:p>
          </table:table-cell>
          <table:table-cell table:formula="of:=[.I$4]*MAGNET([.$I$1]*[.$L5]+[.I$5]*PI()/180)+(RAND()-0.5)*[.$B$4]*[.$B$13]" office:value-type="float" office:value="0.00742200065793537" calcext:value-type="float">
            <text:p>0.01</text:p>
          </table:table-cell>
          <table:table-cell table:style-name="Default" table:number-columns-repeated="16364"/>
        </table:table-row>
        <table:table-row table:style-name="ro1">
          <table:table-cell/>
          <table:table-cell table:style-name="ce73" table:number-columns-repeated="8"/>
          <table:table-cell table:number-columns-repeated="2"/>
          <table:table-cell table:formula="of:=[.L5]+0.002" office:value-type="float" office:value="0.004" calcext:value-type="float">
            <text:p>0.004</text:p>
          </table:table-cell>
          <table:table-cell table:formula="of:=[.B$4]*MAGNET([.$I$1]*[.$L6]+[.B$5]*PI()/180)+(RAND()-0.5)*[.$B$4]*[.$B$13]" office:value-type="float" office:value="0.0106133105174852" calcext:value-type="float">
            <text:p>0.01</text:p>
          </table:table-cell>
          <table:table-cell table:formula="of:=[.C$4]*MAGNET([.$I$1]*[.$L6]+[.C$5]*PI()/180)+(RAND()-0.5)*[.$B$4]*[.$B$13]" office:value-type="float" office:value="0.0104549687618592" calcext:value-type="float">
            <text:p>0.01</text:p>
          </table:table-cell>
          <table:table-cell table:formula="of:=[.D$4]*MAGNET([.$I$1]*[.$L6]+[.D$5]*PI()/180)+(RAND()-0.5)*[.$B$4]*[.$B$13]" office:value-type="float" office:value="0.0111896881908147" calcext:value-type="float">
            <text:p>0.01</text:p>
          </table:table-cell>
          <table:table-cell table:formula="of:=[.E$4]*MAGNET([.$I$1]*[.$L6]+[.E$5]*PI()/180)+(RAND()-0.5)*[.$B$4]*[.$B$13]" office:value-type="float" office:value="0.0179129933141447" calcext:value-type="float">
            <text:p>0.02</text:p>
          </table:table-cell>
          <table:table-cell table:formula="of:=[.F$4]*MAGNET([.$I$1]*[.$L6]+[.F$5]*PI()/180)+(RAND()-0.5)*[.$B$4]*[.$B$13]" office:value-type="float" office:value="0.0138673720431544" calcext:value-type="float">
            <text:p>0.01</text:p>
          </table:table-cell>
          <table:table-cell table:formula="of:=[.G$4]*MAGNET([.$I$1]*[.$L6]+[.G$5]*PI()/180)+(RAND()-0.5)*[.$B$4]*[.$B$13]" office:value-type="float" office:value="0.0139164189719115" calcext:value-type="float">
            <text:p>0.01</text:p>
          </table:table-cell>
          <table:table-cell table:formula="of:=[.H$4]*MAGNET([.$I$1]*[.$L6]+[.H$5]*PI()/180)+(RAND()-0.5)*[.$B$4]*[.$B$13]" office:value-type="float" office:value="0.0159059672804117" calcext:value-type="float">
            <text:p>0.02</text:p>
          </table:table-cell>
          <table:table-cell table:formula="of:=[.I$4]*MAGNET([.$I$1]*[.$L6]+[.I$5]*PI()/180)+(RAND()-0.5)*[.$B$4]*[.$B$13]" office:value-type="float" office:value="0.0156808769306662" calcext:value-type="float">
            <text:p>0.02</text:p>
          </table:table-cell>
          <table:table-cell table:style-name="Default" table:number-columns-repeated="16364"/>
        </table:table-row>
        <table:table-row table:style-name="ro1">
          <table:table-cell/>
          <table:table-cell table:style-name="ce72" table:number-columns-repeated="8"/>
          <table:table-cell table:number-columns-repeated="2"/>
          <table:table-cell table:formula="of:=[.L6]+0.002" office:value-type="float" office:value="0.006" calcext:value-type="float">
            <text:p>0.006</text:p>
          </table:table-cell>
          <table:table-cell table:formula="of:=[.B$4]*MAGNET([.$I$1]*[.$L7]+[.B$5]*PI()/180)+(RAND()-0.5)*[.$B$4]*[.$B$13]" office:value-type="float" office:value="0.0153939233958018" calcext:value-type="float">
            <text:p>0.02</text:p>
          </table:table-cell>
          <table:table-cell table:formula="of:=[.C$4]*MAGNET([.$I$1]*[.$L7]+[.C$5]*PI()/180)+(RAND()-0.5)*[.$B$4]*[.$B$13]" office:value-type="float" office:value="0.0173530390936699" calcext:value-type="float">
            <text:p>0.02</text:p>
          </table:table-cell>
          <table:table-cell table:formula="of:=[.D$4]*MAGNET([.$I$1]*[.$L7]+[.D$5]*PI()/180)+(RAND()-0.5)*[.$B$4]*[.$B$13]" office:value-type="float" office:value="0.0190594584245905" calcext:value-type="float">
            <text:p>0.02</text:p>
          </table:table-cell>
          <table:table-cell table:formula="of:=[.E$4]*MAGNET([.$I$1]*[.$L7]+[.E$5]*PI()/180)+(RAND()-0.5)*[.$B$4]*[.$B$13]" office:value-type="float" office:value="0.0248369913207113" calcext:value-type="float">
            <text:p>0.02</text:p>
          </table:table-cell>
          <table:table-cell table:formula="of:=[.F$4]*MAGNET([.$I$1]*[.$L7]+[.F$5]*PI()/180)+(RAND()-0.5)*[.$B$4]*[.$B$13]" office:value-type="float" office:value="0.0219950637358617" calcext:value-type="float">
            <text:p>0.02</text:p>
          </table:table-cell>
          <table:table-cell table:formula="of:=[.G$4]*MAGNET([.$I$1]*[.$L7]+[.G$5]*PI()/180)+(RAND()-0.5)*[.$B$4]*[.$B$13]" office:value-type="float" office:value="0.0221773906323536" calcext:value-type="float">
            <text:p>0.02</text:p>
          </table:table-cell>
          <table:table-cell table:formula="of:=[.H$4]*MAGNET([.$I$1]*[.$L7]+[.H$5]*PI()/180)+(RAND()-0.5)*[.$B$4]*[.$B$13]" office:value-type="float" office:value="0.0247766323662993" calcext:value-type="float">
            <text:p>0.02</text:p>
          </table:table-cell>
          <table:table-cell table:formula="of:=[.I$4]*MAGNET([.$I$1]*[.$L7]+[.I$5]*PI()/180)+(RAND()-0.5)*[.$B$4]*[.$B$13]" office:value-type="float" office:value="0.0257917003041652" calcext:value-type="float">
            <text:p>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]+0.002" office:value-type="float" office:value="0.008" calcext:value-type="float">
            <text:p>0.008</text:p>
          </table:table-cell>
          <table:table-cell table:formula="of:=[.B$4]*MAGNET([.$I$1]*[.$L8]+[.B$5]*PI()/180)+(RAND()-0.5)*[.$B$4]*[.$B$13]" office:value-type="float" office:value="0.021925387924959" calcext:value-type="float">
            <text:p>0.02</text:p>
          </table:table-cell>
          <table:table-cell table:formula="of:=[.C$4]*MAGNET([.$I$1]*[.$L8]+[.C$5]*PI()/180)+(RAND()-0.5)*[.$B$4]*[.$B$13]" office:value-type="float" office:value="0.0237244817746512" calcext:value-type="float">
            <text:p>0.02</text:p>
          </table:table-cell>
          <table:table-cell table:formula="of:=[.D$4]*MAGNET([.$I$1]*[.$L8]+[.D$5]*PI()/180)+(RAND()-0.5)*[.$B$4]*[.$B$13]" office:value-type="float" office:value="0.0250649525069638" calcext:value-type="float">
            <text:p>0.03</text:p>
          </table:table-cell>
          <table:table-cell table:formula="of:=[.E$4]*MAGNET([.$I$1]*[.$L8]+[.E$5]*PI()/180)+(RAND()-0.5)*[.$B$4]*[.$B$13]" office:value-type="float" office:value="0.0328604887145534" calcext:value-type="float">
            <text:p>0.03</text:p>
          </table:table-cell>
          <table:table-cell table:formula="of:=[.F$4]*MAGNET([.$I$1]*[.$L8]+[.F$5]*PI()/180)+(RAND()-0.5)*[.$B$4]*[.$B$13]" office:value-type="float" office:value="0.0287609354705145" calcext:value-type="float">
            <text:p>0.03</text:p>
          </table:table-cell>
          <table:table-cell table:formula="of:=[.G$4]*MAGNET([.$I$1]*[.$L8]+[.G$5]*PI()/180)+(RAND()-0.5)*[.$B$4]*[.$B$13]" office:value-type="float" office:value="0.0307899140954705" calcext:value-type="float">
            <text:p>0.03</text:p>
          </table:table-cell>
          <table:table-cell table:formula="of:=[.H$4]*MAGNET([.$I$1]*[.$L8]+[.H$5]*PI()/180)+(RAND()-0.5)*[.$B$4]*[.$B$13]" office:value-type="float" office:value="0.0331497651899011" calcext:value-type="float">
            <text:p>0.03</text:p>
          </table:table-cell>
          <table:table-cell table:formula="of:=[.I$4]*MAGNET([.$I$1]*[.$L8]+[.I$5]*PI()/180)+(RAND()-0.5)*[.$B$4]*[.$B$13]" office:value-type="float" office:value="0.0355675755734693" calcext:value-type="float">
            <text:p>0.04</text:p>
          </table:table-cell>
          <table:table-cell table:style-name="Default" table:number-columns-repeated="16364"/>
        </table:table-row>
        <table:table-row table:style-name="ro1">
          <table:table-cell/>
          <table:table-cell table:style-name="ce72" table:number-columns-repeated="8"/>
          <table:table-cell table:number-columns-repeated="2"/>
          <table:table-cell table:formula="of:=[.L8]+0.002" office:value-type="float" office:value="0.01" calcext:value-type="float">
            <text:p>0.01</text:p>
          </table:table-cell>
          <table:table-cell table:formula="of:=[.B$4]*MAGNET([.$I$1]*[.$L9]+[.B$5]*PI()/180)+(RAND()-0.5)*[.$B$4]*[.$B$13]" office:value-type="float" office:value="0.027389274906924" calcext:value-type="float">
            <text:p>0.03</text:p>
          </table:table-cell>
          <table:table-cell table:formula="of:=[.C$4]*MAGNET([.$I$1]*[.$L9]+[.C$5]*PI()/180)+(RAND()-0.5)*[.$B$4]*[.$B$13]" office:value-type="float" office:value="0.0296573611551378" calcext:value-type="float">
            <text:p>0.03</text:p>
          </table:table-cell>
          <table:table-cell table:formula="of:=[.D$4]*MAGNET([.$I$1]*[.$L9]+[.D$5]*PI()/180)+(RAND()-0.5)*[.$B$4]*[.$B$13]" office:value-type="float" office:value="0.031672498222735" calcext:value-type="float">
            <text:p>0.03</text:p>
          </table:table-cell>
          <table:table-cell table:formula="of:=[.E$4]*MAGNET([.$I$1]*[.$L9]+[.E$5]*PI()/180)+(RAND()-0.5)*[.$B$4]*[.$B$13]" office:value-type="float" office:value="0.0386877771717686" calcext:value-type="float">
            <text:p>0.04</text:p>
          </table:table-cell>
          <table:table-cell table:formula="of:=[.F$4]*MAGNET([.$I$1]*[.$L9]+[.F$5]*PI()/180)+(RAND()-0.5)*[.$B$4]*[.$B$13]" office:value-type="float" office:value="0.0369619952915013" calcext:value-type="float">
            <text:p>0.04</text:p>
          </table:table-cell>
          <table:table-cell table:formula="of:=[.G$4]*MAGNET([.$I$1]*[.$L9]+[.G$5]*PI()/180)+(RAND()-0.5)*[.$B$4]*[.$B$13]" office:value-type="float" office:value="0.0389372479289677" calcext:value-type="float">
            <text:p>0.04</text:p>
          </table:table-cell>
          <table:table-cell table:formula="of:=[.H$4]*MAGNET([.$I$1]*[.$L9]+[.H$5]*PI()/180)+(RAND()-0.5)*[.$B$4]*[.$B$13]" office:value-type="float" office:value="0.0421012071647399" calcext:value-type="float">
            <text:p>0.04</text:p>
          </table:table-cell>
          <table:table-cell table:formula="of:=[.I$4]*MAGNET([.$I$1]*[.$L9]+[.I$5]*PI()/180)+(RAND()-0.5)*[.$B$4]*[.$B$13]" office:value-type="float" office:value="0.0447177292594961" calcext:value-type="float">
            <text:p>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]+0.002" office:value-type="float" office:value="0.012" calcext:value-type="float">
            <text:p>0.012</text:p>
          </table:table-cell>
          <table:table-cell table:formula="of:=[.B$4]*MAGNET([.$I$1]*[.$L10]+[.B$5]*PI()/180)+(RAND()-0.5)*[.$B$4]*[.$B$13]" office:value-type="float" office:value="0.0322460912160329" calcext:value-type="float">
            <text:p>0.03</text:p>
          </table:table-cell>
          <table:table-cell table:formula="of:=[.C$4]*MAGNET([.$I$1]*[.$L10]+[.C$5]*PI()/180)+(RAND()-0.5)*[.$B$4]*[.$B$13]" office:value-type="float" office:value="0.035615334536766" calcext:value-type="float">
            <text:p>0.04</text:p>
          </table:table-cell>
          <table:table-cell table:formula="of:=[.D$4]*MAGNET([.$I$1]*[.$L10]+[.D$5]*PI()/180)+(RAND()-0.5)*[.$B$4]*[.$B$13]" office:value-type="float" office:value="0.0378402500972025" calcext:value-type="float">
            <text:p>0.04</text:p>
          </table:table-cell>
          <table:table-cell table:formula="of:=[.E$4]*MAGNET([.$I$1]*[.$L10]+[.E$5]*PI()/180)+(RAND()-0.5)*[.$B$4]*[.$B$13]" office:value-type="float" office:value="0.0452640532245927" calcext:value-type="float">
            <text:p>0.05</text:p>
          </table:table-cell>
          <table:table-cell table:formula="of:=[.F$4]*MAGNET([.$I$1]*[.$L10]+[.F$5]*PI()/180)+(RAND()-0.5)*[.$B$4]*[.$B$13]" office:value-type="float" office:value="0.0442807352479234" calcext:value-type="float">
            <text:p>0.04</text:p>
          </table:table-cell>
          <table:table-cell table:formula="of:=[.G$4]*MAGNET([.$I$1]*[.$L10]+[.G$5]*PI()/180)+(RAND()-0.5)*[.$B$4]*[.$B$13]" office:value-type="float" office:value="0.0464713470254066" calcext:value-type="float">
            <text:p>0.05</text:p>
          </table:table-cell>
          <table:table-cell table:formula="of:=[.H$4]*MAGNET([.$I$1]*[.$L10]+[.H$5]*PI()/180)+(RAND()-0.5)*[.$B$4]*[.$B$13]" office:value-type="float" office:value="0.0494153299412128" calcext:value-type="float">
            <text:p>0.05</text:p>
          </table:table-cell>
          <table:table-cell table:formula="of:=[.I$4]*MAGNET([.$I$1]*[.$L10]+[.I$5]*PI()/180)+(RAND()-0.5)*[.$B$4]*[.$B$13]" office:value-type="float" office:value="0.0521980289866843" calcext:value-type="float">
            <text:p>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0]+0.002" office:value-type="float" office:value="0.014" calcext:value-type="float">
            <text:p>0.014</text:p>
          </table:table-cell>
          <table:table-cell table:formula="of:=[.B$4]*MAGNET([.$I$1]*[.$L11]+[.B$5]*PI()/180)+(RAND()-0.5)*[.$B$4]*[.$B$13]" office:value-type="float" office:value="0.0365634414586432" calcext:value-type="float">
            <text:p>0.04</text:p>
          </table:table-cell>
          <table:table-cell table:formula="of:=[.C$4]*MAGNET([.$I$1]*[.$L11]+[.C$5]*PI()/180)+(RAND()-0.5)*[.$B$4]*[.$B$13]" office:value-type="float" office:value="0.0391260946600873" calcext:value-type="float">
            <text:p>0.04</text:p>
          </table:table-cell>
          <table:table-cell table:formula="of:=[.D$4]*MAGNET([.$I$1]*[.$L11]+[.D$5]*PI()/180)+(RAND()-0.5)*[.$B$4]*[.$B$13]" office:value-type="float" office:value="0.0435792344555437" calcext:value-type="float">
            <text:p>0.04</text:p>
          </table:table-cell>
          <table:table-cell table:formula="of:=[.E$4]*MAGNET([.$I$1]*[.$L11]+[.E$5]*PI()/180)+(RAND()-0.5)*[.$B$4]*[.$B$13]" office:value-type="float" office:value="0.0491614070013834" calcext:value-type="float">
            <text:p>0.05</text:p>
          </table:table-cell>
          <table:table-cell table:formula="of:=[.F$4]*MAGNET([.$I$1]*[.$L11]+[.F$5]*PI()/180)+(RAND()-0.5)*[.$B$4]*[.$B$13]" office:value-type="float" office:value="0.0487406649183193" calcext:value-type="float">
            <text:p>0.05</text:p>
          </table:table-cell>
          <table:table-cell table:formula="of:=[.G$4]*MAGNET([.$I$1]*[.$L11]+[.G$5]*PI()/180)+(RAND()-0.5)*[.$B$4]*[.$B$13]" office:value-type="float" office:value="0.0527767719385197" calcext:value-type="float">
            <text:p>0.05</text:p>
          </table:table-cell>
          <table:table-cell table:formula="of:=[.H$4]*MAGNET([.$I$1]*[.$L11]+[.H$5]*PI()/180)+(RAND()-0.5)*[.$B$4]*[.$B$13]" office:value-type="float" office:value="0.0559380444737452" calcext:value-type="float">
            <text:p>0.06</text:p>
          </table:table-cell>
          <table:table-cell table:formula="of:=[.I$4]*MAGNET([.$I$1]*[.$L11]+[.I$5]*PI()/180)+(RAND()-0.5)*[.$B$4]*[.$B$13]" office:value-type="float" office:value="0.0592234192695163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1]+0.002" office:value-type="float" office:value="0.016" calcext:value-type="float">
            <text:p>0.016</text:p>
          </table:table-cell>
          <table:table-cell table:formula="of:=[.B$4]*MAGNET([.$I$1]*[.$L12]+[.B$5]*PI()/180)+(RAND()-0.5)*[.$B$4]*[.$B$13]" office:value-type="float" office:value="0.0395333188698217" calcext:value-type="float">
            <text:p>0.04</text:p>
          </table:table-cell>
          <table:table-cell table:formula="of:=[.C$4]*MAGNET([.$I$1]*[.$L12]+[.C$5]*PI()/180)+(RAND()-0.5)*[.$B$4]*[.$B$13]" office:value-type="float" office:value="0.0436465349730024" calcext:value-type="float">
            <text:p>0.04</text:p>
          </table:table-cell>
          <table:table-cell table:formula="of:=[.D$4]*MAGNET([.$I$1]*[.$L12]+[.D$5]*PI()/180)+(RAND()-0.5)*[.$B$4]*[.$B$13]" office:value-type="float" office:value="0.0471968828086257" calcext:value-type="float">
            <text:p>0.05</text:p>
          </table:table-cell>
          <table:table-cell table:formula="of:=[.E$4]*MAGNET([.$I$1]*[.$L12]+[.E$5]*PI()/180)+(RAND()-0.5)*[.$B$4]*[.$B$13]" office:value-type="float" office:value="0.0527542117786935" calcext:value-type="float">
            <text:p>0.05</text:p>
          </table:table-cell>
          <table:table-cell table:formula="of:=[.F$4]*MAGNET([.$I$1]*[.$L12]+[.F$5]*PI()/180)+(RAND()-0.5)*[.$B$4]*[.$B$13]" office:value-type="float" office:value="0.0535985493913583" calcext:value-type="float">
            <text:p>0.05</text:p>
          </table:table-cell>
          <table:table-cell table:formula="of:=[.G$4]*MAGNET([.$I$1]*[.$L12]+[.G$5]*PI()/180)+(RAND()-0.5)*[.$B$4]*[.$B$13]" office:value-type="float" office:value="0.0573808444778907" calcext:value-type="float">
            <text:p>0.06</text:p>
          </table:table-cell>
          <table:table-cell table:formula="of:=[.H$4]*MAGNET([.$I$1]*[.$L12]+[.H$5]*PI()/180)+(RAND()-0.5)*[.$B$4]*[.$B$13]" office:value-type="float" office:value="0.0605181324874929" calcext:value-type="float">
            <text:p>0.06</text:p>
          </table:table-cell>
          <table:table-cell table:formula="of:=[.I$4]*MAGNET([.$I$1]*[.$L12]+[.I$5]*PI()/180)+(RAND()-0.5)*[.$B$4]*[.$B$13]" office:value-type="float" office:value="0.0643184318660044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office:value-type="string" calcext:value-type="string">
            <text:p>Brus ampl</text:p>
          </table:table-cell>
          <table:table-cell table:style-name="ce62" table:formula="of:=[$Lind.S7]" office:value-type="percentage" office:value="0.03" calcext:value-type="percentage">
            <text:p>3%</text:p>
          </table:table-cell>
          <table:table-cell table:number-columns-repeated="9"/>
          <table:table-cell table:formula="of:=[.L12]+0.002" office:value-type="float" office:value="0.018" calcext:value-type="float">
            <text:p>0.018</text:p>
          </table:table-cell>
          <table:table-cell table:formula="of:=[.B$4]*MAGNET([.$I$1]*[.$L13]+[.B$5]*PI()/180)+(RAND()-0.5)*[.$B$4]*[.$B$13]" office:value-type="float" office:value="0.0422166355103502" calcext:value-type="float">
            <text:p>0.04</text:p>
          </table:table-cell>
          <table:table-cell table:formula="of:=[.C$4]*MAGNET([.$I$1]*[.$L13]+[.C$5]*PI()/180)+(RAND()-0.5)*[.$B$4]*[.$B$13]" office:value-type="float" office:value="0.0459531542661552" calcext:value-type="float">
            <text:p>0.05</text:p>
          </table:table-cell>
          <table:table-cell table:formula="of:=[.D$4]*MAGNET([.$I$1]*[.$L13]+[.D$5]*PI()/180)+(RAND()-0.5)*[.$B$4]*[.$B$13]" office:value-type="float" office:value="0.0502620591088151" calcext:value-type="float">
            <text:p>0.05</text:p>
          </table:table-cell>
          <table:table-cell table:formula="of:=[.E$4]*MAGNET([.$I$1]*[.$L13]+[.E$5]*PI()/180)+(RAND()-0.5)*[.$B$4]*[.$B$13]" office:value-type="float" office:value="0.0556355913479715" calcext:value-type="float">
            <text:p>0.06</text:p>
          </table:table-cell>
          <table:table-cell table:formula="of:=[.F$4]*MAGNET([.$I$1]*[.$L13]+[.F$5]*PI()/180)+(RAND()-0.5)*[.$B$4]*[.$B$13]" office:value-type="float" office:value="0.056640968227175" calcext:value-type="float">
            <text:p>0.06</text:p>
          </table:table-cell>
          <table:table-cell table:formula="of:=[.G$4]*MAGNET([.$I$1]*[.$L13]+[.G$5]*PI()/180)+(RAND()-0.5)*[.$B$4]*[.$B$13]" office:value-type="float" office:value="0.0607538745542067" calcext:value-type="float">
            <text:p>0.06</text:p>
          </table:table-cell>
          <table:table-cell table:formula="of:=[.H$4]*MAGNET([.$I$1]*[.$L13]+[.H$5]*PI()/180)+(RAND()-0.5)*[.$B$4]*[.$B$13]" office:value-type="float" office:value="0.064881616314985" calcext:value-type="float">
            <text:p>0.06</text:p>
          </table:table-cell>
          <table:table-cell table:formula="of:=[.I$4]*MAGNET([.$I$1]*[.$L13]+[.I$5]*PI()/180)+(RAND()-0.5)*[.$B$4]*[.$B$13]" office:value-type="float" office:value="0.067899929020081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3]+0.002" office:value-type="float" office:value="0.02" calcext:value-type="float">
            <text:p>0.02</text:p>
          </table:table-cell>
          <table:table-cell table:formula="of:=[.B$4]*MAGNET([.$I$1]*[.$L14]+[.B$5]*PI()/180)+(RAND()-0.5)*[.$B$4]*[.$B$13]" office:value-type="float" office:value="0.0448438174663155" calcext:value-type="float">
            <text:p>0.04</text:p>
          </table:table-cell>
          <table:table-cell table:formula="of:=[.C$4]*MAGNET([.$I$1]*[.$L14]+[.C$5]*PI()/180)+(RAND()-0.5)*[.$B$4]*[.$B$13]" office:value-type="float" office:value="0.0478175701781895" calcext:value-type="float">
            <text:p>0.05</text:p>
          </table:table-cell>
          <table:table-cell table:formula="of:=[.D$4]*MAGNET([.$I$1]*[.$L14]+[.D$5]*PI()/180)+(RAND()-0.5)*[.$B$4]*[.$B$13]" office:value-type="float" office:value="0.0517872638464042" calcext:value-type="float">
            <text:p>0.05</text:p>
          </table:table-cell>
          <table:table-cell table:formula="of:=[.E$4]*MAGNET([.$I$1]*[.$L14]+[.E$5]*PI()/180)+(RAND()-0.5)*[.$B$4]*[.$B$13]" office:value-type="float" office:value="0.0568613864267527" calcext:value-type="float">
            <text:p>0.06</text:p>
          </table:table-cell>
          <table:table-cell table:formula="of:=[.F$4]*MAGNET([.$I$1]*[.$L14]+[.F$5]*PI()/180)+(RAND()-0.5)*[.$B$4]*[.$B$13]" office:value-type="float" office:value="0.0589513847653118" calcext:value-type="float">
            <text:p>0.06</text:p>
          </table:table-cell>
          <table:table-cell table:formula="of:=[.G$4]*MAGNET([.$I$1]*[.$L14]+[.G$5]*PI()/180)+(RAND()-0.5)*[.$B$4]*[.$B$13]" office:value-type="float" office:value="0.0636919067066742" calcext:value-type="float">
            <text:p>0.06</text:p>
          </table:table-cell>
          <table:table-cell table:formula="of:=[.H$4]*MAGNET([.$I$1]*[.$L14]+[.H$5]*PI()/180)+(RAND()-0.5)*[.$B$4]*[.$B$13]" office:value-type="float" office:value="0.0671196121858388" calcext:value-type="float">
            <text:p>0.07</text:p>
          </table:table-cell>
          <table:table-cell table:formula="of:=[.I$4]*MAGNET([.$I$1]*[.$L14]+[.I$5]*PI()/180)+(RAND()-0.5)*[.$B$4]*[.$B$13]" office:value-type="float" office:value="0.0707301801002274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4]+0.002" office:value-type="float" office:value="0.022" calcext:value-type="float">
            <text:p>0.022</text:p>
          </table:table-cell>
          <table:table-cell table:formula="of:=[.B$4]*MAGNET([.$I$1]*[.$L15]+[.B$5]*PI()/180)+(RAND()-0.5)*[.$B$4]*[.$B$13]" office:value-type="float" office:value="0.0454176066813203" calcext:value-type="float">
            <text:p>0.05</text:p>
          </table:table-cell>
          <table:table-cell table:formula="of:=[.C$4]*MAGNET([.$I$1]*[.$L15]+[.C$5]*PI()/180)+(RAND()-0.5)*[.$B$4]*[.$B$13]" office:value-type="float" office:value="0.0495564354567963" calcext:value-type="float">
            <text:p>0.05</text:p>
          </table:table-cell>
          <table:table-cell table:formula="of:=[.D$4]*MAGNET([.$I$1]*[.$L15]+[.D$5]*PI()/180)+(RAND()-0.5)*[.$B$4]*[.$B$13]" office:value-type="float" office:value="0.0526673290999512" calcext:value-type="float">
            <text:p>0.05</text:p>
          </table:table-cell>
          <table:table-cell table:formula="of:=[.E$4]*MAGNET([.$I$1]*[.$L15]+[.E$5]*PI()/180)+(RAND()-0.5)*[.$B$4]*[.$B$13]" office:value-type="float" office:value="0.0581147195740257" calcext:value-type="float">
            <text:p>0.06</text:p>
          </table:table-cell>
          <table:table-cell table:formula="of:=[.F$4]*MAGNET([.$I$1]*[.$L15]+[.F$5]*PI()/180)+(RAND()-0.5)*[.$B$4]*[.$B$13]" office:value-type="float" office:value="0.0605566876589991" calcext:value-type="float">
            <text:p>0.06</text:p>
          </table:table-cell>
          <table:table-cell table:formula="of:=[.G$4]*MAGNET([.$I$1]*[.$L15]+[.G$5]*PI()/180)+(RAND()-0.5)*[.$B$4]*[.$B$13]" office:value-type="float" office:value="0.0654358492520014" calcext:value-type="float">
            <text:p>0.07</text:p>
          </table:table-cell>
          <table:table-cell table:formula="of:=[.H$4]*MAGNET([.$I$1]*[.$L15]+[.H$5]*PI()/180)+(RAND()-0.5)*[.$B$4]*[.$B$13]" office:value-type="float" office:value="0.068370013541914" calcext:value-type="float">
            <text:p>0.07</text:p>
          </table:table-cell>
          <table:table-cell table:formula="of:=[.I$4]*MAGNET([.$I$1]*[.$L15]+[.I$5]*PI()/180)+(RAND()-0.5)*[.$B$4]*[.$B$13]" office:value-type="float" office:value="0.072612179881654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4"/>
          <table:table-cell table:style-name="ce74"/>
          <table:table-cell table:number-columns-repeated="6"/>
          <table:table-cell table:formula="of:=[.L15]+0.002" office:value-type="float" office:value="0.024" calcext:value-type="float">
            <text:p>0.024</text:p>
          </table:table-cell>
          <table:table-cell table:formula="of:=[.B$4]*MAGNET([.$I$1]*[.$L16]+[.B$5]*PI()/180)+(RAND()-0.5)*[.$B$4]*[.$B$13]" office:value-type="float" office:value="0.0463161891425316" calcext:value-type="float">
            <text:p>0.05</text:p>
          </table:table-cell>
          <table:table-cell table:formula="of:=[.C$4]*MAGNET([.$I$1]*[.$L16]+[.C$5]*PI()/180)+(RAND()-0.5)*[.$B$4]*[.$B$13]" office:value-type="float" office:value="0.0498354034828023" calcext:value-type="float">
            <text:p>0.05</text:p>
          </table:table-cell>
          <table:table-cell table:formula="of:=[.D$4]*MAGNET([.$I$1]*[.$L16]+[.D$5]*PI()/180)+(RAND()-0.5)*[.$B$4]*[.$B$13]" office:value-type="float" office:value="0.0534178323218154" calcext:value-type="float">
            <text:p>0.05</text:p>
          </table:table-cell>
          <table:table-cell table:formula="of:=[.E$4]*MAGNET([.$I$1]*[.$L16]+[.E$5]*PI()/180)+(RAND()-0.5)*[.$B$4]*[.$B$13]" office:value-type="float" office:value="0.0577045901573714" calcext:value-type="float">
            <text:p>0.06</text:p>
          </table:table-cell>
          <table:table-cell table:formula="of:=[.F$4]*MAGNET([.$I$1]*[.$L16]+[.F$5]*PI()/180)+(RAND()-0.5)*[.$B$4]*[.$B$13]" office:value-type="float" office:value="0.0614240325503042" calcext:value-type="float">
            <text:p>0.06</text:p>
          </table:table-cell>
          <table:table-cell table:formula="of:=[.G$4]*MAGNET([.$I$1]*[.$L16]+[.G$5]*PI()/180)+(RAND()-0.5)*[.$B$4]*[.$B$13]" office:value-type="float" office:value="0.0663209029915535" calcext:value-type="float">
            <text:p>0.07</text:p>
          </table:table-cell>
          <table:table-cell table:formula="of:=[.H$4]*MAGNET([.$I$1]*[.$L16]+[.H$5]*PI()/180)+(RAND()-0.5)*[.$B$4]*[.$B$13]" office:value-type="float" office:value="0.0697247626259438" calcext:value-type="float">
            <text:p>0.07</text:p>
          </table:table-cell>
          <table:table-cell table:formula="of:=[.I$4]*MAGNET([.$I$1]*[.$L16]+[.I$5]*PI()/180)+(RAND()-0.5)*[.$B$4]*[.$B$13]" office:value-type="float" office:value="0.073671230916717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6]+0.002" office:value-type="float" office:value="0.026" calcext:value-type="float">
            <text:p>0.026</text:p>
          </table:table-cell>
          <table:table-cell table:formula="of:=[.B$4]*MAGNET([.$I$1]*[.$L17]+[.B$5]*PI()/180)+(RAND()-0.5)*[.$B$4]*[.$B$13]" office:value-type="float" office:value="0.0463269009815144" calcext:value-type="float">
            <text:p>0.05</text:p>
          </table:table-cell>
          <table:table-cell table:formula="of:=[.C$4]*MAGNET([.$I$1]*[.$L17]+[.C$5]*PI()/180)+(RAND()-0.5)*[.$B$4]*[.$B$13]" office:value-type="float" office:value="0.0494804321653588" calcext:value-type="float">
            <text:p>0.05</text:p>
          </table:table-cell>
          <table:table-cell table:formula="of:=[.D$4]*MAGNET([.$I$1]*[.$L17]+[.D$5]*PI()/180)+(RAND()-0.5)*[.$B$4]*[.$B$13]" office:value-type="float" office:value="0.0544736227949844" calcext:value-type="float">
            <text:p>0.05</text:p>
          </table:table-cell>
          <table:table-cell table:formula="of:=[.E$4]*MAGNET([.$I$1]*[.$L17]+[.E$5]*PI()/180)+(RAND()-0.5)*[.$B$4]*[.$B$13]" office:value-type="float" office:value="0.057886622290164" calcext:value-type="float">
            <text:p>0.06</text:p>
          </table:table-cell>
          <table:table-cell table:formula="of:=[.F$4]*MAGNET([.$I$1]*[.$L17]+[.F$5]*PI()/180)+(RAND()-0.5)*[.$B$4]*[.$B$13]" office:value-type="float" office:value="0.0614810263571698" calcext:value-type="float">
            <text:p>0.06</text:p>
          </table:table-cell>
          <table:table-cell table:formula="of:=[.G$4]*MAGNET([.$I$1]*[.$L17]+[.G$5]*PI()/180)+(RAND()-0.5)*[.$B$4]*[.$B$13]" office:value-type="float" office:value="0.0659707530699987" calcext:value-type="float">
            <text:p>0.07</text:p>
          </table:table-cell>
          <table:table-cell table:formula="of:=[.H$4]*MAGNET([.$I$1]*[.$L17]+[.H$5]*PI()/180)+(RAND()-0.5)*[.$B$4]*[.$B$13]" office:value-type="float" office:value="0.0696849959466029" calcext:value-type="float">
            <text:p>0.07</text:p>
          </table:table-cell>
          <table:table-cell table:formula="of:=[.I$4]*MAGNET([.$I$1]*[.$L17]+[.I$5]*PI()/180)+(RAND()-0.5)*[.$B$4]*[.$B$13]" office:value-type="float" office:value="0.0743269074600934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7]+0.002" office:value-type="float" office:value="0.028" calcext:value-type="float">
            <text:p>0.028</text:p>
          </table:table-cell>
          <table:table-cell table:formula="of:=[.B$4]*MAGNET([.$I$1]*[.$L18]+[.B$5]*PI()/180)+(RAND()-0.5)*[.$B$4]*[.$B$13]" office:value-type="float" office:value="0.0464460559589545" calcext:value-type="float">
            <text:p>0.05</text:p>
          </table:table-cell>
          <table:table-cell table:formula="of:=[.C$4]*MAGNET([.$I$1]*[.$L18]+[.C$5]*PI()/180)+(RAND()-0.5)*[.$B$4]*[.$B$13]" office:value-type="float" office:value="0.0498921803149919" calcext:value-type="float">
            <text:p>0.05</text:p>
          </table:table-cell>
          <table:table-cell table:formula="of:=[.D$4]*MAGNET([.$I$1]*[.$L18]+[.D$5]*PI()/180)+(RAND()-0.5)*[.$B$4]*[.$B$13]" office:value-type="float" office:value="0.0544615185616689" calcext:value-type="float">
            <text:p>0.05</text:p>
          </table:table-cell>
          <table:table-cell table:formula="of:=[.E$4]*MAGNET([.$I$1]*[.$L18]+[.E$5]*PI()/180)+(RAND()-0.5)*[.$B$4]*[.$B$13]" office:value-type="float" office:value="0.057623496983419" calcext:value-type="float">
            <text:p>0.06</text:p>
          </table:table-cell>
          <table:table-cell table:formula="of:=[.F$4]*MAGNET([.$I$1]*[.$L18]+[.F$5]*PI()/180)+(RAND()-0.5)*[.$B$4]*[.$B$13]" office:value-type="float" office:value="0.0625955723456788" calcext:value-type="float">
            <text:p>0.06</text:p>
          </table:table-cell>
          <table:table-cell table:formula="of:=[.G$4]*MAGNET([.$I$1]*[.$L18]+[.G$5]*PI()/180)+(RAND()-0.5)*[.$B$4]*[.$B$13]" office:value-type="float" office:value="0.0665790994181147" calcext:value-type="float">
            <text:p>0.07</text:p>
          </table:table-cell>
          <table:table-cell table:formula="of:=[.H$4]*MAGNET([.$I$1]*[.$L18]+[.H$5]*PI()/180)+(RAND()-0.5)*[.$B$4]*[.$B$13]" office:value-type="float" office:value="0.0702284272462354" calcext:value-type="float">
            <text:p>0.07</text:p>
          </table:table-cell>
          <table:table-cell table:formula="of:=[.I$4]*MAGNET([.$I$1]*[.$L18]+[.I$5]*PI()/180)+(RAND()-0.5)*[.$B$4]*[.$B$13]" office:value-type="float" office:value="0.0745304851676541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8]+0.002" office:value-type="float" office:value="0.03" calcext:value-type="float">
            <text:p>0.03</text:p>
          </table:table-cell>
          <table:table-cell table:formula="of:=[.B$4]*MAGNET([.$I$1]*[.$L19]+[.B$5]*PI()/180)+(RAND()-0.5)*[.$B$4]*[.$B$13]" office:value-type="float" office:value="0.045319058548141" calcext:value-type="float">
            <text:p>0.05</text:p>
          </table:table-cell>
          <table:table-cell table:formula="of:=[.C$4]*MAGNET([.$I$1]*[.$L19]+[.C$5]*PI()/180)+(RAND()-0.5)*[.$B$4]*[.$B$13]" office:value-type="float" office:value="0.0494641505452269" calcext:value-type="float">
            <text:p>0.05</text:p>
          </table:table-cell>
          <table:table-cell table:formula="of:=[.D$4]*MAGNET([.$I$1]*[.$L19]+[.D$5]*PI()/180)+(RAND()-0.5)*[.$B$4]*[.$B$13]" office:value-type="float" office:value="0.0542515021730251" calcext:value-type="float">
            <text:p>0.05</text:p>
          </table:table-cell>
          <table:table-cell table:formula="of:=[.E$4]*MAGNET([.$I$1]*[.$L19]+[.E$5]*PI()/180)+(RAND()-0.5)*[.$B$4]*[.$B$13]" office:value-type="float" office:value="0.0579134458678741" calcext:value-type="float">
            <text:p>0.06</text:p>
          </table:table-cell>
          <table:table-cell table:formula="of:=[.F$4]*MAGNET([.$I$1]*[.$L19]+[.F$5]*PI()/180)+(RAND()-0.5)*[.$B$4]*[.$B$13]" office:value-type="float" office:value="0.0625854586813856" calcext:value-type="float">
            <text:p>0.06</text:p>
          </table:table-cell>
          <table:table-cell table:formula="of:=[.G$4]*MAGNET([.$I$1]*[.$L19]+[.G$5]*PI()/180)+(RAND()-0.5)*[.$B$4]*[.$B$13]" office:value-type="float" office:value="0.0660898779410648" calcext:value-type="float">
            <text:p>0.07</text:p>
          </table:table-cell>
          <table:table-cell table:formula="of:=[.H$4]*MAGNET([.$I$1]*[.$L19]+[.H$5]*PI()/180)+(RAND()-0.5)*[.$B$4]*[.$B$13]" office:value-type="float" office:value="0.069870892227535" calcext:value-type="float">
            <text:p>0.07</text:p>
          </table:table-cell>
          <table:table-cell table:formula="of:=[.I$4]*MAGNET([.$I$1]*[.$L19]+[.I$5]*PI()/180)+(RAND()-0.5)*[.$B$4]*[.$B$13]" office:value-type="float" office:value="0.0740583978436805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9]+0.002" office:value-type="float" office:value="0.032" calcext:value-type="float">
            <text:p>0.032</text:p>
          </table:table-cell>
          <table:table-cell table:formula="of:=[.B$4]*MAGNET([.$I$1]*[.$L20]+[.B$5]*PI()/180)+(RAND()-0.5)*[.$B$4]*[.$B$13]" office:value-type="float" office:value="0.0462747079305835" calcext:value-type="float">
            <text:p>0.05</text:p>
          </table:table-cell>
          <table:table-cell table:formula="of:=[.C$4]*MAGNET([.$I$1]*[.$L20]+[.C$5]*PI()/180)+(RAND()-0.5)*[.$B$4]*[.$B$13]" office:value-type="float" office:value="0.0498142647340979" calcext:value-type="float">
            <text:p>0.05</text:p>
          </table:table-cell>
          <table:table-cell table:formula="of:=[.D$4]*MAGNET([.$I$1]*[.$L20]+[.D$5]*PI()/180)+(RAND()-0.5)*[.$B$4]*[.$B$13]" office:value-type="float" office:value="0.0542105624721112" calcext:value-type="float">
            <text:p>0.05</text:p>
          </table:table-cell>
          <table:table-cell table:formula="of:=[.E$4]*MAGNET([.$I$1]*[.$L20]+[.E$5]*PI()/180)+(RAND()-0.5)*[.$B$4]*[.$B$13]" office:value-type="float" office:value="0.0573143556251262" calcext:value-type="float">
            <text:p>0.06</text:p>
          </table:table-cell>
          <table:table-cell table:formula="of:=[.F$4]*MAGNET([.$I$1]*[.$L20]+[.F$5]*PI()/180)+(RAND()-0.5)*[.$B$4]*[.$B$13]" office:value-type="float" office:value="0.061547299507389" calcext:value-type="float">
            <text:p>0.06</text:p>
          </table:table-cell>
          <table:table-cell table:formula="of:=[.G$4]*MAGNET([.$I$1]*[.$L20]+[.G$5]*PI()/180)+(RAND()-0.5)*[.$B$4]*[.$B$13]" office:value-type="float" office:value="0.065757868183829" calcext:value-type="float">
            <text:p>0.07</text:p>
          </table:table-cell>
          <table:table-cell table:formula="of:=[.H$4]*MAGNET([.$I$1]*[.$L20]+[.H$5]*PI()/180)+(RAND()-0.5)*[.$B$4]*[.$B$13]" office:value-type="float" office:value="0.0694593860924194" calcext:value-type="float">
            <text:p>0.07</text:p>
          </table:table-cell>
          <table:table-cell table:formula="of:=[.I$4]*MAGNET([.$I$1]*[.$L20]+[.I$5]*PI()/180)+(RAND()-0.5)*[.$B$4]*[.$B$13]" office:value-type="float" office:value="0.073322975274022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0]+0.002" office:value-type="float" office:value="0.034" calcext:value-type="float">
            <text:p>0.034</text:p>
          </table:table-cell>
          <table:table-cell table:formula="of:=[.B$4]*MAGNET([.$I$1]*[.$L21]+[.B$5]*PI()/180)+(RAND()-0.5)*[.$B$4]*[.$B$13]" office:value-type="float" office:value="0.0460156289953225" calcext:value-type="float">
            <text:p>0.05</text:p>
          </table:table-cell>
          <table:table-cell table:formula="of:=[.C$4]*MAGNET([.$I$1]*[.$L21]+[.C$5]*PI()/180)+(RAND()-0.5)*[.$B$4]*[.$B$13]" office:value-type="float" office:value="0.0501645948292524" calcext:value-type="float">
            <text:p>0.05</text:p>
          </table:table-cell>
          <table:table-cell table:formula="of:=[.D$4]*MAGNET([.$I$1]*[.$L21]+[.D$5]*PI()/180)+(RAND()-0.5)*[.$B$4]*[.$B$13]" office:value-type="float" office:value="0.0541297192995013" calcext:value-type="float">
            <text:p>0.05</text:p>
          </table:table-cell>
          <table:table-cell table:formula="of:=[.E$4]*MAGNET([.$I$1]*[.$L21]+[.E$5]*PI()/180)+(RAND()-0.5)*[.$B$4]*[.$B$13]" office:value-type="float" office:value="0.057408712689889" calcext:value-type="float">
            <text:p>0.06</text:p>
          </table:table-cell>
          <table:table-cell table:formula="of:=[.F$4]*MAGNET([.$I$1]*[.$L21]+[.F$5]*PI()/180)+(RAND()-0.5)*[.$B$4]*[.$B$13]" office:value-type="float" office:value="0.0624083517958458" calcext:value-type="float">
            <text:p>0.06</text:p>
          </table:table-cell>
          <table:table-cell table:formula="of:=[.G$4]*MAGNET([.$I$1]*[.$L21]+[.G$5]*PI()/180)+(RAND()-0.5)*[.$B$4]*[.$B$13]" office:value-type="float" office:value="0.0663140311428727" calcext:value-type="float">
            <text:p>0.07</text:p>
          </table:table-cell>
          <table:table-cell table:formula="of:=[.H$4]*MAGNET([.$I$1]*[.$L21]+[.H$5]*PI()/180)+(RAND()-0.5)*[.$B$4]*[.$B$13]" office:value-type="float" office:value="0.0702108788560221" calcext:value-type="float">
            <text:p>0.07</text:p>
          </table:table-cell>
          <table:table-cell table:formula="of:=[.I$4]*MAGNET([.$I$1]*[.$L21]+[.I$5]*PI()/180)+(RAND()-0.5)*[.$B$4]*[.$B$13]" office:value-type="float" office:value="0.0734930109169414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1]+0.002" office:value-type="float" office:value="0.036" calcext:value-type="float">
            <text:p>0.036</text:p>
          </table:table-cell>
          <table:table-cell table:formula="of:=[.B$4]*MAGNET([.$I$1]*[.$L22]+[.B$5]*PI()/180)+(RAND()-0.5)*[.$B$4]*[.$B$13]" office:value-type="float" office:value="0.0454774794521838" calcext:value-type="float">
            <text:p>0.05</text:p>
          </table:table-cell>
          <table:table-cell table:formula="of:=[.C$4]*MAGNET([.$I$1]*[.$L22]+[.C$5]*PI()/180)+(RAND()-0.5)*[.$B$4]*[.$B$13]" office:value-type="float" office:value="0.050494939922125" calcext:value-type="float">
            <text:p>0.05</text:p>
          </table:table-cell>
          <table:table-cell table:formula="of:=[.D$4]*MAGNET([.$I$1]*[.$L22]+[.D$5]*PI()/180)+(RAND()-0.5)*[.$B$4]*[.$B$13]" office:value-type="float" office:value="0.0541346958367958" calcext:value-type="float">
            <text:p>0.05</text:p>
          </table:table-cell>
          <table:table-cell table:formula="of:=[.E$4]*MAGNET([.$I$1]*[.$L22]+[.E$5]*PI()/180)+(RAND()-0.5)*[.$B$4]*[.$B$13]" office:value-type="float" office:value="0.0575598607876123" calcext:value-type="float">
            <text:p>0.06</text:p>
          </table:table-cell>
          <table:table-cell table:formula="of:=[.F$4]*MAGNET([.$I$1]*[.$L22]+[.F$5]*PI()/180)+(RAND()-0.5)*[.$B$4]*[.$B$13]" office:value-type="float" office:value="0.0621967106426314" calcext:value-type="float">
            <text:p>0.06</text:p>
          </table:table-cell>
          <table:table-cell table:formula="of:=[.G$4]*MAGNET([.$I$1]*[.$L22]+[.G$5]*PI()/180)+(RAND()-0.5)*[.$B$4]*[.$B$13]" office:value-type="float" office:value="0.0661312446888649" calcext:value-type="float">
            <text:p>0.07</text:p>
          </table:table-cell>
          <table:table-cell table:formula="of:=[.H$4]*MAGNET([.$I$1]*[.$L22]+[.H$5]*PI()/180)+(RAND()-0.5)*[.$B$4]*[.$B$13]" office:value-type="float" office:value="0.0706328177445352" calcext:value-type="float">
            <text:p>0.07</text:p>
          </table:table-cell>
          <table:table-cell table:formula="of:=[.I$4]*MAGNET([.$I$1]*[.$L22]+[.I$5]*PI()/180)+(RAND()-0.5)*[.$B$4]*[.$B$13]" office:value-type="float" office:value="0.0743837304516282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2]+0.002" office:value-type="float" office:value="0.038" calcext:value-type="float">
            <text:p>0.038</text:p>
          </table:table-cell>
          <table:table-cell table:formula="of:=[.B$4]*MAGNET([.$I$1]*[.$L23]+[.B$5]*PI()/180)+(RAND()-0.5)*[.$B$4]*[.$B$13]" office:value-type="float" office:value="0.0451583156421517" calcext:value-type="float">
            <text:p>0.05</text:p>
          </table:table-cell>
          <table:table-cell table:formula="of:=[.C$4]*MAGNET([.$I$1]*[.$L23]+[.C$5]*PI()/180)+(RAND()-0.5)*[.$B$4]*[.$B$13]" office:value-type="float" office:value="0.0493572791736757" calcext:value-type="float">
            <text:p>0.05</text:p>
          </table:table-cell>
          <table:table-cell table:formula="of:=[.D$4]*MAGNET([.$I$1]*[.$L23]+[.D$5]*PI()/180)+(RAND()-0.5)*[.$B$4]*[.$B$13]" office:value-type="float" office:value="0.0540930474525676" calcext:value-type="float">
            <text:p>0.05</text:p>
          </table:table-cell>
          <table:table-cell table:formula="of:=[.E$4]*MAGNET([.$I$1]*[.$L23]+[.E$5]*PI()/180)+(RAND()-0.5)*[.$B$4]*[.$B$13]" office:value-type="float" office:value="0.056849998822283" calcext:value-type="float">
            <text:p>0.06</text:p>
          </table:table-cell>
          <table:table-cell table:formula="of:=[.F$4]*MAGNET([.$I$1]*[.$L23]+[.F$5]*PI()/180)+(RAND()-0.5)*[.$B$4]*[.$B$13]" office:value-type="float" office:value="0.0612850285424827" calcext:value-type="float">
            <text:p>0.06</text:p>
          </table:table-cell>
          <table:table-cell table:formula="of:=[.G$4]*MAGNET([.$I$1]*[.$L23]+[.G$5]*PI()/180)+(RAND()-0.5)*[.$B$4]*[.$B$13]" office:value-type="float" office:value="0.066276957949704" calcext:value-type="float">
            <text:p>0.07</text:p>
          </table:table-cell>
          <table:table-cell table:formula="of:=[.H$4]*MAGNET([.$I$1]*[.$L23]+[.H$5]*PI()/180)+(RAND()-0.5)*[.$B$4]*[.$B$13]" office:value-type="float" office:value="0.0698724347088765" calcext:value-type="float">
            <text:p>0.07</text:p>
          </table:table-cell>
          <table:table-cell table:formula="of:=[.I$4]*MAGNET([.$I$1]*[.$L23]+[.I$5]*PI()/180)+(RAND()-0.5)*[.$B$4]*[.$B$13]" office:value-type="float" office:value="0.0741698517842075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3]+0.002" office:value-type="float" office:value="0.04" calcext:value-type="float">
            <text:p>0.04</text:p>
          </table:table-cell>
          <table:table-cell table:formula="of:=[.B$4]*MAGNET([.$I$1]*[.$L24]+[.B$5]*PI()/180)+(RAND()-0.5)*[.$B$4]*[.$B$13]" office:value-type="float" office:value="0.0447295526142992" calcext:value-type="float">
            <text:p>0.04</text:p>
          </table:table-cell>
          <table:table-cell table:formula="of:=[.C$4]*MAGNET([.$I$1]*[.$L24]+[.C$5]*PI()/180)+(RAND()-0.5)*[.$B$4]*[.$B$13]" office:value-type="float" office:value="0.0489595445146038" calcext:value-type="float">
            <text:p>0.05</text:p>
          </table:table-cell>
          <table:table-cell table:formula="of:=[.D$4]*MAGNET([.$I$1]*[.$L24]+[.D$5]*PI()/180)+(RAND()-0.5)*[.$B$4]*[.$B$13]" office:value-type="float" office:value="0.0532547033239436" calcext:value-type="float">
            <text:p>0.05</text:p>
          </table:table-cell>
          <table:table-cell table:formula="of:=[.E$4]*MAGNET([.$I$1]*[.$L24]+[.E$5]*PI()/180)+(RAND()-0.5)*[.$B$4]*[.$B$13]" office:value-type="float" office:value="0.0570346552454268" calcext:value-type="float">
            <text:p>0.06</text:p>
          </table:table-cell>
          <table:table-cell table:formula="of:=[.F$4]*MAGNET([.$I$1]*[.$L24]+[.F$5]*PI()/180)+(RAND()-0.5)*[.$B$4]*[.$B$13]" office:value-type="float" office:value="0.0615747002873106" calcext:value-type="float">
            <text:p>0.06</text:p>
          </table:table-cell>
          <table:table-cell table:formula="of:=[.G$4]*MAGNET([.$I$1]*[.$L24]+[.G$5]*PI()/180)+(RAND()-0.5)*[.$B$4]*[.$B$13]" office:value-type="float" office:value="0.0647422373305384" calcext:value-type="float">
            <text:p>0.06</text:p>
          </table:table-cell>
          <table:table-cell table:formula="of:=[.H$4]*MAGNET([.$I$1]*[.$L24]+[.H$5]*PI()/180)+(RAND()-0.5)*[.$B$4]*[.$B$13]" office:value-type="float" office:value="0.0694569691740708" calcext:value-type="float">
            <text:p>0.07</text:p>
          </table:table-cell>
          <table:table-cell table:formula="of:=[.I$4]*MAGNET([.$I$1]*[.$L24]+[.I$5]*PI()/180)+(RAND()-0.5)*[.$B$4]*[.$B$13]" office:value-type="float" office:value="0.0733397734834502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4]+0.002" office:value-type="float" office:value="0.042" calcext:value-type="float">
            <text:p>0.042</text:p>
          </table:table-cell>
          <table:table-cell table:formula="of:=[.B$4]*MAGNET([.$I$1]*[.$L25]+[.B$5]*PI()/180)+(RAND()-0.5)*[.$B$4]*[.$B$13]" office:value-type="float" office:value="0.0438501026313932" calcext:value-type="float">
            <text:p>0.04</text:p>
          </table:table-cell>
          <table:table-cell table:formula="of:=[.C$4]*MAGNET([.$I$1]*[.$L25]+[.C$5]*PI()/180)+(RAND()-0.5)*[.$B$4]*[.$B$13]" office:value-type="float" office:value="0.0486145023383835" calcext:value-type="float">
            <text:p>0.05</text:p>
          </table:table-cell>
          <table:table-cell table:formula="of:=[.D$4]*MAGNET([.$I$1]*[.$L25]+[.D$5]*PI()/180)+(RAND()-0.5)*[.$B$4]*[.$B$13]" office:value-type="float" office:value="0.0521023921408713" calcext:value-type="float">
            <text:p>0.05</text:p>
          </table:table-cell>
          <table:table-cell table:formula="of:=[.E$4]*MAGNET([.$I$1]*[.$L25]+[.E$5]*PI()/180)+(RAND()-0.5)*[.$B$4]*[.$B$13]" office:value-type="float" office:value="0.0554195113872085" calcext:value-type="float">
            <text:p>0.06</text:p>
          </table:table-cell>
          <table:table-cell table:formula="of:=[.F$4]*MAGNET([.$I$1]*[.$L25]+[.F$5]*PI()/180)+(RAND()-0.5)*[.$B$4]*[.$B$13]" office:value-type="float" office:value="0.0595281510694737" calcext:value-type="float">
            <text:p>0.06</text:p>
          </table:table-cell>
          <table:table-cell table:formula="of:=[.G$4]*MAGNET([.$I$1]*[.$L25]+[.G$5]*PI()/180)+(RAND()-0.5)*[.$B$4]*[.$B$13]" office:value-type="float" office:value="0.0639267462552391" calcext:value-type="float">
            <text:p>0.06</text:p>
          </table:table-cell>
          <table:table-cell table:formula="of:=[.H$4]*MAGNET([.$I$1]*[.$L25]+[.H$5]*PI()/180)+(RAND()-0.5)*[.$B$4]*[.$B$13]" office:value-type="float" office:value="0.0679296239282788" calcext:value-type="float">
            <text:p>0.07</text:p>
          </table:table-cell>
          <table:table-cell table:formula="of:=[.I$4]*MAGNET([.$I$1]*[.$L25]+[.I$5]*PI()/180)+(RAND()-0.5)*[.$B$4]*[.$B$13]" office:value-type="float" office:value="0.0716130003061171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5]+0.002" office:value-type="float" office:value="0.044" calcext:value-type="float">
            <text:p>0.044</text:p>
          </table:table-cell>
          <table:table-cell table:formula="of:=[.B$4]*MAGNET([.$I$1]*[.$L26]+[.B$5]*PI()/180)+(RAND()-0.5)*[.$B$4]*[.$B$13]" office:value-type="float" office:value="0.0435029959332276" calcext:value-type="float">
            <text:p>0.04</text:p>
          </table:table-cell>
          <table:table-cell table:formula="of:=[.C$4]*MAGNET([.$I$1]*[.$L26]+[.C$5]*PI()/180)+(RAND()-0.5)*[.$B$4]*[.$B$13]" office:value-type="float" office:value="0.0463763088631311" calcext:value-type="float">
            <text:p>0.05</text:p>
          </table:table-cell>
          <table:table-cell table:formula="of:=[.D$4]*MAGNET([.$I$1]*[.$L26]+[.D$5]*PI()/180)+(RAND()-0.5)*[.$B$4]*[.$B$13]" office:value-type="float" office:value="0.0510865618662602" calcext:value-type="float">
            <text:p>0.05</text:p>
          </table:table-cell>
          <table:table-cell table:formula="of:=[.E$4]*MAGNET([.$I$1]*[.$L26]+[.E$5]*PI()/180)+(RAND()-0.5)*[.$B$4]*[.$B$13]" office:value-type="float" office:value="0.0521253041656438" calcext:value-type="float">
            <text:p>0.05</text:p>
          </table:table-cell>
          <table:table-cell table:formula="of:=[.F$4]*MAGNET([.$I$1]*[.$L26]+[.F$5]*PI()/180)+(RAND()-0.5)*[.$B$4]*[.$B$13]" office:value-type="float" office:value="0.0580384836801826" calcext:value-type="float">
            <text:p>0.06</text:p>
          </table:table-cell>
          <table:table-cell table:formula="of:=[.G$4]*MAGNET([.$I$1]*[.$L26]+[.G$5]*PI()/180)+(RAND()-0.5)*[.$B$4]*[.$B$13]" office:value-type="float" office:value="0.0621059051636174" calcext:value-type="float">
            <text:p>0.06</text:p>
          </table:table-cell>
          <table:table-cell table:formula="of:=[.H$4]*MAGNET([.$I$1]*[.$L26]+[.H$5]*PI()/180)+(RAND()-0.5)*[.$B$4]*[.$B$13]" office:value-type="float" office:value="0.0655225863789452" calcext:value-type="float">
            <text:p>0.07</text:p>
          </table:table-cell>
          <table:table-cell table:formula="of:=[.I$4]*MAGNET([.$I$1]*[.$L26]+[.I$5]*PI()/180)+(RAND()-0.5)*[.$B$4]*[.$B$13]" office:value-type="float" office:value="0.069467151079935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6]+0.002" office:value-type="float" office:value="0.046" calcext:value-type="float">
            <text:p>0.046</text:p>
          </table:table-cell>
          <table:table-cell table:formula="of:=[.B$4]*MAGNET([.$I$1]*[.$L27]+[.B$5]*PI()/180)+(RAND()-0.5)*[.$B$4]*[.$B$13]" office:value-type="float" office:value="0.040745058249726" calcext:value-type="float">
            <text:p>0.04</text:p>
          </table:table-cell>
          <table:table-cell table:formula="of:=[.C$4]*MAGNET([.$I$1]*[.$L27]+[.C$5]*PI()/180)+(RAND()-0.5)*[.$B$4]*[.$B$13]" office:value-type="float" office:value="0.0442198968200951" calcext:value-type="float">
            <text:p>0.04</text:p>
          </table:table-cell>
          <table:table-cell table:formula="of:=[.D$4]*MAGNET([.$I$1]*[.$L27]+[.D$5]*PI()/180)+(RAND()-0.5)*[.$B$4]*[.$B$13]" office:value-type="float" office:value="0.0474913359028232" calcext:value-type="float">
            <text:p>0.05</text:p>
          </table:table-cell>
          <table:table-cell table:formula="of:=[.E$4]*MAGNET([.$I$1]*[.$L27]+[.E$5]*PI()/180)+(RAND()-0.5)*[.$B$4]*[.$B$13]" office:value-type="float" office:value="0.0490007752450729" calcext:value-type="float">
            <text:p>0.05</text:p>
          </table:table-cell>
          <table:table-cell table:formula="of:=[.F$4]*MAGNET([.$I$1]*[.$L27]+[.F$5]*PI()/180)+(RAND()-0.5)*[.$B$4]*[.$B$13]" office:value-type="float" office:value="0.0545501803368215" calcext:value-type="float">
            <text:p>0.05</text:p>
          </table:table-cell>
          <table:table-cell table:formula="of:=[.G$4]*MAGNET([.$I$1]*[.$L27]+[.G$5]*PI()/180)+(RAND()-0.5)*[.$B$4]*[.$B$13]" office:value-type="float" office:value="0.0583245824541852" calcext:value-type="float">
            <text:p>0.06</text:p>
          </table:table-cell>
          <table:table-cell table:formula="of:=[.H$4]*MAGNET([.$I$1]*[.$L27]+[.H$5]*PI()/180)+(RAND()-0.5)*[.$B$4]*[.$B$13]" office:value-type="float" office:value="0.0620813430986628" calcext:value-type="float">
            <text:p>0.06</text:p>
          </table:table-cell>
          <table:table-cell table:formula="of:=[.I$4]*MAGNET([.$I$1]*[.$L27]+[.I$5]*PI()/180)+(RAND()-0.5)*[.$B$4]*[.$B$13]" office:value-type="float" office:value="0.0651473263716363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7]+0.002" office:value-type="float" office:value="0.048" calcext:value-type="float">
            <text:p>0.048</text:p>
          </table:table-cell>
          <table:table-cell table:formula="of:=[.B$4]*MAGNET([.$I$1]*[.$L28]+[.B$5]*PI()/180)+(RAND()-0.5)*[.$B$4]*[.$B$13]" office:value-type="float" office:value="0.0371397734138802" calcext:value-type="float">
            <text:p>0.04</text:p>
          </table:table-cell>
          <table:table-cell table:formula="of:=[.C$4]*MAGNET([.$I$1]*[.$L28]+[.C$5]*PI()/180)+(RAND()-0.5)*[.$B$4]*[.$B$13]" office:value-type="float" office:value="0.0406368585680752" calcext:value-type="float">
            <text:p>0.04</text:p>
          </table:table-cell>
          <table:table-cell table:formula="of:=[.D$4]*MAGNET([.$I$1]*[.$L28]+[.D$5]*PI()/180)+(RAND()-0.5)*[.$B$4]*[.$B$13]" office:value-type="float" office:value="0.0444753699202055" calcext:value-type="float">
            <text:p>0.04</text:p>
          </table:table-cell>
          <table:table-cell table:formula="of:=[.E$4]*MAGNET([.$I$1]*[.$L28]+[.E$5]*PI()/180)+(RAND()-0.5)*[.$B$4]*[.$B$13]" office:value-type="float" office:value="0.043716040500712" calcext:value-type="float">
            <text:p>0.04</text:p>
          </table:table-cell>
          <table:table-cell table:formula="of:=[.F$4]*MAGNET([.$I$1]*[.$L28]+[.F$5]*PI()/180)+(RAND()-0.5)*[.$B$4]*[.$B$13]" office:value-type="float" office:value="0.0503190912086616" calcext:value-type="float">
            <text:p>0.05</text:p>
          </table:table-cell>
          <table:table-cell table:formula="of:=[.G$4]*MAGNET([.$I$1]*[.$L28]+[.G$5]*PI()/180)+(RAND()-0.5)*[.$B$4]*[.$B$13]" office:value-type="float" office:value="0.0536239594180798" calcext:value-type="float">
            <text:p>0.05</text:p>
          </table:table-cell>
          <table:table-cell table:formula="of:=[.H$4]*MAGNET([.$I$1]*[.$L28]+[.H$5]*PI()/180)+(RAND()-0.5)*[.$B$4]*[.$B$13]" office:value-type="float" office:value="0.0573198346909403" calcext:value-type="float">
            <text:p>0.06</text:p>
          </table:table-cell>
          <table:table-cell table:formula="of:=[.I$4]*MAGNET([.$I$1]*[.$L28]+[.I$5]*PI()/180)+(RAND()-0.5)*[.$B$4]*[.$B$13]" office:value-type="float" office:value="0.0608174242298431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28]+0.002" office:value-type="float" office:value="0.05" calcext:value-type="float">
            <text:p>0.05</text:p>
          </table:table-cell>
          <table:table-cell table:formula="of:=[.B$4]*MAGNET([.$I$1]*[.$L29]+[.B$5]*PI()/180)+(RAND()-0.5)*[.$B$4]*[.$B$13]" office:value-type="float" office:value="0.0339320421825621" calcext:value-type="float">
            <text:p>0.03</text:p>
          </table:table-cell>
          <table:table-cell table:formula="of:=[.C$4]*MAGNET([.$I$1]*[.$L29]+[.C$5]*PI()/180)+(RAND()-0.5)*[.$B$4]*[.$B$13]" office:value-type="float" office:value="0.0357165460688675" calcext:value-type="float">
            <text:p>0.04</text:p>
          </table:table-cell>
          <table:table-cell table:formula="of:=[.D$4]*MAGNET([.$I$1]*[.$L29]+[.D$5]*PI()/180)+(RAND()-0.5)*[.$B$4]*[.$B$13]" office:value-type="float" office:value="0.0389991651832365" calcext:value-type="float">
            <text:p>0.04</text:p>
          </table:table-cell>
          <table:table-cell table:formula="of:=[.E$4]*MAGNET([.$I$1]*[.$L29]+[.E$5]*PI()/180)+(RAND()-0.5)*[.$B$4]*[.$B$13]" office:value-type="float" office:value="0.0385536059592595" calcext:value-type="float">
            <text:p>0.04</text:p>
          </table:table-cell>
          <table:table-cell table:formula="of:=[.F$4]*MAGNET([.$I$1]*[.$L29]+[.F$5]*PI()/180)+(RAND()-0.5)*[.$B$4]*[.$B$13]" office:value-type="float" office:value="0.0455951333590051" calcext:value-type="float">
            <text:p>0.05</text:p>
          </table:table-cell>
          <table:table-cell table:formula="of:=[.G$4]*MAGNET([.$I$1]*[.$L29]+[.G$5]*PI()/180)+(RAND()-0.5)*[.$B$4]*[.$B$13]" office:value-type="float" office:value="0.0484298475617212" calcext:value-type="float">
            <text:p>0.05</text:p>
          </table:table-cell>
          <table:table-cell table:formula="of:=[.H$4]*MAGNET([.$I$1]*[.$L29]+[.H$5]*PI()/180)+(RAND()-0.5)*[.$B$4]*[.$B$13]" office:value-type="float" office:value="0.0508721364748453" calcext:value-type="float">
            <text:p>0.05</text:p>
          </table:table-cell>
          <table:table-cell table:formula="of:=[.I$4]*MAGNET([.$I$1]*[.$L29]+[.I$5]*PI()/180)+(RAND()-0.5)*[.$B$4]*[.$B$13]" office:value-type="float" office:value="0.0535340357096943" calcext:value-type="float">
            <text:p>0.05</text:p>
          </table:table-cell>
          <table:table-cell table:style-name="Default"/>
          <table:table-cell table:style-name="Default">
            <draw:frame table:end-cell-address="plot.AL56" table:end-x="0.5622in" table:end-y="0.0205in" draw:z-index="1" draw:name="Chart 3" draw:style-name="gr1" draw:text-style-name="P1" svg:width="11.1736in" svg:height="5.4472in" svg:x="0.0886in" svg:y="0.198in">
              <draw:object draw:notify-on-update-of-ranges="plot.M4:plot.M104 plot.L4:plot.L104 plot.N4:plot.N104 plot.L4:plot.L104 plot.O4:plot.O104 plot.L4:plot.L10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16362"/>
        </table:table-row>
        <table:table-row table:style-name="ro1">
          <table:table-cell table:number-columns-repeated="11"/>
          <table:table-cell table:formula="of:=[.L29]+0.002" office:value-type="float" office:value="0.052" calcext:value-type="float">
            <text:p>0.052</text:p>
          </table:table-cell>
          <table:table-cell table:formula="of:=[.B$4]*MAGNET([.$I$1]*[.$L30]+[.B$5]*PI()/180)+(RAND()-0.5)*[.$B$4]*[.$B$13]" office:value-type="float" office:value="0.0290722511591336" calcext:value-type="float">
            <text:p>0.03</text:p>
          </table:table-cell>
          <table:table-cell table:formula="of:=[.C$4]*MAGNET([.$I$1]*[.$L30]+[.C$5]*PI()/180)+(RAND()-0.5)*[.$B$4]*[.$B$13]" office:value-type="float" office:value="0.0305929769549279" calcext:value-type="float">
            <text:p>0.03</text:p>
          </table:table-cell>
          <table:table-cell table:formula="of:=[.D$4]*MAGNET([.$I$1]*[.$L30]+[.D$5]*PI()/180)+(RAND()-0.5)*[.$B$4]*[.$B$13]" office:value-type="float" office:value="0.033015514433586" calcext:value-type="float">
            <text:p>0.03</text:p>
          </table:table-cell>
          <table:table-cell table:formula="of:=[.E$4]*MAGNET([.$I$1]*[.$L30]+[.E$5]*PI()/180)+(RAND()-0.5)*[.$B$4]*[.$B$13]" office:value-type="float" office:value="0.0308746402023997" calcext:value-type="float">
            <text:p>0.03</text:p>
          </table:table-cell>
          <table:table-cell table:formula="of:=[.F$4]*MAGNET([.$I$1]*[.$L30]+[.F$5]*PI()/180)+(RAND()-0.5)*[.$B$4]*[.$B$13]" office:value-type="float" office:value="0.0390661989876643" calcext:value-type="float">
            <text:p>0.04</text:p>
          </table:table-cell>
          <table:table-cell table:formula="of:=[.G$4]*MAGNET([.$I$1]*[.$L30]+[.G$5]*PI()/180)+(RAND()-0.5)*[.$B$4]*[.$B$13]" office:value-type="float" office:value="0.0411892703745377" calcext:value-type="float">
            <text:p>0.04</text:p>
          </table:table-cell>
          <table:table-cell table:formula="of:=[.H$4]*MAGNET([.$I$1]*[.$L30]+[.H$5]*PI()/180)+(RAND()-0.5)*[.$B$4]*[.$B$13]" office:value-type="float" office:value="0.0439764997926819" calcext:value-type="float">
            <text:p>0.04</text:p>
          </table:table-cell>
          <table:table-cell table:formula="of:=[.I$4]*MAGNET([.$I$1]*[.$L30]+[.I$5]*PI()/180)+(RAND()-0.5)*[.$B$4]*[.$B$13]" office:value-type="float" office:value="0.0462845711009242" calcext:value-type="float">
            <text:p>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0]+0.002" office:value-type="float" office:value="0.054" calcext:value-type="float">
            <text:p>0.054</text:p>
          </table:table-cell>
          <table:table-cell table:formula="of:=[.B$4]*MAGNET([.$I$1]*[.$L31]+[.B$5]*PI()/180)+(RAND()-0.5)*[.$B$4]*[.$B$13]" office:value-type="float" office:value="0.023389486201736" calcext:value-type="float">
            <text:p>0.02</text:p>
          </table:table-cell>
          <table:table-cell table:formula="of:=[.C$4]*MAGNET([.$I$1]*[.$L31]+[.C$5]*PI()/180)+(RAND()-0.5)*[.$B$4]*[.$B$13]" office:value-type="float" office:value="0.0256590118021491" calcext:value-type="float">
            <text:p>0.03</text:p>
          </table:table-cell>
          <table:table-cell table:formula="of:=[.D$4]*MAGNET([.$I$1]*[.$L31]+[.D$5]*PI()/180)+(RAND()-0.5)*[.$B$4]*[.$B$13]" office:value-type="float" office:value="0.0267907180888873" calcext:value-type="float">
            <text:p>0.03</text:p>
          </table:table-cell>
          <table:table-cell table:formula="of:=[.E$4]*MAGNET([.$I$1]*[.$L31]+[.E$5]*PI()/180)+(RAND()-0.5)*[.$B$4]*[.$B$13]" office:value-type="float" office:value="0.024570597023696" calcext:value-type="float">
            <text:p>0.02</text:p>
          </table:table-cell>
          <table:table-cell table:formula="of:=[.F$4]*MAGNET([.$I$1]*[.$L31]+[.F$5]*PI()/180)+(RAND()-0.5)*[.$B$4]*[.$B$13]" office:value-type="float" office:value="0.0312394066402277" calcext:value-type="float">
            <text:p>0.03</text:p>
          </table:table-cell>
          <table:table-cell table:formula="of:=[.G$4]*MAGNET([.$I$1]*[.$L31]+[.G$5]*PI()/180)+(RAND()-0.5)*[.$B$4]*[.$B$13]" office:value-type="float" office:value="0.0330031637496098" calcext:value-type="float">
            <text:p>0.03</text:p>
          </table:table-cell>
          <table:table-cell table:formula="of:=[.H$4]*MAGNET([.$I$1]*[.$L31]+[.H$5]*PI()/180)+(RAND()-0.5)*[.$B$4]*[.$B$13]" office:value-type="float" office:value="0.0347751553591901" calcext:value-type="float">
            <text:p>0.03</text:p>
          </table:table-cell>
          <table:table-cell table:formula="of:=[.I$4]*MAGNET([.$I$1]*[.$L31]+[.I$5]*PI()/180)+(RAND()-0.5)*[.$B$4]*[.$B$13]" office:value-type="float" office:value="0.0377755252084319" calcext:value-type="float">
            <text:p>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1]+0.002" office:value-type="float" office:value="0.056" calcext:value-type="float">
            <text:p>0.056</text:p>
          </table:table-cell>
          <table:table-cell table:formula="of:=[.B$4]*MAGNET([.$I$1]*[.$L32]+[.B$5]*PI()/180)+(RAND()-0.5)*[.$B$4]*[.$B$13]" office:value-type="float" office:value="0.0176181507080945" calcext:value-type="float">
            <text:p>0.02</text:p>
          </table:table-cell>
          <table:table-cell table:formula="of:=[.C$4]*MAGNET([.$I$1]*[.$L32]+[.C$5]*PI()/180)+(RAND()-0.5)*[.$B$4]*[.$B$13]" office:value-type="float" office:value="0.0186149478421924" calcext:value-type="float">
            <text:p>0.02</text:p>
          </table:table-cell>
          <table:table-cell table:formula="of:=[.D$4]*MAGNET([.$I$1]*[.$L32]+[.D$5]*PI()/180)+(RAND()-0.5)*[.$B$4]*[.$B$13]" office:value-type="float" office:value="0.0202762465261356" calcext:value-type="float">
            <text:p>0.02</text:p>
          </table:table-cell>
          <table:table-cell table:formula="of:=[.E$4]*MAGNET([.$I$1]*[.$L32]+[.E$5]*PI()/180)+(RAND()-0.5)*[.$B$4]*[.$B$13]" office:value-type="float" office:value="0.0166565420118915" calcext:value-type="float">
            <text:p>0.02</text:p>
          </table:table-cell>
          <table:table-cell table:formula="of:=[.F$4]*MAGNET([.$I$1]*[.$L32]+[.F$5]*PI()/180)+(RAND()-0.5)*[.$B$4]*[.$B$13]" office:value-type="float" office:value="0.0232249865727415" calcext:value-type="float">
            <text:p>0.02</text:p>
          </table:table-cell>
          <table:table-cell table:formula="of:=[.G$4]*MAGNET([.$I$1]*[.$L32]+[.G$5]*PI()/180)+(RAND()-0.5)*[.$B$4]*[.$B$13]" office:value-type="float" office:value="0.0249495755334492" calcext:value-type="float">
            <text:p>0.02</text:p>
          </table:table-cell>
          <table:table-cell table:formula="of:=[.H$4]*MAGNET([.$I$1]*[.$L32]+[.H$5]*PI()/180)+(RAND()-0.5)*[.$B$4]*[.$B$13]" office:value-type="float" office:value="0.0262944116649225" calcext:value-type="float">
            <text:p>0.03</text:p>
          </table:table-cell>
          <table:table-cell table:formula="of:=[.I$4]*MAGNET([.$I$1]*[.$L32]+[.I$5]*PI()/180)+(RAND()-0.5)*[.$B$4]*[.$B$13]" office:value-type="float" office:value="0.0278744401488833" calcext:value-type="float">
            <text:p>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2]+0.002" office:value-type="float" office:value="0.058" calcext:value-type="float">
            <text:p>0.058</text:p>
          </table:table-cell>
          <table:table-cell table:formula="of:=[.B$4]*MAGNET([.$I$1]*[.$L33]+[.B$5]*PI()/180)+(RAND()-0.5)*[.$B$4]*[.$B$13]" office:value-type="float" office:value="0.0112878288381809" calcext:value-type="float">
            <text:p>0.01</text:p>
          </table:table-cell>
          <table:table-cell table:formula="of:=[.C$4]*MAGNET([.$I$1]*[.$L33]+[.C$5]*PI()/180)+(RAND()-0.5)*[.$B$4]*[.$B$13]" office:value-type="float" office:value="0.013141280234735" calcext:value-type="float">
            <text:p>0.01</text:p>
          </table:table-cell>
          <table:table-cell table:formula="of:=[.D$4]*MAGNET([.$I$1]*[.$L33]+[.D$5]*PI()/180)+(RAND()-0.5)*[.$B$4]*[.$B$13]" office:value-type="float" office:value="0.0128611217543455" calcext:value-type="float">
            <text:p>0.01</text:p>
          </table:table-cell>
          <table:table-cell table:formula="of:=[.E$4]*MAGNET([.$I$1]*[.$L33]+[.E$5]*PI()/180)+(RAND()-0.5)*[.$B$4]*[.$B$13]" office:value-type="float" office:value="0.00994889916598716" calcext:value-type="float">
            <text:p>0.01</text:p>
          </table:table-cell>
          <table:table-cell table:formula="of:=[.F$4]*MAGNET([.$I$1]*[.$L33]+[.F$5]*PI()/180)+(RAND()-0.5)*[.$B$4]*[.$B$13]" office:value-type="float" office:value="0.0157405485961328" calcext:value-type="float">
            <text:p>0.02</text:p>
          </table:table-cell>
          <table:table-cell table:formula="of:=[.G$4]*MAGNET([.$I$1]*[.$L33]+[.G$5]*PI()/180)+(RAND()-0.5)*[.$B$4]*[.$B$13]" office:value-type="float" office:value="0.016492724015064" calcext:value-type="float">
            <text:p>0.02</text:p>
          </table:table-cell>
          <table:table-cell table:formula="of:=[.H$4]*MAGNET([.$I$1]*[.$L33]+[.H$5]*PI()/180)+(RAND()-0.5)*[.$B$4]*[.$B$13]" office:value-type="float" office:value="0.0172220809989295" calcext:value-type="float">
            <text:p>0.02</text:p>
          </table:table-cell>
          <table:table-cell table:formula="of:=[.I$4]*MAGNET([.$I$1]*[.$L33]+[.I$5]*PI()/180)+(RAND()-0.5)*[.$B$4]*[.$B$13]" office:value-type="float" office:value="0.0187408348419746" calcext:value-type="float">
            <text:p>0.02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3]+0.002" office:value-type="float" office:value="0.06" calcext:value-type="float">
            <text:p>0.06</text:p>
          </table:table-cell>
          <table:table-cell table:formula="of:=[.B$4]*MAGNET([.$I$1]*[.$L34]+[.B$5]*PI()/180)+(RAND()-0.5)*[.$B$4]*[.$B$13]" office:value-type="float" office:value="0.00558342411467477" calcext:value-type="float">
            <text:p>0.01</text:p>
          </table:table-cell>
          <table:table-cell table:formula="of:=[.C$4]*MAGNET([.$I$1]*[.$L34]+[.C$5]*PI()/180)+(RAND()-0.5)*[.$B$4]*[.$B$13]" office:value-type="float" office:value="0.00631904429841319" calcext:value-type="float">
            <text:p>0.01</text:p>
          </table:table-cell>
          <table:table-cell table:formula="of:=[.D$4]*MAGNET([.$I$1]*[.$L34]+[.D$5]*PI()/180)+(RAND()-0.5)*[.$B$4]*[.$B$13]" office:value-type="float" office:value="0.00664179621382329" calcext:value-type="float">
            <text:p>0.01</text:p>
          </table:table-cell>
          <table:table-cell table:formula="of:=[.E$4]*MAGNET([.$I$1]*[.$L34]+[.E$5]*PI()/180)+(RAND()-0.5)*[.$B$4]*[.$B$13]" office:value-type="float" office:value="0.00252618199467557" calcext:value-type="float">
            <text:p>0.00</text:p>
          </table:table-cell>
          <table:table-cell table:formula="of:=[.F$4]*MAGNET([.$I$1]*[.$L34]+[.F$5]*PI()/180)+(RAND()-0.5)*[.$B$4]*[.$B$13]" office:value-type="float" office:value="0.00839183550484599" calcext:value-type="float">
            <text:p>0.01</text:p>
          </table:table-cell>
          <table:table-cell table:formula="of:=[.G$4]*MAGNET([.$I$1]*[.$L34]+[.G$5]*PI()/180)+(RAND()-0.5)*[.$B$4]*[.$B$13]" office:value-type="float" office:value="0.00897571630249476" calcext:value-type="float">
            <text:p>0.01</text:p>
          </table:table-cell>
          <table:table-cell table:formula="of:=[.H$4]*MAGNET([.$I$1]*[.$L34]+[.H$5]*PI()/180)+(RAND()-0.5)*[.$B$4]*[.$B$13]" office:value-type="float" office:value="0.00924140125031818" calcext:value-type="float">
            <text:p>0.01</text:p>
          </table:table-cell>
          <table:table-cell table:formula="of:=[.I$4]*MAGNET([.$I$1]*[.$L34]+[.I$5]*PI()/180)+(RAND()-0.5)*[.$B$4]*[.$B$13]" office:value-type="float" office:value="0.00987411560997641" calcext:value-type="float">
            <text:p>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4]+0.002" office:value-type="float" office:value="0.062" calcext:value-type="float">
            <text:p>0.062</text:p>
          </table:table-cell>
          <table:table-cell table:formula="of:=[.B$4]*MAGNET([.$I$1]*[.$L35]+[.B$5]*PI()/180)+(RAND()-0.5)*[.$B$4]*[.$B$13]" office:value-type="float" office:value="0.00109583524589016" calcext:value-type="float">
            <text:p>0.00</text:p>
          </table:table-cell>
          <table:table-cell table:formula="of:=[.C$4]*MAGNET([.$I$1]*[.$L35]+[.C$5]*PI()/180)+(RAND()-0.5)*[.$B$4]*[.$B$13]" office:value-type="float" office:value="0.00117671749035374" calcext:value-type="float">
            <text:p>0.00</text:p>
          </table:table-cell>
          <table:table-cell table:formula="of:=[.D$4]*MAGNET([.$I$1]*[.$L35]+[.D$5]*PI()/180)+(RAND()-0.5)*[.$B$4]*[.$B$13]" office:value-type="float" office:value="0.00178623306596272" calcext:value-type="float">
            <text:p>0.00</text:p>
          </table:table-cell>
          <table:table-cell table:formula="of:=[.E$4]*MAGNET([.$I$1]*[.$L35]+[.E$5]*PI()/180)+(RAND()-0.5)*[.$B$4]*[.$B$13]" office:value-type="float" office:value="-0.0024800360107232" calcext:value-type="float">
            <text:p>0.00</text:p>
          </table:table-cell>
          <table:table-cell table:formula="of:=[.F$4]*MAGNET([.$I$1]*[.$L35]+[.F$5]*PI()/180)+(RAND()-0.5)*[.$B$4]*[.$B$13]" office:value-type="float" office:value="0.000887437691112613" calcext:value-type="float">
            <text:p>0.00</text:p>
          </table:table-cell>
          <table:table-cell table:formula="of:=[.G$4]*MAGNET([.$I$1]*[.$L35]+[.G$5]*PI()/180)+(RAND()-0.5)*[.$B$4]*[.$B$13]" office:value-type="float" office:value="0.000843794907837158" calcext:value-type="float">
            <text:p>0.00</text:p>
          </table:table-cell>
          <table:table-cell table:formula="of:=[.H$4]*MAGNET([.$I$1]*[.$L35]+[.H$5]*PI()/180)+(RAND()-0.5)*[.$B$4]*[.$B$13]" office:value-type="float" office:value="0.00160288892123965" calcext:value-type="float">
            <text:p>0.00</text:p>
          </table:table-cell>
          <table:table-cell table:formula="of:=[.I$4]*MAGNET([.$I$1]*[.$L35]+[.I$5]*PI()/180)+(RAND()-0.5)*[.$B$4]*[.$B$13]" office:value-type="float" office:value="0.00153703885513419" calcext:value-type="float">
            <text:p>0.00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5]+0.002" office:value-type="float" office:value="0.064" calcext:value-type="float">
            <text:p>0.064</text:p>
          </table:table-cell>
          <table:table-cell table:formula="of:=[.B$4]*MAGNET([.$I$1]*[.$L36]+[.B$5]*PI()/180)+(RAND()-0.5)*[.$B$4]*[.$B$13]" office:value-type="float" office:value="-0.00320074595933565" calcext:value-type="float">
            <text:p>0.00</text:p>
          </table:table-cell>
          <table:table-cell table:formula="of:=[.C$4]*MAGNET([.$I$1]*[.$L36]+[.C$5]*PI()/180)+(RAND()-0.5)*[.$B$4]*[.$B$13]" office:value-type="float" office:value="-0.00341554184804495" calcext:value-type="float">
            <text:p>0.00</text:p>
          </table:table-cell>
          <table:table-cell table:formula="of:=[.D$4]*MAGNET([.$I$1]*[.$L36]+[.D$5]*PI()/180)+(RAND()-0.5)*[.$B$4]*[.$B$13]" office:value-type="float" office:value="-0.003444092226424" calcext:value-type="float">
            <text:p>0.00</text:p>
          </table:table-cell>
          <table:table-cell table:formula="of:=[.E$4]*MAGNET([.$I$1]*[.$L36]+[.E$5]*PI()/180)+(RAND()-0.5)*[.$B$4]*[.$B$13]" office:value-type="float" office:value="-0.00839004642363221" calcext:value-type="float">
            <text:p>-0.01</text:p>
          </table:table-cell>
          <table:table-cell table:formula="of:=[.F$4]*MAGNET([.$I$1]*[.$L36]+[.F$5]*PI()/180)+(RAND()-0.5)*[.$B$4]*[.$B$13]" office:value-type="float" office:value="-0.00433194218881888" calcext:value-type="float">
            <text:p>0.00</text:p>
          </table:table-cell>
          <table:table-cell table:formula="of:=[.G$4]*MAGNET([.$I$1]*[.$L36]+[.G$5]*PI()/180)+(RAND()-0.5)*[.$B$4]*[.$B$13]" office:value-type="float" office:value="-0.00499218562502743" calcext:value-type="float">
            <text:p>0.00</text:p>
          </table:table-cell>
          <table:table-cell table:formula="of:=[.H$4]*MAGNET([.$I$1]*[.$L36]+[.H$5]*PI()/180)+(RAND()-0.5)*[.$B$4]*[.$B$13]" office:value-type="float" office:value="-0.00542896928651114" calcext:value-type="float">
            <text:p>-0.01</text:p>
          </table:table-cell>
          <table:table-cell table:formula="of:=[.I$4]*MAGNET([.$I$1]*[.$L36]+[.I$5]*PI()/180)+(RAND()-0.5)*[.$B$4]*[.$B$13]" office:value-type="float" office:value="-0.00477603391043713" calcext:value-type="float">
            <text:p>0.00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6]+0.002" office:value-type="float" office:value="0.066" calcext:value-type="float">
            <text:p>0.066</text:p>
          </table:table-cell>
          <table:table-cell table:formula="of:=[.B$4]*MAGNET([.$I$1]*[.$L37]+[.B$5]*PI()/180)+(RAND()-0.5)*[.$B$4]*[.$B$13]" office:value-type="float" office:value="-0.00807028387571765" calcext:value-type="float">
            <text:p>-0.01</text:p>
          </table:table-cell>
          <table:table-cell table:formula="of:=[.C$4]*MAGNET([.$I$1]*[.$L37]+[.C$5]*PI()/180)+(RAND()-0.5)*[.$B$4]*[.$B$13]" office:value-type="float" office:value="-0.00968639396976632" calcext:value-type="float">
            <text:p>-0.01</text:p>
          </table:table-cell>
          <table:table-cell table:formula="of:=[.D$4]*MAGNET([.$I$1]*[.$L37]+[.D$5]*PI()/180)+(RAND()-0.5)*[.$B$4]*[.$B$13]" office:value-type="float" office:value="-0.00990167530522683" calcext:value-type="float">
            <text:p>-0.01</text:p>
          </table:table-cell>
          <table:table-cell table:formula="of:=[.E$4]*MAGNET([.$I$1]*[.$L37]+[.E$5]*PI()/180)+(RAND()-0.5)*[.$B$4]*[.$B$13]" office:value-type="float" office:value="-0.015748691638562" calcext:value-type="float">
            <text:p>-0.02</text:p>
          </table:table-cell>
          <table:table-cell table:formula="of:=[.F$4]*MAGNET([.$I$1]*[.$L37]+[.F$5]*PI()/180)+(RAND()-0.5)*[.$B$4]*[.$B$13]" office:value-type="float" office:value="-0.0110120475160625" calcext:value-type="float">
            <text:p>-0.01</text:p>
          </table:table-cell>
          <table:table-cell table:formula="of:=[.G$4]*MAGNET([.$I$1]*[.$L37]+[.G$5]*PI()/180)+(RAND()-0.5)*[.$B$4]*[.$B$13]" office:value-type="float" office:value="-0.0120982208135273" calcext:value-type="float">
            <text:p>-0.01</text:p>
          </table:table-cell>
          <table:table-cell table:formula="of:=[.H$4]*MAGNET([.$I$1]*[.$L37]+[.H$5]*PI()/180)+(RAND()-0.5)*[.$B$4]*[.$B$13]" office:value-type="float" office:value="-0.0128779986284631" calcext:value-type="float">
            <text:p>-0.01</text:p>
          </table:table-cell>
          <table:table-cell table:formula="of:=[.I$4]*MAGNET([.$I$1]*[.$L37]+[.I$5]*PI()/180)+(RAND()-0.5)*[.$B$4]*[.$B$13]" office:value-type="float" office:value="-0.0136484193186139" calcext:value-type="float">
            <text:p>-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7]+0.002" office:value-type="float" office:value="0.0680000000000001" calcext:value-type="float">
            <text:p>0.0680000000000001</text:p>
          </table:table-cell>
          <table:table-cell table:formula="of:=[.B$4]*MAGNET([.$I$1]*[.$L38]+[.B$5]*PI()/180)+(RAND()-0.5)*[.$B$4]*[.$B$13]" office:value-type="float" office:value="-0.0142691136489274" calcext:value-type="float">
            <text:p>-0.01</text:p>
          </table:table-cell>
          <table:table-cell table:formula="of:=[.C$4]*MAGNET([.$I$1]*[.$L38]+[.C$5]*PI()/180)+(RAND()-0.5)*[.$B$4]*[.$B$13]" office:value-type="float" office:value="-0.0160499671630783" calcext:value-type="float">
            <text:p>-0.02</text:p>
          </table:table-cell>
          <table:table-cell table:formula="of:=[.D$4]*MAGNET([.$I$1]*[.$L38]+[.D$5]*PI()/180)+(RAND()-0.5)*[.$B$4]*[.$B$13]" office:value-type="float" office:value="-0.0170759225905672" calcext:value-type="float">
            <text:p>-0.02</text:p>
          </table:table-cell>
          <table:table-cell table:formula="of:=[.E$4]*MAGNET([.$I$1]*[.$L38]+[.E$5]*PI()/180)+(RAND()-0.5)*[.$B$4]*[.$B$13]" office:value-type="float" office:value="-0.0230569399363766" calcext:value-type="float">
            <text:p>-0.02</text:p>
          </table:table-cell>
          <table:table-cell table:formula="of:=[.F$4]*MAGNET([.$I$1]*[.$L38]+[.F$5]*PI()/180)+(RAND()-0.5)*[.$B$4]*[.$B$13]" office:value-type="float" office:value="-0.0190603771577199" calcext:value-type="float">
            <text:p>-0.02</text:p>
          </table:table-cell>
          <table:table-cell table:formula="of:=[.G$4]*MAGNET([.$I$1]*[.$L38]+[.G$5]*PI()/180)+(RAND()-0.5)*[.$B$4]*[.$B$13]" office:value-type="float" office:value="-0.0206321555300669" calcext:value-type="float">
            <text:p>-0.02</text:p>
          </table:table-cell>
          <table:table-cell table:formula="of:=[.H$4]*MAGNET([.$I$1]*[.$L38]+[.H$5]*PI()/180)+(RAND()-0.5)*[.$B$4]*[.$B$13]" office:value-type="float" office:value="-0.021321404817858" calcext:value-type="float">
            <text:p>-0.02</text:p>
          </table:table-cell>
          <table:table-cell table:formula="of:=[.I$4]*MAGNET([.$I$1]*[.$L38]+[.I$5]*PI()/180)+(RAND()-0.5)*[.$B$4]*[.$B$13]" office:value-type="float" office:value="-0.0238158857858979" calcext:value-type="float">
            <text:p>-0.02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8]+0.002" office:value-type="float" office:value="0.0700000000000001" calcext:value-type="float">
            <text:p>0.0700000000000001</text:p>
          </table:table-cell>
          <table:table-cell table:formula="of:=[.B$4]*MAGNET([.$I$1]*[.$L39]+[.B$5]*PI()/180)+(RAND()-0.5)*[.$B$4]*[.$B$13]" office:value-type="float" office:value="-0.020164899520722" calcext:value-type="float">
            <text:p>-0.02</text:p>
          </table:table-cell>
          <table:table-cell table:formula="of:=[.C$4]*MAGNET([.$I$1]*[.$L39]+[.C$5]*PI()/180)+(RAND()-0.5)*[.$B$4]*[.$B$13]" office:value-type="float" office:value="-0.0217567183159626" calcext:value-type="float">
            <text:p>-0.02</text:p>
          </table:table-cell>
          <table:table-cell table:formula="of:=[.D$4]*MAGNET([.$I$1]*[.$L39]+[.D$5]*PI()/180)+(RAND()-0.5)*[.$B$4]*[.$B$13]" office:value-type="float" office:value="-0.024487513607656" calcext:value-type="float">
            <text:p>-0.02</text:p>
          </table:table-cell>
          <table:table-cell table:formula="of:=[.E$4]*MAGNET([.$I$1]*[.$L39]+[.E$5]*PI()/180)+(RAND()-0.5)*[.$B$4]*[.$B$13]" office:value-type="float" office:value="-0.0307855162901449" calcext:value-type="float">
            <text:p>-0.03</text:p>
          </table:table-cell>
          <table:table-cell table:formula="of:=[.F$4]*MAGNET([.$I$1]*[.$L39]+[.F$5]*PI()/180)+(RAND()-0.5)*[.$B$4]*[.$B$13]" office:value-type="float" office:value="-0.0269824487882731" calcext:value-type="float">
            <text:p>-0.03</text:p>
          </table:table-cell>
          <table:table-cell table:formula="of:=[.G$4]*MAGNET([.$I$1]*[.$L39]+[.G$5]*PI()/180)+(RAND()-0.5)*[.$B$4]*[.$B$13]" office:value-type="float" office:value="-0.0288964761390217" calcext:value-type="float">
            <text:p>-0.03</text:p>
          </table:table-cell>
          <table:table-cell table:formula="of:=[.H$4]*MAGNET([.$I$1]*[.$L39]+[.H$5]*PI()/180)+(RAND()-0.5)*[.$B$4]*[.$B$13]" office:value-type="float" office:value="-0.0308911060543017" calcext:value-type="float">
            <text:p>-0.03</text:p>
          </table:table-cell>
          <table:table-cell table:formula="of:=[.I$4]*MAGNET([.$I$1]*[.$L39]+[.I$5]*PI()/180)+(RAND()-0.5)*[.$B$4]*[.$B$13]" office:value-type="float" office:value="-0.0331582757007447" calcext:value-type="float">
            <text:p>-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39]+0.002" office:value-type="float" office:value="0.0720000000000001" calcext:value-type="float">
            <text:p>0.0720000000000001</text:p>
          </table:table-cell>
          <table:table-cell table:formula="of:=[.B$4]*MAGNET([.$I$1]*[.$L40]+[.B$5]*PI()/180)+(RAND()-0.5)*[.$B$4]*[.$B$13]" office:value-type="float" office:value="-0.0264411397025166" calcext:value-type="float">
            <text:p>-0.03</text:p>
          </table:table-cell>
          <table:table-cell table:formula="of:=[.C$4]*MAGNET([.$I$1]*[.$L40]+[.C$5]*PI()/180)+(RAND()-0.5)*[.$B$4]*[.$B$13]" office:value-type="float" office:value="-0.0288324751451079" calcext:value-type="float">
            <text:p>-0.03</text:p>
          </table:table-cell>
          <table:table-cell table:formula="of:=[.D$4]*MAGNET([.$I$1]*[.$L40]+[.D$5]*PI()/180)+(RAND()-0.5)*[.$B$4]*[.$B$13]" office:value-type="float" office:value="-0.0308256743242121" calcext:value-type="float">
            <text:p>-0.03</text:p>
          </table:table-cell>
          <table:table-cell table:formula="of:=[.E$4]*MAGNET([.$I$1]*[.$L40]+[.E$5]*PI()/180)+(RAND()-0.5)*[.$B$4]*[.$B$13]" office:value-type="float" office:value="-0.0379138306067878" calcext:value-type="float">
            <text:p>-0.04</text:p>
          </table:table-cell>
          <table:table-cell table:formula="of:=[.F$4]*MAGNET([.$I$1]*[.$L40]+[.F$5]*PI()/180)+(RAND()-0.5)*[.$B$4]*[.$B$13]" office:value-type="float" office:value="-0.0352652133844226" calcext:value-type="float">
            <text:p>-0.04</text:p>
          </table:table-cell>
          <table:table-cell table:formula="of:=[.G$4]*MAGNET([.$I$1]*[.$L40]+[.G$5]*PI()/180)+(RAND()-0.5)*[.$B$4]*[.$B$13]" office:value-type="float" office:value="-0.0367649455935941" calcext:value-type="float">
            <text:p>-0.04</text:p>
          </table:table-cell>
          <table:table-cell table:formula="of:=[.H$4]*MAGNET([.$I$1]*[.$L40]+[.H$5]*PI()/180)+(RAND()-0.5)*[.$B$4]*[.$B$13]" office:value-type="float" office:value="-0.0396442970732073" calcext:value-type="float">
            <text:p>-0.04</text:p>
          </table:table-cell>
          <table:table-cell table:formula="of:=[.I$4]*MAGNET([.$I$1]*[.$L40]+[.I$5]*PI()/180)+(RAND()-0.5)*[.$B$4]*[.$B$13]" office:value-type="float" office:value="-0.0419160733488791" calcext:value-type="float">
            <text:p>-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0]+0.002" office:value-type="float" office:value="0.0740000000000001" calcext:value-type="float">
            <text:p>0.0740000000000001</text:p>
          </table:table-cell>
          <table:table-cell table:formula="of:=[.B$4]*MAGNET([.$I$1]*[.$L41]+[.B$5]*PI()/180)+(RAND()-0.5)*[.$B$4]*[.$B$13]" office:value-type="float" office:value="-0.0306607518997808" calcext:value-type="float">
            <text:p>-0.03</text:p>
          </table:table-cell>
          <table:table-cell table:formula="of:=[.C$4]*MAGNET([.$I$1]*[.$L41]+[.C$5]*PI()/180)+(RAND()-0.5)*[.$B$4]*[.$B$13]" office:value-type="float" office:value="-0.0342048173694378" calcext:value-type="float">
            <text:p>-0.03</text:p>
          </table:table-cell>
          <table:table-cell table:formula="of:=[.D$4]*MAGNET([.$I$1]*[.$L41]+[.D$5]*PI()/180)+(RAND()-0.5)*[.$B$4]*[.$B$13]" office:value-type="float" office:value="-0.0359621316420249" calcext:value-type="float">
            <text:p>-0.04</text:p>
          </table:table-cell>
          <table:table-cell table:formula="of:=[.E$4]*MAGNET([.$I$1]*[.$L41]+[.E$5]*PI()/180)+(RAND()-0.5)*[.$B$4]*[.$B$13]" office:value-type="float" office:value="-0.0431071826231178" calcext:value-type="float">
            <text:p>-0.04</text:p>
          </table:table-cell>
          <table:table-cell table:formula="of:=[.F$4]*MAGNET([.$I$1]*[.$L41]+[.F$5]*PI()/180)+(RAND()-0.5)*[.$B$4]*[.$B$13]" office:value-type="float" office:value="-0.042465303146706" calcext:value-type="float">
            <text:p>-0.04</text:p>
          </table:table-cell>
          <table:table-cell table:formula="of:=[.G$4]*MAGNET([.$I$1]*[.$L41]+[.G$5]*PI()/180)+(RAND()-0.5)*[.$B$4]*[.$B$13]" office:value-type="float" office:value="-0.0446623813707992" calcext:value-type="float">
            <text:p>-0.04</text:p>
          </table:table-cell>
          <table:table-cell table:formula="of:=[.H$4]*MAGNET([.$I$1]*[.$L41]+[.H$5]*PI()/180)+(RAND()-0.5)*[.$B$4]*[.$B$13]" office:value-type="float" office:value="-0.0480005146053537" calcext:value-type="float">
            <text:p>-0.05</text:p>
          </table:table-cell>
          <table:table-cell table:formula="of:=[.I$4]*MAGNET([.$I$1]*[.$L41]+[.I$5]*PI()/180)+(RAND()-0.5)*[.$B$4]*[.$B$13]" office:value-type="float" office:value="-0.0504058306457707" calcext:value-type="float">
            <text:p>-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1]+0.002" office:value-type="float" office:value="0.0760000000000001" calcext:value-type="float">
            <text:p>0.0760000000000001</text:p>
          </table:table-cell>
          <table:table-cell table:formula="of:=[.B$4]*MAGNET([.$I$1]*[.$L42]+[.B$5]*PI()/180)+(RAND()-0.5)*[.$B$4]*[.$B$13]" office:value-type="float" office:value="-0.03501535570261" calcext:value-type="float">
            <text:p>-0.04</text:p>
          </table:table-cell>
          <table:table-cell table:formula="of:=[.C$4]*MAGNET([.$I$1]*[.$L42]+[.C$5]*PI()/180)+(RAND()-0.5)*[.$B$4]*[.$B$13]" office:value-type="float" office:value="-0.0393349363525116" calcext:value-type="float">
            <text:p>-0.04</text:p>
          </table:table-cell>
          <table:table-cell table:formula="of:=[.D$4]*MAGNET([.$I$1]*[.$L42]+[.D$5]*PI()/180)+(RAND()-0.5)*[.$B$4]*[.$B$13]" office:value-type="float" office:value="-0.0412217207073351" calcext:value-type="float">
            <text:p>-0.04</text:p>
          </table:table-cell>
          <table:table-cell table:formula="of:=[.E$4]*MAGNET([.$I$1]*[.$L42]+[.E$5]*PI()/180)+(RAND()-0.5)*[.$B$4]*[.$B$13]" office:value-type="float" office:value="-0.0487238655891815" calcext:value-type="float">
            <text:p>-0.05</text:p>
          </table:table-cell>
          <table:table-cell table:formula="of:=[.F$4]*MAGNET([.$I$1]*[.$L42]+[.F$5]*PI()/180)+(RAND()-0.5)*[.$B$4]*[.$B$13]" office:value-type="float" office:value="-0.0473890332794506" calcext:value-type="float">
            <text:p>-0.05</text:p>
          </table:table-cell>
          <table:table-cell table:formula="of:=[.G$4]*MAGNET([.$I$1]*[.$L42]+[.G$5]*PI()/180)+(RAND()-0.5)*[.$B$4]*[.$B$13]" office:value-type="float" office:value="-0.0513338120294143" calcext:value-type="float">
            <text:p>-0.05</text:p>
          </table:table-cell>
          <table:table-cell table:formula="of:=[.H$4]*MAGNET([.$I$1]*[.$L42]+[.H$5]*PI()/180)+(RAND()-0.5)*[.$B$4]*[.$B$13]" office:value-type="float" office:value="-0.0540908154287314" calcext:value-type="float">
            <text:p>-0.05</text:p>
          </table:table-cell>
          <table:table-cell table:formula="of:=[.I$4]*MAGNET([.$I$1]*[.$L42]+[.I$5]*PI()/180)+(RAND()-0.5)*[.$B$4]*[.$B$13]" office:value-type="float" office:value="-0.0575683741374942" calcext:value-type="float">
            <text:p>-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2]+0.002" office:value-type="float" office:value="0.0780000000000001" calcext:value-type="float">
            <text:p>0.0780000000000001</text:p>
          </table:table-cell>
          <table:table-cell table:formula="of:=[.B$4]*MAGNET([.$I$1]*[.$L43]+[.B$5]*PI()/180)+(RAND()-0.5)*[.$B$4]*[.$B$13]" office:value-type="float" office:value="-0.0388029408779956" calcext:value-type="float">
            <text:p>-0.04</text:p>
          </table:table-cell>
          <table:table-cell table:formula="of:=[.C$4]*MAGNET([.$I$1]*[.$L43]+[.C$5]*PI()/180)+(RAND()-0.5)*[.$B$4]*[.$B$13]" office:value-type="float" office:value="-0.0431043628127491" calcext:value-type="float">
            <text:p>-0.04</text:p>
          </table:table-cell>
          <table:table-cell table:formula="of:=[.D$4]*MAGNET([.$I$1]*[.$L43]+[.D$5]*PI()/180)+(RAND()-0.5)*[.$B$4]*[.$B$13]" office:value-type="float" office:value="-0.0465306711004658" calcext:value-type="float">
            <text:p>-0.05</text:p>
          </table:table-cell>
          <table:table-cell table:formula="of:=[.E$4]*MAGNET([.$I$1]*[.$L43]+[.E$5]*PI()/180)+(RAND()-0.5)*[.$B$4]*[.$B$13]" office:value-type="float" office:value="-0.0522328829277862" calcext:value-type="float">
            <text:p>-0.05</text:p>
          </table:table-cell>
          <table:table-cell table:formula="of:=[.F$4]*MAGNET([.$I$1]*[.$L43]+[.F$5]*PI()/180)+(RAND()-0.5)*[.$B$4]*[.$B$13]" office:value-type="float" office:value="-0.0529493990135042" calcext:value-type="float">
            <text:p>-0.05</text:p>
          </table:table-cell>
          <table:table-cell table:formula="of:=[.G$4]*MAGNET([.$I$1]*[.$L43]+[.G$5]*PI()/180)+(RAND()-0.5)*[.$B$4]*[.$B$13]" office:value-type="float" office:value="-0.0556840387298989" calcext:value-type="float">
            <text:p>-0.06</text:p>
          </table:table-cell>
          <table:table-cell table:formula="of:=[.H$4]*MAGNET([.$I$1]*[.$L43]+[.H$5]*PI()/180)+(RAND()-0.5)*[.$B$4]*[.$B$13]" office:value-type="float" office:value="-0.0596035617511441" calcext:value-type="float">
            <text:p>-0.06</text:p>
          </table:table-cell>
          <table:table-cell table:formula="of:=[.I$4]*MAGNET([.$I$1]*[.$L43]+[.I$5]*PI()/180)+(RAND()-0.5)*[.$B$4]*[.$B$13]" office:value-type="float" office:value="-0.0628709377932717" calcext:value-type="float">
            <text:p>-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3]+0.002" office:value-type="float" office:value="0.0800000000000001" calcext:value-type="float">
            <text:p>0.0800000000000001</text:p>
          </table:table-cell>
          <table:table-cell table:formula="of:=[.B$4]*MAGNET([.$I$1]*[.$L44]+[.B$5]*PI()/180)+(RAND()-0.5)*[.$B$4]*[.$B$13]" office:value-type="float" office:value="-0.0420364049804905" calcext:value-type="float">
            <text:p>-0.04</text:p>
          </table:table-cell>
          <table:table-cell table:formula="of:=[.C$4]*MAGNET([.$I$1]*[.$L44]+[.C$5]*PI()/180)+(RAND()-0.5)*[.$B$4]*[.$B$13]" office:value-type="float" office:value="-0.0454805655770687" calcext:value-type="float">
            <text:p>-0.05</text:p>
          </table:table-cell>
          <table:table-cell table:formula="of:=[.D$4]*MAGNET([.$I$1]*[.$L44]+[.D$5]*PI()/180)+(RAND()-0.5)*[.$B$4]*[.$B$13]" office:value-type="float" office:value="-0.0485053423871479" calcext:value-type="float">
            <text:p>-0.05</text:p>
          </table:table-cell>
          <table:table-cell table:formula="of:=[.E$4]*MAGNET([.$I$1]*[.$L44]+[.E$5]*PI()/180)+(RAND()-0.5)*[.$B$4]*[.$B$13]" office:value-type="float" office:value="-0.0542011731748809" calcext:value-type="float">
            <text:p>-0.05</text:p>
          </table:table-cell>
          <table:table-cell table:formula="of:=[.F$4]*MAGNET([.$I$1]*[.$L44]+[.F$5]*PI()/180)+(RAND()-0.5)*[.$B$4]*[.$B$13]" office:value-type="float" office:value="-0.0567160401910389" calcext:value-type="float">
            <text:p>-0.06</text:p>
          </table:table-cell>
          <table:table-cell table:formula="of:=[.G$4]*MAGNET([.$I$1]*[.$L44]+[.G$5]*PI()/180)+(RAND()-0.5)*[.$B$4]*[.$B$13]" office:value-type="float" office:value="-0.060363615980964" calcext:value-type="float">
            <text:p>-0.06</text:p>
          </table:table-cell>
          <table:table-cell table:formula="of:=[.H$4]*MAGNET([.$I$1]*[.$L44]+[.H$5]*PI()/180)+(RAND()-0.5)*[.$B$4]*[.$B$13]" office:value-type="float" office:value="-0.0636745166889115" calcext:value-type="float">
            <text:p>-0.06</text:p>
          </table:table-cell>
          <table:table-cell table:formula="of:=[.I$4]*MAGNET([.$I$1]*[.$L44]+[.I$5]*PI()/180)+(RAND()-0.5)*[.$B$4]*[.$B$13]" office:value-type="float" office:value="-0.0680179346067847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4]+0.002" office:value-type="float" office:value="0.0820000000000001" calcext:value-type="float">
            <text:p>0.0820000000000001</text:p>
          </table:table-cell>
          <table:table-cell table:formula="of:=[.B$4]*MAGNET([.$I$1]*[.$L45]+[.B$5]*PI()/180)+(RAND()-0.5)*[.$B$4]*[.$B$13]" office:value-type="float" office:value="-0.0438081119628429" calcext:value-type="float">
            <text:p>-0.04</text:p>
          </table:table-cell>
          <table:table-cell table:formula="of:=[.C$4]*MAGNET([.$I$1]*[.$L45]+[.C$5]*PI()/180)+(RAND()-0.5)*[.$B$4]*[.$B$13]" office:value-type="float" office:value="-0.0469248108529678" calcext:value-type="float">
            <text:p>-0.05</text:p>
          </table:table-cell>
          <table:table-cell table:formula="of:=[.D$4]*MAGNET([.$I$1]*[.$L45]+[.D$5]*PI()/180)+(RAND()-0.5)*[.$B$4]*[.$B$13]" office:value-type="float" office:value="-0.0519069020873441" calcext:value-type="float">
            <text:p>-0.05</text:p>
          </table:table-cell>
          <table:table-cell table:formula="of:=[.E$4]*MAGNET([.$I$1]*[.$L45]+[.E$5]*PI()/180)+(RAND()-0.5)*[.$B$4]*[.$B$13]" office:value-type="float" office:value="-0.0566703349468878" calcext:value-type="float">
            <text:p>-0.06</text:p>
          </table:table-cell>
          <table:table-cell table:formula="of:=[.F$4]*MAGNET([.$I$1]*[.$L45]+[.F$5]*PI()/180)+(RAND()-0.5)*[.$B$4]*[.$B$13]" office:value-type="float" office:value="-0.0584707746963024" calcext:value-type="float">
            <text:p>-0.06</text:p>
          </table:table-cell>
          <table:table-cell table:formula="of:=[.G$4]*MAGNET([.$I$1]*[.$L45]+[.G$5]*PI()/180)+(RAND()-0.5)*[.$B$4]*[.$B$13]" office:value-type="float" office:value="-0.0627935372009722" calcext:value-type="float">
            <text:p>-0.06</text:p>
          </table:table-cell>
          <table:table-cell table:formula="of:=[.H$4]*MAGNET([.$I$1]*[.$L45]+[.H$5]*PI()/180)+(RAND()-0.5)*[.$B$4]*[.$B$13]" office:value-type="float" office:value="-0.0663063062077885" calcext:value-type="float">
            <text:p>-0.07</text:p>
          </table:table-cell>
          <table:table-cell table:formula="of:=[.I$4]*MAGNET([.$I$1]*[.$L45]+[.I$5]*PI()/180)+(RAND()-0.5)*[.$B$4]*[.$B$13]" office:value-type="float" office:value="-0.0702048783594402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5]+0.002" office:value-type="float" office:value="0.0840000000000001" calcext:value-type="float">
            <text:p>0.0840000000000001</text:p>
          </table:table-cell>
          <table:table-cell table:formula="of:=[.B$4]*MAGNET([.$I$1]*[.$L46]+[.B$5]*PI()/180)+(RAND()-0.5)*[.$B$4]*[.$B$13]" office:value-type="float" office:value="-0.0453178708752328" calcext:value-type="float">
            <text:p>-0.05</text:p>
          </table:table-cell>
          <table:table-cell table:formula="of:=[.C$4]*MAGNET([.$I$1]*[.$L46]+[.C$5]*PI()/180)+(RAND()-0.5)*[.$B$4]*[.$B$13]" office:value-type="float" office:value="-0.0484155755379133" calcext:value-type="float">
            <text:p>-0.05</text:p>
          </table:table-cell>
          <table:table-cell table:formula="of:=[.D$4]*MAGNET([.$I$1]*[.$L46]+[.D$5]*PI()/180)+(RAND()-0.5)*[.$B$4]*[.$B$13]" office:value-type="float" office:value="-0.0531211213084924" calcext:value-type="float">
            <text:p>-0.05</text:p>
          </table:table-cell>
          <table:table-cell table:formula="of:=[.E$4]*MAGNET([.$I$1]*[.$L46]+[.E$5]*PI()/180)+(RAND()-0.5)*[.$B$4]*[.$B$13]" office:value-type="float" office:value="-0.0571326869599062" calcext:value-type="float">
            <text:p>-0.06</text:p>
          </table:table-cell>
          <table:table-cell table:formula="of:=[.F$4]*MAGNET([.$I$1]*[.$L46]+[.F$5]*PI()/180)+(RAND()-0.5)*[.$B$4]*[.$B$13]" office:value-type="float" office:value="-0.0605254521617938" calcext:value-type="float">
            <text:p>-0.06</text:p>
          </table:table-cell>
          <table:table-cell table:formula="of:=[.G$4]*MAGNET([.$I$1]*[.$L46]+[.G$5]*PI()/180)+(RAND()-0.5)*[.$B$4]*[.$B$13]" office:value-type="float" office:value="-0.0641876728996972" calcext:value-type="float">
            <text:p>-0.06</text:p>
          </table:table-cell>
          <table:table-cell table:formula="of:=[.H$4]*MAGNET([.$I$1]*[.$L46]+[.H$5]*PI()/180)+(RAND()-0.5)*[.$B$4]*[.$B$13]" office:value-type="float" office:value="-0.0678213277312417" calcext:value-type="float">
            <text:p>-0.07</text:p>
          </table:table-cell>
          <table:table-cell table:formula="of:=[.I$4]*MAGNET([.$I$1]*[.$L46]+[.I$5]*PI()/180)+(RAND()-0.5)*[.$B$4]*[.$B$13]" office:value-type="float" office:value="-0.0719980351824743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6]+0.002" office:value-type="float" office:value="0.0860000000000001" calcext:value-type="float">
            <text:p>0.0860000000000001</text:p>
          </table:table-cell>
          <table:table-cell table:formula="of:=[.B$4]*MAGNET([.$I$1]*[.$L47]+[.B$5]*PI()/180)+(RAND()-0.5)*[.$B$4]*[.$B$13]" office:value-type="float" office:value="-0.0456457394772114" calcext:value-type="float">
            <text:p>-0.05</text:p>
          </table:table-cell>
          <table:table-cell table:formula="of:=[.C$4]*MAGNET([.$I$1]*[.$L47]+[.C$5]*PI()/180)+(RAND()-0.5)*[.$B$4]*[.$B$13]" office:value-type="float" office:value="-0.0490769020530784" calcext:value-type="float">
            <text:p>-0.05</text:p>
          </table:table-cell>
          <table:table-cell table:formula="of:=[.D$4]*MAGNET([.$I$1]*[.$L47]+[.D$5]*PI()/180)+(RAND()-0.5)*[.$B$4]*[.$B$13]" office:value-type="float" office:value="-0.0533497184078933" calcext:value-type="float">
            <text:p>-0.05</text:p>
          </table:table-cell>
          <table:table-cell table:formula="of:=[.E$4]*MAGNET([.$I$1]*[.$L47]+[.E$5]*PI()/180)+(RAND()-0.5)*[.$B$4]*[.$B$13]" office:value-type="float" office:value="-0.0574155146523489" calcext:value-type="float">
            <text:p>-0.06</text:p>
          </table:table-cell>
          <table:table-cell table:formula="of:=[.F$4]*MAGNET([.$I$1]*[.$L47]+[.F$5]*PI()/180)+(RAND()-0.5)*[.$B$4]*[.$B$13]" office:value-type="float" office:value="-0.06086138125278" calcext:value-type="float">
            <text:p>-0.06</text:p>
          </table:table-cell>
          <table:table-cell table:formula="of:=[.G$4]*MAGNET([.$I$1]*[.$L47]+[.G$5]*PI()/180)+(RAND()-0.5)*[.$B$4]*[.$B$13]" office:value-type="float" office:value="-0.0657066261097984" calcext:value-type="float">
            <text:p>-0.07</text:p>
          </table:table-cell>
          <table:table-cell table:formula="of:=[.H$4]*MAGNET([.$I$1]*[.$L47]+[.H$5]*PI()/180)+(RAND()-0.5)*[.$B$4]*[.$B$13]" office:value-type="float" office:value="-0.0690740108177116" calcext:value-type="float">
            <text:p>-0.07</text:p>
          </table:table-cell>
          <table:table-cell table:formula="of:=[.I$4]*MAGNET([.$I$1]*[.$L47]+[.I$5]*PI()/180)+(RAND()-0.5)*[.$B$4]*[.$B$13]" office:value-type="float" office:value="-0.0734155916076483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7]+0.002" office:value-type="float" office:value="0.0880000000000001" calcext:value-type="float">
            <text:p>0.0880000000000001</text:p>
          </table:table-cell>
          <table:table-cell table:formula="of:=[.B$4]*MAGNET([.$I$1]*[.$L48]+[.B$5]*PI()/180)+(RAND()-0.5)*[.$B$4]*[.$B$13]" office:value-type="float" office:value="-0.0461708910981616" calcext:value-type="float">
            <text:p>-0.05</text:p>
          </table:table-cell>
          <table:table-cell table:formula="of:=[.C$4]*MAGNET([.$I$1]*[.$L48]+[.C$5]*PI()/180)+(RAND()-0.5)*[.$B$4]*[.$B$13]" office:value-type="float" office:value="-0.0505847817295289" calcext:value-type="float">
            <text:p>-0.05</text:p>
          </table:table-cell>
          <table:table-cell table:formula="of:=[.D$4]*MAGNET([.$I$1]*[.$L48]+[.D$5]*PI()/180)+(RAND()-0.5)*[.$B$4]*[.$B$13]" office:value-type="float" office:value="-0.0545240718545204" calcext:value-type="float">
            <text:p>-0.05</text:p>
          </table:table-cell>
          <table:table-cell table:formula="of:=[.E$4]*MAGNET([.$I$1]*[.$L48]+[.E$5]*PI()/180)+(RAND()-0.5)*[.$B$4]*[.$B$13]" office:value-type="float" office:value="-0.0574877089045208" calcext:value-type="float">
            <text:p>-0.06</text:p>
          </table:table-cell>
          <table:table-cell table:formula="of:=[.F$4]*MAGNET([.$I$1]*[.$L48]+[.F$5]*PI()/180)+(RAND()-0.5)*[.$B$4]*[.$B$13]" office:value-type="float" office:value="-0.0614957952712044" calcext:value-type="float">
            <text:p>-0.06</text:p>
          </table:table-cell>
          <table:table-cell table:formula="of:=[.G$4]*MAGNET([.$I$1]*[.$L48]+[.G$5]*PI()/180)+(RAND()-0.5)*[.$B$4]*[.$B$13]" office:value-type="float" office:value="-0.0659829271194309" calcext:value-type="float">
            <text:p>-0.07</text:p>
          </table:table-cell>
          <table:table-cell table:formula="of:=[.H$4]*MAGNET([.$I$1]*[.$L48]+[.H$5]*PI()/180)+(RAND()-0.5)*[.$B$4]*[.$B$13]" office:value-type="float" office:value="-0.070581805167108" calcext:value-type="float">
            <text:p>-0.07</text:p>
          </table:table-cell>
          <table:table-cell table:formula="of:=[.I$4]*MAGNET([.$I$1]*[.$L48]+[.I$5]*PI()/180)+(RAND()-0.5)*[.$B$4]*[.$B$13]" office:value-type="float" office:value="-0.0740837331126326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8]+0.002" office:value-type="float" office:value="0.0900000000000001" calcext:value-type="float">
            <text:p>0.0900000000000001</text:p>
          </table:table-cell>
          <table:table-cell table:formula="of:=[.B$4]*MAGNET([.$I$1]*[.$L49]+[.B$5]*PI()/180)+(RAND()-0.5)*[.$B$4]*[.$B$13]" office:value-type="float" office:value="-0.046262695207217" calcext:value-type="float">
            <text:p>-0.05</text:p>
          </table:table-cell>
          <table:table-cell table:formula="of:=[.C$4]*MAGNET([.$I$1]*[.$L49]+[.C$5]*PI()/180)+(RAND()-0.5)*[.$B$4]*[.$B$13]" office:value-type="float" office:value="-0.0496898465096034" calcext:value-type="float">
            <text:p>-0.05</text:p>
          </table:table-cell>
          <table:table-cell table:formula="of:=[.D$4]*MAGNET([.$I$1]*[.$L49]+[.D$5]*PI()/180)+(RAND()-0.5)*[.$B$4]*[.$B$13]" office:value-type="float" office:value="-0.0542016771954449" calcext:value-type="float">
            <text:p>-0.05</text:p>
          </table:table-cell>
          <table:table-cell table:formula="of:=[.E$4]*MAGNET([.$I$1]*[.$L49]+[.E$5]*PI()/180)+(RAND()-0.5)*[.$B$4]*[.$B$13]" office:value-type="float" office:value="-0.057380659373624" calcext:value-type="float">
            <text:p>-0.06</text:p>
          </table:table-cell>
          <table:table-cell table:formula="of:=[.F$4]*MAGNET([.$I$1]*[.$L49]+[.F$5]*PI()/180)+(RAND()-0.5)*[.$B$4]*[.$B$13]" office:value-type="float" office:value="-0.0617847050541408" calcext:value-type="float">
            <text:p>-0.06</text:p>
          </table:table-cell>
          <table:table-cell table:formula="of:=[.G$4]*MAGNET([.$I$1]*[.$L49]+[.G$5]*PI()/180)+(RAND()-0.5)*[.$B$4]*[.$B$13]" office:value-type="float" office:value="-0.0656954786562541" calcext:value-type="float">
            <text:p>-0.07</text:p>
          </table:table-cell>
          <table:table-cell table:formula="of:=[.H$4]*MAGNET([.$I$1]*[.$L49]+[.H$5]*PI()/180)+(RAND()-0.5)*[.$B$4]*[.$B$13]" office:value-type="float" office:value="-0.069621091037347" calcext:value-type="float">
            <text:p>-0.07</text:p>
          </table:table-cell>
          <table:table-cell table:formula="of:=[.I$4]*MAGNET([.$I$1]*[.$L49]+[.I$5]*PI()/180)+(RAND()-0.5)*[.$B$4]*[.$B$13]" office:value-type="float" office:value="-0.0744980239339725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49]+0.002" office:value-type="float" office:value="0.0920000000000001" calcext:value-type="float">
            <text:p>0.0920000000000001</text:p>
          </table:table-cell>
          <table:table-cell table:formula="of:=[.B$4]*MAGNET([.$I$1]*[.$L50]+[.B$5]*PI()/180)+(RAND()-0.5)*[.$B$4]*[.$B$13]" office:value-type="float" office:value="-0.0457504968613997" calcext:value-type="float">
            <text:p>-0.05</text:p>
          </table:table-cell>
          <table:table-cell table:formula="of:=[.C$4]*MAGNET([.$I$1]*[.$L50]+[.C$5]*PI()/180)+(RAND()-0.5)*[.$B$4]*[.$B$13]" office:value-type="float" office:value="-0.0504367433803005" calcext:value-type="float">
            <text:p>-0.05</text:p>
          </table:table-cell>
          <table:table-cell table:formula="of:=[.D$4]*MAGNET([.$I$1]*[.$L50]+[.D$5]*PI()/180)+(RAND()-0.5)*[.$B$4]*[.$B$13]" office:value-type="float" office:value="-0.0538587658127162" calcext:value-type="float">
            <text:p>-0.05</text:p>
          </table:table-cell>
          <table:table-cell table:formula="of:=[.E$4]*MAGNET([.$I$1]*[.$L50]+[.E$5]*PI()/180)+(RAND()-0.5)*[.$B$4]*[.$B$13]" office:value-type="float" office:value="-0.0574580992148926" calcext:value-type="float">
            <text:p>-0.06</text:p>
          </table:table-cell>
          <table:table-cell table:formula="of:=[.F$4]*MAGNET([.$I$1]*[.$L50]+[.F$5]*PI()/180)+(RAND()-0.5)*[.$B$4]*[.$B$13]" office:value-type="float" office:value="-0.0613245272750947" calcext:value-type="float">
            <text:p>-0.06</text:p>
          </table:table-cell>
          <table:table-cell table:formula="of:=[.G$4]*MAGNET([.$I$1]*[.$L50]+[.G$5]*PI()/180)+(RAND()-0.5)*[.$B$4]*[.$B$13]" office:value-type="float" office:value="-0.0660106039603306" calcext:value-type="float">
            <text:p>-0.07</text:p>
          </table:table-cell>
          <table:table-cell table:formula="of:=[.H$4]*MAGNET([.$I$1]*[.$L50]+[.H$5]*PI()/180)+(RAND()-0.5)*[.$B$4]*[.$B$13]" office:value-type="float" office:value="-0.0695678834806431" calcext:value-type="float">
            <text:p>-0.07</text:p>
          </table:table-cell>
          <table:table-cell table:formula="of:=[.I$4]*MAGNET([.$I$1]*[.$L50]+[.I$5]*PI()/180)+(RAND()-0.5)*[.$B$4]*[.$B$13]" office:value-type="float" office:value="-0.0744371035812501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0]+0.002" office:value-type="float" office:value="0.0940000000000001" calcext:value-type="float">
            <text:p>0.0940000000000001</text:p>
          </table:table-cell>
          <table:table-cell table:formula="of:=[.B$4]*MAGNET([.$I$1]*[.$L51]+[.B$5]*PI()/180)+(RAND()-0.5)*[.$B$4]*[.$B$13]" office:value-type="float" office:value="-0.0461235358921647" calcext:value-type="float">
            <text:p>-0.05</text:p>
          </table:table-cell>
          <table:table-cell table:formula="of:=[.C$4]*MAGNET([.$I$1]*[.$L51]+[.C$5]*PI()/180)+(RAND()-0.5)*[.$B$4]*[.$B$13]" office:value-type="float" office:value="-0.0499655330679449" calcext:value-type="float">
            <text:p>-0.05</text:p>
          </table:table-cell>
          <table:table-cell table:formula="of:=[.D$4]*MAGNET([.$I$1]*[.$L51]+[.D$5]*PI()/180)+(RAND()-0.5)*[.$B$4]*[.$B$13]" office:value-type="float" office:value="-0.0534630406372491" calcext:value-type="float">
            <text:p>-0.05</text:p>
          </table:table-cell>
          <table:table-cell table:formula="of:=[.E$4]*MAGNET([.$I$1]*[.$L51]+[.E$5]*PI()/180)+(RAND()-0.5)*[.$B$4]*[.$B$13]" office:value-type="float" office:value="-0.0580541827295229" calcext:value-type="float">
            <text:p>-0.06</text:p>
          </table:table-cell>
          <table:table-cell table:formula="of:=[.F$4]*MAGNET([.$I$1]*[.$L51]+[.F$5]*PI()/180)+(RAND()-0.5)*[.$B$4]*[.$B$13]" office:value-type="float" office:value="-0.0620134344824549" calcext:value-type="float">
            <text:p>-0.06</text:p>
          </table:table-cell>
          <table:table-cell table:formula="of:=[.G$4]*MAGNET([.$I$1]*[.$L51]+[.G$5]*PI()/180)+(RAND()-0.5)*[.$B$4]*[.$B$13]" office:value-type="float" office:value="-0.0660496210423053" calcext:value-type="float">
            <text:p>-0.07</text:p>
          </table:table-cell>
          <table:table-cell table:formula="of:=[.H$4]*MAGNET([.$I$1]*[.$L51]+[.H$5]*PI()/180)+(RAND()-0.5)*[.$B$4]*[.$B$13]" office:value-type="float" office:value="-0.0700738534777872" calcext:value-type="float">
            <text:p>-0.07</text:p>
          </table:table-cell>
          <table:table-cell table:formula="of:=[.I$4]*MAGNET([.$I$1]*[.$L51]+[.I$5]*PI()/180)+(RAND()-0.5)*[.$B$4]*[.$B$13]" office:value-type="float" office:value="-0.0738266960389897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1]+0.002" office:value-type="float" office:value="0.0960000000000001" calcext:value-type="float">
            <text:p>0.0960000000000001</text:p>
          </table:table-cell>
          <table:table-cell table:formula="of:=[.B$4]*MAGNET([.$I$1]*[.$L52]+[.B$5]*PI()/180)+(RAND()-0.5)*[.$B$4]*[.$B$13]" office:value-type="float" office:value="-0.0453984420070286" calcext:value-type="float">
            <text:p>-0.05</text:p>
          </table:table-cell>
          <table:table-cell table:formula="of:=[.C$4]*MAGNET([.$I$1]*[.$L52]+[.C$5]*PI()/180)+(RAND()-0.5)*[.$B$4]*[.$B$13]" office:value-type="float" office:value="-0.0501957721189083" calcext:value-type="float">
            <text:p>-0.05</text:p>
          </table:table-cell>
          <table:table-cell table:formula="of:=[.D$4]*MAGNET([.$I$1]*[.$L52]+[.D$5]*PI()/180)+(RAND()-0.5)*[.$B$4]*[.$B$13]" office:value-type="float" office:value="-0.0542111201011194" calcext:value-type="float">
            <text:p>-0.05</text:p>
          </table:table-cell>
          <table:table-cell table:formula="of:=[.E$4]*MAGNET([.$I$1]*[.$L52]+[.E$5]*PI()/180)+(RAND()-0.5)*[.$B$4]*[.$B$13]" office:value-type="float" office:value="-0.0575399211335753" calcext:value-type="float">
            <text:p>-0.06</text:p>
          </table:table-cell>
          <table:table-cell table:formula="of:=[.F$4]*MAGNET([.$I$1]*[.$L52]+[.F$5]*PI()/180)+(RAND()-0.5)*[.$B$4]*[.$B$13]" office:value-type="float" office:value="-0.062060848595524" calcext:value-type="float">
            <text:p>-0.06</text:p>
          </table:table-cell>
          <table:table-cell table:formula="of:=[.G$4]*MAGNET([.$I$1]*[.$L52]+[.G$5]*PI()/180)+(RAND()-0.5)*[.$B$4]*[.$B$13]" office:value-type="float" office:value="-0.0666759479310718" calcext:value-type="float">
            <text:p>-0.07</text:p>
          </table:table-cell>
          <table:table-cell table:formula="of:=[.H$4]*MAGNET([.$I$1]*[.$L52]+[.H$5]*PI()/180)+(RAND()-0.5)*[.$B$4]*[.$B$13]" office:value-type="float" office:value="-0.069741668912264" calcext:value-type="float">
            <text:p>-0.07</text:p>
          </table:table-cell>
          <table:table-cell table:formula="of:=[.I$4]*MAGNET([.$I$1]*[.$L52]+[.I$5]*PI()/180)+(RAND()-0.5)*[.$B$4]*[.$B$13]" office:value-type="float" office:value="-0.0735008716875831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2]+0.002" office:value-type="float" office:value="0.0980000000000001" calcext:value-type="float">
            <text:p>0.0980000000000001</text:p>
          </table:table-cell>
          <table:table-cell table:formula="of:=[.B$4]*MAGNET([.$I$1]*[.$L53]+[.B$5]*PI()/180)+(RAND()-0.5)*[.$B$4]*[.$B$13]" office:value-type="float" office:value="-0.0460173313736629" calcext:value-type="float">
            <text:p>-0.05</text:p>
          </table:table-cell>
          <table:table-cell table:formula="of:=[.C$4]*MAGNET([.$I$1]*[.$L53]+[.C$5]*PI()/180)+(RAND()-0.5)*[.$B$4]*[.$B$13]" office:value-type="float" office:value="-0.0494927567770725" calcext:value-type="float">
            <text:p>-0.05</text:p>
          </table:table-cell>
          <table:table-cell table:formula="of:=[.D$4]*MAGNET([.$I$1]*[.$L53]+[.D$5]*PI()/180)+(RAND()-0.5)*[.$B$4]*[.$B$13]" office:value-type="float" office:value="-0.0541073197677244" calcext:value-type="float">
            <text:p>-0.05</text:p>
          </table:table-cell>
          <table:table-cell table:formula="of:=[.E$4]*MAGNET([.$I$1]*[.$L53]+[.E$5]*PI()/180)+(RAND()-0.5)*[.$B$4]*[.$B$13]" office:value-type="float" office:value="-0.0582087849024037" calcext:value-type="float">
            <text:p>-0.06</text:p>
          </table:table-cell>
          <table:table-cell table:formula="of:=[.F$4]*MAGNET([.$I$1]*[.$L53]+[.F$5]*PI()/180)+(RAND()-0.5)*[.$B$4]*[.$B$13]" office:value-type="float" office:value="-0.0624528580552738" calcext:value-type="float">
            <text:p>-0.06</text:p>
          </table:table-cell>
          <table:table-cell table:formula="of:=[.G$4]*MAGNET([.$I$1]*[.$L53]+[.G$5]*PI()/180)+(RAND()-0.5)*[.$B$4]*[.$B$13]" office:value-type="float" office:value="-0.0656305020362257" calcext:value-type="float">
            <text:p>-0.07</text:p>
          </table:table-cell>
          <table:table-cell table:formula="of:=[.H$4]*MAGNET([.$I$1]*[.$L53]+[.H$5]*PI()/180)+(RAND()-0.5)*[.$B$4]*[.$B$13]" office:value-type="float" office:value="-0.0706757441189584" calcext:value-type="float">
            <text:p>-0.07</text:p>
          </table:table-cell>
          <table:table-cell table:formula="of:=[.I$4]*MAGNET([.$I$1]*[.$L53]+[.I$5]*PI()/180)+(RAND()-0.5)*[.$B$4]*[.$B$13]" office:value-type="float" office:value="-0.0741692706768682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3]+0.002" office:value-type="float" office:value="0.1" calcext:value-type="float">
            <text:p>0.1</text:p>
          </table:table-cell>
          <table:table-cell table:formula="of:=[.B$4]*MAGNET([.$I$1]*[.$L54]+[.B$5]*PI()/180)+(RAND()-0.5)*[.$B$4]*[.$B$13]" office:value-type="float" office:value="-0.0457807833432101" calcext:value-type="float">
            <text:p>-0.05</text:p>
          </table:table-cell>
          <table:table-cell table:formula="of:=[.C$4]*MAGNET([.$I$1]*[.$L54]+[.C$5]*PI()/180)+(RAND()-0.5)*[.$B$4]*[.$B$13]" office:value-type="float" office:value="-0.0492985141268315" calcext:value-type="float">
            <text:p>-0.05</text:p>
          </table:table-cell>
          <table:table-cell table:formula="of:=[.D$4]*MAGNET([.$I$1]*[.$L54]+[.D$5]*PI()/180)+(RAND()-0.5)*[.$B$4]*[.$B$13]" office:value-type="float" office:value="-0.0542411932859275" calcext:value-type="float">
            <text:p>-0.05</text:p>
          </table:table-cell>
          <table:table-cell table:formula="of:=[.E$4]*MAGNET([.$I$1]*[.$L54]+[.E$5]*PI()/180)+(RAND()-0.5)*[.$B$4]*[.$B$13]" office:value-type="float" office:value="-0.0573952985272369" calcext:value-type="float">
            <text:p>-0.06</text:p>
          </table:table-cell>
          <table:table-cell table:formula="of:=[.F$4]*MAGNET([.$I$1]*[.$L54]+[.F$5]*PI()/180)+(RAND()-0.5)*[.$B$4]*[.$B$13]" office:value-type="float" office:value="-0.0612521843379205" calcext:value-type="float">
            <text:p>-0.06</text:p>
          </table:table-cell>
          <table:table-cell table:formula="of:=[.G$4]*MAGNET([.$I$1]*[.$L54]+[.G$5]*PI()/180)+(RAND()-0.5)*[.$B$4]*[.$B$13]" office:value-type="float" office:value="-0.0656771420470077" calcext:value-type="float">
            <text:p>-0.07</text:p>
          </table:table-cell>
          <table:table-cell table:formula="of:=[.H$4]*MAGNET([.$I$1]*[.$L54]+[.H$5]*PI()/180)+(RAND()-0.5)*[.$B$4]*[.$B$13]" office:value-type="float" office:value="-0.0704039187564434" calcext:value-type="float">
            <text:p>-0.07</text:p>
          </table:table-cell>
          <table:table-cell table:formula="of:=[.I$4]*MAGNET([.$I$1]*[.$L54]+[.I$5]*PI()/180)+(RAND()-0.5)*[.$B$4]*[.$B$13]" office:value-type="float" office:value="-0.0741040919405192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4]+0.002" office:value-type="float" office:value="0.102" calcext:value-type="float">
            <text:p>0.102</text:p>
          </table:table-cell>
          <table:table-cell table:formula="of:=[.B$4]*MAGNET([.$I$1]*[.$L55]+[.B$5]*PI()/180)+(RAND()-0.5)*[.$B$4]*[.$B$13]" office:value-type="float" office:value="-0.0453301280527041" calcext:value-type="float">
            <text:p>-0.05</text:p>
          </table:table-cell>
          <table:table-cell table:formula="of:=[.C$4]*MAGNET([.$I$1]*[.$L55]+[.C$5]*PI()/180)+(RAND()-0.5)*[.$B$4]*[.$B$13]" office:value-type="float" office:value="-0.0490249812408331" calcext:value-type="float">
            <text:p>-0.05</text:p>
          </table:table-cell>
          <table:table-cell table:formula="of:=[.D$4]*MAGNET([.$I$1]*[.$L55]+[.D$5]*PI()/180)+(RAND()-0.5)*[.$B$4]*[.$B$13]" office:value-type="float" office:value="-0.0534143905377295" calcext:value-type="float">
            <text:p>-0.05</text:p>
          </table:table-cell>
          <table:table-cell table:formula="of:=[.E$4]*MAGNET([.$I$1]*[.$L55]+[.E$5]*PI()/180)+(RAND()-0.5)*[.$B$4]*[.$B$13]" office:value-type="float" office:value="-0.05660833301171" calcext:value-type="float">
            <text:p>-0.06</text:p>
          </table:table-cell>
          <table:table-cell table:formula="of:=[.F$4]*MAGNET([.$I$1]*[.$L55]+[.F$5]*PI()/180)+(RAND()-0.5)*[.$B$4]*[.$B$13]" office:value-type="float" office:value="-0.0613875711533879" calcext:value-type="float">
            <text:p>-0.06</text:p>
          </table:table-cell>
          <table:table-cell table:formula="of:=[.G$4]*MAGNET([.$I$1]*[.$L55]+[.G$5]*PI()/180)+(RAND()-0.5)*[.$B$4]*[.$B$13]" office:value-type="float" office:value="-0.0659556251871755" calcext:value-type="float">
            <text:p>-0.07</text:p>
          </table:table-cell>
          <table:table-cell table:formula="of:=[.H$4]*MAGNET([.$I$1]*[.$L55]+[.H$5]*PI()/180)+(RAND()-0.5)*[.$B$4]*[.$B$13]" office:value-type="float" office:value="-0.0694163280689587" calcext:value-type="float">
            <text:p>-0.07</text:p>
          </table:table-cell>
          <table:table-cell table:formula="of:=[.I$4]*MAGNET([.$I$1]*[.$L55]+[.I$5]*PI()/180)+(RAND()-0.5)*[.$B$4]*[.$B$13]" office:value-type="float" office:value="-0.0734590402361613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5]+0.002" office:value-type="float" office:value="0.104" calcext:value-type="float">
            <text:p>0.104</text:p>
          </table:table-cell>
          <table:table-cell table:formula="of:=[.B$4]*MAGNET([.$I$1]*[.$L56]+[.B$5]*PI()/180)+(RAND()-0.5)*[.$B$4]*[.$B$13]" office:value-type="float" office:value="-0.0450500618444213" calcext:value-type="float">
            <text:p>-0.05</text:p>
          </table:table-cell>
          <table:table-cell table:formula="of:=[.C$4]*MAGNET([.$I$1]*[.$L56]+[.C$5]*PI()/180)+(RAND()-0.5)*[.$B$4]*[.$B$13]" office:value-type="float" office:value="-0.0479959552282713" calcext:value-type="float">
            <text:p>-0.05</text:p>
          </table:table-cell>
          <table:table-cell table:formula="of:=[.D$4]*MAGNET([.$I$1]*[.$L56]+[.D$5]*PI()/180)+(RAND()-0.5)*[.$B$4]*[.$B$13]" office:value-type="float" office:value="-0.0518612486623339" calcext:value-type="float">
            <text:p>-0.05</text:p>
          </table:table-cell>
          <table:table-cell table:formula="of:=[.E$4]*MAGNET([.$I$1]*[.$L56]+[.E$5]*PI()/180)+(RAND()-0.5)*[.$B$4]*[.$B$13]" office:value-type="float" office:value="-0.0553005344124085" calcext:value-type="float">
            <text:p>-0.06</text:p>
          </table:table-cell>
          <table:table-cell table:formula="of:=[.F$4]*MAGNET([.$I$1]*[.$L56]+[.F$5]*PI()/180)+(RAND()-0.5)*[.$B$4]*[.$B$13]" office:value-type="float" office:value="-0.060424725413303" calcext:value-type="float">
            <text:p>-0.06</text:p>
          </table:table-cell>
          <table:table-cell table:formula="of:=[.G$4]*MAGNET([.$I$1]*[.$L56]+[.G$5]*PI()/180)+(RAND()-0.5)*[.$B$4]*[.$B$13]" office:value-type="float" office:value="-0.0646167308132711" calcext:value-type="float">
            <text:p>-0.06</text:p>
          </table:table-cell>
          <table:table-cell table:formula="of:=[.H$4]*MAGNET([.$I$1]*[.$L56]+[.H$5]*PI()/180)+(RAND()-0.5)*[.$B$4]*[.$B$13]" office:value-type="float" office:value="-0.0686296166003768" calcext:value-type="float">
            <text:p>-0.07</text:p>
          </table:table-cell>
          <table:table-cell table:formula="of:=[.I$4]*MAGNET([.$I$1]*[.$L56]+[.I$5]*PI()/180)+(RAND()-0.5)*[.$B$4]*[.$B$13]" office:value-type="float" office:value="-0.0724208081272139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6]+0.002" office:value-type="float" office:value="0.106" calcext:value-type="float">
            <text:p>0.106</text:p>
          </table:table-cell>
          <table:table-cell table:formula="of:=[.B$4]*MAGNET([.$I$1]*[.$L57]+[.B$5]*PI()/180)+(RAND()-0.5)*[.$B$4]*[.$B$13]" office:value-type="float" office:value="-0.0435133771767898" calcext:value-type="float">
            <text:p>-0.04</text:p>
          </table:table-cell>
          <table:table-cell table:formula="of:=[.C$4]*MAGNET([.$I$1]*[.$L57]+[.C$5]*PI()/180)+(RAND()-0.5)*[.$B$4]*[.$B$13]" office:value-type="float" office:value="-0.047217673392269" calcext:value-type="float">
            <text:p>-0.05</text:p>
          </table:table-cell>
          <table:table-cell table:formula="of:=[.D$4]*MAGNET([.$I$1]*[.$L57]+[.D$5]*PI()/180)+(RAND()-0.5)*[.$B$4]*[.$B$13]" office:value-type="float" office:value="-0.0511667586998577" calcext:value-type="float">
            <text:p>-0.05</text:p>
          </table:table-cell>
          <table:table-cell table:formula="of:=[.E$4]*MAGNET([.$I$1]*[.$L57]+[.E$5]*PI()/180)+(RAND()-0.5)*[.$B$4]*[.$B$13]" office:value-type="float" office:value="-0.0533378050946439" calcext:value-type="float">
            <text:p>-0.05</text:p>
          </table:table-cell>
          <table:table-cell table:formula="of:=[.F$4]*MAGNET([.$I$1]*[.$L57]+[.F$5]*PI()/180)+(RAND()-0.5)*[.$B$4]*[.$B$13]" office:value-type="float" office:value="-0.0587304274475803" calcext:value-type="float">
            <text:p>-0.06</text:p>
          </table:table-cell>
          <table:table-cell table:formula="of:=[.G$4]*MAGNET([.$I$1]*[.$L57]+[.G$5]*PI()/180)+(RAND()-0.5)*[.$B$4]*[.$B$13]" office:value-type="float" office:value="-0.0622478291328559" calcext:value-type="float">
            <text:p>-0.06</text:p>
          </table:table-cell>
          <table:table-cell table:formula="of:=[.H$4]*MAGNET([.$I$1]*[.$L57]+[.H$5]*PI()/180)+(RAND()-0.5)*[.$B$4]*[.$B$13]" office:value-type="float" office:value="-0.0666054465535671" calcext:value-type="float">
            <text:p>-0.07</text:p>
          </table:table-cell>
          <table:table-cell table:formula="of:=[.I$4]*MAGNET([.$I$1]*[.$L57]+[.I$5]*PI()/180)+(RAND()-0.5)*[.$B$4]*[.$B$13]" office:value-type="float" office:value="-0.0697005705124048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7]+0.002" office:value-type="float" office:value="0.108" calcext:value-type="float">
            <text:p>0.108</text:p>
          </table:table-cell>
          <table:table-cell table:formula="of:=[.B$4]*MAGNET([.$I$1]*[.$L58]+[.B$5]*PI()/180)+(RAND()-0.5)*[.$B$4]*[.$B$13]" office:value-type="float" office:value="-0.0407417607836957" calcext:value-type="float">
            <text:p>-0.04</text:p>
          </table:table-cell>
          <table:table-cell table:formula="of:=[.C$4]*MAGNET([.$I$1]*[.$L58]+[.C$5]*PI()/180)+(RAND()-0.5)*[.$B$4]*[.$B$13]" office:value-type="float" office:value="-0.044870529082044" calcext:value-type="float">
            <text:p>-0.04</text:p>
          </table:table-cell>
          <table:table-cell table:formula="of:=[.D$4]*MAGNET([.$I$1]*[.$L58]+[.D$5]*PI()/180)+(RAND()-0.5)*[.$B$4]*[.$B$13]" office:value-type="float" office:value="-0.0482711510742886" calcext:value-type="float">
            <text:p>-0.05</text:p>
          </table:table-cell>
          <table:table-cell table:formula="of:=[.E$4]*MAGNET([.$I$1]*[.$L58]+[.E$5]*PI()/180)+(RAND()-0.5)*[.$B$4]*[.$B$13]" office:value-type="float" office:value="-0.0491149693024545" calcext:value-type="float">
            <text:p>-0.05</text:p>
          </table:table-cell>
          <table:table-cell table:formula="of:=[.F$4]*MAGNET([.$I$1]*[.$L58]+[.F$5]*PI()/180)+(RAND()-0.5)*[.$B$4]*[.$B$13]" office:value-type="float" office:value="-0.0554416661985416" calcext:value-type="float">
            <text:p>-0.06</text:p>
          </table:table-cell>
          <table:table-cell table:formula="of:=[.G$4]*MAGNET([.$I$1]*[.$L58]+[.G$5]*PI()/180)+(RAND()-0.5)*[.$B$4]*[.$B$13]" office:value-type="float" office:value="-0.0587766480437927" calcext:value-type="float">
            <text:p>-0.06</text:p>
          </table:table-cell>
          <table:table-cell table:formula="of:=[.H$4]*MAGNET([.$I$1]*[.$L58]+[.H$5]*PI()/180)+(RAND()-0.5)*[.$B$4]*[.$B$13]" office:value-type="float" office:value="-0.0623114498159704" calcext:value-type="float">
            <text:p>-0.06</text:p>
          </table:table-cell>
          <table:table-cell table:formula="of:=[.I$4]*MAGNET([.$I$1]*[.$L58]+[.I$5]*PI()/180)+(RAND()-0.5)*[.$B$4]*[.$B$13]" office:value-type="float" office:value="-0.065993892348139" calcext:value-type="float">
            <text:p>-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8]+0.002" office:value-type="float" office:value="0.11" calcext:value-type="float">
            <text:p>0.11</text:p>
          </table:table-cell>
          <table:table-cell table:formula="of:=[.B$4]*MAGNET([.$I$1]*[.$L59]+[.B$5]*PI()/180)+(RAND()-0.5)*[.$B$4]*[.$B$13]" office:value-type="float" office:value="-0.0378054661638987" calcext:value-type="float">
            <text:p>-0.04</text:p>
          </table:table-cell>
          <table:table-cell table:formula="of:=[.C$4]*MAGNET([.$I$1]*[.$L59]+[.C$5]*PI()/180)+(RAND()-0.5)*[.$B$4]*[.$B$13]" office:value-type="float" office:value="-0.041331594692912" calcext:value-type="float">
            <text:p>-0.04</text:p>
          </table:table-cell>
          <table:table-cell table:formula="of:=[.D$4]*MAGNET([.$I$1]*[.$L59]+[.D$5]*PI()/180)+(RAND()-0.5)*[.$B$4]*[.$B$13]" office:value-type="float" office:value="-0.0449306302719572" calcext:value-type="float">
            <text:p>-0.04</text:p>
          </table:table-cell>
          <table:table-cell table:formula="of:=[.E$4]*MAGNET([.$I$1]*[.$L59]+[.E$5]*PI()/180)+(RAND()-0.5)*[.$B$4]*[.$B$13]" office:value-type="float" office:value="-0.0446127913408271" calcext:value-type="float">
            <text:p>-0.04</text:p>
          </table:table-cell>
          <table:table-cell table:formula="of:=[.F$4]*MAGNET([.$I$1]*[.$L59]+[.F$5]*PI()/180)+(RAND()-0.5)*[.$B$4]*[.$B$13]" office:value-type="float" office:value="-0.0512719814222857" calcext:value-type="float">
            <text:p>-0.05</text:p>
          </table:table-cell>
          <table:table-cell table:formula="of:=[.G$4]*MAGNET([.$I$1]*[.$L59]+[.G$5]*PI()/180)+(RAND()-0.5)*[.$B$4]*[.$B$13]" office:value-type="float" office:value="-0.0546924417435783" calcext:value-type="float">
            <text:p>-0.05</text:p>
          </table:table-cell>
          <table:table-cell table:formula="of:=[.H$4]*MAGNET([.$I$1]*[.$L59]+[.H$5]*PI()/180)+(RAND()-0.5)*[.$B$4]*[.$B$13]" office:value-type="float" office:value="-0.0586290124619392" calcext:value-type="float">
            <text:p>-0.06</text:p>
          </table:table-cell>
          <table:table-cell table:formula="of:=[.I$4]*MAGNET([.$I$1]*[.$L59]+[.I$5]*PI()/180)+(RAND()-0.5)*[.$B$4]*[.$B$13]" office:value-type="float" office:value="-0.0622721582836867" calcext:value-type="float">
            <text:p>-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59]+0.002" office:value-type="float" office:value="0.112" calcext:value-type="float">
            <text:p>0.112</text:p>
          </table:table-cell>
          <table:table-cell table:formula="of:=[.B$4]*MAGNET([.$I$1]*[.$L60]+[.B$5]*PI()/180)+(RAND()-0.5)*[.$B$4]*[.$B$13]" office:value-type="float" office:value="-0.0351910630181451" calcext:value-type="float">
            <text:p>-0.04</text:p>
          </table:table-cell>
          <table:table-cell table:formula="of:=[.C$4]*MAGNET([.$I$1]*[.$L60]+[.C$5]*PI()/180)+(RAND()-0.5)*[.$B$4]*[.$B$13]" office:value-type="float" office:value="-0.0381115211459969" calcext:value-type="float">
            <text:p>-0.04</text:p>
          </table:table-cell>
          <table:table-cell table:formula="of:=[.D$4]*MAGNET([.$I$1]*[.$L60]+[.D$5]*PI()/180)+(RAND()-0.5)*[.$B$4]*[.$B$13]" office:value-type="float" office:value="-0.0399682598710041" calcext:value-type="float">
            <text:p>-0.04</text:p>
          </table:table-cell>
          <table:table-cell table:formula="of:=[.E$4]*MAGNET([.$I$1]*[.$L60]+[.E$5]*PI()/180)+(RAND()-0.5)*[.$B$4]*[.$B$13]" office:value-type="float" office:value="-0.0393918703442271" calcext:value-type="float">
            <text:p>-0.04</text:p>
          </table:table-cell>
          <table:table-cell table:formula="of:=[.F$4]*MAGNET([.$I$1]*[.$L60]+[.F$5]*PI()/180)+(RAND()-0.5)*[.$B$4]*[.$B$13]" office:value-type="float" office:value="-0.0460768851286038" calcext:value-type="float">
            <text:p>-0.05</text:p>
          </table:table-cell>
          <table:table-cell table:formula="of:=[.G$4]*MAGNET([.$I$1]*[.$L60]+[.G$5]*PI()/180)+(RAND()-0.5)*[.$B$4]*[.$B$13]" office:value-type="float" office:value="-0.0499577254630156" calcext:value-type="float">
            <text:p>-0.05</text:p>
          </table:table-cell>
          <table:table-cell table:formula="of:=[.H$4]*MAGNET([.$I$1]*[.$L60]+[.H$5]*PI()/180)+(RAND()-0.5)*[.$B$4]*[.$B$13]" office:value-type="float" office:value="-0.0532479676035987" calcext:value-type="float">
            <text:p>-0.05</text:p>
          </table:table-cell>
          <table:table-cell table:formula="of:=[.I$4]*MAGNET([.$I$1]*[.$L60]+[.I$5]*PI()/180)+(RAND()-0.5)*[.$B$4]*[.$B$13]" office:value-type="float" office:value="-0.0560974150256658" calcext:value-type="float">
            <text:p>-0.06</text:p>
          </table:table-cell>
          <table:table-cell table:style-name="Default"/>
          <table:table-cell table:style-name="Default">
            <draw:frame table:end-cell-address="plot.AL92" table:end-x="0.0622in" table:end-y="0.1972in" draw:z-index="2" draw:name="Chart 5" draw:style-name="gr1" draw:text-style-name="P1" svg:width="10.6528in" svg:height="6.8327in" svg:x="0.1094in" svg:y="0.0311in">
              <draw:object draw:notify-on-update-of-ranges="plot.M3:plot.M3 plot.M4:plot.M104 plot.L4:plot.L104 plot.N3:plot.N3 plot.N4:plot.N104 plot.L4:plot.L104 plot.O3:plot.O3 plot.O4:plot.O104 plot.L4:plot.L104 plot.P3:plot.P3 plot.P4:plot.P104 plot.L4:plot.L104 plot.Q3:plot.Q3 plot.Q4:plot.Q104 plot.L4:plot.L104 plot.R3:plot.R3 plot.R4:plot.R104 plot.L4:plot.L104 plot.S3:plot.S3 plot.S4:plot.S104 plot.L4:plot.L104 plot.T3:plot.T3 plot.T4:plot.T104 plot.L4:plot.L10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Default" table:number-columns-repeated="16362"/>
        </table:table-row>
        <table:table-row table:style-name="ro1">
          <table:table-cell table:number-columns-repeated="11"/>
          <table:table-cell table:formula="of:=[.L60]+0.002" office:value-type="float" office:value="0.114" calcext:value-type="float">
            <text:p>0.114</text:p>
          </table:table-cell>
          <table:table-cell table:formula="of:=[.B$4]*MAGNET([.$I$1]*[.$L61]+[.B$5]*PI()/180)+(RAND()-0.5)*[.$B$4]*[.$B$13]" office:value-type="float" office:value="-0.0295432594680165" calcext:value-type="float">
            <text:p>-0.03</text:p>
          </table:table-cell>
          <table:table-cell table:formula="of:=[.C$4]*MAGNET([.$I$1]*[.$L61]+[.C$5]*PI()/180)+(RAND()-0.5)*[.$B$4]*[.$B$13]" office:value-type="float" office:value="-0.032467383004445" calcext:value-type="float">
            <text:p>-0.03</text:p>
          </table:table-cell>
          <table:table-cell table:formula="of:=[.D$4]*MAGNET([.$I$1]*[.$L61]+[.D$5]*PI()/180)+(RAND()-0.5)*[.$B$4]*[.$B$13]" office:value-type="float" office:value="-0.0351393100669179" calcext:value-type="float">
            <text:p>-0.04</text:p>
          </table:table-cell>
          <table:table-cell table:formula="of:=[.E$4]*MAGNET([.$I$1]*[.$L61]+[.E$5]*PI()/180)+(RAND()-0.5)*[.$B$4]*[.$B$13]" office:value-type="float" office:value="-0.0325448336068428" calcext:value-type="float">
            <text:p>-0.03</text:p>
          </table:table-cell>
          <table:table-cell table:formula="of:=[.F$4]*MAGNET([.$I$1]*[.$L61]+[.F$5]*PI()/180)+(RAND()-0.5)*[.$B$4]*[.$B$13]" office:value-type="float" office:value="-0.0408143034962452" calcext:value-type="float">
            <text:p>-0.04</text:p>
          </table:table-cell>
          <table:table-cell table:formula="of:=[.G$4]*MAGNET([.$I$1]*[.$L61]+[.G$5]*PI()/180)+(RAND()-0.5)*[.$B$4]*[.$B$13]" office:value-type="float" office:value="-0.04346769411915" calcext:value-type="float">
            <text:p>-0.04</text:p>
          </table:table-cell>
          <table:table-cell table:formula="of:=[.H$4]*MAGNET([.$I$1]*[.$L61]+[.H$5]*PI()/180)+(RAND()-0.5)*[.$B$4]*[.$B$13]" office:value-type="float" office:value="-0.0454589129944716" calcext:value-type="float">
            <text:p>-0.05</text:p>
          </table:table-cell>
          <table:table-cell table:formula="of:=[.I$4]*MAGNET([.$I$1]*[.$L61]+[.I$5]*PI()/180)+(RAND()-0.5)*[.$B$4]*[.$B$13]" office:value-type="float" office:value="-0.0485661048249013" calcext:value-type="float">
            <text:p>-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1]+0.002" office:value-type="float" office:value="0.116" calcext:value-type="float">
            <text:p>0.116</text:p>
          </table:table-cell>
          <table:table-cell table:formula="of:=[.B$4]*MAGNET([.$I$1]*[.$L62]+[.B$5]*PI()/180)+(RAND()-0.5)*[.$B$4]*[.$B$13]" office:value-type="float" office:value="-0.0245030140137272" calcext:value-type="float">
            <text:p>-0.02</text:p>
          </table:table-cell>
          <table:table-cell table:formula="of:=[.C$4]*MAGNET([.$I$1]*[.$L62]+[.C$5]*PI()/180)+(RAND()-0.5)*[.$B$4]*[.$B$13]" office:value-type="float" office:value="-0.0264552426162018" calcext:value-type="float">
            <text:p>-0.03</text:p>
          </table:table-cell>
          <table:table-cell table:formula="of:=[.D$4]*MAGNET([.$I$1]*[.$L62]+[.D$5]*PI()/180)+(RAND()-0.5)*[.$B$4]*[.$B$13]" office:value-type="float" office:value="-0.0284323192180358" calcext:value-type="float">
            <text:p>-0.03</text:p>
          </table:table-cell>
          <table:table-cell table:formula="of:=[.E$4]*MAGNET([.$I$1]*[.$L62]+[.E$5]*PI()/180)+(RAND()-0.5)*[.$B$4]*[.$B$13]" office:value-type="float" office:value="-0.0266476511895293" calcext:value-type="float">
            <text:p>-0.03</text:p>
          </table:table-cell>
          <table:table-cell table:formula="of:=[.F$4]*MAGNET([.$I$1]*[.$L62]+[.F$5]*PI()/180)+(RAND()-0.5)*[.$B$4]*[.$B$13]" office:value-type="float" office:value="-0.0331533257577111" calcext:value-type="float">
            <text:p>-0.03</text:p>
          </table:table-cell>
          <table:table-cell table:formula="of:=[.G$4]*MAGNET([.$I$1]*[.$L62]+[.G$5]*PI()/180)+(RAND()-0.5)*[.$B$4]*[.$B$13]" office:value-type="float" office:value="-0.0357695286733109" calcext:value-type="float">
            <text:p>-0.04</text:p>
          </table:table-cell>
          <table:table-cell table:formula="of:=[.H$4]*MAGNET([.$I$1]*[.$L62]+[.H$5]*PI()/180)+(RAND()-0.5)*[.$B$4]*[.$B$13]" office:value-type="float" office:value="-0.0372196709704254" calcext:value-type="float">
            <text:p>-0.04</text:p>
          </table:table-cell>
          <table:table-cell table:formula="of:=[.I$4]*MAGNET([.$I$1]*[.$L62]+[.I$5]*PI()/180)+(RAND()-0.5)*[.$B$4]*[.$B$13]" office:value-type="float" office:value="-0.0389941596525713" calcext:value-type="float">
            <text:p>-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2]+0.002" office:value-type="float" office:value="0.118" calcext:value-type="float">
            <text:p>0.118</text:p>
          </table:table-cell>
          <table:table-cell table:formula="of:=[.B$4]*MAGNET([.$I$1]*[.$L63]+[.B$5]*PI()/180)+(RAND()-0.5)*[.$B$4]*[.$B$13]" office:value-type="float" office:value="-0.0194886845111786" calcext:value-type="float">
            <text:p>-0.02</text:p>
          </table:table-cell>
          <table:table-cell table:formula="of:=[.C$4]*MAGNET([.$I$1]*[.$L63]+[.C$5]*PI()/180)+(RAND()-0.5)*[.$B$4]*[.$B$13]" office:value-type="float" office:value="-0.0210683929467992" calcext:value-type="float">
            <text:p>-0.02</text:p>
          </table:table-cell>
          <table:table-cell table:formula="of:=[.D$4]*MAGNET([.$I$1]*[.$L63]+[.D$5]*PI()/180)+(RAND()-0.5)*[.$B$4]*[.$B$13]" office:value-type="float" office:value="-0.0224645738156541" calcext:value-type="float">
            <text:p>-0.02</text:p>
          </table:table-cell>
          <table:table-cell table:formula="of:=[.E$4]*MAGNET([.$I$1]*[.$L63]+[.E$5]*PI()/180)+(RAND()-0.5)*[.$B$4]*[.$B$13]" office:value-type="float" office:value="-0.0192720100733451" calcext:value-type="float">
            <text:p>-0.02</text:p>
          </table:table-cell>
          <table:table-cell table:formula="of:=[.F$4]*MAGNET([.$I$1]*[.$L63]+[.F$5]*PI()/180)+(RAND()-0.5)*[.$B$4]*[.$B$13]" office:value-type="float" office:value="-0.0258590302660914" calcext:value-type="float">
            <text:p>-0.03</text:p>
          </table:table-cell>
          <table:table-cell table:formula="of:=[.G$4]*MAGNET([.$I$1]*[.$L63]+[.G$5]*PI()/180)+(RAND()-0.5)*[.$B$4]*[.$B$13]" office:value-type="float" office:value="-0.0270357330737393" calcext:value-type="float">
            <text:p>-0.03</text:p>
          </table:table-cell>
          <table:table-cell table:formula="of:=[.H$4]*MAGNET([.$I$1]*[.$L63]+[.H$5]*PI()/180)+(RAND()-0.5)*[.$B$4]*[.$B$13]" office:value-type="float" office:value="-0.0281776747648857" calcext:value-type="float">
            <text:p>-0.03</text:p>
          </table:table-cell>
          <table:table-cell table:formula="of:=[.I$4]*MAGNET([.$I$1]*[.$L63]+[.I$5]*PI()/180)+(RAND()-0.5)*[.$B$4]*[.$B$13]" office:value-type="float" office:value="-0.0303622587710715" calcext:value-type="float">
            <text:p>-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3]+0.002" office:value-type="float" office:value="0.12" calcext:value-type="float">
            <text:p>0.12</text:p>
          </table:table-cell>
          <table:table-cell table:formula="of:=[.B$4]*MAGNET([.$I$1]*[.$L64]+[.B$5]*PI()/180)+(RAND()-0.5)*[.$B$4]*[.$B$13]" office:value-type="float" office:value="-0.0125393860594146" calcext:value-type="float">
            <text:p>-0.01</text:p>
          </table:table-cell>
          <table:table-cell table:formula="of:=[.C$4]*MAGNET([.$I$1]*[.$L64]+[.C$5]*PI()/180)+(RAND()-0.5)*[.$B$4]*[.$B$13]" office:value-type="float" office:value="-0.0138370480845864" calcext:value-type="float">
            <text:p>-0.01</text:p>
          </table:table-cell>
          <table:table-cell table:formula="of:=[.D$4]*MAGNET([.$I$1]*[.$L64]+[.D$5]*PI()/180)+(RAND()-0.5)*[.$B$4]*[.$B$13]" office:value-type="float" office:value="-0.0152376237619729" calcext:value-type="float">
            <text:p>-0.02</text:p>
          </table:table-cell>
          <table:table-cell table:formula="of:=[.E$4]*MAGNET([.$I$1]*[.$L64]+[.E$5]*PI()/180)+(RAND()-0.5)*[.$B$4]*[.$B$13]" office:value-type="float" office:value="-0.011137256545816" calcext:value-type="float">
            <text:p>-0.01</text:p>
          </table:table-cell>
          <table:table-cell table:formula="of:=[.F$4]*MAGNET([.$I$1]*[.$L64]+[.F$5]*PI()/180)+(RAND()-0.5)*[.$B$4]*[.$B$13]" office:value-type="float" office:value="-0.017203872571743" calcext:value-type="float">
            <text:p>-0.02</text:p>
          </table:table-cell>
          <table:table-cell table:formula="of:=[.G$4]*MAGNET([.$I$1]*[.$L64]+[.G$5]*PI()/180)+(RAND()-0.5)*[.$B$4]*[.$B$13]" office:value-type="float" office:value="-0.0186259058426478" calcext:value-type="float">
            <text:p>-0.02</text:p>
          </table:table-cell>
          <table:table-cell table:formula="of:=[.H$4]*MAGNET([.$I$1]*[.$L64]+[.H$5]*PI()/180)+(RAND()-0.5)*[.$B$4]*[.$B$13]" office:value-type="float" office:value="-0.0197922702898215" calcext:value-type="float">
            <text:p>-0.02</text:p>
          </table:table-cell>
          <table:table-cell table:formula="of:=[.I$4]*MAGNET([.$I$1]*[.$L64]+[.I$5]*PI()/180)+(RAND()-0.5)*[.$B$4]*[.$B$13]" office:value-type="float" office:value="-0.0210786447260561" calcext:value-type="float">
            <text:p>-0.02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4]+0.002" office:value-type="float" office:value="0.122" calcext:value-type="float">
            <text:p>0.122</text:p>
          </table:table-cell>
          <table:table-cell table:formula="of:=[.B$4]*MAGNET([.$I$1]*[.$L65]+[.B$5]*PI()/180)+(RAND()-0.5)*[.$B$4]*[.$B$13]" office:value-type="float" office:value="-0.00716487065611932" calcext:value-type="float">
            <text:p>-0.01</text:p>
          </table:table-cell>
          <table:table-cell table:formula="of:=[.C$4]*MAGNET([.$I$1]*[.$L65]+[.C$5]*PI()/180)+(RAND()-0.5)*[.$B$4]*[.$B$13]" office:value-type="float" office:value="-0.00747984790777278" calcext:value-type="float">
            <text:p>-0.01</text:p>
          </table:table-cell>
          <table:table-cell table:formula="of:=[.D$4]*MAGNET([.$I$1]*[.$L65]+[.D$5]*PI()/180)+(RAND()-0.5)*[.$B$4]*[.$B$13]" office:value-type="float" office:value="-0.0082221853223502" calcext:value-type="float">
            <text:p>-0.01</text:p>
          </table:table-cell>
          <table:table-cell table:formula="of:=[.E$4]*MAGNET([.$I$1]*[.$L65]+[.E$5]*PI()/180)+(RAND()-0.5)*[.$B$4]*[.$B$13]" office:value-type="float" office:value="-0.00528009601262967" calcext:value-type="float">
            <text:p>-0.01</text:p>
          </table:table-cell>
          <table:table-cell table:formula="of:=[.F$4]*MAGNET([.$I$1]*[.$L65]+[.F$5]*PI()/180)+(RAND()-0.5)*[.$B$4]*[.$B$13]" office:value-type="float" office:value="-0.0093192364979294" calcext:value-type="float">
            <text:p>-0.01</text:p>
          </table:table-cell>
          <table:table-cell table:formula="of:=[.G$4]*MAGNET([.$I$1]*[.$L65]+[.G$5]*PI()/180)+(RAND()-0.5)*[.$B$4]*[.$B$13]" office:value-type="float" office:value="-0.0109983500559486" calcext:value-type="float">
            <text:p>-0.01</text:p>
          </table:table-cell>
          <table:table-cell table:formula="of:=[.H$4]*MAGNET([.$I$1]*[.$L65]+[.H$5]*PI()/180)+(RAND()-0.5)*[.$B$4]*[.$B$13]" office:value-type="float" office:value="-0.0105832376368791" calcext:value-type="float">
            <text:p>-0.01</text:p>
          </table:table-cell>
          <table:table-cell table:formula="of:=[.I$4]*MAGNET([.$I$1]*[.$L65]+[.I$5]*PI()/180)+(RAND()-0.5)*[.$B$4]*[.$B$13]" office:value-type="float" office:value="-0.0112210604055722" calcext:value-type="float">
            <text:p>-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5]+0.002" office:value-type="float" office:value="0.124" calcext:value-type="float">
            <text:p>0.124</text:p>
          </table:table-cell>
          <table:table-cell table:formula="of:=[.B$4]*MAGNET([.$I$1]*[.$L66]+[.B$5]*PI()/180)+(RAND()-0.5)*[.$B$4]*[.$B$13]" office:value-type="float" office:value="-0.00265192072436116" calcext:value-type="float">
            <text:p>0.00</text:p>
          </table:table-cell>
          <table:table-cell table:formula="of:=[.C$4]*MAGNET([.$I$1]*[.$L66]+[.C$5]*PI()/180)+(RAND()-0.5)*[.$B$4]*[.$B$13]" office:value-type="float" office:value="-0.00265342619236822" calcext:value-type="float">
            <text:p>0.00</text:p>
          </table:table-cell>
          <table:table-cell table:formula="of:=[.D$4]*MAGNET([.$I$1]*[.$L66]+[.D$5]*PI()/180)+(RAND()-0.5)*[.$B$4]*[.$B$13]" office:value-type="float" office:value="-0.00305000281126785" calcext:value-type="float">
            <text:p>0.00</text:p>
          </table:table-cell>
          <table:table-cell table:formula="of:=[.E$4]*MAGNET([.$I$1]*[.$L66]+[.E$5]*PI()/180)+(RAND()-0.5)*[.$B$4]*[.$B$13]" office:value-type="float" office:value="0.00117161891050399" calcext:value-type="float">
            <text:p>0.00</text:p>
          </table:table-cell>
          <table:table-cell table:formula="of:=[.F$4]*MAGNET([.$I$1]*[.$L66]+[.F$5]*PI()/180)+(RAND()-0.5)*[.$B$4]*[.$B$13]" office:value-type="float" office:value="-0.00243867732417278" calcext:value-type="float">
            <text:p>0.00</text:p>
          </table:table-cell>
          <table:table-cell table:formula="of:=[.G$4]*MAGNET([.$I$1]*[.$L66]+[.G$5]*PI()/180)+(RAND()-0.5)*[.$B$4]*[.$B$13]" office:value-type="float" office:value="-0.00364024134144896" calcext:value-type="float">
            <text:p>0.00</text:p>
          </table:table-cell>
          <table:table-cell table:formula="of:=[.H$4]*MAGNET([.$I$1]*[.$L66]+[.H$5]*PI()/180)+(RAND()-0.5)*[.$B$4]*[.$B$13]" office:value-type="float" office:value="-0.00278314084062805" calcext:value-type="float">
            <text:p>0.00</text:p>
          </table:table-cell>
          <table:table-cell table:formula="of:=[.I$4]*MAGNET([.$I$1]*[.$L66]+[.I$5]*PI()/180)+(RAND()-0.5)*[.$B$4]*[.$B$13]" office:value-type="float" office:value="-0.00306263447730673" calcext:value-type="float">
            <text:p>0.00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6]+0.002" office:value-type="float" office:value="0.126" calcext:value-type="float">
            <text:p>0.126</text:p>
          </table:table-cell>
          <table:table-cell table:formula="of:=[.B$4]*MAGNET([.$I$1]*[.$L67]+[.B$5]*PI()/180)+(RAND()-0.5)*[.$B$4]*[.$B$13]" office:value-type="float" office:value="0.00284115650900799" calcext:value-type="float">
            <text:p>0.00</text:p>
          </table:table-cell>
          <table:table-cell table:formula="of:=[.C$4]*MAGNET([.$I$1]*[.$L67]+[.C$5]*PI()/180)+(RAND()-0.5)*[.$B$4]*[.$B$13]" office:value-type="float" office:value="0.00207802551118985" calcext:value-type="float">
            <text:p>0.00</text:p>
          </table:table-cell>
          <table:table-cell table:formula="of:=[.D$4]*MAGNET([.$I$1]*[.$L67]+[.D$5]*PI()/180)+(RAND()-0.5)*[.$B$4]*[.$B$13]" office:value-type="float" office:value="0.00312490369882005" calcext:value-type="float">
            <text:p>0.00</text:p>
          </table:table-cell>
          <table:table-cell table:formula="of:=[.E$4]*MAGNET([.$I$1]*[.$L67]+[.E$5]*PI()/180)+(RAND()-0.5)*[.$B$4]*[.$B$13]" office:value-type="float" office:value="0.00740545519864055" calcext:value-type="float">
            <text:p>0.01</text:p>
          </table:table-cell>
          <table:table-cell table:formula="of:=[.F$4]*MAGNET([.$I$1]*[.$L67]+[.F$5]*PI()/180)+(RAND()-0.5)*[.$B$4]*[.$B$13]" office:value-type="float" office:value="0.00322033242815412" calcext:value-type="float">
            <text:p>0.00</text:p>
          </table:table-cell>
          <table:table-cell table:formula="of:=[.G$4]*MAGNET([.$I$1]*[.$L67]+[.G$5]*PI()/180)+(RAND()-0.5)*[.$B$4]*[.$B$13]" office:value-type="float" office:value="0.00379966932669434" calcext:value-type="float">
            <text:p>0.00</text:p>
          </table:table-cell>
          <table:table-cell table:formula="of:=[.H$4]*MAGNET([.$I$1]*[.$L67]+[.H$5]*PI()/180)+(RAND()-0.5)*[.$B$4]*[.$B$13]" office:value-type="float" office:value="0.00279005772522325" calcext:value-type="float">
            <text:p>0.00</text:p>
          </table:table-cell>
          <table:table-cell table:formula="of:=[.I$4]*MAGNET([.$I$1]*[.$L67]+[.I$5]*PI()/180)+(RAND()-0.5)*[.$B$4]*[.$B$13]" office:value-type="float" office:value="0.00333024248505262" calcext:value-type="float">
            <text:p>0.00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7]+0.002" office:value-type="float" office:value="0.128" calcext:value-type="float">
            <text:p>0.128</text:p>
          </table:table-cell>
          <table:table-cell table:formula="of:=[.B$4]*MAGNET([.$I$1]*[.$L68]+[.B$5]*PI()/180)+(RAND()-0.5)*[.$B$4]*[.$B$13]" office:value-type="float" office:value="0.00688272192360169" calcext:value-type="float">
            <text:p>0.01</text:p>
          </table:table-cell>
          <table:table-cell table:formula="of:=[.C$4]*MAGNET([.$I$1]*[.$L68]+[.C$5]*PI()/180)+(RAND()-0.5)*[.$B$4]*[.$B$13]" office:value-type="float" office:value="0.00854428000453107" calcext:value-type="float">
            <text:p>0.01</text:p>
          </table:table-cell>
          <table:table-cell table:formula="of:=[.D$4]*MAGNET([.$I$1]*[.$L68]+[.D$5]*PI()/180)+(RAND()-0.5)*[.$B$4]*[.$B$13]" office:value-type="float" office:value="0.00861095761319714" calcext:value-type="float">
            <text:p>0.01</text:p>
          </table:table-cell>
          <table:table-cell table:formula="of:=[.E$4]*MAGNET([.$I$1]*[.$L68]+[.E$5]*PI()/180)+(RAND()-0.5)*[.$B$4]*[.$B$13]" office:value-type="float" office:value="0.0144693593684661" calcext:value-type="float">
            <text:p>0.01</text:p>
          </table:table-cell>
          <table:table-cell table:formula="of:=[.F$4]*MAGNET([.$I$1]*[.$L68]+[.F$5]*PI()/180)+(RAND()-0.5)*[.$B$4]*[.$B$13]" office:value-type="float" office:value="0.00913672204641948" calcext:value-type="float">
            <text:p>0.01</text:p>
          </table:table-cell>
          <table:table-cell table:formula="of:=[.G$4]*MAGNET([.$I$1]*[.$L68]+[.G$5]*PI()/180)+(RAND()-0.5)*[.$B$4]*[.$B$13]" office:value-type="float" office:value="0.0107767274582736" calcext:value-type="float">
            <text:p>0.01</text:p>
          </table:table-cell>
          <table:table-cell table:formula="of:=[.H$4]*MAGNET([.$I$1]*[.$L68]+[.H$5]*PI()/180)+(RAND()-0.5)*[.$B$4]*[.$B$13]" office:value-type="float" office:value="0.0105815326103073" calcext:value-type="float">
            <text:p>0.01</text:p>
          </table:table-cell>
          <table:table-cell table:formula="of:=[.I$4]*MAGNET([.$I$1]*[.$L68]+[.I$5]*PI()/180)+(RAND()-0.5)*[.$B$4]*[.$B$13]" office:value-type="float" office:value="0.0114323342001488" calcext:value-type="float">
            <text:p>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8]+0.002" office:value-type="float" office:value="0.13" calcext:value-type="float">
            <text:p>0.13</text:p>
          </table:table-cell>
          <table:table-cell table:formula="of:=[.B$4]*MAGNET([.$I$1]*[.$L69]+[.B$5]*PI()/180)+(RAND()-0.5)*[.$B$4]*[.$B$13]" office:value-type="float" office:value="0.0135581787556438" calcext:value-type="float">
            <text:p>0.01</text:p>
          </table:table-cell>
          <table:table-cell table:formula="of:=[.C$4]*MAGNET([.$I$1]*[.$L69]+[.C$5]*PI()/180)+(RAND()-0.5)*[.$B$4]*[.$B$13]" office:value-type="float" office:value="0.0139506591679975" calcext:value-type="float">
            <text:p>0.01</text:p>
          </table:table-cell>
          <table:table-cell table:formula="of:=[.D$4]*MAGNET([.$I$1]*[.$L69]+[.D$5]*PI()/180)+(RAND()-0.5)*[.$B$4]*[.$B$13]" office:value-type="float" office:value="0.0152634308713113" calcext:value-type="float">
            <text:p>0.02</text:p>
          </table:table-cell>
          <table:table-cell table:formula="of:=[.E$4]*MAGNET([.$I$1]*[.$L69]+[.E$5]*PI()/180)+(RAND()-0.5)*[.$B$4]*[.$B$13]" office:value-type="float" office:value="0.0217853331731222" calcext:value-type="float">
            <text:p>0.02</text:p>
          </table:table-cell>
          <table:table-cell table:formula="of:=[.F$4]*MAGNET([.$I$1]*[.$L69]+[.F$5]*PI()/180)+(RAND()-0.5)*[.$B$4]*[.$B$13]" office:value-type="float" office:value="0.017759379076488" calcext:value-type="float">
            <text:p>0.02</text:p>
          </table:table-cell>
          <table:table-cell table:formula="of:=[.G$4]*MAGNET([.$I$1]*[.$L69]+[.G$5]*PI()/180)+(RAND()-0.5)*[.$B$4]*[.$B$13]" office:value-type="float" office:value="0.0192505196061094" calcext:value-type="float">
            <text:p>0.02</text:p>
          </table:table-cell>
          <table:table-cell table:formula="of:=[.H$4]*MAGNET([.$I$1]*[.$L69]+[.H$5]*PI()/180)+(RAND()-0.5)*[.$B$4]*[.$B$13]" office:value-type="float" office:value="0.0191463346644075" calcext:value-type="float">
            <text:p>0.02</text:p>
          </table:table-cell>
          <table:table-cell table:formula="of:=[.I$4]*MAGNET([.$I$1]*[.$L69]+[.I$5]*PI()/180)+(RAND()-0.5)*[.$B$4]*[.$B$13]" office:value-type="float" office:value="0.0210313739326137" calcext:value-type="float">
            <text:p>0.02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69]+0.002" office:value-type="float" office:value="0.132" calcext:value-type="float">
            <text:p>0.132</text:p>
          </table:table-cell>
          <table:table-cell table:formula="of:=[.B$4]*MAGNET([.$I$1]*[.$L70]+[.B$5]*PI()/180)+(RAND()-0.5)*[.$B$4]*[.$B$13]" office:value-type="float" office:value="0.0190647460525" calcext:value-type="float">
            <text:p>0.02</text:p>
          </table:table-cell>
          <table:table-cell table:formula="of:=[.C$4]*MAGNET([.$I$1]*[.$L70]+[.C$5]*PI()/180)+(RAND()-0.5)*[.$B$4]*[.$B$13]" office:value-type="float" office:value="0.0199389932650754" calcext:value-type="float">
            <text:p>0.02</text:p>
          </table:table-cell>
          <table:table-cell table:formula="of:=[.D$4]*MAGNET([.$I$1]*[.$L70]+[.D$5]*PI()/180)+(RAND()-0.5)*[.$B$4]*[.$B$13]" office:value-type="float" office:value="0.0221796976010631" calcext:value-type="float">
            <text:p>0.02</text:p>
          </table:table-cell>
          <table:table-cell table:formula="of:=[.E$4]*MAGNET([.$I$1]*[.$L70]+[.E$5]*PI()/180)+(RAND()-0.5)*[.$B$4]*[.$B$13]" office:value-type="float" office:value="0.0286915483339989" calcext:value-type="float">
            <text:p>0.03</text:p>
          </table:table-cell>
          <table:table-cell table:formula="of:=[.F$4]*MAGNET([.$I$1]*[.$L70]+[.F$5]*PI()/180)+(RAND()-0.5)*[.$B$4]*[.$B$13]" office:value-type="float" office:value="0.0256048922434589" calcext:value-type="float">
            <text:p>0.03</text:p>
          </table:table-cell>
          <table:table-cell table:formula="of:=[.G$4]*MAGNET([.$I$1]*[.$L70]+[.G$5]*PI()/180)+(RAND()-0.5)*[.$B$4]*[.$B$13]" office:value-type="float" office:value="0.0272657698142721" calcext:value-type="float">
            <text:p>0.03</text:p>
          </table:table-cell>
          <table:table-cell table:formula="of:=[.H$4]*MAGNET([.$I$1]*[.$L70]+[.H$5]*PI()/180)+(RAND()-0.5)*[.$B$4]*[.$B$13]" office:value-type="float" office:value="0.0285010322461748" calcext:value-type="float">
            <text:p>0.03</text:p>
          </table:table-cell>
          <table:table-cell table:formula="of:=[.I$4]*MAGNET([.$I$1]*[.$L70]+[.I$5]*PI()/180)+(RAND()-0.5)*[.$B$4]*[.$B$13]" office:value-type="float" office:value="0.0303459441570479" calcext:value-type="float">
            <text:p>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0]+0.002" office:value-type="float" office:value="0.134" calcext:value-type="float">
            <text:p>0.134</text:p>
          </table:table-cell>
          <table:table-cell table:formula="of:=[.B$4]*MAGNET([.$I$1]*[.$L71]+[.B$5]*PI()/180)+(RAND()-0.5)*[.$B$4]*[.$B$13]" office:value-type="float" office:value="0.0252938283623114" calcext:value-type="float">
            <text:p>0.03</text:p>
          </table:table-cell>
          <table:table-cell table:formula="of:=[.C$4]*MAGNET([.$I$1]*[.$L71]+[.C$5]*PI()/180)+(RAND()-0.5)*[.$B$4]*[.$B$13]" office:value-type="float" office:value="0.0268862252066408" calcext:value-type="float">
            <text:p>0.03</text:p>
          </table:table-cell>
          <table:table-cell table:formula="of:=[.D$4]*MAGNET([.$I$1]*[.$L71]+[.D$5]*PI()/180)+(RAND()-0.5)*[.$B$4]*[.$B$13]" office:value-type="float" office:value="0.0287032383805772" calcext:value-type="float">
            <text:p>0.03</text:p>
          </table:table-cell>
          <table:table-cell table:formula="of:=[.E$4]*MAGNET([.$I$1]*[.$L71]+[.E$5]*PI()/180)+(RAND()-0.5)*[.$B$4]*[.$B$13]" office:value-type="float" office:value="0.0362247299853803" calcext:value-type="float">
            <text:p>0.04</text:p>
          </table:table-cell>
          <table:table-cell table:formula="of:=[.F$4]*MAGNET([.$I$1]*[.$L71]+[.F$5]*PI()/180)+(RAND()-0.5)*[.$B$4]*[.$B$13]" office:value-type="float" office:value="0.0338780697306483" calcext:value-type="float">
            <text:p>0.03</text:p>
          </table:table-cell>
          <table:table-cell table:formula="of:=[.G$4]*MAGNET([.$I$1]*[.$L71]+[.G$5]*PI()/180)+(RAND()-0.5)*[.$B$4]*[.$B$13]" office:value-type="float" office:value="0.0360466616453306" calcext:value-type="float">
            <text:p>0.04</text:p>
          </table:table-cell>
          <table:table-cell table:formula="of:=[.H$4]*MAGNET([.$I$1]*[.$L71]+[.H$5]*PI()/180)+(RAND()-0.5)*[.$B$4]*[.$B$13]" office:value-type="float" office:value="0.0368917563599523" calcext:value-type="float">
            <text:p>0.04</text:p>
          </table:table-cell>
          <table:table-cell table:formula="of:=[.I$4]*MAGNET([.$I$1]*[.$L71]+[.I$5]*PI()/180)+(RAND()-0.5)*[.$B$4]*[.$B$13]" office:value-type="float" office:value="0.0403350943848877" calcext:value-type="float">
            <text:p>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1]+0.002" office:value-type="float" office:value="0.136" calcext:value-type="float">
            <text:p>0.136</text:p>
          </table:table-cell>
          <table:table-cell table:formula="of:=[.B$4]*MAGNET([.$I$1]*[.$L72]+[.B$5]*PI()/180)+(RAND()-0.5)*[.$B$4]*[.$B$13]" office:value-type="float" office:value="0.0297659837357475" calcext:value-type="float">
            <text:p>0.03</text:p>
          </table:table-cell>
          <table:table-cell table:formula="of:=[.C$4]*MAGNET([.$I$1]*[.$L72]+[.C$5]*PI()/180)+(RAND()-0.5)*[.$B$4]*[.$B$13]" office:value-type="float" office:value="0.0327571852249469" calcext:value-type="float">
            <text:p>0.03</text:p>
          </table:table-cell>
          <table:table-cell table:formula="of:=[.D$4]*MAGNET([.$I$1]*[.$L72]+[.D$5]*PI()/180)+(RAND()-0.5)*[.$B$4]*[.$B$13]" office:value-type="float" office:value="0.035088188053513" calcext:value-type="float">
            <text:p>0.04</text:p>
          </table:table-cell>
          <table:table-cell table:formula="of:=[.E$4]*MAGNET([.$I$1]*[.$L72]+[.E$5]*PI()/180)+(RAND()-0.5)*[.$B$4]*[.$B$13]" office:value-type="float" office:value="0.0419988470693137" calcext:value-type="float">
            <text:p>0.04</text:p>
          </table:table-cell>
          <table:table-cell table:formula="of:=[.F$4]*MAGNET([.$I$1]*[.$L72]+[.F$5]*PI()/180)+(RAND()-0.5)*[.$B$4]*[.$B$13]" office:value-type="float" office:value="0.0397072611146417" calcext:value-type="float">
            <text:p>0.04</text:p>
          </table:table-cell>
          <table:table-cell table:formula="of:=[.G$4]*MAGNET([.$I$1]*[.$L72]+[.G$5]*PI()/180)+(RAND()-0.5)*[.$B$4]*[.$B$13]" office:value-type="float" office:value="0.042562218926076" calcext:value-type="float">
            <text:p>0.04</text:p>
          </table:table-cell>
          <table:table-cell table:formula="of:=[.H$4]*MAGNET([.$I$1]*[.$L72]+[.H$5]*PI()/180)+(RAND()-0.5)*[.$B$4]*[.$B$13]" office:value-type="float" office:value="0.0458470646233734" calcext:value-type="float">
            <text:p>0.05</text:p>
          </table:table-cell>
          <table:table-cell table:formula="of:=[.I$4]*MAGNET([.$I$1]*[.$L72]+[.I$5]*PI()/180)+(RAND()-0.5)*[.$B$4]*[.$B$13]" office:value-type="float" office:value="0.047813903359312" calcext:value-type="float">
            <text:p>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2]+0.002" office:value-type="float" office:value="0.138" calcext:value-type="float">
            <text:p>0.138</text:p>
          </table:table-cell>
          <table:table-cell table:formula="of:=[.B$4]*MAGNET([.$I$1]*[.$L73]+[.B$5]*PI()/180)+(RAND()-0.5)*[.$B$4]*[.$B$13]" office:value-type="float" office:value="0.0347832789153614" calcext:value-type="float">
            <text:p>0.03</text:p>
          </table:table-cell>
          <table:table-cell table:formula="of:=[.C$4]*MAGNET([.$I$1]*[.$L73]+[.C$5]*PI()/180)+(RAND()-0.5)*[.$B$4]*[.$B$13]" office:value-type="float" office:value="0.0369556128528225" calcext:value-type="float">
            <text:p>0.04</text:p>
          </table:table-cell>
          <table:table-cell table:formula="of:=[.D$4]*MAGNET([.$I$1]*[.$L73]+[.D$5]*PI()/180)+(RAND()-0.5)*[.$B$4]*[.$B$13]" office:value-type="float" office:value="0.0401962025703287" calcext:value-type="float">
            <text:p>0.04</text:p>
          </table:table-cell>
          <table:table-cell table:formula="of:=[.E$4]*MAGNET([.$I$1]*[.$L73]+[.E$5]*PI()/180)+(RAND()-0.5)*[.$B$4]*[.$B$13]" office:value-type="float" office:value="0.0470244105393954" calcext:value-type="float">
            <text:p>0.05</text:p>
          </table:table-cell>
          <table:table-cell table:formula="of:=[.F$4]*MAGNET([.$I$1]*[.$L73]+[.F$5]*PI()/180)+(RAND()-0.5)*[.$B$4]*[.$B$13]" office:value-type="float" office:value="0.0465847656184532" calcext:value-type="float">
            <text:p>0.05</text:p>
          </table:table-cell>
          <table:table-cell table:formula="of:=[.G$4]*MAGNET([.$I$1]*[.$L73]+[.G$5]*PI()/180)+(RAND()-0.5)*[.$B$4]*[.$B$13]" office:value-type="float" office:value="0.0489212047699945" calcext:value-type="float">
            <text:p>0.05</text:p>
          </table:table-cell>
          <table:table-cell table:formula="of:=[.H$4]*MAGNET([.$I$1]*[.$L73]+[.H$5]*PI()/180)+(RAND()-0.5)*[.$B$4]*[.$B$13]" office:value-type="float" office:value="0.0532380721367186" calcext:value-type="float">
            <text:p>0.05</text:p>
          </table:table-cell>
          <table:table-cell table:formula="of:=[.I$4]*MAGNET([.$I$1]*[.$L73]+[.I$5]*PI()/180)+(RAND()-0.5)*[.$B$4]*[.$B$13]" office:value-type="float" office:value="0.0553350322883439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3]+0.002" office:value-type="float" office:value="0.14" calcext:value-type="float">
            <text:p>0.14</text:p>
          </table:table-cell>
          <table:table-cell table:formula="of:=[.B$4]*MAGNET([.$I$1]*[.$L74]+[.B$5]*PI()/180)+(RAND()-0.5)*[.$B$4]*[.$B$13]" office:value-type="float" office:value="0.0382643831711018" calcext:value-type="float">
            <text:p>0.04</text:p>
          </table:table-cell>
          <table:table-cell table:formula="of:=[.C$4]*MAGNET([.$I$1]*[.$L74]+[.C$5]*PI()/180)+(RAND()-0.5)*[.$B$4]*[.$B$13]" office:value-type="float" office:value="0.0410873144927282" calcext:value-type="float">
            <text:p>0.04</text:p>
          </table:table-cell>
          <table:table-cell table:formula="of:=[.D$4]*MAGNET([.$I$1]*[.$L74]+[.D$5]*PI()/180)+(RAND()-0.5)*[.$B$4]*[.$B$13]" office:value-type="float" office:value="0.0455973579738979" calcext:value-type="float">
            <text:p>0.05</text:p>
          </table:table-cell>
          <table:table-cell table:formula="of:=[.E$4]*MAGNET([.$I$1]*[.$L74]+[.E$5]*PI()/180)+(RAND()-0.5)*[.$B$4]*[.$B$13]" office:value-type="float" office:value="0.0514376351743674" calcext:value-type="float">
            <text:p>0.05</text:p>
          </table:table-cell>
          <table:table-cell table:formula="of:=[.F$4]*MAGNET([.$I$1]*[.$L74]+[.F$5]*PI()/180)+(RAND()-0.5)*[.$B$4]*[.$B$13]" office:value-type="float" office:value="0.0511424230583416" calcext:value-type="float">
            <text:p>0.05</text:p>
          </table:table-cell>
          <table:table-cell table:formula="of:=[.G$4]*MAGNET([.$I$1]*[.$L74]+[.G$5]*PI()/180)+(RAND()-0.5)*[.$B$4]*[.$B$13]" office:value-type="float" office:value="0.0556659358329896" calcext:value-type="float">
            <text:p>0.06</text:p>
          </table:table-cell>
          <table:table-cell table:formula="of:=[.H$4]*MAGNET([.$I$1]*[.$L74]+[.H$5]*PI()/180)+(RAND()-0.5)*[.$B$4]*[.$B$13]" office:value-type="float" office:value="0.0586532916246257" calcext:value-type="float">
            <text:p>0.06</text:p>
          </table:table-cell>
          <table:table-cell table:formula="of:=[.I$4]*MAGNET([.$I$1]*[.$L74]+[.I$5]*PI()/180)+(RAND()-0.5)*[.$B$4]*[.$B$13]" office:value-type="float" office:value="0.061151624799065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4]+0.002" office:value-type="float" office:value="0.142" calcext:value-type="float">
            <text:p>0.142</text:p>
          </table:table-cell>
          <table:table-cell table:formula="of:=[.B$4]*MAGNET([.$I$1]*[.$L75]+[.B$5]*PI()/180)+(RAND()-0.5)*[.$B$4]*[.$B$13]" office:value-type="float" office:value="0.0415020134753109" calcext:value-type="float">
            <text:p>0.04</text:p>
          </table:table-cell>
          <table:table-cell table:formula="of:=[.C$4]*MAGNET([.$I$1]*[.$L75]+[.C$5]*PI()/180)+(RAND()-0.5)*[.$B$4]*[.$B$13]" office:value-type="float" office:value="0.0452088018985438" calcext:value-type="float">
            <text:p>0.05</text:p>
          </table:table-cell>
          <table:table-cell table:formula="of:=[.D$4]*MAGNET([.$I$1]*[.$L75]+[.D$5]*PI()/180)+(RAND()-0.5)*[.$B$4]*[.$B$13]" office:value-type="float" office:value="0.0487269948959244" calcext:value-type="float">
            <text:p>0.05</text:p>
          </table:table-cell>
          <table:table-cell table:formula="of:=[.E$4]*MAGNET([.$I$1]*[.$L75]+[.E$5]*PI()/180)+(RAND()-0.5)*[.$B$4]*[.$B$13]" office:value-type="float" office:value="0.0542577633065626" calcext:value-type="float">
            <text:p>0.05</text:p>
          </table:table-cell>
          <table:table-cell table:formula="of:=[.F$4]*MAGNET([.$I$1]*[.$L75]+[.F$5]*PI()/180)+(RAND()-0.5)*[.$B$4]*[.$B$13]" office:value-type="float" office:value="0.0558262921151948" calcext:value-type="float">
            <text:p>0.06</text:p>
          </table:table-cell>
          <table:table-cell table:formula="of:=[.G$4]*MAGNET([.$I$1]*[.$L75]+[.G$5]*PI()/180)+(RAND()-0.5)*[.$B$4]*[.$B$13]" office:value-type="float" office:value="0.0598369626674676" calcext:value-type="float">
            <text:p>0.06</text:p>
          </table:table-cell>
          <table:table-cell table:formula="of:=[.H$4]*MAGNET([.$I$1]*[.$L75]+[.H$5]*PI()/180)+(RAND()-0.5)*[.$B$4]*[.$B$13]" office:value-type="float" office:value="0.0631714322714366" calcext:value-type="float">
            <text:p>0.06</text:p>
          </table:table-cell>
          <table:table-cell table:formula="of:=[.I$4]*MAGNET([.$I$1]*[.$L75]+[.I$5]*PI()/180)+(RAND()-0.5)*[.$B$4]*[.$B$13]" office:value-type="float" office:value="0.0664740099702071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5]+0.002" office:value-type="float" office:value="0.144" calcext:value-type="float">
            <text:p>0.144</text:p>
          </table:table-cell>
          <table:table-cell table:formula="of:=[.B$4]*MAGNET([.$I$1]*[.$L76]+[.B$5]*PI()/180)+(RAND()-0.5)*[.$B$4]*[.$B$13]" office:value-type="float" office:value="0.0437718383867229" calcext:value-type="float">
            <text:p>0.04</text:p>
          </table:table-cell>
          <table:table-cell table:formula="of:=[.C$4]*MAGNET([.$I$1]*[.$L76]+[.C$5]*PI()/180)+(RAND()-0.5)*[.$B$4]*[.$B$13]" office:value-type="float" office:value="0.0471331096881252" calcext:value-type="float">
            <text:p>0.05</text:p>
          </table:table-cell>
          <table:table-cell table:formula="of:=[.D$4]*MAGNET([.$I$1]*[.$L76]+[.D$5]*PI()/180)+(RAND()-0.5)*[.$B$4]*[.$B$13]" office:value-type="float" office:value="0.0509984247113977" calcext:value-type="float">
            <text:p>0.05</text:p>
          </table:table-cell>
          <table:table-cell table:formula="of:=[.E$4]*MAGNET([.$I$1]*[.$L76]+[.E$5]*PI()/180)+(RAND()-0.5)*[.$B$4]*[.$B$13]" office:value-type="float" office:value="0.0563974265926602" calcext:value-type="float">
            <text:p>0.06</text:p>
          </table:table-cell>
          <table:table-cell table:formula="of:=[.F$4]*MAGNET([.$I$1]*[.$L76]+[.F$5]*PI()/180)+(RAND()-0.5)*[.$B$4]*[.$B$13]" office:value-type="float" office:value="0.0590968370793726" calcext:value-type="float">
            <text:p>0.06</text:p>
          </table:table-cell>
          <table:table-cell table:formula="of:=[.G$4]*MAGNET([.$I$1]*[.$L76]+[.G$5]*PI()/180)+(RAND()-0.5)*[.$B$4]*[.$B$13]" office:value-type="float" office:value="0.0617280810004752" calcext:value-type="float">
            <text:p>0.06</text:p>
          </table:table-cell>
          <table:table-cell table:formula="of:=[.H$4]*MAGNET([.$I$1]*[.$L76]+[.H$5]*PI()/180)+(RAND()-0.5)*[.$B$4]*[.$B$13]" office:value-type="float" office:value="0.0656703400388568" calcext:value-type="float">
            <text:p>0.07</text:p>
          </table:table-cell>
          <table:table-cell table:formula="of:=[.I$4]*MAGNET([.$I$1]*[.$L76]+[.I$5]*PI()/180)+(RAND()-0.5)*[.$B$4]*[.$B$13]" office:value-type="float" office:value="0.070388371494720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6]+0.002" office:value-type="float" office:value="0.146" calcext:value-type="float">
            <text:p>0.146</text:p>
          </table:table-cell>
          <table:table-cell table:formula="of:=[.B$4]*MAGNET([.$I$1]*[.$L77]+[.B$5]*PI()/180)+(RAND()-0.5)*[.$B$4]*[.$B$13]" office:value-type="float" office:value="0.0453537402145723" calcext:value-type="float">
            <text:p>0.05</text:p>
          </table:table-cell>
          <table:table-cell table:formula="of:=[.C$4]*MAGNET([.$I$1]*[.$L77]+[.C$5]*PI()/180)+(RAND()-0.5)*[.$B$4]*[.$B$13]" office:value-type="float" office:value="0.0480590658762869" calcext:value-type="float">
            <text:p>0.05</text:p>
          </table:table-cell>
          <table:table-cell table:formula="of:=[.D$4]*MAGNET([.$I$1]*[.$L77]+[.D$5]*PI()/180)+(RAND()-0.5)*[.$B$4]*[.$B$13]" office:value-type="float" office:value="0.0521086683295278" calcext:value-type="float">
            <text:p>0.05</text:p>
          </table:table-cell>
          <table:table-cell table:formula="of:=[.E$4]*MAGNET([.$I$1]*[.$L77]+[.E$5]*PI()/180)+(RAND()-0.5)*[.$B$4]*[.$B$13]" office:value-type="float" office:value="0.0571813416712839" calcext:value-type="float">
            <text:p>0.06</text:p>
          </table:table-cell>
          <table:table-cell table:formula="of:=[.F$4]*MAGNET([.$I$1]*[.$L77]+[.F$5]*PI()/180)+(RAND()-0.5)*[.$B$4]*[.$B$13]" office:value-type="float" office:value="0.0609926841501224" calcext:value-type="float">
            <text:p>0.06</text:p>
          </table:table-cell>
          <table:table-cell table:formula="of:=[.G$4]*MAGNET([.$I$1]*[.$L77]+[.G$5]*PI()/180)+(RAND()-0.5)*[.$B$4]*[.$B$13]" office:value-type="float" office:value="0.0647688320722945" calcext:value-type="float">
            <text:p>0.06</text:p>
          </table:table-cell>
          <table:table-cell table:formula="of:=[.H$4]*MAGNET([.$I$1]*[.$L77]+[.H$5]*PI()/180)+(RAND()-0.5)*[.$B$4]*[.$B$13]" office:value-type="float" office:value="0.0676345713328279" calcext:value-type="float">
            <text:p>0.07</text:p>
          </table:table-cell>
          <table:table-cell table:formula="of:=[.I$4]*MAGNET([.$I$1]*[.$L77]+[.I$5]*PI()/180)+(RAND()-0.5)*[.$B$4]*[.$B$13]" office:value-type="float" office:value="0.0715424510511147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7]+0.002" office:value-type="float" office:value="0.148" calcext:value-type="float">
            <text:p>0.148</text:p>
          </table:table-cell>
          <table:table-cell table:formula="of:=[.B$4]*MAGNET([.$I$1]*[.$L78]+[.B$5]*PI()/180)+(RAND()-0.5)*[.$B$4]*[.$B$13]" office:value-type="float" office:value="0.0458010614480126" calcext:value-type="float">
            <text:p>0.05</text:p>
          </table:table-cell>
          <table:table-cell table:formula="of:=[.C$4]*MAGNET([.$I$1]*[.$L78]+[.C$5]*PI()/180)+(RAND()-0.5)*[.$B$4]*[.$B$13]" office:value-type="float" office:value="0.0490750061360337" calcext:value-type="float">
            <text:p>0.05</text:p>
          </table:table-cell>
          <table:table-cell table:formula="of:=[.D$4]*MAGNET([.$I$1]*[.$L78]+[.D$5]*PI()/180)+(RAND()-0.5)*[.$B$4]*[.$B$13]" office:value-type="float" office:value="0.0537946693049085" calcext:value-type="float">
            <text:p>0.05</text:p>
          </table:table-cell>
          <table:table-cell table:formula="of:=[.E$4]*MAGNET([.$I$1]*[.$L78]+[.E$5]*PI()/180)+(RAND()-0.5)*[.$B$4]*[.$B$13]" office:value-type="float" office:value="0.0578720044137796" calcext:value-type="float">
            <text:p>0.06</text:p>
          </table:table-cell>
          <table:table-cell table:formula="of:=[.F$4]*MAGNET([.$I$1]*[.$L78]+[.F$5]*PI()/180)+(RAND()-0.5)*[.$B$4]*[.$B$13]" office:value-type="float" office:value="0.0619081009485396" calcext:value-type="float">
            <text:p>0.06</text:p>
          </table:table-cell>
          <table:table-cell table:formula="of:=[.G$4]*MAGNET([.$I$1]*[.$L78]+[.G$5]*PI()/180)+(RAND()-0.5)*[.$B$4]*[.$B$13]" office:value-type="float" office:value="0.0653029246891466" calcext:value-type="float">
            <text:p>0.07</text:p>
          </table:table-cell>
          <table:table-cell table:formula="of:=[.H$4]*MAGNET([.$I$1]*[.$L78]+[.H$5]*PI()/180)+(RAND()-0.5)*[.$B$4]*[.$B$13]" office:value-type="float" office:value="0.0688437893887107" calcext:value-type="float">
            <text:p>0.07</text:p>
          </table:table-cell>
          <table:table-cell table:formula="of:=[.I$4]*MAGNET([.$I$1]*[.$L78]+[.I$5]*PI()/180)+(RAND()-0.5)*[.$B$4]*[.$B$13]" office:value-type="float" office:value="0.0731119976950531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8]+0.002" office:value-type="float" office:value="0.15" calcext:value-type="float">
            <text:p>0.15</text:p>
          </table:table-cell>
          <table:table-cell table:formula="of:=[.B$4]*MAGNET([.$I$1]*[.$L79]+[.B$5]*PI()/180)+(RAND()-0.5)*[.$B$4]*[.$B$13]" office:value-type="float" office:value="0.0455247893571539" calcext:value-type="float">
            <text:p>0.05</text:p>
          </table:table-cell>
          <table:table-cell table:formula="of:=[.C$4]*MAGNET([.$I$1]*[.$L79]+[.C$5]*PI()/180)+(RAND()-0.5)*[.$B$4]*[.$B$13]" office:value-type="float" office:value="0.0496592998361459" calcext:value-type="float">
            <text:p>0.05</text:p>
          </table:table-cell>
          <table:table-cell table:formula="of:=[.D$4]*MAGNET([.$I$1]*[.$L79]+[.D$5]*PI()/180)+(RAND()-0.5)*[.$B$4]*[.$B$13]" office:value-type="float" office:value="0.0538327307892508" calcext:value-type="float">
            <text:p>0.05</text:p>
          </table:table-cell>
          <table:table-cell table:formula="of:=[.E$4]*MAGNET([.$I$1]*[.$L79]+[.E$5]*PI()/180)+(RAND()-0.5)*[.$B$4]*[.$B$13]" office:value-type="float" office:value="0.0584259087262904" calcext:value-type="float">
            <text:p>0.06</text:p>
          </table:table-cell>
          <table:table-cell table:formula="of:=[.F$4]*MAGNET([.$I$1]*[.$L79]+[.F$5]*PI()/180)+(RAND()-0.5)*[.$B$4]*[.$B$13]" office:value-type="float" office:value="0.0617273024974735" calcext:value-type="float">
            <text:p>0.06</text:p>
          </table:table-cell>
          <table:table-cell table:formula="of:=[.G$4]*MAGNET([.$I$1]*[.$L79]+[.G$5]*PI()/180)+(RAND()-0.5)*[.$B$4]*[.$B$13]" office:value-type="float" office:value="0.0663435182381864" calcext:value-type="float">
            <text:p>0.07</text:p>
          </table:table-cell>
          <table:table-cell table:formula="of:=[.H$4]*MAGNET([.$I$1]*[.$L79]+[.H$5]*PI()/180)+(RAND()-0.5)*[.$B$4]*[.$B$13]" office:value-type="float" office:value="0.0705093125241705" calcext:value-type="float">
            <text:p>0.07</text:p>
          </table:table-cell>
          <table:table-cell table:formula="of:=[.I$4]*MAGNET([.$I$1]*[.$L79]+[.I$5]*PI()/180)+(RAND()-0.5)*[.$B$4]*[.$B$13]" office:value-type="float" office:value="0.073438761411891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79]+0.002" office:value-type="float" office:value="0.152" calcext:value-type="float">
            <text:p>0.152</text:p>
          </table:table-cell>
          <table:table-cell table:formula="of:=[.B$4]*MAGNET([.$I$1]*[.$L80]+[.B$5]*PI()/180)+(RAND()-0.5)*[.$B$4]*[.$B$13]" office:value-type="float" office:value="0.0453604675781894" calcext:value-type="float">
            <text:p>0.05</text:p>
          </table:table-cell>
          <table:table-cell table:formula="of:=[.C$4]*MAGNET([.$I$1]*[.$L80]+[.C$5]*PI()/180)+(RAND()-0.5)*[.$B$4]*[.$B$13]" office:value-type="float" office:value="0.0501185557647548" calcext:value-type="float">
            <text:p>0.05</text:p>
          </table:table-cell>
          <table:table-cell table:formula="of:=[.D$4]*MAGNET([.$I$1]*[.$L80]+[.D$5]*PI()/180)+(RAND()-0.5)*[.$B$4]*[.$B$13]" office:value-type="float" office:value="0.0542552576018175" calcext:value-type="float">
            <text:p>0.05</text:p>
          </table:table-cell>
          <table:table-cell table:formula="of:=[.E$4]*MAGNET([.$I$1]*[.$L80]+[.E$5]*PI()/180)+(RAND()-0.5)*[.$B$4]*[.$B$13]" office:value-type="float" office:value="0.0574945468030379" calcext:value-type="float">
            <text:p>0.06</text:p>
          </table:table-cell>
          <table:table-cell table:formula="of:=[.F$4]*MAGNET([.$I$1]*[.$L80]+[.F$5]*PI()/180)+(RAND()-0.5)*[.$B$4]*[.$B$13]" office:value-type="float" office:value="0.0617660250613652" calcext:value-type="float">
            <text:p>0.06</text:p>
          </table:table-cell>
          <table:table-cell table:formula="of:=[.G$4]*MAGNET([.$I$1]*[.$L80]+[.G$5]*PI()/180)+(RAND()-0.5)*[.$B$4]*[.$B$13]" office:value-type="float" office:value="0.066452922814063" calcext:value-type="float">
            <text:p>0.07</text:p>
          </table:table-cell>
          <table:table-cell table:formula="of:=[.H$4]*MAGNET([.$I$1]*[.$L80]+[.H$5]*PI()/180)+(RAND()-0.5)*[.$B$4]*[.$B$13]" office:value-type="float" office:value="0.0703552645769424" calcext:value-type="float">
            <text:p>0.07</text:p>
          </table:table-cell>
          <table:table-cell table:formula="of:=[.I$4]*MAGNET([.$I$1]*[.$L80]+[.I$5]*PI()/180)+(RAND()-0.5)*[.$B$4]*[.$B$13]" office:value-type="float" office:value="0.073402824954870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0]+0.002" office:value-type="float" office:value="0.154" calcext:value-type="float">
            <text:p>0.154</text:p>
          </table:table-cell>
          <table:table-cell table:formula="of:=[.B$4]*MAGNET([.$I$1]*[.$L81]+[.B$5]*PI()/180)+(RAND()-0.5)*[.$B$4]*[.$B$13]" office:value-type="float" office:value="0.0465152822149208" calcext:value-type="float">
            <text:p>0.05</text:p>
          </table:table-cell>
          <table:table-cell table:formula="of:=[.C$4]*MAGNET([.$I$1]*[.$L81]+[.C$5]*PI()/180)+(RAND()-0.5)*[.$B$4]*[.$B$13]" office:value-type="float" office:value="0.0500432059347299" calcext:value-type="float">
            <text:p>0.05</text:p>
          </table:table-cell>
          <table:table-cell table:formula="of:=[.D$4]*MAGNET([.$I$1]*[.$L81]+[.D$5]*PI()/180)+(RAND()-0.5)*[.$B$4]*[.$B$13]" office:value-type="float" office:value="0.054333843438449" calcext:value-type="float">
            <text:p>0.05</text:p>
          </table:table-cell>
          <table:table-cell table:formula="of:=[.E$4]*MAGNET([.$I$1]*[.$L81]+[.E$5]*PI()/180)+(RAND()-0.5)*[.$B$4]*[.$B$13]" office:value-type="float" office:value="0.0576517210584183" calcext:value-type="float">
            <text:p>0.06</text:p>
          </table:table-cell>
          <table:table-cell table:formula="of:=[.F$4]*MAGNET([.$I$1]*[.$L81]+[.F$5]*PI()/180)+(RAND()-0.5)*[.$B$4]*[.$B$13]" office:value-type="float" office:value="0.0624182264649043" calcext:value-type="float">
            <text:p>0.06</text:p>
          </table:table-cell>
          <table:table-cell table:formula="of:=[.G$4]*MAGNET([.$I$1]*[.$L81]+[.G$5]*PI()/180)+(RAND()-0.5)*[.$B$4]*[.$B$13]" office:value-type="float" office:value="0.0661500387636001" calcext:value-type="float">
            <text:p>0.07</text:p>
          </table:table-cell>
          <table:table-cell table:formula="of:=[.H$4]*MAGNET([.$I$1]*[.$L81]+[.H$5]*PI()/180)+(RAND()-0.5)*[.$B$4]*[.$B$13]" office:value-type="float" office:value="0.070382882898981" calcext:value-type="float">
            <text:p>0.07</text:p>
          </table:table-cell>
          <table:table-cell table:formula="of:=[.I$4]*MAGNET([.$I$1]*[.$L81]+[.I$5]*PI()/180)+(RAND()-0.5)*[.$B$4]*[.$B$13]" office:value-type="float" office:value="0.0735564505522103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1]+0.002" office:value-type="float" office:value="0.156" calcext:value-type="float">
            <text:p>0.156</text:p>
          </table:table-cell>
          <table:table-cell table:formula="of:=[.B$4]*MAGNET([.$I$1]*[.$L82]+[.B$5]*PI()/180)+(RAND()-0.5)*[.$B$4]*[.$B$13]" office:value-type="float" office:value="0.0455511399422128" calcext:value-type="float">
            <text:p>0.05</text:p>
          </table:table-cell>
          <table:table-cell table:formula="of:=[.C$4]*MAGNET([.$I$1]*[.$L82]+[.C$5]*PI()/180)+(RAND()-0.5)*[.$B$4]*[.$B$13]" office:value-type="float" office:value="0.049304175556139" calcext:value-type="float">
            <text:p>0.05</text:p>
          </table:table-cell>
          <table:table-cell table:formula="of:=[.D$4]*MAGNET([.$I$1]*[.$L82]+[.D$5]*PI()/180)+(RAND()-0.5)*[.$B$4]*[.$B$13]" office:value-type="float" office:value="0.0533239881068888" calcext:value-type="float">
            <text:p>0.05</text:p>
          </table:table-cell>
          <table:table-cell table:formula="of:=[.E$4]*MAGNET([.$I$1]*[.$L82]+[.E$5]*PI()/180)+(RAND()-0.5)*[.$B$4]*[.$B$13]" office:value-type="float" office:value="0.0573713596269416" calcext:value-type="float">
            <text:p>0.06</text:p>
          </table:table-cell>
          <table:table-cell table:formula="of:=[.F$4]*MAGNET([.$I$1]*[.$L82]+[.F$5]*PI()/180)+(RAND()-0.5)*[.$B$4]*[.$B$13]" office:value-type="float" office:value="0.0621182639496508" calcext:value-type="float">
            <text:p>0.06</text:p>
          </table:table-cell>
          <table:table-cell table:formula="of:=[.G$4]*MAGNET([.$I$1]*[.$L82]+[.G$5]*PI()/180)+(RAND()-0.5)*[.$B$4]*[.$B$13]" office:value-type="float" office:value="0.066501340309103" calcext:value-type="float">
            <text:p>0.07</text:p>
          </table:table-cell>
          <table:table-cell table:formula="of:=[.H$4]*MAGNET([.$I$1]*[.$L82]+[.H$5]*PI()/180)+(RAND()-0.5)*[.$B$4]*[.$B$13]" office:value-type="float" office:value="0.0697619126798216" calcext:value-type="float">
            <text:p>0.07</text:p>
          </table:table-cell>
          <table:table-cell table:formula="of:=[.I$4]*MAGNET([.$I$1]*[.$L82]+[.I$5]*PI()/180)+(RAND()-0.5)*[.$B$4]*[.$B$13]" office:value-type="float" office:value="0.0739538506403425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2]+0.002" office:value-type="float" office:value="0.158" calcext:value-type="float">
            <text:p>0.158</text:p>
          </table:table-cell>
          <table:table-cell table:formula="of:=[.B$4]*MAGNET([.$I$1]*[.$L83]+[.B$5]*PI()/180)+(RAND()-0.5)*[.$B$4]*[.$B$13]" office:value-type="float" office:value="0.0460252077577409" calcext:value-type="float">
            <text:p>0.05</text:p>
          </table:table-cell>
          <table:table-cell table:formula="of:=[.C$4]*MAGNET([.$I$1]*[.$L83]+[.C$5]*PI()/180)+(RAND()-0.5)*[.$B$4]*[.$B$13]" office:value-type="float" office:value="0.0493486185983364" calcext:value-type="float">
            <text:p>0.05</text:p>
          </table:table-cell>
          <table:table-cell table:formula="of:=[.D$4]*MAGNET([.$I$1]*[.$L83]+[.D$5]*PI()/180)+(RAND()-0.5)*[.$B$4]*[.$B$13]" office:value-type="float" office:value="0.0545584359330283" calcext:value-type="float">
            <text:p>0.05</text:p>
          </table:table-cell>
          <table:table-cell table:formula="of:=[.E$4]*MAGNET([.$I$1]*[.$L83]+[.E$5]*PI()/180)+(RAND()-0.5)*[.$B$4]*[.$B$13]" office:value-type="float" office:value="0.0576597143635636" calcext:value-type="float">
            <text:p>0.06</text:p>
          </table:table-cell>
          <table:table-cell table:formula="of:=[.F$4]*MAGNET([.$I$1]*[.$L83]+[.F$5]*PI()/180)+(RAND()-0.5)*[.$B$4]*[.$B$13]" office:value-type="float" office:value="0.0620277428276931" calcext:value-type="float">
            <text:p>0.06</text:p>
          </table:table-cell>
          <table:table-cell table:formula="of:=[.G$4]*MAGNET([.$I$1]*[.$L83]+[.G$5]*PI()/180)+(RAND()-0.5)*[.$B$4]*[.$B$13]" office:value-type="float" office:value="0.0661893982037067" calcext:value-type="float">
            <text:p>0.07</text:p>
          </table:table-cell>
          <table:table-cell table:formula="of:=[.H$4]*MAGNET([.$I$1]*[.$L83]+[.H$5]*PI()/180)+(RAND()-0.5)*[.$B$4]*[.$B$13]" office:value-type="float" office:value="0.0703113366042542" calcext:value-type="float">
            <text:p>0.07</text:p>
          </table:table-cell>
          <table:table-cell table:formula="of:=[.I$4]*MAGNET([.$I$1]*[.$L83]+[.I$5]*PI()/180)+(RAND()-0.5)*[.$B$4]*[.$B$13]" office:value-type="float" office:value="0.0742498994246728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3]+0.002" office:value-type="float" office:value="0.16" calcext:value-type="float">
            <text:p>0.16</text:p>
          </table:table-cell>
          <table:table-cell table:formula="of:=[.B$4]*MAGNET([.$I$1]*[.$L84]+[.B$5]*PI()/180)+(RAND()-0.5)*[.$B$4]*[.$B$13]" office:value-type="float" office:value="0.0465665733414944" calcext:value-type="float">
            <text:p>0.05</text:p>
          </table:table-cell>
          <table:table-cell table:formula="of:=[.C$4]*MAGNET([.$I$1]*[.$L84]+[.C$5]*PI()/180)+(RAND()-0.5)*[.$B$4]*[.$B$13]" office:value-type="float" office:value="0.0502051542771761" calcext:value-type="float">
            <text:p>0.05</text:p>
          </table:table-cell>
          <table:table-cell table:formula="of:=[.D$4]*MAGNET([.$I$1]*[.$L84]+[.D$5]*PI()/180)+(RAND()-0.5)*[.$B$4]*[.$B$13]" office:value-type="float" office:value="0.054205719454335" calcext:value-type="float">
            <text:p>0.05</text:p>
          </table:table-cell>
          <table:table-cell table:formula="of:=[.E$4]*MAGNET([.$I$1]*[.$L84]+[.E$5]*PI()/180)+(RAND()-0.5)*[.$B$4]*[.$B$13]" office:value-type="float" office:value="0.0577997714811989" calcext:value-type="float">
            <text:p>0.06</text:p>
          </table:table-cell>
          <table:table-cell table:formula="of:=[.F$4]*MAGNET([.$I$1]*[.$L84]+[.F$5]*PI()/180)+(RAND()-0.5)*[.$B$4]*[.$B$13]" office:value-type="float" office:value="0.0624129392699875" calcext:value-type="float">
            <text:p>0.06</text:p>
          </table:table-cell>
          <table:table-cell table:formula="of:=[.G$4]*MAGNET([.$I$1]*[.$L84]+[.G$5]*PI()/180)+(RAND()-0.5)*[.$B$4]*[.$B$13]" office:value-type="float" office:value="0.0658218423075289" calcext:value-type="float">
            <text:p>0.07</text:p>
          </table:table-cell>
          <table:table-cell table:formula="of:=[.H$4]*MAGNET([.$I$1]*[.$L84]+[.H$5]*PI()/180)+(RAND()-0.5)*[.$B$4]*[.$B$13]" office:value-type="float" office:value="0.0696895721972024" calcext:value-type="float">
            <text:p>0.07</text:p>
          </table:table-cell>
          <table:table-cell table:formula="of:=[.I$4]*MAGNET([.$I$1]*[.$L84]+[.I$5]*PI()/180)+(RAND()-0.5)*[.$B$4]*[.$B$13]" office:value-type="float" office:value="0.0737158172717922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4]+0.002" office:value-type="float" office:value="0.162" calcext:value-type="float">
            <text:p>0.162</text:p>
          </table:table-cell>
          <table:table-cell table:formula="of:=[.B$4]*MAGNET([.$I$1]*[.$L85]+[.B$5]*PI()/180)+(RAND()-0.5)*[.$B$4]*[.$B$13]" office:value-type="float" office:value="0.0459456845719869" calcext:value-type="float">
            <text:p>0.05</text:p>
          </table:table-cell>
          <table:table-cell table:formula="of:=[.C$4]*MAGNET([.$I$1]*[.$L85]+[.C$5]*PI()/180)+(RAND()-0.5)*[.$B$4]*[.$B$13]" office:value-type="float" office:value="0.0494478977642025" calcext:value-type="float">
            <text:p>0.05</text:p>
          </table:table-cell>
          <table:table-cell table:formula="of:=[.D$4]*MAGNET([.$I$1]*[.$L85]+[.D$5]*PI()/180)+(RAND()-0.5)*[.$B$4]*[.$B$13]" office:value-type="float" office:value="0.0542944384108335" calcext:value-type="float">
            <text:p>0.05</text:p>
          </table:table-cell>
          <table:table-cell table:formula="of:=[.E$4]*MAGNET([.$I$1]*[.$L85]+[.E$5]*PI()/180)+(RAND()-0.5)*[.$B$4]*[.$B$13]" office:value-type="float" office:value="0.0576316811918367" calcext:value-type="float">
            <text:p>0.06</text:p>
          </table:table-cell>
          <table:table-cell table:formula="of:=[.F$4]*MAGNET([.$I$1]*[.$L85]+[.F$5]*PI()/180)+(RAND()-0.5)*[.$B$4]*[.$B$13]" office:value-type="float" office:value="0.0622625426965527" calcext:value-type="float">
            <text:p>0.06</text:p>
          </table:table-cell>
          <table:table-cell table:formula="of:=[.G$4]*MAGNET([.$I$1]*[.$L85]+[.G$5]*PI()/180)+(RAND()-0.5)*[.$B$4]*[.$B$13]" office:value-type="float" office:value="0.0659144341429738" calcext:value-type="float">
            <text:p>0.07</text:p>
          </table:table-cell>
          <table:table-cell table:formula="of:=[.H$4]*MAGNET([.$I$1]*[.$L85]+[.H$5]*PI()/180)+(RAND()-0.5)*[.$B$4]*[.$B$13]" office:value-type="float" office:value="0.069876771694448" calcext:value-type="float">
            <text:p>0.07</text:p>
          </table:table-cell>
          <table:table-cell table:formula="of:=[.I$4]*MAGNET([.$I$1]*[.$L85]+[.I$5]*PI()/180)+(RAND()-0.5)*[.$B$4]*[.$B$13]" office:value-type="float" office:value="0.0732114523492913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5]+0.002" office:value-type="float" office:value="0.164" calcext:value-type="float">
            <text:p>0.164</text:p>
          </table:table-cell>
          <table:table-cell table:formula="of:=[.B$4]*MAGNET([.$I$1]*[.$L86]+[.B$5]*PI()/180)+(RAND()-0.5)*[.$B$4]*[.$B$13]" office:value-type="float" office:value="0.0453453153600766" calcext:value-type="float">
            <text:p>0.05</text:p>
          </table:table-cell>
          <table:table-cell table:formula="of:=[.C$4]*MAGNET([.$I$1]*[.$L86]+[.C$5]*PI()/180)+(RAND()-0.5)*[.$B$4]*[.$B$13]" office:value-type="float" office:value="0.0493694115174934" calcext:value-type="float">
            <text:p>0.05</text:p>
          </table:table-cell>
          <table:table-cell table:formula="of:=[.D$4]*MAGNET([.$I$1]*[.$L86]+[.D$5]*PI()/180)+(RAND()-0.5)*[.$B$4]*[.$B$13]" office:value-type="float" office:value="0.0541868786069202" calcext:value-type="float">
            <text:p>0.05</text:p>
          </table:table-cell>
          <table:table-cell table:formula="of:=[.E$4]*MAGNET([.$I$1]*[.$L86]+[.E$5]*PI()/180)+(RAND()-0.5)*[.$B$4]*[.$B$13]" office:value-type="float" office:value="0.0573656729566046" calcext:value-type="float">
            <text:p>0.06</text:p>
          </table:table-cell>
          <table:table-cell table:formula="of:=[.F$4]*MAGNET([.$I$1]*[.$L86]+[.F$5]*PI()/180)+(RAND()-0.5)*[.$B$4]*[.$B$13]" office:value-type="float" office:value="0.0611942221443668" calcext:value-type="float">
            <text:p>0.06</text:p>
          </table:table-cell>
          <table:table-cell table:formula="of:=[.G$4]*MAGNET([.$I$1]*[.$L86]+[.G$5]*PI()/180)+(RAND()-0.5)*[.$B$4]*[.$B$13]" office:value-type="float" office:value="0.0657240560149755" calcext:value-type="float">
            <text:p>0.07</text:p>
          </table:table-cell>
          <table:table-cell table:formula="of:=[.H$4]*MAGNET([.$I$1]*[.$L86]+[.H$5]*PI()/180)+(RAND()-0.5)*[.$B$4]*[.$B$13]" office:value-type="float" office:value="0.0701067381285733" calcext:value-type="float">
            <text:p>0.07</text:p>
          </table:table-cell>
          <table:table-cell table:formula="of:=[.I$4]*MAGNET([.$I$1]*[.$L86]+[.I$5]*PI()/180)+(RAND()-0.5)*[.$B$4]*[.$B$13]" office:value-type="float" office:value="0.0733923083501135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6]+0.002" office:value-type="float" office:value="0.166" calcext:value-type="float">
            <text:p>0.166</text:p>
          </table:table-cell>
          <table:table-cell table:formula="of:=[.B$4]*MAGNET([.$I$1]*[.$L87]+[.B$5]*PI()/180)+(RAND()-0.5)*[.$B$4]*[.$B$13]" office:value-type="float" office:value="0.0443701278938645" calcext:value-type="float">
            <text:p>0.04</text:p>
          </table:table-cell>
          <table:table-cell table:formula="of:=[.C$4]*MAGNET([.$I$1]*[.$L87]+[.C$5]*PI()/180)+(RAND()-0.5)*[.$B$4]*[.$B$13]" office:value-type="float" office:value="0.0488256550307874" calcext:value-type="float">
            <text:p>0.05</text:p>
          </table:table-cell>
          <table:table-cell table:formula="of:=[.D$4]*MAGNET([.$I$1]*[.$L87]+[.D$5]*PI()/180)+(RAND()-0.5)*[.$B$4]*[.$B$13]" office:value-type="float" office:value="0.0521784751024341" calcext:value-type="float">
            <text:p>0.05</text:p>
          </table:table-cell>
          <table:table-cell table:formula="of:=[.E$4]*MAGNET([.$I$1]*[.$L87]+[.E$5]*PI()/180)+(RAND()-0.5)*[.$B$4]*[.$B$13]" office:value-type="float" office:value="0.0559011117563794" calcext:value-type="float">
            <text:p>0.06</text:p>
          </table:table-cell>
          <table:table-cell table:formula="of:=[.F$4]*MAGNET([.$I$1]*[.$L87]+[.F$5]*PI()/180)+(RAND()-0.5)*[.$B$4]*[.$B$13]" office:value-type="float" office:value="0.0599724845638625" calcext:value-type="float">
            <text:p>0.06</text:p>
          </table:table-cell>
          <table:table-cell table:formula="of:=[.G$4]*MAGNET([.$I$1]*[.$L87]+[.G$5]*PI()/180)+(RAND()-0.5)*[.$B$4]*[.$B$13]" office:value-type="float" office:value="0.0638946114067032" calcext:value-type="float">
            <text:p>0.06</text:p>
          </table:table-cell>
          <table:table-cell table:formula="of:=[.H$4]*MAGNET([.$I$1]*[.$L87]+[.H$5]*PI()/180)+(RAND()-0.5)*[.$B$4]*[.$B$13]" office:value-type="float" office:value="0.0690537695037838" calcext:value-type="float">
            <text:p>0.07</text:p>
          </table:table-cell>
          <table:table-cell table:formula="of:=[.I$4]*MAGNET([.$I$1]*[.$L87]+[.I$5]*PI()/180)+(RAND()-0.5)*[.$B$4]*[.$B$13]" office:value-type="float" office:value="0.0720917833731349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7]+0.002" office:value-type="float" office:value="0.168" calcext:value-type="float">
            <text:p>0.168</text:p>
          </table:table-cell>
          <table:table-cell table:formula="of:=[.B$4]*MAGNET([.$I$1]*[.$L88]+[.B$5]*PI()/180)+(RAND()-0.5)*[.$B$4]*[.$B$13]" office:value-type="float" office:value="0.0439935191194428" calcext:value-type="float">
            <text:p>0.04</text:p>
          </table:table-cell>
          <table:table-cell table:formula="of:=[.C$4]*MAGNET([.$I$1]*[.$L88]+[.C$5]*PI()/180)+(RAND()-0.5)*[.$B$4]*[.$B$13]" office:value-type="float" office:value="0.0476335885593047" calcext:value-type="float">
            <text:p>0.05</text:p>
          </table:table-cell>
          <table:table-cell table:formula="of:=[.D$4]*MAGNET([.$I$1]*[.$L88]+[.D$5]*PI()/180)+(RAND()-0.5)*[.$B$4]*[.$B$13]" office:value-type="float" office:value="0.0520180350656481" calcext:value-type="float">
            <text:p>0.05</text:p>
          </table:table-cell>
          <table:table-cell table:formula="of:=[.E$4]*MAGNET([.$I$1]*[.$L88]+[.E$5]*PI()/180)+(RAND()-0.5)*[.$B$4]*[.$B$13]" office:value-type="float" office:value="0.0535144906926473" calcext:value-type="float">
            <text:p>0.05</text:p>
          </table:table-cell>
          <table:table-cell table:formula="of:=[.F$4]*MAGNET([.$I$1]*[.$L88]+[.F$5]*PI()/180)+(RAND()-0.5)*[.$B$4]*[.$B$13]" office:value-type="float" office:value="0.0587966997298407" calcext:value-type="float">
            <text:p>0.06</text:p>
          </table:table-cell>
          <table:table-cell table:formula="of:=[.G$4]*MAGNET([.$I$1]*[.$L88]+[.G$5]*PI()/180)+(RAND()-0.5)*[.$B$4]*[.$B$13]" office:value-type="float" office:value="0.0628993907300819" calcext:value-type="float">
            <text:p>0.06</text:p>
          </table:table-cell>
          <table:table-cell table:formula="of:=[.H$4]*MAGNET([.$I$1]*[.$L88]+[.H$5]*PI()/180)+(RAND()-0.5)*[.$B$4]*[.$B$13]" office:value-type="float" office:value="0.06702262202518" calcext:value-type="float">
            <text:p>0.07</text:p>
          </table:table-cell>
          <table:table-cell table:formula="of:=[.I$4]*MAGNET([.$I$1]*[.$L88]+[.I$5]*PI()/180)+(RAND()-0.5)*[.$B$4]*[.$B$13]" office:value-type="float" office:value="0.0701321269229714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8]+0.002" office:value-type="float" office:value="0.17" calcext:value-type="float">
            <text:p>0.17</text:p>
          </table:table-cell>
          <table:table-cell table:formula="of:=[.B$4]*MAGNET([.$I$1]*[.$L89]+[.B$5]*PI()/180)+(RAND()-0.5)*[.$B$4]*[.$B$13]" office:value-type="float" office:value="0.0413967205656796" calcext:value-type="float">
            <text:p>0.04</text:p>
          </table:table-cell>
          <table:table-cell table:formula="of:=[.C$4]*MAGNET([.$I$1]*[.$L89]+[.C$5]*PI()/180)+(RAND()-0.5)*[.$B$4]*[.$B$13]" office:value-type="float" office:value="0.0456475617745774" calcext:value-type="float">
            <text:p>0.05</text:p>
          </table:table-cell>
          <table:table-cell table:formula="of:=[.D$4]*MAGNET([.$I$1]*[.$L89]+[.D$5]*PI()/180)+(RAND()-0.5)*[.$B$4]*[.$B$13]" office:value-type="float" office:value="0.0487843281989222" calcext:value-type="float">
            <text:p>0.05</text:p>
          </table:table-cell>
          <table:table-cell table:formula="of:=[.E$4]*MAGNET([.$I$1]*[.$L89]+[.E$5]*PI()/180)+(RAND()-0.5)*[.$B$4]*[.$B$13]" office:value-type="float" office:value="0.0501637898990649" calcext:value-type="float">
            <text:p>0.05</text:p>
          </table:table-cell>
          <table:table-cell table:formula="of:=[.F$4]*MAGNET([.$I$1]*[.$L89]+[.F$5]*PI()/180)+(RAND()-0.5)*[.$B$4]*[.$B$13]" office:value-type="float" office:value="0.0559880261848835" calcext:value-type="float">
            <text:p>0.06</text:p>
          </table:table-cell>
          <table:table-cell table:formula="of:=[.G$4]*MAGNET([.$I$1]*[.$L89]+[.G$5]*PI()/180)+(RAND()-0.5)*[.$B$4]*[.$B$13]" office:value-type="float" office:value="0.0599393806988087" calcext:value-type="float">
            <text:p>0.06</text:p>
          </table:table-cell>
          <table:table-cell table:formula="of:=[.H$4]*MAGNET([.$I$1]*[.$L89]+[.H$5]*PI()/180)+(RAND()-0.5)*[.$B$4]*[.$B$13]" office:value-type="float" office:value="0.0644482451441842" calcext:value-type="float">
            <text:p>0.06</text:p>
          </table:table-cell>
          <table:table-cell table:formula="of:=[.I$4]*MAGNET([.$I$1]*[.$L89]+[.I$5]*PI()/180)+(RAND()-0.5)*[.$B$4]*[.$B$13]" office:value-type="float" office:value="0.0679047050305074" calcext:value-type="float">
            <text:p>0.07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89]+0.002" office:value-type="float" office:value="0.172" calcext:value-type="float">
            <text:p>0.172</text:p>
          </table:table-cell>
          <table:table-cell table:formula="of:=[.B$4]*MAGNET([.$I$1]*[.$L90]+[.B$5]*PI()/180)+(RAND()-0.5)*[.$B$4]*[.$B$13]" office:value-type="float" office:value="0.0387474829825725" calcext:value-type="float">
            <text:p>0.04</text:p>
          </table:table-cell>
          <table:table-cell table:formula="of:=[.C$4]*MAGNET([.$I$1]*[.$L90]+[.C$5]*PI()/180)+(RAND()-0.5)*[.$B$4]*[.$B$13]" office:value-type="float" office:value="0.0425314848070945" calcext:value-type="float">
            <text:p>0.04</text:p>
          </table:table-cell>
          <table:table-cell table:formula="of:=[.D$4]*MAGNET([.$I$1]*[.$L90]+[.D$5]*PI()/180)+(RAND()-0.5)*[.$B$4]*[.$B$13]" office:value-type="float" office:value="0.0460906933434328" calcext:value-type="float">
            <text:p>0.05</text:p>
          </table:table-cell>
          <table:table-cell table:formula="of:=[.E$4]*MAGNET([.$I$1]*[.$L90]+[.E$5]*PI()/180)+(RAND()-0.5)*[.$B$4]*[.$B$13]" office:value-type="float" office:value="0.045817779354584" calcext:value-type="float">
            <text:p>0.05</text:p>
          </table:table-cell>
          <table:table-cell table:formula="of:=[.F$4]*MAGNET([.$I$1]*[.$L90]+[.F$5]*PI()/180)+(RAND()-0.5)*[.$B$4]*[.$B$13]" office:value-type="float" office:value="0.0529764547744009" calcext:value-type="float">
            <text:p>0.05</text:p>
          </table:table-cell>
          <table:table-cell table:formula="of:=[.G$4]*MAGNET([.$I$1]*[.$L90]+[.G$5]*PI()/180)+(RAND()-0.5)*[.$B$4]*[.$B$13]" office:value-type="float" office:value="0.0557317377240513" calcext:value-type="float">
            <text:p>0.06</text:p>
          </table:table-cell>
          <table:table-cell table:formula="of:=[.H$4]*MAGNET([.$I$1]*[.$L90]+[.H$5]*PI()/180)+(RAND()-0.5)*[.$B$4]*[.$B$13]" office:value-type="float" office:value="0.0590286635324933" calcext:value-type="float">
            <text:p>0.06</text:p>
          </table:table-cell>
          <table:table-cell table:formula="of:=[.I$4]*MAGNET([.$I$1]*[.$L90]+[.I$5]*PI()/180)+(RAND()-0.5)*[.$B$4]*[.$B$13]" office:value-type="float" office:value="0.0632554082453843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0]+0.002" office:value-type="float" office:value="0.174" calcext:value-type="float">
            <text:p>0.174</text:p>
          </table:table-cell>
          <table:table-cell table:formula="of:=[.B$4]*MAGNET([.$I$1]*[.$L91]+[.B$5]*PI()/180)+(RAND()-0.5)*[.$B$4]*[.$B$13]" office:value-type="float" office:value="0.0358852066120743" calcext:value-type="float">
            <text:p>0.04</text:p>
          </table:table-cell>
          <table:table-cell table:formula="of:=[.C$4]*MAGNET([.$I$1]*[.$L91]+[.C$5]*PI()/180)+(RAND()-0.5)*[.$B$4]*[.$B$13]" office:value-type="float" office:value="0.0383066014952544" calcext:value-type="float">
            <text:p>0.04</text:p>
          </table:table-cell>
          <table:table-cell table:formula="of:=[.D$4]*MAGNET([.$I$1]*[.$L91]+[.D$5]*PI()/180)+(RAND()-0.5)*[.$B$4]*[.$B$13]" office:value-type="float" office:value="0.0414995130726609" calcext:value-type="float">
            <text:p>0.04</text:p>
          </table:table-cell>
          <table:table-cell table:formula="of:=[.E$4]*MAGNET([.$I$1]*[.$L91]+[.E$5]*PI()/180)+(RAND()-0.5)*[.$B$4]*[.$B$13]" office:value-type="float" office:value="0.0412093236429385" calcext:value-type="float">
            <text:p>0.04</text:p>
          </table:table-cell>
          <table:table-cell table:formula="of:=[.F$4]*MAGNET([.$I$1]*[.$L91]+[.F$5]*PI()/180)+(RAND()-0.5)*[.$B$4]*[.$B$13]" office:value-type="float" office:value="0.0484791730727476" calcext:value-type="float">
            <text:p>0.05</text:p>
          </table:table-cell>
          <table:table-cell table:formula="of:=[.G$4]*MAGNET([.$I$1]*[.$L91]+[.G$5]*PI()/180)+(RAND()-0.5)*[.$B$4]*[.$B$13]" office:value-type="float" office:value="0.0504518147719959" calcext:value-type="float">
            <text:p>0.05</text:p>
          </table:table-cell>
          <table:table-cell table:formula="of:=[.H$4]*MAGNET([.$I$1]*[.$L91]+[.H$5]*PI()/180)+(RAND()-0.5)*[.$B$4]*[.$B$13]" office:value-type="float" office:value="0.0535017316013232" calcext:value-type="float">
            <text:p>0.05</text:p>
          </table:table-cell>
          <table:table-cell table:formula="of:=[.I$4]*MAGNET([.$I$1]*[.$L91]+[.I$5]*PI()/180)+(RAND()-0.5)*[.$B$4]*[.$B$13]" office:value-type="float" office:value="0.0575547950057771" calcext:value-type="float">
            <text:p>0.06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1]+0.002" office:value-type="float" office:value="0.176" calcext:value-type="float">
            <text:p>0.176</text:p>
          </table:table-cell>
          <table:table-cell table:formula="of:=[.B$4]*MAGNET([.$I$1]*[.$L92]+[.B$5]*PI()/180)+(RAND()-0.5)*[.$B$4]*[.$B$13]" office:value-type="float" office:value="0.0315997966436894" calcext:value-type="float">
            <text:p>0.03</text:p>
          </table:table-cell>
          <table:table-cell table:formula="of:=[.C$4]*MAGNET([.$I$1]*[.$L92]+[.C$5]*PI()/180)+(RAND()-0.5)*[.$B$4]*[.$B$13]" office:value-type="float" office:value="0.0343407343049633" calcext:value-type="float">
            <text:p>0.03</text:p>
          </table:table-cell>
          <table:table-cell table:formula="of:=[.D$4]*MAGNET([.$I$1]*[.$L92]+[.D$5]*PI()/180)+(RAND()-0.5)*[.$B$4]*[.$B$13]" office:value-type="float" office:value="0.0365493346088727" calcext:value-type="float">
            <text:p>0.04</text:p>
          </table:table-cell>
          <table:table-cell table:formula="of:=[.E$4]*MAGNET([.$I$1]*[.$L92]+[.E$5]*PI()/180)+(RAND()-0.5)*[.$B$4]*[.$B$13]" office:value-type="float" office:value="0.0347393124654296" calcext:value-type="float">
            <text:p>0.03</text:p>
          </table:table-cell>
          <table:table-cell table:formula="of:=[.F$4]*MAGNET([.$I$1]*[.$L92]+[.F$5]*PI()/180)+(RAND()-0.5)*[.$B$4]*[.$B$13]" office:value-type="float" office:value="0.0418072904100411" calcext:value-type="float">
            <text:p>0.04</text:p>
          </table:table-cell>
          <table:table-cell table:formula="of:=[.G$4]*MAGNET([.$I$1]*[.$L92]+[.G$5]*PI()/180)+(RAND()-0.5)*[.$B$4]*[.$B$13]" office:value-type="float" office:value="0.0441468827979506" calcext:value-type="float">
            <text:p>0.04</text:p>
          </table:table-cell>
          <table:table-cell table:formula="of:=[.H$4]*MAGNET([.$I$1]*[.$L92]+[.H$5]*PI()/180)+(RAND()-0.5)*[.$B$4]*[.$B$13]" office:value-type="float" office:value="0.0469850841714234" calcext:value-type="float">
            <text:p>0.05</text:p>
          </table:table-cell>
          <table:table-cell table:formula="of:=[.I$4]*MAGNET([.$I$1]*[.$L92]+[.I$5]*PI()/180)+(RAND()-0.5)*[.$B$4]*[.$B$13]" office:value-type="float" office:value="0.0505764087878413" calcext:value-type="float">
            <text:p>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2]+0.002" office:value-type="float" office:value="0.178" calcext:value-type="float">
            <text:p>0.178</text:p>
          </table:table-cell>
          <table:table-cell table:formula="of:=[.B$4]*MAGNET([.$I$1]*[.$L93]+[.B$5]*PI()/180)+(RAND()-0.5)*[.$B$4]*[.$B$13]" office:value-type="float" office:value="0.0261080039604337" calcext:value-type="float">
            <text:p>0.03</text:p>
          </table:table-cell>
          <table:table-cell table:formula="of:=[.C$4]*MAGNET([.$I$1]*[.$L93]+[.C$5]*PI()/180)+(RAND()-0.5)*[.$B$4]*[.$B$13]" office:value-type="float" office:value="0.0280593009319437" calcext:value-type="float">
            <text:p>0.03</text:p>
          </table:table-cell>
          <table:table-cell table:formula="of:=[.D$4]*MAGNET([.$I$1]*[.$L93]+[.D$5]*PI()/180)+(RAND()-0.5)*[.$B$4]*[.$B$13]" office:value-type="float" office:value="0.0309677233108032" calcext:value-type="float">
            <text:p>0.03</text:p>
          </table:table-cell>
          <table:table-cell table:formula="of:=[.E$4]*MAGNET([.$I$1]*[.$L93]+[.E$5]*PI()/180)+(RAND()-0.5)*[.$B$4]*[.$B$13]" office:value-type="float" office:value="0.0276771396764006" calcext:value-type="float">
            <text:p>0.03</text:p>
          </table:table-cell>
          <table:table-cell table:formula="of:=[.F$4]*MAGNET([.$I$1]*[.$L93]+[.F$5]*PI()/180)+(RAND()-0.5)*[.$B$4]*[.$B$13]" office:value-type="float" office:value="0.0350681545551202" calcext:value-type="float">
            <text:p>0.04</text:p>
          </table:table-cell>
          <table:table-cell table:formula="of:=[.G$4]*MAGNET([.$I$1]*[.$L93]+[.G$5]*PI()/180)+(RAND()-0.5)*[.$B$4]*[.$B$13]" office:value-type="float" office:value="0.0366614867529649" calcext:value-type="float">
            <text:p>0.04</text:p>
          </table:table-cell>
          <table:table-cell table:formula="of:=[.H$4]*MAGNET([.$I$1]*[.$L93]+[.H$5]*PI()/180)+(RAND()-0.5)*[.$B$4]*[.$B$13]" office:value-type="float" office:value="0.0397945118478809" calcext:value-type="float">
            <text:p>0.04</text:p>
          </table:table-cell>
          <table:table-cell table:formula="of:=[.I$4]*MAGNET([.$I$1]*[.$L93]+[.I$5]*PI()/180)+(RAND()-0.5)*[.$B$4]*[.$B$13]" office:value-type="float" office:value="0.0415129106312694" calcext:value-type="float">
            <text:p>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3]+0.002" office:value-type="float" office:value="0.18" calcext:value-type="float">
            <text:p>0.18</text:p>
          </table:table-cell>
          <table:table-cell table:formula="of:=[.B$4]*MAGNET([.$I$1]*[.$L94]+[.B$5]*PI()/180)+(RAND()-0.5)*[.$B$4]*[.$B$13]" office:value-type="float" office:value="0.0198533649642852" calcext:value-type="float">
            <text:p>0.02</text:p>
          </table:table-cell>
          <table:table-cell table:formula="of:=[.C$4]*MAGNET([.$I$1]*[.$L94]+[.C$5]*PI()/180)+(RAND()-0.5)*[.$B$4]*[.$B$13]" office:value-type="float" office:value="0.02195982235381" calcext:value-type="float">
            <text:p>0.02</text:p>
          </table:table-cell>
          <table:table-cell table:formula="of:=[.D$4]*MAGNET([.$I$1]*[.$L94]+[.D$5]*PI()/180)+(RAND()-0.5)*[.$B$4]*[.$B$13]" office:value-type="float" office:value="0.0236964233979527" calcext:value-type="float">
            <text:p>0.02</text:p>
          </table:table-cell>
          <table:table-cell table:formula="of:=[.E$4]*MAGNET([.$I$1]*[.$L94]+[.E$5]*PI()/180)+(RAND()-0.5)*[.$B$4]*[.$B$13]" office:value-type="float" office:value="0.0211266280735598" calcext:value-type="float">
            <text:p>0.02</text:p>
          </table:table-cell>
          <table:table-cell table:formula="of:=[.F$4]*MAGNET([.$I$1]*[.$L94]+[.F$5]*PI()/180)+(RAND()-0.5)*[.$B$4]*[.$B$13]" office:value-type="float" office:value="0.0273288081958209" calcext:value-type="float">
            <text:p>0.03</text:p>
          </table:table-cell>
          <table:table-cell table:formula="of:=[.G$4]*MAGNET([.$I$1]*[.$L94]+[.G$5]*PI()/180)+(RAND()-0.5)*[.$B$4]*[.$B$13]" office:value-type="float" office:value="0.0294688046590395" calcext:value-type="float">
            <text:p>0.03</text:p>
          </table:table-cell>
          <table:table-cell table:formula="of:=[.H$4]*MAGNET([.$I$1]*[.$L94]+[.H$5]*PI()/180)+(RAND()-0.5)*[.$B$4]*[.$B$13]" office:value-type="float" office:value="0.0316375963809477" calcext:value-type="float">
            <text:p>0.03</text:p>
          </table:table-cell>
          <table:table-cell table:formula="of:=[.I$4]*MAGNET([.$I$1]*[.$L94]+[.I$5]*PI()/180)+(RAND()-0.5)*[.$B$4]*[.$B$13]" office:value-type="float" office:value="0.0321917135378134" calcext:value-type="float">
            <text:p>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4]+0.002" office:value-type="float" office:value="0.182" calcext:value-type="float">
            <text:p>0.182</text:p>
          </table:table-cell>
          <table:table-cell table:formula="of:=[.B$4]*MAGNET([.$I$1]*[.$L95]+[.B$5]*PI()/180)+(RAND()-0.5)*[.$B$4]*[.$B$13]" office:value-type="float" office:value="0.0148728113060008" calcext:value-type="float">
            <text:p>0.01</text:p>
          </table:table-cell>
          <table:table-cell table:formula="of:=[.C$4]*MAGNET([.$I$1]*[.$L95]+[.C$5]*PI()/180)+(RAND()-0.5)*[.$B$4]*[.$B$13]" office:value-type="float" office:value="0.0158283072533011" calcext:value-type="float">
            <text:p>0.02</text:p>
          </table:table-cell>
          <table:table-cell table:formula="of:=[.D$4]*MAGNET([.$I$1]*[.$L95]+[.D$5]*PI()/180)+(RAND()-0.5)*[.$B$4]*[.$B$13]" office:value-type="float" office:value="0.0167092009170444" calcext:value-type="float">
            <text:p>0.02</text:p>
          </table:table-cell>
          <table:table-cell table:formula="of:=[.E$4]*MAGNET([.$I$1]*[.$L95]+[.E$5]*PI()/180)+(RAND()-0.5)*[.$B$4]*[.$B$13]" office:value-type="float" office:value="0.01248655689164" calcext:value-type="float">
            <text:p>0.01</text:p>
          </table:table-cell>
          <table:table-cell table:formula="of:=[.F$4]*MAGNET([.$I$1]*[.$L95]+[.F$5]*PI()/180)+(RAND()-0.5)*[.$B$4]*[.$B$13]" office:value-type="float" office:value="0.0199161210779878" calcext:value-type="float">
            <text:p>0.02</text:p>
          </table:table-cell>
          <table:table-cell table:formula="of:=[.G$4]*MAGNET([.$I$1]*[.$L95]+[.G$5]*PI()/180)+(RAND()-0.5)*[.$B$4]*[.$B$13]" office:value-type="float" office:value="0.0214164096322531" calcext:value-type="float">
            <text:p>0.02</text:p>
          </table:table-cell>
          <table:table-cell table:formula="of:=[.H$4]*MAGNET([.$I$1]*[.$L95]+[.H$5]*PI()/180)+(RAND()-0.5)*[.$B$4]*[.$B$13]" office:value-type="float" office:value="0.022074959500154" calcext:value-type="float">
            <text:p>0.02</text:p>
          </table:table-cell>
          <table:table-cell table:formula="of:=[.I$4]*MAGNET([.$I$1]*[.$L95]+[.I$5]*PI()/180)+(RAND()-0.5)*[.$B$4]*[.$B$13]" office:value-type="float" office:value="0.0227266254974963" calcext:value-type="float">
            <text:p>0.02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5]+0.002" office:value-type="float" office:value="0.184" calcext:value-type="float">
            <text:p>0.184</text:p>
          </table:table-cell>
          <table:table-cell table:formula="of:=[.B$4]*MAGNET([.$I$1]*[.$L96]+[.B$5]*PI()/180)+(RAND()-0.5)*[.$B$4]*[.$B$13]" office:value-type="float" office:value="0.00926649671499672" calcext:value-type="float">
            <text:p>0.01</text:p>
          </table:table-cell>
          <table:table-cell table:formula="of:=[.C$4]*MAGNET([.$I$1]*[.$L96]+[.C$5]*PI()/180)+(RAND()-0.5)*[.$B$4]*[.$B$13]" office:value-type="float" office:value="0.00992261109009626" calcext:value-type="float">
            <text:p>0.01</text:p>
          </table:table-cell>
          <table:table-cell table:formula="of:=[.D$4]*MAGNET([.$I$1]*[.$L96]+[.D$5]*PI()/180)+(RAND()-0.5)*[.$B$4]*[.$B$13]" office:value-type="float" office:value="0.0106632929683003" calcext:value-type="float">
            <text:p>0.01</text:p>
          </table:table-cell>
          <table:table-cell table:formula="of:=[.E$4]*MAGNET([.$I$1]*[.$L96]+[.E$5]*PI()/180)+(RAND()-0.5)*[.$B$4]*[.$B$13]" office:value-type="float" office:value="0.00589760118455436" calcext:value-type="float">
            <text:p>0.01</text:p>
          </table:table-cell>
          <table:table-cell table:formula="of:=[.F$4]*MAGNET([.$I$1]*[.$L96]+[.F$5]*PI()/180)+(RAND()-0.5)*[.$B$4]*[.$B$13]" office:value-type="float" office:value="0.0116203099263553" calcext:value-type="float">
            <text:p>0.01</text:p>
          </table:table-cell>
          <table:table-cell table:formula="of:=[.G$4]*MAGNET([.$I$1]*[.$L96]+[.G$5]*PI()/180)+(RAND()-0.5)*[.$B$4]*[.$B$13]" office:value-type="float" office:value="0.0128980175641583" calcext:value-type="float">
            <text:p>0.01</text:p>
          </table:table-cell>
          <table:table-cell table:formula="of:=[.H$4]*MAGNET([.$I$1]*[.$L96]+[.H$5]*PI()/180)+(RAND()-0.5)*[.$B$4]*[.$B$13]" office:value-type="float" office:value="0.0131057038946479" calcext:value-type="float">
            <text:p>0.01</text:p>
          </table:table-cell>
          <table:table-cell table:formula="of:=[.I$4]*MAGNET([.$I$1]*[.$L96]+[.I$5]*PI()/180)+(RAND()-0.5)*[.$B$4]*[.$B$13]" office:value-type="float" office:value="0.0138758523295472" calcext:value-type="float">
            <text:p>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6]+0.002" office:value-type="float" office:value="0.186" calcext:value-type="float">
            <text:p>0.186</text:p>
          </table:table-cell>
          <table:table-cell table:formula="of:=[.B$4]*MAGNET([.$I$1]*[.$L97]+[.B$5]*PI()/180)+(RAND()-0.5)*[.$B$4]*[.$B$13]" office:value-type="float" office:value="0.00402086030369871" calcext:value-type="float">
            <text:p>0.00</text:p>
          </table:table-cell>
          <table:table-cell table:formula="of:=[.C$4]*MAGNET([.$I$1]*[.$L97]+[.C$5]*PI()/180)+(RAND()-0.5)*[.$B$4]*[.$B$13]" office:value-type="float" office:value="0.00413301655656633" calcext:value-type="float">
            <text:p>0.00</text:p>
          </table:table-cell>
          <table:table-cell table:formula="of:=[.D$4]*MAGNET([.$I$1]*[.$L97]+[.D$5]*PI()/180)+(RAND()-0.5)*[.$B$4]*[.$B$13]" office:value-type="float" office:value="0.00427500055043593" calcext:value-type="float">
            <text:p>0.00</text:p>
          </table:table-cell>
          <table:table-cell table:formula="of:=[.E$4]*MAGNET([.$I$1]*[.$L97]+[.E$5]*PI()/180)+(RAND()-0.5)*[.$B$4]*[.$B$13]" office:value-type="float" office:value="-0.000228773977125334" calcext:value-type="float">
            <text:p>0.00</text:p>
          </table:table-cell>
          <table:table-cell table:formula="of:=[.F$4]*MAGNET([.$I$1]*[.$L97]+[.F$5]*PI()/180)+(RAND()-0.5)*[.$B$4]*[.$B$13]" office:value-type="float" office:value="0.00491386849698295" calcext:value-type="float">
            <text:p>0.00</text:p>
          </table:table-cell>
          <table:table-cell table:formula="of:=[.G$4]*MAGNET([.$I$1]*[.$L97]+[.G$5]*PI()/180)+(RAND()-0.5)*[.$B$4]*[.$B$13]" office:value-type="float" office:value="0.00525231716181368" calcext:value-type="float">
            <text:p>0.01</text:p>
          </table:table-cell>
          <table:table-cell table:formula="of:=[.H$4]*MAGNET([.$I$1]*[.$L97]+[.H$5]*PI()/180)+(RAND()-0.5)*[.$B$4]*[.$B$13]" office:value-type="float" office:value="0.00566501537192329" calcext:value-type="float">
            <text:p>0.01</text:p>
          </table:table-cell>
          <table:table-cell table:formula="of:=[.I$4]*MAGNET([.$I$1]*[.$L97]+[.I$5]*PI()/180)+(RAND()-0.5)*[.$B$4]*[.$B$13]" office:value-type="float" office:value="0.00602133374110549" calcext:value-type="float">
            <text:p>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7]+0.002" office:value-type="float" office:value="0.188" calcext:value-type="float">
            <text:p>0.188</text:p>
          </table:table-cell>
          <table:table-cell table:formula="of:=[.B$4]*MAGNET([.$I$1]*[.$L98]+[.B$5]*PI()/180)+(RAND()-0.5)*[.$B$4]*[.$B$13]" office:value-type="float" office:value="-0.00115983335854035" calcext:value-type="float">
            <text:p>0.00</text:p>
          </table:table-cell>
          <table:table-cell table:formula="of:=[.C$4]*MAGNET([.$I$1]*[.$L98]+[.C$5]*PI()/180)+(RAND()-0.5)*[.$B$4]*[.$B$13]" office:value-type="float" office:value="-0.000880707188156522" calcext:value-type="float">
            <text:p>0.00</text:p>
          </table:table-cell>
          <table:table-cell table:formula="of:=[.D$4]*MAGNET([.$I$1]*[.$L98]+[.D$5]*PI()/180)+(RAND()-0.5)*[.$B$4]*[.$B$13]" office:value-type="float" office:value="-0.000960749751800492" calcext:value-type="float">
            <text:p>0.00</text:p>
          </table:table-cell>
          <table:table-cell table:formula="of:=[.E$4]*MAGNET([.$I$1]*[.$L98]+[.E$5]*PI()/180)+(RAND()-0.5)*[.$B$4]*[.$B$13]" office:value-type="float" office:value="-0.00603588481616624" calcext:value-type="float">
            <text:p>-0.01</text:p>
          </table:table-cell>
          <table:table-cell table:formula="of:=[.F$4]*MAGNET([.$I$1]*[.$L98]+[.F$5]*PI()/180)+(RAND()-0.5)*[.$B$4]*[.$B$13]" office:value-type="float" office:value="-0.00210211398293922" calcext:value-type="float">
            <text:p>0.00</text:p>
          </table:table-cell>
          <table:table-cell table:formula="of:=[.G$4]*MAGNET([.$I$1]*[.$L98]+[.G$5]*PI()/180)+(RAND()-0.5)*[.$B$4]*[.$B$13]" office:value-type="float" office:value="-0.00165065263690016" calcext:value-type="float">
            <text:p>0.00</text:p>
          </table:table-cell>
          <table:table-cell table:formula="of:=[.H$4]*MAGNET([.$I$1]*[.$L98]+[.H$5]*PI()/180)+(RAND()-0.5)*[.$B$4]*[.$B$13]" office:value-type="float" office:value="-0.00138938309440347" calcext:value-type="float">
            <text:p>0.00</text:p>
          </table:table-cell>
          <table:table-cell table:formula="of:=[.I$4]*MAGNET([.$I$1]*[.$L98]+[.I$5]*PI()/180)+(RAND()-0.5)*[.$B$4]*[.$B$13]" office:value-type="float" office:value="-0.00181140876096637" calcext:value-type="float">
            <text:p>0.00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8]+0.002" office:value-type="float" office:value="0.19" calcext:value-type="float">
            <text:p>0.19</text:p>
          </table:table-cell>
          <table:table-cell table:formula="of:=[.B$4]*MAGNET([.$I$1]*[.$L99]+[.B$5]*PI()/180)+(RAND()-0.5)*[.$B$4]*[.$B$13]" office:value-type="float" office:value="-0.00645620964898358" calcext:value-type="float">
            <text:p>-0.01</text:p>
          </table:table-cell>
          <table:table-cell table:formula="of:=[.C$4]*MAGNET([.$I$1]*[.$L99]+[.C$5]*PI()/180)+(RAND()-0.5)*[.$B$4]*[.$B$13]" office:value-type="float" office:value="-0.00691386605559264" calcext:value-type="float">
            <text:p>-0.01</text:p>
          </table:table-cell>
          <table:table-cell table:formula="of:=[.D$4]*MAGNET([.$I$1]*[.$L99]+[.D$5]*PI()/180)+(RAND()-0.5)*[.$B$4]*[.$B$13]" office:value-type="float" office:value="-0.00723080716622663" calcext:value-type="float">
            <text:p>-0.01</text:p>
          </table:table-cell>
          <table:table-cell table:formula="of:=[.E$4]*MAGNET([.$I$1]*[.$L99]+[.E$5]*PI()/180)+(RAND()-0.5)*[.$B$4]*[.$B$13]" office:value-type="float" office:value="-0.0129949218493897" calcext:value-type="float">
            <text:p>-0.01</text:p>
          </table:table-cell>
          <table:table-cell table:formula="of:=[.F$4]*MAGNET([.$I$1]*[.$L99]+[.F$5]*PI()/180)+(RAND()-0.5)*[.$B$4]*[.$B$13]" office:value-type="float" office:value="-0.00751086483286561" calcext:value-type="float">
            <text:p>-0.01</text:p>
          </table:table-cell>
          <table:table-cell table:formula="of:=[.G$4]*MAGNET([.$I$1]*[.$L99]+[.G$5]*PI()/180)+(RAND()-0.5)*[.$B$4]*[.$B$13]" office:value-type="float" office:value="-0.00887547637308001" calcext:value-type="float">
            <text:p>-0.01</text:p>
          </table:table-cell>
          <table:table-cell table:formula="of:=[.H$4]*MAGNET([.$I$1]*[.$L99]+[.H$5]*PI()/180)+(RAND()-0.5)*[.$B$4]*[.$B$13]" office:value-type="float" office:value="-0.00904464768761826" calcext:value-type="float">
            <text:p>-0.01</text:p>
          </table:table-cell>
          <table:table-cell table:formula="of:=[.I$4]*MAGNET([.$I$1]*[.$L99]+[.I$5]*PI()/180)+(RAND()-0.5)*[.$B$4]*[.$B$13]" office:value-type="float" office:value="-0.0100324722315949" calcext:value-type="float">
            <text:p>-0.01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99]+0.002" office:value-type="float" office:value="0.192" calcext:value-type="float">
            <text:p>0.192</text:p>
          </table:table-cell>
          <table:table-cell table:formula="of:=[.B$4]*MAGNET([.$I$1]*[.$L100]+[.B$5]*PI()/180)+(RAND()-0.5)*[.$B$4]*[.$B$13]" office:value-type="float" office:value="-0.0112828252823916" calcext:value-type="float">
            <text:p>-0.01</text:p>
          </table:table-cell>
          <table:table-cell table:formula="of:=[.C$4]*MAGNET([.$I$1]*[.$L100]+[.C$5]*PI()/180)+(RAND()-0.5)*[.$B$4]*[.$B$13]" office:value-type="float" office:value="-0.0123647633349557" calcext:value-type="float">
            <text:p>-0.01</text:p>
          </table:table-cell>
          <table:table-cell table:formula="of:=[.D$4]*MAGNET([.$I$1]*[.$L100]+[.D$5]*PI()/180)+(RAND()-0.5)*[.$B$4]*[.$B$13]" office:value-type="float" office:value="-0.0139744992245116" calcext:value-type="float">
            <text:p>-0.01</text:p>
          </table:table-cell>
          <table:table-cell table:formula="of:=[.E$4]*MAGNET([.$I$1]*[.$L100]+[.E$5]*PI()/180)+(RAND()-0.5)*[.$B$4]*[.$B$13]" office:value-type="float" office:value="-0.0193315365739857" calcext:value-type="float">
            <text:p>-0.02</text:p>
          </table:table-cell>
          <table:table-cell table:formula="of:=[.F$4]*MAGNET([.$I$1]*[.$L100]+[.F$5]*PI()/180)+(RAND()-0.5)*[.$B$4]*[.$B$13]" office:value-type="float" office:value="-0.0152375036084421" calcext:value-type="float">
            <text:p>-0.02</text:p>
          </table:table-cell>
          <table:table-cell table:formula="of:=[.G$4]*MAGNET([.$I$1]*[.$L100]+[.G$5]*PI()/180)+(RAND()-0.5)*[.$B$4]*[.$B$13]" office:value-type="float" office:value="-0.0164707212429873" calcext:value-type="float">
            <text:p>-0.02</text:p>
          </table:table-cell>
          <table:table-cell table:formula="of:=[.H$4]*MAGNET([.$I$1]*[.$L100]+[.H$5]*PI()/180)+(RAND()-0.5)*[.$B$4]*[.$B$13]" office:value-type="float" office:value="-0.0177484154555092" calcext:value-type="float">
            <text:p>-0.02</text:p>
          </table:table-cell>
          <table:table-cell table:formula="of:=[.I$4]*MAGNET([.$I$1]*[.$L100]+[.I$5]*PI()/180)+(RAND()-0.5)*[.$B$4]*[.$B$13]" office:value-type="float" office:value="-0.0182093555559621" calcext:value-type="float">
            <text:p>-0.02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00]+0.002" office:value-type="float" office:value="0.194" calcext:value-type="float">
            <text:p>0.194</text:p>
          </table:table-cell>
          <table:table-cell table:formula="of:=[.B$4]*MAGNET([.$I$1]*[.$L101]+[.B$5]*PI()/180)+(RAND()-0.5)*[.$B$4]*[.$B$13]" office:value-type="float" office:value="-0.0178972380602439" calcext:value-type="float">
            <text:p>-0.02</text:p>
          </table:table-cell>
          <table:table-cell table:formula="of:=[.C$4]*MAGNET([.$I$1]*[.$L101]+[.C$5]*PI()/180)+(RAND()-0.5)*[.$B$4]*[.$B$13]" office:value-type="float" office:value="-0.0191504467569269" calcext:value-type="float">
            <text:p>-0.02</text:p>
          </table:table-cell>
          <table:table-cell table:formula="of:=[.D$4]*MAGNET([.$I$1]*[.$L101]+[.D$5]*PI()/180)+(RAND()-0.5)*[.$B$4]*[.$B$13]" office:value-type="float" office:value="-0.0208750524716507" calcext:value-type="float">
            <text:p>-0.02</text:p>
          </table:table-cell>
          <table:table-cell table:formula="of:=[.E$4]*MAGNET([.$I$1]*[.$L101]+[.E$5]*PI()/180)+(RAND()-0.5)*[.$B$4]*[.$B$13]" office:value-type="float" office:value="-0.0266964317398302" calcext:value-type="float">
            <text:p>-0.03</text:p>
          </table:table-cell>
          <table:table-cell table:formula="of:=[.F$4]*MAGNET([.$I$1]*[.$L101]+[.F$5]*PI()/180)+(RAND()-0.5)*[.$B$4]*[.$B$13]" office:value-type="float" office:value="-0.0236072631633868" calcext:value-type="float">
            <text:p>-0.02</text:p>
          </table:table-cell>
          <table:table-cell table:formula="of:=[.G$4]*MAGNET([.$I$1]*[.$L101]+[.G$5]*PI()/180)+(RAND()-0.5)*[.$B$4]*[.$B$13]" office:value-type="float" office:value="-0.0254110524652427" calcext:value-type="float">
            <text:p>-0.03</text:p>
          </table:table-cell>
          <table:table-cell table:formula="of:=[.H$4]*MAGNET([.$I$1]*[.$L101]+[.H$5]*PI()/180)+(RAND()-0.5)*[.$B$4]*[.$B$13]" office:value-type="float" office:value="-0.0270950599734138" calcext:value-type="float">
            <text:p>-0.03</text:p>
          </table:table-cell>
          <table:table-cell table:formula="of:=[.I$4]*MAGNET([.$I$1]*[.$L101]+[.I$5]*PI()/180)+(RAND()-0.5)*[.$B$4]*[.$B$13]" office:value-type="float" office:value="-0.028646230305021" calcext:value-type="float">
            <text:p>-0.03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01]+0.002" office:value-type="float" office:value="0.196" calcext:value-type="float">
            <text:p>0.196</text:p>
          </table:table-cell>
          <table:table-cell table:formula="of:=[.B$4]*MAGNET([.$I$1]*[.$L102]+[.B$5]*PI()/180)+(RAND()-0.5)*[.$B$4]*[.$B$13]" office:value-type="float" office:value="-0.0227216905776891" calcext:value-type="float">
            <text:p>-0.02</text:p>
          </table:table-cell>
          <table:table-cell table:formula="of:=[.C$4]*MAGNET([.$I$1]*[.$L102]+[.C$5]*PI()/180)+(RAND()-0.5)*[.$B$4]*[.$B$13]" office:value-type="float" office:value="-0.0252243606284473" calcext:value-type="float">
            <text:p>-0.03</text:p>
          </table:table-cell>
          <table:table-cell table:formula="of:=[.D$4]*MAGNET([.$I$1]*[.$L102]+[.D$5]*PI()/180)+(RAND()-0.5)*[.$B$4]*[.$B$13]" office:value-type="float" office:value="-0.0278442697659538" calcext:value-type="float">
            <text:p>-0.03</text:p>
          </table:table-cell>
          <table:table-cell table:formula="of:=[.E$4]*MAGNET([.$I$1]*[.$L102]+[.E$5]*PI()/180)+(RAND()-0.5)*[.$B$4]*[.$B$13]" office:value-type="float" office:value="-0.0339756091428147" calcext:value-type="float">
            <text:p>-0.03</text:p>
          </table:table-cell>
          <table:table-cell table:formula="of:=[.F$4]*MAGNET([.$I$1]*[.$L102]+[.F$5]*PI()/180)+(RAND()-0.5)*[.$B$4]*[.$B$13]" office:value-type="float" office:value="-0.0309747432538753" calcext:value-type="float">
            <text:p>-0.03</text:p>
          </table:table-cell>
          <table:table-cell table:formula="of:=[.G$4]*MAGNET([.$I$1]*[.$L102]+[.G$5]*PI()/180)+(RAND()-0.5)*[.$B$4]*[.$B$13]" office:value-type="float" office:value="-0.0334035849276787" calcext:value-type="float">
            <text:p>-0.03</text:p>
          </table:table-cell>
          <table:table-cell table:formula="of:=[.H$4]*MAGNET([.$I$1]*[.$L102]+[.H$5]*PI()/180)+(RAND()-0.5)*[.$B$4]*[.$B$13]" office:value-type="float" office:value="-0.0347561946697246" calcext:value-type="float">
            <text:p>-0.03</text:p>
          </table:table-cell>
          <table:table-cell table:formula="of:=[.I$4]*MAGNET([.$I$1]*[.$L102]+[.I$5]*PI()/180)+(RAND()-0.5)*[.$B$4]*[.$B$13]" office:value-type="float" office:value="-0.0370869748705341" calcext:value-type="float">
            <text:p>-0.04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02]+0.002" office:value-type="float" office:value="0.198" calcext:value-type="float">
            <text:p>0.198</text:p>
          </table:table-cell>
          <table:table-cell table:formula="of:=[.B$4]*MAGNET([.$I$1]*[.$L103]+[.B$5]*PI()/180)+(RAND()-0.5)*[.$B$4]*[.$B$13]" office:value-type="float" office:value="-0.0285189856838013" calcext:value-type="float">
            <text:p>-0.03</text:p>
          </table:table-cell>
          <table:table-cell table:formula="of:=[.C$4]*MAGNET([.$I$1]*[.$L103]+[.C$5]*PI()/180)+(RAND()-0.5)*[.$B$4]*[.$B$13]" office:value-type="float" office:value="-0.031172349904866" calcext:value-type="float">
            <text:p>-0.03</text:p>
          </table:table-cell>
          <table:table-cell table:formula="of:=[.D$4]*MAGNET([.$I$1]*[.$L103]+[.D$5]*PI()/180)+(RAND()-0.5)*[.$B$4]*[.$B$13]" office:value-type="float" office:value="-0.0339645570862988" calcext:value-type="float">
            <text:p>-0.03</text:p>
          </table:table-cell>
          <table:table-cell table:formula="of:=[.E$4]*MAGNET([.$I$1]*[.$L103]+[.E$5]*PI()/180)+(RAND()-0.5)*[.$B$4]*[.$B$13]" office:value-type="float" office:value="-0.0405254746697597" calcext:value-type="float">
            <text:p>-0.04</text:p>
          </table:table-cell>
          <table:table-cell table:formula="of:=[.F$4]*MAGNET([.$I$1]*[.$L103]+[.F$5]*PI()/180)+(RAND()-0.5)*[.$B$4]*[.$B$13]" office:value-type="float" office:value="-0.0391807133255603" calcext:value-type="float">
            <text:p>-0.04</text:p>
          </table:table-cell>
          <table:table-cell table:formula="of:=[.G$4]*MAGNET([.$I$1]*[.$L103]+[.G$5]*PI()/180)+(RAND()-0.5)*[.$B$4]*[.$B$13]" office:value-type="float" office:value="-0.0413552227128735" calcext:value-type="float">
            <text:p>-0.04</text:p>
          </table:table-cell>
          <table:table-cell table:formula="of:=[.H$4]*MAGNET([.$I$1]*[.$L103]+[.H$5]*PI()/180)+(RAND()-0.5)*[.$B$4]*[.$B$13]" office:value-type="float" office:value="-0.0430919023285425" calcext:value-type="float">
            <text:p>-0.04</text:p>
          </table:table-cell>
          <table:table-cell table:formula="of:=[.I$4]*MAGNET([.$I$1]*[.$L103]+[.I$5]*PI()/180)+(RAND()-0.5)*[.$B$4]*[.$B$13]" office:value-type="float" office:value="-0.0460937571213186" calcext:value-type="float">
            <text:p>-0.05</text:p>
          </table:table-cell>
          <table:table-cell table:style-name="Default" table:number-columns-repeated="16364"/>
        </table:table-row>
        <table:table-row table:style-name="ro1">
          <table:table-cell table:number-columns-repeated="11"/>
          <table:table-cell table:formula="of:=[.L103]+0.002" office:value-type="float" office:value="0.2" calcext:value-type="float">
            <text:p>0.2</text:p>
          </table:table-cell>
          <table:table-cell table:formula="of:=[.B$4]*MAGNET([.$I$1]*[.$L104]+[.B$5]*PI()/180)+(RAND()-0.5)*[.$B$4]*[.$B$13]" office:value-type="float" office:value="-0.0329575942629493" calcext:value-type="float">
            <text:p>-0.03</text:p>
          </table:table-cell>
          <table:table-cell table:formula="of:=[.C$4]*MAGNET([.$I$1]*[.$L104]+[.C$5]*PI()/180)+(RAND()-0.5)*[.$B$4]*[.$B$13]" office:value-type="float" office:value="-0.0365952653073812" calcext:value-type="float">
            <text:p>-0.04</text:p>
          </table:table-cell>
          <table:table-cell table:formula="of:=[.D$4]*MAGNET([.$I$1]*[.$L104]+[.D$5]*PI()/180)+(RAND()-0.5)*[.$B$4]*[.$B$13]" office:value-type="float" office:value="-0.0395651416081507" calcext:value-type="float">
            <text:p>-0.04</text:p>
          </table:table-cell>
          <table:table-cell table:formula="of:=[.E$4]*MAGNET([.$I$1]*[.$L104]+[.E$5]*PI()/180)+(RAND()-0.5)*[.$B$4]*[.$B$13]" office:value-type="float" office:value="-0.0463592116640677" calcext:value-type="float">
            <text:p>-0.05</text:p>
          </table:table-cell>
          <table:table-cell table:formula="of:=[.F$4]*MAGNET([.$I$1]*[.$L104]+[.F$5]*PI()/180)+(RAND()-0.5)*[.$B$4]*[.$B$13]" office:value-type="float" office:value="-0.0450224558558246" calcext:value-type="float">
            <text:p>-0.05</text:p>
          </table:table-cell>
          <table:table-cell table:formula="of:=[.G$4]*MAGNET([.$I$1]*[.$L104]+[.G$5]*PI()/180)+(RAND()-0.5)*[.$B$4]*[.$B$13]" office:value-type="float" office:value="-0.0483902882243253" calcext:value-type="float">
            <text:p>-0.05</text:p>
          </table:table-cell>
          <table:table-cell table:formula="of:=[.H$4]*MAGNET([.$I$1]*[.$L104]+[.H$5]*PI()/180)+(RAND()-0.5)*[.$B$4]*[.$B$13]" office:value-type="float" office:value="-0.0513889555452096" calcext:value-type="float">
            <text:p>-0.05</text:p>
          </table:table-cell>
          <table:table-cell table:formula="of:=[.I$4]*MAGNET([.$I$1]*[.$L104]+[.I$5]*PI()/180)+(RAND()-0.5)*[.$B$4]*[.$B$13]" office:value-type="float" office:value="-0.0539677875166188" calcext:value-type="float">
            <text:p>-0.05</text:p>
          </table:table-cell>
          <table:table-cell table:style-name="Default" table:number-columns-repeated="16364"/>
        </table:table-row>
      </table:table>
      <table:table table:name="Rot" table:style-name="ta4">
        <office:forms form:automatic-focus="false" form:apply-design-mode="false"/>
        <table:table-column table:style-name="co7" table:number-columns-repeated="3" table:default-cell-style-name="Default"/>
        <table:table-column table:style-name="co6" table:default-cell-style-name="ce69"/>
        <table:table-column table:style-name="co7" table:default-cell-style-name="ce69"/>
        <table:table-column table:style-name="co7" table:number-columns-repeated="3" table:default-cell-style-name="Default"/>
        <table:table-column table:style-name="co7" table:number-columns-repeated="16376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style-name="ce2"/>
          <table:table-cell table:style-name="ce75"/>
          <table:table-cell table:style-name="Default"/>
          <table:table-cell/>
          <table:table-cell table:style-name="ce60" office:value-type="string" calcext:value-type="string">
            <text:p>PP <text:s text:c="7"/>polpar</text:p>
          </table:table-cell>
          <table:table-cell table:style-name="ce15" table:formula="of:=[$Lind.$D$4]/2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v<text:span text:style-name="T3">ag</text:span></text:p>
          </table:table-cell>
          <table:table-cell table:style-name="ce66" table:formula="of:=2*PI()*[$Lind.I4]*[$Lind.D6]/60" office:value-type="float" office:value="7.5398223686155" calcext:value-type="float">
            <text:p>7.54</text:p>
          </table:table-cell>
          <table:table-cell table:style-name="Default" office:value-type="string" calcext:value-type="string">
            <text:p>m/s</text:p>
          </table:table-cell>
          <table:table-cell/>
          <table:table-cell table:style-name="ce2" office:value-type="string" calcext:value-type="string">
            <text:p>q</text:p>
          </table:table-cell>
          <table:table-cell table:style-name="ce15" table:formula="of:=[$Lind.$D$7]/[$Lind.$D$4]/[$Lind.$D$5]" office:value-type="float" office:value="1.9" calcext:value-type="float">
            <text:p>1.9</text:p>
          </table:table-cell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style-name="ce66" table:formula="of:=[.D5]*[.D4]" office:value-type="float" office:value="0" calcext:value-type="float">
            <text:p>0.00</text:p>
          </table:table-cell>
          <table:table-cell table:style-name="Default" office:value-type="string" calcext:value-type="string">
            <text:p>V/m</text:p>
          </table:table-cell>
          <table:table-cell/>
          <table:table-cell office:value-type="string" calcext:value-type="string">
            <text:p>Alfa</text:p>
          </table:table-cell>
          <table:table-cell table:style-name="ce61" table:formula="of:=[$Lind.$D$9]/[$Lind.$AG$9]*[.H4]*360" office:value-type="float" office:value="24" calcext:value-type="float">
            <text:p>24</text:p>
          </table:table-cell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U<text:span text:style-name="T3">pos</text:span></text:p>
          </table:table-cell>
          <table:table-cell table:style-name="ce66" table:formula="of:=[.D6]*[$Lind.I5]" office:value-type="float" office:value="0" calcext:value-type="float">
            <text:p>0.00</text:p>
          </table:table-cell>
          <table:table-cell table:style-name="Default" office:value-type="string" calcext:value-type="string">
            <text:p>V </text:p>
          </table:table-cell>
          <table:table-cell table:number-columns-repeated="3"/>
          <table:table-cell table:style-name="Default" table:number-columns-repeated="1637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Vinkel (rad)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IN([.C11])" office:value-type="float" office:value="0" calcext:value-type="float">
            <text:p>0.000</text:p>
          </table:table-cell>
          <table:table-cell table:formula="of:=MAGNET([.C11])" office:value-type="float" office:value="0" calcext:value-type="float">
            <text:p>0.000</text:p>
          </table:table-cell>
          <table:table-cell>
            <draw:frame table:end-cell-address="Rot.O29" table:end-x="0.1559in" table:end-y="0.135in" draw:z-index="0" draw:name="Chart 2" draw:style-name="gr1" draw:text-style-name="P1" svg:width="5.685in" svg:height="3.885in" svg:x="0.4898in" svg:y="0in">
              <draw:object draw:notify-on-update-of-ranges="Rot.D10:Rot.D10 Rot.D11:Rot.D74 Rot.C11:Rot.C74 Rot.E10:Rot.E10 Rot.E11:Rot.E74 Rot.C11:Rot.C7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1]+0.1" office:value-type="float" office:value="0.1" calcext:value-type="float">
            <text:p>0.1</text:p>
          </table:table-cell>
          <table:table-cell table:formula="of:=SIN([.C12])" office:value-type="float" office:value="0.0998334166468282" calcext:value-type="float">
            <text:p>0.100</text:p>
          </table:table-cell>
          <table:table-cell table:formula="of:=MAGNET([.C12])" office:value-type="float" office:value="0.100136351887836" calcext:value-type="float">
            <text:p>0.1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2]+0.1" office:value-type="float" office:value="0.2" calcext:value-type="float">
            <text:p>0.2</text:p>
          </table:table-cell>
          <table:table-cell table:formula="of:=SIN([.C13])" office:value-type="float" office:value="0.198669330795061" calcext:value-type="float">
            <text:p>0.199</text:p>
          </table:table-cell>
          <table:table-cell table:formula="of:=MAGNET([.C13])" office:value-type="float" office:value="0.217773157603089" calcext:value-type="float">
            <text:p>0.21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3]+0.1" office:value-type="float" office:value="0.3" calcext:value-type="float">
            <text:p>0.3</text:p>
          </table:table-cell>
          <table:table-cell table:formula="of:=SIN([.C14])" office:value-type="float" office:value="0.29552020666134" calcext:value-type="float">
            <text:p>0.296</text:p>
          </table:table-cell>
          <table:table-cell table:formula="of:=MAGNET([.C14])" office:value-type="float" office:value="0.344291465484499" calcext:value-type="float">
            <text:p>0.34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4]+0.1" office:value-type="float" office:value="0.4" calcext:value-type="float">
            <text:p>0.4</text:p>
          </table:table-cell>
          <table:table-cell table:formula="of:=SIN([.C15])" office:value-type="float" office:value="0.389418342308651" calcext:value-type="float">
            <text:p>0.389</text:p>
          </table:table-cell>
          <table:table-cell table:formula="of:=MAGNET([.C15])" office:value-type="float" office:value="0.471454630925615" calcext:value-type="float">
            <text:p>0.47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5]+0.1" office:value-type="float" office:value="0.5" calcext:value-type="float">
            <text:p>0.5</text:p>
          </table:table-cell>
          <table:table-cell table:formula="of:=SIN([.C16])" office:value-type="float" office:value="0.479425538604203" calcext:value-type="float">
            <text:p>0.479</text:p>
          </table:table-cell>
          <table:table-cell table:formula="of:=MAGNET([.C16])" office:value-type="float" office:value="0.59202188504875" calcext:value-type="float">
            <text:p>0.59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6]+0.1" office:value-type="float" office:value="0.6" calcext:value-type="float">
            <text:p>0.6</text:p>
          </table:table-cell>
          <table:table-cell table:formula="of:=SIN([.C17])" office:value-type="float" office:value="0.564642473395035" calcext:value-type="float">
            <text:p>0.565</text:p>
          </table:table-cell>
          <table:table-cell table:formula="of:=MAGNET([.C17])" office:value-type="float" office:value="0.700230945885412" calcext:value-type="float">
            <text:p>0.7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7]+0.1" office:value-type="float" office:value="0.7" calcext:value-type="float">
            <text:p>0.7</text:p>
          </table:table-cell>
          <table:table-cell table:formula="of:=SIN([.C18])" office:value-type="float" office:value="0.644217687237691" calcext:value-type="float">
            <text:p>0.644</text:p>
          </table:table-cell>
          <table:table-cell table:formula="of:=MAGNET([.C18])" office:value-type="float" office:value="0.792113107387135" calcext:value-type="float">
            <text:p>0.79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8]+0.1" office:value-type="float" office:value="0.8" calcext:value-type="float">
            <text:p>0.8</text:p>
          </table:table-cell>
          <table:table-cell table:formula="of:=SIN([.C19])" office:value-type="float" office:value="0.717356090899523" calcext:value-type="float">
            <text:p>0.717</text:p>
          </table:table-cell>
          <table:table-cell table:formula="of:=MAGNET([.C19])" office:value-type="float" office:value="0.865620619259848" calcext:value-type="float">
            <text:p>0.866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19]+0.1" office:value-type="float" office:value="0.9" calcext:value-type="float">
            <text:p>0.9</text:p>
          </table:table-cell>
          <table:table-cell table:formula="of:=SIN([.C20])" office:value-type="float" office:value="0.783326909627483" calcext:value-type="float">
            <text:p>0.783</text:p>
          </table:table-cell>
          <table:table-cell table:formula="of:=MAGNET([.C20])" office:value-type="float" office:value="0.920564034230783" calcext:value-type="float">
            <text:p>0.92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0]+0.1" office:value-type="float" office:value="1" calcext:value-type="float">
            <text:p>1</text:p>
          </table:table-cell>
          <table:table-cell table:formula="of:=SIN([.C21])" office:value-type="float" office:value="0.841470984807896" calcext:value-type="float">
            <text:p>0.841</text:p>
          </table:table-cell>
          <table:table-cell table:formula="of:=MAGNET([.C21])" office:value-type="float" office:value="0.958374909517376" calcext:value-type="float">
            <text:p>0.95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1]+0.1" office:value-type="float" office:value="1.1" calcext:value-type="float">
            <text:p>1.1</text:p>
          </table:table-cell>
          <table:table-cell table:formula="of:=SIN([.C22])" office:value-type="float" office:value="0.891207360061435" calcext:value-type="float">
            <text:p>0.891</text:p>
          </table:table-cell>
          <table:table-cell table:formula="of:=MAGNET([.C22])" office:value-type="float" office:value="0.981725194669876" calcext:value-type="float">
            <text:p>0.98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2]+0.1" office:value-type="float" office:value="1.2" calcext:value-type="float">
            <text:p>1.2</text:p>
          </table:table-cell>
          <table:table-cell table:formula="of:=SIN([.C23])" office:value-type="float" office:value="0.932039085967226" calcext:value-type="float">
            <text:p>0.932</text:p>
          </table:table-cell>
          <table:table-cell table:formula="of:=MAGNET([.C23])" office:value-type="float" office:value="0.994047380501549" calcext:value-type="float">
            <text:p>0.99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3]+0.1" office:value-type="float" office:value="1.3" calcext:value-type="float">
            <text:p>1.3</text:p>
          </table:table-cell>
          <table:table-cell table:formula="of:=SIN([.C24])" office:value-type="float" office:value="0.963558185417193" calcext:value-type="float">
            <text:p>0.964</text:p>
          </table:table-cell>
          <table:table-cell table:formula="of:=MAGNET([.C24])" office:value-type="float" office:value="0.99900788761073" calcext:value-type="float">
            <text:p>0.99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4]+0.1" office:value-type="float" office:value="1.4" calcext:value-type="float">
            <text:p>1.4</text:p>
          </table:table-cell>
          <table:table-cell table:formula="of:=SIN([.C25])" office:value-type="float" office:value="0.98544972998846" calcext:value-type="float">
            <text:p>0.985</text:p>
          </table:table-cell>
          <table:table-cell table:formula="of:=MAGNET([.C25])" office:value-type="float" office:value="0.999989505727643" calcext:value-type="float">
            <text:p>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5]+0.1" office:value-type="float" office:value="1.5" calcext:value-type="float">
            <text:p>1.5</text:p>
          </table:table-cell>
          <table:table-cell table:formula="of:=SIN([.C26])" office:value-type="float" office:value="0.997494986604054" calcext:value-type="float">
            <text:p>0.997</text:p>
          </table:table-cell>
          <table:table-cell table:formula="of:=MAGNET([.C26])" office:value-type="float" office:value="0.999636692740265" calcext:value-type="float">
            <text:p>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6]+0.1" office:value-type="float" office:value="1.6" calcext:value-type="float">
            <text:p>1.6</text:p>
          </table:table-cell>
          <table:table-cell table:formula="of:=SIN([.C27])" office:value-type="float" office:value="0.999573603041505" calcext:value-type="float">
            <text:p>1.000</text:p>
          </table:table-cell>
          <table:table-cell table:formula="of:=MAGNET([.C27])" office:value-type="float" office:value="0.999510431230975" calcext:value-type="float">
            <text:p>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7]+0.1" office:value-type="float" office:value="1.7" calcext:value-type="float">
            <text:p>1.7</text:p>
          </table:table-cell>
          <table:table-cell table:formula="of:=SIN([.C28])" office:value-type="float" office:value="0.991664810452469" calcext:value-type="float">
            <text:p>0.992</text:p>
          </table:table-cell>
          <table:table-cell table:formula="of:=MAGNET([.C28])" office:value-type="float" office:value="0.999887815534707" calcext:value-type="float">
            <text:p>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8]+0.1" office:value-type="float" office:value="1.8" calcext:value-type="float">
            <text:p>1.8</text:p>
          </table:table-cell>
          <table:table-cell table:formula="of:=SIN([.C29])" office:value-type="float" office:value="0.973847630878195" calcext:value-type="float">
            <text:p>0.974</text:p>
          </table:table-cell>
          <table:table-cell table:formula="of:=MAGNET([.C29])" office:value-type="float" office:value="0.999726702491336" calcext:value-type="float">
            <text:p>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29]+0.1" office:value-type="float" office:value="1.9" calcext:value-type="float">
            <text:p>1.9</text:p>
          </table:table-cell>
          <table:table-cell table:formula="of:=SIN([.C30])" office:value-type="float" office:value="0.946300087687414" calcext:value-type="float">
            <text:p>0.946</text:p>
          </table:table-cell>
          <table:table-cell table:formula="of:=MAGNET([.C30])" office:value-type="float" office:value="0.996799006013655" calcext:value-type="float">
            <text:p>0.99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0]+0.1" office:value-type="float" office:value="2" calcext:value-type="float">
            <text:p>2</text:p>
          </table:table-cell>
          <table:table-cell table:formula="of:=SIN([.C31])" office:value-type="float" office:value="0.909297426825682" calcext:value-type="float">
            <text:p>0.909</text:p>
          </table:table-cell>
          <table:table-cell table:formula="of:=MAGNET([.C31])" office:value-type="float" office:value="0.987979125896493" calcext:value-type="float">
            <text:p>0.98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1]+0.1" office:value-type="float" office:value="2.1" calcext:value-type="float">
            <text:p>2.1</text:p>
          </table:table-cell>
          <table:table-cell table:formula="of:=SIN([.C32])" office:value-type="float" office:value="0.863209366648874" calcext:value-type="float">
            <text:p>0.863</text:p>
          </table:table-cell>
          <table:table-cell table:formula="of:=MAGNET([.C32])" office:value-type="float" office:value="0.969658182264088" calcext:value-type="float">
            <text:p>0.97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2]+0.1" office:value-type="float" office:value="2.2" calcext:value-type="float">
            <text:p>2.2</text:p>
          </table:table-cell>
          <table:table-cell table:formula="of:=SIN([.C33])" office:value-type="float" office:value="0.80849640381959" calcext:value-type="float">
            <text:p>0.808</text:p>
          </table:table-cell>
          <table:table-cell table:formula="of:=MAGNET([.C33])" office:value-type="float" office:value="0.938241669951139" calcext:value-type="float">
            <text:p>0.93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3]+0.1" office:value-type="float" office:value="2.3" calcext:value-type="float">
            <text:p>2.3</text:p>
          </table:table-cell>
          <table:table-cell table:formula="of:=SIN([.C34])" office:value-type="float" office:value="0.74570521217672" calcext:value-type="float">
            <text:p>0.746</text:p>
          </table:table-cell>
          <table:table-cell table:formula="of:=MAGNET([.C34])" office:value-type="float" office:value="0.890679090818276" calcext:value-type="float">
            <text:p>0.89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4]+0.1" office:value-type="float" office:value="2.4" calcext:value-type="float">
            <text:p>2.4</text:p>
          </table:table-cell>
          <table:table-cell table:formula="of:=SIN([.C35])" office:value-type="float" office:value="0.67546318055115" calcext:value-type="float">
            <text:p>0.675</text:p>
          </table:table-cell>
          <table:table-cell table:formula="of:=MAGNET([.C35])" office:value-type="float" office:value="0.824969939458679" calcext:value-type="float">
            <text:p>0.825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5]+0.1" office:value-type="float" office:value="2.5" calcext:value-type="float">
            <text:p>2.5</text:p>
          </table:table-cell>
          <table:table-cell table:formula="of:=SIN([.C36])" office:value-type="float" office:value="0.598472144103956" calcext:value-type="float">
            <text:p>0.598</text:p>
          </table:table-cell>
          <table:table-cell table:formula="of:=MAGNET([.C36])" office:value-type="float" office:value="0.740591535438926" calcext:value-type="float">
            <text:p>0.74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6]+0.1" office:value-type="float" office:value="2.6" calcext:value-type="float">
            <text:p>2.6</text:p>
          </table:table-cell>
          <table:table-cell table:formula="of:=SIN([.C37])" office:value-type="float" office:value="0.515501371821463" calcext:value-type="float">
            <text:p>0.516</text:p>
          </table:table-cell>
          <table:table-cell table:formula="of:=MAGNET([.C37])" office:value-type="float" office:value="0.638800552945651" calcext:value-type="float">
            <text:p>0.63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7]+0.1" office:value-type="float" office:value="2.7" calcext:value-type="float">
            <text:p>2.7</text:p>
          </table:table-cell>
          <table:table-cell table:formula="of:=SIN([.C38])" office:value-type="float" office:value="0.427379880233829" calcext:value-type="float">
            <text:p>0.427</text:p>
          </table:table-cell>
          <table:table-cell table:formula="of:=MAGNET([.C38])" office:value-type="float" office:value="0.522771153419681" calcext:value-type="float">
            <text:p>0.52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8]+0.1" office:value-type="float" office:value="2.8" calcext:value-type="float">
            <text:p>2.8</text:p>
          </table:table-cell>
          <table:table-cell table:formula="of:=SIN([.C39])" office:value-type="float" office:value="0.334988150155904" calcext:value-type="float">
            <text:p>0.335</text:p>
          </table:table-cell>
          <table:table-cell table:formula="of:=MAGNET([.C39])" office:value-type="float" office:value="0.397547400037548" calcext:value-type="float">
            <text:p>0.39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39]+0.1" office:value-type="float" office:value="2.9" calcext:value-type="float">
            <text:p>2.9</text:p>
          </table:table-cell>
          <table:table-cell table:formula="of:=SIN([.C40])" office:value-type="float" office:value="0.239249329213981" calcext:value-type="float">
            <text:p>0.239</text:p>
          </table:table-cell>
          <table:table-cell table:formula="of:=MAGNET([.C40])" office:value-type="float" office:value="0.269804798016672" calcext:value-type="float">
            <text:p>0.27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0]+0.1" office:value-type="float" office:value="3" calcext:value-type="float">
            <text:p>3</text:p>
          </table:table-cell>
          <table:table-cell table:formula="of:=SIN([.C41])" office:value-type="float" office:value="0.141120008059866" calcext:value-type="float">
            <text:p>0.141</text:p>
          </table:table-cell>
          <table:table-cell table:formula="of:=MAGNET([.C41])" office:value-type="float" office:value="0.147433805424568" calcext:value-type="float">
            <text:p>0.14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1]+0.1" office:value-type="float" office:value="3.1" calcext:value-type="float">
            <text:p>3.1</text:p>
          </table:table-cell>
          <table:table-cell table:formula="of:=SIN([.C42])" office:value-type="float" office:value="0.0415806624332892" calcext:value-type="float">
            <text:p>0.042</text:p>
          </table:table-cell>
          <table:table-cell table:formula="of:=MAGNET([.C42])" office:value-type="float" office:value="0.0389753496219581" calcext:value-type="float">
            <text:p>0.03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2]+0.1" office:value-type="float" office:value="3.2" calcext:value-type="float">
            <text:p>3.2</text:p>
          </table:table-cell>
          <table:table-cell table:formula="of:=SIN([.C43])" office:value-type="float" office:value="-0.0583741434275814" calcext:value-type="float">
            <text:p>-0.058</text:p>
          </table:table-cell>
          <table:table-cell table:formula="of:=MAGNET([.C43])" office:value-type="float" office:value="-0.0558700760483485" calcext:value-type="float">
            <text:p>-0.056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3]+0.1" office:value-type="float" office:value="3.3" calcext:value-type="float">
            <text:p>3.3</text:p>
          </table:table-cell>
          <table:table-cell table:formula="of:=SIN([.C44])" office:value-type="float" office:value="-0.15774569414325" calcext:value-type="float">
            <text:p>-0.158</text:p>
          </table:table-cell>
          <table:table-cell table:formula="of:=MAGNET([.C44])" office:value-type="float" office:value="-0.167273288194601" calcext:value-type="float">
            <text:p>-0.16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4]+0.1" office:value-type="float" office:value="3.4" calcext:value-type="float">
            <text:p>3.4</text:p>
          </table:table-cell>
          <table:table-cell table:formula="of:=SIN([.C45])" office:value-type="float" office:value="-0.255541102026833" calcext:value-type="float">
            <text:p>-0.256</text:p>
          </table:table-cell>
          <table:table-cell table:formula="of:=MAGNET([.C45])" office:value-type="float" office:value="-0.291135012424154" calcext:value-type="float">
            <text:p>-0.29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5]+0.1" office:value-type="float" office:value="3.5" calcext:value-type="float">
            <text:p>3.5</text:p>
          </table:table-cell>
          <table:table-cell table:formula="of:=SIN([.C46])" office:value-type="float" office:value="-0.350783227689622" calcext:value-type="float">
            <text:p>-0.351</text:p>
          </table:table-cell>
          <table:table-cell table:formula="of:=MAGNET([.C46])" office:value-type="float" office:value="-0.418979163777693" calcext:value-type="float">
            <text:p>-0.41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6]+0.1" office:value-type="float" office:value="3.6" calcext:value-type="float">
            <text:p>3.6</text:p>
          </table:table-cell>
          <table:table-cell table:formula="of:=SIN([.C47])" office:value-type="float" office:value="-0.442520443294854" calcext:value-type="float">
            <text:p>-0.443</text:p>
          </table:table-cell>
          <table:table-cell table:formula="of:=MAGNET([.C47])" office:value-type="float" office:value="-0.543083639550796" calcext:value-type="float">
            <text:p>-0.54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7]+0.1" office:value-type="float" office:value="3.7" calcext:value-type="float">
            <text:p>3.7</text:p>
          </table:table-cell>
          <table:table-cell table:formula="of:=SIN([.C48])" office:value-type="float" office:value="-0.529836140908495" calcext:value-type="float">
            <text:p>-0.530</text:p>
          </table:table-cell>
          <table:table-cell table:formula="of:=MAGNET([.C48])" office:value-type="float" office:value="-0.657022690734484" calcext:value-type="float">
            <text:p>-0.65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8]+0.1" office:value-type="float" office:value="3.8" calcext:value-type="float">
            <text:p>3.8</text:p>
          </table:table-cell>
          <table:table-cell table:formula="of:=SIN([.C49])" office:value-type="float" office:value="-0.611857890942721" calcext:value-type="float">
            <text:p>-0.612</text:p>
          </table:table-cell>
          <table:table-cell table:formula="of:=MAGNET([.C49])" office:value-type="float" office:value="-0.756055130192154" calcext:value-type="float">
            <text:p>-0.756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49]+0.1" office:value-type="float" office:value="3.9" calcext:value-type="float">
            <text:p>3.9</text:p>
          </table:table-cell>
          <table:table-cell table:formula="of:=SIN([.C50])" office:value-type="float" office:value="-0.687766159183975" calcext:value-type="float">
            <text:p>-0.688</text:p>
          </table:table-cell>
          <table:table-cell table:formula="of:=MAGNET([.C50])" office:value-type="float" office:value="-0.837331106748078" calcext:value-type="float">
            <text:p>-0.83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0]+0.1" office:value-type="float" office:value="4" calcext:value-type="float">
            <text:p>4</text:p>
          </table:table-cell>
          <table:table-cell table:formula="of:=SIN([.C51])" office:value-type="float" office:value="-0.756802495307929" calcext:value-type="float">
            <text:p>-0.757</text:p>
          </table:table-cell>
          <table:table-cell table:formula="of:=MAGNET([.C51])" office:value-type="float" office:value="-0.899907615495089" calcext:value-type="float">
            <text:p>-0.9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1]+0.1" office:value-type="float" office:value="4.1" calcext:value-type="float">
            <text:p>4.1</text:p>
          </table:table-cell>
          <table:table-cell table:formula="of:=SIN([.C52])" office:value-type="float" office:value="-0.818277111064411" calcext:value-type="float">
            <text:p>-0.818</text:p>
          </table:table-cell>
          <table:table-cell table:formula="of:=MAGNET([.C52])" office:value-type="float" office:value="-0.944580889336252" calcext:value-type="float">
            <text:p>-0.945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2]+0.1" office:value-type="float" office:value="4.2" calcext:value-type="float">
            <text:p>4.2</text:p>
          </table:table-cell>
          <table:table-cell table:formula="of:=SIN([.C53])" office:value-type="float" office:value="-0.871575772413589" calcext:value-type="float">
            <text:p>-0.872</text:p>
          </table:table-cell>
          <table:table-cell table:formula="of:=MAGNET([.C53])" office:value-type="float" office:value="-0.973560683961579" calcext:value-type="float">
            <text:p>-0.97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3]+0.1" office:value-type="float" office:value="4.3" calcext:value-type="float">
            <text:p>4.3</text:p>
          </table:table-cell>
          <table:table-cell table:formula="of:=SIN([.C54])" office:value-type="float" office:value="-0.916165936749455" calcext:value-type="float">
            <text:p>-0.916</text:p>
          </table:table-cell>
          <table:table-cell table:formula="of:=MAGNET([.C54])" office:value-type="float" office:value="-0.990025701109027" calcext:value-type="float">
            <text:p>-0.99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4]+0.1" office:value-type="float" office:value="4.4" calcext:value-type="float">
            <text:p>4.4</text:p>
          </table:table-cell>
          <table:table-cell table:formula="of:=SIN([.C55])" office:value-type="float" office:value="-0.951602073889516" calcext:value-type="float">
            <text:p>-0.952</text:p>
          </table:table-cell>
          <table:table-cell table:formula="of:=MAGNET([.C55])" office:value-type="float" office:value="-0.997609717345392" calcext:value-type="float">
            <text:p>-0.99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5]+0.1" office:value-type="float" office:value="4.5" calcext:value-type="float">
            <text:p>4.5</text:p>
          </table:table-cell>
          <table:table-cell table:formula="of:=SIN([.C56])" office:value-type="float" office:value="-0.977530117665097" calcext:value-type="float">
            <text:p>-0.978</text:p>
          </table:table-cell>
          <table:table-cell table:formula="of:=MAGNET([.C56])" office:value-type="float" office:value="-0.999873487426941" calcext:value-type="float">
            <text:p>-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6]+0.1" office:value-type="float" office:value="4.6" calcext:value-type="float">
            <text:p>4.6</text:p>
          </table:table-cell>
          <table:table-cell table:formula="of:=SIN([.C57])" office:value-type="float" office:value="-0.993691003633464" calcext:value-type="float">
            <text:p>-0.994</text:p>
          </table:table-cell>
          <table:table-cell table:formula="of:=MAGNET([.C57])" office:value-type="float" office:value="-0.999817708530329" calcext:value-type="float">
            <text:p>-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7]+0.1" office:value-type="float" office:value="4.7" calcext:value-type="float">
            <text:p>4.7</text:p>
          </table:table-cell>
          <table:table-cell table:formula="of:=SIN([.C58])" office:value-type="float" office:value="-0.999923257564101" calcext:value-type="float">
            <text:p>-1.000</text:p>
          </table:table-cell>
          <table:table-cell table:formula="of:=MAGNET([.C58])" office:value-type="float" office:value="-0.999487286876072" calcext:value-type="float">
            <text:p>-0.99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8]+0.1" office:value-type="float" office:value="4.8" calcext:value-type="float">
            <text:p>4.8</text:p>
          </table:table-cell>
          <table:table-cell table:formula="of:=SIN([.C59])" office:value-type="float" office:value="-0.996164608835841" calcext:value-type="float">
            <text:p>-0.996</text:p>
          </table:table-cell>
          <table:table-cell table:formula="of:=MAGNET([.C59])" office:value-type="float" office:value="-0.999707347027225" calcext:value-type="float">
            <text:p>-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59]+0.1" office:value-type="float" office:value="4.9" calcext:value-type="float">
            <text:p>4.9</text:p>
          </table:table-cell>
          <table:table-cell table:formula="of:=SIN([.C60])" office:value-type="float" office:value="-0.982452612624333" calcext:value-type="float">
            <text:p>-0.982</text:p>
          </table:table-cell>
          <table:table-cell table:formula="of:=MAGNET([.C60])" office:value-type="float" office:value="-0.999977807550217" calcext:value-type="float">
            <text:p>-1.00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0]+0.1" office:value-type="float" office:value="5" calcext:value-type="float">
            <text:p>5</text:p>
          </table:table-cell>
          <table:table-cell table:formula="of:=SIN([.C61])" office:value-type="float" office:value="-0.958924274663139" calcext:value-type="float">
            <text:p>-0.959</text:p>
          </table:table-cell>
          <table:table-cell table:formula="of:=MAGNET([.C61])" office:value-type="float" office:value="-0.998537204793376" calcext:value-type="float">
            <text:p>-0.99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1]+0.1" office:value-type="float" office:value="5.1" calcext:value-type="float">
            <text:p>5.1</text:p>
          </table:table-cell>
          <table:table-cell table:formula="of:=SIN([.C62])" office:value-type="float" office:value="-0.925814682327733" calcext:value-type="float">
            <text:p>-0.926</text:p>
          </table:table-cell>
          <table:table-cell table:formula="of:=MAGNET([.C62])" office:value-type="float" office:value="-0.992589300025661" calcext:value-type="float">
            <text:p>-0.99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2]+0.1" office:value-type="float" office:value="5.2" calcext:value-type="float">
            <text:p>5.2</text:p>
          </table:table-cell>
          <table:table-cell table:formula="of:=SIN([.C63])" office:value-type="float" office:value="-0.883454655720155" calcext:value-type="float">
            <text:p>-0.883</text:p>
          </table:table-cell>
          <table:table-cell table:formula="of:=MAGNET([.C63])" office:value-type="float" office:value="-0.978669466583819" calcext:value-type="float">
            <text:p>-0.97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3]+0.1" office:value-type="float" office:value="5.3" calcext:value-type="float">
            <text:p>5.3</text:p>
          </table:table-cell>
          <table:table-cell table:formula="of:=SIN([.C64])" office:value-type="float" office:value="-0.832267442223903" calcext:value-type="float">
            <text:p>-0.832</text:p>
          </table:table-cell>
          <table:table-cell table:formula="of:=MAGNET([.C64])" office:value-type="float" office:value="-0.953113479983468" calcext:value-type="float">
            <text:p>-0.95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4]+0.1" office:value-type="float" office:value="5.4" calcext:value-type="float">
            <text:p>5.4</text:p>
          </table:table-cell>
          <table:table-cell table:formula="of:=SIN([.C65])" office:value-type="float" office:value="-0.772764487555989" calcext:value-type="float">
            <text:p>-0.773</text:p>
          </table:table-cell>
          <table:table-cell table:formula="of:=MAGNET([.C65])" office:value-type="float" office:value="-0.912580484368875" calcext:value-type="float">
            <text:p>-0.91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5]+0.1" office:value-type="float" office:value="5.5" calcext:value-type="float">
            <text:p>5.5</text:p>
          </table:table-cell>
          <table:table-cell table:formula="of:=SIN([.C66])" office:value-type="float" office:value="-0.705540325570395" calcext:value-type="float">
            <text:p>-0.706</text:p>
          </table:table-cell>
          <table:table-cell table:formula="of:=MAGNET([.C66])" office:value-type="float" office:value="-0.854575620230628" calcext:value-type="float">
            <text:p>-0.855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6]+0.1" office:value-type="float" office:value="5.6" calcext:value-type="float">
            <text:p>5.6</text:p>
          </table:table-cell>
          <table:table-cell table:formula="of:=SIN([.C67])" office:value-type="float" office:value="-0.631266637872324" calcext:value-type="float">
            <text:p>-0.631</text:p>
          </table:table-cell>
          <table:table-cell table:formula="of:=MAGNET([.C67])" office:value-type="float" office:value="-0.777916690506487" calcext:value-type="float">
            <text:p>-0.77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7]+0.1" office:value-type="float" office:value="5.7" calcext:value-type="float">
            <text:p>5.7</text:p>
          </table:table-cell>
          <table:table-cell table:formula="of:=SIN([.C68])" office:value-type="float" office:value="-0.550685542597641" calcext:value-type="float">
            <text:p>-0.551</text:p>
          </table:table-cell>
          <table:table-cell table:formula="of:=MAGNET([.C68])" office:value-type="float" office:value="-0.683093459327645" calcext:value-type="float">
            <text:p>-0.68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8]+0.1" office:value-type="float" office:value="5.8" calcext:value-type="float">
            <text:p>5.8</text:p>
          </table:table-cell>
          <table:table-cell table:formula="of:=SIN([.C69])" office:value-type="float" office:value="-0.464602179413761" calcext:value-type="float">
            <text:p>-0.465</text:p>
          </table:table-cell>
          <table:table-cell table:formula="of:=MAGNET([.C69])" office:value-type="float" office:value="-0.572477374240447" calcext:value-type="float">
            <text:p>-0.57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69]+0.1" office:value-type="float" office:value="5.9" calcext:value-type="float">
            <text:p>5.9</text:p>
          </table:table-cell>
          <table:table-cell table:formula="of:=SIN([.C70])" office:value-type="float" office:value="-0.373876664830241" calcext:value-type="float">
            <text:p>-0.374</text:p>
          </table:table-cell>
          <table:table-cell table:formula="of:=MAGNET([.C70])" office:value-type="float" office:value="-0.450352872937566" calcext:value-type="float">
            <text:p>-0.45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70]+0.1" office:value-type="float" office:value="6" calcext:value-type="float">
            <text:p>6</text:p>
          </table:table-cell>
          <table:table-cell table:formula="of:=SIN([.C71])" office:value-type="float" office:value="-0.279415498198931" calcext:value-type="float">
            <text:p>-0.279</text:p>
          </table:table-cell>
          <table:table-cell table:formula="of:=MAGNET([.C71])" office:value-type="float" office:value="-0.322757784694072" calcext:value-type="float">
            <text:p>-0.32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71]+0.1" office:value-type="float" office:value="6.09999999999999" calcext:value-type="float">
            <text:p>6.09999999999999</text:p>
          </table:table-cell>
          <table:table-cell table:formula="of:=SIN([.C72])" office:value-type="float" office:value="-0.182162504272101" calcext:value-type="float">
            <text:p>-0.182</text:p>
          </table:table-cell>
          <table:table-cell table:formula="of:=MAGNET([.C72])" office:value-type="float" office:value="-0.197138187982369" calcext:value-type="float">
            <text:p>-0.19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72]+0.1" office:value-type="float" office:value="6.19999999999999" calcext:value-type="float">
            <text:p>6.19999999999999</text:p>
          </table:table-cell>
          <table:table-cell table:formula="of:=SIN([.C73])" office:value-type="float" office:value="-0.0830894028175026" calcext:value-type="float">
            <text:p>-0.083</text:p>
          </table:table-cell>
          <table:table-cell table:formula="of:=MAGNET([.C73])" office:value-type="float" office:value="-0.0818408127091189" calcext:value-type="float">
            <text:p>-0.08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2"/>
          <table:table-cell table:formula="of:=[.C73]+0.1" office:value-type="float" office:value="6.29999999999999" calcext:value-type="float">
            <text:p>6.29999999999999</text:p>
          </table:table-cell>
          <table:table-cell table:formula="of:=SIN([.C74])" office:value-type="float" office:value="0.0168139004843435" calcext:value-type="float">
            <text:p>0.017</text:p>
          </table:table-cell>
          <table:table-cell table:formula="of:=MAGNET([.C74])" office:value-type="float" office:value="0.0152499741965903" calcext:value-type="float">
            <text:p>0.015</text:p>
          </table:table-cell>
          <table:table-cell table:number-columns-repeated="3"/>
          <table:table-cell table:style-name="Default" table:number-columns-repeated="16376"/>
        </table:table-row>
      </table:table>
      <table:named-expressions>
        <table:named-range table:name="Q" table:base-cell-address="$Lind.$A$1" table:cell-range-address="$Lind.$D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ffc7ce"/>
    </style:style>
    <style:style style:name="ConditionalStyle_5f_7" style:display-name="ConditionalStyle_7" style:family="table-cell" style:parent-style-name="Default">
      <style:table-cell-properties fo:background-color="#ffc7ce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ot" style:display-name="PageStyle_p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t" style:display-name="PageStyle_Ro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äkn" style:display-name="PageStyle_Räk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nd" style:display-name="PageStyle_Li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ans Bernhoff</meta:initial-creator>
    <dc:creator>Hans Bernhoff</dc:creator>
    <meta:creation-date>2021-02-09T15:18:23</meta:creation-date>
    <dc:date>2026-06-18T08:46:05</dc:date>
    <meta:generator>LibreOffice/25.8.7.3$Linux_X86_64 LibreOffice_project/580$Build-3</meta:generator>
    <meta:document-statistic meta:table-count="4" meta:cell-count="5072" meta:object-count="8"/>
    <meta:user-defined meta:name="AppVersion">16.0300</meta:user-defined>
    <meta:user-defined meta:name="Company">Avd. för elektricitetslära UU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MAGNET(arg)
        MAGNET = (Sgn(Sin(arg)) * Sin(arg) ^ 2 + 0.228 * Sin(3 * arg)) / 0.7724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  <library:element library:name="Sheet4"/>
  <library:element library:name="Sheet3"/>
  <library:element library:name="Sheet2"/>
  <library:element library:name="Sheet1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4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width="0.026cm" svg:stroke-color="#d9d9d9"/>
    </style:style>
    <style:style style:name="ch8" style:family="chart" style:data-style-name="N154">
      <style:chart-properties chart:display-label="true" chart:tick-marks-major-inner="false" chart:tick-marks-major-outer="false" chart:logarithmic="false" chart:minimum="-1.2" chart:maximum="1.2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15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4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4.371cm" svg:height="7.8cm" xlink:href=".." xlink:type="simple" chart:class="chart:scatter" chart:style-name="ch1">
        <chart:title svg:x="3.92cm" svg:y="0.225cm" chart:style-name="ch2">
          <text:p><text:span text:style-name="T1">Funktionform för magnet vs</text:span><text:span text:style-name="T1"> sinus</text:span></text:p>
        </chart:title>
        <chart:legend chart:legend-position="bottom" svg:x="1.727cm" svg:y="6.947cm" style:legend-expansion="custom" svg:width="4.135cm" svg:height="0.63cm" style:legend-expansion-aspect-ratio="6.56349206349206" chart:style-name="ch3"/>
        <chart:plot-area chart:style-name="ch4" svg:x="1.288cm" svg:y="0.951cm" svg:width="12.541cm" svg:height="5.994cm">
          <chart:coordinate-region svg:x="2.21cm" svg:y="1.138cm" svg:width="11.537cm" svg:height="5.622cm"/>
          <chart:axis chart:dimension="x" chart:name="primary-x" chart:style-name="ch5">
            <chart:title svg:x="6.686cm" svg:y="7.102cm" chart:style-name="ch6">
              <text:p><text:span text:style-name="T2">Vinkel [rad]</text:span></text:p>
            </chart:title>
            <chart:grid chart:style-name="ch7" chart:class="major"/>
          </chart:axis>
          <chart:axis chart:dimension="y" chart:name="primary-y" chart:style-name="ch8">
            <chart:title svg:x="0.392cm" svg:y="5.103cm" chart:style-name="ch9">
              <text:p><text:span text:style-name="T2">funktions värde</text:span></text:p>
            </chart:title>
            <chart:grid chart:style-name="ch7" chart:class="major"/>
          </chart:axis>
          <chart:series chart:style-name="ch10" chart:values-cell-range-address="Rot.D11:Rot.D74" chart:label-cell-address="Rot.D10:Rot.D10" chart:class="chart:scatter">
            <chart:domain table:cell-range-address="Rot.C11:Rot.C74"/>
            <chart:data-point chart:repeated="64"/>
          </chart:series>
          <chart:series chart:style-name="ch11" chart:values-cell-range-address="Rot.E11:Rot.E74" chart:label-cell-address="Rot.E10:Rot.E10" chart:class="chart:scatter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</text:p>
                <draw:g>
                  <svg:desc>Rot.D10:Rot.D10</svg:desc>
                </draw:g>
              </table:table-cell>
              <table:table-cell office:value-type="string">
                <text:p>Magnet</text:p>
                <draw:g>
                  <svg:desc>Rot.E10:Rot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t.C11:Rot.C74</svg:desc>
                </draw:g>
              </table:table-cell>
              <table:table-cell office:value-type="float" office:value="0">
                <text:p>0</text:p>
                <draw:g>
                  <svg:desc>Rot.D11:Rot.D74</svg:desc>
                </draw:g>
              </table:table-cell>
              <table:table-cell office:value-type="float" office:value="0">
                <text:p>0</text:p>
                <draw:g>
                  <svg:desc>Rot.E11:Rot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100136351887836">
                <text:p>0.100136351887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217773157603089">
                <text:p>0.217773157603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344291465484499">
                <text:p>0.344291465484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1">
                <text:p>0.389418342308651</text:p>
              </table:table-cell>
              <table:table-cell office:value-type="float" office:value="0.471454630925615">
                <text:p>0.47145463092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59202188504875">
                <text:p>0.59202188504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700230945885412">
                <text:p>0.700230945885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792113107387135">
                <text:p>0.792113107387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865620619259848">
                <text:p>0.865620619259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920564034230783">
                <text:p>0.920564034230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958374909517376">
                <text:p>0.958374909517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981725194669876">
                <text:p>0.981725194669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994047380501549">
                <text:p>0.994047380501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99900788761073">
                <text:p>0.99900788761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999989505727643">
                <text:p>0.999989505727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4">
                <text:p>0.997494986604054</text:p>
              </table:table-cell>
              <table:table-cell office:value-type="float" office:value="0.999636692740265">
                <text:p>0.999636692740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0.999510431230975">
                <text:p>0.999510431230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9">
                <text:p>0.991664810452469</text:p>
              </table:table-cell>
              <table:table-cell office:value-type="float" office:value="0.999887815534707">
                <text:p>0.999887815534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0.999726702491336">
                <text:p>0.999726702491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0.996799006013655">
                <text:p>0.996799006013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987979125896493">
                <text:p>0.987979125896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0.969658182264088">
                <text:p>0.969658182264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0.938241669951139">
                <text:p>0.938241669951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0.890679090818276">
                <text:p>0.890679090818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">
                <text:p>0.67546318055115</text:p>
              </table:table-cell>
              <table:table-cell office:value-type="float" office:value="0.824969939458679">
                <text:p>0.824969939458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6">
                <text:p>0.598472144103956</text:p>
              </table:table-cell>
              <table:table-cell office:value-type="float" office:value="0.740591535438926">
                <text:p>0.740591535438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3">
                <text:p>0.515501371821463</text:p>
              </table:table-cell>
              <table:table-cell office:value-type="float" office:value="0.638800552945651">
                <text:p>0.638800552945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29">
                <text:p>0.427379880233829</text:p>
              </table:table-cell>
              <table:table-cell office:value-type="float" office:value="0.522771153419681">
                <text:p>0.522771153419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4">
                <text:p>0.334988150155904</text:p>
              </table:table-cell>
              <table:table-cell office:value-type="float" office:value="0.397547400037548">
                <text:p>0.397547400037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1">
                <text:p>0.239249329213981</text:p>
              </table:table-cell>
              <table:table-cell office:value-type="float" office:value="0.269804798016672">
                <text:p>0.269804798016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41120008059866">
                <text:p>0.141120008059866</text:p>
              </table:table-cell>
              <table:table-cell office:value-type="float" office:value="0.147433805424568">
                <text:p>0.14743380542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892">
                <text:p>0.0415806624332892</text:p>
              </table:table-cell>
              <table:table-cell office:value-type="float" office:value="0.0389753496219581">
                <text:p>0.0389753496219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14">
                <text:p>-0.0583741434275814</text:p>
              </table:table-cell>
              <table:table-cell office:value-type="float" office:value="-0.0558700760483485">
                <text:p>-0.0558700760483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5">
                <text:p>-0.15774569414325</text:p>
              </table:table-cell>
              <table:table-cell office:value-type="float" office:value="-0.167273288194601">
                <text:p>-0.167273288194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3">
                <text:p>-0.255541102026833</text:p>
              </table:table-cell>
              <table:table-cell office:value-type="float" office:value="-0.291135012424154">
                <text:p>-0.291135012424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2">
                <text:p>-0.350783227689622</text:p>
              </table:table-cell>
              <table:table-cell office:value-type="float" office:value="-0.418979163777693">
                <text:p>-0.418979163777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4">
                <text:p>-0.442520443294854</text:p>
              </table:table-cell>
              <table:table-cell office:value-type="float" office:value="-0.543083639550796">
                <text:p>-0.543083639550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5">
                <text:p>-0.529836140908495</text:p>
              </table:table-cell>
              <table:table-cell office:value-type="float" office:value="-0.657022690734484">
                <text:p>-0.657022690734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21">
                <text:p>-0.611857890942721</text:p>
              </table:table-cell>
              <table:table-cell office:value-type="float" office:value="-0.756055130192154">
                <text:p>-0.756055130192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5">
                <text:p>-0.687766159183975</text:p>
              </table:table-cell>
              <table:table-cell office:value-type="float" office:value="-0.837331106748078">
                <text:p>-0.837331106748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756802495307929">
                <text:p>-0.756802495307929</text:p>
              </table:table-cell>
              <table:table-cell office:value-type="float" office:value="-0.899907615495089">
                <text:p>-0.8999076154950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1">
                <text:p>-0.818277111064411</text:p>
              </table:table-cell>
              <table:table-cell office:value-type="float" office:value="-0.944580889336252">
                <text:p>-0.944580889336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9">
                <text:p>-0.871575772413589</text:p>
              </table:table-cell>
              <table:table-cell office:value-type="float" office:value="-0.973560683961579">
                <text:p>-0.973560683961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990025701109027">
                <text:p>-0.990025701109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997609717345392">
                <text:p>-0.997609717345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999873487426941">
                <text:p>-0.99987348742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0.999817708530329">
                <text:p>-0.999817708530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-0.999487286876072">
                <text:p>-0.999487286876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-0.999707347027225">
                <text:p>-0.999707347027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3">
                <text:p>-0.982452612624333</text:p>
              </table:table-cell>
              <table:table-cell office:value-type="float" office:value="-0.999977807550217">
                <text:p>-0.999977807550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-0.998537204793376">
                <text:p>-0.998537204793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3">
                <text:p>-0.925814682327733</text:p>
              </table:table-cell>
              <table:table-cell office:value-type="float" office:value="-0.992589300025661">
                <text:p>-0.992589300025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5">
                <text:p>-0.883454655720155</text:p>
              </table:table-cell>
              <table:table-cell office:value-type="float" office:value="-0.978669466583819">
                <text:p>-0.978669466583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3">
                <text:p>-0.832267442223903</text:p>
              </table:table-cell>
              <table:table-cell office:value-type="float" office:value="-0.953113479983468">
                <text:p>-0.953113479983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9">
                <text:p>-0.772764487555989</text:p>
              </table:table-cell>
              <table:table-cell office:value-type="float" office:value="-0.912580484368875">
                <text:p>-0.912580484368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5">
                <text:p>-0.705540325570395</text:p>
              </table:table-cell>
              <table:table-cell office:value-type="float" office:value="-0.854575620230628">
                <text:p>-0.85457562023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4">
                <text:p>-0.631266637872324</text:p>
              </table:table-cell>
              <table:table-cell office:value-type="float" office:value="-0.777916690506487">
                <text:p>-0.777916690506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41">
                <text:p>-0.550685542597641</text:p>
              </table:table-cell>
              <table:table-cell office:value-type="float" office:value="-0.683093459327645">
                <text:p>-0.683093459327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61">
                <text:p>-0.464602179413761</text:p>
              </table:table-cell>
              <table:table-cell office:value-type="float" office:value="-0.572477374240447">
                <text:p>-0.5724773742404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41">
                <text:p>-0.373876664830241</text:p>
              </table:table-cell>
              <table:table-cell office:value-type="float" office:value="-0.450352872937566">
                <text:p>-0.450352872937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279415498198931">
                <text:p>-0.279415498198931</text:p>
              </table:table-cell>
              <table:table-cell office:value-type="float" office:value="-0.322757784694072">
                <text:p>-0.322757784694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0.182162504272101">
                <text:p>-0.182162504272101</text:p>
              </table:table-cell>
              <table:table-cell office:value-type="float" office:value="-0.197138187982369">
                <text:p>-0.197138187982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0.0830894028175026">
                <text:p>-0.0830894028175026</text:p>
              </table:table-cell>
              <table:table-cell office:value-type="float" office:value="-0.0818408127091189">
                <text:p>-0.0818408127091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168139004843435">
                <text:p>0.0168139004843435</text:p>
              </table:table-cell>
              <table:table-cell office:value-type="float" office:value="0.0152499741965903">
                <text:p>0.0152499741965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2pt" style:font-size-asian="12pt" style:font-size-complex="12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2" chart:interval-minor-divisor="5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26cm" svg:stroke-color="#bfbfbf"/>
      <style:text-properties fo:color="#595959" style:text-position="0% 100%" fo:font-family="Calibri" fo:font-size="12pt" style:font-size-asian="12pt" style:font-size-complex="12pt"/>
    </style:style>
    <style:style style:name="ch6" style:family="chart">
      <style:chart-properties style:rotation-angle="0"/>
      <style:text-properties fo:font-size="13pt" style:font-size-asian="13pt" style:font-size-complex="13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2pt" style:font-size-asian="12pt" style:font-size-complex="12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255e91" svg:stroke-linecap="round" draw:fill-color="#255e91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9e480e" svg:stroke-linecap="round" draw:fill-color="#9e48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  <style:style style:name="T1" style:family="text">
      <style:text-properties fo:color="#595959" style:text-position="0% 100%" fo:font-family="Calibri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color="#595959" style:text-position="0% 100%" fo:font-family="Calibri" fo:font-size="12pt" fo:language="en" fo:country="US" style:font-size-asian="12pt" style:font-size-complex="12pt"/>
    </style:style>
    <style:style style:name="T3" style:family="text">
      <style:text-properties fo:color="#595959" style:text-position="0% 100%" fo:font-family="Calibri" fo:font-size="14pt" fo:language="en" fo:country="US" style:font-size-asian="14pt" style:font-size-complex="14pt"/>
    </style:style>
  </office:automatic-styles>
  <office:body>
    <office:chart>
      <chart:chart svg:width="27.506cm" svg:height="13.356cm" xlink:href=".." xlink:type="simple" chart:class="chart:scatter" chart:style-name="ch1">
        <chart:title svg:x="10.503cm" svg:y="0.402cm" chart:style-name="ch2">
          <text:p><text:span text:style-name="T1"> Simulerade</text:span><text:span text:style-name="T1"> </text:span><text:span text:style-name="T1">Fas-spänningar</text:span></text:p>
        </chart:title>
        <chart:legend chart:legend-position="bottom" svg:x="0.798cm" svg:y="12.404cm" style:legend-expansion="custom" svg:width="20.675cm" svg:height="0.753cm" style:legend-expansion-aspect-ratio="27.456839309429" chart:style-name="ch3"/>
        <chart:plot-area chart:style-name="ch4" svg:x="1.673cm" svg:y="1.162cm" svg:width="25.424cm" svg:height="10.872cm">
          <chart:coordinate-region svg:x="2.547cm" svg:y="1.414cm" svg:width="24.28cm" svg:height="9.867cm"/>
          <chart:axis chart:dimension="x" chart:name="primary-x" chart:style-name="ch5">
            <chart:title svg:x="25.829cm" svg:y="12.278cm" chart:style-name="ch6">
              <text:p><text:span text:style-name="T2">Tid [s]</text:span></text:p>
            </chart:title>
            <chart:grid chart:style-name="ch7" chart:class="major"/>
          </chart:axis>
          <chart:axis chart:dimension="y" chart:name="primary-y" chart:style-name="ch8">
            <chart:title svg:x="0.218cm" svg:y="7.981cm" chart:style-name="ch9">
              <text:p><text:span text:style-name="T3">Spänning [V]</text:span></text:p>
            </chart:title>
            <chart:grid chart:style-name="ch7" chart:class="major"/>
          </chart:axis>
          <chart:series chart:style-name="ch10" chart:values-cell-range-address="Räkn.BC15:Räkn.BC115" chart:label-cell-address="Räkn.BC14:Räkn.BC14" chart:class="chart:scatter">
            <chart:domain table:cell-range-address="Räkn.BA15:Räkn.BA115"/>
            <chart:data-point chart:repeated="101"/>
          </chart:series>
          <chart:series chart:style-name="ch11" chart:values-cell-range-address="Räkn.BD15:Räkn.BD115" chart:label-cell-address="Räkn.BD14:Räkn.BD14" chart:class="chart:scatter">
            <chart:data-point chart:repeated="101"/>
          </chart:series>
          <chart:series chart:style-name="ch12" chart:values-cell-range-address="Räkn.BE15:Räkn.BE115" chart:label-cell-address="Räkn.BE14:Räkn.BE14" chart:class="chart:scatter">
            <chart:data-point chart:repeated="101"/>
          </chart:series>
          <chart:series chart:style-name="ch13" chart:values-cell-range-address="Räkn.BF15:Räkn.BF115" chart:label-cell-address="Räkn.BF14:Räkn.BF14" chart:class="chart:scatter">
            <chart:data-point chart:repeated="101"/>
          </chart:series>
          <chart:series chart:style-name="ch14" chart:values-cell-range-address="Räkn.BG15:Räkn.BG115" chart:label-cell-address="Räkn.BG14:Räkn.BG14" chart:class="chart:scatter">
            <chart:data-point chart:repeated="101"/>
          </chart:series>
          <chart:series chart:style-name="ch15" chart:values-cell-range-address="Räkn.BH15:Räkn.BH115" chart:label-cell-address="Räkn.BH14:Räkn.BH14" chart:class="chart:scatter">
            <chart:data-point chart:repeated="101"/>
          </chart:series>
          <chart:series chart:style-name="ch16" chart:values-cell-range-address="Räkn.BI15:Räkn.BI115" chart:label-cell-address="Räkn.BI14:Räkn.BI14" chart:class="chart:scatter">
            <chart:data-point chart:repeated="101"/>
          </chart:series>
          <chart:series chart:style-name="ch17" chart:values-cell-range-address="Räkn.BJ15:Räkn.BJ115" chart:label-cell-address="Räkn.BJ14:Räkn.BJ14" chart:class="chart:scatter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  <table:table-cell office:value-type="string">
                <text:p>Fas1</text:p>
                <draw:g>
                  <svg:desc>Räkn.BC14:Räkn.BC14</svg:desc>
                </draw:g>
              </table:table-cell>
              <table:table-cell office:value-type="string">
                <text:p>Fas2</text:p>
                <draw:g>
                  <svg:desc>Räkn.BD14:Räkn.BD14</svg:desc>
                </draw:g>
              </table:table-cell>
              <table:table-cell office:value-type="string">
                <text:p>Fas3</text:p>
                <draw:g>
                  <svg:desc>Räkn.BE14:Räkn.BE14</svg:desc>
                </draw:g>
              </table:table-cell>
              <table:table-cell office:value-type="string">
                <text:p>Fas4</text:p>
                <draw:g>
                  <svg:desc>Räkn.BF14:Räkn.BF14</svg:desc>
                </draw:g>
              </table:table-cell>
              <table:table-cell office:value-type="string">
                <text:p>Fas5</text:p>
                <draw:g>
                  <svg:desc>Räkn.BG14:Räkn.BG14</svg:desc>
                </draw:g>
              </table:table-cell>
              <table:table-cell office:value-type="string">
                <text:p>Fas6</text:p>
                <draw:g>
                  <svg:desc>Räkn.BH14:Räkn.BH14</svg:desc>
                </draw:g>
              </table:table-cell>
              <table:table-cell office:value-type="string">
                <text:p>Fas7</text:p>
                <draw:g>
                  <svg:desc>Räkn.BI14:Räkn.BI14</svg:desc>
                </draw:g>
              </table:table-cell>
              <table:table-cell office:value-type="string">
                <text:p>Fas8</text:p>
                <draw:g>
                  <svg:desc>Räkn.BJ14:Räkn.B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äkn.BA15:Räkn.BA115</svg:desc>
                </draw:g>
              </table:table-cell>
              <table:table-cell office:value-type="float" office:value="-41.4928986897632">
                <text:p>-41.4928986897632</text:p>
                <draw:g>
                  <svg:desc>Räkn.BC15:Räkn.BC115</svg:desc>
                </draw:g>
              </table:table-cell>
              <table:table-cell office:value-type="float" office:value="91.120865027906">
                <text:p>91.120865027906</text:p>
                <draw:g>
                  <svg:desc>Räkn.BD15:Räkn.BD115</svg:desc>
                </draw:g>
              </table:table-cell>
              <table:table-cell office:value-type="float" office:value="-59.6695333751859">
                <text:p>-59.6695333751859</text:p>
                <draw:g>
                  <svg:desc>Räkn.BE15:Räkn.BE115</svg:desc>
                </draw:g>
              </table:table-cell>
              <table:table-cell office:value-type="float" office:value="-6.84910080804758">
                <text:p>-6.84910080804758</text:p>
                <draw:g>
                  <svg:desc>Räkn.BF15:Räkn.BF115</svg:desc>
                </draw:g>
              </table:table-cell>
              <table:table-cell office:value-type="float" office:value="29.7256726327204">
                <text:p>29.7256726327204</text:p>
                <draw:g>
                  <svg:desc>Räkn.BG15:Räkn.BG115</svg:desc>
                </draw:g>
              </table:table-cell>
              <table:table-cell office:value-type="float" office:value="0">
                <text:p>0</text:p>
                <draw:g>
                  <svg:desc>Räkn.BH15:Räkn.BH115</svg:desc>
                </draw:g>
              </table:table-cell>
              <table:table-cell office:value-type="float" office:value="0">
                <text:p>0</text:p>
                <draw:g>
                  <svg:desc>Räkn.BI15:Räkn.BI115</svg:desc>
                </draw:g>
              </table:table-cell>
              <table:table-cell office:value-type="float" office:value="0">
                <text:p>0</text:p>
                <draw:g>
                  <svg:desc>Räkn.BJ15:Räkn.BJ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-30.7923083610625">
                <text:p>-30.7923083610625</text:p>
              </table:table-cell>
              <table:table-cell office:value-type="float" office:value="91.7894662063859">
                <text:p>91.7894662063859</text:p>
              </table:table-cell>
              <table:table-cell office:value-type="float" office:value="-68.2408650062598">
                <text:p>-68.2408650062598</text:p>
              </table:table-cell>
              <table:table-cell office:value-type="float" office:value="-8.56021928573393">
                <text:p>-8.56021928573393</text:p>
              </table:table-cell>
              <table:table-cell office:value-type="float" office:value="32.9604933494345">
                <text:p>32.9604933494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-18.4705433600629">
                <text:p>-18.4705433600629</text:p>
              </table:table-cell>
              <table:table-cell office:value-type="float" office:value="85.835176858078">
                <text:p>85.835176858078</text:p>
              </table:table-cell>
              <table:table-cell office:value-type="float" office:value="-75.7055302276573">
                <text:p>-75.7055302276573</text:p>
              </table:table-cell>
              <table:table-cell office:value-type="float" office:value="-9.67611219457773">
                <text:p>-9.67611219457773</text:p>
              </table:table-cell>
              <table:table-cell office:value-type="float" office:value="38.22153236139">
                <text:p>38.2215323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-13.0450476390534">
                <text:p>-13.0450476390534</text:p>
              </table:table-cell>
              <table:table-cell office:value-type="float" office:value="87.5335577483134">
                <text:p>87.5335577483134</text:p>
              </table:table-cell>
              <table:table-cell office:value-type="float" office:value="-83.6659134813822">
                <text:p>-83.6659134813822</text:p>
              </table:table-cell>
              <table:table-cell office:value-type="float" office:value="-11.933035662888">
                <text:p>-11.933035662888</text:p>
              </table:table-cell>
              <table:table-cell office:value-type="float" office:value="40.8120287010785">
                <text:p>40.8120287010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3.42218266619636">
                <text:p>3.42218266619636</text:p>
              </table:table-cell>
              <table:table-cell office:value-type="float" office:value="83.2864380975475">
                <text:p>83.2864380975475</text:p>
              </table:table-cell>
              <table:table-cell office:value-type="float" office:value="-98.575642761859">
                <text:p>-98.575642761859</text:p>
              </table:table-cell>
              <table:table-cell office:value-type="float" office:value="-12.3378539629429">
                <text:p>-12.3378539629429</text:p>
              </table:table-cell>
              <table:table-cell office:value-type="float" office:value="42.3601368163195">
                <text:p>42.360136816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0.5336068092235">
                <text:p>10.5336068092235</text:p>
              </table:table-cell>
              <table:table-cell office:value-type="float" office:value="76.1977561541503">
                <text:p>76.1977561541503</text:p>
              </table:table-cell>
              <table:table-cell office:value-type="float" office:value="-105.082906951975">
                <text:p>-105.082906951975</text:p>
              </table:table-cell>
              <table:table-cell office:value-type="float" office:value="-13.5098441029683">
                <text:p>-13.5098441029683</text:p>
              </table:table-cell>
              <table:table-cell office:value-type="float" office:value="43.3677126478192">
                <text:p>43.3677126478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26.9597575268949">
                <text:p>26.9597575268949</text:p>
              </table:table-cell>
              <table:table-cell office:value-type="float" office:value="70.1862748021926">
                <text:p>70.1862748021926</text:p>
              </table:table-cell>
              <table:table-cell office:value-type="float" office:value="-107.062679985569">
                <text:p>-107.062679985569</text:p>
              </table:table-cell>
              <table:table-cell office:value-type="float" office:value="-15.7139566040126">
                <text:p>-15.7139566040126</text:p>
              </table:table-cell>
              <table:table-cell office:value-type="float" office:value="46.3156276353557">
                <text:p>46.3156276353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37.0583260748221">
                <text:p>37.0583260748221</text:p>
              </table:table-cell>
              <table:table-cell office:value-type="float" office:value="63.0830898664415">
                <text:p>63.0830898664415</text:p>
              </table:table-cell>
              <table:table-cell office:value-type="float" office:value="-112.80013050683">
                <text:p>-112.80013050683</text:p>
              </table:table-cell>
              <table:table-cell office:value-type="float" office:value="-15.9933396022933">
                <text:p>-15.9933396022933</text:p>
              </table:table-cell>
              <table:table-cell office:value-type="float" office:value="45.6704962324656">
                <text:p>45.6704962324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46.7832218988005">
                <text:p>46.7832218988005</text:p>
              </table:table-cell>
              <table:table-cell office:value-type="float" office:value="56.6011975803255">
                <text:p>56.6011975803255</text:p>
              </table:table-cell>
              <table:table-cell office:value-type="float" office:value="-121.222669932166">
                <text:p>-121.222669932166</text:p>
              </table:table-cell>
              <table:table-cell office:value-type="float" office:value="-17.7465877354858">
                <text:p>-17.7465877354858</text:p>
              </table:table-cell>
              <table:table-cell office:value-type="float" office:value="46.8648776488597">
                <text:p>46.8648776488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56.0011144564276">
                <text:p>56.0011144564276</text:p>
              </table:table-cell>
              <table:table-cell office:value-type="float" office:value="44.6760569668398">
                <text:p>44.6760569668398</text:p>
              </table:table-cell>
              <table:table-cell office:value-type="float" office:value="-126.690715810922">
                <text:p>-126.690715810922</text:p>
              </table:table-cell>
              <table:table-cell office:value-type="float" office:value="-18.029702677031">
                <text:p>-18.029702677031</text:p>
              </table:table-cell>
              <table:table-cell office:value-type="float" office:value="48.2379714466889">
                <text:p>48.2379714466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69.9413057435124">
                <text:p>69.9413057435124</text:p>
              </table:table-cell>
              <table:table-cell office:value-type="float" office:value="36.8756688150521">
                <text:p>36.8756688150521</text:p>
              </table:table-cell>
              <table:table-cell office:value-type="float" office:value="-129.203961773981">
                <text:p>-129.203961773981</text:p>
              </table:table-cell>
              <table:table-cell office:value-type="float" office:value="-18.5457720889777">
                <text:p>-18.5457720889777</text:p>
              </table:table-cell>
              <table:table-cell office:value-type="float" office:value="47.9170447659188">
                <text:p>47.9170447659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78.8665085145154">
                <text:p>78.8665085145154</text:p>
              </table:table-cell>
              <table:table-cell office:value-type="float" office:value="25.3387429084674">
                <text:p>25.3387429084674</text:p>
              </table:table-cell>
              <table:table-cell office:value-type="float" office:value="-122.864142308402">
                <text:p>-122.864142308402</text:p>
              </table:table-cell>
              <table:table-cell office:value-type="float" office:value="-18.033539600553">
                <text:p>-18.033539600553</text:p>
              </table:table-cell>
              <table:table-cell office:value-type="float" office:value="47.0832942880144">
                <text:p>47.083294288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87.7531580988359">
                <text:p>87.7531580988359</text:p>
              </table:table-cell>
              <table:table-cell office:value-type="float" office:value="17.4460090896936">
                <text:p>17.4460090896936</text:p>
              </table:table-cell>
              <table:table-cell office:value-type="float" office:value="-128.916515435909">
                <text:p>-128.916515435909</text:p>
              </table:table-cell>
              <table:table-cell office:value-type="float" office:value="-17.2815348349861">
                <text:p>-17.2815348349861</text:p>
              </table:table-cell>
              <table:table-cell office:value-type="float" office:value="46.8494161163296">
                <text:p>46.8494161163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94.0888999791946">
                <text:p>94.0888999791946</text:p>
              </table:table-cell>
              <table:table-cell office:value-type="float" office:value="7.14125892494416">
                <text:p>7.14125892494416</text:p>
              </table:table-cell>
              <table:table-cell office:value-type="float" office:value="-126.214139674053">
                <text:p>-126.214139674053</text:p>
              </table:table-cell>
              <table:table-cell office:value-type="float" office:value="-15.913524358389">
                <text:p>-15.913524358389</text:p>
              </table:table-cell>
              <table:table-cell office:value-type="float" office:value="47.477011250495">
                <text:p>47.477011250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103.997786048075">
                <text:p>103.997786048075</text:p>
              </table:table-cell>
              <table:table-cell office:value-type="float" office:value="-0.914614733080094">
                <text:p>-0.914614733080094</text:p>
              </table:table-cell>
              <table:table-cell office:value-type="float" office:value="-119.440212700318">
                <text:p>-119.440212700318</text:p>
              </table:table-cell>
              <table:table-cell office:value-type="float" office:value="-15.4341116955627">
                <text:p>-15.4341116955627</text:p>
              </table:table-cell>
              <table:table-cell office:value-type="float" office:value="45.5664237064086">
                <text:p>45.5664237064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109.457391910942">
                <text:p>109.457391910942</text:p>
              </table:table-cell>
              <table:table-cell office:value-type="float" office:value="-12.8801308367368">
                <text:p>-12.8801308367368</text:p>
              </table:table-cell>
              <table:table-cell office:value-type="float" office:value="-117.656452872906">
                <text:p>-117.656452872906</text:p>
              </table:table-cell>
              <table:table-cell office:value-type="float" office:value="-13.6377916174042">
                <text:p>-13.6377916174042</text:p>
              </table:table-cell>
              <table:table-cell office:value-type="float" office:value="44.4159769390047">
                <text:p>44.4159769390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115.171731395967">
                <text:p>115.171731395967</text:p>
              </table:table-cell>
              <table:table-cell office:value-type="float" office:value="-25.0419163370395">
                <text:p>-25.0419163370395</text:p>
              </table:table-cell>
              <table:table-cell office:value-type="float" office:value="-111.436306474086">
                <text:p>-111.436306474086</text:p>
              </table:table-cell>
              <table:table-cell office:value-type="float" office:value="-12.7546573569278">
                <text:p>-12.7546573569278</text:p>
              </table:table-cell>
              <table:table-cell office:value-type="float" office:value="41.5833242012244">
                <text:p>41.583324201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115.986885100608">
                <text:p>115.986885100608</text:p>
              </table:table-cell>
              <table:table-cell office:value-type="float" office:value="-32.2425533673663">
                <text:p>-32.2425533673663</text:p>
              </table:table-cell>
              <table:table-cell office:value-type="float" office:value="-103.504281015645">
                <text:p>-103.504281015645</text:p>
              </table:table-cell>
              <table:table-cell office:value-type="float" office:value="-11.3997785816191">
                <text:p>-11.3997785816191</text:p>
              </table:table-cell>
              <table:table-cell office:value-type="float" office:value="39.4685480927862">
                <text:p>39.4685480927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23.616229447862">
                <text:p>123.616229447862</text:p>
              </table:table-cell>
              <table:table-cell office:value-type="float" office:value="-41.7687960337964">
                <text:p>-41.7687960337964</text:p>
              </table:table-cell>
              <table:table-cell office:value-type="float" office:value="-87.7987199870197">
                <text:p>-87.7987199870197</text:p>
              </table:table-cell>
              <table:table-cell office:value-type="float" office:value="-10.0979910197545">
                <text:p>-10.0979910197545</text:p>
              </table:table-cell>
              <table:table-cell office:value-type="float" office:value="37.3268053647903">
                <text:p>37.3268053647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24.808703212324">
                <text:p>124.808703212324</text:p>
              </table:table-cell>
              <table:table-cell office:value-type="float" office:value="-47.7349737030579">
                <text:p>-47.7349737030579</text:p>
              </table:table-cell>
              <table:table-cell office:value-type="float" office:value="-77.7690917730395">
                <text:p>-77.7690917730395</text:p>
              </table:table-cell>
              <table:table-cell office:value-type="float" office:value="-8.33398924842816">
                <text:p>-8.33398924842816</text:p>
              </table:table-cell>
              <table:table-cell office:value-type="float" office:value="31.5738098021212">
                <text:p>31.5738098021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120.376283942091">
                <text:p>120.376283942091</text:p>
              </table:table-cell>
              <table:table-cell office:value-type="float" office:value="-56.864306107771">
                <text:p>-56.864306107771</text:p>
              </table:table-cell>
              <table:table-cell office:value-type="float" office:value="-71.3051884006697">
                <text:p>-71.3051884006697</text:p>
              </table:table-cell>
              <table:table-cell office:value-type="float" office:value="-6.88857806060949">
                <text:p>-6.88857806060949</text:p>
              </table:table-cell>
              <table:table-cell office:value-type="float" office:value="28.0015587075403">
                <text:p>28.0015587075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20.413813460476">
                <text:p>120.413813460476</text:p>
              </table:table-cell>
              <table:table-cell office:value-type="float" office:value="-64.4783219293202">
                <text:p>-64.4783219293202</text:p>
              </table:table-cell>
              <table:table-cell office:value-type="float" office:value="-62.3347476130008">
                <text:p>-62.3347476130008</text:p>
              </table:table-cell>
              <table:table-cell office:value-type="float" office:value="-5.47922784537475">
                <text:p>-5.47922784537475</text:p>
              </table:table-cell>
              <table:table-cell office:value-type="float" office:value="23.1599473360498">
                <text:p>23.1599473360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19.453905878249">
                <text:p>119.453905878249</text:p>
              </table:table-cell>
              <table:table-cell office:value-type="float" office:value="-69.2030751803235">
                <text:p>-69.2030751803235</text:p>
              </table:table-cell>
              <table:table-cell office:value-type="float" office:value="-50.1479753264679">
                <text:p>-50.1479753264679</text:p>
              </table:table-cell>
              <table:table-cell office:value-type="float" office:value="-4.20502345273111">
                <text:p>-4.20502345273111</text:p>
              </table:table-cell>
              <table:table-cell office:value-type="float" office:value="20.4441839769598">
                <text:p>20.4441839769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117.814044936369">
                <text:p>117.814044936369</text:p>
              </table:table-cell>
              <table:table-cell office:value-type="float" office:value="-74.1272942322033">
                <text:p>-74.1272942322033</text:p>
              </table:table-cell>
              <table:table-cell office:value-type="float" office:value="-38.5686458406891">
                <text:p>-38.5686458406891</text:p>
              </table:table-cell>
              <table:table-cell office:value-type="float" office:value="-2.08021307837335">
                <text:p>-2.08021307837335</text:p>
              </table:table-cell>
              <table:table-cell office:value-type="float" office:value="13.5775131780133">
                <text:p>13.5775131780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107.761760389728">
                <text:p>107.761760389728</text:p>
              </table:table-cell>
              <table:table-cell office:value-type="float" office:value="-77.0311241801426">
                <text:p>-77.0311241801426</text:p>
              </table:table-cell>
              <table:table-cell office:value-type="float" office:value="-21.3310474978837">
                <text:p>-21.3310474978837</text:p>
              </table:table-cell>
              <table:table-cell office:value-type="float" office:value="-0.490549499355546">
                <text:p>-0.490549499355546</text:p>
              </table:table-cell>
              <table:table-cell office:value-type="float" office:value="9.95014274891474">
                <text:p>9.9501427489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04.826325778585">
                <text:p>104.826325778585</text:p>
              </table:table-cell>
              <table:table-cell office:value-type="float" office:value="-80.7505259362561">
                <text:p>-80.7505259362561</text:p>
              </table:table-cell>
              <table:table-cell office:value-type="float" office:value="-6.59419246006816">
                <text:p>-6.59419246006816</text:p>
              </table:table-cell>
              <table:table-cell office:value-type="float" office:value="0.110718424516972">
                <text:p>0.110718424516972</text:p>
              </table:table-cell>
              <table:table-cell office:value-type="float" office:value="2.55888530614476">
                <text:p>2.55888530614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98.6840591598926">
                <text:p>98.6840591598926</text:p>
              </table:table-cell>
              <table:table-cell office:value-type="float" office:value="-80.6041633874343">
                <text:p>-80.6041633874343</text:p>
              </table:table-cell>
              <table:table-cell office:value-type="float" office:value="0.572290062208847">
                <text:p>0.572290062208847</text:p>
              </table:table-cell>
              <table:table-cell office:value-type="float" office:value="1.01719984671227">
                <text:p>1.01719984671227</text:p>
              </table:table-cell>
              <table:table-cell office:value-type="float" office:value="-1.81615681953775">
                <text:p>-1.81615681953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89.6065175385571">
                <text:p>89.6065175385571</text:p>
              </table:table-cell>
              <table:table-cell office:value-type="float" office:value="-86.6880680054275">
                <text:p>-86.6880680054275</text:p>
              </table:table-cell>
              <table:table-cell office:value-type="float" office:value="14.0813728349952">
                <text:p>14.0813728349952</text:p>
              </table:table-cell>
              <table:table-cell office:value-type="float" office:value="2.65257623220727">
                <text:p>2.65257623220727</text:p>
              </table:table-cell>
              <table:table-cell office:value-type="float" office:value="-7.09399808907968">
                <text:p>-7.0939980890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79.4833693955055">
                <text:p>79.4833693955055</text:p>
              </table:table-cell>
              <table:table-cell office:value-type="float" office:value="-86.1238071402754">
                <text:p>-86.1238071402754</text:p>
              </table:table-cell>
              <table:table-cell office:value-type="float" office:value="24.4610321001719">
                <text:p>24.4610321001719</text:p>
              </table:table-cell>
              <table:table-cell office:value-type="float" office:value="3.62200540929153">
                <text:p>3.62200540929153</text:p>
              </table:table-cell>
              <table:table-cell office:value-type="float" office:value="-13.7494651644681">
                <text:p>-13.7494651644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70.5054000563254">
                <text:p>70.5054000563254</text:p>
              </table:table-cell>
              <table:table-cell office:value-type="float" office:value="-84.7429741001387">
                <text:p>-84.7429741001387</text:p>
              </table:table-cell>
              <table:table-cell office:value-type="float" office:value="40.748578072482">
                <text:p>40.748578072482</text:p>
              </table:table-cell>
              <table:table-cell office:value-type="float" office:value="5.25728907640678">
                <text:p>5.25728907640678</text:p>
              </table:table-cell>
              <table:table-cell office:value-type="float" office:value="-18.4249312891233">
                <text:p>-18.424931289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64.217184424556">
                <text:p>64.217184424556</text:p>
              </table:table-cell>
              <table:table-cell office:value-type="float" office:value="-85.9783631401577">
                <text:p>-85.9783631401577</text:p>
              </table:table-cell>
              <table:table-cell office:value-type="float" office:value="51.7359623331647">
                <text:p>51.7359623331647</text:p>
              </table:table-cell>
              <table:table-cell office:value-type="float" office:value="6.27780772748024">
                <text:p>6.27780772748024</text:p>
              </table:table-cell>
              <table:table-cell office:value-type="float" office:value="-22.1924403601246">
                <text:p>-22.192440360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55.4536933738756">
                <text:p>55.4536933738756</text:p>
              </table:table-cell>
              <table:table-cell office:value-type="float" office:value="-87.8882142492885">
                <text:p>-87.8882142492885</text:p>
              </table:table-cell>
              <table:table-cell office:value-type="float" office:value="60.8170618378073">
                <text:p>60.8170618378073</text:p>
              </table:table-cell>
              <table:table-cell office:value-type="float" office:value="7.5294441408473">
                <text:p>7.5294441408473</text:p>
              </table:table-cell>
              <table:table-cell office:value-type="float" office:value="-26.9695767553391">
                <text:p>-26.9695767553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46.1926117983998">
                <text:p>46.1926117983998</text:p>
              </table:table-cell>
              <table:table-cell office:value-type="float" office:value="-83.5944994157884">
                <text:p>-83.5944994157884</text:p>
              </table:table-cell>
              <table:table-cell office:value-type="float" office:value="72.4789498369999">
                <text:p>72.4789498369999</text:p>
              </table:table-cell>
              <table:table-cell office:value-type="float" office:value="9.79994224938386">
                <text:p>9.79994224938386</text:p>
              </table:table-cell>
              <table:table-cell office:value-type="float" office:value="-31.6214432484305">
                <text:p>-31.6214432484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34.1862561901962">
                <text:p>34.1862561901962</text:p>
              </table:table-cell>
              <table:table-cell office:value-type="float" office:value="-82.5102209438114">
                <text:p>-82.5102209438114</text:p>
              </table:table-cell>
              <table:table-cell office:value-type="float" office:value="79.7664403615221">
                <text:p>79.7664403615221</text:p>
              </table:table-cell>
              <table:table-cell office:value-type="float" office:value="11.3869133461545">
                <text:p>11.3869133461545</text:p>
              </table:table-cell>
              <table:table-cell office:value-type="float" office:value="-35.3381453271657">
                <text:p>-35.338145327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22.5615792537996">
                <text:p>22.5615792537996</text:p>
              </table:table-cell>
              <table:table-cell office:value-type="float" office:value="-78.5854377083574">
                <text:p>-78.5854377083574</text:p>
              </table:table-cell>
              <table:table-cell office:value-type="float" office:value="93.8484557941285">
                <text:p>93.8484557941285</text:p>
              </table:table-cell>
              <table:table-cell office:value-type="float" office:value="12.0835882529794">
                <text:p>12.0835882529794</text:p>
              </table:table-cell>
              <table:table-cell office:value-type="float" office:value="-37.2697951637917">
                <text:p>-37.2697951637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9.74386697245553">
                <text:p>9.74386697245553</text:p>
              </table:table-cell>
              <table:table-cell office:value-type="float" office:value="-76.3588711775844">
                <text:p>-76.3588711775844</text:p>
              </table:table-cell>
              <table:table-cell office:value-type="float" office:value="98.575049382006">
                <text:p>98.575049382006</text:p>
              </table:table-cell>
              <table:table-cell office:value-type="float" office:value="12.9752668533343">
                <text:p>12.9752668533343</text:p>
              </table:table-cell>
              <table:table-cell office:value-type="float" office:value="-39.4277576552847">
                <text:p>-39.4277576552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-6.11059861832954">
                <text:p>-6.11059861832954</text:p>
              </table:table-cell>
              <table:table-cell office:value-type="float" office:value="-70.0166603036871">
                <text:p>-70.0166603036871</text:p>
              </table:table-cell>
              <table:table-cell office:value-type="float" office:value="105.735467302678">
                <text:p>105.735467302678</text:p>
              </table:table-cell>
              <table:table-cell office:value-type="float" office:value="15.4719578053948">
                <text:p>15.4719578053948</text:p>
              </table:table-cell>
              <table:table-cell office:value-type="float" office:value="-41.6500173127648">
                <text:p>-41.650017312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-14.415203406265">
                <text:p>-14.415203406265</text:p>
              </table:table-cell>
              <table:table-cell office:value-type="float" office:value="-65.8342468039199">
                <text:p>-65.8342468039199</text:p>
              </table:table-cell>
              <table:table-cell office:value-type="float" office:value="116.754263316394">
                <text:p>116.754263316394</text:p>
              </table:table-cell>
              <table:table-cell office:value-type="float" office:value="15.6620263510802">
                <text:p>15.6620263510802</text:p>
              </table:table-cell>
              <table:table-cell office:value-type="float" office:value="-42.6492703303957">
                <text:p>-42.649270330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-29.5231397739022">
                <text:p>-29.5231397739022</text:p>
              </table:table-cell>
              <table:table-cell office:value-type="float" office:value="-56.7547632336259">
                <text:p>-56.7547632336259</text:p>
              </table:table-cell>
              <table:table-cell office:value-type="float" office:value="122.7221983803">
                <text:p>122.7221983803</text:p>
              </table:table-cell>
              <table:table-cell office:value-type="float" office:value="17.0677483759393">
                <text:p>17.0677483759393</text:p>
              </table:table-cell>
              <table:table-cell office:value-type="float" office:value="-44.3265632282088">
                <text:p>-44.3265632282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-36.3347891208782">
                <text:p>-36.3347891208782</text:p>
              </table:table-cell>
              <table:table-cell office:value-type="float" office:value="-51.6700352202279">
                <text:p>-51.6700352202279</text:p>
              </table:table-cell>
              <table:table-cell office:value-type="float" office:value="130.038554832708">
                <text:p>130.038554832708</text:p>
              </table:table-cell>
              <table:table-cell office:value-type="float" office:value="18.6858723167101">
                <text:p>18.6858723167101</text:p>
              </table:table-cell>
              <table:table-cell office:value-type="float" office:value="-44.6895312789872">
                <text:p>-44.689531278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-49.3037850355046">
                <text:p>-49.3037850355046</text:p>
              </table:table-cell>
              <table:table-cell office:value-type="float" office:value="-43.2192612232081">
                <text:p>-43.2192612232081</text:p>
              </table:table-cell>
              <table:table-cell office:value-type="float" office:value="128.379813246152">
                <text:p>128.379813246152</text:p>
              </table:table-cell>
              <table:table-cell office:value-type="float" office:value="19.4087295586872">
                <text:p>19.4087295586872</text:p>
              </table:table-cell>
              <table:table-cell office:value-type="float" office:value="-44.2989254796937">
                <text:p>-44.2989254796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-55.4885140603798">
                <text:p>-55.4885140603798</text:p>
              </table:table-cell>
              <table:table-cell office:value-type="float" office:value="-34.5298260113916">
                <text:p>-34.5298260113916</text:p>
              </table:table-cell>
              <table:table-cell office:value-type="float" office:value="134.769538773867">
                <text:p>134.769538773867</text:p>
              </table:table-cell>
              <table:table-cell office:value-type="float" office:value="18.9394051008791">
                <text:p>18.9394051008791</text:p>
              </table:table-cell>
              <table:table-cell office:value-type="float" office:value="-44.838406860361">
                <text:p>-44.838406860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-70.2522230781151">
                <text:p>-70.2522230781151</text:p>
              </table:table-cell>
              <table:table-cell office:value-type="float" office:value="-24.0801832262599">
                <text:p>-24.0801832262599</text:p>
              </table:table-cell>
              <table:table-cell office:value-type="float" office:value="131.214851951301">
                <text:p>131.214851951301</text:p>
              </table:table-cell>
              <table:table-cell office:value-type="float" office:value="19.7890275600234">
                <text:p>19.7890275600234</text:p>
              </table:table-cell>
              <table:table-cell office:value-type="float" office:value="-44.9311512567445">
                <text:p>-44.9311512567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-77.6832820211965">
                <text:p>-77.6832820211965</text:p>
              </table:table-cell>
              <table:table-cell office:value-type="float" office:value="-12.3361888493939">
                <text:p>-12.3361888493939</text:p>
              </table:table-cell>
              <table:table-cell office:value-type="float" office:value="134.857485065541">
                <text:p>134.857485065541</text:p>
              </table:table-cell>
              <table:table-cell office:value-type="float" office:value="18.3473417083006">
                <text:p>18.3473417083006</text:p>
              </table:table-cell>
              <table:table-cell office:value-type="float" office:value="-44.6370804230468">
                <text:p>-44.6370804230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-87.7663229959387">
                <text:p>-87.7663229959387</text:p>
              </table:table-cell>
              <table:table-cell office:value-type="float" office:value="-2.9761403451324">
                <text:p>-2.9761403451324</text:p>
              </table:table-cell>
              <table:table-cell office:value-type="float" office:value="135.152656888697">
                <text:p>135.152656888697</text:p>
              </table:table-cell>
              <table:table-cell office:value-type="float" office:value="17.254141783408">
                <text:p>17.254141783408</text:p>
              </table:table-cell>
              <table:table-cell office:value-type="float" office:value="-45.1677317988915">
                <text:p>-45.167731798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-90.6329896303337">
                <text:p>-90.6329896303337</text:p>
              </table:table-cell>
              <table:table-cell office:value-type="float" office:value="6.97745213856195">
                <text:p>6.97745213856195</text:p>
              </table:table-cell>
              <table:table-cell office:value-type="float" office:value="124.634587325008">
                <text:p>124.634587325008</text:p>
              </table:table-cell>
              <table:table-cell office:value-type="float" office:value="16.8136875076292">
                <text:p>16.8136875076292</text:p>
              </table:table-cell>
              <table:table-cell office:value-type="float" office:value="-44.0510770927829">
                <text:p>-44.0510770927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-101.460472446474">
                <text:p>-101.460472446474</text:p>
              </table:table-cell>
              <table:table-cell office:value-type="float" office:value="18.8460961576913">
                <text:p>18.8460961576913</text:p>
              </table:table-cell>
              <table:table-cell office:value-type="float" office:value="127.002967052547">
                <text:p>127.002967052547</text:p>
              </table:table-cell>
              <table:table-cell office:value-type="float" office:value="15.0715521268179">
                <text:p>15.0715521268179</text:p>
              </table:table-cell>
              <table:table-cell office:value-type="float" office:value="-42.8074855078691">
                <text:p>-42.8074855078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-108.873534990591">
                <text:p>-108.873534990591</text:p>
              </table:table-cell>
              <table:table-cell office:value-type="float" office:value="26.8138520953739">
                <text:p>26.8138520953739</text:p>
              </table:table-cell>
              <table:table-cell office:value-type="float" office:value="121.124422572619">
                <text:p>121.124422572619</text:p>
              </table:table-cell>
              <table:table-cell office:value-type="float" office:value="14.4724233885424">
                <text:p>14.4724233885424</text:p>
              </table:table-cell>
              <table:table-cell office:value-type="float" office:value="-39.4363289355569">
                <text:p>-39.4363289355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-112.493781620895">
                <text:p>-112.493781620895</text:p>
              </table:table-cell>
              <table:table-cell office:value-type="float" office:value="35.3899990906995">
                <text:p>35.3899990906995</text:p>
              </table:table-cell>
              <table:table-cell office:value-type="float" office:value="107.647893267513">
                <text:p>107.647893267513</text:p>
              </table:table-cell>
              <table:table-cell office:value-type="float" office:value="13.1534340802963">
                <text:p>13.1534340802963</text:p>
              </table:table-cell>
              <table:table-cell office:value-type="float" office:value="-36.9999332487918">
                <text:p>-36.9999332487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-114.712111374333">
                <text:p>-114.712111374333</text:p>
              </table:table-cell>
              <table:table-cell office:value-type="float" office:value="45.1811148420711">
                <text:p>45.1811148420711</text:p>
              </table:table-cell>
              <table:table-cell office:value-type="float" office:value="103.559264460012">
                <text:p>103.559264460012</text:p>
              </table:table-cell>
              <table:table-cell office:value-type="float" office:value="11.9172264041023">
                <text:p>11.9172264041023</text:p>
              </table:table-cell>
              <table:table-cell office:value-type="float" office:value="-33.9732043646347">
                <text:p>-33.9732043646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113.224181555811">
                <text:p>-113.224181555811</text:p>
              </table:table-cell>
              <table:table-cell office:value-type="float" office:value="53.7031459663884">
                <text:p>53.7031459663884</text:p>
              </table:table-cell>
              <table:table-cell office:value-type="float" office:value="87.9546946830382">
                <text:p>87.9546946830382</text:p>
              </table:table-cell>
              <table:table-cell office:value-type="float" office:value="10.3548709080713">
                <text:p>10.3548709080713</text:p>
              </table:table-cell>
              <table:table-cell office:value-type="float" office:value="-31.6203716748618">
                <text:p>-31.6203716748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113.451280936086">
                <text:p>-113.451280936086</text:p>
              </table:table-cell>
              <table:table-cell office:value-type="float" office:value="60.534923373427">
                <text:p>60.534923373427</text:p>
              </table:table-cell>
              <table:table-cell office:value-type="float" office:value="83.8129671300721">
                <text:p>83.8129671300721</text:p>
              </table:table-cell>
              <table:table-cell office:value-type="float" office:value="8.62498974354245">
                <text:p>8.62498974354245</text:p>
              </table:table-cell>
              <table:table-cell office:value-type="float" office:value="-28.1797977777671">
                <text:p>-28.1797977777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-112.788507145977">
                <text:p>-112.788507145977</text:p>
              </table:table-cell>
              <table:table-cell office:value-type="float" office:value="66.8497775324572">
                <text:p>66.8497775324572</text:p>
              </table:table-cell>
              <table:table-cell office:value-type="float" office:value="66.4679855538504">
                <text:p>66.4679855538504</text:p>
              </table:table-cell>
              <table:table-cell office:value-type="float" office:value="6.33127461448454">
                <text:p>6.33127461448454</text:p>
              </table:table-cell>
              <table:table-cell office:value-type="float" office:value="-23.6094146406465">
                <text:p>-23.6094146406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112.398976995711">
                <text:p>-112.398976995711</text:p>
              </table:table-cell>
              <table:table-cell office:value-type="float" office:value="70.9037234264017">
                <text:p>70.9037234264017</text:p>
              </table:table-cell>
              <table:table-cell office:value-type="float" office:value="61.5134981310219">
                <text:p>61.5134981310219</text:p>
              </table:table-cell>
              <table:table-cell office:value-type="float" office:value="4.83781308297291">
                <text:p>4.83781308297291</text:p>
              </table:table-cell>
              <table:table-cell office:value-type="float" office:value="-17.3143507386538">
                <text:p>-17.3143507386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-110.732404084818">
                <text:p>-110.732404084818</text:p>
              </table:table-cell>
              <table:table-cell office:value-type="float" office:value="75.702098565543">
                <text:p>75.702098565543</text:p>
              </table:table-cell>
              <table:table-cell office:value-type="float" office:value="47.1080936295275">
                <text:p>47.1080936295275</text:p>
              </table:table-cell>
              <table:table-cell office:value-type="float" office:value="4.46377659513356">
                <text:p>4.46377659513356</text:p>
              </table:table-cell>
              <table:table-cell office:value-type="float" office:value="-12.6212959829912">
                <text:p>-12.62129598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102.785734959324">
                <text:p>-102.785734959324</text:p>
              </table:table-cell>
              <table:table-cell office:value-type="float" office:value="83.268944576177">
                <text:p>83.268944576177</text:p>
              </table:table-cell>
              <table:table-cell office:value-type="float" office:value="34.0486501354722">
                <text:p>34.0486501354722</text:p>
              </table:table-cell>
              <table:table-cell office:value-type="float" office:value="2.51843715207375">
                <text:p>2.51843715207375</text:p>
              </table:table-cell>
              <table:table-cell office:value-type="float" office:value="-8.87269185466925">
                <text:p>-8.87269185466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102.079792395497">
                <text:p>-102.079792395497</text:p>
              </table:table-cell>
              <table:table-cell office:value-type="float" office:value="82.3612553897623">
                <text:p>82.3612553897623</text:p>
              </table:table-cell>
              <table:table-cell office:value-type="float" office:value="21.5916257782396">
                <text:p>21.5916257782396</text:p>
              </table:table-cell>
              <table:table-cell office:value-type="float" office:value="1.71412783277957">
                <text:p>1.71412783277957</text:p>
              </table:table-cell>
              <table:table-cell office:value-type="float" office:value="-3.46684722684379">
                <text:p>-3.46684722684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94.6637323400215">
                <text:p>-94.6637323400215</text:p>
              </table:table-cell>
              <table:table-cell office:value-type="float" office:value="85.714750320517">
                <text:p>85.714750320517</text:p>
              </table:table-cell>
              <table:table-cell office:value-type="float" office:value="4.69737338135929">
                <text:p>4.69737338135929</text:p>
              </table:table-cell>
              <table:table-cell office:value-type="float" office:value="0.505321159331238">
                <text:p>0.505321159331238</text:p>
              </table:table-cell>
              <table:table-cell office:value-type="float" office:value="2.79682417424334">
                <text:p>2.79682417424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87.8316072797266">
                <text:p>-87.8316072797266</text:p>
              </table:table-cell>
              <table:table-cell office:value-type="float" office:value="88.9880199149756">
                <text:p>88.9880199149756</text:p>
              </table:table-cell>
              <table:table-cell office:value-type="float" office:value="-7.20284465394785">
                <text:p>-7.20284465394785</text:p>
              </table:table-cell>
              <table:table-cell office:value-type="float" office:value="-0.675708203340292">
                <text:p>-0.675708203340292</text:p>
              </table:table-cell>
              <table:table-cell office:value-type="float" office:value="7.58656964502237">
                <text:p>7.58656964502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77.6706070273911">
                <text:p>-77.6706070273911</text:p>
              </table:table-cell>
              <table:table-cell office:value-type="float" office:value="88.6949108984775">
                <text:p>88.6949108984775</text:p>
              </table:table-cell>
              <table:table-cell office:value-type="float" office:value="-14.1373543822896">
                <text:p>-14.1373543822896</text:p>
              </table:table-cell>
              <table:table-cell office:value-type="float" office:value="-1.55155488664432">
                <text:p>-1.55155488664432</text:p>
              </table:table-cell>
              <table:table-cell office:value-type="float" office:value="14.849415561087">
                <text:p>14.84941556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69.3850965273442">
                <text:p>-69.3850965273442</text:p>
              </table:table-cell>
              <table:table-cell office:value-type="float" office:value="93.743625204127">
                <text:p>93.743625204127</text:p>
              </table:table-cell>
              <table:table-cell office:value-type="float" office:value="-32.6940573937036">
                <text:p>-32.6940573937036</text:p>
              </table:table-cell>
              <table:table-cell office:value-type="float" office:value="-3.16556389625375">
                <text:p>-3.16556389625375</text:p>
              </table:table-cell>
              <table:table-cell office:value-type="float" office:value="18.169498568373">
                <text:p>18.169498568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-60.7134378976512">
                <text:p>-60.7134378976512</text:p>
              </table:table-cell>
              <table:table-cell office:value-type="float" office:value="90.9990496190089">
                <text:p>90.9990496190089</text:p>
              </table:table-cell>
              <table:table-cell office:value-type="float" office:value="-43.0379212158014">
                <text:p>-43.0379212158014</text:p>
              </table:table-cell>
              <table:table-cell office:value-type="float" office:value="-4.43210333203275">
                <text:p>-4.43210333203275</text:p>
              </table:table-cell>
              <table:table-cell office:value-type="float" office:value="23.8999265629201">
                <text:p>23.8999265629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-48.0960308868199">
                <text:p>-48.0960308868199</text:p>
              </table:table-cell>
              <table:table-cell office:value-type="float" office:value="92.6962164833797">
                <text:p>92.6962164833797</text:p>
              </table:table-cell>
              <table:table-cell office:value-type="float" office:value="-54.0609440695597">
                <text:p>-54.0609440695597</text:p>
              </table:table-cell>
              <table:table-cell office:value-type="float" office:value="-5.73637094853292">
                <text:p>-5.73637094853292</text:p>
              </table:table-cell>
              <table:table-cell office:value-type="float" office:value="28.0394944147481">
                <text:p>28.0394944147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-36.0220026985476">
                <text:p>-36.0220026985476</text:p>
              </table:table-cell>
              <table:table-cell office:value-type="float" office:value="93.2319767307368">
                <text:p>93.2319767307368</text:p>
              </table:table-cell>
              <table:table-cell office:value-type="float" office:value="-62.5810995819062">
                <text:p>-62.5810995819062</text:p>
              </table:table-cell>
              <table:table-cell office:value-type="float" office:value="-8.19012935394395">
                <text:p>-8.19012935394395</text:p>
              </table:table-cell>
              <table:table-cell office:value-type="float" office:value="31.0189633628847">
                <text:p>31.0189633628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-27.6786783637341">
                <text:p>-27.6786783637341</text:p>
              </table:table-cell>
              <table:table-cell office:value-type="float" office:value="87.8379740725433">
                <text:p>87.8379740725433</text:p>
              </table:table-cell>
              <table:table-cell office:value-type="float" office:value="-76.6715409575906">
                <text:p>-76.6715409575906</text:p>
              </table:table-cell>
              <table:table-cell office:value-type="float" office:value="-9.66426371893181">
                <text:p>-9.66426371893181</text:p>
              </table:table-cell>
              <table:table-cell office:value-type="float" office:value="35.4938009370738">
                <text:p>35.4938009370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-19.0817455259236">
                <text:p>-19.0817455259236</text:p>
              </table:table-cell>
              <table:table-cell office:value-type="float" office:value="89.2401857579426">
                <text:p>89.2401857579426</text:p>
              </table:table-cell>
              <table:table-cell office:value-type="float" office:value="-80.9466173951275">
                <text:p>-80.9466173951275</text:p>
              </table:table-cell>
              <table:table-cell office:value-type="float" office:value="-11.1671797871164">
                <text:p>-11.1671797871164</text:p>
              </table:table-cell>
              <table:table-cell office:value-type="float" office:value="38.8305048514396">
                <text:p>38.83050485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-3.37171958834697">
                <text:p>-3.37171958834697</text:p>
              </table:table-cell>
              <table:table-cell office:value-type="float" office:value="85.274401377591">
                <text:p>85.274401377591</text:p>
              </table:table-cell>
              <table:table-cell office:value-type="float" office:value="-88.1083737736587">
                <text:p>-88.1083737736587</text:p>
              </table:table-cell>
              <table:table-cell office:value-type="float" office:value="-11.835949231298">
                <text:p>-11.835949231298</text:p>
              </table:table-cell>
              <table:table-cell office:value-type="float" office:value="42.6227973093048">
                <text:p>42.6227973093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5.98050535051582">
                <text:p>5.98050535051582</text:p>
              </table:table-cell>
              <table:table-cell office:value-type="float" office:value="79.9937552317354">
                <text:p>79.9937552317354</text:p>
              </table:table-cell>
              <table:table-cell office:value-type="float" office:value="-99.3917306838969">
                <text:p>-99.3917306838969</text:p>
              </table:table-cell>
              <table:table-cell office:value-type="float" office:value="-12.8971612936503">
                <text:p>-12.8971612936503</text:p>
              </table:table-cell>
              <table:table-cell office:value-type="float" office:value="44.5477588630556">
                <text:p>44.5477588630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16.8349411880689">
                <text:p>16.8349411880689</text:p>
              </table:table-cell>
              <table:table-cell office:value-type="float" office:value="74.5853018756045">
                <text:p>74.5853018756045</text:p>
              </table:table-cell>
              <table:table-cell office:value-type="float" office:value="-105.138216326228">
                <text:p>-105.138216326228</text:p>
              </table:table-cell>
              <table:table-cell office:value-type="float" office:value="-15.0160111288469">
                <text:p>-15.0160111288469</text:p>
              </table:table-cell>
              <table:table-cell office:value-type="float" office:value="45.7844706531182">
                <text:p>45.784470653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30.2157899110843">
                <text:p>30.2157899110843</text:p>
              </table:table-cell>
              <table:table-cell office:value-type="float" office:value="66.2805008952633">
                <text:p>66.2805008952633</text:p>
              </table:table-cell>
              <table:table-cell office:value-type="float" office:value="-111.395893878354">
                <text:p>-111.395893878354</text:p>
              </table:table-cell>
              <table:table-cell office:value-type="float" office:value="-16.1332370156808">
                <text:p>-16.1332370156808</text:p>
              </table:table-cell>
              <table:table-cell office:value-type="float" office:value="46.3565592390973">
                <text:p>46.3565592390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40.8055622806832">
                <text:p>40.8055622806832</text:p>
              </table:table-cell>
              <table:table-cell office:value-type="float" office:value="57.4339218660054">
                <text:p>57.4339218660054</text:p>
              </table:table-cell>
              <table:table-cell office:value-type="float" office:value="-115.941581748965">
                <text:p>-115.941581748965</text:p>
              </table:table-cell>
              <table:table-cell office:value-type="float" office:value="-17.4432885684893">
                <text:p>-17.4432885684893</text:p>
              </table:table-cell>
              <table:table-cell office:value-type="float" office:value="47.52669174474">
                <text:p>47.52669174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52.9903320732553">
                <text:p>52.9903320732553</text:p>
              </table:table-cell>
              <table:table-cell office:value-type="float" office:value="49.2409239777394">
                <text:p>49.2409239777394</text:p>
              </table:table-cell>
              <table:table-cell office:value-type="float" office:value="-118.84976152044">
                <text:p>-118.84976152044</text:p>
              </table:table-cell>
              <table:table-cell office:value-type="float" office:value="-17.6231591223842">
                <text:p>-17.6231591223842</text:p>
              </table:table-cell>
              <table:table-cell office:value-type="float" office:value="46.6142553999647">
                <text:p>46.6142553999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61.2236949925067">
                <text:p>61.2236949925067</text:p>
              </table:table-cell>
              <table:table-cell office:value-type="float" office:value="39.9368821753823">
                <text:p>39.9368821753823</text:p>
              </table:table-cell>
              <table:table-cell office:value-type="float" office:value="-124.358354516768">
                <text:p>-124.358354516768</text:p>
              </table:table-cell>
              <table:table-cell office:value-type="float" office:value="-18.2614178940157">
                <text:p>-18.2614178940157</text:p>
              </table:table-cell>
              <table:table-cell office:value-type="float" office:value="46.9980187166492">
                <text:p>46.9980187166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71.1608426148829">
                <text:p>71.1608426148829</text:p>
              </table:table-cell>
              <table:table-cell office:value-type="float" office:value="32.0428622785477">
                <text:p>32.0428622785477</text:p>
              </table:table-cell>
              <table:table-cell office:value-type="float" office:value="-124.965178201954">
                <text:p>-124.965178201954</text:p>
              </table:table-cell>
              <table:table-cell office:value-type="float" office:value="-17.9014341519902">
                <text:p>-17.9014341519902</text:p>
              </table:table-cell>
              <table:table-cell office:value-type="float" office:value="47.6032907660445">
                <text:p>47.6032907660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85.1248996269233">
                <text:p>85.1248996269233</text:p>
              </table:table-cell>
              <table:table-cell office:value-type="float" office:value="20.5712062461724">
                <text:p>20.5712062461724</text:p>
              </table:table-cell>
              <table:table-cell office:value-type="float" office:value="-127.589324694261">
                <text:p>-127.589324694261</text:p>
              </table:table-cell>
              <table:table-cell office:value-type="float" office:value="-17.9413394178359">
                <text:p>-17.9413394178359</text:p>
              </table:table-cell>
              <table:table-cell office:value-type="float" office:value="46.9354508790846">
                <text:p>46.9354508790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94.187348013452">
                <text:p>94.187348013452</text:p>
              </table:table-cell>
              <table:table-cell office:value-type="float" office:value="13.0442160847488">
                <text:p>13.0442160847488</text:p>
              </table:table-cell>
              <table:table-cell office:value-type="float" office:value="-125.371646856382">
                <text:p>-125.371646856382</text:p>
              </table:table-cell>
              <table:table-cell office:value-type="float" office:value="-16.7480572311979">
                <text:p>-16.7480572311979</text:p>
              </table:table-cell>
              <table:table-cell office:value-type="float" office:value="47.6745331034011">
                <text:p>47.6745331034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95.6757111246447">
                <text:p>95.6757111246447</text:p>
              </table:table-cell>
              <table:table-cell office:value-type="float" office:value="1.32294985023987">
                <text:p>1.32294985023987</text:p>
              </table:table-cell>
              <table:table-cell office:value-type="float" office:value="-124.056514863383">
                <text:p>-124.056514863383</text:p>
              </table:table-cell>
              <table:table-cell office:value-type="float" office:value="-16.1733469400543">
                <text:p>-16.1733469400543</text:p>
              </table:table-cell>
              <table:table-cell office:value-type="float" office:value="46.8899076144893">
                <text:p>46.8899076144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102.795308325526">
                <text:p>102.795308325526</text:p>
              </table:table-cell>
              <table:table-cell office:value-type="float" office:value="-7.46044386112409">
                <text:p>-7.46044386112409</text:p>
              </table:table-cell>
              <table:table-cell office:value-type="float" office:value="-118.675246823465">
                <text:p>-118.675246823465</text:p>
              </table:table-cell>
              <table:table-cell office:value-type="float" office:value="-13.9706311299727">
                <text:p>-13.9706311299727</text:p>
              </table:table-cell>
              <table:table-cell office:value-type="float" office:value="45.2205325658359">
                <text:p>45.2205325658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114.413733521165">
                <text:p>114.413733521165</text:p>
              </table:table-cell>
              <table:table-cell office:value-type="float" office:value="-17.6095982553537">
                <text:p>-17.6095982553537</text:p>
              </table:table-cell>
              <table:table-cell office:value-type="float" office:value="-110.591271424558">
                <text:p>-110.591271424558</text:p>
              </table:table-cell>
              <table:table-cell office:value-type="float" office:value="-12.3896620738951">
                <text:p>-12.3896620738951</text:p>
              </table:table-cell>
              <table:table-cell office:value-type="float" office:value="42.0151367756361">
                <text:p>42.0151367756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118.405169382495">
                <text:p>118.405169382495</text:p>
              </table:table-cell>
              <table:table-cell office:value-type="float" office:value="-31.1866471657948">
                <text:p>-31.1866471657948</text:p>
              </table:table-cell>
              <table:table-cell office:value-type="float" office:value="-101.089767446385">
                <text:p>-101.089767446385</text:p>
              </table:table-cell>
              <table:table-cell office:value-type="float" office:value="-11.5830948416436">
                <text:p>-11.5830948416436</text:p>
              </table:table-cell>
              <table:table-cell office:value-type="float" office:value="41.3517008130784">
                <text:p>41.351700813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119.476216800694">
                <text:p>119.476216800694</text:p>
              </table:table-cell>
              <table:table-cell office:value-type="float" office:value="-39.1440532220886">
                <text:p>-39.1440532220886</text:p>
              </table:table-cell>
              <table:table-cell office:value-type="float" office:value="-95.0973174148766">
                <text:p>-95.0973174148766</text:p>
              </table:table-cell>
              <table:table-cell office:value-type="float" office:value="-10.4934404172189">
                <text:p>-10.4934404172189</text:p>
              </table:table-cell>
              <table:table-cell office:value-type="float" office:value="38.6498109934395">
                <text:p>38.6498109934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122.187012775881">
                <text:p>122.187012775881</text:p>
              </table:table-cell>
              <table:table-cell office:value-type="float" office:value="-47.4977738413125">
                <text:p>-47.4977738413125</text:p>
              </table:table-cell>
              <table:table-cell office:value-type="float" office:value="-89.7838686331938">
                <text:p>-89.7838686331938</text:p>
              </table:table-cell>
              <table:table-cell office:value-type="float" office:value="-8.63613437992832">
                <text:p>-8.63613437992832</text:p>
              </table:table-cell>
              <table:table-cell office:value-type="float" office:value="33.4531464348148">
                <text:p>33.4531464348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122.483361698903">
                <text:p>122.483361698903</text:p>
              </table:table-cell>
              <table:table-cell office:value-type="float" office:value="-55.3328067206175">
                <text:p>-55.3328067206175</text:p>
              </table:table-cell>
              <table:table-cell office:value-type="float" office:value="-78.8062174631298">
                <text:p>-78.8062174631298</text:p>
              </table:table-cell>
              <table:table-cell office:value-type="float" office:value="-8.03747868866094">
                <text:p>-8.03747868866094</text:p>
              </table:table-cell>
              <table:table-cell office:value-type="float" office:value="30.1618111122025">
                <text:p>30.161811112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123.877864950746">
                <text:p>123.877864950746</text:p>
              </table:table-cell>
              <table:table-cell office:value-type="float" office:value="-59.7064439195988">
                <text:p>-59.7064439195988</text:p>
              </table:table-cell>
              <table:table-cell office:value-type="float" office:value="-68.588029060098">
                <text:p>-68.588029060098</text:p>
              </table:table-cell>
              <table:table-cell office:value-type="float" office:value="-5.36935705569926">
                <text:p>-5.36935705569926</text:p>
              </table:table-cell>
              <table:table-cell office:value-type="float" office:value="27.21045296841">
                <text:p>27.21045296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118.197142662084">
                <text:p>118.197142662084</text:p>
              </table:table-cell>
              <table:table-cell office:value-type="float" office:value="-65.5095434462689">
                <text:p>-65.5095434462689</text:p>
              </table:table-cell>
              <table:table-cell office:value-type="float" office:value="-49.9250493949136">
                <text:p>-49.9250493949136</text:p>
              </table:table-cell>
              <table:table-cell office:value-type="float" office:value="-3.99001770409296">
                <text:p>-3.99001770409296</text:p>
              </table:table-cell>
              <table:table-cell office:value-type="float" office:value="21.5189043521461">
                <text:p>21.5189043521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120.578562317655">
                <text:p>120.578562317655</text:p>
              </table:table-cell>
              <table:table-cell office:value-type="float" office:value="-69.2304165447424">
                <text:p>-69.2304165447424</text:p>
              </table:table-cell>
              <table:table-cell office:value-type="float" office:value="-45.1642261174591">
                <text:p>-45.1642261174591</text:p>
              </table:table-cell>
              <table:table-cell office:value-type="float" office:value="-2.46251127230654">
                <text:p>-2.46251127230654</text:p>
              </table:table-cell>
              <table:table-cell office:value-type="float" office:value="16.2045891783746">
                <text:p>16.204589178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110.657283757916">
                <text:p>110.657283757916</text:p>
              </table:table-cell>
              <table:table-cell office:value-type="float" office:value="-77.1304973703174">
                <text:p>-77.1304973703174</text:p>
              </table:table-cell>
              <table:table-cell office:value-type="float" office:value="-27.5899149789945">
                <text:p>-27.5899149789945</text:p>
              </table:table-cell>
              <table:table-cell office:value-type="float" office:value="-1.59848835107194">
                <text:p>-1.59848835107194</text:p>
              </table:table-cell>
              <table:table-cell office:value-type="float" office:value="12.6838453125971">
                <text:p>12.6838453125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107.73564915307">
                <text:p>107.73564915307</text:p>
              </table:table-cell>
              <table:table-cell office:value-type="float" office:value="-79.7463479840103">
                <text:p>-79.7463479840103</text:p>
              </table:table-cell>
              <table:table-cell office:value-type="float" office:value="-14.4489490238802">
                <text:p>-14.4489490238802</text:p>
              </table:table-cell>
              <table:table-cell office:value-type="float" office:value="-0.00546829801327586">
                <text:p>-0.00546829801327586</text:p>
              </table:table-cell>
              <table:table-cell office:value-type="float" office:value="5.51330817783717">
                <text:p>5.51330817783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102.42033386077">
                <text:p>102.42033386077</text:p>
              </table:table-cell>
              <table:table-cell office:value-type="float" office:value="-81.7235557701447">
                <text:p>-81.7235557701447</text:p>
              </table:table-cell>
              <table:table-cell office:value-type="float" office:value="-6.85519934118127">
                <text:p>-6.85519934118127</text:p>
              </table:table-cell>
              <table:table-cell office:value-type="float" office:value="0.525525813870127">
                <text:p>0.525525813870127</text:p>
              </table:table-cell>
              <table:table-cell office:value-type="float" office:value="1.20717286594097">
                <text:p>1.20717286594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92.9936923023288">
                <text:p>92.9936923023288</text:p>
              </table:table-cell>
              <table:table-cell office:value-type="float" office:value="-85.0992863065022">
                <text:p>-85.0992863065022</text:p>
              </table:table-cell>
              <table:table-cell office:value-type="float" office:value="7.58286477193737">
                <text:p>7.58286477193737</text:p>
              </table:table-cell>
              <table:table-cell office:value-type="float" office:value="1.76286443545432">
                <text:p>1.76286443545432</text:p>
              </table:table-cell>
              <table:table-cell office:value-type="float" office:value="-4.17222836809738">
                <text:p>-4.17222836809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88.6405500231536">
                <text:p>88.6405500231536</text:p>
              </table:table-cell>
              <table:table-cell office:value-type="float" office:value="-86.7399100636136">
                <text:p>-86.7399100636136</text:p>
              </table:table-cell>
              <table:table-cell office:value-type="float" office:value="19.4756608835417">
                <text:p>19.4756608835417</text:p>
              </table:table-cell>
              <table:table-cell office:value-type="float" office:value="3.14880037022084">
                <text:p>3.14880037022084</text:p>
              </table:table-cell>
              <table:table-cell office:value-type="float" office:value="-9.83978621805939">
                <text:p>-9.83978621805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82.0237356529283">
                <text:p>82.0237356529283</text:p>
              </table:table-cell>
              <table:table-cell office:value-type="float" office:value="-84.3775392236773">
                <text:p>-84.3775392236773</text:p>
              </table:table-cell>
              <table:table-cell office:value-type="float" office:value="35.599199023363">
                <text:p>35.599199023363</text:p>
              </table:table-cell>
              <table:table-cell office:value-type="float" office:value="4.62238403572728">
                <text:p>4.62238403572728</text:p>
              </table:table-cell>
              <table:table-cell office:value-type="float" office:value="-15.1192376508925">
                <text:p>-15.1192376508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70.3480605539178">
                <text:p>70.3480605539178</text:p>
              </table:table-cell>
              <table:table-cell office:value-type="float" office:value="-86.9459818017634">
                <text:p>-86.9459818017634</text:p>
              </table:table-cell>
              <table:table-cell office:value-type="float" office:value="43.9222434673855">
                <text:p>43.9222434673855</text:p>
              </table:table-cell>
              <table:table-cell office:value-type="float" office:value="5.66912029326869">
                <text:p>5.66912029326869</text:p>
              </table:table-cell>
              <table:table-cell office:value-type="float" office:value="-19.4136249515171">
                <text:p>-19.4136249515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58.7781763207485">
                <text:p>58.7781763207485</text:p>
              </table:table-cell>
              <table:table-cell office:value-type="float" office:value="-86.5747732992659">
                <text:p>-86.5747732992659</text:p>
              </table:table-cell>
              <table:table-cell office:value-type="float" office:value="59.8980180546352">
                <text:p>59.8980180546352</text:p>
              </table:table-cell>
              <table:table-cell office:value-type="float" office:value="6.68608178984006">
                <text:p>6.68608178984006</text:p>
              </table:table-cell>
              <table:table-cell office:value-type="float" office:value="-25.8078169249236">
                <text:p>-25.8078169249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48.5914271521637">
                <text:p>48.5914271521637</text:p>
              </table:table-cell>
              <table:table-cell office:value-type="float" office:value="-86.1231075823452">
                <text:p>-86.1231075823452</text:p>
              </table:table-cell>
              <table:table-cell office:value-type="float" office:value="65.2828207345398">
                <text:p>65.2828207345398</text:p>
              </table:table-cell>
              <table:table-cell office:value-type="float" office:value="8.39509881154043">
                <text:p>8.39509881154043</text:p>
              </table:table-cell>
              <table:table-cell office:value-type="float" office:value="-29.0560034475016">
                <text:p>-29.0560034475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37.0837941941285">
                <text:p>37.0837941941285</text:p>
              </table:table-cell>
              <table:table-cell office:value-type="float" office:value="-84.7522613328602">
                <text:p>-84.7522613328602</text:p>
              </table:table-cell>
              <table:table-cell office:value-type="float" office:value="74.5861800376043">
                <text:p>74.5861800376043</text:p>
              </table:table-cell>
              <table:table-cell office:value-type="float" office:value="10.0076892708881">
                <text:p>10.0076892708881</text:p>
              </table:table-cell>
              <table:table-cell office:value-type="float" office:value="-32.0706635743243">
                <text:p>-32.0706635743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24.3831277479881">
                <text:p>24.3831277479881</text:p>
              </table:table-cell>
              <table:table-cell office:value-type="float" office:value="-84.1914810284648">
                <text:p>-84.1914810284648</text:p>
              </table:table-cell>
              <table:table-cell office:value-type="float" office:value="85.8898933978468">
                <text:p>85.8898933978468</text:p>
              </table:table-cell>
              <table:table-cell office:value-type="float" office:value="12.3563361897396">
                <text:p>12.3563361897396</text:p>
              </table:table-cell>
              <table:table-cell office:value-type="float" office:value="-35.9274064018597">
                <text:p>-35.9274064018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11.5372285288965">
                <text:p>11.5372285288965</text:p>
              </table:table-cell>
              <table:table-cell office:value-type="float" office:value="-78.3640968927132">
                <text:p>-78.3640968927132</text:p>
              </table:table-cell>
              <table:table-cell office:value-type="float" office:value="94.0155833012544">
                <text:p>94.0155833012544</text:p>
              </table:table-cell>
              <table:table-cell office:value-type="float" office:value="12.5815187166243">
                <text:p>12.5815187166243</text:p>
              </table:table-cell>
              <table:table-cell office:value-type="float" office:value="-39.2034272773479">
                <text:p>-39.2034272773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1.01876077063262">
                <text:p>1.01876077063262</text:p>
              </table:table-cell>
              <table:table-cell office:value-type="float" office:value="-72.0132772680967">
                <text:p>-72.0132772680967</text:p>
              </table:table-cell>
              <table:table-cell office:value-type="float" office:value="106.96462917615">
                <text:p>106.96462917615</text:p>
              </table:table-cell>
              <table:table-cell office:value-type="float" office:value="13.819767495982">
                <text:p>13.819767495982</text:p>
              </table:table-cell>
              <table:table-cell office:value-type="float" office:value="-41.8116942064032">
                <text:p>-41.811694206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8.35680715461501">
                <text:p>-8.35680715461501</text:p>
              </table:table-cell>
              <table:table-cell office:value-type="float" office:value="-68.7460781021501">
                <text:p>-68.7460781021501</text:p>
              </table:table-cell>
              <table:table-cell office:value-type="float" office:value="114.695476313922">
                <text:p>114.695476313922</text:p>
              </table:table-cell>
              <table:table-cell office:value-type="float" office:value="15.274719562116">
                <text:p>15.274719562116</text:p>
              </table:table-cell>
              <table:table-cell office:value-type="float" office:value="-42.1464930060347">
                <text:p>-42.1464930060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20.921032530734">
                <text:p>-20.921032530734</text:p>
              </table:table-cell>
              <table:table-cell office:value-type="float" office:value="-61.8002096494738">
                <text:p>-61.8002096494738</text:p>
              </table:table-cell>
              <table:table-cell office:value-type="float" office:value="121.36916654957">
                <text:p>121.36916654957</text:p>
              </table:table-cell>
              <table:table-cell office:value-type="float" office:value="16.290899687339">
                <text:p>16.290899687339</text:p>
              </table:table-cell>
              <table:table-cell office:value-type="float" office:value="-43.1325784887866">
                <text:p>-43.1325784887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2" chart:interval-minor-divisor="5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255e91" svg:stroke-linecap="round" draw:fill-color="#255e91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e480e" svg:stroke-linecap="round" draw:fill-color="#9e480e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26.67cm" svg:height="14.486cm" xlink:href=".." xlink:type="simple" chart:class="chart:scatter" chart:style-name="ch1">
        <chart:title svg:x="11.704cm" svg:y="0.425cm" chart:style-name="ch2">
          <text:p><text:span text:style-name="T1">Fas-spänningar</text:span></text:p>
        </chart:title>
        <chart:legend chart:legend-position="bottom" svg:x="8.999cm" svg:y="13.914cm" style:legend-expansion="wide" chart:style-name="ch3"/>
        <chart:plot-area chart:style-name="ch4" svg:x="1.593cm" svg:y="1.619cm" svg:width="24.544cm" svg:height="10.792cm">
          <chart:coordinate-region svg:x="2.676cm" svg:y="1.805cm" svg:width="23.258cm" svg:height="9.986cm"/>
          <chart:axis chart:dimension="x" chart:name="primary-x" chart:style-name="ch5">
            <chart:title svg:x="13.376cm" svg:y="12.701cm" chart:style-name="ch2">
              <text:p><text:span text:style-name="T2">Tid [s]</text:span></text:p>
            </chart:title>
            <chart:grid chart:style-name="ch6" chart:class="major"/>
          </chart:axis>
          <chart:axis chart:dimension="y" chart:name="primary-y" chart:style-name="ch7">
            <chart:title svg:x="0.451cm" svg:y="7.964cm" chart:style-name="ch8">
              <text:p><text:span text:style-name="T2">Spänning [V]</text:span></text:p>
            </chart:title>
            <chart:grid chart:style-name="ch6" chart:class="major"/>
          </chart:axis>
          <chart:series chart:style-name="ch9" chart:values-cell-range-address="Räkn.BC15:Räkn.BC115" chart:label-cell-address="Räkn.BC14:Räkn.BC14" chart:class="chart:scatter">
            <chart:domain table:cell-range-address="Räkn.BA15:Räkn.BA115"/>
            <chart:data-point chart:repeated="101"/>
          </chart:series>
          <chart:series chart:style-name="ch10" chart:values-cell-range-address="Räkn.BD15:Räkn.BD115" chart:label-cell-address="Räkn.BD14:Räkn.BD14" chart:class="chart:scatter">
            <chart:data-point chart:repeated="101"/>
          </chart:series>
          <chart:series chart:style-name="ch11" chart:values-cell-range-address="Räkn.BE15:Räkn.BE115" chart:label-cell-address="Räkn.BE14:Räkn.BE14" chart:class="chart:scatter">
            <chart:data-point chart:repeated="101"/>
          </chart:series>
          <chart:series chart:style-name="ch12" chart:values-cell-range-address="Räkn.BF15:Räkn.BF115" chart:label-cell-address="Räkn.BF14:Räkn.BF14" chart:class="chart:scatter">
            <chart:data-point chart:repeated="101"/>
          </chart:series>
          <chart:series chart:style-name="ch13" chart:values-cell-range-address="Räkn.BG15:Räkn.BG115" chart:label-cell-address="Räkn.BG14:Räkn.BG14" chart:class="chart:scatter">
            <chart:data-point chart:repeated="101"/>
          </chart:series>
          <chart:series chart:style-name="ch14" chart:values-cell-range-address="Räkn.BH15:Räkn.BH115" chart:label-cell-address="Räkn.BH14:Räkn.BH14" chart:class="chart:scatter">
            <chart:data-point chart:repeated="101"/>
          </chart:series>
          <chart:series chart:style-name="ch15" chart:values-cell-range-address="Räkn.BI15:Räkn.BI115" chart:label-cell-address="Räkn.BI14:Räkn.BI14" chart:class="chart:scatter">
            <chart:data-point chart:repeated="101"/>
          </chart:series>
          <chart:series chart:style-name="ch16" chart:values-cell-range-address="Räkn.BJ15:Räkn.BJ115" chart:label-cell-address="Räkn.BJ14:Räkn.BJ14" chart:class="chart:scatter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  <table:table-cell office:value-type="string">
                <text:p>Fas1</text:p>
                <draw:g>
                  <svg:desc>Räkn.BC14:Räkn.BC14</svg:desc>
                </draw:g>
              </table:table-cell>
              <table:table-cell office:value-type="string">
                <text:p>Fas2</text:p>
                <draw:g>
                  <svg:desc>Räkn.BD14:Räkn.BD14</svg:desc>
                </draw:g>
              </table:table-cell>
              <table:table-cell office:value-type="string">
                <text:p>Fas3</text:p>
                <draw:g>
                  <svg:desc>Räkn.BE14:Räkn.BE14</svg:desc>
                </draw:g>
              </table:table-cell>
              <table:table-cell office:value-type="string">
                <text:p>Fas4</text:p>
                <draw:g>
                  <svg:desc>Räkn.BF14:Räkn.BF14</svg:desc>
                </draw:g>
              </table:table-cell>
              <table:table-cell office:value-type="string">
                <text:p>Fas5</text:p>
                <draw:g>
                  <svg:desc>Räkn.BG14:Räkn.BG14</svg:desc>
                </draw:g>
              </table:table-cell>
              <table:table-cell office:value-type="string">
                <text:p>Fas6</text:p>
                <draw:g>
                  <svg:desc>Räkn.BH14:Räkn.BH14</svg:desc>
                </draw:g>
              </table:table-cell>
              <table:table-cell office:value-type="string">
                <text:p>Fas7</text:p>
                <draw:g>
                  <svg:desc>Räkn.BI14:Räkn.BI14</svg:desc>
                </draw:g>
              </table:table-cell>
              <table:table-cell office:value-type="string">
                <text:p>Fas8</text:p>
                <draw:g>
                  <svg:desc>Räkn.BJ14:Räkn.B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äkn.BA15:Räkn.BA115</svg:desc>
                </draw:g>
              </table:table-cell>
              <table:table-cell office:value-type="float" office:value="-41.4928986897632">
                <text:p>-41.4928986897632</text:p>
                <draw:g>
                  <svg:desc>Räkn.BC15:Räkn.BC115</svg:desc>
                </draw:g>
              </table:table-cell>
              <table:table-cell office:value-type="float" office:value="91.120865027906">
                <text:p>91.120865027906</text:p>
                <draw:g>
                  <svg:desc>Räkn.BD15:Räkn.BD115</svg:desc>
                </draw:g>
              </table:table-cell>
              <table:table-cell office:value-type="float" office:value="-59.6695333751859">
                <text:p>-59.6695333751859</text:p>
                <draw:g>
                  <svg:desc>Räkn.BE15:Räkn.BE115</svg:desc>
                </draw:g>
              </table:table-cell>
              <table:table-cell office:value-type="float" office:value="-6.84910080804758">
                <text:p>-6.84910080804758</text:p>
                <draw:g>
                  <svg:desc>Räkn.BF15:Räkn.BF115</svg:desc>
                </draw:g>
              </table:table-cell>
              <table:table-cell office:value-type="float" office:value="29.7256726327204">
                <text:p>29.7256726327204</text:p>
                <draw:g>
                  <svg:desc>Räkn.BG15:Räkn.BG115</svg:desc>
                </draw:g>
              </table:table-cell>
              <table:table-cell office:value-type="float" office:value="0">
                <text:p>0</text:p>
                <draw:g>
                  <svg:desc>Räkn.BH15:Räkn.BH115</svg:desc>
                </draw:g>
              </table:table-cell>
              <table:table-cell office:value-type="float" office:value="0">
                <text:p>0</text:p>
                <draw:g>
                  <svg:desc>Räkn.BI15:Räkn.BI115</svg:desc>
                </draw:g>
              </table:table-cell>
              <table:table-cell office:value-type="float" office:value="0">
                <text:p>0</text:p>
                <draw:g>
                  <svg:desc>Räkn.BJ15:Räkn.BJ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-30.7923083610625">
                <text:p>-30.7923083610625</text:p>
              </table:table-cell>
              <table:table-cell office:value-type="float" office:value="91.7894662063859">
                <text:p>91.7894662063859</text:p>
              </table:table-cell>
              <table:table-cell office:value-type="float" office:value="-68.2408650062598">
                <text:p>-68.2408650062598</text:p>
              </table:table-cell>
              <table:table-cell office:value-type="float" office:value="-8.56021928573393">
                <text:p>-8.56021928573393</text:p>
              </table:table-cell>
              <table:table-cell office:value-type="float" office:value="32.9604933494345">
                <text:p>32.9604933494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-18.4705433600629">
                <text:p>-18.4705433600629</text:p>
              </table:table-cell>
              <table:table-cell office:value-type="float" office:value="85.835176858078">
                <text:p>85.835176858078</text:p>
              </table:table-cell>
              <table:table-cell office:value-type="float" office:value="-75.7055302276573">
                <text:p>-75.7055302276573</text:p>
              </table:table-cell>
              <table:table-cell office:value-type="float" office:value="-9.67611219457773">
                <text:p>-9.67611219457773</text:p>
              </table:table-cell>
              <table:table-cell office:value-type="float" office:value="38.22153236139">
                <text:p>38.2215323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-13.0450476390534">
                <text:p>-13.0450476390534</text:p>
              </table:table-cell>
              <table:table-cell office:value-type="float" office:value="87.5335577483134">
                <text:p>87.5335577483134</text:p>
              </table:table-cell>
              <table:table-cell office:value-type="float" office:value="-83.6659134813822">
                <text:p>-83.6659134813822</text:p>
              </table:table-cell>
              <table:table-cell office:value-type="float" office:value="-11.933035662888">
                <text:p>-11.933035662888</text:p>
              </table:table-cell>
              <table:table-cell office:value-type="float" office:value="40.8120287010785">
                <text:p>40.8120287010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3.42218266619636">
                <text:p>3.42218266619636</text:p>
              </table:table-cell>
              <table:table-cell office:value-type="float" office:value="83.2864380975475">
                <text:p>83.2864380975475</text:p>
              </table:table-cell>
              <table:table-cell office:value-type="float" office:value="-98.575642761859">
                <text:p>-98.575642761859</text:p>
              </table:table-cell>
              <table:table-cell office:value-type="float" office:value="-12.3378539629429">
                <text:p>-12.3378539629429</text:p>
              </table:table-cell>
              <table:table-cell office:value-type="float" office:value="42.3601368163195">
                <text:p>42.360136816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0.5336068092235">
                <text:p>10.5336068092235</text:p>
              </table:table-cell>
              <table:table-cell office:value-type="float" office:value="76.1977561541503">
                <text:p>76.1977561541503</text:p>
              </table:table-cell>
              <table:table-cell office:value-type="float" office:value="-105.082906951975">
                <text:p>-105.082906951975</text:p>
              </table:table-cell>
              <table:table-cell office:value-type="float" office:value="-13.5098441029683">
                <text:p>-13.5098441029683</text:p>
              </table:table-cell>
              <table:table-cell office:value-type="float" office:value="43.3677126478192">
                <text:p>43.3677126478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26.9597575268949">
                <text:p>26.9597575268949</text:p>
              </table:table-cell>
              <table:table-cell office:value-type="float" office:value="70.1862748021926">
                <text:p>70.1862748021926</text:p>
              </table:table-cell>
              <table:table-cell office:value-type="float" office:value="-107.062679985569">
                <text:p>-107.062679985569</text:p>
              </table:table-cell>
              <table:table-cell office:value-type="float" office:value="-15.7139566040126">
                <text:p>-15.7139566040126</text:p>
              </table:table-cell>
              <table:table-cell office:value-type="float" office:value="46.3156276353557">
                <text:p>46.3156276353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37.0583260748221">
                <text:p>37.0583260748221</text:p>
              </table:table-cell>
              <table:table-cell office:value-type="float" office:value="63.0830898664415">
                <text:p>63.0830898664415</text:p>
              </table:table-cell>
              <table:table-cell office:value-type="float" office:value="-112.80013050683">
                <text:p>-112.80013050683</text:p>
              </table:table-cell>
              <table:table-cell office:value-type="float" office:value="-15.9933396022933">
                <text:p>-15.9933396022933</text:p>
              </table:table-cell>
              <table:table-cell office:value-type="float" office:value="45.6704962324656">
                <text:p>45.6704962324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46.7832218988005">
                <text:p>46.7832218988005</text:p>
              </table:table-cell>
              <table:table-cell office:value-type="float" office:value="56.6011975803255">
                <text:p>56.6011975803255</text:p>
              </table:table-cell>
              <table:table-cell office:value-type="float" office:value="-121.222669932166">
                <text:p>-121.222669932166</text:p>
              </table:table-cell>
              <table:table-cell office:value-type="float" office:value="-17.7465877354858">
                <text:p>-17.7465877354858</text:p>
              </table:table-cell>
              <table:table-cell office:value-type="float" office:value="46.8648776488597">
                <text:p>46.8648776488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56.0011144564276">
                <text:p>56.0011144564276</text:p>
              </table:table-cell>
              <table:table-cell office:value-type="float" office:value="44.6760569668398">
                <text:p>44.6760569668398</text:p>
              </table:table-cell>
              <table:table-cell office:value-type="float" office:value="-126.690715810922">
                <text:p>-126.690715810922</text:p>
              </table:table-cell>
              <table:table-cell office:value-type="float" office:value="-18.029702677031">
                <text:p>-18.029702677031</text:p>
              </table:table-cell>
              <table:table-cell office:value-type="float" office:value="48.2379714466889">
                <text:p>48.2379714466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69.9413057435124">
                <text:p>69.9413057435124</text:p>
              </table:table-cell>
              <table:table-cell office:value-type="float" office:value="36.8756688150521">
                <text:p>36.8756688150521</text:p>
              </table:table-cell>
              <table:table-cell office:value-type="float" office:value="-129.203961773981">
                <text:p>-129.203961773981</text:p>
              </table:table-cell>
              <table:table-cell office:value-type="float" office:value="-18.5457720889777">
                <text:p>-18.5457720889777</text:p>
              </table:table-cell>
              <table:table-cell office:value-type="float" office:value="47.9170447659188">
                <text:p>47.9170447659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78.8665085145154">
                <text:p>78.8665085145154</text:p>
              </table:table-cell>
              <table:table-cell office:value-type="float" office:value="25.3387429084674">
                <text:p>25.3387429084674</text:p>
              </table:table-cell>
              <table:table-cell office:value-type="float" office:value="-122.864142308402">
                <text:p>-122.864142308402</text:p>
              </table:table-cell>
              <table:table-cell office:value-type="float" office:value="-18.033539600553">
                <text:p>-18.033539600553</text:p>
              </table:table-cell>
              <table:table-cell office:value-type="float" office:value="47.0832942880144">
                <text:p>47.083294288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87.7531580988359">
                <text:p>87.7531580988359</text:p>
              </table:table-cell>
              <table:table-cell office:value-type="float" office:value="17.4460090896936">
                <text:p>17.4460090896936</text:p>
              </table:table-cell>
              <table:table-cell office:value-type="float" office:value="-128.916515435909">
                <text:p>-128.916515435909</text:p>
              </table:table-cell>
              <table:table-cell office:value-type="float" office:value="-17.2815348349861">
                <text:p>-17.2815348349861</text:p>
              </table:table-cell>
              <table:table-cell office:value-type="float" office:value="46.8494161163296">
                <text:p>46.8494161163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94.0888999791946">
                <text:p>94.0888999791946</text:p>
              </table:table-cell>
              <table:table-cell office:value-type="float" office:value="7.14125892494416">
                <text:p>7.14125892494416</text:p>
              </table:table-cell>
              <table:table-cell office:value-type="float" office:value="-126.214139674053">
                <text:p>-126.214139674053</text:p>
              </table:table-cell>
              <table:table-cell office:value-type="float" office:value="-15.913524358389">
                <text:p>-15.913524358389</text:p>
              </table:table-cell>
              <table:table-cell office:value-type="float" office:value="47.477011250495">
                <text:p>47.477011250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103.997786048075">
                <text:p>103.997786048075</text:p>
              </table:table-cell>
              <table:table-cell office:value-type="float" office:value="-0.914614733080094">
                <text:p>-0.914614733080094</text:p>
              </table:table-cell>
              <table:table-cell office:value-type="float" office:value="-119.440212700318">
                <text:p>-119.440212700318</text:p>
              </table:table-cell>
              <table:table-cell office:value-type="float" office:value="-15.4341116955627">
                <text:p>-15.4341116955627</text:p>
              </table:table-cell>
              <table:table-cell office:value-type="float" office:value="45.5664237064086">
                <text:p>45.5664237064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109.457391910942">
                <text:p>109.457391910942</text:p>
              </table:table-cell>
              <table:table-cell office:value-type="float" office:value="-12.8801308367368">
                <text:p>-12.8801308367368</text:p>
              </table:table-cell>
              <table:table-cell office:value-type="float" office:value="-117.656452872906">
                <text:p>-117.656452872906</text:p>
              </table:table-cell>
              <table:table-cell office:value-type="float" office:value="-13.6377916174042">
                <text:p>-13.6377916174042</text:p>
              </table:table-cell>
              <table:table-cell office:value-type="float" office:value="44.4159769390047">
                <text:p>44.4159769390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115.171731395967">
                <text:p>115.171731395967</text:p>
              </table:table-cell>
              <table:table-cell office:value-type="float" office:value="-25.0419163370395">
                <text:p>-25.0419163370395</text:p>
              </table:table-cell>
              <table:table-cell office:value-type="float" office:value="-111.436306474086">
                <text:p>-111.436306474086</text:p>
              </table:table-cell>
              <table:table-cell office:value-type="float" office:value="-12.7546573569278">
                <text:p>-12.7546573569278</text:p>
              </table:table-cell>
              <table:table-cell office:value-type="float" office:value="41.5833242012244">
                <text:p>41.583324201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115.986885100608">
                <text:p>115.986885100608</text:p>
              </table:table-cell>
              <table:table-cell office:value-type="float" office:value="-32.2425533673663">
                <text:p>-32.2425533673663</text:p>
              </table:table-cell>
              <table:table-cell office:value-type="float" office:value="-103.504281015645">
                <text:p>-103.504281015645</text:p>
              </table:table-cell>
              <table:table-cell office:value-type="float" office:value="-11.3997785816191">
                <text:p>-11.3997785816191</text:p>
              </table:table-cell>
              <table:table-cell office:value-type="float" office:value="39.4685480927862">
                <text:p>39.4685480927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23.616229447862">
                <text:p>123.616229447862</text:p>
              </table:table-cell>
              <table:table-cell office:value-type="float" office:value="-41.7687960337964">
                <text:p>-41.7687960337964</text:p>
              </table:table-cell>
              <table:table-cell office:value-type="float" office:value="-87.7987199870197">
                <text:p>-87.7987199870197</text:p>
              </table:table-cell>
              <table:table-cell office:value-type="float" office:value="-10.0979910197545">
                <text:p>-10.0979910197545</text:p>
              </table:table-cell>
              <table:table-cell office:value-type="float" office:value="37.3268053647903">
                <text:p>37.3268053647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24.808703212324">
                <text:p>124.808703212324</text:p>
              </table:table-cell>
              <table:table-cell office:value-type="float" office:value="-47.7349737030579">
                <text:p>-47.7349737030579</text:p>
              </table:table-cell>
              <table:table-cell office:value-type="float" office:value="-77.7690917730395">
                <text:p>-77.7690917730395</text:p>
              </table:table-cell>
              <table:table-cell office:value-type="float" office:value="-8.33398924842816">
                <text:p>-8.33398924842816</text:p>
              </table:table-cell>
              <table:table-cell office:value-type="float" office:value="31.5738098021212">
                <text:p>31.5738098021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120.376283942091">
                <text:p>120.376283942091</text:p>
              </table:table-cell>
              <table:table-cell office:value-type="float" office:value="-56.864306107771">
                <text:p>-56.864306107771</text:p>
              </table:table-cell>
              <table:table-cell office:value-type="float" office:value="-71.3051884006697">
                <text:p>-71.3051884006697</text:p>
              </table:table-cell>
              <table:table-cell office:value-type="float" office:value="-6.88857806060949">
                <text:p>-6.88857806060949</text:p>
              </table:table-cell>
              <table:table-cell office:value-type="float" office:value="28.0015587075403">
                <text:p>28.0015587075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20.413813460476">
                <text:p>120.413813460476</text:p>
              </table:table-cell>
              <table:table-cell office:value-type="float" office:value="-64.4783219293202">
                <text:p>-64.4783219293202</text:p>
              </table:table-cell>
              <table:table-cell office:value-type="float" office:value="-62.3347476130008">
                <text:p>-62.3347476130008</text:p>
              </table:table-cell>
              <table:table-cell office:value-type="float" office:value="-5.47922784537475">
                <text:p>-5.47922784537475</text:p>
              </table:table-cell>
              <table:table-cell office:value-type="float" office:value="23.1599473360498">
                <text:p>23.1599473360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19.453905878249">
                <text:p>119.453905878249</text:p>
              </table:table-cell>
              <table:table-cell office:value-type="float" office:value="-69.2030751803235">
                <text:p>-69.2030751803235</text:p>
              </table:table-cell>
              <table:table-cell office:value-type="float" office:value="-50.1479753264679">
                <text:p>-50.1479753264679</text:p>
              </table:table-cell>
              <table:table-cell office:value-type="float" office:value="-4.20502345273111">
                <text:p>-4.20502345273111</text:p>
              </table:table-cell>
              <table:table-cell office:value-type="float" office:value="20.4441839769598">
                <text:p>20.4441839769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117.814044936369">
                <text:p>117.814044936369</text:p>
              </table:table-cell>
              <table:table-cell office:value-type="float" office:value="-74.1272942322033">
                <text:p>-74.1272942322033</text:p>
              </table:table-cell>
              <table:table-cell office:value-type="float" office:value="-38.5686458406891">
                <text:p>-38.5686458406891</text:p>
              </table:table-cell>
              <table:table-cell office:value-type="float" office:value="-2.08021307837335">
                <text:p>-2.08021307837335</text:p>
              </table:table-cell>
              <table:table-cell office:value-type="float" office:value="13.5775131780133">
                <text:p>13.5775131780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107.761760389728">
                <text:p>107.761760389728</text:p>
              </table:table-cell>
              <table:table-cell office:value-type="float" office:value="-77.0311241801426">
                <text:p>-77.0311241801426</text:p>
              </table:table-cell>
              <table:table-cell office:value-type="float" office:value="-21.3310474978837">
                <text:p>-21.3310474978837</text:p>
              </table:table-cell>
              <table:table-cell office:value-type="float" office:value="-0.490549499355546">
                <text:p>-0.490549499355546</text:p>
              </table:table-cell>
              <table:table-cell office:value-type="float" office:value="9.95014274891474">
                <text:p>9.9501427489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04.826325778585">
                <text:p>104.826325778585</text:p>
              </table:table-cell>
              <table:table-cell office:value-type="float" office:value="-80.7505259362561">
                <text:p>-80.7505259362561</text:p>
              </table:table-cell>
              <table:table-cell office:value-type="float" office:value="-6.59419246006816">
                <text:p>-6.59419246006816</text:p>
              </table:table-cell>
              <table:table-cell office:value-type="float" office:value="0.110718424516972">
                <text:p>0.110718424516972</text:p>
              </table:table-cell>
              <table:table-cell office:value-type="float" office:value="2.55888530614476">
                <text:p>2.55888530614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98.6840591598926">
                <text:p>98.6840591598926</text:p>
              </table:table-cell>
              <table:table-cell office:value-type="float" office:value="-80.6041633874343">
                <text:p>-80.6041633874343</text:p>
              </table:table-cell>
              <table:table-cell office:value-type="float" office:value="0.572290062208847">
                <text:p>0.572290062208847</text:p>
              </table:table-cell>
              <table:table-cell office:value-type="float" office:value="1.01719984671227">
                <text:p>1.01719984671227</text:p>
              </table:table-cell>
              <table:table-cell office:value-type="float" office:value="-1.81615681953775">
                <text:p>-1.81615681953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89.6065175385571">
                <text:p>89.6065175385571</text:p>
              </table:table-cell>
              <table:table-cell office:value-type="float" office:value="-86.6880680054275">
                <text:p>-86.6880680054275</text:p>
              </table:table-cell>
              <table:table-cell office:value-type="float" office:value="14.0813728349952">
                <text:p>14.0813728349952</text:p>
              </table:table-cell>
              <table:table-cell office:value-type="float" office:value="2.65257623220727">
                <text:p>2.65257623220727</text:p>
              </table:table-cell>
              <table:table-cell office:value-type="float" office:value="-7.09399808907968">
                <text:p>-7.0939980890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79.4833693955055">
                <text:p>79.4833693955055</text:p>
              </table:table-cell>
              <table:table-cell office:value-type="float" office:value="-86.1238071402754">
                <text:p>-86.1238071402754</text:p>
              </table:table-cell>
              <table:table-cell office:value-type="float" office:value="24.4610321001719">
                <text:p>24.4610321001719</text:p>
              </table:table-cell>
              <table:table-cell office:value-type="float" office:value="3.62200540929153">
                <text:p>3.62200540929153</text:p>
              </table:table-cell>
              <table:table-cell office:value-type="float" office:value="-13.7494651644681">
                <text:p>-13.7494651644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70.5054000563254">
                <text:p>70.5054000563254</text:p>
              </table:table-cell>
              <table:table-cell office:value-type="float" office:value="-84.7429741001387">
                <text:p>-84.7429741001387</text:p>
              </table:table-cell>
              <table:table-cell office:value-type="float" office:value="40.748578072482">
                <text:p>40.748578072482</text:p>
              </table:table-cell>
              <table:table-cell office:value-type="float" office:value="5.25728907640678">
                <text:p>5.25728907640678</text:p>
              </table:table-cell>
              <table:table-cell office:value-type="float" office:value="-18.4249312891233">
                <text:p>-18.424931289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64.217184424556">
                <text:p>64.217184424556</text:p>
              </table:table-cell>
              <table:table-cell office:value-type="float" office:value="-85.9783631401577">
                <text:p>-85.9783631401577</text:p>
              </table:table-cell>
              <table:table-cell office:value-type="float" office:value="51.7359623331647">
                <text:p>51.7359623331647</text:p>
              </table:table-cell>
              <table:table-cell office:value-type="float" office:value="6.27780772748024">
                <text:p>6.27780772748024</text:p>
              </table:table-cell>
              <table:table-cell office:value-type="float" office:value="-22.1924403601246">
                <text:p>-22.192440360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55.4536933738756">
                <text:p>55.4536933738756</text:p>
              </table:table-cell>
              <table:table-cell office:value-type="float" office:value="-87.8882142492885">
                <text:p>-87.8882142492885</text:p>
              </table:table-cell>
              <table:table-cell office:value-type="float" office:value="60.8170618378073">
                <text:p>60.8170618378073</text:p>
              </table:table-cell>
              <table:table-cell office:value-type="float" office:value="7.5294441408473">
                <text:p>7.5294441408473</text:p>
              </table:table-cell>
              <table:table-cell office:value-type="float" office:value="-26.9695767553391">
                <text:p>-26.9695767553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46.1926117983998">
                <text:p>46.1926117983998</text:p>
              </table:table-cell>
              <table:table-cell office:value-type="float" office:value="-83.5944994157884">
                <text:p>-83.5944994157884</text:p>
              </table:table-cell>
              <table:table-cell office:value-type="float" office:value="72.4789498369999">
                <text:p>72.4789498369999</text:p>
              </table:table-cell>
              <table:table-cell office:value-type="float" office:value="9.79994224938386">
                <text:p>9.79994224938386</text:p>
              </table:table-cell>
              <table:table-cell office:value-type="float" office:value="-31.6214432484305">
                <text:p>-31.6214432484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34.1862561901962">
                <text:p>34.1862561901962</text:p>
              </table:table-cell>
              <table:table-cell office:value-type="float" office:value="-82.5102209438114">
                <text:p>-82.5102209438114</text:p>
              </table:table-cell>
              <table:table-cell office:value-type="float" office:value="79.7664403615221">
                <text:p>79.7664403615221</text:p>
              </table:table-cell>
              <table:table-cell office:value-type="float" office:value="11.3869133461545">
                <text:p>11.3869133461545</text:p>
              </table:table-cell>
              <table:table-cell office:value-type="float" office:value="-35.3381453271657">
                <text:p>-35.338145327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22.5615792537996">
                <text:p>22.5615792537996</text:p>
              </table:table-cell>
              <table:table-cell office:value-type="float" office:value="-78.5854377083574">
                <text:p>-78.5854377083574</text:p>
              </table:table-cell>
              <table:table-cell office:value-type="float" office:value="93.8484557941285">
                <text:p>93.8484557941285</text:p>
              </table:table-cell>
              <table:table-cell office:value-type="float" office:value="12.0835882529794">
                <text:p>12.0835882529794</text:p>
              </table:table-cell>
              <table:table-cell office:value-type="float" office:value="-37.2697951637917">
                <text:p>-37.2697951637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9.74386697245553">
                <text:p>9.74386697245553</text:p>
              </table:table-cell>
              <table:table-cell office:value-type="float" office:value="-76.3588711775844">
                <text:p>-76.3588711775844</text:p>
              </table:table-cell>
              <table:table-cell office:value-type="float" office:value="98.575049382006">
                <text:p>98.575049382006</text:p>
              </table:table-cell>
              <table:table-cell office:value-type="float" office:value="12.9752668533343">
                <text:p>12.9752668533343</text:p>
              </table:table-cell>
              <table:table-cell office:value-type="float" office:value="-39.4277576552847">
                <text:p>-39.4277576552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-6.11059861832954">
                <text:p>-6.11059861832954</text:p>
              </table:table-cell>
              <table:table-cell office:value-type="float" office:value="-70.0166603036871">
                <text:p>-70.0166603036871</text:p>
              </table:table-cell>
              <table:table-cell office:value-type="float" office:value="105.735467302678">
                <text:p>105.735467302678</text:p>
              </table:table-cell>
              <table:table-cell office:value-type="float" office:value="15.4719578053948">
                <text:p>15.4719578053948</text:p>
              </table:table-cell>
              <table:table-cell office:value-type="float" office:value="-41.6500173127648">
                <text:p>-41.650017312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-14.415203406265">
                <text:p>-14.415203406265</text:p>
              </table:table-cell>
              <table:table-cell office:value-type="float" office:value="-65.8342468039199">
                <text:p>-65.8342468039199</text:p>
              </table:table-cell>
              <table:table-cell office:value-type="float" office:value="116.754263316394">
                <text:p>116.754263316394</text:p>
              </table:table-cell>
              <table:table-cell office:value-type="float" office:value="15.6620263510802">
                <text:p>15.6620263510802</text:p>
              </table:table-cell>
              <table:table-cell office:value-type="float" office:value="-42.6492703303957">
                <text:p>-42.649270330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-29.5231397739022">
                <text:p>-29.5231397739022</text:p>
              </table:table-cell>
              <table:table-cell office:value-type="float" office:value="-56.7547632336259">
                <text:p>-56.7547632336259</text:p>
              </table:table-cell>
              <table:table-cell office:value-type="float" office:value="122.7221983803">
                <text:p>122.7221983803</text:p>
              </table:table-cell>
              <table:table-cell office:value-type="float" office:value="17.0677483759393">
                <text:p>17.0677483759393</text:p>
              </table:table-cell>
              <table:table-cell office:value-type="float" office:value="-44.3265632282088">
                <text:p>-44.3265632282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-36.3347891208782">
                <text:p>-36.3347891208782</text:p>
              </table:table-cell>
              <table:table-cell office:value-type="float" office:value="-51.6700352202279">
                <text:p>-51.6700352202279</text:p>
              </table:table-cell>
              <table:table-cell office:value-type="float" office:value="130.038554832708">
                <text:p>130.038554832708</text:p>
              </table:table-cell>
              <table:table-cell office:value-type="float" office:value="18.6858723167101">
                <text:p>18.6858723167101</text:p>
              </table:table-cell>
              <table:table-cell office:value-type="float" office:value="-44.6895312789872">
                <text:p>-44.689531278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-49.3037850355046">
                <text:p>-49.3037850355046</text:p>
              </table:table-cell>
              <table:table-cell office:value-type="float" office:value="-43.2192612232081">
                <text:p>-43.2192612232081</text:p>
              </table:table-cell>
              <table:table-cell office:value-type="float" office:value="128.379813246152">
                <text:p>128.379813246152</text:p>
              </table:table-cell>
              <table:table-cell office:value-type="float" office:value="19.4087295586872">
                <text:p>19.4087295586872</text:p>
              </table:table-cell>
              <table:table-cell office:value-type="float" office:value="-44.2989254796937">
                <text:p>-44.2989254796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-55.4885140603798">
                <text:p>-55.4885140603798</text:p>
              </table:table-cell>
              <table:table-cell office:value-type="float" office:value="-34.5298260113916">
                <text:p>-34.5298260113916</text:p>
              </table:table-cell>
              <table:table-cell office:value-type="float" office:value="134.769538773867">
                <text:p>134.769538773867</text:p>
              </table:table-cell>
              <table:table-cell office:value-type="float" office:value="18.9394051008791">
                <text:p>18.9394051008791</text:p>
              </table:table-cell>
              <table:table-cell office:value-type="float" office:value="-44.838406860361">
                <text:p>-44.838406860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-70.2522230781151">
                <text:p>-70.2522230781151</text:p>
              </table:table-cell>
              <table:table-cell office:value-type="float" office:value="-24.0801832262599">
                <text:p>-24.0801832262599</text:p>
              </table:table-cell>
              <table:table-cell office:value-type="float" office:value="131.214851951301">
                <text:p>131.214851951301</text:p>
              </table:table-cell>
              <table:table-cell office:value-type="float" office:value="19.7890275600234">
                <text:p>19.7890275600234</text:p>
              </table:table-cell>
              <table:table-cell office:value-type="float" office:value="-44.9311512567445">
                <text:p>-44.9311512567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-77.6832820211965">
                <text:p>-77.6832820211965</text:p>
              </table:table-cell>
              <table:table-cell office:value-type="float" office:value="-12.3361888493939">
                <text:p>-12.3361888493939</text:p>
              </table:table-cell>
              <table:table-cell office:value-type="float" office:value="134.857485065541">
                <text:p>134.857485065541</text:p>
              </table:table-cell>
              <table:table-cell office:value-type="float" office:value="18.3473417083006">
                <text:p>18.3473417083006</text:p>
              </table:table-cell>
              <table:table-cell office:value-type="float" office:value="-44.6370804230468">
                <text:p>-44.6370804230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-87.7663229959387">
                <text:p>-87.7663229959387</text:p>
              </table:table-cell>
              <table:table-cell office:value-type="float" office:value="-2.9761403451324">
                <text:p>-2.9761403451324</text:p>
              </table:table-cell>
              <table:table-cell office:value-type="float" office:value="135.152656888697">
                <text:p>135.152656888697</text:p>
              </table:table-cell>
              <table:table-cell office:value-type="float" office:value="17.254141783408">
                <text:p>17.254141783408</text:p>
              </table:table-cell>
              <table:table-cell office:value-type="float" office:value="-45.1677317988915">
                <text:p>-45.167731798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-90.6329896303337">
                <text:p>-90.6329896303337</text:p>
              </table:table-cell>
              <table:table-cell office:value-type="float" office:value="6.97745213856195">
                <text:p>6.97745213856195</text:p>
              </table:table-cell>
              <table:table-cell office:value-type="float" office:value="124.634587325008">
                <text:p>124.634587325008</text:p>
              </table:table-cell>
              <table:table-cell office:value-type="float" office:value="16.8136875076292">
                <text:p>16.8136875076292</text:p>
              </table:table-cell>
              <table:table-cell office:value-type="float" office:value="-44.0510770927829">
                <text:p>-44.0510770927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-101.460472446474">
                <text:p>-101.460472446474</text:p>
              </table:table-cell>
              <table:table-cell office:value-type="float" office:value="18.8460961576913">
                <text:p>18.8460961576913</text:p>
              </table:table-cell>
              <table:table-cell office:value-type="float" office:value="127.002967052547">
                <text:p>127.002967052547</text:p>
              </table:table-cell>
              <table:table-cell office:value-type="float" office:value="15.0715521268179">
                <text:p>15.0715521268179</text:p>
              </table:table-cell>
              <table:table-cell office:value-type="float" office:value="-42.8074855078691">
                <text:p>-42.8074855078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-108.873534990591">
                <text:p>-108.873534990591</text:p>
              </table:table-cell>
              <table:table-cell office:value-type="float" office:value="26.8138520953739">
                <text:p>26.8138520953739</text:p>
              </table:table-cell>
              <table:table-cell office:value-type="float" office:value="121.124422572619">
                <text:p>121.124422572619</text:p>
              </table:table-cell>
              <table:table-cell office:value-type="float" office:value="14.4724233885424">
                <text:p>14.4724233885424</text:p>
              </table:table-cell>
              <table:table-cell office:value-type="float" office:value="-39.4363289355569">
                <text:p>-39.4363289355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-112.493781620895">
                <text:p>-112.493781620895</text:p>
              </table:table-cell>
              <table:table-cell office:value-type="float" office:value="35.3899990906995">
                <text:p>35.3899990906995</text:p>
              </table:table-cell>
              <table:table-cell office:value-type="float" office:value="107.647893267513">
                <text:p>107.647893267513</text:p>
              </table:table-cell>
              <table:table-cell office:value-type="float" office:value="13.1534340802963">
                <text:p>13.1534340802963</text:p>
              </table:table-cell>
              <table:table-cell office:value-type="float" office:value="-36.9999332487918">
                <text:p>-36.9999332487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-114.712111374333">
                <text:p>-114.712111374333</text:p>
              </table:table-cell>
              <table:table-cell office:value-type="float" office:value="45.1811148420711">
                <text:p>45.1811148420711</text:p>
              </table:table-cell>
              <table:table-cell office:value-type="float" office:value="103.559264460012">
                <text:p>103.559264460012</text:p>
              </table:table-cell>
              <table:table-cell office:value-type="float" office:value="11.9172264041023">
                <text:p>11.9172264041023</text:p>
              </table:table-cell>
              <table:table-cell office:value-type="float" office:value="-33.9732043646347">
                <text:p>-33.9732043646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113.224181555811">
                <text:p>-113.224181555811</text:p>
              </table:table-cell>
              <table:table-cell office:value-type="float" office:value="53.7031459663884">
                <text:p>53.7031459663884</text:p>
              </table:table-cell>
              <table:table-cell office:value-type="float" office:value="87.9546946830382">
                <text:p>87.9546946830382</text:p>
              </table:table-cell>
              <table:table-cell office:value-type="float" office:value="10.3548709080713">
                <text:p>10.3548709080713</text:p>
              </table:table-cell>
              <table:table-cell office:value-type="float" office:value="-31.6203716748618">
                <text:p>-31.6203716748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113.451280936086">
                <text:p>-113.451280936086</text:p>
              </table:table-cell>
              <table:table-cell office:value-type="float" office:value="60.534923373427">
                <text:p>60.534923373427</text:p>
              </table:table-cell>
              <table:table-cell office:value-type="float" office:value="83.8129671300721">
                <text:p>83.8129671300721</text:p>
              </table:table-cell>
              <table:table-cell office:value-type="float" office:value="8.62498974354245">
                <text:p>8.62498974354245</text:p>
              </table:table-cell>
              <table:table-cell office:value-type="float" office:value="-28.1797977777671">
                <text:p>-28.1797977777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-112.788507145977">
                <text:p>-112.788507145977</text:p>
              </table:table-cell>
              <table:table-cell office:value-type="float" office:value="66.8497775324572">
                <text:p>66.8497775324572</text:p>
              </table:table-cell>
              <table:table-cell office:value-type="float" office:value="66.4679855538504">
                <text:p>66.4679855538504</text:p>
              </table:table-cell>
              <table:table-cell office:value-type="float" office:value="6.33127461448454">
                <text:p>6.33127461448454</text:p>
              </table:table-cell>
              <table:table-cell office:value-type="float" office:value="-23.6094146406465">
                <text:p>-23.6094146406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112.398976995711">
                <text:p>-112.398976995711</text:p>
              </table:table-cell>
              <table:table-cell office:value-type="float" office:value="70.9037234264017">
                <text:p>70.9037234264017</text:p>
              </table:table-cell>
              <table:table-cell office:value-type="float" office:value="61.5134981310219">
                <text:p>61.5134981310219</text:p>
              </table:table-cell>
              <table:table-cell office:value-type="float" office:value="4.83781308297291">
                <text:p>4.83781308297291</text:p>
              </table:table-cell>
              <table:table-cell office:value-type="float" office:value="-17.3143507386538">
                <text:p>-17.3143507386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-110.732404084818">
                <text:p>-110.732404084818</text:p>
              </table:table-cell>
              <table:table-cell office:value-type="float" office:value="75.702098565543">
                <text:p>75.702098565543</text:p>
              </table:table-cell>
              <table:table-cell office:value-type="float" office:value="47.1080936295275">
                <text:p>47.1080936295275</text:p>
              </table:table-cell>
              <table:table-cell office:value-type="float" office:value="4.46377659513356">
                <text:p>4.46377659513356</text:p>
              </table:table-cell>
              <table:table-cell office:value-type="float" office:value="-12.6212959829912">
                <text:p>-12.62129598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102.785734959324">
                <text:p>-102.785734959324</text:p>
              </table:table-cell>
              <table:table-cell office:value-type="float" office:value="83.268944576177">
                <text:p>83.268944576177</text:p>
              </table:table-cell>
              <table:table-cell office:value-type="float" office:value="34.0486501354722">
                <text:p>34.0486501354722</text:p>
              </table:table-cell>
              <table:table-cell office:value-type="float" office:value="2.51843715207375">
                <text:p>2.51843715207375</text:p>
              </table:table-cell>
              <table:table-cell office:value-type="float" office:value="-8.87269185466925">
                <text:p>-8.87269185466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102.079792395497">
                <text:p>-102.079792395497</text:p>
              </table:table-cell>
              <table:table-cell office:value-type="float" office:value="82.3612553897623">
                <text:p>82.3612553897623</text:p>
              </table:table-cell>
              <table:table-cell office:value-type="float" office:value="21.5916257782396">
                <text:p>21.5916257782396</text:p>
              </table:table-cell>
              <table:table-cell office:value-type="float" office:value="1.71412783277957">
                <text:p>1.71412783277957</text:p>
              </table:table-cell>
              <table:table-cell office:value-type="float" office:value="-3.46684722684379">
                <text:p>-3.46684722684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94.6637323400215">
                <text:p>-94.6637323400215</text:p>
              </table:table-cell>
              <table:table-cell office:value-type="float" office:value="85.714750320517">
                <text:p>85.714750320517</text:p>
              </table:table-cell>
              <table:table-cell office:value-type="float" office:value="4.69737338135929">
                <text:p>4.69737338135929</text:p>
              </table:table-cell>
              <table:table-cell office:value-type="float" office:value="0.505321159331238">
                <text:p>0.505321159331238</text:p>
              </table:table-cell>
              <table:table-cell office:value-type="float" office:value="2.79682417424334">
                <text:p>2.79682417424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87.8316072797266">
                <text:p>-87.8316072797266</text:p>
              </table:table-cell>
              <table:table-cell office:value-type="float" office:value="88.9880199149756">
                <text:p>88.9880199149756</text:p>
              </table:table-cell>
              <table:table-cell office:value-type="float" office:value="-7.20284465394785">
                <text:p>-7.20284465394785</text:p>
              </table:table-cell>
              <table:table-cell office:value-type="float" office:value="-0.675708203340292">
                <text:p>-0.675708203340292</text:p>
              </table:table-cell>
              <table:table-cell office:value-type="float" office:value="7.58656964502237">
                <text:p>7.58656964502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77.6706070273911">
                <text:p>-77.6706070273911</text:p>
              </table:table-cell>
              <table:table-cell office:value-type="float" office:value="88.6949108984775">
                <text:p>88.6949108984775</text:p>
              </table:table-cell>
              <table:table-cell office:value-type="float" office:value="-14.1373543822896">
                <text:p>-14.1373543822896</text:p>
              </table:table-cell>
              <table:table-cell office:value-type="float" office:value="-1.55155488664432">
                <text:p>-1.55155488664432</text:p>
              </table:table-cell>
              <table:table-cell office:value-type="float" office:value="14.849415561087">
                <text:p>14.84941556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69.3850965273442">
                <text:p>-69.3850965273442</text:p>
              </table:table-cell>
              <table:table-cell office:value-type="float" office:value="93.743625204127">
                <text:p>93.743625204127</text:p>
              </table:table-cell>
              <table:table-cell office:value-type="float" office:value="-32.6940573937036">
                <text:p>-32.6940573937036</text:p>
              </table:table-cell>
              <table:table-cell office:value-type="float" office:value="-3.16556389625375">
                <text:p>-3.16556389625375</text:p>
              </table:table-cell>
              <table:table-cell office:value-type="float" office:value="18.169498568373">
                <text:p>18.169498568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-60.7134378976512">
                <text:p>-60.7134378976512</text:p>
              </table:table-cell>
              <table:table-cell office:value-type="float" office:value="90.9990496190089">
                <text:p>90.9990496190089</text:p>
              </table:table-cell>
              <table:table-cell office:value-type="float" office:value="-43.0379212158014">
                <text:p>-43.0379212158014</text:p>
              </table:table-cell>
              <table:table-cell office:value-type="float" office:value="-4.43210333203275">
                <text:p>-4.43210333203275</text:p>
              </table:table-cell>
              <table:table-cell office:value-type="float" office:value="23.8999265629201">
                <text:p>23.8999265629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-48.0960308868199">
                <text:p>-48.0960308868199</text:p>
              </table:table-cell>
              <table:table-cell office:value-type="float" office:value="92.6962164833797">
                <text:p>92.6962164833797</text:p>
              </table:table-cell>
              <table:table-cell office:value-type="float" office:value="-54.0609440695597">
                <text:p>-54.0609440695597</text:p>
              </table:table-cell>
              <table:table-cell office:value-type="float" office:value="-5.73637094853292">
                <text:p>-5.73637094853292</text:p>
              </table:table-cell>
              <table:table-cell office:value-type="float" office:value="28.0394944147481">
                <text:p>28.0394944147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-36.0220026985476">
                <text:p>-36.0220026985476</text:p>
              </table:table-cell>
              <table:table-cell office:value-type="float" office:value="93.2319767307368">
                <text:p>93.2319767307368</text:p>
              </table:table-cell>
              <table:table-cell office:value-type="float" office:value="-62.5810995819062">
                <text:p>-62.5810995819062</text:p>
              </table:table-cell>
              <table:table-cell office:value-type="float" office:value="-8.19012935394395">
                <text:p>-8.19012935394395</text:p>
              </table:table-cell>
              <table:table-cell office:value-type="float" office:value="31.0189633628847">
                <text:p>31.0189633628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-27.6786783637341">
                <text:p>-27.6786783637341</text:p>
              </table:table-cell>
              <table:table-cell office:value-type="float" office:value="87.8379740725433">
                <text:p>87.8379740725433</text:p>
              </table:table-cell>
              <table:table-cell office:value-type="float" office:value="-76.6715409575906">
                <text:p>-76.6715409575906</text:p>
              </table:table-cell>
              <table:table-cell office:value-type="float" office:value="-9.66426371893181">
                <text:p>-9.66426371893181</text:p>
              </table:table-cell>
              <table:table-cell office:value-type="float" office:value="35.4938009370738">
                <text:p>35.4938009370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-19.0817455259236">
                <text:p>-19.0817455259236</text:p>
              </table:table-cell>
              <table:table-cell office:value-type="float" office:value="89.2401857579426">
                <text:p>89.2401857579426</text:p>
              </table:table-cell>
              <table:table-cell office:value-type="float" office:value="-80.9466173951275">
                <text:p>-80.9466173951275</text:p>
              </table:table-cell>
              <table:table-cell office:value-type="float" office:value="-11.1671797871164">
                <text:p>-11.1671797871164</text:p>
              </table:table-cell>
              <table:table-cell office:value-type="float" office:value="38.8305048514396">
                <text:p>38.83050485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-3.37171958834697">
                <text:p>-3.37171958834697</text:p>
              </table:table-cell>
              <table:table-cell office:value-type="float" office:value="85.274401377591">
                <text:p>85.274401377591</text:p>
              </table:table-cell>
              <table:table-cell office:value-type="float" office:value="-88.1083737736587">
                <text:p>-88.1083737736587</text:p>
              </table:table-cell>
              <table:table-cell office:value-type="float" office:value="-11.835949231298">
                <text:p>-11.835949231298</text:p>
              </table:table-cell>
              <table:table-cell office:value-type="float" office:value="42.6227973093048">
                <text:p>42.6227973093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5.98050535051582">
                <text:p>5.98050535051582</text:p>
              </table:table-cell>
              <table:table-cell office:value-type="float" office:value="79.9937552317354">
                <text:p>79.9937552317354</text:p>
              </table:table-cell>
              <table:table-cell office:value-type="float" office:value="-99.3917306838969">
                <text:p>-99.3917306838969</text:p>
              </table:table-cell>
              <table:table-cell office:value-type="float" office:value="-12.8971612936503">
                <text:p>-12.8971612936503</text:p>
              </table:table-cell>
              <table:table-cell office:value-type="float" office:value="44.5477588630556">
                <text:p>44.5477588630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16.8349411880689">
                <text:p>16.8349411880689</text:p>
              </table:table-cell>
              <table:table-cell office:value-type="float" office:value="74.5853018756045">
                <text:p>74.5853018756045</text:p>
              </table:table-cell>
              <table:table-cell office:value-type="float" office:value="-105.138216326228">
                <text:p>-105.138216326228</text:p>
              </table:table-cell>
              <table:table-cell office:value-type="float" office:value="-15.0160111288469">
                <text:p>-15.0160111288469</text:p>
              </table:table-cell>
              <table:table-cell office:value-type="float" office:value="45.7844706531182">
                <text:p>45.784470653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30.2157899110843">
                <text:p>30.2157899110843</text:p>
              </table:table-cell>
              <table:table-cell office:value-type="float" office:value="66.2805008952633">
                <text:p>66.2805008952633</text:p>
              </table:table-cell>
              <table:table-cell office:value-type="float" office:value="-111.395893878354">
                <text:p>-111.395893878354</text:p>
              </table:table-cell>
              <table:table-cell office:value-type="float" office:value="-16.1332370156808">
                <text:p>-16.1332370156808</text:p>
              </table:table-cell>
              <table:table-cell office:value-type="float" office:value="46.3565592390973">
                <text:p>46.3565592390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40.8055622806832">
                <text:p>40.8055622806832</text:p>
              </table:table-cell>
              <table:table-cell office:value-type="float" office:value="57.4339218660054">
                <text:p>57.4339218660054</text:p>
              </table:table-cell>
              <table:table-cell office:value-type="float" office:value="-115.941581748965">
                <text:p>-115.941581748965</text:p>
              </table:table-cell>
              <table:table-cell office:value-type="float" office:value="-17.4432885684893">
                <text:p>-17.4432885684893</text:p>
              </table:table-cell>
              <table:table-cell office:value-type="float" office:value="47.52669174474">
                <text:p>47.52669174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52.9903320732553">
                <text:p>52.9903320732553</text:p>
              </table:table-cell>
              <table:table-cell office:value-type="float" office:value="49.2409239777394">
                <text:p>49.2409239777394</text:p>
              </table:table-cell>
              <table:table-cell office:value-type="float" office:value="-118.84976152044">
                <text:p>-118.84976152044</text:p>
              </table:table-cell>
              <table:table-cell office:value-type="float" office:value="-17.6231591223842">
                <text:p>-17.6231591223842</text:p>
              </table:table-cell>
              <table:table-cell office:value-type="float" office:value="46.6142553999647">
                <text:p>46.6142553999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61.2236949925067">
                <text:p>61.2236949925067</text:p>
              </table:table-cell>
              <table:table-cell office:value-type="float" office:value="39.9368821753823">
                <text:p>39.9368821753823</text:p>
              </table:table-cell>
              <table:table-cell office:value-type="float" office:value="-124.358354516768">
                <text:p>-124.358354516768</text:p>
              </table:table-cell>
              <table:table-cell office:value-type="float" office:value="-18.2614178940157">
                <text:p>-18.2614178940157</text:p>
              </table:table-cell>
              <table:table-cell office:value-type="float" office:value="46.9980187166492">
                <text:p>46.9980187166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71.1608426148829">
                <text:p>71.1608426148829</text:p>
              </table:table-cell>
              <table:table-cell office:value-type="float" office:value="32.0428622785477">
                <text:p>32.0428622785477</text:p>
              </table:table-cell>
              <table:table-cell office:value-type="float" office:value="-124.965178201954">
                <text:p>-124.965178201954</text:p>
              </table:table-cell>
              <table:table-cell office:value-type="float" office:value="-17.9014341519902">
                <text:p>-17.9014341519902</text:p>
              </table:table-cell>
              <table:table-cell office:value-type="float" office:value="47.6032907660445">
                <text:p>47.6032907660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85.1248996269233">
                <text:p>85.1248996269233</text:p>
              </table:table-cell>
              <table:table-cell office:value-type="float" office:value="20.5712062461724">
                <text:p>20.5712062461724</text:p>
              </table:table-cell>
              <table:table-cell office:value-type="float" office:value="-127.589324694261">
                <text:p>-127.589324694261</text:p>
              </table:table-cell>
              <table:table-cell office:value-type="float" office:value="-17.9413394178359">
                <text:p>-17.9413394178359</text:p>
              </table:table-cell>
              <table:table-cell office:value-type="float" office:value="46.9354508790846">
                <text:p>46.9354508790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94.187348013452">
                <text:p>94.187348013452</text:p>
              </table:table-cell>
              <table:table-cell office:value-type="float" office:value="13.0442160847488">
                <text:p>13.0442160847488</text:p>
              </table:table-cell>
              <table:table-cell office:value-type="float" office:value="-125.371646856382">
                <text:p>-125.371646856382</text:p>
              </table:table-cell>
              <table:table-cell office:value-type="float" office:value="-16.7480572311979">
                <text:p>-16.7480572311979</text:p>
              </table:table-cell>
              <table:table-cell office:value-type="float" office:value="47.6745331034011">
                <text:p>47.6745331034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95.6757111246447">
                <text:p>95.6757111246447</text:p>
              </table:table-cell>
              <table:table-cell office:value-type="float" office:value="1.32294985023987">
                <text:p>1.32294985023987</text:p>
              </table:table-cell>
              <table:table-cell office:value-type="float" office:value="-124.056514863383">
                <text:p>-124.056514863383</text:p>
              </table:table-cell>
              <table:table-cell office:value-type="float" office:value="-16.1733469400543">
                <text:p>-16.1733469400543</text:p>
              </table:table-cell>
              <table:table-cell office:value-type="float" office:value="46.8899076144893">
                <text:p>46.8899076144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102.795308325526">
                <text:p>102.795308325526</text:p>
              </table:table-cell>
              <table:table-cell office:value-type="float" office:value="-7.46044386112409">
                <text:p>-7.46044386112409</text:p>
              </table:table-cell>
              <table:table-cell office:value-type="float" office:value="-118.675246823465">
                <text:p>-118.675246823465</text:p>
              </table:table-cell>
              <table:table-cell office:value-type="float" office:value="-13.9706311299727">
                <text:p>-13.9706311299727</text:p>
              </table:table-cell>
              <table:table-cell office:value-type="float" office:value="45.2205325658359">
                <text:p>45.2205325658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114.413733521165">
                <text:p>114.413733521165</text:p>
              </table:table-cell>
              <table:table-cell office:value-type="float" office:value="-17.6095982553537">
                <text:p>-17.6095982553537</text:p>
              </table:table-cell>
              <table:table-cell office:value-type="float" office:value="-110.591271424558">
                <text:p>-110.591271424558</text:p>
              </table:table-cell>
              <table:table-cell office:value-type="float" office:value="-12.3896620738951">
                <text:p>-12.3896620738951</text:p>
              </table:table-cell>
              <table:table-cell office:value-type="float" office:value="42.0151367756361">
                <text:p>42.0151367756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118.405169382495">
                <text:p>118.405169382495</text:p>
              </table:table-cell>
              <table:table-cell office:value-type="float" office:value="-31.1866471657948">
                <text:p>-31.1866471657948</text:p>
              </table:table-cell>
              <table:table-cell office:value-type="float" office:value="-101.089767446385">
                <text:p>-101.089767446385</text:p>
              </table:table-cell>
              <table:table-cell office:value-type="float" office:value="-11.5830948416436">
                <text:p>-11.5830948416436</text:p>
              </table:table-cell>
              <table:table-cell office:value-type="float" office:value="41.3517008130784">
                <text:p>41.351700813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119.476216800694">
                <text:p>119.476216800694</text:p>
              </table:table-cell>
              <table:table-cell office:value-type="float" office:value="-39.1440532220886">
                <text:p>-39.1440532220886</text:p>
              </table:table-cell>
              <table:table-cell office:value-type="float" office:value="-95.0973174148766">
                <text:p>-95.0973174148766</text:p>
              </table:table-cell>
              <table:table-cell office:value-type="float" office:value="-10.4934404172189">
                <text:p>-10.4934404172189</text:p>
              </table:table-cell>
              <table:table-cell office:value-type="float" office:value="38.6498109934395">
                <text:p>38.6498109934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122.187012775881">
                <text:p>122.187012775881</text:p>
              </table:table-cell>
              <table:table-cell office:value-type="float" office:value="-47.4977738413125">
                <text:p>-47.4977738413125</text:p>
              </table:table-cell>
              <table:table-cell office:value-type="float" office:value="-89.7838686331938">
                <text:p>-89.7838686331938</text:p>
              </table:table-cell>
              <table:table-cell office:value-type="float" office:value="-8.63613437992832">
                <text:p>-8.63613437992832</text:p>
              </table:table-cell>
              <table:table-cell office:value-type="float" office:value="33.4531464348148">
                <text:p>33.4531464348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122.483361698903">
                <text:p>122.483361698903</text:p>
              </table:table-cell>
              <table:table-cell office:value-type="float" office:value="-55.3328067206175">
                <text:p>-55.3328067206175</text:p>
              </table:table-cell>
              <table:table-cell office:value-type="float" office:value="-78.8062174631298">
                <text:p>-78.8062174631298</text:p>
              </table:table-cell>
              <table:table-cell office:value-type="float" office:value="-8.03747868866094">
                <text:p>-8.03747868866094</text:p>
              </table:table-cell>
              <table:table-cell office:value-type="float" office:value="30.1618111122025">
                <text:p>30.161811112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123.877864950746">
                <text:p>123.877864950746</text:p>
              </table:table-cell>
              <table:table-cell office:value-type="float" office:value="-59.7064439195988">
                <text:p>-59.7064439195988</text:p>
              </table:table-cell>
              <table:table-cell office:value-type="float" office:value="-68.588029060098">
                <text:p>-68.588029060098</text:p>
              </table:table-cell>
              <table:table-cell office:value-type="float" office:value="-5.36935705569926">
                <text:p>-5.36935705569926</text:p>
              </table:table-cell>
              <table:table-cell office:value-type="float" office:value="27.21045296841">
                <text:p>27.21045296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118.197142662084">
                <text:p>118.197142662084</text:p>
              </table:table-cell>
              <table:table-cell office:value-type="float" office:value="-65.5095434462689">
                <text:p>-65.5095434462689</text:p>
              </table:table-cell>
              <table:table-cell office:value-type="float" office:value="-49.9250493949136">
                <text:p>-49.9250493949136</text:p>
              </table:table-cell>
              <table:table-cell office:value-type="float" office:value="-3.99001770409296">
                <text:p>-3.99001770409296</text:p>
              </table:table-cell>
              <table:table-cell office:value-type="float" office:value="21.5189043521461">
                <text:p>21.5189043521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120.578562317655">
                <text:p>120.578562317655</text:p>
              </table:table-cell>
              <table:table-cell office:value-type="float" office:value="-69.2304165447424">
                <text:p>-69.2304165447424</text:p>
              </table:table-cell>
              <table:table-cell office:value-type="float" office:value="-45.1642261174591">
                <text:p>-45.1642261174591</text:p>
              </table:table-cell>
              <table:table-cell office:value-type="float" office:value="-2.46251127230654">
                <text:p>-2.46251127230654</text:p>
              </table:table-cell>
              <table:table-cell office:value-type="float" office:value="16.2045891783746">
                <text:p>16.204589178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110.657283757916">
                <text:p>110.657283757916</text:p>
              </table:table-cell>
              <table:table-cell office:value-type="float" office:value="-77.1304973703174">
                <text:p>-77.1304973703174</text:p>
              </table:table-cell>
              <table:table-cell office:value-type="float" office:value="-27.5899149789945">
                <text:p>-27.5899149789945</text:p>
              </table:table-cell>
              <table:table-cell office:value-type="float" office:value="-1.59848835107194">
                <text:p>-1.59848835107194</text:p>
              </table:table-cell>
              <table:table-cell office:value-type="float" office:value="12.6838453125971">
                <text:p>12.6838453125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107.73564915307">
                <text:p>107.73564915307</text:p>
              </table:table-cell>
              <table:table-cell office:value-type="float" office:value="-79.7463479840103">
                <text:p>-79.7463479840103</text:p>
              </table:table-cell>
              <table:table-cell office:value-type="float" office:value="-14.4489490238802">
                <text:p>-14.4489490238802</text:p>
              </table:table-cell>
              <table:table-cell office:value-type="float" office:value="-0.00546829801327586">
                <text:p>-0.00546829801327586</text:p>
              </table:table-cell>
              <table:table-cell office:value-type="float" office:value="5.51330817783717">
                <text:p>5.51330817783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102.42033386077">
                <text:p>102.42033386077</text:p>
              </table:table-cell>
              <table:table-cell office:value-type="float" office:value="-81.7235557701447">
                <text:p>-81.7235557701447</text:p>
              </table:table-cell>
              <table:table-cell office:value-type="float" office:value="-6.85519934118127">
                <text:p>-6.85519934118127</text:p>
              </table:table-cell>
              <table:table-cell office:value-type="float" office:value="0.525525813870127">
                <text:p>0.525525813870127</text:p>
              </table:table-cell>
              <table:table-cell office:value-type="float" office:value="1.20717286594097">
                <text:p>1.20717286594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92.9936923023288">
                <text:p>92.9936923023288</text:p>
              </table:table-cell>
              <table:table-cell office:value-type="float" office:value="-85.0992863065022">
                <text:p>-85.0992863065022</text:p>
              </table:table-cell>
              <table:table-cell office:value-type="float" office:value="7.58286477193737">
                <text:p>7.58286477193737</text:p>
              </table:table-cell>
              <table:table-cell office:value-type="float" office:value="1.76286443545432">
                <text:p>1.76286443545432</text:p>
              </table:table-cell>
              <table:table-cell office:value-type="float" office:value="-4.17222836809738">
                <text:p>-4.17222836809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88.6405500231536">
                <text:p>88.6405500231536</text:p>
              </table:table-cell>
              <table:table-cell office:value-type="float" office:value="-86.7399100636136">
                <text:p>-86.7399100636136</text:p>
              </table:table-cell>
              <table:table-cell office:value-type="float" office:value="19.4756608835417">
                <text:p>19.4756608835417</text:p>
              </table:table-cell>
              <table:table-cell office:value-type="float" office:value="3.14880037022084">
                <text:p>3.14880037022084</text:p>
              </table:table-cell>
              <table:table-cell office:value-type="float" office:value="-9.83978621805939">
                <text:p>-9.83978621805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82.0237356529283">
                <text:p>82.0237356529283</text:p>
              </table:table-cell>
              <table:table-cell office:value-type="float" office:value="-84.3775392236773">
                <text:p>-84.3775392236773</text:p>
              </table:table-cell>
              <table:table-cell office:value-type="float" office:value="35.599199023363">
                <text:p>35.599199023363</text:p>
              </table:table-cell>
              <table:table-cell office:value-type="float" office:value="4.62238403572728">
                <text:p>4.62238403572728</text:p>
              </table:table-cell>
              <table:table-cell office:value-type="float" office:value="-15.1192376508925">
                <text:p>-15.1192376508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70.3480605539178">
                <text:p>70.3480605539178</text:p>
              </table:table-cell>
              <table:table-cell office:value-type="float" office:value="-86.9459818017634">
                <text:p>-86.9459818017634</text:p>
              </table:table-cell>
              <table:table-cell office:value-type="float" office:value="43.9222434673855">
                <text:p>43.9222434673855</text:p>
              </table:table-cell>
              <table:table-cell office:value-type="float" office:value="5.66912029326869">
                <text:p>5.66912029326869</text:p>
              </table:table-cell>
              <table:table-cell office:value-type="float" office:value="-19.4136249515171">
                <text:p>-19.4136249515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58.7781763207485">
                <text:p>58.7781763207485</text:p>
              </table:table-cell>
              <table:table-cell office:value-type="float" office:value="-86.5747732992659">
                <text:p>-86.5747732992659</text:p>
              </table:table-cell>
              <table:table-cell office:value-type="float" office:value="59.8980180546352">
                <text:p>59.8980180546352</text:p>
              </table:table-cell>
              <table:table-cell office:value-type="float" office:value="6.68608178984006">
                <text:p>6.68608178984006</text:p>
              </table:table-cell>
              <table:table-cell office:value-type="float" office:value="-25.8078169249236">
                <text:p>-25.8078169249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48.5914271521637">
                <text:p>48.5914271521637</text:p>
              </table:table-cell>
              <table:table-cell office:value-type="float" office:value="-86.1231075823452">
                <text:p>-86.1231075823452</text:p>
              </table:table-cell>
              <table:table-cell office:value-type="float" office:value="65.2828207345398">
                <text:p>65.2828207345398</text:p>
              </table:table-cell>
              <table:table-cell office:value-type="float" office:value="8.39509881154043">
                <text:p>8.39509881154043</text:p>
              </table:table-cell>
              <table:table-cell office:value-type="float" office:value="-29.0560034475016">
                <text:p>-29.0560034475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37.0837941941285">
                <text:p>37.0837941941285</text:p>
              </table:table-cell>
              <table:table-cell office:value-type="float" office:value="-84.7522613328602">
                <text:p>-84.7522613328602</text:p>
              </table:table-cell>
              <table:table-cell office:value-type="float" office:value="74.5861800376043">
                <text:p>74.5861800376043</text:p>
              </table:table-cell>
              <table:table-cell office:value-type="float" office:value="10.0076892708881">
                <text:p>10.0076892708881</text:p>
              </table:table-cell>
              <table:table-cell office:value-type="float" office:value="-32.0706635743243">
                <text:p>-32.0706635743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24.3831277479881">
                <text:p>24.3831277479881</text:p>
              </table:table-cell>
              <table:table-cell office:value-type="float" office:value="-84.1914810284648">
                <text:p>-84.1914810284648</text:p>
              </table:table-cell>
              <table:table-cell office:value-type="float" office:value="85.8898933978468">
                <text:p>85.8898933978468</text:p>
              </table:table-cell>
              <table:table-cell office:value-type="float" office:value="12.3563361897396">
                <text:p>12.3563361897396</text:p>
              </table:table-cell>
              <table:table-cell office:value-type="float" office:value="-35.9274064018597">
                <text:p>-35.9274064018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11.5372285288965">
                <text:p>11.5372285288965</text:p>
              </table:table-cell>
              <table:table-cell office:value-type="float" office:value="-78.3640968927132">
                <text:p>-78.3640968927132</text:p>
              </table:table-cell>
              <table:table-cell office:value-type="float" office:value="94.0155833012544">
                <text:p>94.0155833012544</text:p>
              </table:table-cell>
              <table:table-cell office:value-type="float" office:value="12.5815187166243">
                <text:p>12.5815187166243</text:p>
              </table:table-cell>
              <table:table-cell office:value-type="float" office:value="-39.2034272773479">
                <text:p>-39.2034272773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1.01876077063262">
                <text:p>1.01876077063262</text:p>
              </table:table-cell>
              <table:table-cell office:value-type="float" office:value="-72.0132772680967">
                <text:p>-72.0132772680967</text:p>
              </table:table-cell>
              <table:table-cell office:value-type="float" office:value="106.96462917615">
                <text:p>106.96462917615</text:p>
              </table:table-cell>
              <table:table-cell office:value-type="float" office:value="13.819767495982">
                <text:p>13.819767495982</text:p>
              </table:table-cell>
              <table:table-cell office:value-type="float" office:value="-41.8116942064032">
                <text:p>-41.811694206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8.35680715461501">
                <text:p>-8.35680715461501</text:p>
              </table:table-cell>
              <table:table-cell office:value-type="float" office:value="-68.7460781021501">
                <text:p>-68.7460781021501</text:p>
              </table:table-cell>
              <table:table-cell office:value-type="float" office:value="114.695476313922">
                <text:p>114.695476313922</text:p>
              </table:table-cell>
              <table:table-cell office:value-type="float" office:value="15.274719562116">
                <text:p>15.274719562116</text:p>
              </table:table-cell>
              <table:table-cell office:value-type="float" office:value="-42.1464930060347">
                <text:p>-42.1464930060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20.921032530734">
                <text:p>-20.921032530734</text:p>
              </table:table-cell>
              <table:table-cell office:value-type="float" office:value="-61.8002096494738">
                <text:p>-61.8002096494738</text:p>
              </table:table-cell>
              <table:table-cell office:value-type="float" office:value="121.36916654957">
                <text:p>121.36916654957</text:p>
              </table:table-cell>
              <table:table-cell office:value-type="float" office:value="16.290899687339">
                <text:p>16.290899687339</text:p>
              </table:table-cell>
              <table:table-cell office:value-type="float" office:value="-43.1325784887866">
                <text:p>-43.1325784887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</office:automatic-styles>
  <office:body>
    <office:chart>
      <chart:chart svg:width="33.284cm" svg:height="12.568cm" xlink:href=".." xlink:type="simple" chart:class="chart:scatter" chart:style-name="ch1">
        <chart:title svg:x="14.923cm" svg:y="0.387cm" chart:style-name="ch2">
          <text:p><text:span text:style-name="T1">Voltage phase 1</text:span></text:p>
        </chart:title>
        <chart:plot-area chart:style-name="ch3" svg:x="0.665cm" svg:y="1.543cm" svg:width="31.954cm" svg:height="10.774cm">
          <chart:coordinate-region svg:x="1.426cm" svg:y="1.729cm" svg:width="30.95cm" svg:height="10.40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lot.M4:plot.M104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380254379239401">
                <text:p>-0.0000380254379239401</text:p>
                <draw:g>
                  <svg:desc>plot.M4:plot.M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04093819560507">
                <text:p>0.0050409381956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133105174852">
                <text:p>0.010613310517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3939233958018">
                <text:p>0.0153939233958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25387924959">
                <text:p>0.021925387924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89274906924">
                <text:p>0.02738927490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2460912160329">
                <text:p>0.0322460912160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5634414586432">
                <text:p>0.0365634414586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5333188698217">
                <text:p>0.0395333188698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2166355103502">
                <text:p>0.0422166355103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8438174663155">
                <text:p>0.0448438174663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176066813203">
                <text:p>0.0454176066813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3161891425316">
                <text:p>0.0463161891425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3269009815144">
                <text:p>0.0463269009815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4460559589545">
                <text:p>0.0464460559589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319058548141">
                <text:p>0.045319058548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62747079305835">
                <text:p>0.0462747079305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0156289953225">
                <text:p>0.0460156289953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4774794521838">
                <text:p>0.0454774794521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51583156421517">
                <text:p>0.0451583156421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7295526142992">
                <text:p>0.0447295526142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8501026313932">
                <text:p>0.0438501026313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5029959332276">
                <text:p>0.0435029959332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745058249726">
                <text:p>0.040745058249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71397734138802">
                <text:p>0.03713977341388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9320421825621">
                <text:p>0.0339320421825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0722511591336">
                <text:p>0.0290722511591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3389486201736">
                <text:p>0.023389486201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6181507080945">
                <text:p>0.0176181507080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2878288381809">
                <text:p>0.0112878288381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8342411467477">
                <text:p>0.00558342411467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9583524589016">
                <text:p>0.00109583524589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20074595933565">
                <text:p>-0.00320074595933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807028387571765">
                <text:p>-0.0080702838757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2691136489274">
                <text:p>-0.0142691136489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0164899520722">
                <text:p>-0.020164899520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64411397025166">
                <text:p>-0.0264411397025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06607518997808">
                <text:p>-0.0306607518997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501535570261">
                <text:p>-0.03501535570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88029408779956">
                <text:p>-0.0388029408779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20364049804905">
                <text:p>-0.0420364049804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38081119628429">
                <text:p>-0.0438081119628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53178708752328">
                <text:p>-0.0453178708752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456457394772114">
                <text:p>-0.0456457394772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61708910981616">
                <text:p>-0.0461708910981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6262695207217">
                <text:p>-0.046262695207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57504968613997">
                <text:p>-0.0457504968613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61235358921647">
                <text:p>-0.0461235358921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53984420070286">
                <text:p>-0.0453984420070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60173313736629">
                <text:p>-0.0460173313736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57807833432101">
                <text:p>-0.0457807833432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53301280527041">
                <text:p>-0.04533012805270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50500618444213">
                <text:p>-0.0450500618444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35133771767898">
                <text:p>-0.0435133771767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07417607836957">
                <text:p>-0.04074176078369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78054661638987">
                <text:p>-0.0378054661638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51910630181451">
                <text:p>-0.0351910630181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95432594680165">
                <text:p>-0.0295432594680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5030140137272">
                <text:p>-0.0245030140137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94886845111786">
                <text:p>-0.0194886845111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25393860594146">
                <text:p>-0.0125393860594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716487065611932">
                <text:p>-0.00716487065611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265192072436116">
                <text:p>-0.00265192072436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84115650900799">
                <text:p>0.002841156509007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88272192360169">
                <text:p>0.00688272192360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5581787556438">
                <text:p>0.0135581787556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0647460525">
                <text:p>0.0190647460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52938283623114">
                <text:p>0.0252938283623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97659837357475">
                <text:p>0.0297659837357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47832789153614">
                <text:p>0.0347832789153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2643831711018">
                <text:p>0.0382643831711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15020134753109">
                <text:p>0.0415020134753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37718383867229">
                <text:p>0.04377183838672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3537402145723">
                <text:p>0.0453537402145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58010614480126">
                <text:p>0.0458010614480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5247893571539">
                <text:p>0.0455247893571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53604675781894">
                <text:p>0.0453604675781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65152822149208">
                <text:p>0.0465152822149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55511399422128">
                <text:p>0.0455511399422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60252077577409">
                <text:p>0.0460252077577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65665733414944">
                <text:p>0.04656657334149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9456845719869">
                <text:p>0.04594568457198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53453153600766">
                <text:p>0.04534531536007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43701278938645">
                <text:p>0.0443701278938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39935191194428">
                <text:p>0.0439935191194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3967205656796">
                <text:p>0.0413967205656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7474829825725">
                <text:p>0.0387474829825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58852066120743">
                <text:p>0.035885206612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15997966436894">
                <text:p>0.03159979664368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61080039604337">
                <text:p>0.02610800396043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8533649642852">
                <text:p>0.0198533649642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8728113060008">
                <text:p>0.0148728113060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26649671499672">
                <text:p>0.00926649671499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02086030369871">
                <text:p>0.00402086030369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115983335854035">
                <text:p>-0.00115983335854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645620964898358">
                <text:p>-0.00645620964898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12828252823916">
                <text:p>-0.01128282528239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78972380602439">
                <text:p>-0.01789723806024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27216905776891">
                <text:p>-0.02272169057768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285189856838013">
                <text:p>-0.0285189856838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29575942629493">
                <text:p>-0.0329575942629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</office:automatic-styles>
  <office:body>
    <office:chart>
      <chart:chart svg:width="28.382cm" svg:height="13.837cm" xlink:href=".." xlink:type="simple" chart:class="chart:scatter" chart:style-name="ch1">
        <chart:title svg:x="12.711cm" svg:y="0.412cm" chart:style-name="ch2">
          <text:p><text:span text:style-name="T1">Voltages U(t) </text:span></text:p>
        </chart:title>
        <chart:legend chart:legend-position="bottom" svg:x="11.493cm" svg:y="13.265cm" style:legend-expansion="wide" chart:style-name="ch3"/>
        <chart:plot-area chart:style-name="ch4" svg:x="0.567cm" svg:y="1.593cm" svg:width="27.248cm" svg:height="11.212cm">
          <chart:coordinate-region svg:x="1.328cm" svg:y="1.779cm" svg:width="26.284cm" svg:height="10.8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lot.M4:plot.M104" chart:class="chart:scatter">
            <chart:domain table:cell-range-address="plot.L4:plot.L104"/>
            <chart:data-point chart:repeated="101"/>
          </chart:series>
          <chart:series chart:style-name="ch9" chart:values-cell-range-address="plot.N4:plot.N104" chart:class="chart:scatter">
            <chart:data-point chart:repeated="101"/>
          </chart:series>
          <chart:series chart:style-name="ch10" chart:values-cell-range-address="plot.O4:plot.O104" chart:class="chart:scatter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L4:plot.L104</svg:desc>
                </draw:g>
              </table:table-cell>
              <table:table-cell office:value-type="float" office:value="-0.0000380254379239401">
                <text:p>-0.0000380254379239401</text:p>
                <draw:g>
                  <svg:desc>plot.M4:plot.M104</svg:desc>
                </draw:g>
              </table:table-cell>
              <table:table-cell office:value-type="float" office:value="0.00037568787479057">
                <text:p>0.00037568787479057</text:p>
                <draw:g>
                  <svg:desc>plot.N4:plot.N104</svg:desc>
                </draw:g>
              </table:table-cell>
              <table:table-cell office:value-type="float" office:value="0.000142615772316234">
                <text:p>0.000142615772316234</text:p>
                <draw:g>
                  <svg:desc>plot.O4:plot.O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504093819560507">
                <text:p>0.00504093819560507</text:p>
              </table:table-cell>
              <table:table-cell office:value-type="float" office:value="0.00463132291573342">
                <text:p>0.00463132291573342</text:p>
              </table:table-cell>
              <table:table-cell office:value-type="float" office:value="0.0047795188197216">
                <text:p>0.0047795188197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0106133105174852">
                <text:p>0.0106133105174852</text:p>
              </table:table-cell>
              <table:table-cell office:value-type="float" office:value="0.0104549687618592">
                <text:p>0.0104549687618592</text:p>
              </table:table-cell>
              <table:table-cell office:value-type="float" office:value="0.0111896881908147">
                <text:p>0.0111896881908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.0153939233958018">
                <text:p>0.0153939233958018</text:p>
              </table:table-cell>
              <table:table-cell office:value-type="float" office:value="0.0173530390936699">
                <text:p>0.0173530390936699</text:p>
              </table:table-cell>
              <table:table-cell office:value-type="float" office:value="0.0190594584245905">
                <text:p>0.0190594584245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21925387924959">
                <text:p>0.021925387924959</text:p>
              </table:table-cell>
              <table:table-cell office:value-type="float" office:value="0.0237244817746512">
                <text:p>0.0237244817746512</text:p>
              </table:table-cell>
              <table:table-cell office:value-type="float" office:value="0.0250649525069638">
                <text:p>0.0250649525069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27389274906924">
                <text:p>0.027389274906924</text:p>
              </table:table-cell>
              <table:table-cell office:value-type="float" office:value="0.0296573611551378">
                <text:p>0.0296573611551378</text:p>
              </table:table-cell>
              <table:table-cell office:value-type="float" office:value="0.031672498222735">
                <text:p>0.03167249822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0322460912160329">
                <text:p>0.0322460912160329</text:p>
              </table:table-cell>
              <table:table-cell office:value-type="float" office:value="0.035615334536766">
                <text:p>0.035615334536766</text:p>
              </table:table-cell>
              <table:table-cell office:value-type="float" office:value="0.0378402500972025">
                <text:p>0.0378402500972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.0365634414586432">
                <text:p>0.0365634414586432</text:p>
              </table:table-cell>
              <table:table-cell office:value-type="float" office:value="0.0391260946600873">
                <text:p>0.0391260946600873</text:p>
              </table:table-cell>
              <table:table-cell office:value-type="float" office:value="0.0435792344555437">
                <text:p>0.0435792344555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0.0395333188698217">
                <text:p>0.0395333188698217</text:p>
              </table:table-cell>
              <table:table-cell office:value-type="float" office:value="0.0436465349730024">
                <text:p>0.0436465349730024</text:p>
              </table:table-cell>
              <table:table-cell office:value-type="float" office:value="0.0471968828086257">
                <text:p>0.0471968828086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0.0422166355103502">
                <text:p>0.0422166355103502</text:p>
              </table:table-cell>
              <table:table-cell office:value-type="float" office:value="0.0459531542661552">
                <text:p>0.0459531542661552</text:p>
              </table:table-cell>
              <table:table-cell office:value-type="float" office:value="0.0502620591088151">
                <text:p>0.0502620591088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0448438174663155">
                <text:p>0.0448438174663155</text:p>
              </table:table-cell>
              <table:table-cell office:value-type="float" office:value="0.0478175701781895">
                <text:p>0.0478175701781895</text:p>
              </table:table-cell>
              <table:table-cell office:value-type="float" office:value="0.0517872638464042">
                <text:p>0.0517872638464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0.0454176066813203">
                <text:p>0.0454176066813203</text:p>
              </table:table-cell>
              <table:table-cell office:value-type="float" office:value="0.0495564354567963">
                <text:p>0.0495564354567963</text:p>
              </table:table-cell>
              <table:table-cell office:value-type="float" office:value="0.0526673290999512">
                <text:p>0.0526673290999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0.0463161891425316">
                <text:p>0.0463161891425316</text:p>
              </table:table-cell>
              <table:table-cell office:value-type="float" office:value="0.0498354034828023">
                <text:p>0.0498354034828023</text:p>
              </table:table-cell>
              <table:table-cell office:value-type="float" office:value="0.0534178323218154">
                <text:p>0.0534178323218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.0463269009815144">
                <text:p>0.0463269009815144</text:p>
              </table:table-cell>
              <table:table-cell office:value-type="float" office:value="0.0494804321653588">
                <text:p>0.0494804321653588</text:p>
              </table:table-cell>
              <table:table-cell office:value-type="float" office:value="0.0544736227949844">
                <text:p>0.054473622794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0.0464460559589545">
                <text:p>0.0464460559589545</text:p>
              </table:table-cell>
              <table:table-cell office:value-type="float" office:value="0.0498921803149919">
                <text:p>0.0498921803149919</text:p>
              </table:table-cell>
              <table:table-cell office:value-type="float" office:value="0.0544615185616689">
                <text:p>0.0544615185616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0.045319058548141">
                <text:p>0.045319058548141</text:p>
              </table:table-cell>
              <table:table-cell office:value-type="float" office:value="0.0494641505452269">
                <text:p>0.0494641505452269</text:p>
              </table:table-cell>
              <table:table-cell office:value-type="float" office:value="0.0542515021730251">
                <text:p>0.0542515021730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0.0462747079305835">
                <text:p>0.0462747079305835</text:p>
              </table:table-cell>
              <table:table-cell office:value-type="float" office:value="0.0498142647340979">
                <text:p>0.0498142647340979</text:p>
              </table:table-cell>
              <table:table-cell office:value-type="float" office:value="0.0542105624721112">
                <text:p>0.0542105624721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0.0460156289953225">
                <text:p>0.0460156289953225</text:p>
              </table:table-cell>
              <table:table-cell office:value-type="float" office:value="0.0501645948292524">
                <text:p>0.0501645948292524</text:p>
              </table:table-cell>
              <table:table-cell office:value-type="float" office:value="0.0541297192995013">
                <text:p>0.0541297192995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0.0454774794521838">
                <text:p>0.0454774794521838</text:p>
              </table:table-cell>
              <table:table-cell office:value-type="float" office:value="0.050494939922125">
                <text:p>0.050494939922125</text:p>
              </table:table-cell>
              <table:table-cell office:value-type="float" office:value="0.0541346958367958">
                <text:p>0.0541346958367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0.0451583156421517">
                <text:p>0.0451583156421517</text:p>
              </table:table-cell>
              <table:table-cell office:value-type="float" office:value="0.0493572791736757">
                <text:p>0.0493572791736757</text:p>
              </table:table-cell>
              <table:table-cell office:value-type="float" office:value="0.0540930474525676">
                <text:p>0.0540930474525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447295526142992">
                <text:p>0.0447295526142992</text:p>
              </table:table-cell>
              <table:table-cell office:value-type="float" office:value="0.0489595445146038">
                <text:p>0.0489595445146038</text:p>
              </table:table-cell>
              <table:table-cell office:value-type="float" office:value="0.0532547033239436">
                <text:p>0.0532547033239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0.0438501026313932">
                <text:p>0.0438501026313932</text:p>
              </table:table-cell>
              <table:table-cell office:value-type="float" office:value="0.0486145023383835">
                <text:p>0.0486145023383835</text:p>
              </table:table-cell>
              <table:table-cell office:value-type="float" office:value="0.0521023921408713">
                <text:p>0.0521023921408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0.0435029959332276">
                <text:p>0.0435029959332276</text:p>
              </table:table-cell>
              <table:table-cell office:value-type="float" office:value="0.0463763088631311">
                <text:p>0.0463763088631311</text:p>
              </table:table-cell>
              <table:table-cell office:value-type="float" office:value="0.0510865618662602">
                <text:p>0.0510865618662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0.040745058249726">
                <text:p>0.040745058249726</text:p>
              </table:table-cell>
              <table:table-cell office:value-type="float" office:value="0.0442198968200951">
                <text:p>0.0442198968200951</text:p>
              </table:table-cell>
              <table:table-cell office:value-type="float" office:value="0.0474913359028232">
                <text:p>0.0474913359028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0.0371397734138802">
                <text:p>0.0371397734138802</text:p>
              </table:table-cell>
              <table:table-cell office:value-type="float" office:value="0.0406368585680752">
                <text:p>0.0406368585680752</text:p>
              </table:table-cell>
              <table:table-cell office:value-type="float" office:value="0.0444753699202055">
                <text:p>0.0444753699202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0.0339320421825621">
                <text:p>0.0339320421825621</text:p>
              </table:table-cell>
              <table:table-cell office:value-type="float" office:value="0.0357165460688675">
                <text:p>0.0357165460688675</text:p>
              </table:table-cell>
              <table:table-cell office:value-type="float" office:value="0.0389991651832365">
                <text:p>0.0389991651832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0.0290722511591336">
                <text:p>0.0290722511591336</text:p>
              </table:table-cell>
              <table:table-cell office:value-type="float" office:value="0.0305929769549279">
                <text:p>0.0305929769549279</text:p>
              </table:table-cell>
              <table:table-cell office:value-type="float" office:value="0.033015514433586">
                <text:p>0.033015514433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0.023389486201736">
                <text:p>0.023389486201736</text:p>
              </table:table-cell>
              <table:table-cell office:value-type="float" office:value="0.0256590118021491">
                <text:p>0.0256590118021491</text:p>
              </table:table-cell>
              <table:table-cell office:value-type="float" office:value="0.0267907180888873">
                <text:p>0.0267907180888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0.0176181507080945">
                <text:p>0.0176181507080945</text:p>
              </table:table-cell>
              <table:table-cell office:value-type="float" office:value="0.0186149478421924">
                <text:p>0.0186149478421924</text:p>
              </table:table-cell>
              <table:table-cell office:value-type="float" office:value="0.0202762465261356">
                <text:p>0.0202762465261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0.0112878288381809">
                <text:p>0.0112878288381809</text:p>
              </table:table-cell>
              <table:table-cell office:value-type="float" office:value="0.013141280234735">
                <text:p>0.013141280234735</text:p>
              </table:table-cell>
              <table:table-cell office:value-type="float" office:value="0.0128611217543455">
                <text:p>0.0128611217543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00558342411467477">
                <text:p>0.00558342411467477</text:p>
              </table:table-cell>
              <table:table-cell office:value-type="float" office:value="0.00631904429841319">
                <text:p>0.00631904429841319</text:p>
              </table:table-cell>
              <table:table-cell office:value-type="float" office:value="0.00664179621382329">
                <text:p>0.00664179621382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0.00109583524589016">
                <text:p>0.00109583524589016</text:p>
              </table:table-cell>
              <table:table-cell office:value-type="float" office:value="0.00117671749035374">
                <text:p>0.00117671749035374</text:p>
              </table:table-cell>
              <table:table-cell office:value-type="float" office:value="0.00178623306596272">
                <text:p>0.00178623306596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-0.00320074595933565">
                <text:p>-0.00320074595933565</text:p>
              </table:table-cell>
              <table:table-cell office:value-type="float" office:value="-0.00341554184804495">
                <text:p>-0.00341554184804495</text:p>
              </table:table-cell>
              <table:table-cell office:value-type="float" office:value="-0.003444092226424">
                <text:p>-0.003444092226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-0.00807028387571765">
                <text:p>-0.00807028387571765</text:p>
              </table:table-cell>
              <table:table-cell office:value-type="float" office:value="-0.00968639396976632">
                <text:p>-0.00968639396976632</text:p>
              </table:table-cell>
              <table:table-cell office:value-type="float" office:value="-0.00990167530522683">
                <text:p>-0.00990167530522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-0.0142691136489274">
                <text:p>-0.0142691136489274</text:p>
              </table:table-cell>
              <table:table-cell office:value-type="float" office:value="-0.0160499671630783">
                <text:p>-0.0160499671630783</text:p>
              </table:table-cell>
              <table:table-cell office:value-type="float" office:value="-0.0170759225905672">
                <text:p>-0.0170759225905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-0.020164899520722">
                <text:p>-0.020164899520722</text:p>
              </table:table-cell>
              <table:table-cell office:value-type="float" office:value="-0.0217567183159626">
                <text:p>-0.0217567183159626</text:p>
              </table:table-cell>
              <table:table-cell office:value-type="float" office:value="-0.024487513607656">
                <text:p>-0.024487513607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-0.0264411397025166">
                <text:p>-0.0264411397025166</text:p>
              </table:table-cell>
              <table:table-cell office:value-type="float" office:value="-0.0288324751451079">
                <text:p>-0.0288324751451079</text:p>
              </table:table-cell>
              <table:table-cell office:value-type="float" office:value="-0.0308256743242121">
                <text:p>-0.0308256743242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-0.0306607518997808">
                <text:p>-0.0306607518997808</text:p>
              </table:table-cell>
              <table:table-cell office:value-type="float" office:value="-0.0342048173694378">
                <text:p>-0.0342048173694378</text:p>
              </table:table-cell>
              <table:table-cell office:value-type="float" office:value="-0.0359621316420249">
                <text:p>-0.0359621316420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-0.03501535570261">
                <text:p>-0.03501535570261</text:p>
              </table:table-cell>
              <table:table-cell office:value-type="float" office:value="-0.0393349363525116">
                <text:p>-0.0393349363525116</text:p>
              </table:table-cell>
              <table:table-cell office:value-type="float" office:value="-0.0412217207073351">
                <text:p>-0.0412217207073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-0.0388029408779956">
                <text:p>-0.0388029408779956</text:p>
              </table:table-cell>
              <table:table-cell office:value-type="float" office:value="-0.0431043628127491">
                <text:p>-0.0431043628127491</text:p>
              </table:table-cell>
              <table:table-cell office:value-type="float" office:value="-0.0465306711004658">
                <text:p>-0.0465306711004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-0.0420364049804905">
                <text:p>-0.0420364049804905</text:p>
              </table:table-cell>
              <table:table-cell office:value-type="float" office:value="-0.0454805655770687">
                <text:p>-0.0454805655770687</text:p>
              </table:table-cell>
              <table:table-cell office:value-type="float" office:value="-0.0485053423871479">
                <text:p>-0.0485053423871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-0.0438081119628429">
                <text:p>-0.0438081119628429</text:p>
              </table:table-cell>
              <table:table-cell office:value-type="float" office:value="-0.0469248108529678">
                <text:p>-0.0469248108529678</text:p>
              </table:table-cell>
              <table:table-cell office:value-type="float" office:value="-0.0519069020873441">
                <text:p>-0.0519069020873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-0.0453178708752328">
                <text:p>-0.0453178708752328</text:p>
              </table:table-cell>
              <table:table-cell office:value-type="float" office:value="-0.0484155755379133">
                <text:p>-0.0484155755379133</text:p>
              </table:table-cell>
              <table:table-cell office:value-type="float" office:value="-0.0531211213084924">
                <text:p>-0.0531211213084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-0.0456457394772114">
                <text:p>-0.0456457394772114</text:p>
              </table:table-cell>
              <table:table-cell office:value-type="float" office:value="-0.0490769020530784">
                <text:p>-0.0490769020530784</text:p>
              </table:table-cell>
              <table:table-cell office:value-type="float" office:value="-0.0533497184078933">
                <text:p>-0.0533497184078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-0.0461708910981616">
                <text:p>-0.0461708910981616</text:p>
              </table:table-cell>
              <table:table-cell office:value-type="float" office:value="-0.0505847817295289">
                <text:p>-0.0505847817295289</text:p>
              </table:table-cell>
              <table:table-cell office:value-type="float" office:value="-0.0545240718545204">
                <text:p>-0.0545240718545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-0.046262695207217">
                <text:p>-0.046262695207217</text:p>
              </table:table-cell>
              <table:table-cell office:value-type="float" office:value="-0.0496898465096034">
                <text:p>-0.0496898465096034</text:p>
              </table:table-cell>
              <table:table-cell office:value-type="float" office:value="-0.0542016771954449">
                <text:p>-0.0542016771954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-0.0457504968613997">
                <text:p>-0.0457504968613997</text:p>
              </table:table-cell>
              <table:table-cell office:value-type="float" office:value="-0.0504367433803005">
                <text:p>-0.0504367433803005</text:p>
              </table:table-cell>
              <table:table-cell office:value-type="float" office:value="-0.0538587658127162">
                <text:p>-0.0538587658127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-0.0461235358921647">
                <text:p>-0.0461235358921647</text:p>
              </table:table-cell>
              <table:table-cell office:value-type="float" office:value="-0.0499655330679449">
                <text:p>-0.0499655330679449</text:p>
              </table:table-cell>
              <table:table-cell office:value-type="float" office:value="-0.0534630406372491">
                <text:p>-0.0534630406372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-0.0453984420070286">
                <text:p>-0.0453984420070286</text:p>
              </table:table-cell>
              <table:table-cell office:value-type="float" office:value="-0.0501957721189083">
                <text:p>-0.0501957721189083</text:p>
              </table:table-cell>
              <table:table-cell office:value-type="float" office:value="-0.0542111201011194">
                <text:p>-0.0542111201011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-0.0460173313736629">
                <text:p>-0.0460173313736629</text:p>
              </table:table-cell>
              <table:table-cell office:value-type="float" office:value="-0.0494927567770725">
                <text:p>-0.0494927567770725</text:p>
              </table:table-cell>
              <table:table-cell office:value-type="float" office:value="-0.0541073197677244">
                <text:p>-0.0541073197677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0.0457807833432101">
                <text:p>-0.0457807833432101</text:p>
              </table:table-cell>
              <table:table-cell office:value-type="float" office:value="-0.0492985141268315">
                <text:p>-0.0492985141268315</text:p>
              </table:table-cell>
              <table:table-cell office:value-type="float" office:value="-0.0542411932859275">
                <text:p>-0.0542411932859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0.0453301280527041">
                <text:p>-0.0453301280527041</text:p>
              </table:table-cell>
              <table:table-cell office:value-type="float" office:value="-0.0490249812408331">
                <text:p>-0.0490249812408331</text:p>
              </table:table-cell>
              <table:table-cell office:value-type="float" office:value="-0.0534143905377295">
                <text:p>-0.0534143905377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-0.0450500618444213">
                <text:p>-0.0450500618444213</text:p>
              </table:table-cell>
              <table:table-cell office:value-type="float" office:value="-0.0479959552282713">
                <text:p>-0.0479959552282713</text:p>
              </table:table-cell>
              <table:table-cell office:value-type="float" office:value="-0.0518612486623339">
                <text:p>-0.0518612486623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0.0435133771767898">
                <text:p>-0.0435133771767898</text:p>
              </table:table-cell>
              <table:table-cell office:value-type="float" office:value="-0.047217673392269">
                <text:p>-0.047217673392269</text:p>
              </table:table-cell>
              <table:table-cell office:value-type="float" office:value="-0.0511667586998577">
                <text:p>-0.0511667586998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-0.0407417607836957">
                <text:p>-0.0407417607836957</text:p>
              </table:table-cell>
              <table:table-cell office:value-type="float" office:value="-0.044870529082044">
                <text:p>-0.044870529082044</text:p>
              </table:table-cell>
              <table:table-cell office:value-type="float" office:value="-0.0482711510742886">
                <text:p>-0.04827115107428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0.0378054661638987">
                <text:p>-0.0378054661638987</text:p>
              </table:table-cell>
              <table:table-cell office:value-type="float" office:value="-0.041331594692912">
                <text:p>-0.041331594692912</text:p>
              </table:table-cell>
              <table:table-cell office:value-type="float" office:value="-0.0449306302719572">
                <text:p>-0.0449306302719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0.0351910630181451">
                <text:p>-0.0351910630181451</text:p>
              </table:table-cell>
              <table:table-cell office:value-type="float" office:value="-0.0381115211459969">
                <text:p>-0.0381115211459969</text:p>
              </table:table-cell>
              <table:table-cell office:value-type="float" office:value="-0.0399682598710041">
                <text:p>-0.0399682598710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0.0295432594680165">
                <text:p>-0.0295432594680165</text:p>
              </table:table-cell>
              <table:table-cell office:value-type="float" office:value="-0.032467383004445">
                <text:p>-0.032467383004445</text:p>
              </table:table-cell>
              <table:table-cell office:value-type="float" office:value="-0.0351393100669179">
                <text:p>-0.0351393100669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0.0245030140137272">
                <text:p>-0.0245030140137272</text:p>
              </table:table-cell>
              <table:table-cell office:value-type="float" office:value="-0.0264552426162018">
                <text:p>-0.0264552426162018</text:p>
              </table:table-cell>
              <table:table-cell office:value-type="float" office:value="-0.0284323192180358">
                <text:p>-0.0284323192180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0.0194886845111786">
                <text:p>-0.0194886845111786</text:p>
              </table:table-cell>
              <table:table-cell office:value-type="float" office:value="-0.0210683929467992">
                <text:p>-0.0210683929467992</text:p>
              </table:table-cell>
              <table:table-cell office:value-type="float" office:value="-0.0224645738156541">
                <text:p>-0.0224645738156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0.0125393860594146">
                <text:p>-0.0125393860594146</text:p>
              </table:table-cell>
              <table:table-cell office:value-type="float" office:value="-0.0138370480845864">
                <text:p>-0.0138370480845864</text:p>
              </table:table-cell>
              <table:table-cell office:value-type="float" office:value="-0.0152376237619729">
                <text:p>-0.0152376237619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-0.00716487065611932">
                <text:p>-0.00716487065611932</text:p>
              </table:table-cell>
              <table:table-cell office:value-type="float" office:value="-0.00747984790777278">
                <text:p>-0.00747984790777278</text:p>
              </table:table-cell>
              <table:table-cell office:value-type="float" office:value="-0.0082221853223502">
                <text:p>-0.0082221853223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-0.00265192072436116">
                <text:p>-0.00265192072436116</text:p>
              </table:table-cell>
              <table:table-cell office:value-type="float" office:value="-0.00265342619236822">
                <text:p>-0.00265342619236822</text:p>
              </table:table-cell>
              <table:table-cell office:value-type="float" office:value="-0.00305000281126785">
                <text:p>-0.00305000281126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0.00284115650900799">
                <text:p>0.00284115650900799</text:p>
              </table:table-cell>
              <table:table-cell office:value-type="float" office:value="0.00207802551118985">
                <text:p>0.00207802551118985</text:p>
              </table:table-cell>
              <table:table-cell office:value-type="float" office:value="0.00312490369882005">
                <text:p>0.00312490369882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0.00688272192360169">
                <text:p>0.00688272192360169</text:p>
              </table:table-cell>
              <table:table-cell office:value-type="float" office:value="0.00854428000453107">
                <text:p>0.00854428000453107</text:p>
              </table:table-cell>
              <table:table-cell office:value-type="float" office:value="0.00861095761319714">
                <text:p>0.008610957613197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0.0135581787556438">
                <text:p>0.0135581787556438</text:p>
              </table:table-cell>
              <table:table-cell office:value-type="float" office:value="0.0139506591679975">
                <text:p>0.0139506591679975</text:p>
              </table:table-cell>
              <table:table-cell office:value-type="float" office:value="0.0152634308713113">
                <text:p>0.0152634308713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0.0190647460525">
                <text:p>0.0190647460525</text:p>
              </table:table-cell>
              <table:table-cell office:value-type="float" office:value="0.0199389932650754">
                <text:p>0.0199389932650754</text:p>
              </table:table-cell>
              <table:table-cell office:value-type="float" office:value="0.0221796976010631">
                <text:p>0.0221796976010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0.0252938283623114">
                <text:p>0.0252938283623114</text:p>
              </table:table-cell>
              <table:table-cell office:value-type="float" office:value="0.0268862252066408">
                <text:p>0.0268862252066408</text:p>
              </table:table-cell>
              <table:table-cell office:value-type="float" office:value="0.0287032383805772">
                <text:p>0.0287032383805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0.0297659837357475">
                <text:p>0.0297659837357475</text:p>
              </table:table-cell>
              <table:table-cell office:value-type="float" office:value="0.0327571852249469">
                <text:p>0.0327571852249469</text:p>
              </table:table-cell>
              <table:table-cell office:value-type="float" office:value="0.035088188053513">
                <text:p>0.0350881880535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0.0347832789153614">
                <text:p>0.0347832789153614</text:p>
              </table:table-cell>
              <table:table-cell office:value-type="float" office:value="0.0369556128528225">
                <text:p>0.0369556128528225</text:p>
              </table:table-cell>
              <table:table-cell office:value-type="float" office:value="0.0401962025703287">
                <text:p>0.0401962025703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0.0382643831711018">
                <text:p>0.0382643831711018</text:p>
              </table:table-cell>
              <table:table-cell office:value-type="float" office:value="0.0410873144927282">
                <text:p>0.0410873144927282</text:p>
              </table:table-cell>
              <table:table-cell office:value-type="float" office:value="0.0455973579738979">
                <text:p>0.0455973579738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0.0415020134753109">
                <text:p>0.0415020134753109</text:p>
              </table:table-cell>
              <table:table-cell office:value-type="float" office:value="0.0452088018985438">
                <text:p>0.0452088018985438</text:p>
              </table:table-cell>
              <table:table-cell office:value-type="float" office:value="0.0487269948959244">
                <text:p>0.0487269948959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0.0437718383867229">
                <text:p>0.0437718383867229</text:p>
              </table:table-cell>
              <table:table-cell office:value-type="float" office:value="0.0471331096881252">
                <text:p>0.0471331096881252</text:p>
              </table:table-cell>
              <table:table-cell office:value-type="float" office:value="0.0509984247113977">
                <text:p>0.05099842471139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0.0453537402145723">
                <text:p>0.0453537402145723</text:p>
              </table:table-cell>
              <table:table-cell office:value-type="float" office:value="0.0480590658762869">
                <text:p>0.0480590658762869</text:p>
              </table:table-cell>
              <table:table-cell office:value-type="float" office:value="0.0521086683295278">
                <text:p>0.0521086683295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0.0458010614480126">
                <text:p>0.0458010614480126</text:p>
              </table:table-cell>
              <table:table-cell office:value-type="float" office:value="0.0490750061360337">
                <text:p>0.0490750061360337</text:p>
              </table:table-cell>
              <table:table-cell office:value-type="float" office:value="0.0537946693049085">
                <text:p>0.0537946693049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0.0455247893571539">
                <text:p>0.0455247893571539</text:p>
              </table:table-cell>
              <table:table-cell office:value-type="float" office:value="0.0496592998361459">
                <text:p>0.0496592998361459</text:p>
              </table:table-cell>
              <table:table-cell office:value-type="float" office:value="0.0538327307892508">
                <text:p>0.0538327307892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0.0453604675781894">
                <text:p>0.0453604675781894</text:p>
              </table:table-cell>
              <table:table-cell office:value-type="float" office:value="0.0501185557647548">
                <text:p>0.0501185557647548</text:p>
              </table:table-cell>
              <table:table-cell office:value-type="float" office:value="0.0542552576018175">
                <text:p>0.0542552576018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0.0465152822149208">
                <text:p>0.0465152822149208</text:p>
              </table:table-cell>
              <table:table-cell office:value-type="float" office:value="0.0500432059347299">
                <text:p>0.0500432059347299</text:p>
              </table:table-cell>
              <table:table-cell office:value-type="float" office:value="0.054333843438449">
                <text:p>0.054333843438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0.0455511399422128">
                <text:p>0.0455511399422128</text:p>
              </table:table-cell>
              <table:table-cell office:value-type="float" office:value="0.049304175556139">
                <text:p>0.049304175556139</text:p>
              </table:table-cell>
              <table:table-cell office:value-type="float" office:value="0.0533239881068888">
                <text:p>0.0533239881068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0.0460252077577409">
                <text:p>0.0460252077577409</text:p>
              </table:table-cell>
              <table:table-cell office:value-type="float" office:value="0.0493486185983364">
                <text:p>0.0493486185983364</text:p>
              </table:table-cell>
              <table:table-cell office:value-type="float" office:value="0.0545584359330283">
                <text:p>0.0545584359330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0.0465665733414944">
                <text:p>0.0465665733414944</text:p>
              </table:table-cell>
              <table:table-cell office:value-type="float" office:value="0.0502051542771761">
                <text:p>0.0502051542771761</text:p>
              </table:table-cell>
              <table:table-cell office:value-type="float" office:value="0.054205719454335">
                <text:p>0.054205719454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0.0459456845719869">
                <text:p>0.0459456845719869</text:p>
              </table:table-cell>
              <table:table-cell office:value-type="float" office:value="0.0494478977642025">
                <text:p>0.0494478977642025</text:p>
              </table:table-cell>
              <table:table-cell office:value-type="float" office:value="0.0542944384108335">
                <text:p>0.05429443841083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0.0453453153600766">
                <text:p>0.0453453153600766</text:p>
              </table:table-cell>
              <table:table-cell office:value-type="float" office:value="0.0493694115174934">
                <text:p>0.0493694115174934</text:p>
              </table:table-cell>
              <table:table-cell office:value-type="float" office:value="0.0541868786069202">
                <text:p>0.0541868786069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0.0443701278938645">
                <text:p>0.0443701278938645</text:p>
              </table:table-cell>
              <table:table-cell office:value-type="float" office:value="0.0488256550307874">
                <text:p>0.0488256550307874</text:p>
              </table:table-cell>
              <table:table-cell office:value-type="float" office:value="0.0521784751024341">
                <text:p>0.0521784751024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0.0439935191194428">
                <text:p>0.0439935191194428</text:p>
              </table:table-cell>
              <table:table-cell office:value-type="float" office:value="0.0476335885593047">
                <text:p>0.0476335885593047</text:p>
              </table:table-cell>
              <table:table-cell office:value-type="float" office:value="0.0520180350656481">
                <text:p>0.0520180350656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0.0413967205656796">
                <text:p>0.0413967205656796</text:p>
              </table:table-cell>
              <table:table-cell office:value-type="float" office:value="0.0456475617745774">
                <text:p>0.0456475617745774</text:p>
              </table:table-cell>
              <table:table-cell office:value-type="float" office:value="0.0487843281989222">
                <text:p>0.0487843281989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0.0387474829825725">
                <text:p>0.0387474829825725</text:p>
              </table:table-cell>
              <table:table-cell office:value-type="float" office:value="0.0425314848070945">
                <text:p>0.0425314848070945</text:p>
              </table:table-cell>
              <table:table-cell office:value-type="float" office:value="0.0460906933434328">
                <text:p>0.04609069334343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0.0358852066120743">
                <text:p>0.0358852066120743</text:p>
              </table:table-cell>
              <table:table-cell office:value-type="float" office:value="0.0383066014952544">
                <text:p>0.0383066014952544</text:p>
              </table:table-cell>
              <table:table-cell office:value-type="float" office:value="0.0414995130726609">
                <text:p>0.04149951307266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0.0315997966436894">
                <text:p>0.0315997966436894</text:p>
              </table:table-cell>
              <table:table-cell office:value-type="float" office:value="0.0343407343049633">
                <text:p>0.0343407343049633</text:p>
              </table:table-cell>
              <table:table-cell office:value-type="float" office:value="0.0365493346088727">
                <text:p>0.0365493346088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0.0261080039604337">
                <text:p>0.0261080039604337</text:p>
              </table:table-cell>
              <table:table-cell office:value-type="float" office:value="0.0280593009319437">
                <text:p>0.0280593009319437</text:p>
              </table:table-cell>
              <table:table-cell office:value-type="float" office:value="0.0309677233108032">
                <text:p>0.0309677233108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0.0198533649642852">
                <text:p>0.0198533649642852</text:p>
              </table:table-cell>
              <table:table-cell office:value-type="float" office:value="0.02195982235381">
                <text:p>0.02195982235381</text:p>
              </table:table-cell>
              <table:table-cell office:value-type="float" office:value="0.0236964233979527">
                <text:p>0.02369642339795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0.0148728113060008">
                <text:p>0.0148728113060008</text:p>
              </table:table-cell>
              <table:table-cell office:value-type="float" office:value="0.0158283072533011">
                <text:p>0.0158283072533011</text:p>
              </table:table-cell>
              <table:table-cell office:value-type="float" office:value="0.0167092009170444">
                <text:p>0.0167092009170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0.00926649671499672">
                <text:p>0.00926649671499672</text:p>
              </table:table-cell>
              <table:table-cell office:value-type="float" office:value="0.00992261109009626">
                <text:p>0.00992261109009626</text:p>
              </table:table-cell>
              <table:table-cell office:value-type="float" office:value="0.0106632929683003">
                <text:p>0.0106632929683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0.00402086030369871">
                <text:p>0.00402086030369871</text:p>
              </table:table-cell>
              <table:table-cell office:value-type="float" office:value="0.00413301655656633">
                <text:p>0.00413301655656633</text:p>
              </table:table-cell>
              <table:table-cell office:value-type="float" office:value="0.00427500055043593">
                <text:p>0.00427500055043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-0.00115983335854035">
                <text:p>-0.00115983335854035</text:p>
              </table:table-cell>
              <table:table-cell office:value-type="float" office:value="-0.000880707188156522">
                <text:p>-0.000880707188156522</text:p>
              </table:table-cell>
              <table:table-cell office:value-type="float" office:value="-0.000960749751800492">
                <text:p>-0.000960749751800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-0.00645620964898358">
                <text:p>-0.00645620964898358</text:p>
              </table:table-cell>
              <table:table-cell office:value-type="float" office:value="-0.00691386605559264">
                <text:p>-0.00691386605559264</text:p>
              </table:table-cell>
              <table:table-cell office:value-type="float" office:value="-0.00723080716622663">
                <text:p>-0.00723080716622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-0.0112828252823916">
                <text:p>-0.0112828252823916</text:p>
              </table:table-cell>
              <table:table-cell office:value-type="float" office:value="-0.0123647633349557">
                <text:p>-0.0123647633349557</text:p>
              </table:table-cell>
              <table:table-cell office:value-type="float" office:value="-0.0139744992245116">
                <text:p>-0.0139744992245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-0.0178972380602439">
                <text:p>-0.0178972380602439</text:p>
              </table:table-cell>
              <table:table-cell office:value-type="float" office:value="-0.0191504467569269">
                <text:p>-0.0191504467569269</text:p>
              </table:table-cell>
              <table:table-cell office:value-type="float" office:value="-0.0208750524716507">
                <text:p>-0.0208750524716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-0.0227216905776891">
                <text:p>-0.0227216905776891</text:p>
              </table:table-cell>
              <table:table-cell office:value-type="float" office:value="-0.0252243606284473">
                <text:p>-0.0252243606284473</text:p>
              </table:table-cell>
              <table:table-cell office:value-type="float" office:value="-0.0278442697659538">
                <text:p>-0.0278442697659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0.0285189856838013">
                <text:p>-0.0285189856838013</text:p>
              </table:table-cell>
              <table:table-cell office:value-type="float" office:value="-0.031172349904866">
                <text:p>-0.031172349904866</text:p>
              </table:table-cell>
              <table:table-cell office:value-type="float" office:value="-0.0339645570862988">
                <text:p>-0.0339645570862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0.0329575942629493">
                <text:p>-0.0329575942629493</text:p>
              </table:table-cell>
              <table:table-cell office:value-type="float" office:value="-0.0365952653073812">
                <text:p>-0.0365952653073812</text:p>
              </table:table-cell>
              <table:table-cell office:value-type="float" office:value="-0.0395651416081507">
                <text:p>-0.03956514160815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255e91" svg:stroke-linecap="round" draw:fill-color="#255e9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e480e" svg:stroke-linecap="round" draw:fill-color="#9e480e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</office:automatic-styles>
  <office:body>
    <office:chart>
      <chart:chart svg:width="27.059cm" svg:height="17.356cm" xlink:href=".." xlink:type="simple" chart:class="chart:scatter" chart:style-name="ch1">
        <chart:title svg:x="11.252cm" svg:y="0.483cm" chart:style-name="ch2">
          <text:p><text:span text:style-name="T1">Voltages</text:span><text:span text:style-name="T1"> of all phases</text:span></text:p>
        </chart:title>
        <chart:legend chart:legend-position="bottom" svg:x="10.065cm" svg:y="16.784cm" style:legend-expansion="wide" chart:style-name="ch3"/>
        <chart:plot-area chart:style-name="ch4" svg:x="0.541cm" svg:y="1.693cm" svg:width="25.977cm" svg:height="14.56cm">
          <chart:coordinate-region svg:x="1.302cm" svg:y="1.879cm" svg:width="25.013cm" svg:height="14.1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lot.M4:plot.M104" chart:label-cell-address="plot.M3:plot.M3" chart:class="chart:scatter">
            <chart:domain table:cell-range-address="plot.L4:plot.L104"/>
            <chart:data-point chart:repeated="101"/>
          </chart:series>
          <chart:series chart:style-name="ch9" chart:values-cell-range-address="plot.N4:plot.N104" chart:label-cell-address="plot.N3:plot.N3" chart:class="chart:scatter">
            <chart:data-point chart:repeated="101"/>
          </chart:series>
          <chart:series chart:style-name="ch10" chart:values-cell-range-address="plot.O4:plot.O104" chart:label-cell-address="plot.O3:plot.O3" chart:class="chart:scatter">
            <chart:data-point chart:repeated="101"/>
          </chart:series>
          <chart:series chart:style-name="ch11" chart:values-cell-range-address="plot.P4:plot.P104" chart:label-cell-address="plot.P3:plot.P3" chart:class="chart:scatter">
            <chart:data-point chart:repeated="101"/>
          </chart:series>
          <chart:series chart:style-name="ch12" chart:values-cell-range-address="plot.Q4:plot.Q104" chart:label-cell-address="plot.Q3:plot.Q3" chart:class="chart:scatter">
            <chart:data-point chart:repeated="101"/>
          </chart:series>
          <chart:series chart:style-name="ch13" chart:values-cell-range-address="plot.R4:plot.R104" chart:label-cell-address="plot.R3:plot.R3" chart:class="chart:scatter">
            <chart:data-point chart:repeated="101"/>
          </chart:series>
          <chart:series chart:style-name="ch14" chart:values-cell-range-address="plot.S4:plot.S104" chart:label-cell-address="plot.S3:plot.S3" chart:class="chart:scatter">
            <chart:data-point chart:repeated="101"/>
          </chart:series>
          <chart:series chart:style-name="ch15" chart:values-cell-range-address="plot.T4:plot.T104" chart:label-cell-address="plot.T3:plot.T3" chart:class="chart:scatter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U1</text:p>
                <draw:g>
                  <svg:desc>plot.M3:plot.M3</svg:desc>
                </draw:g>
              </table:table-cell>
              <table:table-cell office:value-type="string">
                <text:p>U2</text:p>
                <draw:g>
                  <svg:desc>plot.N3:plot.N3</svg:desc>
                </draw:g>
              </table:table-cell>
              <table:table-cell office:value-type="string">
                <text:p>U3</text:p>
                <draw:g>
                  <svg:desc>plot.O3:plot.O3</svg:desc>
                </draw:g>
              </table:table-cell>
              <table:table-cell office:value-type="string">
                <text:p>U4</text:p>
                <draw:g>
                  <svg:desc>plot.P3:plot.P3</svg:desc>
                </draw:g>
              </table:table-cell>
              <table:table-cell office:value-type="string">
                <text:p>U5</text:p>
                <draw:g>
                  <svg:desc>plot.Q3:plot.Q3</svg:desc>
                </draw:g>
              </table:table-cell>
              <table:table-cell office:value-type="string">
                <text:p>U6</text:p>
                <draw:g>
                  <svg:desc>plot.R3:plot.R3</svg:desc>
                </draw:g>
              </table:table-cell>
              <table:table-cell office:value-type="string">
                <text:p>U7</text:p>
                <draw:g>
                  <svg:desc>plot.S3:plot.S3</svg:desc>
                </draw:g>
              </table:table-cell>
              <table:table-cell office:value-type="string">
                <text:p>U8</text:p>
                <draw:g>
                  <svg:desc>plot.T3:plot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L4:plot.L104</svg:desc>
                </draw:g>
              </table:table-cell>
              <table:table-cell office:value-type="float" office:value="-0.0000380254379239401">
                <text:p>-0.0000380254379239401</text:p>
                <draw:g>
                  <svg:desc>plot.M4:plot.M104</svg:desc>
                </draw:g>
              </table:table-cell>
              <table:table-cell office:value-type="float" office:value="0.00037568787479057">
                <text:p>0.00037568787479057</text:p>
                <draw:g>
                  <svg:desc>plot.N4:plot.N104</svg:desc>
                </draw:g>
              </table:table-cell>
              <table:table-cell office:value-type="float" office:value="0.000142615772316234">
                <text:p>0.000142615772316234</text:p>
                <draw:g>
                  <svg:desc>plot.O4:plot.O104</svg:desc>
                </draw:g>
              </table:table-cell>
              <table:table-cell office:value-type="float" office:value="0.00398547294118494">
                <text:p>0.00398547294118494</text:p>
                <draw:g>
                  <svg:desc>plot.P4:plot.P104</svg:desc>
                </draw:g>
              </table:table-cell>
              <table:table-cell office:value-type="float" office:value="0.000410944369458761">
                <text:p>0.000410944369458761</text:p>
                <draw:g>
                  <svg:desc>plot.Q4:plot.Q104</svg:desc>
                </draw:g>
              </table:table-cell>
              <table:table-cell office:value-type="float" office:value="-0.00038045169708515">
                <text:p>-0.00038045169708515</text:p>
                <draw:g>
                  <svg:desc>plot.R4:plot.R104</svg:desc>
                </draw:g>
              </table:table-cell>
              <table:table-cell office:value-type="float" office:value="-0.000222171874002436">
                <text:p>-0.000222171874002436</text:p>
                <draw:g>
                  <svg:desc>plot.S4:plot.S104</svg:desc>
                </draw:g>
              </table:table-cell>
              <table:table-cell office:value-type="float" office:value="0.000642776100007145">
                <text:p>0.000642776100007145</text:p>
                <draw:g>
                  <svg:desc>plot.T4:plot.T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504093819560507">
                <text:p>0.00504093819560507</text:p>
              </table:table-cell>
              <table:table-cell office:value-type="float" office:value="0.00463132291573342">
                <text:p>0.00463132291573342</text:p>
              </table:table-cell>
              <table:table-cell office:value-type="float" office:value="0.0047795188197216">
                <text:p>0.0047795188197216</text:p>
              </table:table-cell>
              <table:table-cell office:value-type="float" office:value="0.0105052012298229">
                <text:p>0.0105052012298229</text:p>
              </table:table-cell>
              <table:table-cell office:value-type="float" office:value="0.00613821915841989">
                <text:p>0.00613821915841989</text:p>
              </table:table-cell>
              <table:table-cell office:value-type="float" office:value="0.00674300523715629">
                <text:p>0.00674300523715629</text:p>
              </table:table-cell>
              <table:table-cell office:value-type="float" office:value="0.0070493946003822">
                <text:p>0.0070493946003822</text:p>
              </table:table-cell>
              <table:table-cell office:value-type="float" office:value="0.00742200065793537">
                <text:p>0.00742200065793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0106133105174852">
                <text:p>0.0106133105174852</text:p>
              </table:table-cell>
              <table:table-cell office:value-type="float" office:value="0.0104549687618592">
                <text:p>0.0104549687618592</text:p>
              </table:table-cell>
              <table:table-cell office:value-type="float" office:value="0.0111896881908147">
                <text:p>0.0111896881908147</text:p>
              </table:table-cell>
              <table:table-cell office:value-type="float" office:value="0.0179129933141447">
                <text:p>0.0179129933141447</text:p>
              </table:table-cell>
              <table:table-cell office:value-type="float" office:value="0.0138673720431544">
                <text:p>0.0138673720431544</text:p>
              </table:table-cell>
              <table:table-cell office:value-type="float" office:value="0.0139164189719115">
                <text:p>0.0139164189719115</text:p>
              </table:table-cell>
              <table:table-cell office:value-type="float" office:value="0.0159059672804117">
                <text:p>0.0159059672804117</text:p>
              </table:table-cell>
              <table:table-cell office:value-type="float" office:value="0.0156808769306662">
                <text:p>0.0156808769306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.0153939233958018">
                <text:p>0.0153939233958018</text:p>
              </table:table-cell>
              <table:table-cell office:value-type="float" office:value="0.0173530390936699">
                <text:p>0.0173530390936699</text:p>
              </table:table-cell>
              <table:table-cell office:value-type="float" office:value="0.0190594584245905">
                <text:p>0.0190594584245905</text:p>
              </table:table-cell>
              <table:table-cell office:value-type="float" office:value="0.0248369913207113">
                <text:p>0.0248369913207113</text:p>
              </table:table-cell>
              <table:table-cell office:value-type="float" office:value="0.0219950637358617">
                <text:p>0.0219950637358617</text:p>
              </table:table-cell>
              <table:table-cell office:value-type="float" office:value="0.0221773906323536">
                <text:p>0.0221773906323536</text:p>
              </table:table-cell>
              <table:table-cell office:value-type="float" office:value="0.0247766323662993">
                <text:p>0.0247766323662993</text:p>
              </table:table-cell>
              <table:table-cell office:value-type="float" office:value="0.0257917003041652">
                <text:p>0.025791700304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21925387924959">
                <text:p>0.021925387924959</text:p>
              </table:table-cell>
              <table:table-cell office:value-type="float" office:value="0.0237244817746512">
                <text:p>0.0237244817746512</text:p>
              </table:table-cell>
              <table:table-cell office:value-type="float" office:value="0.0250649525069638">
                <text:p>0.0250649525069638</text:p>
              </table:table-cell>
              <table:table-cell office:value-type="float" office:value="0.0328604887145534">
                <text:p>0.0328604887145534</text:p>
              </table:table-cell>
              <table:table-cell office:value-type="float" office:value="0.0287609354705145">
                <text:p>0.0287609354705145</text:p>
              </table:table-cell>
              <table:table-cell office:value-type="float" office:value="0.0307899140954705">
                <text:p>0.0307899140954705</text:p>
              </table:table-cell>
              <table:table-cell office:value-type="float" office:value="0.0331497651899011">
                <text:p>0.0331497651899011</text:p>
              </table:table-cell>
              <table:table-cell office:value-type="float" office:value="0.0355675755734693">
                <text:p>0.0355675755734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27389274906924">
                <text:p>0.027389274906924</text:p>
              </table:table-cell>
              <table:table-cell office:value-type="float" office:value="0.0296573611551378">
                <text:p>0.0296573611551378</text:p>
              </table:table-cell>
              <table:table-cell office:value-type="float" office:value="0.031672498222735">
                <text:p>0.031672498222735</text:p>
              </table:table-cell>
              <table:table-cell office:value-type="float" office:value="0.0386877771717686">
                <text:p>0.0386877771717686</text:p>
              </table:table-cell>
              <table:table-cell office:value-type="float" office:value="0.0369619952915013">
                <text:p>0.0369619952915013</text:p>
              </table:table-cell>
              <table:table-cell office:value-type="float" office:value="0.0389372479289677">
                <text:p>0.0389372479289677</text:p>
              </table:table-cell>
              <table:table-cell office:value-type="float" office:value="0.0421012071647399">
                <text:p>0.0421012071647399</text:p>
              </table:table-cell>
              <table:table-cell office:value-type="float" office:value="0.0447177292594961">
                <text:p>0.044717729259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0322460912160329">
                <text:p>0.0322460912160329</text:p>
              </table:table-cell>
              <table:table-cell office:value-type="float" office:value="0.035615334536766">
                <text:p>0.035615334536766</text:p>
              </table:table-cell>
              <table:table-cell office:value-type="float" office:value="0.0378402500972025">
                <text:p>0.0378402500972025</text:p>
              </table:table-cell>
              <table:table-cell office:value-type="float" office:value="0.0452640532245927">
                <text:p>0.0452640532245927</text:p>
              </table:table-cell>
              <table:table-cell office:value-type="float" office:value="0.0442807352479234">
                <text:p>0.0442807352479234</text:p>
              </table:table-cell>
              <table:table-cell office:value-type="float" office:value="0.0464713470254066">
                <text:p>0.0464713470254066</text:p>
              </table:table-cell>
              <table:table-cell office:value-type="float" office:value="0.0494153299412128">
                <text:p>0.0494153299412128</text:p>
              </table:table-cell>
              <table:table-cell office:value-type="float" office:value="0.0521980289866843">
                <text:p>0.0521980289866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.0365634414586432">
                <text:p>0.0365634414586432</text:p>
              </table:table-cell>
              <table:table-cell office:value-type="float" office:value="0.0391260946600873">
                <text:p>0.0391260946600873</text:p>
              </table:table-cell>
              <table:table-cell office:value-type="float" office:value="0.0435792344555437">
                <text:p>0.0435792344555437</text:p>
              </table:table-cell>
              <table:table-cell office:value-type="float" office:value="0.0491614070013834">
                <text:p>0.0491614070013834</text:p>
              </table:table-cell>
              <table:table-cell office:value-type="float" office:value="0.0487406649183193">
                <text:p>0.0487406649183193</text:p>
              </table:table-cell>
              <table:table-cell office:value-type="float" office:value="0.0527767719385197">
                <text:p>0.0527767719385197</text:p>
              </table:table-cell>
              <table:table-cell office:value-type="float" office:value="0.0559380444737452">
                <text:p>0.0559380444737452</text:p>
              </table:table-cell>
              <table:table-cell office:value-type="float" office:value="0.0592234192695163">
                <text:p>0.0592234192695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0.0395333188698217">
                <text:p>0.0395333188698217</text:p>
              </table:table-cell>
              <table:table-cell office:value-type="float" office:value="0.0436465349730024">
                <text:p>0.0436465349730024</text:p>
              </table:table-cell>
              <table:table-cell office:value-type="float" office:value="0.0471968828086257">
                <text:p>0.0471968828086257</text:p>
              </table:table-cell>
              <table:table-cell office:value-type="float" office:value="0.0527542117786935">
                <text:p>0.0527542117786935</text:p>
              </table:table-cell>
              <table:table-cell office:value-type="float" office:value="0.0535985493913583">
                <text:p>0.0535985493913583</text:p>
              </table:table-cell>
              <table:table-cell office:value-type="float" office:value="0.0573808444778907">
                <text:p>0.0573808444778907</text:p>
              </table:table-cell>
              <table:table-cell office:value-type="float" office:value="0.0605181324874929">
                <text:p>0.0605181324874929</text:p>
              </table:table-cell>
              <table:table-cell office:value-type="float" office:value="0.0643184318660044">
                <text:p>0.0643184318660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0.0422166355103502">
                <text:p>0.0422166355103502</text:p>
              </table:table-cell>
              <table:table-cell office:value-type="float" office:value="0.0459531542661552">
                <text:p>0.0459531542661552</text:p>
              </table:table-cell>
              <table:table-cell office:value-type="float" office:value="0.0502620591088151">
                <text:p>0.0502620591088151</text:p>
              </table:table-cell>
              <table:table-cell office:value-type="float" office:value="0.0556355913479715">
                <text:p>0.0556355913479715</text:p>
              </table:table-cell>
              <table:table-cell office:value-type="float" office:value="0.056640968227175">
                <text:p>0.056640968227175</text:p>
              </table:table-cell>
              <table:table-cell office:value-type="float" office:value="0.0607538745542067">
                <text:p>0.0607538745542067</text:p>
              </table:table-cell>
              <table:table-cell office:value-type="float" office:value="0.064881616314985">
                <text:p>0.064881616314985</text:p>
              </table:table-cell>
              <table:table-cell office:value-type="float" office:value="0.0678999290200818">
                <text:p>0.0678999290200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0448438174663155">
                <text:p>0.0448438174663155</text:p>
              </table:table-cell>
              <table:table-cell office:value-type="float" office:value="0.0478175701781895">
                <text:p>0.0478175701781895</text:p>
              </table:table-cell>
              <table:table-cell office:value-type="float" office:value="0.0517872638464042">
                <text:p>0.0517872638464042</text:p>
              </table:table-cell>
              <table:table-cell office:value-type="float" office:value="0.0568613864267527">
                <text:p>0.0568613864267527</text:p>
              </table:table-cell>
              <table:table-cell office:value-type="float" office:value="0.0589513847653118">
                <text:p>0.0589513847653118</text:p>
              </table:table-cell>
              <table:table-cell office:value-type="float" office:value="0.0636919067066742">
                <text:p>0.0636919067066742</text:p>
              </table:table-cell>
              <table:table-cell office:value-type="float" office:value="0.0671196121858388">
                <text:p>0.0671196121858388</text:p>
              </table:table-cell>
              <table:table-cell office:value-type="float" office:value="0.0707301801002274">
                <text:p>0.0707301801002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0.0454176066813203">
                <text:p>0.0454176066813203</text:p>
              </table:table-cell>
              <table:table-cell office:value-type="float" office:value="0.0495564354567963">
                <text:p>0.0495564354567963</text:p>
              </table:table-cell>
              <table:table-cell office:value-type="float" office:value="0.0526673290999512">
                <text:p>0.0526673290999512</text:p>
              </table:table-cell>
              <table:table-cell office:value-type="float" office:value="0.0581147195740257">
                <text:p>0.0581147195740257</text:p>
              </table:table-cell>
              <table:table-cell office:value-type="float" office:value="0.0605566876589991">
                <text:p>0.0605566876589991</text:p>
              </table:table-cell>
              <table:table-cell office:value-type="float" office:value="0.0654358492520014">
                <text:p>0.0654358492520014</text:p>
              </table:table-cell>
              <table:table-cell office:value-type="float" office:value="0.068370013541914">
                <text:p>0.068370013541914</text:p>
              </table:table-cell>
              <table:table-cell office:value-type="float" office:value="0.072612179881654">
                <text:p>0.072612179881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0.0463161891425316">
                <text:p>0.0463161891425316</text:p>
              </table:table-cell>
              <table:table-cell office:value-type="float" office:value="0.0498354034828023">
                <text:p>0.0498354034828023</text:p>
              </table:table-cell>
              <table:table-cell office:value-type="float" office:value="0.0534178323218154">
                <text:p>0.0534178323218154</text:p>
              </table:table-cell>
              <table:table-cell office:value-type="float" office:value="0.0577045901573714">
                <text:p>0.0577045901573714</text:p>
              </table:table-cell>
              <table:table-cell office:value-type="float" office:value="0.0614240325503042">
                <text:p>0.0614240325503042</text:p>
              </table:table-cell>
              <table:table-cell office:value-type="float" office:value="0.0663209029915535">
                <text:p>0.0663209029915535</text:p>
              </table:table-cell>
              <table:table-cell office:value-type="float" office:value="0.0697247626259438">
                <text:p>0.0697247626259438</text:p>
              </table:table-cell>
              <table:table-cell office:value-type="float" office:value="0.0736712309167178">
                <text:p>0.0736712309167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.0463269009815144">
                <text:p>0.0463269009815144</text:p>
              </table:table-cell>
              <table:table-cell office:value-type="float" office:value="0.0494804321653588">
                <text:p>0.0494804321653588</text:p>
              </table:table-cell>
              <table:table-cell office:value-type="float" office:value="0.0544736227949844">
                <text:p>0.0544736227949844</text:p>
              </table:table-cell>
              <table:table-cell office:value-type="float" office:value="0.057886622290164">
                <text:p>0.057886622290164</text:p>
              </table:table-cell>
              <table:table-cell office:value-type="float" office:value="0.0614810263571698">
                <text:p>0.0614810263571698</text:p>
              </table:table-cell>
              <table:table-cell office:value-type="float" office:value="0.0659707530699987">
                <text:p>0.0659707530699987</text:p>
              </table:table-cell>
              <table:table-cell office:value-type="float" office:value="0.0696849959466029">
                <text:p>0.0696849959466029</text:p>
              </table:table-cell>
              <table:table-cell office:value-type="float" office:value="0.0743269074600934">
                <text:p>0.0743269074600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0.0464460559589545">
                <text:p>0.0464460559589545</text:p>
              </table:table-cell>
              <table:table-cell office:value-type="float" office:value="0.0498921803149919">
                <text:p>0.0498921803149919</text:p>
              </table:table-cell>
              <table:table-cell office:value-type="float" office:value="0.0544615185616689">
                <text:p>0.0544615185616689</text:p>
              </table:table-cell>
              <table:table-cell office:value-type="float" office:value="0.057623496983419">
                <text:p>0.057623496983419</text:p>
              </table:table-cell>
              <table:table-cell office:value-type="float" office:value="0.0625955723456788">
                <text:p>0.0625955723456788</text:p>
              </table:table-cell>
              <table:table-cell office:value-type="float" office:value="0.0665790994181147">
                <text:p>0.0665790994181147</text:p>
              </table:table-cell>
              <table:table-cell office:value-type="float" office:value="0.0702284272462354">
                <text:p>0.0702284272462354</text:p>
              </table:table-cell>
              <table:table-cell office:value-type="float" office:value="0.0745304851676541">
                <text:p>0.0745304851676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0.045319058548141">
                <text:p>0.045319058548141</text:p>
              </table:table-cell>
              <table:table-cell office:value-type="float" office:value="0.0494641505452269">
                <text:p>0.0494641505452269</text:p>
              </table:table-cell>
              <table:table-cell office:value-type="float" office:value="0.0542515021730251">
                <text:p>0.0542515021730251</text:p>
              </table:table-cell>
              <table:table-cell office:value-type="float" office:value="0.0579134458678741">
                <text:p>0.0579134458678741</text:p>
              </table:table-cell>
              <table:table-cell office:value-type="float" office:value="0.0625854586813856">
                <text:p>0.0625854586813856</text:p>
              </table:table-cell>
              <table:table-cell office:value-type="float" office:value="0.0660898779410648">
                <text:p>0.0660898779410648</text:p>
              </table:table-cell>
              <table:table-cell office:value-type="float" office:value="0.069870892227535">
                <text:p>0.069870892227535</text:p>
              </table:table-cell>
              <table:table-cell office:value-type="float" office:value="0.0740583978436805">
                <text:p>0.0740583978436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0.0462747079305835">
                <text:p>0.0462747079305835</text:p>
              </table:table-cell>
              <table:table-cell office:value-type="float" office:value="0.0498142647340979">
                <text:p>0.0498142647340979</text:p>
              </table:table-cell>
              <table:table-cell office:value-type="float" office:value="0.0542105624721112">
                <text:p>0.0542105624721112</text:p>
              </table:table-cell>
              <table:table-cell office:value-type="float" office:value="0.0573143556251262">
                <text:p>0.0573143556251262</text:p>
              </table:table-cell>
              <table:table-cell office:value-type="float" office:value="0.061547299507389">
                <text:p>0.061547299507389</text:p>
              </table:table-cell>
              <table:table-cell office:value-type="float" office:value="0.065757868183829">
                <text:p>0.065757868183829</text:p>
              </table:table-cell>
              <table:table-cell office:value-type="float" office:value="0.0694593860924194">
                <text:p>0.0694593860924194</text:p>
              </table:table-cell>
              <table:table-cell office:value-type="float" office:value="0.0733229752740228">
                <text:p>0.0733229752740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0.0460156289953225">
                <text:p>0.0460156289953225</text:p>
              </table:table-cell>
              <table:table-cell office:value-type="float" office:value="0.0501645948292524">
                <text:p>0.0501645948292524</text:p>
              </table:table-cell>
              <table:table-cell office:value-type="float" office:value="0.0541297192995013">
                <text:p>0.0541297192995013</text:p>
              </table:table-cell>
              <table:table-cell office:value-type="float" office:value="0.057408712689889">
                <text:p>0.057408712689889</text:p>
              </table:table-cell>
              <table:table-cell office:value-type="float" office:value="0.0624083517958458">
                <text:p>0.0624083517958458</text:p>
              </table:table-cell>
              <table:table-cell office:value-type="float" office:value="0.0663140311428727">
                <text:p>0.0663140311428727</text:p>
              </table:table-cell>
              <table:table-cell office:value-type="float" office:value="0.0702108788560221">
                <text:p>0.0702108788560221</text:p>
              </table:table-cell>
              <table:table-cell office:value-type="float" office:value="0.0734930109169414">
                <text:p>0.0734930109169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0.0454774794521838">
                <text:p>0.0454774794521838</text:p>
              </table:table-cell>
              <table:table-cell office:value-type="float" office:value="0.050494939922125">
                <text:p>0.050494939922125</text:p>
              </table:table-cell>
              <table:table-cell office:value-type="float" office:value="0.0541346958367958">
                <text:p>0.0541346958367958</text:p>
              </table:table-cell>
              <table:table-cell office:value-type="float" office:value="0.0575598607876123">
                <text:p>0.0575598607876123</text:p>
              </table:table-cell>
              <table:table-cell office:value-type="float" office:value="0.0621967106426314">
                <text:p>0.0621967106426314</text:p>
              </table:table-cell>
              <table:table-cell office:value-type="float" office:value="0.0661312446888649">
                <text:p>0.0661312446888649</text:p>
              </table:table-cell>
              <table:table-cell office:value-type="float" office:value="0.0706328177445352">
                <text:p>0.0706328177445352</text:p>
              </table:table-cell>
              <table:table-cell office:value-type="float" office:value="0.0743837304516282">
                <text:p>0.0743837304516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0.0451583156421517">
                <text:p>0.0451583156421517</text:p>
              </table:table-cell>
              <table:table-cell office:value-type="float" office:value="0.0493572791736757">
                <text:p>0.0493572791736757</text:p>
              </table:table-cell>
              <table:table-cell office:value-type="float" office:value="0.0540930474525676">
                <text:p>0.0540930474525676</text:p>
              </table:table-cell>
              <table:table-cell office:value-type="float" office:value="0.056849998822283">
                <text:p>0.056849998822283</text:p>
              </table:table-cell>
              <table:table-cell office:value-type="float" office:value="0.0612850285424827">
                <text:p>0.0612850285424827</text:p>
              </table:table-cell>
              <table:table-cell office:value-type="float" office:value="0.066276957949704">
                <text:p>0.066276957949704</text:p>
              </table:table-cell>
              <table:table-cell office:value-type="float" office:value="0.0698724347088765">
                <text:p>0.0698724347088765</text:p>
              </table:table-cell>
              <table:table-cell office:value-type="float" office:value="0.0741698517842075">
                <text:p>0.0741698517842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447295526142992">
                <text:p>0.0447295526142992</text:p>
              </table:table-cell>
              <table:table-cell office:value-type="float" office:value="0.0489595445146038">
                <text:p>0.0489595445146038</text:p>
              </table:table-cell>
              <table:table-cell office:value-type="float" office:value="0.0532547033239436">
                <text:p>0.0532547033239436</text:p>
              </table:table-cell>
              <table:table-cell office:value-type="float" office:value="0.0570346552454268">
                <text:p>0.0570346552454268</text:p>
              </table:table-cell>
              <table:table-cell office:value-type="float" office:value="0.0615747002873106">
                <text:p>0.0615747002873106</text:p>
              </table:table-cell>
              <table:table-cell office:value-type="float" office:value="0.0647422373305384">
                <text:p>0.0647422373305384</text:p>
              </table:table-cell>
              <table:table-cell office:value-type="float" office:value="0.0694569691740708">
                <text:p>0.0694569691740708</text:p>
              </table:table-cell>
              <table:table-cell office:value-type="float" office:value="0.0733397734834502">
                <text:p>0.0733397734834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0.0438501026313932">
                <text:p>0.0438501026313932</text:p>
              </table:table-cell>
              <table:table-cell office:value-type="float" office:value="0.0486145023383835">
                <text:p>0.0486145023383835</text:p>
              </table:table-cell>
              <table:table-cell office:value-type="float" office:value="0.0521023921408713">
                <text:p>0.0521023921408713</text:p>
              </table:table-cell>
              <table:table-cell office:value-type="float" office:value="0.0554195113872085">
                <text:p>0.0554195113872085</text:p>
              </table:table-cell>
              <table:table-cell office:value-type="float" office:value="0.0595281510694737">
                <text:p>0.0595281510694737</text:p>
              </table:table-cell>
              <table:table-cell office:value-type="float" office:value="0.0639267462552391">
                <text:p>0.0639267462552391</text:p>
              </table:table-cell>
              <table:table-cell office:value-type="float" office:value="0.0679296239282788">
                <text:p>0.0679296239282788</text:p>
              </table:table-cell>
              <table:table-cell office:value-type="float" office:value="0.0716130003061171">
                <text:p>0.0716130003061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0.0435029959332276">
                <text:p>0.0435029959332276</text:p>
              </table:table-cell>
              <table:table-cell office:value-type="float" office:value="0.0463763088631311">
                <text:p>0.0463763088631311</text:p>
              </table:table-cell>
              <table:table-cell office:value-type="float" office:value="0.0510865618662602">
                <text:p>0.0510865618662602</text:p>
              </table:table-cell>
              <table:table-cell office:value-type="float" office:value="0.0521253041656438">
                <text:p>0.0521253041656438</text:p>
              </table:table-cell>
              <table:table-cell office:value-type="float" office:value="0.0580384836801826">
                <text:p>0.0580384836801826</text:p>
              </table:table-cell>
              <table:table-cell office:value-type="float" office:value="0.0621059051636174">
                <text:p>0.0621059051636174</text:p>
              </table:table-cell>
              <table:table-cell office:value-type="float" office:value="0.0655225863789452">
                <text:p>0.0655225863789452</text:p>
              </table:table-cell>
              <table:table-cell office:value-type="float" office:value="0.0694671510799358">
                <text:p>0.0694671510799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0.040745058249726">
                <text:p>0.040745058249726</text:p>
              </table:table-cell>
              <table:table-cell office:value-type="float" office:value="0.0442198968200951">
                <text:p>0.0442198968200951</text:p>
              </table:table-cell>
              <table:table-cell office:value-type="float" office:value="0.0474913359028232">
                <text:p>0.0474913359028232</text:p>
              </table:table-cell>
              <table:table-cell office:value-type="float" office:value="0.0490007752450729">
                <text:p>0.0490007752450729</text:p>
              </table:table-cell>
              <table:table-cell office:value-type="float" office:value="0.0545501803368215">
                <text:p>0.0545501803368215</text:p>
              </table:table-cell>
              <table:table-cell office:value-type="float" office:value="0.0583245824541852">
                <text:p>0.0583245824541852</text:p>
              </table:table-cell>
              <table:table-cell office:value-type="float" office:value="0.0620813430986628">
                <text:p>0.0620813430986628</text:p>
              </table:table-cell>
              <table:table-cell office:value-type="float" office:value="0.0651473263716363">
                <text:p>0.0651473263716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0.0371397734138802">
                <text:p>0.0371397734138802</text:p>
              </table:table-cell>
              <table:table-cell office:value-type="float" office:value="0.0406368585680752">
                <text:p>0.0406368585680752</text:p>
              </table:table-cell>
              <table:table-cell office:value-type="float" office:value="0.0444753699202055">
                <text:p>0.0444753699202055</text:p>
              </table:table-cell>
              <table:table-cell office:value-type="float" office:value="0.043716040500712">
                <text:p>0.043716040500712</text:p>
              </table:table-cell>
              <table:table-cell office:value-type="float" office:value="0.0503190912086616">
                <text:p>0.0503190912086616</text:p>
              </table:table-cell>
              <table:table-cell office:value-type="float" office:value="0.0536239594180798">
                <text:p>0.0536239594180798</text:p>
              </table:table-cell>
              <table:table-cell office:value-type="float" office:value="0.0573198346909403">
                <text:p>0.0573198346909403</text:p>
              </table:table-cell>
              <table:table-cell office:value-type="float" office:value="0.0608174242298431">
                <text:p>0.0608174242298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0.0339320421825621">
                <text:p>0.0339320421825621</text:p>
              </table:table-cell>
              <table:table-cell office:value-type="float" office:value="0.0357165460688675">
                <text:p>0.0357165460688675</text:p>
              </table:table-cell>
              <table:table-cell office:value-type="float" office:value="0.0389991651832365">
                <text:p>0.0389991651832365</text:p>
              </table:table-cell>
              <table:table-cell office:value-type="float" office:value="0.0385536059592595">
                <text:p>0.0385536059592595</text:p>
              </table:table-cell>
              <table:table-cell office:value-type="float" office:value="0.0455951333590051">
                <text:p>0.0455951333590051</text:p>
              </table:table-cell>
              <table:table-cell office:value-type="float" office:value="0.0484298475617212">
                <text:p>0.0484298475617212</text:p>
              </table:table-cell>
              <table:table-cell office:value-type="float" office:value="0.0508721364748453">
                <text:p>0.0508721364748453</text:p>
              </table:table-cell>
              <table:table-cell office:value-type="float" office:value="0.0535340357096943">
                <text:p>0.0535340357096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0.0290722511591336">
                <text:p>0.0290722511591336</text:p>
              </table:table-cell>
              <table:table-cell office:value-type="float" office:value="0.0305929769549279">
                <text:p>0.0305929769549279</text:p>
              </table:table-cell>
              <table:table-cell office:value-type="float" office:value="0.033015514433586">
                <text:p>0.033015514433586</text:p>
              </table:table-cell>
              <table:table-cell office:value-type="float" office:value="0.0308746402023997">
                <text:p>0.0308746402023997</text:p>
              </table:table-cell>
              <table:table-cell office:value-type="float" office:value="0.0390661989876643">
                <text:p>0.0390661989876643</text:p>
              </table:table-cell>
              <table:table-cell office:value-type="float" office:value="0.0411892703745377">
                <text:p>0.0411892703745377</text:p>
              </table:table-cell>
              <table:table-cell office:value-type="float" office:value="0.0439764997926819">
                <text:p>0.0439764997926819</text:p>
              </table:table-cell>
              <table:table-cell office:value-type="float" office:value="0.0462845711009242">
                <text:p>0.0462845711009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0.023389486201736">
                <text:p>0.023389486201736</text:p>
              </table:table-cell>
              <table:table-cell office:value-type="float" office:value="0.0256590118021491">
                <text:p>0.0256590118021491</text:p>
              </table:table-cell>
              <table:table-cell office:value-type="float" office:value="0.0267907180888873">
                <text:p>0.0267907180888873</text:p>
              </table:table-cell>
              <table:table-cell office:value-type="float" office:value="0.024570597023696">
                <text:p>0.024570597023696</text:p>
              </table:table-cell>
              <table:table-cell office:value-type="float" office:value="0.0312394066402277">
                <text:p>0.0312394066402277</text:p>
              </table:table-cell>
              <table:table-cell office:value-type="float" office:value="0.0330031637496098">
                <text:p>0.0330031637496098</text:p>
              </table:table-cell>
              <table:table-cell office:value-type="float" office:value="0.0347751553591901">
                <text:p>0.0347751553591901</text:p>
              </table:table-cell>
              <table:table-cell office:value-type="float" office:value="0.0377755252084319">
                <text:p>0.0377755252084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0.0176181507080945">
                <text:p>0.0176181507080945</text:p>
              </table:table-cell>
              <table:table-cell office:value-type="float" office:value="0.0186149478421924">
                <text:p>0.0186149478421924</text:p>
              </table:table-cell>
              <table:table-cell office:value-type="float" office:value="0.0202762465261356">
                <text:p>0.0202762465261356</text:p>
              </table:table-cell>
              <table:table-cell office:value-type="float" office:value="0.0166565420118915">
                <text:p>0.0166565420118915</text:p>
              </table:table-cell>
              <table:table-cell office:value-type="float" office:value="0.0232249865727415">
                <text:p>0.0232249865727415</text:p>
              </table:table-cell>
              <table:table-cell office:value-type="float" office:value="0.0249495755334492">
                <text:p>0.0249495755334492</text:p>
              </table:table-cell>
              <table:table-cell office:value-type="float" office:value="0.0262944116649225">
                <text:p>0.0262944116649225</text:p>
              </table:table-cell>
              <table:table-cell office:value-type="float" office:value="0.0278744401488833">
                <text:p>0.0278744401488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0.0112878288381809">
                <text:p>0.0112878288381809</text:p>
              </table:table-cell>
              <table:table-cell office:value-type="float" office:value="0.013141280234735">
                <text:p>0.013141280234735</text:p>
              </table:table-cell>
              <table:table-cell office:value-type="float" office:value="0.0128611217543455">
                <text:p>0.0128611217543455</text:p>
              </table:table-cell>
              <table:table-cell office:value-type="float" office:value="0.00994889916598716">
                <text:p>0.00994889916598716</text:p>
              </table:table-cell>
              <table:table-cell office:value-type="float" office:value="0.0157405485961328">
                <text:p>0.0157405485961328</text:p>
              </table:table-cell>
              <table:table-cell office:value-type="float" office:value="0.016492724015064">
                <text:p>0.016492724015064</text:p>
              </table:table-cell>
              <table:table-cell office:value-type="float" office:value="0.0172220809989295">
                <text:p>0.0172220809989295</text:p>
              </table:table-cell>
              <table:table-cell office:value-type="float" office:value="0.0187408348419746">
                <text:p>0.0187408348419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00558342411467477">
                <text:p>0.00558342411467477</text:p>
              </table:table-cell>
              <table:table-cell office:value-type="float" office:value="0.00631904429841319">
                <text:p>0.00631904429841319</text:p>
              </table:table-cell>
              <table:table-cell office:value-type="float" office:value="0.00664179621382329">
                <text:p>0.00664179621382329</text:p>
              </table:table-cell>
              <table:table-cell office:value-type="float" office:value="0.00252618199467557">
                <text:p>0.00252618199467557</text:p>
              </table:table-cell>
              <table:table-cell office:value-type="float" office:value="0.00839183550484599">
                <text:p>0.00839183550484599</text:p>
              </table:table-cell>
              <table:table-cell office:value-type="float" office:value="0.00897571630249476">
                <text:p>0.00897571630249476</text:p>
              </table:table-cell>
              <table:table-cell office:value-type="float" office:value="0.00924140125031818">
                <text:p>0.00924140125031818</text:p>
              </table:table-cell>
              <table:table-cell office:value-type="float" office:value="0.00987411560997641">
                <text:p>0.00987411560997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0.00109583524589016">
                <text:p>0.00109583524589016</text:p>
              </table:table-cell>
              <table:table-cell office:value-type="float" office:value="0.00117671749035374">
                <text:p>0.00117671749035374</text:p>
              </table:table-cell>
              <table:table-cell office:value-type="float" office:value="0.00178623306596272">
                <text:p>0.00178623306596272</text:p>
              </table:table-cell>
              <table:table-cell office:value-type="float" office:value="-0.0024800360107232">
                <text:p>-0.0024800360107232</text:p>
              </table:table-cell>
              <table:table-cell office:value-type="float" office:value="0.000887437691112613">
                <text:p>0.000887437691112613</text:p>
              </table:table-cell>
              <table:table-cell office:value-type="float" office:value="0.000843794907837158">
                <text:p>0.000843794907837158</text:p>
              </table:table-cell>
              <table:table-cell office:value-type="float" office:value="0.00160288892123965">
                <text:p>0.00160288892123965</text:p>
              </table:table-cell>
              <table:table-cell office:value-type="float" office:value="0.00153703885513419">
                <text:p>0.00153703885513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-0.00320074595933565">
                <text:p>-0.00320074595933565</text:p>
              </table:table-cell>
              <table:table-cell office:value-type="float" office:value="-0.00341554184804495">
                <text:p>-0.00341554184804495</text:p>
              </table:table-cell>
              <table:table-cell office:value-type="float" office:value="-0.003444092226424">
                <text:p>-0.003444092226424</text:p>
              </table:table-cell>
              <table:table-cell office:value-type="float" office:value="-0.00839004642363221">
                <text:p>-0.00839004642363221</text:p>
              </table:table-cell>
              <table:table-cell office:value-type="float" office:value="-0.00433194218881888">
                <text:p>-0.00433194218881888</text:p>
              </table:table-cell>
              <table:table-cell office:value-type="float" office:value="-0.00499218562502743">
                <text:p>-0.00499218562502743</text:p>
              </table:table-cell>
              <table:table-cell office:value-type="float" office:value="-0.00542896928651114">
                <text:p>-0.00542896928651114</text:p>
              </table:table-cell>
              <table:table-cell office:value-type="float" office:value="-0.00477603391043713">
                <text:p>-0.00477603391043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-0.00807028387571765">
                <text:p>-0.00807028387571765</text:p>
              </table:table-cell>
              <table:table-cell office:value-type="float" office:value="-0.00968639396976632">
                <text:p>-0.00968639396976632</text:p>
              </table:table-cell>
              <table:table-cell office:value-type="float" office:value="-0.00990167530522683">
                <text:p>-0.00990167530522683</text:p>
              </table:table-cell>
              <table:table-cell office:value-type="float" office:value="-0.015748691638562">
                <text:p>-0.015748691638562</text:p>
              </table:table-cell>
              <table:table-cell office:value-type="float" office:value="-0.0110120475160625">
                <text:p>-0.0110120475160625</text:p>
              </table:table-cell>
              <table:table-cell office:value-type="float" office:value="-0.0120982208135273">
                <text:p>-0.0120982208135273</text:p>
              </table:table-cell>
              <table:table-cell office:value-type="float" office:value="-0.0128779986284631">
                <text:p>-0.0128779986284631</text:p>
              </table:table-cell>
              <table:table-cell office:value-type="float" office:value="-0.0136484193186139">
                <text:p>-0.0136484193186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-0.0142691136489274">
                <text:p>-0.0142691136489274</text:p>
              </table:table-cell>
              <table:table-cell office:value-type="float" office:value="-0.0160499671630783">
                <text:p>-0.0160499671630783</text:p>
              </table:table-cell>
              <table:table-cell office:value-type="float" office:value="-0.0170759225905672">
                <text:p>-0.0170759225905672</text:p>
              </table:table-cell>
              <table:table-cell office:value-type="float" office:value="-0.0230569399363766">
                <text:p>-0.0230569399363766</text:p>
              </table:table-cell>
              <table:table-cell office:value-type="float" office:value="-0.0190603771577199">
                <text:p>-0.0190603771577199</text:p>
              </table:table-cell>
              <table:table-cell office:value-type="float" office:value="-0.0206321555300669">
                <text:p>-0.0206321555300669</text:p>
              </table:table-cell>
              <table:table-cell office:value-type="float" office:value="-0.021321404817858">
                <text:p>-0.021321404817858</text:p>
              </table:table-cell>
              <table:table-cell office:value-type="float" office:value="-0.0238158857858979">
                <text:p>-0.0238158857858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-0.020164899520722">
                <text:p>-0.020164899520722</text:p>
              </table:table-cell>
              <table:table-cell office:value-type="float" office:value="-0.0217567183159626">
                <text:p>-0.0217567183159626</text:p>
              </table:table-cell>
              <table:table-cell office:value-type="float" office:value="-0.024487513607656">
                <text:p>-0.024487513607656</text:p>
              </table:table-cell>
              <table:table-cell office:value-type="float" office:value="-0.0307855162901449">
                <text:p>-0.0307855162901449</text:p>
              </table:table-cell>
              <table:table-cell office:value-type="float" office:value="-0.0269824487882731">
                <text:p>-0.0269824487882731</text:p>
              </table:table-cell>
              <table:table-cell office:value-type="float" office:value="-0.0288964761390217">
                <text:p>-0.0288964761390217</text:p>
              </table:table-cell>
              <table:table-cell office:value-type="float" office:value="-0.0308911060543017">
                <text:p>-0.0308911060543017</text:p>
              </table:table-cell>
              <table:table-cell office:value-type="float" office:value="-0.0331582757007447">
                <text:p>-0.0331582757007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-0.0264411397025166">
                <text:p>-0.0264411397025166</text:p>
              </table:table-cell>
              <table:table-cell office:value-type="float" office:value="-0.0288324751451079">
                <text:p>-0.0288324751451079</text:p>
              </table:table-cell>
              <table:table-cell office:value-type="float" office:value="-0.0308256743242121">
                <text:p>-0.0308256743242121</text:p>
              </table:table-cell>
              <table:table-cell office:value-type="float" office:value="-0.0379138306067878">
                <text:p>-0.0379138306067878</text:p>
              </table:table-cell>
              <table:table-cell office:value-type="float" office:value="-0.0352652133844226">
                <text:p>-0.0352652133844226</text:p>
              </table:table-cell>
              <table:table-cell office:value-type="float" office:value="-0.0367649455935941">
                <text:p>-0.0367649455935941</text:p>
              </table:table-cell>
              <table:table-cell office:value-type="float" office:value="-0.0396442970732073">
                <text:p>-0.0396442970732073</text:p>
              </table:table-cell>
              <table:table-cell office:value-type="float" office:value="-0.0419160733488791">
                <text:p>-0.04191607334887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-0.0306607518997808">
                <text:p>-0.0306607518997808</text:p>
              </table:table-cell>
              <table:table-cell office:value-type="float" office:value="-0.0342048173694378">
                <text:p>-0.0342048173694378</text:p>
              </table:table-cell>
              <table:table-cell office:value-type="float" office:value="-0.0359621316420249">
                <text:p>-0.0359621316420249</text:p>
              </table:table-cell>
              <table:table-cell office:value-type="float" office:value="-0.0431071826231178">
                <text:p>-0.0431071826231178</text:p>
              </table:table-cell>
              <table:table-cell office:value-type="float" office:value="-0.042465303146706">
                <text:p>-0.042465303146706</text:p>
              </table:table-cell>
              <table:table-cell office:value-type="float" office:value="-0.0446623813707992">
                <text:p>-0.0446623813707992</text:p>
              </table:table-cell>
              <table:table-cell office:value-type="float" office:value="-0.0480005146053537">
                <text:p>-0.0480005146053537</text:p>
              </table:table-cell>
              <table:table-cell office:value-type="float" office:value="-0.0504058306457707">
                <text:p>-0.0504058306457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-0.03501535570261">
                <text:p>-0.03501535570261</text:p>
              </table:table-cell>
              <table:table-cell office:value-type="float" office:value="-0.0393349363525116">
                <text:p>-0.0393349363525116</text:p>
              </table:table-cell>
              <table:table-cell office:value-type="float" office:value="-0.0412217207073351">
                <text:p>-0.0412217207073351</text:p>
              </table:table-cell>
              <table:table-cell office:value-type="float" office:value="-0.0487238655891815">
                <text:p>-0.0487238655891815</text:p>
              </table:table-cell>
              <table:table-cell office:value-type="float" office:value="-0.0473890332794506">
                <text:p>-0.0473890332794506</text:p>
              </table:table-cell>
              <table:table-cell office:value-type="float" office:value="-0.0513338120294143">
                <text:p>-0.0513338120294143</text:p>
              </table:table-cell>
              <table:table-cell office:value-type="float" office:value="-0.0540908154287314">
                <text:p>-0.0540908154287314</text:p>
              </table:table-cell>
              <table:table-cell office:value-type="float" office:value="-0.0575683741374942">
                <text:p>-0.05756837413749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-0.0388029408779956">
                <text:p>-0.0388029408779956</text:p>
              </table:table-cell>
              <table:table-cell office:value-type="float" office:value="-0.0431043628127491">
                <text:p>-0.0431043628127491</text:p>
              </table:table-cell>
              <table:table-cell office:value-type="float" office:value="-0.0465306711004658">
                <text:p>-0.0465306711004658</text:p>
              </table:table-cell>
              <table:table-cell office:value-type="float" office:value="-0.0522328829277862">
                <text:p>-0.0522328829277862</text:p>
              </table:table-cell>
              <table:table-cell office:value-type="float" office:value="-0.0529493990135042">
                <text:p>-0.0529493990135042</text:p>
              </table:table-cell>
              <table:table-cell office:value-type="float" office:value="-0.0556840387298989">
                <text:p>-0.0556840387298989</text:p>
              </table:table-cell>
              <table:table-cell office:value-type="float" office:value="-0.0596035617511441">
                <text:p>-0.0596035617511441</text:p>
              </table:table-cell>
              <table:table-cell office:value-type="float" office:value="-0.0628709377932717">
                <text:p>-0.0628709377932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-0.0420364049804905">
                <text:p>-0.0420364049804905</text:p>
              </table:table-cell>
              <table:table-cell office:value-type="float" office:value="-0.0454805655770687">
                <text:p>-0.0454805655770687</text:p>
              </table:table-cell>
              <table:table-cell office:value-type="float" office:value="-0.0485053423871479">
                <text:p>-0.0485053423871479</text:p>
              </table:table-cell>
              <table:table-cell office:value-type="float" office:value="-0.0542011731748809">
                <text:p>-0.0542011731748809</text:p>
              </table:table-cell>
              <table:table-cell office:value-type="float" office:value="-0.0567160401910389">
                <text:p>-0.0567160401910389</text:p>
              </table:table-cell>
              <table:table-cell office:value-type="float" office:value="-0.060363615980964">
                <text:p>-0.060363615980964</text:p>
              </table:table-cell>
              <table:table-cell office:value-type="float" office:value="-0.0636745166889115">
                <text:p>-0.0636745166889115</text:p>
              </table:table-cell>
              <table:table-cell office:value-type="float" office:value="-0.0680179346067847">
                <text:p>-0.0680179346067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-0.0438081119628429">
                <text:p>-0.0438081119628429</text:p>
              </table:table-cell>
              <table:table-cell office:value-type="float" office:value="-0.0469248108529678">
                <text:p>-0.0469248108529678</text:p>
              </table:table-cell>
              <table:table-cell office:value-type="float" office:value="-0.0519069020873441">
                <text:p>-0.0519069020873441</text:p>
              </table:table-cell>
              <table:table-cell office:value-type="float" office:value="-0.0566703349468878">
                <text:p>-0.0566703349468878</text:p>
              </table:table-cell>
              <table:table-cell office:value-type="float" office:value="-0.0584707746963024">
                <text:p>-0.0584707746963024</text:p>
              </table:table-cell>
              <table:table-cell office:value-type="float" office:value="-0.0627935372009722">
                <text:p>-0.0627935372009722</text:p>
              </table:table-cell>
              <table:table-cell office:value-type="float" office:value="-0.0663063062077885">
                <text:p>-0.0663063062077885</text:p>
              </table:table-cell>
              <table:table-cell office:value-type="float" office:value="-0.0702048783594402">
                <text:p>-0.0702048783594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-0.0453178708752328">
                <text:p>-0.0453178708752328</text:p>
              </table:table-cell>
              <table:table-cell office:value-type="float" office:value="-0.0484155755379133">
                <text:p>-0.0484155755379133</text:p>
              </table:table-cell>
              <table:table-cell office:value-type="float" office:value="-0.0531211213084924">
                <text:p>-0.0531211213084924</text:p>
              </table:table-cell>
              <table:table-cell office:value-type="float" office:value="-0.0571326869599062">
                <text:p>-0.0571326869599062</text:p>
              </table:table-cell>
              <table:table-cell office:value-type="float" office:value="-0.0605254521617938">
                <text:p>-0.0605254521617938</text:p>
              </table:table-cell>
              <table:table-cell office:value-type="float" office:value="-0.0641876728996972">
                <text:p>-0.0641876728996972</text:p>
              </table:table-cell>
              <table:table-cell office:value-type="float" office:value="-0.0678213277312417">
                <text:p>-0.0678213277312417</text:p>
              </table:table-cell>
              <table:table-cell office:value-type="float" office:value="-0.0719980351824743">
                <text:p>-0.0719980351824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-0.0456457394772114">
                <text:p>-0.0456457394772114</text:p>
              </table:table-cell>
              <table:table-cell office:value-type="float" office:value="-0.0490769020530784">
                <text:p>-0.0490769020530784</text:p>
              </table:table-cell>
              <table:table-cell office:value-type="float" office:value="-0.0533497184078933">
                <text:p>-0.0533497184078933</text:p>
              </table:table-cell>
              <table:table-cell office:value-type="float" office:value="-0.0574155146523489">
                <text:p>-0.0574155146523489</text:p>
              </table:table-cell>
              <table:table-cell office:value-type="float" office:value="-0.06086138125278">
                <text:p>-0.06086138125278</text:p>
              </table:table-cell>
              <table:table-cell office:value-type="float" office:value="-0.0657066261097984">
                <text:p>-0.0657066261097984</text:p>
              </table:table-cell>
              <table:table-cell office:value-type="float" office:value="-0.0690740108177116">
                <text:p>-0.0690740108177116</text:p>
              </table:table-cell>
              <table:table-cell office:value-type="float" office:value="-0.0734155916076483">
                <text:p>-0.0734155916076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-0.0461708910981616">
                <text:p>-0.0461708910981616</text:p>
              </table:table-cell>
              <table:table-cell office:value-type="float" office:value="-0.0505847817295289">
                <text:p>-0.0505847817295289</text:p>
              </table:table-cell>
              <table:table-cell office:value-type="float" office:value="-0.0545240718545204">
                <text:p>-0.0545240718545204</text:p>
              </table:table-cell>
              <table:table-cell office:value-type="float" office:value="-0.0574877089045208">
                <text:p>-0.0574877089045208</text:p>
              </table:table-cell>
              <table:table-cell office:value-type="float" office:value="-0.0614957952712044">
                <text:p>-0.0614957952712044</text:p>
              </table:table-cell>
              <table:table-cell office:value-type="float" office:value="-0.0659829271194309">
                <text:p>-0.0659829271194309</text:p>
              </table:table-cell>
              <table:table-cell office:value-type="float" office:value="-0.070581805167108">
                <text:p>-0.070581805167108</text:p>
              </table:table-cell>
              <table:table-cell office:value-type="float" office:value="-0.0740837331126326">
                <text:p>-0.0740837331126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-0.046262695207217">
                <text:p>-0.046262695207217</text:p>
              </table:table-cell>
              <table:table-cell office:value-type="float" office:value="-0.0496898465096034">
                <text:p>-0.0496898465096034</text:p>
              </table:table-cell>
              <table:table-cell office:value-type="float" office:value="-0.0542016771954449">
                <text:p>-0.0542016771954449</text:p>
              </table:table-cell>
              <table:table-cell office:value-type="float" office:value="-0.057380659373624">
                <text:p>-0.057380659373624</text:p>
              </table:table-cell>
              <table:table-cell office:value-type="float" office:value="-0.0617847050541408">
                <text:p>-0.0617847050541408</text:p>
              </table:table-cell>
              <table:table-cell office:value-type="float" office:value="-0.0656954786562541">
                <text:p>-0.0656954786562541</text:p>
              </table:table-cell>
              <table:table-cell office:value-type="float" office:value="-0.069621091037347">
                <text:p>-0.069621091037347</text:p>
              </table:table-cell>
              <table:table-cell office:value-type="float" office:value="-0.0744980239339725">
                <text:p>-0.0744980239339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-0.0457504968613997">
                <text:p>-0.0457504968613997</text:p>
              </table:table-cell>
              <table:table-cell office:value-type="float" office:value="-0.0504367433803005">
                <text:p>-0.0504367433803005</text:p>
              </table:table-cell>
              <table:table-cell office:value-type="float" office:value="-0.0538587658127162">
                <text:p>-0.0538587658127162</text:p>
              </table:table-cell>
              <table:table-cell office:value-type="float" office:value="-0.0574580992148926">
                <text:p>-0.0574580992148926</text:p>
              </table:table-cell>
              <table:table-cell office:value-type="float" office:value="-0.0613245272750947">
                <text:p>-0.0613245272750947</text:p>
              </table:table-cell>
              <table:table-cell office:value-type="float" office:value="-0.0660106039603306">
                <text:p>-0.0660106039603306</text:p>
              </table:table-cell>
              <table:table-cell office:value-type="float" office:value="-0.0695678834806431">
                <text:p>-0.0695678834806431</text:p>
              </table:table-cell>
              <table:table-cell office:value-type="float" office:value="-0.0744371035812501">
                <text:p>-0.0744371035812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-0.0461235358921647">
                <text:p>-0.0461235358921647</text:p>
              </table:table-cell>
              <table:table-cell office:value-type="float" office:value="-0.0499655330679449">
                <text:p>-0.0499655330679449</text:p>
              </table:table-cell>
              <table:table-cell office:value-type="float" office:value="-0.0534630406372491">
                <text:p>-0.0534630406372491</text:p>
              </table:table-cell>
              <table:table-cell office:value-type="float" office:value="-0.0580541827295229">
                <text:p>-0.0580541827295229</text:p>
              </table:table-cell>
              <table:table-cell office:value-type="float" office:value="-0.0620134344824549">
                <text:p>-0.0620134344824549</text:p>
              </table:table-cell>
              <table:table-cell office:value-type="float" office:value="-0.0660496210423053">
                <text:p>-0.0660496210423053</text:p>
              </table:table-cell>
              <table:table-cell office:value-type="float" office:value="-0.0700738534777872">
                <text:p>-0.0700738534777872</text:p>
              </table:table-cell>
              <table:table-cell office:value-type="float" office:value="-0.0738266960389897">
                <text:p>-0.0738266960389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-0.0453984420070286">
                <text:p>-0.0453984420070286</text:p>
              </table:table-cell>
              <table:table-cell office:value-type="float" office:value="-0.0501957721189083">
                <text:p>-0.0501957721189083</text:p>
              </table:table-cell>
              <table:table-cell office:value-type="float" office:value="-0.0542111201011194">
                <text:p>-0.0542111201011194</text:p>
              </table:table-cell>
              <table:table-cell office:value-type="float" office:value="-0.0575399211335753">
                <text:p>-0.0575399211335753</text:p>
              </table:table-cell>
              <table:table-cell office:value-type="float" office:value="-0.062060848595524">
                <text:p>-0.062060848595524</text:p>
              </table:table-cell>
              <table:table-cell office:value-type="float" office:value="-0.0666759479310718">
                <text:p>-0.0666759479310718</text:p>
              </table:table-cell>
              <table:table-cell office:value-type="float" office:value="-0.069741668912264">
                <text:p>-0.069741668912264</text:p>
              </table:table-cell>
              <table:table-cell office:value-type="float" office:value="-0.0735008716875831">
                <text:p>-0.073500871687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-0.0460173313736629">
                <text:p>-0.0460173313736629</text:p>
              </table:table-cell>
              <table:table-cell office:value-type="float" office:value="-0.0494927567770725">
                <text:p>-0.0494927567770725</text:p>
              </table:table-cell>
              <table:table-cell office:value-type="float" office:value="-0.0541073197677244">
                <text:p>-0.0541073197677244</text:p>
              </table:table-cell>
              <table:table-cell office:value-type="float" office:value="-0.0582087849024037">
                <text:p>-0.0582087849024037</text:p>
              </table:table-cell>
              <table:table-cell office:value-type="float" office:value="-0.0624528580552738">
                <text:p>-0.0624528580552738</text:p>
              </table:table-cell>
              <table:table-cell office:value-type="float" office:value="-0.0656305020362257">
                <text:p>-0.0656305020362257</text:p>
              </table:table-cell>
              <table:table-cell office:value-type="float" office:value="-0.0706757441189584">
                <text:p>-0.0706757441189584</text:p>
              </table:table-cell>
              <table:table-cell office:value-type="float" office:value="-0.0741692706768682">
                <text:p>-0.0741692706768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0.0457807833432101">
                <text:p>-0.0457807833432101</text:p>
              </table:table-cell>
              <table:table-cell office:value-type="float" office:value="-0.0492985141268315">
                <text:p>-0.0492985141268315</text:p>
              </table:table-cell>
              <table:table-cell office:value-type="float" office:value="-0.0542411932859275">
                <text:p>-0.0542411932859275</text:p>
              </table:table-cell>
              <table:table-cell office:value-type="float" office:value="-0.0573952985272369">
                <text:p>-0.0573952985272369</text:p>
              </table:table-cell>
              <table:table-cell office:value-type="float" office:value="-0.0612521843379205">
                <text:p>-0.0612521843379205</text:p>
              </table:table-cell>
              <table:table-cell office:value-type="float" office:value="-0.0656771420470077">
                <text:p>-0.0656771420470077</text:p>
              </table:table-cell>
              <table:table-cell office:value-type="float" office:value="-0.0704039187564434">
                <text:p>-0.0704039187564434</text:p>
              </table:table-cell>
              <table:table-cell office:value-type="float" office:value="-0.0741040919405192">
                <text:p>-0.0741040919405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0.0453301280527041">
                <text:p>-0.0453301280527041</text:p>
              </table:table-cell>
              <table:table-cell office:value-type="float" office:value="-0.0490249812408331">
                <text:p>-0.0490249812408331</text:p>
              </table:table-cell>
              <table:table-cell office:value-type="float" office:value="-0.0534143905377295">
                <text:p>-0.0534143905377295</text:p>
              </table:table-cell>
              <table:table-cell office:value-type="float" office:value="-0.05660833301171">
                <text:p>-0.05660833301171</text:p>
              </table:table-cell>
              <table:table-cell office:value-type="float" office:value="-0.0613875711533879">
                <text:p>-0.0613875711533879</text:p>
              </table:table-cell>
              <table:table-cell office:value-type="float" office:value="-0.0659556251871755">
                <text:p>-0.0659556251871755</text:p>
              </table:table-cell>
              <table:table-cell office:value-type="float" office:value="-0.0694163280689587">
                <text:p>-0.0694163280689587</text:p>
              </table:table-cell>
              <table:table-cell office:value-type="float" office:value="-0.0734590402361613">
                <text:p>-0.07345904023616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-0.0450500618444213">
                <text:p>-0.0450500618444213</text:p>
              </table:table-cell>
              <table:table-cell office:value-type="float" office:value="-0.0479959552282713">
                <text:p>-0.0479959552282713</text:p>
              </table:table-cell>
              <table:table-cell office:value-type="float" office:value="-0.0518612486623339">
                <text:p>-0.0518612486623339</text:p>
              </table:table-cell>
              <table:table-cell office:value-type="float" office:value="-0.0553005344124085">
                <text:p>-0.0553005344124085</text:p>
              </table:table-cell>
              <table:table-cell office:value-type="float" office:value="-0.060424725413303">
                <text:p>-0.060424725413303</text:p>
              </table:table-cell>
              <table:table-cell office:value-type="float" office:value="-0.0646167308132711">
                <text:p>-0.0646167308132711</text:p>
              </table:table-cell>
              <table:table-cell office:value-type="float" office:value="-0.0686296166003768">
                <text:p>-0.0686296166003768</text:p>
              </table:table-cell>
              <table:table-cell office:value-type="float" office:value="-0.0724208081272139">
                <text:p>-0.0724208081272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0.0435133771767898">
                <text:p>-0.0435133771767898</text:p>
              </table:table-cell>
              <table:table-cell office:value-type="float" office:value="-0.047217673392269">
                <text:p>-0.047217673392269</text:p>
              </table:table-cell>
              <table:table-cell office:value-type="float" office:value="-0.0511667586998577">
                <text:p>-0.0511667586998577</text:p>
              </table:table-cell>
              <table:table-cell office:value-type="float" office:value="-0.0533378050946439">
                <text:p>-0.0533378050946439</text:p>
              </table:table-cell>
              <table:table-cell office:value-type="float" office:value="-0.0587304274475803">
                <text:p>-0.0587304274475803</text:p>
              </table:table-cell>
              <table:table-cell office:value-type="float" office:value="-0.0622478291328559">
                <text:p>-0.0622478291328559</text:p>
              </table:table-cell>
              <table:table-cell office:value-type="float" office:value="-0.0666054465535671">
                <text:p>-0.0666054465535671</text:p>
              </table:table-cell>
              <table:table-cell office:value-type="float" office:value="-0.0697005705124048">
                <text:p>-0.0697005705124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-0.0407417607836957">
                <text:p>-0.0407417607836957</text:p>
              </table:table-cell>
              <table:table-cell office:value-type="float" office:value="-0.044870529082044">
                <text:p>-0.044870529082044</text:p>
              </table:table-cell>
              <table:table-cell office:value-type="float" office:value="-0.0482711510742886">
                <text:p>-0.0482711510742886</text:p>
              </table:table-cell>
              <table:table-cell office:value-type="float" office:value="-0.0491149693024545">
                <text:p>-0.0491149693024545</text:p>
              </table:table-cell>
              <table:table-cell office:value-type="float" office:value="-0.0554416661985416">
                <text:p>-0.0554416661985416</text:p>
              </table:table-cell>
              <table:table-cell office:value-type="float" office:value="-0.0587766480437927">
                <text:p>-0.0587766480437927</text:p>
              </table:table-cell>
              <table:table-cell office:value-type="float" office:value="-0.0623114498159704">
                <text:p>-0.0623114498159704</text:p>
              </table:table-cell>
              <table:table-cell office:value-type="float" office:value="-0.065993892348139">
                <text:p>-0.065993892348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0.0378054661638987">
                <text:p>-0.0378054661638987</text:p>
              </table:table-cell>
              <table:table-cell office:value-type="float" office:value="-0.041331594692912">
                <text:p>-0.041331594692912</text:p>
              </table:table-cell>
              <table:table-cell office:value-type="float" office:value="-0.0449306302719572">
                <text:p>-0.0449306302719572</text:p>
              </table:table-cell>
              <table:table-cell office:value-type="float" office:value="-0.0446127913408271">
                <text:p>-0.0446127913408271</text:p>
              </table:table-cell>
              <table:table-cell office:value-type="float" office:value="-0.0512719814222857">
                <text:p>-0.0512719814222857</text:p>
              </table:table-cell>
              <table:table-cell office:value-type="float" office:value="-0.0546924417435783">
                <text:p>-0.0546924417435783</text:p>
              </table:table-cell>
              <table:table-cell office:value-type="float" office:value="-0.0586290124619392">
                <text:p>-0.0586290124619392</text:p>
              </table:table-cell>
              <table:table-cell office:value-type="float" office:value="-0.0622721582836867">
                <text:p>-0.0622721582836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0.0351910630181451">
                <text:p>-0.0351910630181451</text:p>
              </table:table-cell>
              <table:table-cell office:value-type="float" office:value="-0.0381115211459969">
                <text:p>-0.0381115211459969</text:p>
              </table:table-cell>
              <table:table-cell office:value-type="float" office:value="-0.0399682598710041">
                <text:p>-0.0399682598710041</text:p>
              </table:table-cell>
              <table:table-cell office:value-type="float" office:value="-0.0393918703442271">
                <text:p>-0.0393918703442271</text:p>
              </table:table-cell>
              <table:table-cell office:value-type="float" office:value="-0.0460768851286038">
                <text:p>-0.0460768851286038</text:p>
              </table:table-cell>
              <table:table-cell office:value-type="float" office:value="-0.0499577254630156">
                <text:p>-0.0499577254630156</text:p>
              </table:table-cell>
              <table:table-cell office:value-type="float" office:value="-0.0532479676035987">
                <text:p>-0.0532479676035987</text:p>
              </table:table-cell>
              <table:table-cell office:value-type="float" office:value="-0.0560974150256658">
                <text:p>-0.0560974150256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0.0295432594680165">
                <text:p>-0.0295432594680165</text:p>
              </table:table-cell>
              <table:table-cell office:value-type="float" office:value="-0.032467383004445">
                <text:p>-0.032467383004445</text:p>
              </table:table-cell>
              <table:table-cell office:value-type="float" office:value="-0.0351393100669179">
                <text:p>-0.0351393100669179</text:p>
              </table:table-cell>
              <table:table-cell office:value-type="float" office:value="-0.0325448336068428">
                <text:p>-0.0325448336068428</text:p>
              </table:table-cell>
              <table:table-cell office:value-type="float" office:value="-0.0408143034962452">
                <text:p>-0.0408143034962452</text:p>
              </table:table-cell>
              <table:table-cell office:value-type="float" office:value="-0.04346769411915">
                <text:p>-0.04346769411915</text:p>
              </table:table-cell>
              <table:table-cell office:value-type="float" office:value="-0.0454589129944716">
                <text:p>-0.0454589129944716</text:p>
              </table:table-cell>
              <table:table-cell office:value-type="float" office:value="-0.0485661048249013">
                <text:p>-0.0485661048249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0.0245030140137272">
                <text:p>-0.0245030140137272</text:p>
              </table:table-cell>
              <table:table-cell office:value-type="float" office:value="-0.0264552426162018">
                <text:p>-0.0264552426162018</text:p>
              </table:table-cell>
              <table:table-cell office:value-type="float" office:value="-0.0284323192180358">
                <text:p>-0.0284323192180358</text:p>
              </table:table-cell>
              <table:table-cell office:value-type="float" office:value="-0.0266476511895293">
                <text:p>-0.0266476511895293</text:p>
              </table:table-cell>
              <table:table-cell office:value-type="float" office:value="-0.0331533257577111">
                <text:p>-0.0331533257577111</text:p>
              </table:table-cell>
              <table:table-cell office:value-type="float" office:value="-0.0357695286733109">
                <text:p>-0.0357695286733109</text:p>
              </table:table-cell>
              <table:table-cell office:value-type="float" office:value="-0.0372196709704254">
                <text:p>-0.0372196709704254</text:p>
              </table:table-cell>
              <table:table-cell office:value-type="float" office:value="-0.0389941596525713">
                <text:p>-0.0389941596525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0.0194886845111786">
                <text:p>-0.0194886845111786</text:p>
              </table:table-cell>
              <table:table-cell office:value-type="float" office:value="-0.0210683929467992">
                <text:p>-0.0210683929467992</text:p>
              </table:table-cell>
              <table:table-cell office:value-type="float" office:value="-0.0224645738156541">
                <text:p>-0.0224645738156541</text:p>
              </table:table-cell>
              <table:table-cell office:value-type="float" office:value="-0.0192720100733451">
                <text:p>-0.0192720100733451</text:p>
              </table:table-cell>
              <table:table-cell office:value-type="float" office:value="-0.0258590302660914">
                <text:p>-0.0258590302660914</text:p>
              </table:table-cell>
              <table:table-cell office:value-type="float" office:value="-0.0270357330737393">
                <text:p>-0.0270357330737393</text:p>
              </table:table-cell>
              <table:table-cell office:value-type="float" office:value="-0.0281776747648857">
                <text:p>-0.0281776747648857</text:p>
              </table:table-cell>
              <table:table-cell office:value-type="float" office:value="-0.0303622587710715">
                <text:p>-0.0303622587710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0.0125393860594146">
                <text:p>-0.0125393860594146</text:p>
              </table:table-cell>
              <table:table-cell office:value-type="float" office:value="-0.0138370480845864">
                <text:p>-0.0138370480845864</text:p>
              </table:table-cell>
              <table:table-cell office:value-type="float" office:value="-0.0152376237619729">
                <text:p>-0.0152376237619729</text:p>
              </table:table-cell>
              <table:table-cell office:value-type="float" office:value="-0.011137256545816">
                <text:p>-0.011137256545816</text:p>
              </table:table-cell>
              <table:table-cell office:value-type="float" office:value="-0.017203872571743">
                <text:p>-0.017203872571743</text:p>
              </table:table-cell>
              <table:table-cell office:value-type="float" office:value="-0.0186259058426478">
                <text:p>-0.0186259058426478</text:p>
              </table:table-cell>
              <table:table-cell office:value-type="float" office:value="-0.0197922702898215">
                <text:p>-0.0197922702898215</text:p>
              </table:table-cell>
              <table:table-cell office:value-type="float" office:value="-0.0210786447260561">
                <text:p>-0.0210786447260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-0.00716487065611932">
                <text:p>-0.00716487065611932</text:p>
              </table:table-cell>
              <table:table-cell office:value-type="float" office:value="-0.00747984790777278">
                <text:p>-0.00747984790777278</text:p>
              </table:table-cell>
              <table:table-cell office:value-type="float" office:value="-0.0082221853223502">
                <text:p>-0.0082221853223502</text:p>
              </table:table-cell>
              <table:table-cell office:value-type="float" office:value="-0.00528009601262967">
                <text:p>-0.00528009601262967</text:p>
              </table:table-cell>
              <table:table-cell office:value-type="float" office:value="-0.0093192364979294">
                <text:p>-0.0093192364979294</text:p>
              </table:table-cell>
              <table:table-cell office:value-type="float" office:value="-0.0109983500559486">
                <text:p>-0.0109983500559486</text:p>
              </table:table-cell>
              <table:table-cell office:value-type="float" office:value="-0.0105832376368791">
                <text:p>-0.0105832376368791</text:p>
              </table:table-cell>
              <table:table-cell office:value-type="float" office:value="-0.0112210604055722">
                <text:p>-0.0112210604055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-0.00265192072436116">
                <text:p>-0.00265192072436116</text:p>
              </table:table-cell>
              <table:table-cell office:value-type="float" office:value="-0.00265342619236822">
                <text:p>-0.00265342619236822</text:p>
              </table:table-cell>
              <table:table-cell office:value-type="float" office:value="-0.00305000281126785">
                <text:p>-0.00305000281126785</text:p>
              </table:table-cell>
              <table:table-cell office:value-type="float" office:value="0.00117161891050399">
                <text:p>0.00117161891050399</text:p>
              </table:table-cell>
              <table:table-cell office:value-type="float" office:value="-0.00243867732417278">
                <text:p>-0.00243867732417278</text:p>
              </table:table-cell>
              <table:table-cell office:value-type="float" office:value="-0.00364024134144896">
                <text:p>-0.00364024134144896</text:p>
              </table:table-cell>
              <table:table-cell office:value-type="float" office:value="-0.00278314084062805">
                <text:p>-0.00278314084062805</text:p>
              </table:table-cell>
              <table:table-cell office:value-type="float" office:value="-0.00306263447730673">
                <text:p>-0.00306263447730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0.00284115650900799">
                <text:p>0.00284115650900799</text:p>
              </table:table-cell>
              <table:table-cell office:value-type="float" office:value="0.00207802551118985">
                <text:p>0.00207802551118985</text:p>
              </table:table-cell>
              <table:table-cell office:value-type="float" office:value="0.00312490369882005">
                <text:p>0.00312490369882005</text:p>
              </table:table-cell>
              <table:table-cell office:value-type="float" office:value="0.00740545519864055">
                <text:p>0.00740545519864055</text:p>
              </table:table-cell>
              <table:table-cell office:value-type="float" office:value="0.00322033242815412">
                <text:p>0.00322033242815412</text:p>
              </table:table-cell>
              <table:table-cell office:value-type="float" office:value="0.00379966932669434">
                <text:p>0.00379966932669434</text:p>
              </table:table-cell>
              <table:table-cell office:value-type="float" office:value="0.00279005772522325">
                <text:p>0.00279005772522325</text:p>
              </table:table-cell>
              <table:table-cell office:value-type="float" office:value="0.00333024248505262">
                <text:p>0.00333024248505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0.00688272192360169">
                <text:p>0.00688272192360169</text:p>
              </table:table-cell>
              <table:table-cell office:value-type="float" office:value="0.00854428000453107">
                <text:p>0.00854428000453107</text:p>
              </table:table-cell>
              <table:table-cell office:value-type="float" office:value="0.00861095761319714">
                <text:p>0.00861095761319714</text:p>
              </table:table-cell>
              <table:table-cell office:value-type="float" office:value="0.0144693593684661">
                <text:p>0.0144693593684661</text:p>
              </table:table-cell>
              <table:table-cell office:value-type="float" office:value="0.00913672204641948">
                <text:p>0.00913672204641948</text:p>
              </table:table-cell>
              <table:table-cell office:value-type="float" office:value="0.0107767274582736">
                <text:p>0.0107767274582736</text:p>
              </table:table-cell>
              <table:table-cell office:value-type="float" office:value="0.0105815326103073">
                <text:p>0.0105815326103073</text:p>
              </table:table-cell>
              <table:table-cell office:value-type="float" office:value="0.0114323342001488">
                <text:p>0.0114323342001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0.0135581787556438">
                <text:p>0.0135581787556438</text:p>
              </table:table-cell>
              <table:table-cell office:value-type="float" office:value="0.0139506591679975">
                <text:p>0.0139506591679975</text:p>
              </table:table-cell>
              <table:table-cell office:value-type="float" office:value="0.0152634308713113">
                <text:p>0.0152634308713113</text:p>
              </table:table-cell>
              <table:table-cell office:value-type="float" office:value="0.0217853331731222">
                <text:p>0.0217853331731222</text:p>
              </table:table-cell>
              <table:table-cell office:value-type="float" office:value="0.017759379076488">
                <text:p>0.017759379076488</text:p>
              </table:table-cell>
              <table:table-cell office:value-type="float" office:value="0.0192505196061094">
                <text:p>0.0192505196061094</text:p>
              </table:table-cell>
              <table:table-cell office:value-type="float" office:value="0.0191463346644075">
                <text:p>0.0191463346644075</text:p>
              </table:table-cell>
              <table:table-cell office:value-type="float" office:value="0.0210313739326137">
                <text:p>0.0210313739326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0.0190647460525">
                <text:p>0.0190647460525</text:p>
              </table:table-cell>
              <table:table-cell office:value-type="float" office:value="0.0199389932650754">
                <text:p>0.0199389932650754</text:p>
              </table:table-cell>
              <table:table-cell office:value-type="float" office:value="0.0221796976010631">
                <text:p>0.0221796976010631</text:p>
              </table:table-cell>
              <table:table-cell office:value-type="float" office:value="0.0286915483339989">
                <text:p>0.0286915483339989</text:p>
              </table:table-cell>
              <table:table-cell office:value-type="float" office:value="0.0256048922434589">
                <text:p>0.0256048922434589</text:p>
              </table:table-cell>
              <table:table-cell office:value-type="float" office:value="0.0272657698142721">
                <text:p>0.0272657698142721</text:p>
              </table:table-cell>
              <table:table-cell office:value-type="float" office:value="0.0285010322461748">
                <text:p>0.0285010322461748</text:p>
              </table:table-cell>
              <table:table-cell office:value-type="float" office:value="0.0303459441570479">
                <text:p>0.0303459441570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0.0252938283623114">
                <text:p>0.0252938283623114</text:p>
              </table:table-cell>
              <table:table-cell office:value-type="float" office:value="0.0268862252066408">
                <text:p>0.0268862252066408</text:p>
              </table:table-cell>
              <table:table-cell office:value-type="float" office:value="0.0287032383805772">
                <text:p>0.0287032383805772</text:p>
              </table:table-cell>
              <table:table-cell office:value-type="float" office:value="0.0362247299853803">
                <text:p>0.0362247299853803</text:p>
              </table:table-cell>
              <table:table-cell office:value-type="float" office:value="0.0338780697306483">
                <text:p>0.0338780697306483</text:p>
              </table:table-cell>
              <table:table-cell office:value-type="float" office:value="0.0360466616453306">
                <text:p>0.0360466616453306</text:p>
              </table:table-cell>
              <table:table-cell office:value-type="float" office:value="0.0368917563599523">
                <text:p>0.0368917563599523</text:p>
              </table:table-cell>
              <table:table-cell office:value-type="float" office:value="0.0403350943848877">
                <text:p>0.0403350943848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0.0297659837357475">
                <text:p>0.0297659837357475</text:p>
              </table:table-cell>
              <table:table-cell office:value-type="float" office:value="0.0327571852249469">
                <text:p>0.0327571852249469</text:p>
              </table:table-cell>
              <table:table-cell office:value-type="float" office:value="0.035088188053513">
                <text:p>0.035088188053513</text:p>
              </table:table-cell>
              <table:table-cell office:value-type="float" office:value="0.0419988470693137">
                <text:p>0.0419988470693137</text:p>
              </table:table-cell>
              <table:table-cell office:value-type="float" office:value="0.0397072611146417">
                <text:p>0.0397072611146417</text:p>
              </table:table-cell>
              <table:table-cell office:value-type="float" office:value="0.042562218926076">
                <text:p>0.042562218926076</text:p>
              </table:table-cell>
              <table:table-cell office:value-type="float" office:value="0.0458470646233734">
                <text:p>0.0458470646233734</text:p>
              </table:table-cell>
              <table:table-cell office:value-type="float" office:value="0.047813903359312">
                <text:p>0.047813903359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0.0347832789153614">
                <text:p>0.0347832789153614</text:p>
              </table:table-cell>
              <table:table-cell office:value-type="float" office:value="0.0369556128528225">
                <text:p>0.0369556128528225</text:p>
              </table:table-cell>
              <table:table-cell office:value-type="float" office:value="0.0401962025703287">
                <text:p>0.0401962025703287</text:p>
              </table:table-cell>
              <table:table-cell office:value-type="float" office:value="0.0470244105393954">
                <text:p>0.0470244105393954</text:p>
              </table:table-cell>
              <table:table-cell office:value-type="float" office:value="0.0465847656184532">
                <text:p>0.0465847656184532</text:p>
              </table:table-cell>
              <table:table-cell office:value-type="float" office:value="0.0489212047699945">
                <text:p>0.0489212047699945</text:p>
              </table:table-cell>
              <table:table-cell office:value-type="float" office:value="0.0532380721367186">
                <text:p>0.0532380721367186</text:p>
              </table:table-cell>
              <table:table-cell office:value-type="float" office:value="0.0553350322883439">
                <text:p>0.0553350322883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0.0382643831711018">
                <text:p>0.0382643831711018</text:p>
              </table:table-cell>
              <table:table-cell office:value-type="float" office:value="0.0410873144927282">
                <text:p>0.0410873144927282</text:p>
              </table:table-cell>
              <table:table-cell office:value-type="float" office:value="0.0455973579738979">
                <text:p>0.0455973579738979</text:p>
              </table:table-cell>
              <table:table-cell office:value-type="float" office:value="0.0514376351743674">
                <text:p>0.0514376351743674</text:p>
              </table:table-cell>
              <table:table-cell office:value-type="float" office:value="0.0511424230583416">
                <text:p>0.0511424230583416</text:p>
              </table:table-cell>
              <table:table-cell office:value-type="float" office:value="0.0556659358329896">
                <text:p>0.0556659358329896</text:p>
              </table:table-cell>
              <table:table-cell office:value-type="float" office:value="0.0586532916246257">
                <text:p>0.0586532916246257</text:p>
              </table:table-cell>
              <table:table-cell office:value-type="float" office:value="0.061151624799065">
                <text:p>0.061151624799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0.0415020134753109">
                <text:p>0.0415020134753109</text:p>
              </table:table-cell>
              <table:table-cell office:value-type="float" office:value="0.0452088018985438">
                <text:p>0.0452088018985438</text:p>
              </table:table-cell>
              <table:table-cell office:value-type="float" office:value="0.0487269948959244">
                <text:p>0.0487269948959244</text:p>
              </table:table-cell>
              <table:table-cell office:value-type="float" office:value="0.0542577633065626">
                <text:p>0.0542577633065626</text:p>
              </table:table-cell>
              <table:table-cell office:value-type="float" office:value="0.0558262921151948">
                <text:p>0.0558262921151948</text:p>
              </table:table-cell>
              <table:table-cell office:value-type="float" office:value="0.0598369626674676">
                <text:p>0.0598369626674676</text:p>
              </table:table-cell>
              <table:table-cell office:value-type="float" office:value="0.0631714322714366">
                <text:p>0.0631714322714366</text:p>
              </table:table-cell>
              <table:table-cell office:value-type="float" office:value="0.0664740099702071">
                <text:p>0.0664740099702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0.0437718383867229">
                <text:p>0.0437718383867229</text:p>
              </table:table-cell>
              <table:table-cell office:value-type="float" office:value="0.0471331096881252">
                <text:p>0.0471331096881252</text:p>
              </table:table-cell>
              <table:table-cell office:value-type="float" office:value="0.0509984247113977">
                <text:p>0.0509984247113977</text:p>
              </table:table-cell>
              <table:table-cell office:value-type="float" office:value="0.0563974265926602">
                <text:p>0.0563974265926602</text:p>
              </table:table-cell>
              <table:table-cell office:value-type="float" office:value="0.0590968370793726">
                <text:p>0.0590968370793726</text:p>
              </table:table-cell>
              <table:table-cell office:value-type="float" office:value="0.0617280810004752">
                <text:p>0.0617280810004752</text:p>
              </table:table-cell>
              <table:table-cell office:value-type="float" office:value="0.0656703400388568">
                <text:p>0.0656703400388568</text:p>
              </table:table-cell>
              <table:table-cell office:value-type="float" office:value="0.0703883714947208">
                <text:p>0.0703883714947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0.0453537402145723">
                <text:p>0.0453537402145723</text:p>
              </table:table-cell>
              <table:table-cell office:value-type="float" office:value="0.0480590658762869">
                <text:p>0.0480590658762869</text:p>
              </table:table-cell>
              <table:table-cell office:value-type="float" office:value="0.0521086683295278">
                <text:p>0.0521086683295278</text:p>
              </table:table-cell>
              <table:table-cell office:value-type="float" office:value="0.0571813416712839">
                <text:p>0.0571813416712839</text:p>
              </table:table-cell>
              <table:table-cell office:value-type="float" office:value="0.0609926841501224">
                <text:p>0.0609926841501224</text:p>
              </table:table-cell>
              <table:table-cell office:value-type="float" office:value="0.0647688320722945">
                <text:p>0.0647688320722945</text:p>
              </table:table-cell>
              <table:table-cell office:value-type="float" office:value="0.0676345713328279">
                <text:p>0.0676345713328279</text:p>
              </table:table-cell>
              <table:table-cell office:value-type="float" office:value="0.0715424510511147">
                <text:p>0.0715424510511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0.0458010614480126">
                <text:p>0.0458010614480126</text:p>
              </table:table-cell>
              <table:table-cell office:value-type="float" office:value="0.0490750061360337">
                <text:p>0.0490750061360337</text:p>
              </table:table-cell>
              <table:table-cell office:value-type="float" office:value="0.0537946693049085">
                <text:p>0.0537946693049085</text:p>
              </table:table-cell>
              <table:table-cell office:value-type="float" office:value="0.0578720044137796">
                <text:p>0.0578720044137796</text:p>
              </table:table-cell>
              <table:table-cell office:value-type="float" office:value="0.0619081009485396">
                <text:p>0.0619081009485396</text:p>
              </table:table-cell>
              <table:table-cell office:value-type="float" office:value="0.0653029246891466">
                <text:p>0.0653029246891466</text:p>
              </table:table-cell>
              <table:table-cell office:value-type="float" office:value="0.0688437893887107">
                <text:p>0.0688437893887107</text:p>
              </table:table-cell>
              <table:table-cell office:value-type="float" office:value="0.0731119976950531">
                <text:p>0.07311199769505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0.0455247893571539">
                <text:p>0.0455247893571539</text:p>
              </table:table-cell>
              <table:table-cell office:value-type="float" office:value="0.0496592998361459">
                <text:p>0.0496592998361459</text:p>
              </table:table-cell>
              <table:table-cell office:value-type="float" office:value="0.0538327307892508">
                <text:p>0.0538327307892508</text:p>
              </table:table-cell>
              <table:table-cell office:value-type="float" office:value="0.0584259087262904">
                <text:p>0.0584259087262904</text:p>
              </table:table-cell>
              <table:table-cell office:value-type="float" office:value="0.0617273024974735">
                <text:p>0.0617273024974735</text:p>
              </table:table-cell>
              <table:table-cell office:value-type="float" office:value="0.0663435182381864">
                <text:p>0.0663435182381864</text:p>
              </table:table-cell>
              <table:table-cell office:value-type="float" office:value="0.0705093125241705">
                <text:p>0.0705093125241705</text:p>
              </table:table-cell>
              <table:table-cell office:value-type="float" office:value="0.073438761411891">
                <text:p>0.0734387614118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0.0453604675781894">
                <text:p>0.0453604675781894</text:p>
              </table:table-cell>
              <table:table-cell office:value-type="float" office:value="0.0501185557647548">
                <text:p>0.0501185557647548</text:p>
              </table:table-cell>
              <table:table-cell office:value-type="float" office:value="0.0542552576018175">
                <text:p>0.0542552576018175</text:p>
              </table:table-cell>
              <table:table-cell office:value-type="float" office:value="0.0574945468030379">
                <text:p>0.0574945468030379</text:p>
              </table:table-cell>
              <table:table-cell office:value-type="float" office:value="0.0617660250613652">
                <text:p>0.0617660250613652</text:p>
              </table:table-cell>
              <table:table-cell office:value-type="float" office:value="0.066452922814063">
                <text:p>0.066452922814063</text:p>
              </table:table-cell>
              <table:table-cell office:value-type="float" office:value="0.0703552645769424">
                <text:p>0.0703552645769424</text:p>
              </table:table-cell>
              <table:table-cell office:value-type="float" office:value="0.0734028249548708">
                <text:p>0.0734028249548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0.0465152822149208">
                <text:p>0.0465152822149208</text:p>
              </table:table-cell>
              <table:table-cell office:value-type="float" office:value="0.0500432059347299">
                <text:p>0.0500432059347299</text:p>
              </table:table-cell>
              <table:table-cell office:value-type="float" office:value="0.054333843438449">
                <text:p>0.054333843438449</text:p>
              </table:table-cell>
              <table:table-cell office:value-type="float" office:value="0.0576517210584183">
                <text:p>0.0576517210584183</text:p>
              </table:table-cell>
              <table:table-cell office:value-type="float" office:value="0.0624182264649043">
                <text:p>0.0624182264649043</text:p>
              </table:table-cell>
              <table:table-cell office:value-type="float" office:value="0.0661500387636001">
                <text:p>0.0661500387636001</text:p>
              </table:table-cell>
              <table:table-cell office:value-type="float" office:value="0.070382882898981">
                <text:p>0.070382882898981</text:p>
              </table:table-cell>
              <table:table-cell office:value-type="float" office:value="0.0735564505522103">
                <text:p>0.0735564505522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0.0455511399422128">
                <text:p>0.0455511399422128</text:p>
              </table:table-cell>
              <table:table-cell office:value-type="float" office:value="0.049304175556139">
                <text:p>0.049304175556139</text:p>
              </table:table-cell>
              <table:table-cell office:value-type="float" office:value="0.0533239881068888">
                <text:p>0.0533239881068888</text:p>
              </table:table-cell>
              <table:table-cell office:value-type="float" office:value="0.0573713596269416">
                <text:p>0.0573713596269416</text:p>
              </table:table-cell>
              <table:table-cell office:value-type="float" office:value="0.0621182639496508">
                <text:p>0.0621182639496508</text:p>
              </table:table-cell>
              <table:table-cell office:value-type="float" office:value="0.066501340309103">
                <text:p>0.066501340309103</text:p>
              </table:table-cell>
              <table:table-cell office:value-type="float" office:value="0.0697619126798216">
                <text:p>0.0697619126798216</text:p>
              </table:table-cell>
              <table:table-cell office:value-type="float" office:value="0.0739538506403425">
                <text:p>0.0739538506403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0.0460252077577409">
                <text:p>0.0460252077577409</text:p>
              </table:table-cell>
              <table:table-cell office:value-type="float" office:value="0.0493486185983364">
                <text:p>0.0493486185983364</text:p>
              </table:table-cell>
              <table:table-cell office:value-type="float" office:value="0.0545584359330283">
                <text:p>0.0545584359330283</text:p>
              </table:table-cell>
              <table:table-cell office:value-type="float" office:value="0.0576597143635636">
                <text:p>0.0576597143635636</text:p>
              </table:table-cell>
              <table:table-cell office:value-type="float" office:value="0.0620277428276931">
                <text:p>0.0620277428276931</text:p>
              </table:table-cell>
              <table:table-cell office:value-type="float" office:value="0.0661893982037067">
                <text:p>0.0661893982037067</text:p>
              </table:table-cell>
              <table:table-cell office:value-type="float" office:value="0.0703113366042542">
                <text:p>0.0703113366042542</text:p>
              </table:table-cell>
              <table:table-cell office:value-type="float" office:value="0.0742498994246728">
                <text:p>0.0742498994246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0.0465665733414944">
                <text:p>0.0465665733414944</text:p>
              </table:table-cell>
              <table:table-cell office:value-type="float" office:value="0.0502051542771761">
                <text:p>0.0502051542771761</text:p>
              </table:table-cell>
              <table:table-cell office:value-type="float" office:value="0.054205719454335">
                <text:p>0.054205719454335</text:p>
              </table:table-cell>
              <table:table-cell office:value-type="float" office:value="0.0577997714811989">
                <text:p>0.0577997714811989</text:p>
              </table:table-cell>
              <table:table-cell office:value-type="float" office:value="0.0624129392699875">
                <text:p>0.0624129392699875</text:p>
              </table:table-cell>
              <table:table-cell office:value-type="float" office:value="0.0658218423075289">
                <text:p>0.0658218423075289</text:p>
              </table:table-cell>
              <table:table-cell office:value-type="float" office:value="0.0696895721972024">
                <text:p>0.0696895721972024</text:p>
              </table:table-cell>
              <table:table-cell office:value-type="float" office:value="0.0737158172717922">
                <text:p>0.0737158172717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0.0459456845719869">
                <text:p>0.0459456845719869</text:p>
              </table:table-cell>
              <table:table-cell office:value-type="float" office:value="0.0494478977642025">
                <text:p>0.0494478977642025</text:p>
              </table:table-cell>
              <table:table-cell office:value-type="float" office:value="0.0542944384108335">
                <text:p>0.0542944384108335</text:p>
              </table:table-cell>
              <table:table-cell office:value-type="float" office:value="0.0576316811918367">
                <text:p>0.0576316811918367</text:p>
              </table:table-cell>
              <table:table-cell office:value-type="float" office:value="0.0622625426965527">
                <text:p>0.0622625426965527</text:p>
              </table:table-cell>
              <table:table-cell office:value-type="float" office:value="0.0659144341429738">
                <text:p>0.0659144341429738</text:p>
              </table:table-cell>
              <table:table-cell office:value-type="float" office:value="0.069876771694448">
                <text:p>0.069876771694448</text:p>
              </table:table-cell>
              <table:table-cell office:value-type="float" office:value="0.0732114523492913">
                <text:p>0.07321145234929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0.0453453153600766">
                <text:p>0.0453453153600766</text:p>
              </table:table-cell>
              <table:table-cell office:value-type="float" office:value="0.0493694115174934">
                <text:p>0.0493694115174934</text:p>
              </table:table-cell>
              <table:table-cell office:value-type="float" office:value="0.0541868786069202">
                <text:p>0.0541868786069202</text:p>
              </table:table-cell>
              <table:table-cell office:value-type="float" office:value="0.0573656729566046">
                <text:p>0.0573656729566046</text:p>
              </table:table-cell>
              <table:table-cell office:value-type="float" office:value="0.0611942221443668">
                <text:p>0.0611942221443668</text:p>
              </table:table-cell>
              <table:table-cell office:value-type="float" office:value="0.0657240560149755">
                <text:p>0.0657240560149755</text:p>
              </table:table-cell>
              <table:table-cell office:value-type="float" office:value="0.0701067381285733">
                <text:p>0.0701067381285733</text:p>
              </table:table-cell>
              <table:table-cell office:value-type="float" office:value="0.0733923083501135">
                <text:p>0.0733923083501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0.0443701278938645">
                <text:p>0.0443701278938645</text:p>
              </table:table-cell>
              <table:table-cell office:value-type="float" office:value="0.0488256550307874">
                <text:p>0.0488256550307874</text:p>
              </table:table-cell>
              <table:table-cell office:value-type="float" office:value="0.0521784751024341">
                <text:p>0.0521784751024341</text:p>
              </table:table-cell>
              <table:table-cell office:value-type="float" office:value="0.0559011117563794">
                <text:p>0.0559011117563794</text:p>
              </table:table-cell>
              <table:table-cell office:value-type="float" office:value="0.0599724845638625">
                <text:p>0.0599724845638625</text:p>
              </table:table-cell>
              <table:table-cell office:value-type="float" office:value="0.0638946114067032">
                <text:p>0.0638946114067032</text:p>
              </table:table-cell>
              <table:table-cell office:value-type="float" office:value="0.0690537695037838">
                <text:p>0.0690537695037838</text:p>
              </table:table-cell>
              <table:table-cell office:value-type="float" office:value="0.0720917833731349">
                <text:p>0.0720917833731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0.0439935191194428">
                <text:p>0.0439935191194428</text:p>
              </table:table-cell>
              <table:table-cell office:value-type="float" office:value="0.0476335885593047">
                <text:p>0.0476335885593047</text:p>
              </table:table-cell>
              <table:table-cell office:value-type="float" office:value="0.0520180350656481">
                <text:p>0.0520180350656481</text:p>
              </table:table-cell>
              <table:table-cell office:value-type="float" office:value="0.0535144906926473">
                <text:p>0.0535144906926473</text:p>
              </table:table-cell>
              <table:table-cell office:value-type="float" office:value="0.0587966997298407">
                <text:p>0.0587966997298407</text:p>
              </table:table-cell>
              <table:table-cell office:value-type="float" office:value="0.0628993907300819">
                <text:p>0.0628993907300819</text:p>
              </table:table-cell>
              <table:table-cell office:value-type="float" office:value="0.06702262202518">
                <text:p>0.06702262202518</text:p>
              </table:table-cell>
              <table:table-cell office:value-type="float" office:value="0.0701321269229714">
                <text:p>0.0701321269229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0.0413967205656796">
                <text:p>0.0413967205656796</text:p>
              </table:table-cell>
              <table:table-cell office:value-type="float" office:value="0.0456475617745774">
                <text:p>0.0456475617745774</text:p>
              </table:table-cell>
              <table:table-cell office:value-type="float" office:value="0.0487843281989222">
                <text:p>0.0487843281989222</text:p>
              </table:table-cell>
              <table:table-cell office:value-type="float" office:value="0.0501637898990649">
                <text:p>0.0501637898990649</text:p>
              </table:table-cell>
              <table:table-cell office:value-type="float" office:value="0.0559880261848835">
                <text:p>0.0559880261848835</text:p>
              </table:table-cell>
              <table:table-cell office:value-type="float" office:value="0.0599393806988087">
                <text:p>0.0599393806988087</text:p>
              </table:table-cell>
              <table:table-cell office:value-type="float" office:value="0.0644482451441842">
                <text:p>0.0644482451441842</text:p>
              </table:table-cell>
              <table:table-cell office:value-type="float" office:value="0.0679047050305074">
                <text:p>0.06790470503050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0.0387474829825725">
                <text:p>0.0387474829825725</text:p>
              </table:table-cell>
              <table:table-cell office:value-type="float" office:value="0.0425314848070945">
                <text:p>0.0425314848070945</text:p>
              </table:table-cell>
              <table:table-cell office:value-type="float" office:value="0.0460906933434328">
                <text:p>0.0460906933434328</text:p>
              </table:table-cell>
              <table:table-cell office:value-type="float" office:value="0.045817779354584">
                <text:p>0.045817779354584</text:p>
              </table:table-cell>
              <table:table-cell office:value-type="float" office:value="0.0529764547744009">
                <text:p>0.0529764547744009</text:p>
              </table:table-cell>
              <table:table-cell office:value-type="float" office:value="0.0557317377240513">
                <text:p>0.0557317377240513</text:p>
              </table:table-cell>
              <table:table-cell office:value-type="float" office:value="0.0590286635324933">
                <text:p>0.0590286635324933</text:p>
              </table:table-cell>
              <table:table-cell office:value-type="float" office:value="0.0632554082453843">
                <text:p>0.06325540824538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0.0358852066120743">
                <text:p>0.0358852066120743</text:p>
              </table:table-cell>
              <table:table-cell office:value-type="float" office:value="0.0383066014952544">
                <text:p>0.0383066014952544</text:p>
              </table:table-cell>
              <table:table-cell office:value-type="float" office:value="0.0414995130726609">
                <text:p>0.0414995130726609</text:p>
              </table:table-cell>
              <table:table-cell office:value-type="float" office:value="0.0412093236429385">
                <text:p>0.0412093236429385</text:p>
              </table:table-cell>
              <table:table-cell office:value-type="float" office:value="0.0484791730727476">
                <text:p>0.0484791730727476</text:p>
              </table:table-cell>
              <table:table-cell office:value-type="float" office:value="0.0504518147719959">
                <text:p>0.0504518147719959</text:p>
              </table:table-cell>
              <table:table-cell office:value-type="float" office:value="0.0535017316013232">
                <text:p>0.0535017316013232</text:p>
              </table:table-cell>
              <table:table-cell office:value-type="float" office:value="0.0575547950057771">
                <text:p>0.0575547950057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0.0315997966436894">
                <text:p>0.0315997966436894</text:p>
              </table:table-cell>
              <table:table-cell office:value-type="float" office:value="0.0343407343049633">
                <text:p>0.0343407343049633</text:p>
              </table:table-cell>
              <table:table-cell office:value-type="float" office:value="0.0365493346088727">
                <text:p>0.0365493346088727</text:p>
              </table:table-cell>
              <table:table-cell office:value-type="float" office:value="0.0347393124654296">
                <text:p>0.0347393124654296</text:p>
              </table:table-cell>
              <table:table-cell office:value-type="float" office:value="0.0418072904100411">
                <text:p>0.0418072904100411</text:p>
              </table:table-cell>
              <table:table-cell office:value-type="float" office:value="0.0441468827979506">
                <text:p>0.0441468827979506</text:p>
              </table:table-cell>
              <table:table-cell office:value-type="float" office:value="0.0469850841714234">
                <text:p>0.0469850841714234</text:p>
              </table:table-cell>
              <table:table-cell office:value-type="float" office:value="0.0505764087878413">
                <text:p>0.0505764087878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0.0261080039604337">
                <text:p>0.0261080039604337</text:p>
              </table:table-cell>
              <table:table-cell office:value-type="float" office:value="0.0280593009319437">
                <text:p>0.0280593009319437</text:p>
              </table:table-cell>
              <table:table-cell office:value-type="float" office:value="0.0309677233108032">
                <text:p>0.0309677233108032</text:p>
              </table:table-cell>
              <table:table-cell office:value-type="float" office:value="0.0276771396764006">
                <text:p>0.0276771396764006</text:p>
              </table:table-cell>
              <table:table-cell office:value-type="float" office:value="0.0350681545551202">
                <text:p>0.0350681545551202</text:p>
              </table:table-cell>
              <table:table-cell office:value-type="float" office:value="0.0366614867529649">
                <text:p>0.0366614867529649</text:p>
              </table:table-cell>
              <table:table-cell office:value-type="float" office:value="0.0397945118478809">
                <text:p>0.0397945118478809</text:p>
              </table:table-cell>
              <table:table-cell office:value-type="float" office:value="0.0415129106312694">
                <text:p>0.0415129106312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0.0198533649642852">
                <text:p>0.0198533649642852</text:p>
              </table:table-cell>
              <table:table-cell office:value-type="float" office:value="0.02195982235381">
                <text:p>0.02195982235381</text:p>
              </table:table-cell>
              <table:table-cell office:value-type="float" office:value="0.0236964233979527">
                <text:p>0.0236964233979527</text:p>
              </table:table-cell>
              <table:table-cell office:value-type="float" office:value="0.0211266280735598">
                <text:p>0.0211266280735598</text:p>
              </table:table-cell>
              <table:table-cell office:value-type="float" office:value="0.0273288081958209">
                <text:p>0.0273288081958209</text:p>
              </table:table-cell>
              <table:table-cell office:value-type="float" office:value="0.0294688046590395">
                <text:p>0.0294688046590395</text:p>
              </table:table-cell>
              <table:table-cell office:value-type="float" office:value="0.0316375963809477">
                <text:p>0.0316375963809477</text:p>
              </table:table-cell>
              <table:table-cell office:value-type="float" office:value="0.0321917135378134">
                <text:p>0.032191713537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0.0148728113060008">
                <text:p>0.0148728113060008</text:p>
              </table:table-cell>
              <table:table-cell office:value-type="float" office:value="0.0158283072533011">
                <text:p>0.0158283072533011</text:p>
              </table:table-cell>
              <table:table-cell office:value-type="float" office:value="0.0167092009170444">
                <text:p>0.0167092009170444</text:p>
              </table:table-cell>
              <table:table-cell office:value-type="float" office:value="0.01248655689164">
                <text:p>0.01248655689164</text:p>
              </table:table-cell>
              <table:table-cell office:value-type="float" office:value="0.0199161210779878">
                <text:p>0.0199161210779878</text:p>
              </table:table-cell>
              <table:table-cell office:value-type="float" office:value="0.0214164096322531">
                <text:p>0.0214164096322531</text:p>
              </table:table-cell>
              <table:table-cell office:value-type="float" office:value="0.022074959500154">
                <text:p>0.022074959500154</text:p>
              </table:table-cell>
              <table:table-cell office:value-type="float" office:value="0.0227266254974963">
                <text:p>0.0227266254974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0.00926649671499672">
                <text:p>0.00926649671499672</text:p>
              </table:table-cell>
              <table:table-cell office:value-type="float" office:value="0.00992261109009626">
                <text:p>0.00992261109009626</text:p>
              </table:table-cell>
              <table:table-cell office:value-type="float" office:value="0.0106632929683003">
                <text:p>0.0106632929683003</text:p>
              </table:table-cell>
              <table:table-cell office:value-type="float" office:value="0.00589760118455436">
                <text:p>0.00589760118455436</text:p>
              </table:table-cell>
              <table:table-cell office:value-type="float" office:value="0.0116203099263553">
                <text:p>0.0116203099263553</text:p>
              </table:table-cell>
              <table:table-cell office:value-type="float" office:value="0.0128980175641583">
                <text:p>0.0128980175641583</text:p>
              </table:table-cell>
              <table:table-cell office:value-type="float" office:value="0.0131057038946479">
                <text:p>0.0131057038946479</text:p>
              </table:table-cell>
              <table:table-cell office:value-type="float" office:value="0.0138758523295472">
                <text:p>0.0138758523295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0.00402086030369871">
                <text:p>0.00402086030369871</text:p>
              </table:table-cell>
              <table:table-cell office:value-type="float" office:value="0.00413301655656633">
                <text:p>0.00413301655656633</text:p>
              </table:table-cell>
              <table:table-cell office:value-type="float" office:value="0.00427500055043593">
                <text:p>0.00427500055043593</text:p>
              </table:table-cell>
              <table:table-cell office:value-type="float" office:value="-0.000228773977125334">
                <text:p>-0.000228773977125334</text:p>
              </table:table-cell>
              <table:table-cell office:value-type="float" office:value="0.00491386849698295">
                <text:p>0.00491386849698295</text:p>
              </table:table-cell>
              <table:table-cell office:value-type="float" office:value="0.00525231716181368">
                <text:p>0.00525231716181368</text:p>
              </table:table-cell>
              <table:table-cell office:value-type="float" office:value="0.00566501537192329">
                <text:p>0.00566501537192329</text:p>
              </table:table-cell>
              <table:table-cell office:value-type="float" office:value="0.00602133374110549">
                <text:p>0.00602133374110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-0.00115983335854035">
                <text:p>-0.00115983335854035</text:p>
              </table:table-cell>
              <table:table-cell office:value-type="float" office:value="-0.000880707188156522">
                <text:p>-0.000880707188156522</text:p>
              </table:table-cell>
              <table:table-cell office:value-type="float" office:value="-0.000960749751800492">
                <text:p>-0.000960749751800492</text:p>
              </table:table-cell>
              <table:table-cell office:value-type="float" office:value="-0.00603588481616624">
                <text:p>-0.00603588481616624</text:p>
              </table:table-cell>
              <table:table-cell office:value-type="float" office:value="-0.00210211398293922">
                <text:p>-0.00210211398293922</text:p>
              </table:table-cell>
              <table:table-cell office:value-type="float" office:value="-0.00165065263690016">
                <text:p>-0.00165065263690016</text:p>
              </table:table-cell>
              <table:table-cell office:value-type="float" office:value="-0.00138938309440347">
                <text:p>-0.00138938309440347</text:p>
              </table:table-cell>
              <table:table-cell office:value-type="float" office:value="-0.00181140876096637">
                <text:p>-0.00181140876096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-0.00645620964898358">
                <text:p>-0.00645620964898358</text:p>
              </table:table-cell>
              <table:table-cell office:value-type="float" office:value="-0.00691386605559264">
                <text:p>-0.00691386605559264</text:p>
              </table:table-cell>
              <table:table-cell office:value-type="float" office:value="-0.00723080716622663">
                <text:p>-0.00723080716622663</text:p>
              </table:table-cell>
              <table:table-cell office:value-type="float" office:value="-0.0129949218493897">
                <text:p>-0.0129949218493897</text:p>
              </table:table-cell>
              <table:table-cell office:value-type="float" office:value="-0.00751086483286561">
                <text:p>-0.00751086483286561</text:p>
              </table:table-cell>
              <table:table-cell office:value-type="float" office:value="-0.00887547637308001">
                <text:p>-0.00887547637308001</text:p>
              </table:table-cell>
              <table:table-cell office:value-type="float" office:value="-0.00904464768761826">
                <text:p>-0.00904464768761826</text:p>
              </table:table-cell>
              <table:table-cell office:value-type="float" office:value="-0.0100324722315949">
                <text:p>-0.01003247223159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-0.0112828252823916">
                <text:p>-0.0112828252823916</text:p>
              </table:table-cell>
              <table:table-cell office:value-type="float" office:value="-0.0123647633349557">
                <text:p>-0.0123647633349557</text:p>
              </table:table-cell>
              <table:table-cell office:value-type="float" office:value="-0.0139744992245116">
                <text:p>-0.0139744992245116</text:p>
              </table:table-cell>
              <table:table-cell office:value-type="float" office:value="-0.0193315365739857">
                <text:p>-0.0193315365739857</text:p>
              </table:table-cell>
              <table:table-cell office:value-type="float" office:value="-0.0152375036084421">
                <text:p>-0.0152375036084421</text:p>
              </table:table-cell>
              <table:table-cell office:value-type="float" office:value="-0.0164707212429873">
                <text:p>-0.0164707212429873</text:p>
              </table:table-cell>
              <table:table-cell office:value-type="float" office:value="-0.0177484154555092">
                <text:p>-0.0177484154555092</text:p>
              </table:table-cell>
              <table:table-cell office:value-type="float" office:value="-0.0182093555559621">
                <text:p>-0.01820935555596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-0.0178972380602439">
                <text:p>-0.0178972380602439</text:p>
              </table:table-cell>
              <table:table-cell office:value-type="float" office:value="-0.0191504467569269">
                <text:p>-0.0191504467569269</text:p>
              </table:table-cell>
              <table:table-cell office:value-type="float" office:value="-0.0208750524716507">
                <text:p>-0.0208750524716507</text:p>
              </table:table-cell>
              <table:table-cell office:value-type="float" office:value="-0.0266964317398302">
                <text:p>-0.0266964317398302</text:p>
              </table:table-cell>
              <table:table-cell office:value-type="float" office:value="-0.0236072631633868">
                <text:p>-0.0236072631633868</text:p>
              </table:table-cell>
              <table:table-cell office:value-type="float" office:value="-0.0254110524652427">
                <text:p>-0.0254110524652427</text:p>
              </table:table-cell>
              <table:table-cell office:value-type="float" office:value="-0.0270950599734138">
                <text:p>-0.0270950599734138</text:p>
              </table:table-cell>
              <table:table-cell office:value-type="float" office:value="-0.028646230305021">
                <text:p>-0.028646230305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-0.0227216905776891">
                <text:p>-0.0227216905776891</text:p>
              </table:table-cell>
              <table:table-cell office:value-type="float" office:value="-0.0252243606284473">
                <text:p>-0.0252243606284473</text:p>
              </table:table-cell>
              <table:table-cell office:value-type="float" office:value="-0.0278442697659538">
                <text:p>-0.0278442697659538</text:p>
              </table:table-cell>
              <table:table-cell office:value-type="float" office:value="-0.0339756091428147">
                <text:p>-0.0339756091428147</text:p>
              </table:table-cell>
              <table:table-cell office:value-type="float" office:value="-0.0309747432538753">
                <text:p>-0.0309747432538753</text:p>
              </table:table-cell>
              <table:table-cell office:value-type="float" office:value="-0.0334035849276787">
                <text:p>-0.0334035849276787</text:p>
              </table:table-cell>
              <table:table-cell office:value-type="float" office:value="-0.0347561946697246">
                <text:p>-0.0347561946697246</text:p>
              </table:table-cell>
              <table:table-cell office:value-type="float" office:value="-0.0370869748705341">
                <text:p>-0.03708697487053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0.0285189856838013">
                <text:p>-0.0285189856838013</text:p>
              </table:table-cell>
              <table:table-cell office:value-type="float" office:value="-0.031172349904866">
                <text:p>-0.031172349904866</text:p>
              </table:table-cell>
              <table:table-cell office:value-type="float" office:value="-0.0339645570862988">
                <text:p>-0.0339645570862988</text:p>
              </table:table-cell>
              <table:table-cell office:value-type="float" office:value="-0.0405254746697597">
                <text:p>-0.0405254746697597</text:p>
              </table:table-cell>
              <table:table-cell office:value-type="float" office:value="-0.0391807133255603">
                <text:p>-0.0391807133255603</text:p>
              </table:table-cell>
              <table:table-cell office:value-type="float" office:value="-0.0413552227128735">
                <text:p>-0.0413552227128735</text:p>
              </table:table-cell>
              <table:table-cell office:value-type="float" office:value="-0.0430919023285425">
                <text:p>-0.0430919023285425</text:p>
              </table:table-cell>
              <table:table-cell office:value-type="float" office:value="-0.0460937571213186">
                <text:p>-0.0460937571213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0.0329575942629493">
                <text:p>-0.0329575942629493</text:p>
              </table:table-cell>
              <table:table-cell office:value-type="float" office:value="-0.0365952653073812">
                <text:p>-0.0365952653073812</text:p>
              </table:table-cell>
              <table:table-cell office:value-type="float" office:value="-0.0395651416081507">
                <text:p>-0.0395651416081507</text:p>
              </table:table-cell>
              <table:table-cell office:value-type="float" office:value="-0.0463592116640677">
                <text:p>-0.0463592116640677</text:p>
              </table:table-cell>
              <table:table-cell office:value-type="float" office:value="-0.0450224558558246">
                <text:p>-0.0450224558558246</text:p>
              </table:table-cell>
              <table:table-cell office:value-type="float" office:value="-0.0483902882243253">
                <text:p>-0.0483902882243253</text:p>
              </table:table-cell>
              <table:table-cell office:value-type="float" office:value="-0.0513889555452096">
                <text:p>-0.0513889555452096</text:p>
              </table:table-cell>
              <table:table-cell office:value-type="float" office:value="-0.0539677875166188">
                <text:p>-0.05396778751661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4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54">
      <style:chart-properties chart:display-label="true" chart:tick-marks-major-inner="false" chart:tick-marks-major-outer="false" chart:logarithmic="false" chart:minimum="-1.2" chart:maximum="1.2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15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54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</office:automatic-styles>
  <office:body>
    <office:chart>
      <chart:chart svg:width="14.441cm" svg:height="9.869cm" xlink:href=".." xlink:type="simple" chart:class="chart:scatter" chart:style-name="ch1">
        <chart:title svg:x="4.564cm" svg:y="0.333cm" chart:style-name="ch2">
          <text:p><text:span text:style-name="T1">Funktion magnet vs</text:span><text:span text:style-name="T1"> sinus</text:span></text:p>
        </chart:title>
        <chart:legend chart:legend-position="bottom" svg:x="5.414cm" svg:y="9.297cm" style:legend-expansion="wide" chart:style-name="ch3"/>
        <chart:plot-area chart:style-name="ch4" svg:x="0.288cm" svg:y="1.393cm" svg:width="13.865cm" svg:height="7.523cm">
          <chart:coordinate-region svg:x="1.21cm" svg:y="1.58cm" svg:width="12.861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Rot.D11:Rot.D74" chart:label-cell-address="Rot.D10:Rot.D10" chart:class="chart:scatter">
            <chart:domain table:cell-range-address="Rot.C11:Rot.C74"/>
            <chart:data-point chart:repeated="64"/>
          </chart:series>
          <chart:series chart:style-name="ch9" chart:values-cell-range-address="Rot.E11:Rot.E74" chart:label-cell-address="Rot.E10:Rot.E10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</text:p>
                <draw:g>
                  <svg:desc>Rot.D10:Rot.D10</svg:desc>
                </draw:g>
              </table:table-cell>
              <table:table-cell office:value-type="string">
                <text:p>Magnet</text:p>
                <draw:g>
                  <svg:desc>Rot.E10:Rot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t.C11:Rot.C74</svg:desc>
                </draw:g>
              </table:table-cell>
              <table:table-cell office:value-type="float" office:value="0">
                <text:p>0</text:p>
                <draw:g>
                  <svg:desc>Rot.D11:Rot.D74</svg:desc>
                </draw:g>
              </table:table-cell>
              <table:table-cell office:value-type="float" office:value="0">
                <text:p>0</text:p>
                <draw:g>
                  <svg:desc>Rot.E11:Rot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100136351887836">
                <text:p>0.100136351887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217773157603089">
                <text:p>0.217773157603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344291465484499">
                <text:p>0.344291465484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1">
                <text:p>0.389418342308651</text:p>
              </table:table-cell>
              <table:table-cell office:value-type="float" office:value="0.471454630925615">
                <text:p>0.47145463092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59202188504875">
                <text:p>0.59202188504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700230945885412">
                <text:p>0.700230945885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792113107387135">
                <text:p>0.792113107387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865620619259848">
                <text:p>0.865620619259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920564034230783">
                <text:p>0.920564034230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958374909517376">
                <text:p>0.958374909517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981725194669876">
                <text:p>0.981725194669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994047380501549">
                <text:p>0.994047380501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99900788761073">
                <text:p>0.99900788761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999989505727643">
                <text:p>0.999989505727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4">
                <text:p>0.997494986604054</text:p>
              </table:table-cell>
              <table:table-cell office:value-type="float" office:value="0.999636692740265">
                <text:p>0.999636692740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0.999510431230975">
                <text:p>0.999510431230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9">
                <text:p>0.991664810452469</text:p>
              </table:table-cell>
              <table:table-cell office:value-type="float" office:value="0.999887815534707">
                <text:p>0.999887815534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0.999726702491336">
                <text:p>0.999726702491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0.996799006013655">
                <text:p>0.996799006013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987979125896493">
                <text:p>0.987979125896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0.969658182264088">
                <text:p>0.969658182264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0.938241669951139">
                <text:p>0.938241669951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0.890679090818276">
                <text:p>0.890679090818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">
                <text:p>0.67546318055115</text:p>
              </table:table-cell>
              <table:table-cell office:value-type="float" office:value="0.824969939458679">
                <text:p>0.824969939458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6">
                <text:p>0.598472144103956</text:p>
              </table:table-cell>
              <table:table-cell office:value-type="float" office:value="0.740591535438926">
                <text:p>0.740591535438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3">
                <text:p>0.515501371821463</text:p>
              </table:table-cell>
              <table:table-cell office:value-type="float" office:value="0.638800552945651">
                <text:p>0.638800552945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29">
                <text:p>0.427379880233829</text:p>
              </table:table-cell>
              <table:table-cell office:value-type="float" office:value="0.522771153419681">
                <text:p>0.522771153419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4">
                <text:p>0.334988150155904</text:p>
              </table:table-cell>
              <table:table-cell office:value-type="float" office:value="0.397547400037548">
                <text:p>0.397547400037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1">
                <text:p>0.239249329213981</text:p>
              </table:table-cell>
              <table:table-cell office:value-type="float" office:value="0.269804798016672">
                <text:p>0.269804798016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41120008059866">
                <text:p>0.141120008059866</text:p>
              </table:table-cell>
              <table:table-cell office:value-type="float" office:value="0.147433805424568">
                <text:p>0.14743380542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892">
                <text:p>0.0415806624332892</text:p>
              </table:table-cell>
              <table:table-cell office:value-type="float" office:value="0.0389753496219581">
                <text:p>0.0389753496219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14">
                <text:p>-0.0583741434275814</text:p>
              </table:table-cell>
              <table:table-cell office:value-type="float" office:value="-0.0558700760483485">
                <text:p>-0.0558700760483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5">
                <text:p>-0.15774569414325</text:p>
              </table:table-cell>
              <table:table-cell office:value-type="float" office:value="-0.167273288194601">
                <text:p>-0.167273288194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3">
                <text:p>-0.255541102026833</text:p>
              </table:table-cell>
              <table:table-cell office:value-type="float" office:value="-0.291135012424154">
                <text:p>-0.291135012424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2">
                <text:p>-0.350783227689622</text:p>
              </table:table-cell>
              <table:table-cell office:value-type="float" office:value="-0.418979163777693">
                <text:p>-0.418979163777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4">
                <text:p>-0.442520443294854</text:p>
              </table:table-cell>
              <table:table-cell office:value-type="float" office:value="-0.543083639550796">
                <text:p>-0.543083639550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5">
                <text:p>-0.529836140908495</text:p>
              </table:table-cell>
              <table:table-cell office:value-type="float" office:value="-0.657022690734484">
                <text:p>-0.657022690734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21">
                <text:p>-0.611857890942721</text:p>
              </table:table-cell>
              <table:table-cell office:value-type="float" office:value="-0.756055130192154">
                <text:p>-0.756055130192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5">
                <text:p>-0.687766159183975</text:p>
              </table:table-cell>
              <table:table-cell office:value-type="float" office:value="-0.837331106748078">
                <text:p>-0.837331106748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756802495307929">
                <text:p>-0.756802495307929</text:p>
              </table:table-cell>
              <table:table-cell office:value-type="float" office:value="-0.899907615495089">
                <text:p>-0.8999076154950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1">
                <text:p>-0.818277111064411</text:p>
              </table:table-cell>
              <table:table-cell office:value-type="float" office:value="-0.944580889336252">
                <text:p>-0.944580889336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9">
                <text:p>-0.871575772413589</text:p>
              </table:table-cell>
              <table:table-cell office:value-type="float" office:value="-0.973560683961579">
                <text:p>-0.973560683961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990025701109027">
                <text:p>-0.990025701109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997609717345392">
                <text:p>-0.997609717345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999873487426941">
                <text:p>-0.99987348742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0.999817708530329">
                <text:p>-0.999817708530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-0.999487286876072">
                <text:p>-0.999487286876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-0.999707347027225">
                <text:p>-0.999707347027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3">
                <text:p>-0.982452612624333</text:p>
              </table:table-cell>
              <table:table-cell office:value-type="float" office:value="-0.999977807550217">
                <text:p>-0.999977807550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-0.998537204793376">
                <text:p>-0.998537204793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3">
                <text:p>-0.925814682327733</text:p>
              </table:table-cell>
              <table:table-cell office:value-type="float" office:value="-0.992589300025661">
                <text:p>-0.992589300025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5">
                <text:p>-0.883454655720155</text:p>
              </table:table-cell>
              <table:table-cell office:value-type="float" office:value="-0.978669466583819">
                <text:p>-0.978669466583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3">
                <text:p>-0.832267442223903</text:p>
              </table:table-cell>
              <table:table-cell office:value-type="float" office:value="-0.953113479983468">
                <text:p>-0.953113479983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9">
                <text:p>-0.772764487555989</text:p>
              </table:table-cell>
              <table:table-cell office:value-type="float" office:value="-0.912580484368875">
                <text:p>-0.912580484368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5">
                <text:p>-0.705540325570395</text:p>
              </table:table-cell>
              <table:table-cell office:value-type="float" office:value="-0.854575620230628">
                <text:p>-0.85457562023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4">
                <text:p>-0.631266637872324</text:p>
              </table:table-cell>
              <table:table-cell office:value-type="float" office:value="-0.777916690506487">
                <text:p>-0.777916690506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41">
                <text:p>-0.550685542597641</text:p>
              </table:table-cell>
              <table:table-cell office:value-type="float" office:value="-0.683093459327645">
                <text:p>-0.683093459327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61">
                <text:p>-0.464602179413761</text:p>
              </table:table-cell>
              <table:table-cell office:value-type="float" office:value="-0.572477374240447">
                <text:p>-0.5724773742404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41">
                <text:p>-0.373876664830241</text:p>
              </table:table-cell>
              <table:table-cell office:value-type="float" office:value="-0.450352872937566">
                <text:p>-0.450352872937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279415498198931">
                <text:p>-0.279415498198931</text:p>
              </table:table-cell>
              <table:table-cell office:value-type="float" office:value="-0.322757784694072">
                <text:p>-0.322757784694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0.182162504272101">
                <text:p>-0.182162504272101</text:p>
              </table:table-cell>
              <table:table-cell office:value-type="float" office:value="-0.197138187982369">
                <text:p>-0.197138187982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0.0830894028175026">
                <text:p>-0.0830894028175026</text:p>
              </table:table-cell>
              <table:table-cell office:value-type="float" office:value="-0.0818408127091189">
                <text:p>-0.0818408127091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168139004843435">
                <text:p>0.0168139004843435</text:p>
              </table:table-cell>
              <table:table-cell office:value-type="float" office:value="0.0152499741965903">
                <text:p>0.01524997419659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7.3$Linux_X86_64 LibreOffice_project/58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